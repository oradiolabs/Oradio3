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22.62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418cm" fo:min-width="22.7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2.626cm" fo:padding-top="0.151cm" fo:padding-bottom="0.151cm" fo:padding-left="0.276cm" fo:padding-right="0.276cm"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3.668cm" fo:min-width="26.435cm" fo:padding-top="0.151cm" fo:padding-bottom="0.151cm" fo:padding-left="0.276cm" fo:padding-right="0.276cm" loext:decorative="false"/>
    </style:style>
    <style:style style:name="gr3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617cm" fo:min-width="15.006cm" fo:padding-top="0.151cm" fo:padding-bottom="0.151cm" fo:padding-left="0.276cm" fo:padding-right="0.276cm"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359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1"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5.006cm" fo:padding-top="0.151cm" fo:padding-bottom="0.151cm" fo:padding-left="0.276cm" fo:padding-right="0.276cm" style:writing-mode="lr-tb" loext:decorative="false"/>
      <style:paragraph-properties style:writing-mode="lr-tb"/>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1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216cm" fo:min-width="7.48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8.816cm" fo:min-width="26.435cm" fo:padding-top="0.151cm" fo:padding-bottom="0.151cm" fo:padding-left="0.276cm" fo:padding-right="0.276cm" loext:decorative="false"/>
    </style:style>
    <style:style style:name="gr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359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75"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5.006cm" fo:padding-top="0.151cm" fo:padding-bottom="0.151cm" fo:padding-left="0.276cm" fo:padding-right="0.276cm" style:writing-mode="lr-tb" loext:decorative="false"/>
      <style:paragraph-properties style:writing-mode="lr-tb"/>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1cm" fo:min-width="13.8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216cm" fo:min-width="7.48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44cm" fo:min-width="16.4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3.398cm" fo:min-width="17.228cm" fo:padding-top="0.151cm" fo:padding-bottom="0.151cm" fo:padding-left="0.276cm" fo:padding-right="0.276cm" loext:decorative="false"/>
    </style:style>
    <style:style style:name="gr11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425cm" fo:min-width="17.228cm" fo:padding-top="0.151cm" fo:padding-bottom="0.151cm" fo:padding-left="0.276cm" fo:padding-right="0.276cm" style:writing-mode="lr-tb" loext:decorative="false"/>
      <style:paragraph-properties style:writing-mode="lr-tb"/>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0" style:family="graphic" style:parent-style-name="standard">
      <style:graphic-properties draw:stroke="none" svg:stroke-color="#000000" draw:fill="none" draw:fill-color="#ffffff" draw:auto-grow-height="true" draw:auto-grow-width="false" fo:min-height="0.99cm" loext:decorative="false"/>
      <style:paragraph-properties style:writing-mode="lr-tb"/>
    </style:style>
    <style:style style:name="gr1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209cm" fo:min-width="18.91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7.161cm" fo:min-width="21.356cm" fo:padding-top="0.151cm" fo:padding-bottom="0.151cm" fo:padding-left="0.276cm" fo:padding-right="0.276cm" loext:decorative="false"/>
    </style:style>
    <style:style style:name="gr14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6.048cm" fo:min-width="12.226cm" fo:padding-top="0.151cm" fo:padding-bottom="0.151cm" fo:padding-left="0.276cm" fo:padding-right="0.276cm"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493cm" fo:min-width="11.0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12.226cm" fo:padding-top="0.151cm" fo:padding-bottom="0.151cm" fo:padding-left="0.276cm" fo:padding-right="0.276cm" style:writing-mode="lr-tb" loext:decorative="false"/>
      <style:paragraph-properties style:writing-mode="lr-tb"/>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876cm" fo:min-width="12.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9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638cm" fo:min-width="7.08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88" style:family="graphic" style:parent-style-name="standard">
      <style:graphic-properties draw:stroke="none" svg:stroke-color="#000000" draw:fill="none" draw:fill-color="#ffffff" draw:auto-grow-height="true" draw:auto-grow-width="false" fo:min-height="1.108cm" loext:decorative="false"/>
      <style:paragraph-properties style:writing-mode="lr-tb"/>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071cm" fo:min-width="12.51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9.383cm" fo:min-width="27.897cm" fo:padding-top="0.151cm" fo:padding-bottom="0.151cm" fo:padding-left="0.276cm" fo:padding-right="0.276cm" loext:decorative="false"/>
    </style:style>
    <style:style style:name="gr206"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7.148cm" fo:padding-top="0.151cm" fo:padding-bottom="0.151cm" fo:padding-left="0.276cm" fo:padding-right="0.276cm" loext:decorative="false"/>
    </style:style>
    <style:style style:name="gr20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148cm" fo:padding-top="0.151cm" fo:padding-bottom="0.151cm" fo:padding-left="0.276cm" fo:padding-right="0.276cm" style:writing-mode="lr-tb" loext:decorative="false"/>
      <style:paragraph-properties style:writing-mode="lr-tb"/>
    </style:style>
    <style:style style:name="gr2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30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9.07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2"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50" style:family="graphic" style:parent-style-name="standard" style:list-style-name="L2">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51" style:family="graphic" style:parent-style-name="standard" style:list-style-name="L2">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5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7"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258" style:family="graphic" style:parent-style-name="standard">
      <style:graphic-properties svg:stroke-color="#000000" draw:fill="none" draw:fill-color="#ffffff" loext:fill-use-slide-background="false" draw:textarea-horizontal-align="justify" draw:textarea-vertical-align="middle" draw:auto-grow-height="false" fo:min-height="0.384cm" fo:min-width="7.12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text-align="center" fo:text-indent="0cm"/>
    </style:style>
    <style:style style:name="P17" style:family="paragraph">
      <loext:graphic-properties draw:fill="none"/>
      <style:paragraph-properties fo:margin-left="0cm" fo:margin-right="0cm" fo:text-align="center" fo:text-indent="0cm" style:writing-mode="lr-tb"/>
    </style:style>
    <style:style style:name="P18" style:family="paragraph">
      <style:paragraph-properties fo:text-align="center"/>
      <style:text-properties fo:font-size="14pt"/>
    </style:style>
    <style:style style:name="P19" style:family="paragraph">
      <loext:graphic-properties draw:fill="none" draw:fill-color="#ffffff"/>
      <style:paragraph-properties fo:text-align="center"/>
      <style:text-properties fo:font-size="14pt"/>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3.178cm" svg:height="3.919cm" svg:x="2.617cm" svg:y="2.6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2.142cm" svg:y="7.22cm">
          <draw:text-box>
            <text:p><text:span text:style-name="T1">netw</text:span><text:span text:style-name="T1">ork</text:span></text:p>
            <text:p><text:span text:style-name="T1">interf</text:span><text:span text:style-name="T1">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3.178cm" svg:height="4.622cm" svg:x="2.617cm" svg:y="8.9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2.617cm" svg:y="8.9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2.047cm" svg:y="7.608cm">
          <draw:text-box>
            <text:p><text:span text:style-name="T1">ALSA</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0.46cm" svg:y="10.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3.92cm" svg:y1="10.707cm" svg:x2="23.92cm" svg:y2="10.957cm" draw:start-shape="id1" draw:start-glue-point="16" draw:end-shape="id1" draw:end-glue-point="17" svg:d="M23920 107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0.11cm" svg:y="3.5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3.852cm" svg:y1="3.84cm" svg:x2="23.852cm" svg:y2="4.09cm" draw:start-shape="id2" draw:start-glue-point="16" draw:end-shape="id2" draw:end-glue-point="17" svg:d="M23852 3840v250" svg:viewBox="0 0 1 251">
            <text:p/>
          </draw:connector>
        </draw:g>
        <draw:connector draw:style-name="gr10" draw:text-style-name="P9" xml:id="id5" draw:id="id5" draw:layer="layout" draw:type="line" svg:x1="21.246cm" svg:y1="10.43cm" svg:x2="21.627cm" svg:y2="7.347cm" draw:start-shape="id3" draw:start-glue-point="7" svg:d="M21246 10430l381-3083" svg:viewBox="0 0 382 3084">
          <text:p/>
        </draw:connector>
        <draw:connector draw:style-name="gr11" draw:text-style-name="P9" draw:layer="layout" draw:type="line" svg:x1="22.637cm" svg:y1="5.563cm" svg:x2="21.627cm" svg:y2="7.347cm" draw:start-shape="id4" draw:start-glue-point="12" draw:end-shape="id5" draw:end-glue-point="3" svg:d="M22637 5563l-1010 1784" svg:viewBox="0 0 1011 1785">
          <text:p/>
        </draw:connector>
        <draw:g draw:style-name="gr3" xml:id="id22" draw:id="id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4.884cm" svg:y="3.6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8.542cm" svg:y1="3.882cm" svg:x2="18.542cm" svg:y2="4.132cm" draw:start-shape="id6" draw:start-glue-point="16" draw:end-shape="id6" draw:end-glue-point="17" svg:d="M18542 38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4.177cm" svg:y="3.5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7.835cm" svg:y1="3.825cm" svg:x2="7.835cm" svg:y2="4.075cm" draw:start-shape="id7" draw:start-glue-point="16" draw:end-shape="id7" draw:end-glue-point="17" svg:d="M7835 38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2.995cm" svg:y="10.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6.275cm" svg:y1="10.707cm" svg:x2="6.275cm" svg:y2="10.957cm" draw:start-shape="id8" draw:start-glue-point="16" draw:end-shape="id8" draw:end-glue-point="17" svg:d="M6275 10707v250" svg:viewBox="0 0 1 251">
            <text:p/>
          </draw:connector>
        </draw:g>
        <draw:connector draw:style-name="gr18" draw:text-style-name="P9" xml:id="id13" draw:id="id13" draw:layer="layout" draw:type="line" svg:x1="8.717cm" svg:y1="10.43cm" svg:x2="7.775cm" svg:y2="7.814cm" draw:start-shape="id9" draw:start-glue-point="6" svg:d="M8717 10430l-942-2616" svg:viewBox="0 0 943 2617">
          <text:p/>
        </draw:connector>
        <draw:connector draw:style-name="gr19" draw:text-style-name="P9" xml:id="id12" draw:id="id12" draw:layer="layout" draw:type="line" svg:x1="5.995cm" svg:y1="10.43cm" svg:x2="5.845cm" svg:y2="8cm" draw:start-shape="id10" draw:start-glue-point="4" svg:d="M5995 10430l-150-2430" svg:viewBox="0 0 151 2431">
          <text:p/>
        </draw:connector>
        <draw:connector draw:style-name="gr20" draw:text-style-name="P9" draw:layer="layout" draw:type="line" svg:x1="5.003cm" svg:y1="5.548cm" svg:x2="5.845cm" svg:y2="8cm" draw:start-shape="id11" draw:start-glue-point="10" draw:end-shape="id12" draw:end-glue-point="3" svg:d="M5003 5548l842 2452" svg:viewBox="0 0 843 2453">
          <text:p/>
        </draw:connector>
        <draw:connector draw:style-name="gr21" draw:text-style-name="P9" draw:layer="layout" draw:type="line" svg:x1="7.479cm" svg:y1="5.548cm" svg:x2="7.775cm" svg:y2="7.814cm" draw:start-shape="id11" draw:start-glue-point="13" draw:end-shape="id13" draw:end-glue-point="3" svg:d="M7479 5548l296 2266" svg:viewBox="0 0 297 2267">
          <text:p/>
        </draw:connector>
        <draw:frame draw:style-name="gr22" draw:text-style-name="P2" draw:layer="layout" svg:width="2.223cm" svg:height="0.725cm" svg:x="3.569cm" svg:y="7.447cm">
          <draw:text-box>
            <text:p><text:span text:style-name="T1">s</text:span><text:span text:style-name="T1">t</text:span><text:span text:style-name="T1">d</text:span><text:span text:style-name="T1">o</text:span><text:span text:style-name="T1">u</text:span><text:span text:style-name="T1">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7.28cm" svg:y="10.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10.402cm" svg:y1="10.707cm" svg:x2="10.402cm" svg:y2="10.957cm" draw:start-shape="id14" draw:start-glue-point="16" draw:end-shape="id14" draw:end-glue-point="17" svg:d="M10402 107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1.59cm" svg:y="10.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4.85cm" svg:y1="10.707cm" svg:x2="14.85cm" svg:y2="10.957cm" draw:start-shape="id15" draw:start-glue-point="16" draw:end-shape="id15" draw:end-glue-point="17" svg:d="M14850 10707v250" svg:viewBox="0 0 1 251">
            <text:p/>
          </draw:connector>
        </draw:g>
        <draw:connector draw:style-name="gr27" draw:text-style-name="P9" xml:id="id18" draw:id="id18" draw:layer="layout" draw:type="line" svg:x1="12.336cm" svg:y1="10.43cm" svg:x2="11.697cm" svg:y2="8.405cm" draw:start-shape="id16" draw:start-glue-point="7" svg:d="M12336 10430l-639-2025" svg:viewBox="0 0 640 2026">
          <text:p/>
        </draw:connector>
        <draw:connector draw:style-name="gr28" draw:text-style-name="P9" draw:layer="layout" draw:type="line" svg:x1="12.093cm" svg:y1="5.563cm" svg:x2="11.697cm" svg:y2="8.405cm" draw:start-shape="id17" draw:start-glue-point="12" draw:end-shape="id18" draw:end-glue-point="3" svg:d="M12093 5563l-396 2842" svg:viewBox="0 0 397 2843">
          <text:p/>
        </draw:connector>
        <draw:frame draw:style-name="gr29" draw:text-style-name="P11" draw:layer="layout" svg:width="3.175cm" svg:height="1.27cm" svg:x="8.015cm" svg:y="7.22cm">
          <draw:text-box>
            <text:p text:style-name="P10"><text:span text:style-name="T1">f</text:span><text:span text:style-name="T1">i</text:span><text:span text:style-name="T1">l</text:span><text:span text:style-name="T1">e</text:span><text:span text:style-name="T1"> </text:span><text:span text:style-name="T1">s</text:span><text:span text:style-name="T1">y</text:span><text:span text:style-name="T1">s</text:span><text:span text:style-name="T1">t</text:span><text:span text:style-name="T1">e</text:span><text:span text:style-name="T1">m</text:span><text:span text:style-name="T1"> </text:span></text:p>
            <text:p text:style-name="P10"><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custom-shape draw:style-name="gr30" draw:text-style-name="P13" draw:layer="layout" svg:width="23.178cm" svg:height="0.952cm" svg:x="2.617cm" svg:y="1.708cm">
          <text:p text:style-name="P12"><text:span text:style-name="T5">Components Interface: OS Service</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1" draw:text-style-name="P7" xml:id="id19" draw:id="id19" draw:layer="layout" svg:width="4.128cm" svg:height="2cm" svg:x="9.617cm" svg:y="3.5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2" draw:text-style-name="P8" draw:layer="layout" draw:type="line" svg:x1="13.275cm" svg:y1="3.84cm" svg:x2="13.275cm" svg:y2="4.09cm" draw:start-shape="id19" draw:start-glue-point="16" draw:end-shape="id19" draw:end-glue-point="17" svg:d="M13275 3840v250" svg:viewBox="0 0 1 251">
            <text:p/>
          </draw:connector>
        </draw:g>
        <draw:g draw:style-name="gr3"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3" draw:text-style-name="P7" xml:id="id20" draw:id="id20" draw:layer="layout" svg:width="3.81cm" svg:height="1.805cm" svg:x="15.917cm" svg:y="10.5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34" draw:text-style-name="P8" draw:layer="layout" draw:type="line" svg:x1="19.257cm" svg:y1="10.807cm" svg:x2="19.257cm" svg:y2="11.057cm" draw:start-shape="id20" draw:start-glue-point="16" draw:end-shape="id20" draw:end-glue-point="17" svg:d="M19257 10807v250" svg:viewBox="0 0 1 251">
            <text:p/>
          </draw:connector>
        </draw:g>
        <draw:connector draw:style-name="gr35" draw:text-style-name="P9" xml:id="id23" draw:id="id23" draw:layer="layout" draw:type="line" svg:x1="17.441cm" svg:y1="10.53cm" svg:x2="18.016cm" svg:y2="8.405cm" draw:start-shape="id21" draw:start-glue-point="6" svg:d="M17441 10530l575-2125" svg:viewBox="0 0 576 2126">
          <text:p/>
        </draw:connector>
        <draw:connector draw:style-name="gr36" draw:text-style-name="P9" draw:layer="layout" draw:type="line" svg:x1="18.186cm" svg:y1="5.605cm" svg:x2="18.016cm" svg:y2="8.405cm" draw:start-shape="id22" draw:start-glue-point="13" draw:end-shape="id23" draw:end-glue-point="3" svg:d="M18186 5605l-170 2800" svg:viewBox="0 0 171 2801">
          <text:p/>
        </draw:connector>
        <draw:frame draw:style-name="gr2" draw:text-style-name="P14" draw:layer="layout" svg:width="2.222cm" svg:height="1.199cm" svg:x="15.318cm" svg:y="7.515cm">
          <draw:text-box>
            <text:p><text:span text:style-name="T6">H</text:span><text:span text:style-name="T6">T</text:span><text:span text:style-name="T6">T</text:span><text:span text:style-name="T6">P</text:span></text:p>
            <text:p><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p>
          </draw:text-box>
        </draw:frame>
        <draw:custom-shape draw:style-name="gr37" draw:text-style-name="P1" draw:layer="layout" svg:width="26.987cm" svg:height="13.97cm" svg:x="1cm" svg:y="0.882cm">
          <text:p/>
          <draw:enhanced-geometry svg:viewBox="0 0 21600 21600" draw:mirror-horizontal="false" draw:mirror-vertical="false" draw:type="rectangle" draw:enhanced-path="M 0 0 L 21600 0 21600 21600 0 21600 0 0 Z N"/>
        </draw:custom-shape>
      </draw:page>
      <draw:page draw:name="Web Service" draw:style-name="dp1" draw:master-page-name="Default">
        <draw:custom-shape draw:style-name="gr38" draw:text-style-name="P1" draw:layer="layout" svg:width="15.558cm" svg:height="3.919cm" svg:x="11.477cm" svg:y="2.443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39" draw:text-style-name="P3" draw:layer="layout" svg:width="14.287cm" svg:height="4.563cm" svg:x="1.635cm" svg:y="8.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0" draw:text-style-name="P5" draw:layer="layout" svg:width="3.741cm" svg:height="0.779cm" svg:x="1.635cm" svg:y="8.037cm">
            <text:p text:style-name="P4"><text:span text:style-name="T2">RaspiOS-kernel</text:span></text:p>
            <draw:enhanced-geometry svg:viewBox="0 0 21600 21600" draw:type="non-primitve" draw:enhanced-path="M 0 0 L 21600 0 19000 21600 0 21600 0 0 Z N"/>
          </draw:custom-shape>
        </draw:g>
        <draw:custom-shape draw:style-name="gr41" draw:text-style-name="P13" draw:layer="layout" svg:width="15.558cm" svg:height="0.952cm" svg:x="11.477cm" svg:y="1.508cm">
          <text:p text:style-name="P12"><text:span text:style-name="T5">Components Interface: Web Service</text:span></text:p>
          <draw:enhanced-geometry svg:viewBox="0 0 21600 21600" draw:type="rectangle" draw:enhanced-path="M 0 0 L 21600 0 21600 21600 0 21600 0 0 Z N"/>
        </draw:custom-shape>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2" draw:text-style-name="P7" xml:id="id24" draw:id="id24" draw:layer="layout" svg:width="3.81cm" svg:height="1.805cm" svg:x="10.842cm" svg:y="8.4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43" draw:text-style-name="P8" draw:layer="layout" draw:type="line" svg:x1="14.182cm" svg:y1="8.749cm" svg:x2="14.182cm" svg:y2="8.999cm" draw:start-shape="id24" draw:start-glue-point="16" draw:end-shape="id24" draw:end-glue-point="17" svg:d="M14182 8749v250" svg:viewBox="0 0 1 251">
            <text:p/>
          </draw:connector>
        </draw:g>
        <draw:connector draw:style-name="gr44" draw:text-style-name="P9" draw:layer="layout" draw:type="line" svg:x1="14.652cm" svg:y1="9.825cm" svg:x2="17.024cm" svg:y2="10.039cm" draw:start-shape="id25" draw:start-glue-point="14" draw:end-shape="id26" draw:end-glue-point="3" svg:d="M14652 9825l2372 214" svg:viewBox="0 0 2373 215">
          <text:p/>
        </draw:connector>
        <draw:g draw:style-name="gr3" xml:id="id31" draw:id="id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7" xml:id="id27" draw:id="id27" draw:layer="layout" svg:width="4.068cm" svg:height="2cm" svg:x="21.819cm" svg:y="8.6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46" draw:text-style-name="P8" draw:layer="layout" draw:type="line" svg:x1="25.417cm" svg:y1="8.972cm" svg:x2="25.417cm" svg:y2="9.222cm" draw:start-shape="id27" draw:start-glue-point="16" draw:end-shape="id27" draw:end-glue-point="17" svg:d="M25417 8972v250" svg:viewBox="0 0 1 251">
            <text:p/>
          </draw:connector>
        </draw:g>
        <draw:g draw:style-name="gr3" xml:id="id33" draw:id="id3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7" draw:text-style-name="P7" xml:id="id28" draw:id="id28" draw:layer="layout" svg:width="4.128cm" svg:height="2cm" svg:x="18.779cm" svg:y="3.1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mirror-horizontal="false" draw:mirror-vertical="false" draw:type="rectangle" draw:enhanced-path="M 0 0 L 21600 0 21600 21600 0 21600 0 0 Z N"/>
          </draw:custom-shape>
          <draw:connector draw:style-name="gr48" draw:text-style-name="P8" draw:layer="layout" draw:type="line" svg:x1="22.437cm" svg:y1="3.434cm" svg:x2="22.437cm" svg:y2="3.684cm" draw:start-shape="id28" draw:start-glue-point="16" draw:end-shape="id28" draw:end-glue-point="17" svg:d="M22437 3434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9" draw:text-style-name="P7" xml:id="id29" draw:id="id29" draw:layer="layout" svg:width="4.068cm" svg:height="2cm" svg:x="21.76cm" svg:y="12.2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_api.api_app</text:span></text:p>
            <draw:enhanced-geometry svg:viewBox="0 0 21600 21600" draw:type="rectangle" draw:enhanced-path="M 0 0 L 21600 0 21600 21600 0 21600 0 0 Z N"/>
          </draw:custom-shape>
          <draw:connector draw:style-name="gr50" draw:text-style-name="P8" draw:layer="layout" draw:type="line" svg:x1="25.358cm" svg:y1="12.559cm" svg:x2="25.358cm" svg:y2="12.809cm" draw:start-shape="id29" draw:start-glue-point="16" draw:end-shape="id29" draw:end-glue-point="17" svg:d="M25358 12559v250" svg:viewBox="0 0 1 251">
            <text:p/>
          </draw:connector>
        </draw:g>
        <draw:connector draw:style-name="gr51" draw:text-style-name="P9" xml:id="id32" draw:id="id32" draw:layer="layout" draw:type="line" svg:x1="25.014cm" svg:y1="12.282cm" svg:x2="24.438cm" svg:y2="11.679cm" draw:start-shape="id30" draw:start-glue-point="4" svg:d="M25014 12282l-576-603" svg:viewBox="0 0 577 604">
          <text:p/>
        </draw:connector>
        <draw:frame draw:style-name="gr52" draw:text-style-name="P2" draw:layer="layout" svg:width="2.222cm" svg:height="1.27cm" svg:x="22.078cm" svg:y="10.795cm">
          <draw:text-box>
            <text:p><text:span text:style-name="T1">ASGI</text:span></text:p>
            <text:p><text:span text:style-name="T1">interface</text:span></text:p>
          </draw:text-box>
        </draw:frame>
        <draw:connector draw:style-name="gr53" draw:text-style-name="P9" draw:layer="layout" draw:type="line" svg:x1="25.073cm" svg:y1="10.695cm" svg:x2="24.438cm" svg:y2="11.679cm" draw:start-shape="id31" draw:start-glue-point="13" draw:end-shape="id32" draw:end-glue-point="3" svg:d="M25073 10695l-635 984" svg:viewBox="0 0 636 985">
          <text:p/>
        </draw:connector>
        <draw:connector draw:style-name="gr54" draw:text-style-name="P15" draw:layer="layout" svg:x1="24.259cm" svg:y1="8.695cm" svg:x2="21.255cm" svg:y2="5.157cm" draw:start-shape="id31" draw:start-glue-point="5" draw:end-shape="id33" draw:end-glue-point="12" svg:d="M24259 8695v-1769h-3004v-1769" svg:viewBox="0 0 3005 3539">
          <text:p/>
        </draw:connector>
        <draw:g draw:style-name="gr3" xml:id="id37" draw:id="id3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5" draw:text-style-name="P7" xml:id="id34" draw:id="id34" draw:layer="layout" svg:width="4.068cm" svg:height="2cm" svg:x="11.219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draw:enhanced-geometry svg:viewBox="0 0 21600 21600" draw:type="rectangle" draw:enhanced-path="M 0 0 L 21600 0 21600 21600 0 21600 0 0 Z N"/>
          </draw:custom-shape>
          <draw:connector draw:style-name="gr56" draw:text-style-name="P8" draw:layer="layout" draw:type="line" svg:x1="14.817cm" svg:y1="15.974cm" svg:x2="14.817cm" svg:y2="16.224cm" draw:start-shape="id34" draw:start-glue-point="16" draw:end-shape="id34" draw:end-glue-point="17" svg:d="M14817 15974v250" svg:viewBox="0 0 1 251">
            <text:p/>
          </draw:connector>
        </draw:g>
        <draw:connector draw:style-name="gr57" draw:text-style-name="P9" draw:layer="layout" draw:type="line" svg:x1="7.667cm" svg:y1="10.465cm" svg:x2="9.075cm" svg:y2="10.092cm" draw:start-shape="id35" draw:start-glue-point="15" draw:end-shape="id36" draw:end-glue-point="3" svg:d="M7667 10465l1408-373" svg:viewBox="0 0 1409 374">
          <text:p/>
        </draw:connector>
        <draw:connector draw:style-name="gr58" draw:text-style-name="P9" xml:id="id42" draw:id="id42" draw:layer="layout" draw:type="line" svg:x1="11.219cm" svg:y1="17.197cm" svg:x2="9.499cm" svg:y2="17.338cm" draw:start-shape="id37" draw:start-glue-point="9" svg:d="M11219 17197l-1720 141" svg:viewBox="0 0 1721 142">
          <text:p/>
        </draw:connector>
        <draw:frame draw:style-name="gr2" draw:text-style-name="P2" draw:layer="layout" svg:width="2.222cm" svg:height="1.199cm" svg:x="8.303cm" svg:y="10.448cm">
          <draw:text-box>
            <text:p><text:span text:style-name="T1">TCP/IP-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9" draw:text-style-name="P3" draw:layer="layout" svg:width="14.287cm" svg:height="3.675cm" svg:x="1.635cm" svg:y="1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0" draw:text-style-name="P5" draw:layer="layout" svg:width="3.415cm" svg:height="0.779cm" svg:x="1.635cm" svg:y="14.557cm">
            <text:p text:style-name="P4"><text:span text:style-name="T2">Mobile Device</text:span></text:p>
            <draw:enhanced-geometry svg:viewBox="0 0 21600 21600" draw:type="non-primitve" draw:enhanced-path="M 0 0 L 21600 0 19000 21600 0 21600 0 0 Z N"/>
          </draw:custom-shape>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1" draw:text-style-name="P7" xml:id="id38" draw:id="id38" draw:layer="layout" svg:width="4.068cm" svg:height="2cm" svg:x="3.54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62" draw:text-style-name="P8" draw:layer="layout" draw:type="line" svg:x1="7.138cm" svg:y1="15.974cm" svg:x2="7.138cm" svg:y2="16.224cm" draw:start-shape="id38" draw:start-glue-point="16" draw:end-shape="id38" draw:end-glue-point="17" svg:d="M7138 15974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3" draw:text-style-name="P7" xml:id="id39" draw:id="id39" draw:layer="layout" svg:width="4.068cm" svg:height="2cm" svg:x="3.599cm" svg:y="9.96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AccessPoint</text:span></text:p>
            <draw:enhanced-geometry svg:viewBox="0 0 21600 21600" draw:type="rectangle" draw:enhanced-path="M 0 0 L 21600 0 21600 21600 0 21600 0 0 Z N"/>
          </draw:custom-shape>
          <draw:connector draw:style-name="gr64" draw:text-style-name="P8" draw:layer="layout" draw:type="line" svg:x1="7.197cm" svg:y1="10.242cm" svg:x2="7.197cm" svg:y2="10.492cm" draw:start-shape="id39" draw:start-glue-point="16" draw:end-shape="id39" draw:end-glue-point="17" svg:d="M7197 10242v250" svg:viewBox="0 0 1 251">
            <text:p/>
          </draw:connector>
        </draw:g>
        <draw:connector draw:style-name="gr65" draw:text-style-name="P9" xml:id="id36" draw:id="id36" draw:layer="layout" draw:type="line" svg:x1="10.842cm" svg:y1="9.825cm" svg:x2="9.075cm" svg:y2="10.092cm" draw:start-shape="id25" draw:start-glue-point="9" svg:d="M10842 9825l-1767 267" svg:viewBox="0 0 1768 268">
          <text:p/>
        </draw:connector>
        <draw:connector draw:style-name="gr66" draw:text-style-name="P9" draw:layer="layout" draw:type="line" svg:x1="6.039cm" svg:y1="11.965cm" svg:x2="6.35cm" svg:y2="13.77cm" draw:start-shape="id35" draw:start-glue-point="12" draw:end-shape="id40" draw:end-glue-point="3" svg:d="M6039 11965l311 1805" svg:viewBox="0 0 312 1806">
          <text:p/>
        </draw:connector>
        <draw:connector draw:style-name="gr67" draw:text-style-name="P9" xml:id="id40" draw:id="id40" draw:layer="layout" draw:type="line" svg:x1="5.98cm" svg:y1="15.697cm" svg:x2="6.35cm" svg:y2="13.77cm" draw:start-shape="id41" draw:start-glue-point="5" svg:d="M5980 15697l370-1927" svg:viewBox="0 0 371 1928">
          <text:p/>
        </draw:connector>
        <draw:frame draw:style-name="gr22" draw:text-style-name="P2" draw:layer="layout" svg:width="2.222cm" svg:height="0.725cm" svg:x="7.032cm" svg:y="13.462cm">
          <draw:text-box>
            <text:p><text:span text:style-name="T1">TCP/IP</text:span></text:p>
          </draw:text-box>
        </draw:frame>
        <draw:connector draw:style-name="gr68" draw:text-style-name="P9" draw:layer="layout" draw:type="line" svg:x1="7.608cm" svg:y1="17.197cm" svg:x2="9.499cm" svg:y2="17.338cm" draw:start-shape="id41" draw:start-glue-point="14" draw:end-shape="id42" draw:end-glue-point="3" svg:d="M7608 17197l1891 141" svg:viewBox="0 0 1892 142">
          <text:p/>
        </draw:connector>
        <draw:frame draw:style-name="gr2" draw:text-style-name="P2" draw:layer="layout" svg:width="2.222cm" svg:height="1.199cm" svg:x="8.62cm" svg:y="15.692cm">
          <draw:text-box>
            <text:p><text:span text:style-name="T1">HTTP</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69" draw:text-style-name="P3" draw:layer="layout" svg:width="7.938cm" svg:height="7.42cm" svg:x="18.902cm" svg:y="7.4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0" draw:text-style-name="P5" draw:layer="layout" svg:width="4.685cm" svg:height="0.779cm" svg:x="18.902cm" svg:y="7.402cm">
            <text:p text:style-name="P4"><text:span text:style-name="T2">RaspiOS-UserSpace</text:span></text:p>
            <draw:enhanced-geometry svg:viewBox="0 0 21600 21600" draw:type="non-primitve" draw:enhanced-path="M 0 0 L 21600 0 19000 21600 0 21600 0 0 Z N"/>
          </draw:custom-shape>
        </draw:g>
        <draw:connector draw:style-name="gr71" draw:text-style-name="P9" xml:id="id26" draw:id="id26" draw:layer="layout" draw:type="line" svg:x1="21.819cm" svg:y1="10.195cm" svg:x2="17.024cm" svg:y2="10.039cm" draw:start-shape="id31" draw:start-glue-point="9" svg:d="M21819 10195l-4795-156" svg:viewBox="0 0 4796 157">
          <text:p/>
        </draw:connector>
        <draw:frame draw:style-name="gr2" draw:text-style-name="P2" draw:layer="layout" svg:width="2.222cm" svg:height="1.199cm" svg:x="16.828cm" svg:y="8.226cm">
          <draw:text-box>
            <text:p><text:span text:style-name="T1">socket-API</text:span></text:p>
          </draw:text-box>
        </draw:frame>
        <draw:custom-shape draw:style-name="gr72" draw:text-style-name="P1" draw:layer="layout" svg:width="26.987cm" svg:height="19.118cm" svg:x="1cm" svg:y="0.882cm">
          <text:p/>
          <draw:enhanced-geometry svg:viewBox="0 0 21600 21600" draw:mirror-horizontal="false" draw:mirror-vertical="false" draw:type="rectangle" draw:enhanced-path="M 0 0 L 21600 0 21600 21600 0 21600 0 0 Z N"/>
        </draw:custom-shape>
      </draw:page>
      <draw:page draw:name="Wifi Service" draw:style-name="dp1" draw:master-page-name="Default">
        <draw:custom-shape draw:style-name="gr38" draw:text-style-name="P1" draw:layer="layout" svg:width="15.558cm" svg:height="3.919cm" svg:x="11.477cm" svg:y="2.443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73" draw:text-style-name="P3" draw:layer="layout" svg:width="14.287cm" svg:height="4.563cm" svg:x="1.635cm" svg:y="8.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74" draw:text-style-name="P5" draw:layer="layout" svg:width="3.741cm" svg:height="0.779cm" svg:x="1.635cm" svg:y="8.037cm">
            <text:p text:style-name="P4"><text:span text:style-name="T2">RaspiOS-</text:span><text:span text:style-name="T2">kernel</text:span></text:p>
            <draw:enhanced-geometry svg:viewBox="0 0 21600 21600" draw:type="non-primitve" draw:enhanced-path="M 0 0 L 21600 0 19000 21600 0 21600 0 0 Z N"/>
          </draw:custom-shape>
        </draw:g>
        <draw:custom-shape draw:style-name="gr75" draw:text-style-name="P13" draw:layer="layout" svg:width="15.558cm" svg:height="0.952cm" svg:x="11.477cm" svg:y="1.508cm">
          <text:p text:style-name="P12"><text:span text:style-name="T5">Comp</text:span><text:span text:style-name="T5">onent</text:span><text:span text:style-name="T5">s </text:span><text:span text:style-name="T5">Interf</text:span><text:span text:style-name="T5">ace: </text:span><text:span text:style-name="T5">Web </text:span><text:span text:style-name="T5">Servi</text:span><text:span text:style-name="T5">ce</text:span></text:p>
          <draw:enhanced-geometry svg:viewBox="0 0 21600 21600" draw:type="rectangle" draw:enhanced-path="M 0 0 L 21600 0 21600 21600 0 21600 0 0 Z N"/>
        </draw:custom-shape>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6" draw:text-style-name="P7" xml:id="id43" draw:id="id43" draw:layer="layout" svg:width="3.81cm" svg:height="1.805cm" svg:x="10.842cm" svg:y="8.4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77" draw:text-style-name="P8" draw:layer="layout" draw:type="line" svg:x1="14.182cm" svg:y1="8.749cm" svg:x2="14.182cm" svg:y2="8.999cm" draw:start-shape="id43" draw:start-glue-point="16" draw:end-shape="id43" draw:end-glue-point="17" svg:d="M14182 8749v250" svg:viewBox="0 0 1 251">
            <text:p/>
          </draw:connector>
        </draw:g>
        <draw:connector draw:style-name="gr78" draw:text-style-name="P9" draw:layer="layout" draw:type="line" svg:x1="14.652cm" svg:y1="9.825cm" svg:x2="17.024cm" svg:y2="10.039cm" draw:start-shape="id44" draw:start-glue-point="14" draw:end-shape="id45" draw:end-glue-point="3" svg:d="M14652 9825l2372 214" svg:viewBox="0 0 2373 215">
          <text:p/>
        </draw:connector>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9" draw:text-style-name="P7" xml:id="id46" draw:id="id46" draw:layer="layout" svg:width="4.068cm" svg:height="2cm" svg:x="21.819cm" svg:y="8.6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vicorn server</text:span></text:p>
            <draw:enhanced-geometry svg:viewBox="0 0 21600 21600" draw:type="rectangle" draw:enhanced-path="M 0 0 L 21600 0 21600 21600 0 21600 0 0 Z N"/>
          </draw:custom-shape>
          <draw:connector draw:style-name="gr80" draw:text-style-name="P8" draw:layer="layout" draw:type="line" svg:x1="25.417cm" svg:y1="8.972cm" svg:x2="25.417cm" svg:y2="9.222cm" draw:start-shape="id46" draw:start-glue-point="16" draw:end-shape="id46" draw:end-glue-point="17" svg:d="M25417 8972v250" svg:viewBox="0 0 1 251">
            <text:p/>
          </draw:connector>
        </draw:g>
        <draw:g draw:style-name="gr3" xml:id="id52" draw:id="id5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1" draw:text-style-name="P7" xml:id="id47" draw:id="id47" draw:layer="layout" svg:width="4.128cm" svg:height="2cm" svg:x="18.779cm" svg:y="3.4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w</text:span><text:span text:style-name="T3">e</text:span><text:span text:style-name="T3">b</text:span><text:span text:style-name="T3">_</text:span><text:span text:style-name="T3">s</text:span><text:span text:style-name="T3">e</text:span><text:span text:style-name="T3">r</text:span><text:span text:style-name="T3">v</text:span><text:span text:style-name="T3">i</text:span><text:span text:style-name="T3">c</text:span><text:span text:style-name="T3">e</text:span></text:p>
            <draw:enhanced-geometry svg:viewBox="0 0 21600 21600" draw:mirror-horizontal="false" draw:mirror-vertical="false" draw:type="rectangle" draw:enhanced-path="M 0 0 L 21600 0 21600 21600 0 21600 0 0 Z N"/>
          </draw:custom-shape>
          <draw:connector draw:style-name="gr82" draw:text-style-name="P8" draw:layer="layout" draw:type="line" svg:x1="22.437cm" svg:y1="3.734cm" svg:x2="22.437cm" svg:y2="3.984cm" draw:start-shape="id47" draw:start-glue-point="16" draw:end-shape="id47" draw:end-glue-point="17" svg:d="M22437 3734v250" svg:viewBox="0 0 1 251">
            <text:p/>
          </draw:connector>
        </draw:g>
        <draw:g draw:style-name="gr3" xml:id="id49" draw:id="id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3" draw:text-style-name="P7" xml:id="id48" draw:id="id48" draw:layer="layout" svg:width="4.068cm" svg:height="2cm" svg:x="21.76cm" svg:y="12.2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f</text:span><text:span text:style-name="T3">a</text:span><text:span text:style-name="T3">s</text:span><text:span text:style-name="T3">t</text:span><text:span text:style-name="T3">_</text:span><text:span text:style-name="T3">a</text:span><text:span text:style-name="T3">p</text:span><text:span text:style-name="T3">i</text:span><text:span text:style-name="T3">.</text:span><text:span text:style-name="T3">a</text:span><text:span text:style-name="T3">p</text:span><text:span text:style-name="T3">i</text:span><text:span text:style-name="T3">_</text:span><text:span text:style-name="T3">a</text:span><text:span text:style-name="T3">p</text:span><text:span text:style-name="T3">p</text:span></text:p>
            <draw:enhanced-geometry svg:viewBox="0 0 21600 21600" draw:type="rectangle" draw:enhanced-path="M 0 0 L 21600 0 21600 21600 0 21600 0 0 Z N"/>
          </draw:custom-shape>
          <draw:connector draw:style-name="gr84" draw:text-style-name="P8" draw:layer="layout" draw:type="line" svg:x1="25.358cm" svg:y1="12.559cm" svg:x2="25.358cm" svg:y2="12.809cm" draw:start-shape="id48" draw:start-glue-point="16" draw:end-shape="id48" draw:end-glue-point="17" svg:d="M25358 12559v250" svg:viewBox="0 0 1 251">
            <text:p/>
          </draw:connector>
        </draw:g>
        <draw:connector draw:style-name="gr85" draw:text-style-name="P9" xml:id="id51" draw:id="id51" draw:layer="layout" draw:type="line" svg:x1="25.014cm" svg:y1="12.282cm" svg:x2="24.438cm" svg:y2="11.679cm" draw:start-shape="id49" draw:start-glue-point="4" svg:d="M25014 12282l-576-603" svg:viewBox="0 0 577 604">
          <text:p/>
        </draw:connector>
        <draw:frame draw:style-name="gr52" draw:text-style-name="P2" draw:layer="layout" svg:width="2.222cm" svg:height="1.27cm" svg:x="22.078cm" svg:y="10.795cm">
          <draw:text-box>
            <text:p><text:span text:style-name="T1">ASGI</text:span></text:p>
            <text:p><text:span text:style-name="T1">interface</text:span></text:p>
          </draw:text-box>
        </draw:frame>
        <draw:connector draw:style-name="gr86" draw:text-style-name="P9" draw:layer="layout" draw:type="line" svg:x1="25.073cm" svg:y1="10.695cm" svg:x2="24.438cm" svg:y2="11.679cm" draw:start-shape="id50" draw:start-glue-point="13" draw:end-shape="id51" draw:end-glue-point="3" svg:d="M25073 10695l-635 984" svg:viewBox="0 0 636 985">
          <text:p/>
        </draw:connector>
        <draw:connector draw:style-name="gr87" draw:text-style-name="P15" draw:layer="layout" svg:x1="24.259cm" svg:y1="8.695cm" svg:x2="21.255cm" svg:y2="5.457cm" draw:start-shape="id50" draw:start-glue-point="5" draw:end-shape="id52" draw:end-glue-point="12" svg:d="M24259 8695v-1619h-3004v-1619" svg:viewBox="0 0 3005 3239">
          <text:p/>
        </draw:connector>
        <draw:g draw:style-name="gr3" xml:id="id56" draw:id="id5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3" draw:id="id53" draw:layer="layout" svg:width="4.068cm" svg:height="2cm" svg:x="11.219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text:span></text:p>
            <text:p text:style-name="P6"><text:span text:style-name="T3">B</text:span><text:span text:style-name="T3">r</text:span><text:span text:style-name="T3">o</text:span><text:span text:style-name="T3">w</text:span><text:span text:style-name="T3">s</text:span><text:span text:style-name="T3">e</text:span><text:span text:style-name="T3">r</text:span></text:p>
            <draw:enhanced-geometry svg:viewBox="0 0 21600 21600" draw:type="rectangle" draw:enhanced-path="M 0 0 L 21600 0 21600 21600 0 21600 0 0 Z N"/>
          </draw:custom-shape>
          <draw:connector draw:style-name="gr89" draw:text-style-name="P8" draw:layer="layout" draw:type="line" svg:x1="14.817cm" svg:y1="15.974cm" svg:x2="14.817cm" svg:y2="16.224cm" draw:start-shape="id53" draw:start-glue-point="16" draw:end-shape="id53" draw:end-glue-point="17" svg:d="M14817 15974v250" svg:viewBox="0 0 1 251">
            <text:p/>
          </draw:connector>
        </draw:g>
        <draw:connector draw:style-name="gr90" draw:text-style-name="P9" draw:layer="layout" draw:type="line" svg:x1="7.667cm" svg:y1="10.465cm" svg:x2="9.075cm" svg:y2="10.092cm" draw:start-shape="id54" draw:start-glue-point="15" draw:end-shape="id55" draw:end-glue-point="3" svg:d="M7667 10465l1408-373" svg:viewBox="0 0 1409 374">
          <text:p/>
        </draw:connector>
        <draw:connector draw:style-name="gr91" draw:text-style-name="P9" xml:id="id61" draw:id="id61" draw:layer="layout" draw:type="line" svg:x1="11.219cm" svg:y1="17.197cm" svg:x2="9.499cm" svg:y2="17.338cm" draw:start-shape="id56" draw:start-glue-point="9" svg:d="M11219 17197l-1720 141" svg:viewBox="0 0 1721 142">
          <text:p/>
        </draw:connector>
        <draw:frame draw:style-name="gr2" draw:text-style-name="P2" draw:layer="layout" svg:width="2.222cm" svg:height="1.199cm" svg:x="8.303cm" svg:y="10.448cm">
          <draw:text-box>
            <text:p><text:span text:style-name="T1">TCP/IP-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92" draw:text-style-name="P3" draw:layer="layout" svg:width="14.287cm" svg:height="3.675cm" svg:x="1.635cm" svg:y="1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93" draw:text-style-name="P5" draw:layer="layout" svg:width="3.415cm" svg:height="0.779cm" svg:x="1.635cm" svg:y="14.557cm">
            <text:p text:style-name="P4"><text:span text:style-name="T2">M</text:span><text:span text:style-name="T2">ob</text:span><text:span text:style-name="T2">ile </text:span><text:span text:style-name="T2">D</text:span><text:span text:style-name="T2">ev</text:span><text:span text:style-name="T2">ic</text:span><text:span text:style-name="T2">e</text:span></text:p>
            <draw:enhanced-geometry svg:viewBox="0 0 21600 21600" draw:type="non-primitve" draw:enhanced-path="M 0 0 L 21600 0 19000 21600 0 21600 0 0 Z N"/>
          </draw:custom-shape>
        </draw:g>
        <draw:g draw:style-name="gr3" xml:id="id60" draw:id="id6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4" draw:text-style-name="P7" xml:id="id57" draw:id="id57" draw:layer="layout" svg:width="4.068cm" svg:height="2cm" svg:x="3.54cm" svg:y="15.6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95" draw:text-style-name="P8" draw:layer="layout" draw:type="line" svg:x1="7.138cm" svg:y1="15.974cm" svg:x2="7.138cm" svg:y2="16.224cm" draw:start-shape="id57" draw:start-glue-point="16" draw:end-shape="id57" draw:end-glue-point="17" svg:d="M7138 15974v250" svg:viewBox="0 0 1 251">
            <text:p/>
          </draw:connector>
        </draw:g>
        <draw:g draw:style-name="gr3" xml:id="id54" draw:id="id5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6" draw:text-style-name="P7" xml:id="id58" draw:id="id58" draw:layer="layout" svg:width="4.068cm" svg:height="2cm" svg:x="3.599cm" svg:y="9.96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Wi</text:span><text:span text:style-name="T3">Fi </text:span><text:span text:style-name="T3">Ac</text:span><text:span text:style-name="T3">ce</text:span><text:span text:style-name="T3">ss</text:span><text:span text:style-name="T3">P</text:span><text:span text:style-name="T3">oi</text:span><text:span text:style-name="T3">nt</text:span></text:p>
            <draw:enhanced-geometry svg:viewBox="0 0 21600 21600" draw:type="rectangle" draw:enhanced-path="M 0 0 L 21600 0 21600 21600 0 21600 0 0 Z N"/>
          </draw:custom-shape>
          <draw:connector draw:style-name="gr97" draw:text-style-name="P8" draw:layer="layout" draw:type="line" svg:x1="7.197cm" svg:y1="10.242cm" svg:x2="7.197cm" svg:y2="10.492cm" draw:start-shape="id58" draw:start-glue-point="16" draw:end-shape="id58" draw:end-glue-point="17" svg:d="M7197 10242v250" svg:viewBox="0 0 1 251">
            <text:p/>
          </draw:connector>
        </draw:g>
        <draw:connector draw:style-name="gr98" draw:text-style-name="P9" xml:id="id55" draw:id="id55" draw:layer="layout" draw:type="line" svg:x1="10.842cm" svg:y1="9.825cm" svg:x2="9.075cm" svg:y2="10.092cm" draw:start-shape="id44" draw:start-glue-point="9" svg:d="M10842 9825l-1767 267" svg:viewBox="0 0 1768 268">
          <text:p/>
        </draw:connector>
        <draw:connector draw:style-name="gr99" draw:text-style-name="P9" draw:layer="layout" draw:type="line" svg:x1="6.039cm" svg:y1="11.965cm" svg:x2="6.35cm" svg:y2="13.77cm" draw:start-shape="id54" draw:start-glue-point="12" draw:end-shape="id59" draw:end-glue-point="3" svg:d="M6039 11965l311 1805" svg:viewBox="0 0 312 1806">
          <text:p/>
        </draw:connector>
        <draw:connector draw:style-name="gr100" draw:text-style-name="P9" xml:id="id59" draw:id="id59" draw:layer="layout" draw:type="line" svg:x1="5.98cm" svg:y1="15.697cm" svg:x2="6.35cm" svg:y2="13.77cm" draw:start-shape="id60" draw:start-glue-point="5" svg:d="M5980 15697l370-1927" svg:viewBox="0 0 371 1928">
          <text:p/>
        </draw:connector>
        <draw:frame draw:style-name="gr22" draw:text-style-name="P2" draw:layer="layout" svg:width="2.222cm" svg:height="0.725cm" svg:x="7.032cm" svg:y="13.462cm">
          <draw:text-box>
            <text:p><text:span text:style-name="T1">TCP/IP</text:span></text:p>
          </draw:text-box>
        </draw:frame>
        <draw:connector draw:style-name="gr101" draw:text-style-name="P9" draw:layer="layout" draw:type="line" svg:x1="7.608cm" svg:y1="17.197cm" svg:x2="9.499cm" svg:y2="17.338cm" draw:start-shape="id60" draw:start-glue-point="14" draw:end-shape="id61" draw:end-glue-point="3" svg:d="M7608 17197l1891 141" svg:viewBox="0 0 1892 142">
          <text:p/>
        </draw:connector>
        <draw:frame draw:style-name="gr2" draw:text-style-name="P2" draw:layer="layout" svg:width="2.222cm" svg:height="1.199cm" svg:x="8.62cm" svg:y="15.692cm">
          <draw:text-box>
            <text:p><text:span text:style-name="T1">HTTP</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2" draw:text-style-name="P3" draw:layer="layout" svg:width="7.938cm" svg:height="7.42cm" svg:x="18.902cm" svg:y="7.4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3" draw:text-style-name="P5" draw:layer="layout" svg:width="4.685cm" svg:height="0.779cm" svg:x="18.902cm" svg:y="7.402cm">
            <text:p text:style-name="P4"><text:span text:style-name="T2">R</text:span><text:span text:style-name="T2">a</text:span><text:span text:style-name="T2">s</text:span><text:span text:style-name="T2">p</text:span><text:span text:style-name="T2">i</text:span><text:span text:style-name="T2">O</text:span><text:span text:style-name="T2">S</text:span><text:span text:style-name="T2">-</text:span><text:span text:style-name="T2">U</text:span><text:span text:style-name="T2">s</text:span><text:span text:style-name="T2">e</text:span><text:span text:style-name="T2">r</text:span><text:span text:style-name="T2">S</text:span><text:span text:style-name="T2">p</text:span><text:span text:style-name="T2">a</text:span><text:span text:style-name="T2">c</text:span><text:span text:style-name="T2">e</text:span></text:p>
            <draw:enhanced-geometry svg:viewBox="0 0 21600 21600" draw:type="non-primitve" draw:enhanced-path="M 0 0 L 21600 0 19000 21600 0 21600 0 0 Z N"/>
          </draw:custom-shape>
        </draw:g>
        <draw:connector draw:style-name="gr104" draw:text-style-name="P9" xml:id="id45" draw:id="id45" draw:layer="layout" draw:type="line" svg:x1="21.819cm" svg:y1="10.195cm" svg:x2="17.024cm" svg:y2="10.039cm" draw:start-shape="id50" draw:start-glue-point="9" svg:d="M21819 10195l-4795-156" svg:viewBox="0 0 4796 157">
          <text:p/>
        </draw:connector>
        <draw:frame draw:style-name="gr2" draw:text-style-name="P2" draw:layer="layout" svg:width="2.222cm" svg:height="1.199cm" svg:x="16.828cm" svg:y="8.226cm">
          <draw:text-box>
            <text:p><text:span text:style-name="T1">socket-API</text:span></text:p>
          </draw:text-box>
        </draw:frame>
        <draw:custom-shape draw:style-name="gr72" draw:text-style-name="P1" draw:layer="layout" svg:width="26.987cm" svg:height="19.118cm" svg:x="1cm" svg:y="0.882cm">
          <text:p/>
          <draw:enhanced-geometry svg:viewBox="0 0 21600 21600" draw:mirror-horizontal="false" draw:mirror-vertical="false" draw:type="rectangle" draw:enhanced-path="M 0 0 L 21600 0 21600 21600 0 21600 0 0 Z N"/>
        </draw:custom-shape>
      </draw:page>
      <draw:page draw:name="GPIO" draw:style-name="dp1" draw:master-page-name="Default">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5" draw:text-style-name="P3" draw:layer="layout" svg:width="16.862cm" svg:height="4.048cm" svg:x="5.485cm" svg:y="8.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6" draw:text-style-name="P5" draw:layer="layout" svg:width="1.814cm" svg:height="0.779cm" svg:x="5.485cm" svg:y="8.817cm">
            <text:p text:style-name="P4"><text:span text:style-name="T2">GPIO</text:span></text:p>
            <draw:enhanced-geometry svg:viewBox="0 0 21600 21600" draw:mirror-horizontal="false" draw:mirror-vertical="false" draw:type="non-primitve" draw:enhanced-path="M 0 0 L 21600 0 19000 21600 0 21600 0 0 Z N"/>
          </draw:custom-shape>
        </draw:g>
        <draw:g draw:style-name="gr3" xml:id="id70" draw:id="id7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7" draw:text-style-name="P7" xml:id="id62" draw:id="id62" draw:layer="layout" svg:width="4.128cm" svg:height="2cm" svg:x="12.16cm" svg:y="3.5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08" draw:text-style-name="P8" draw:layer="layout" draw:type="line" svg:x1="15.818cm" svg:y1="3.844cm" svg:x2="15.818cm" svg:y2="4.094cm" draw:start-shape="id62" draw:start-glue-point="16" draw:end-shape="id62" draw:end-glue-point="17" svg:d="M15818 3844v250" svg:viewBox="0 0 1 251">
            <text:p/>
          </draw:connector>
        </draw:g>
        <draw:g draw:style-name="gr3" xml:id="id77" draw:id="id7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9" draw:text-style-name="P7" xml:id="id63" draw:id="id63" draw:layer="layout" svg:width="3.75cm" svg:height="2cm" svg:x="6.995cm" svg:y="15.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110" draw:text-style-name="P8" draw:layer="layout" draw:type="line" svg:x1="10.275cm" svg:y1="16.134cm" svg:x2="10.275cm" svg:y2="16.384cm" draw:start-shape="id63" draw:start-glue-point="16" draw:end-shape="id63" draw:end-glue-point="17" svg:d="M10275 16134v250" svg:viewBox="0 0 1 251">
            <text:p/>
          </draw:connector>
        </draw:g>
        <draw:g draw:style-name="gr3" xml:id="id79" draw:id="id7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1" draw:text-style-name="P7" xml:id="id64" draw:id="id64" draw:layer="layout" svg:width="3.75cm" svg:height="2cm" svg:x="11.217cm" svg:y="15.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12" draw:text-style-name="P8" draw:layer="layout" draw:type="line" svg:x1="14.497cm" svg:y1="16.134cm" svg:x2="14.497cm" svg:y2="16.384cm" draw:start-shape="id64" draw:start-glue-point="16" draw:end-shape="id64" draw:end-glue-point="17" svg:d="M14497 16134v250" svg:viewBox="0 0 1 251">
            <text:p/>
          </draw:connector>
        </draw:g>
        <draw:g draw:style-name="gr3" xml:id="id75" draw:id="id7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3" draw:text-style-name="P7" xml:id="id65" draw:id="id65" draw:layer="layout" svg:width="3.75cm" svg:height="2cm" svg:x="6.592cm" svg:y="3.5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14" draw:text-style-name="P8" draw:layer="layout" draw:type="line" svg:x1="9.872cm" svg:y1="3.839cm" svg:x2="9.872cm" svg:y2="4.089cm" draw:start-shape="id65" draw:start-glue-point="16" draw:end-shape="id65" draw:end-glue-point="17" svg:d="M9872 383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5" draw:text-style-name="P7" xml:id="id66" draw:id="id66"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16" draw:text-style-name="P8" draw:layer="layout" draw:type="line" svg:x1="21.743cm" svg:y1="24.772cm" svg:x2="21.743cm" svg:y2="25.022cm" draw:start-shape="id66" draw:start-glue-point="16" draw:end-shape="id66" draw:end-glue-point="17" svg:d="M21743 24772v250" svg:viewBox="0 0 1 251">
            <text:p/>
          </draw:connector>
        </draw:g>
        <draw:g draw:style-name="gr3">
          <draw:custom-shape draw:style-name="gr117" draw:text-style-name="P1" draw:layer="layout" svg:width="17.78cm" svg:height="3.7cm" svg:x="5.202cm" svg:y="2.527cm">
            <text:p/>
            <draw:enhanced-geometry svg:viewBox="0 0 21600 21600" draw:mirror-horizontal="false" draw:mirror-vertical="false" draw:type="rectangle" draw:enhanced-path="M 0 0 L 21600 0 21600 21600 0 21600 0 0 Z N"/>
          </draw:custom-shape>
          <draw:custom-shape draw:style-name="gr118" draw:text-style-name="P17" draw:layer="layout" svg:width="17.78cm" svg:height="0.727cm" svg:x="5.202cm" svg:y="1.8cm">
            <text:p text:style-name="P16"><text:span text:style-name="T5">Components Interface: GPIO</text:span></text:p>
            <draw:enhanced-geometry svg:viewBox="0 0 21600 21600" draw:type="rectangle" draw:enhanced-path="M 0 0 L 21600 0 21600 21600 0 21600 0 0 Z N"/>
          </draw:custom-shape>
        </draw:g>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9" draw:text-style-name="P7" xml:id="id67" draw:id="id67" draw:layer="layout" svg:width="4.128cm" svg:height="2cm" svg:x="17.557cm" svg:y="3.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touch_buttons</text:span></text:p>
            <draw:enhanced-geometry svg:viewBox="0 0 21600 21600" draw:type="rectangle" draw:enhanced-path="M 0 0 L 21600 0 21600 21600 0 21600 0 0 Z N"/>
          </draw:custom-shape>
          <draw:connector draw:style-name="gr120" draw:text-style-name="P8" draw:layer="layout" draw:type="line" svg:x1="21.215cm" svg:y1="3.944cm" svg:x2="21.215cm" svg:y2="4.194cm" draw:start-shape="id67" draw:start-glue-point="16" draw:end-shape="id67" draw:end-glue-point="17" svg:d="M21215 3944v250" svg:viewBox="0 0 1 251">
            <text:p/>
          </draw:connector>
        </draw:g>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1" draw:text-style-name="P7" xml:id="id68" draw:id="id68" draw:layer="layout" svg:width="3.75cm" svg:height="2cm" svg:x="16.355cm" svg:y="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pi.GPIO</text:span></text:p>
            <draw:enhanced-geometry svg:viewBox="0 0 21600 21600" draw:type="rectangle" draw:enhanced-path="M 0 0 L 21600 0 21600 21600 0 21600 0 0 Z N"/>
          </draw:custom-shape>
          <draw:connector draw:style-name="gr122" draw:text-style-name="P8" draw:layer="layout" draw:type="line" svg:x1="19.635cm" svg:y1="9.947cm" svg:x2="19.635cm" svg:y2="10.197cm" draw:start-shape="id68" draw:start-glue-point="16" draw:end-shape="id68" draw:end-glue-point="17" svg:d="M19635 9947v250" svg:viewBox="0 0 1 251">
            <text:p/>
          </draw:connector>
        </draw:g>
        <draw:connector draw:style-name="gr123" draw:text-style-name="P9" xml:id="id71" draw:id="id71" draw:layer="layout" draw:type="line" svg:x1="17.105cm" svg:y1="9.67cm" svg:x2="17.273cm" svg:y2="8.059cm" draw:start-shape="id69" draw:start-glue-point="7" svg:d="M17105 9670l168-1611" svg:viewBox="0 0 169 1612">
          <text:p/>
        </draw:connector>
        <draw:connector draw:style-name="gr124" draw:text-style-name="P9" draw:layer="layout" draw:type="line" svg:x1="13.812cm" svg:y1="5.567cm" svg:x2="17.273cm" svg:y2="8.059cm" draw:start-shape="id70" draw:start-glue-point="11" draw:end-shape="id71" draw:end-glue-point="3" svg:d="M13812 5567l3461 2492" svg:viewBox="0 0 3462 2493">
          <text:p/>
        </draw:connector>
        <draw:connector draw:style-name="gr125" draw:text-style-name="P9" draw:layer="layout" draw:type="line" svg:x1="18.383cm" svg:y1="5.667cm" svg:x2="17.273cm" svg:y2="8.059cm" draw:start-shape="id72" draw:start-glue-point="10" draw:end-shape="id71" draw:end-glue-point="3" svg:d="M18383 5667l-1110 2392" svg:viewBox="0 0 1111 2393">
          <text:p/>
        </draw:connector>
        <draw:frame draw:style-name="gr52" draw:text-style-name="P14" draw:layer="layout" svg:width="2.54cm" svg:height="1.27cm" svg:x="13.775cm" svg:y="7.18cm">
          <draw:text-box>
            <text:p><text:span text:style-name="T6">G</text:span><text:span text:style-name="T6">PI</text:span><text:span text:style-name="T6">O-</text:span></text:p>
            <text:p><text:span text:style-name="T6">A</text:span><text:span text:style-name="T6">PI</text:span></text:p>
          </draw:text-box>
        </draw:frame>
        <draw:g draw:style-name="gr3" xml:id="id74" draw:id="id7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73" draw:id="id73" draw:layer="layout" svg:width="3.75cm" svg:height="2cm" svg:x="7.48cm" svg:y="9.75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MBus</text:span></text:p>
            <draw:enhanced-geometry svg:viewBox="0 0 21600 21600" draw:type="rectangle" draw:enhanced-path="M 0 0 L 21600 0 21600 21600 0 21600 0 0 Z N"/>
          </draw:custom-shape>
          <draw:connector draw:style-name="gr127" draw:text-style-name="P8" draw:layer="layout" draw:type="line" svg:x1="10.76cm" svg:y1="10.035cm" svg:x2="10.76cm" svg:y2="10.285cm" draw:start-shape="id73" draw:start-glue-point="16" draw:end-shape="id73" draw:end-glue-point="17" svg:d="M10760 10035v250" svg:viewBox="0 0 1 251">
            <text:p/>
          </draw:connector>
        </draw:g>
        <draw:connector draw:style-name="gr128" draw:text-style-name="P9" xml:id="id76" draw:id="id76" draw:layer="layout" draw:type="line" svg:x1="9.73cm" svg:y1="9.758cm" svg:x2="9.045cm" svg:y2="7.816cm" draw:start-shape="id74" draw:start-glue-point="5" svg:d="M9730 9758l-685-1942" svg:viewBox="0 0 686 1943">
          <text:p/>
        </draw:connector>
        <draw:connector draw:style-name="gr129" draw:text-style-name="P9" draw:layer="layout" draw:type="line" svg:x1="8.842cm" svg:y1="5.562cm" svg:x2="9.045cm" svg:y2="7.816cm" draw:start-shape="id75" draw:start-glue-point="12" draw:end-shape="id76" draw:end-glue-point="3" svg:d="M8842 5562l203 2254" svg:viewBox="0 0 204 2255">
          <text:p/>
        </draw:connector>
        <draw:frame draw:style-name="gr130" draw:text-style-name="P14" draw:layer="layout" svg:width="2.54cm" svg:height="1.24cm" svg:x="6.155cm" svg:y="7.18cm">
          <draw:text-box>
            <text:p><text:span text:style-name="T6">SMBus-</text:span></text:p>
            <text:p><text:span text:style-name="T6">API</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31" draw:text-style-name="P3" draw:layer="layout" svg:width="19.367cm" svg:height="3.413cm" svg:x="5.52cm" svg:y="1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32" draw:text-style-name="P5" draw:layer="layout" svg:width="2.259cm" svg:height="0.779cm" svg:x="5.52cm" svg:y="14.8cm">
            <text:p text:style-name="P4"><text:span text:style-name="T2">Devices</text:span></text:p>
            <draw:enhanced-geometry svg:viewBox="0 0 21600 21600" draw:mirror-horizontal="false" draw:mirror-vertical="false" draw:type="non-primitve" draw:enhanced-path="M 0 0 L 21600 0 19000 21600 0 21600 0 0 Z N"/>
          </draw:custom-shape>
        </draw:g>
        <draw:connector draw:style-name="gr133" draw:text-style-name="P9" xml:id="id78" draw:id="id78" draw:layer="layout" draw:type="line" svg:x1="9.73cm" svg:y1="11.758cm" svg:x2="9.944cm" svg:y2="13.509cm" draw:start-shape="id74" draw:start-glue-point="12" svg:d="M9730 11758l214 1751" svg:viewBox="0 0 215 1752">
          <text:p/>
        </draw:connector>
        <draw:connector draw:style-name="gr134" draw:text-style-name="P9" draw:layer="layout" draw:type="line" svg:x1="8.495cm" svg:y1="15.857cm" svg:x2="9.944cm" svg:y2="13.509cm" draw:start-shape="id77" draw:start-glue-point="6" draw:end-shape="id78" draw:end-glue-point="3" svg:d="M8495 15857l1449-2348" svg:viewBox="0 0 1450 2349">
          <text:p/>
        </draw:connector>
        <draw:connector draw:style-name="gr135" draw:text-style-name="P9" draw:layer="layout" draw:type="line" svg:x1="11.967cm" svg:y1="15.857cm" svg:x2="9.944cm" svg:y2="13.509cm" draw:start-shape="id79" draw:start-glue-point="7" draw:end-shape="id78" draw:end-glue-point="3" svg:d="M11967 15857l-2023-2348" svg:viewBox="0 0 2024 2349">
          <text:p/>
        </draw:connector>
        <draw:frame draw:style-name="gr130" draw:text-style-name="P14" draw:layer="layout" svg:width="2.54cm" svg:height="1.24cm" svg:x="7.425cm" svg:y="13.212cm">
          <draw:text-box>
            <text:p><text:span text:style-name="T6">I2C</text:span></text:p>
            <text:p><text:span text:style-name="T6">interface</text:span></text:p>
          </draw:text-box>
        </draw:frame>
        <draw:g draw:style-name="gr3" xml:id="id82" draw:id="id8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6" draw:text-style-name="P7" xml:id="id80" draw:id="id80" draw:layer="layout" svg:width="3.75cm" svg:height="2cm" svg:x="15.68cm" svg:y="15.8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eds</text:span></text:p>
            <draw:enhanced-geometry svg:viewBox="0 0 21600 21600" draw:type="rectangle" draw:enhanced-path="M 0 0 L 21600 0 21600 21600 0 21600 0 0 Z N"/>
          </draw:custom-shape>
          <draw:connector draw:style-name="gr137" draw:text-style-name="P8" draw:layer="layout" draw:type="line" svg:x1="18.96cm" svg:y1="16.129cm" svg:x2="18.96cm" svg:y2="16.379cm" draw:start-shape="id80" draw:start-glue-point="16" draw:end-shape="id80" draw:end-glue-point="17" svg:d="M18960 16129v250" svg:viewBox="0 0 1 251">
            <text:p/>
          </draw:connector>
        </draw:g>
        <draw:g draw:style-name="gr3" xml:id="id84" draw:id="id8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8" draw:text-style-name="P7" xml:id="id81" draw:id="id81" draw:layer="layout" svg:width="3.75cm" svg:height="2cm" svg:x="20.125cm" svg:y="15.7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uttons</text:span></text:p>
            <draw:enhanced-geometry svg:viewBox="0 0 21600 21600" draw:type="rectangle" draw:enhanced-path="M 0 0 L 21600 0 21600 21600 0 21600 0 0 Z N"/>
          </draw:custom-shape>
          <draw:connector draw:style-name="gr139" draw:text-style-name="P8" draw:layer="layout" draw:type="line" svg:x1="23.405cm" svg:y1="16.029cm" svg:x2="23.405cm" svg:y2="16.279cm" draw:start-shape="id81" draw:start-glue-point="16" draw:end-shape="id81" draw:end-glue-point="17" svg:d="M23405 16029v250" svg:viewBox="0 0 1 251">
            <text:p/>
          </draw:connector>
        </draw:g>
        <draw:connector draw:style-name="gr140" draw:text-style-name="P9" xml:id="id83" draw:id="id83" draw:layer="layout" draw:type="line" svg:x1="17.18cm" svg:y1="15.852cm" svg:x2="17.591cm" svg:y2="13.932cm" draw:start-shape="id82" draw:start-glue-point="6" svg:d="M17180 15852l411-1920" svg:viewBox="0 0 412 1921">
          <text:p/>
        </draw:connector>
        <draw:connector draw:style-name="gr141" draw:text-style-name="P9" xml:id="id85" draw:id="id85" draw:layer="layout" draw:type="line" svg:x1="19.355cm" svg:y1="11.67cm" svg:x2="20.316cm" svg:y2="13.932cm" draw:start-shape="id69" draw:start-glue-point="13" svg:d="M19355 11670l961 2262" svg:viewBox="0 0 962 2263">
          <text:p/>
        </draw:connector>
        <draw:connector draw:style-name="gr142" draw:text-style-name="P9" draw:layer="layout" draw:type="line" svg:x1="17.855cm" svg:y1="11.67cm" svg:x2="17.591cm" svg:y2="13.932cm" draw:start-shape="id69" draw:start-glue-point="11" draw:end-shape="id83" draw:end-glue-point="3" svg:d="M17855 11670l-264 2262" svg:viewBox="0 0 265 2263">
          <text:p/>
        </draw:connector>
        <draw:connector draw:style-name="gr143" draw:text-style-name="P9" draw:layer="layout" draw:type="line" svg:x1="22.375cm" svg:y1="15.752cm" svg:x2="20.316cm" svg:y2="13.932cm" draw:start-shape="id84" draw:start-glue-point="5" draw:end-shape="id85" draw:end-glue-point="3" svg:d="M22375 15752l-2059-1820" svg:viewBox="0 0 2060 1821">
          <text:p/>
        </draw:connector>
        <draw:frame draw:style-name="gr2" draw:text-style-name="P14" draw:layer="layout" svg:width="2.54cm" svg:height="1.199cm" svg:x="21.077cm" svg:y="13.212cm">
          <draw:text-box>
            <text:p><text:span text:style-name="T6">P</text:span><text:span text:style-name="T6">I</text:span><text:span text:style-name="T6">N</text:span></text:p>
            <text:p><text:span text:style-name="T6">I</text:span><text:span text:style-name="T6">n</text:span><text:span text:style-name="T6">p</text:span><text:span text:style-name="T6">u</text:span><text:span text:style-name="T6">t</text:span></text:p>
          </draw:text-box>
        </draw:frame>
        <draw:frame draw:style-name="gr52" draw:text-style-name="P14" draw:layer="layout" svg:width="2.54cm" svg:height="1.27cm" svg:x="15.11cm" svg:y="13.212cm">
          <draw:text-box>
            <text:p><text:span text:style-name="T6">P</text:span><text:span text:style-name="T6">I</text:span><text:span text:style-name="T6">N</text:span></text:p>
            <text:p><text:span text:style-name="T6">O</text:span><text:span text:style-name="T6">u</text:span><text:span text:style-name="T6">t</text:span><text:span text:style-name="T6">p</text:span><text:span text:style-name="T6">u</text:span><text:span text:style-name="T6">t</text:span><text:span text:style-name="T6">s</text:span></text:p>
          </draw:text-box>
        </draw:frame>
        <draw:custom-shape draw:style-name="gr144" draw:text-style-name="P1" draw:layer="layout" svg:width="21.908cm" svg:height="17.463cm" svg:x="3.857cm" svg:y="1.317cm">
          <text:p/>
          <draw:enhanced-geometry svg:viewBox="0 0 21600 21600" draw:mirror-horizontal="false" draw:mirror-vertical="false" draw:type="rectangle" draw:enhanced-path="M 0 0 L 21600 0 21600 21600 0 21600 0 0 Z N"/>
        </draw:custom-shape>
      </draw:page>
      <draw:page draw:name="Music Players" draw:style-name="dp1" draw:master-page-name="Default">
        <draw:custom-shape draw:style-name="gr145" draw:text-style-name="P1" draw:layer="layout" svg:width="12.778cm" svg:height="6.35cm" svg:x="15.922cm" svg:y="2.335cm">
          <text:p/>
          <draw:enhanced-geometry svg:viewBox="0 0 21600 21600" draw:mirror-horizontal="false" draw:mirror-vertical="false"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46" draw:text-style-name="P3" draw:layer="layout" svg:width="11.508cm" svg:height="8.697cm" svg:x="17.192cm" svg:y="1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47" draw:text-style-name="P5" draw:layer="layout" svg:width="4.685cm" svg:height="0.779cm" svg:x="17.192cm" svg:y="11.1cm">
            <text:p text:style-name="P4"><text:span text:style-name="T2">RaspiOS-UserSpace</text:span></text:p>
            <draw:enhanced-geometry svg:viewBox="0 0 21600 21600" draw:type="non-primitve" draw:enhanced-path="M 0 0 L 21600 0 19000 21600 0 21600 0 0 Z N"/>
          </draw:custom-shape>
        </draw:g>
        <draw:g draw:style-name="gr3" xml:id="id88" draw:id="id8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8" draw:text-style-name="P7" xml:id="id86" draw:id="id86" draw:layer="layout" svg:width="3.523cm" svg:height="2cm" svg:x="24.147cm" svg:y="13.0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149" draw:text-style-name="P8" draw:layer="layout" draw:type="line" svg:x1="27.2cm" svg:y1="13.282cm" svg:x2="27.2cm" svg:y2="13.532cm" draw:start-shape="id86" draw:start-glue-point="16" draw:end-shape="id86" draw:end-glue-point="17" svg:d="M27200 13282v250" svg:viewBox="0 0 1 251">
            <text:p/>
          </draw:connector>
        </draw:g>
        <draw:g draw:style-name="gr3" xml:id="id90" draw:id="id9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0" draw:text-style-name="P7" xml:id="id87" draw:id="id87" draw:layer="layout" svg:width="4.128cm" svg:height="2cm" svg:x="22.437cm" svg:y="3.1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151" draw:text-style-name="P8" draw:layer="layout" draw:type="line" svg:x1="26.095cm" svg:y1="3.387cm" svg:x2="26.095cm" svg:y2="3.637cm" draw:start-shape="id87" draw:start-glue-point="16" draw:end-shape="id87" draw:end-glue-point="17" svg:d="M26095 3387v250" svg:viewBox="0 0 1 251">
            <text:p/>
          </draw:connector>
        </draw:g>
        <draw:frame draw:style-name="gr2" draw:text-style-name="P2" draw:layer="layout" svg:width="2.222cm" svg:height="1.199cm" svg:x="26.7cm" svg:y="9.512cm">
          <draw:text-box>
            <text:p><text:span text:style-name="T1">e</text:span><text:span text:style-name="T1">v</text:span><text:span text:style-name="T1">e</text:span><text:span text:style-name="T1">n</text:span><text:span text:style-name="T1">t</text:span><text:span text:style-name="T1"> </text:span></text:p>
            <text:p><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frame draw:style-name="gr52" draw:text-style-name="P2" draw:layer="layout" svg:width="2.54cm" svg:height="1.27cm" svg:x="24.177cm" svg:y="9.83cm">
          <draw:text-box>
            <text:p><text:span text:style-name="T1">p</text:span><text:span text:style-name="T1">l</text:span><text:span text:style-name="T1">a</text:span><text:span text:style-name="T1">y</text:span><text:span text:style-name="T1">b</text:span><text:span text:style-name="T1">a</text:span><text:span text:style-name="T1">c</text:span><text:span text:style-name="T1">k</text:span><text:span text:style-name="T1"> </text:span></text:p>
            <text:p><text:span text:style-name="T1">i</text:span><text:span text:style-name="T1">n</text:span><text:span text:style-name="T1">t</text:span><text:span text:style-name="T1">e</text:span><text:span text:style-name="T1">r</text:span><text:span text:style-name="T1">f</text:span><text:span text:style-name="T1">a</text:span><text:span text:style-name="T1">c</text:span><text:span text:style-name="T1">e</text:span></text:p>
          </draw:text-box>
        </draw:frame>
        <draw:connector draw:style-name="gr152" draw:text-style-name="P9" xml:id="id91" draw:id="id91" draw:layer="layout" draw:type="line" svg:x1="24.852cm" svg:y1="13.005cm" svg:x2="24.05cm" svg:y2="10.1cm" draw:start-shape="id88" draw:start-glue-point="7" svg:d="M24852 13005l-802-2905" svg:viewBox="0 0 803 2906">
          <text:p/>
        </draw:connector>
        <draw:connector draw:style-name="gr153" draw:text-style-name="P9" xml:id="id93" draw:id="id93" draw:layer="layout" draw:type="line" svg:x1="26.964cm" svg:y1="13.005cm" svg:x2="26.538cm" svg:y2="9.597cm" draw:start-shape="id88" draw:start-glue-point="4" svg:d="M26964 13005l-426-3408" svg:viewBox="0 0 427 3409">
          <text:p/>
        </draw:connector>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4" draw:text-style-name="P7" xml:id="id89" draw:id="id89" draw:layer="layout" svg:width="4.128cm" svg:height="2cm" svg:x="24.03cm" svg:y="5.9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155" draw:text-style-name="P8" draw:layer="layout" draw:type="line" svg:x1="27.688cm" svg:y1="6.232cm" svg:x2="27.688cm" svg:y2="6.482cm" draw:start-shape="id89" draw:start-glue-point="16" draw:end-shape="id89" draw:end-glue-point="17" svg:d="M27688 6232v250" svg:viewBox="0 0 1 251">
            <text:p/>
          </draw:connector>
        </draw:g>
        <draw:connector draw:style-name="gr156" draw:text-style-name="P9" draw:layer="layout" draw:type="line" svg:x1="23.263cm" svg:y1="5.11cm" svg:x2="24.05cm" svg:y2="10.1cm" draw:start-shape="id90" draw:start-glue-point="10" draw:end-shape="id91" draw:end-glue-point="3" svg:d="M23263 5110l787 4990" svg:viewBox="0 0 788 4991">
          <text:p/>
        </draw:connector>
        <draw:connector draw:style-name="gr157" draw:text-style-name="P9" draw:layer="layout" draw:type="line" svg:x1="25.682cm" svg:y1="7.955cm" svg:x2="26.538cm" svg:y2="9.597cm" draw:start-shape="id92" draw:start-glue-point="11" draw:end-shape="id93" draw:end-glue-point="3" svg:d="M25682 7955l856 1642" svg:viewBox="0 0 857 1643">
          <text:p/>
        </draw:connector>
        <draw:custom-shape draw:style-name="gr158" draw:text-style-name="P17" draw:layer="layout" svg:width="12.778cm" svg:height="0.952cm" svg:x="15.922cm" svg:y="1.4cm">
          <text:p text:style-name="P16"><text:span text:style-name="T5">Components Interface: Music Players</text:span></text:p>
          <draw:enhanced-geometry svg:viewBox="0 0 21600 21600" draw:type="rectangle" draw:enhanced-path="M 0 0 L 21600 0 21600 21600 0 21600 0 0 Z N"/>
        </draw:custom-shap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59" draw:text-style-name="P3" draw:layer="layout" svg:width="12.764cm" svg:height="5.08cm" svg:x="1.788cm" svg:y="11.2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60" draw:text-style-name="P5" draw:layer="layout" svg:width="3.741cm" svg:height="0.779cm" svg:x="1.788cm" svg:y="11.225cm">
            <text:p text:style-name="P4"><text:span text:style-name="T2">RaspiOS-kernel</text:span></text:p>
            <draw:enhanced-geometry svg:viewBox="0 0 21600 21600" draw:type="non-primitve" draw:enhanced-path="M 0 0 L 21600 0 19000 21600 0 21600 0 0 Z N"/>
          </draw:custom-shape>
        </draw:g>
        <draw:g draw:style-name="gr3" xml:id="id95" draw:id="id9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94" draw:id="id94" draw:layer="layout" svg:width="3.81cm" svg:height="1.805cm" svg:x="9.795cm" svg:y="11.69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62" draw:text-style-name="P8" draw:layer="layout" draw:type="line" svg:x1="13.135cm" svg:y1="11.976cm" svg:x2="13.135cm" svg:y2="12.226cm" draw:start-shape="id94" draw:start-glue-point="16" draw:end-shape="id94" draw:end-glue-point="17" svg:d="M13135 11976v250" svg:viewBox="0 0 1 251">
            <text:p/>
          </draw:connector>
        </draw:g>
        <draw:connector draw:style-name="gr163" draw:text-style-name="P9" xml:id="id104" draw:id="id104" draw:layer="layout" draw:type="line" svg:x1="13.605cm" svg:y1="13.052cm" svg:x2="15.663cm" svg:y2="12.501cm" draw:start-shape="id95" draw:start-glue-point="14" svg:d="M13605 13052l2058-551" svg:viewBox="0 0 2059 552">
          <text:p/>
        </draw:connector>
        <draw:connector draw:style-name="gr164" draw:text-style-name="P9" xml:id="id98" draw:id="id98" draw:layer="layout" draw:type="line" svg:x1="6.52cm" svg:y1="13.992cm" svg:x2="8.069cm" svg:y2="13.241cm" draw:start-shape="id96" draw:start-glue-point="14" svg:d="M6520 13992l1549-751" svg:viewBox="0 0 1550 752">
          <text:p/>
        </draw:connector>
        <draw:frame draw:style-name="gr2" draw:text-style-name="P2" draw:layer="layout" svg:width="2.222cm" svg:height="1.199cm" svg:x="7.033cm" svg:y="14.082cm">
          <draw:text-box>
            <text:p><text:span text:style-name="T1">T</text:span><text:span text:style-name="T1">C</text:span><text:span text:style-name="T1">P</text:span><text:span text:style-name="T1">/</text:span><text:span text:style-name="T1">I</text:span><text:span text:style-name="T1">P</text:span><text:span text:style-name="T1">-</text:span><text:span text:style-name="T1">A</text:span><text:span text:style-name="T1">P</text:span><text:span text:style-name="T1">I</text:span></text:p>
          </draw:text-box>
        </draw:frame>
        <draw:g draw:style-name="gr3" xml:id="id96" draw:id="id9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5" draw:text-style-name="P7" xml:id="id97" draw:id="id97" draw:layer="layout" svg:width="4.068cm" svg:height="2cm" svg:x="2.452cm" svg:y="12.4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66" draw:text-style-name="P8" draw:layer="layout" draw:type="line" svg:x1="6.05cm" svg:y1="12.769cm" svg:x2="6.05cm" svg:y2="13.019cm" draw:start-shape="id97" draw:start-glue-point="16" draw:end-shape="id97" draw:end-glue-point="17" svg:d="M6050 12769v250" svg:viewBox="0 0 1 251">
            <text:p/>
          </draw:connector>
        </draw:g>
        <draw:connector draw:style-name="gr167" draw:text-style-name="P9" draw:layer="layout" draw:type="line" svg:x1="9.795cm" svg:y1="13.052cm" svg:x2="8.069cm" svg:y2="13.241cm" draw:start-shape="id95" draw:start-glue-point="9" draw:end-shape="id98" draw:end-glue-point="3" svg:d="M9795 13052l-1726 189" svg:viewBox="0 0 1727 190">
          <text:p/>
        </draw:connector>
        <draw:g draw:style-name="gr3" xml:id="id103" draw:id="id10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8" draw:text-style-name="P7" xml:id="id99" draw:id="id99" draw:layer="layout" svg:width="3.523cm" svg:height="2cm" svg:x="19.049cm" svg:y="12.29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respot</text:span></text:p>
            <draw:enhanced-geometry svg:viewBox="0 0 21600 21600" draw:type="rectangle" draw:enhanced-path="M 0 0 L 21600 0 21600 21600 0 21600 0 0 Z N"/>
          </draw:custom-shape>
          <draw:connector draw:style-name="gr169" draw:text-style-name="P8" draw:layer="layout" draw:type="line" svg:x1="22.102cm" svg:y1="12.569cm" svg:x2="22.102cm" svg:y2="12.819cm" draw:start-shape="id99" draw:start-glue-point="16" draw:end-shape="id99" draw:end-glue-point="17" svg:d="M22102 12569v250" svg:viewBox="0 0 1 251">
            <text:p/>
          </draw:connector>
        </draw:g>
        <draw:connector draw:style-name="gr170" draw:text-style-name="P9" draw:layer="layout" draw:type="line" svg:x1="24.147cm" svg:y1="14.505cm" svg:x2="15.901cm" svg:y2="15.358cm" draw:start-shape="id88" draw:start-glue-point="9" draw:end-shape="id100" draw:end-glue-point="3" svg:d="M24147 14505l-8246 853" svg:viewBox="0 0 8247 854">
          <text:p/>
        </draw:connector>
        <draw:g draw:style-name="gr3" xml:id="id102" draw:id="id10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1" draw:text-style-name="P7" xml:id="id101" draw:id="id101" draw:layer="layout" svg:width="3.81cm" svg:height="1.805cm" svg:x="9.86cm" svg:y="14.0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SD socket</text:span></text:p>
            <draw:enhanced-geometry svg:viewBox="0 0 21600 21600" draw:type="rectangle" draw:enhanced-path="M 0 0 L 21600 0 21600 21600 0 21600 0 0 Z N"/>
          </draw:custom-shape>
          <draw:connector draw:style-name="gr172" draw:text-style-name="P8" draw:layer="layout" draw:type="line" svg:x1="13.2cm" svg:y1="14.334cm" svg:x2="13.2cm" svg:y2="14.584cm" draw:start-shape="id101" draw:start-glue-point="16" draw:end-shape="id101" draw:end-glue-point="17" svg:d="M13200 14334v250" svg:viewBox="0 0 1 251">
            <text:p/>
          </draw:connector>
        </draw:g>
        <draw:connector draw:style-name="gr173" draw:text-style-name="P9" xml:id="id100" draw:id="id100" draw:layer="layout" draw:type="line" svg:x1="13.67cm" svg:y1="15.41cm" svg:x2="15.901cm" svg:y2="15.358cm" draw:start-shape="id102" draw:start-glue-point="14" svg:d="M13670 15410l2231-52" svg:viewBox="0 0 2232 53">
          <text:p/>
        </draw:connector>
        <draw:connector draw:style-name="gr174" draw:text-style-name="P9" draw:layer="layout" draw:type="line" svg:x1="19.049cm" svg:y1="12.792cm" svg:x2="15.663cm" svg:y2="12.501cm" draw:start-shape="id103" draw:start-glue-point="8" draw:end-shape="id104" draw:end-glue-point="3" svg:d="M19049 12792l-3386-291" svg:viewBox="0 0 3387 292">
          <text:p/>
        </draw:connector>
        <draw:connector draw:style-name="gr175" draw:text-style-name="P9" draw:layer="layout" draw:type="line" svg:x1="9.86cm" svg:y1="14.508cm" svg:x2="8.069cm" svg:y2="13.241cm" draw:start-shape="id102" draw:start-glue-point="8" draw:end-shape="id98" draw:end-glue-point="3" svg:d="M9860 14508l-1791-1267" svg:viewBox="0 0 1792 1268">
          <text:p/>
        </draw:connector>
        <draw:frame draw:style-name="gr2" draw:text-style-name="P2" draw:layer="layout" svg:width="2.222cm" svg:height="1.199cm" svg:x="14.97cm" svg:y="13.13cm">
          <draw:text-box>
            <text:p><text:span text:style-name="T1">s</text:span><text:span text:style-name="T1">o</text:span><text:span text:style-name="T1">c</text:span><text:span text:style-name="T1">k</text:span><text:span text:style-name="T1">e</text:span><text:span text:style-name="T1">t</text:span><text:span text:style-name="T1">-</text:span><text:span text:style-name="T1">A</text:span><text:span text:style-name="T1">P</text:span><text:span text:style-name="T1">I</text:span></text:p>
          </draw:text-box>
        </draw:frame>
        <draw:g draw:style-name="gr3" xml:id="id106" draw:id="id10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76" draw:text-style-name="P7" xml:id="id105" draw:id="id105" draw:layer="layout" svg:width="4.128cm" svg:height="2cm" svg:x="17.257cm" svg:y="3.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77" draw:text-style-name="P8" draw:layer="layout" draw:type="line" svg:x1="20.915cm" svg:y1="3.427cm" svg:x2="20.915cm" svg:y2="3.677cm" draw:start-shape="id105" draw:start-glue-point="16" draw:end-shape="id105" draw:end-glue-point="17" svg:d="M20915 3427v250" svg:viewBox="0 0 1 251">
            <text:p/>
          </draw:connector>
        </draw:g>
        <draw:connector draw:style-name="gr178" draw:text-style-name="P9" xml:id="id107" draw:id="id107" draw:layer="layout" draw:type="line" svg:x1="21.866cm" svg:y1="12.292cm" svg:x2="22.622cm" svg:y2="10.206cm" draw:start-shape="id103" draw:start-glue-point="4" svg:d="M21866 12292l756-2086" svg:viewBox="0 0 757 2087">
          <text:p/>
        </draw:connector>
        <draw:connector draw:style-name="gr179" draw:text-style-name="P9" draw:layer="layout" draw:type="line" svg:x1="19.733cm" svg:y1="5.15cm" svg:x2="22.622cm" svg:y2="10.206cm" draw:start-shape="id106" draw:start-glue-point="12" draw:end-shape="id107" draw:end-glue-point="3" svg:d="M19733 5150l2889 5056" svg:viewBox="0 0 2890 5057">
          <text:p/>
        </draw:connector>
        <draw:g draw:style-name="gr3" xml:id="id112" draw:id="id11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0" draw:text-style-name="P7" xml:id="id108" draw:id="id108" draw:layer="layout" svg:width="3.433cm" svg:height="2cm" svg:x="20.062cm" svg:y="16.9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basound</text:span></text:p>
            <draw:enhanced-geometry svg:viewBox="0 0 21600 21600" draw:type="rectangle" draw:enhanced-path="M 0 0 L 21600 0 21600 21600 0 21600 0 0 Z N"/>
          </draw:custom-shape>
          <draw:connector draw:style-name="gr181" draw:text-style-name="P8" draw:layer="layout" draw:type="line" svg:x1="23.025cm" svg:y1="17.257cm" svg:x2="23.025cm" svg:y2="17.507cm" draw:start-shape="id108" draw:start-glue-point="16" draw:end-shape="id108" draw:end-glue-point="17" svg:d="M23025 17257v250" svg:viewBox="0 0 1 251">
            <text:p/>
          </draw:connector>
        </draw:g>
        <draw:g draw:style-name="gr3" xml:id="id110" draw:id="id1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82" draw:text-style-name="P7" xml:id="id109" draw:id="id109" draw:layer="layout" svg:width="3.433cm" svg:height="2cm" svg:x="9.402cm" svg:y="17.2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ound device</text:span></text:p>
            <draw:enhanced-geometry svg:viewBox="0 0 21600 21600" draw:mirror-horizontal="false" draw:mirror-vertical="false" draw:type="rectangle" draw:enhanced-path="M 0 0 L 21600 0 21600 21600 0 21600 0 0 Z N"/>
          </draw:custom-shape>
          <draw:connector draw:style-name="gr183" draw:text-style-name="P8" draw:layer="layout" draw:type="line" svg:x1="12.365cm" svg:y1="17.534cm" svg:x2="12.365cm" svg:y2="17.784cm" draw:start-shape="id109" draw:start-glue-point="16" draw:end-shape="id109" draw:end-glue-point="17" svg:d="M12365 17534v250" svg:viewBox="0 0 1 251">
            <text:p/>
          </draw:connector>
        </draw:g>
        <draw:connector draw:style-name="gr184" draw:text-style-name="P9" draw:layer="layout" draw:type="line" svg:x1="12.834cm" svg:y1="18.757cm" svg:x2="13.837cm" svg:y2="18.692cm" draw:start-shape="id110" draw:start-glue-point="14" draw:end-shape="id111" draw:end-glue-point="3" svg:d="M12834 18757l1003-65" svg:viewBox="0 0 1004 66">
          <text:p/>
        </draw:connector>
        <draw:frame draw:style-name="gr22" draw:text-style-name="P2" draw:layer="layout" svg:width="3.175cm" svg:height="0.725cm" svg:x="23.46cm" svg:y="15.987cm">
          <draw:text-box>
            <text:p><text:span text:style-name="T1">PCM </text:span><text:span text:style-name="T1">frames</text:span></text:p>
          </draw:text-box>
        </draw:frame>
        <draw:connector draw:style-name="gr185" draw:text-style-name="P9" xml:id="id111" draw:id="id111" draw:layer="layout" draw:type="line" svg:x1="20.062cm" svg:y1="18.48cm" svg:x2="13.837cm" svg:y2="18.692cm" draw:start-shape="id112" draw:start-glue-point="9" svg:d="M20062 18480l-6225 212" svg:viewBox="0 0 6226 213">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86" draw:text-style-name="P3" draw:layer="layout" svg:width="7.537cm" svg:height="2.842cm" svg:x="7.032cm" svg:y="16.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87" draw:text-style-name="P5" draw:layer="layout" svg:width="2.259cm" svg:height="0.779cm" svg:x="7.032cm" svg:y="16.89cm">
            <text:p text:style-name="P4"><text:span text:style-name="T2">Devices</text:span></text:p>
            <draw:enhanced-geometry svg:viewBox="0 0 21600 21600" draw:type="non-primitve" draw:enhanced-path="M 0 0 L 21600 0 19000 21600 0 21600 0 0 Z N"/>
          </draw:custom-shape>
        </draw:g>
        <draw:frame draw:style-name="gr188" draw:text-style-name="P2" draw:layer="layout" svg:width="2.857cm" svg:height="1.358cm" svg:x="14.652cm" svg:y="17.487cm">
          <draw:text-box>
            <text:p><text:span text:style-name="T1">PCM over</text:span></text:p>
            <text:p><text:span text:style-name="T1">I2S-bus</text:span></text:p>
          </draw:text-box>
        </draw:frame>
        <draw:connector draw:style-name="gr189" draw:text-style-name="P9" xml:id="id113" draw:id="id113" draw:layer="layout" draw:type="line" svg:x1="22.807cm" svg:y1="16.98cm" svg:x2="22.728cm" svg:y2="16.363cm" draw:start-shape="id112" draw:start-glue-point="4" svg:d="M22807 16980l-79-617" svg:viewBox="0 0 80 618">
          <text:p/>
        </draw:connector>
        <draw:connector draw:style-name="gr190" draw:text-style-name="P9" draw:layer="layout" draw:type="line" svg:x1="21.162cm" svg:y1="14.292cm" svg:x2="22.728cm" svg:y2="16.363cm" draw:start-shape="id103" draw:start-glue-point="12" draw:end-shape="id113" draw:end-glue-point="3" svg:d="M21162 14292l1566 2071" svg:viewBox="0 0 1567 2072">
          <text:p/>
        </draw:connector>
        <draw:connector draw:style-name="gr191" draw:text-style-name="P9" draw:layer="layout" draw:type="line" svg:x1="24.852cm" svg:y1="15.005cm" svg:x2="22.728cm" svg:y2="16.363cm" draw:start-shape="id88" draw:start-glue-point="10" draw:end-shape="id113" draw:end-glue-point="3" svg:d="M24852 15005l-2124 1358" svg:viewBox="0 0 2125 1359">
          <text:p/>
        </draw:connector>
        <draw:g draw:style-name="gr3" xml:id="id115" draw:id="id11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2" draw:text-style-name="P7" xml:id="id114" draw:id="id114" draw:layer="layout" svg:width="4.068cm" svg:height="2cm" svg:x="9.902cm" svg:y="7.2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rowser/</text:span></text:p>
            <text:p text:style-name="P6"><text:span text:style-name="T3">App</text:span></text:p>
            <draw:enhanced-geometry svg:viewBox="0 0 21600 21600" draw:type="rectangle" draw:enhanced-path="M 0 0 L 21600 0 21600 21600 0 21600 0 0 Z N"/>
          </draw:custom-shape>
          <draw:connector draw:style-name="gr193" draw:text-style-name="P8" draw:layer="layout" draw:type="line" svg:x1="13.5cm" svg:y1="7.574cm" svg:x2="13.5cm" svg:y2="7.824cm" draw:start-shape="id114" draw:start-glue-point="16" draw:end-shape="id114" draw:end-glue-point="17" svg:d="M13500 7574v250" svg:viewBox="0 0 1 251">
            <text:p/>
          </draw:connector>
        </draw:g>
        <draw:connector draw:style-name="gr194" draw:text-style-name="P9" draw:layer="layout" draw:type="line" svg:x1="9.902cm" svg:y1="8.797cm" svg:x2="8.096cm" svg:y2="8.426cm" draw:start-shape="id115" draw:start-glue-point="9" draw:end-shape="id116" draw:end-glue-point="3" svg:d="M9902 8797l-1806-371" svg:viewBox="0 0 1807 372">
          <text:p/>
        </draw:connector>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95" draw:text-style-name="P3" draw:layer="layout" svg:width="12.97cm" svg:height="5.275cm" svg:x="1.635cm" svg:y="4.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96" draw:text-style-name="P5" draw:layer="layout" svg:width="3.415cm" svg:height="0.779cm" svg:x="1.635cm" svg:y="4.557cm">
            <text:p text:style-name="P4"><text:span text:style-name="T2">Mobile Device</text:span></text:p>
            <draw:enhanced-geometry svg:viewBox="0 0 21600 21600" draw:type="non-primitve" draw:enhanced-path="M 0 0 L 21600 0 19000 21600 0 21600 0 0 Z N"/>
          </draw:custom-shape>
        </draw:g>
        <draw:g draw:style-name="gr3" xml:id="id118" draw:id="id1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7" draw:text-style-name="P7" xml:id="id117" draw:id="id117" draw:layer="layout" svg:width="4.068cm" svg:height="2cm" svg:x="2.223cm" svg:y="6.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 Network</text:span></text:p>
            <draw:enhanced-geometry svg:viewBox="0 0 21600 21600" draw:type="rectangle" draw:enhanced-path="M 0 0 L 21600 0 21600 21600 0 21600 0 0 Z N"/>
          </draw:custom-shape>
          <draw:connector draw:style-name="gr198" draw:text-style-name="P8" draw:layer="layout" draw:type="line" svg:x1="5.821cm" svg:y1="6.674cm" svg:x2="5.821cm" svg:y2="6.924cm" draw:start-shape="id117" draw:start-glue-point="16" draw:end-shape="id117" draw:end-glue-point="17" svg:d="M5821 6674v250" svg:viewBox="0 0 1 251">
            <text:p/>
          </draw:connector>
        </draw:g>
        <draw:connector draw:style-name="gr199" draw:text-style-name="P9" xml:id="id116" draw:id="id116" draw:layer="layout" draw:type="line" svg:x1="6.291cm" svg:y1="7.897cm" svg:x2="8.096cm" svg:y2="8.426cm" draw:start-shape="id118" draw:start-glue-point="14" svg:d="M6291 7897l1805 529" svg:viewBox="0 0 1806 530">
          <text:p/>
        </draw:connector>
        <draw:frame draw:style-name="gr52" draw:text-style-name="P2" draw:layer="layout" svg:width="2.222cm" svg:height="1.27cm" svg:x="6.715cm" svg:y="6.592cm">
          <draw:text-box>
            <text:p><text:span text:style-name="T1">HTTP</text:span></text:p>
            <text:p><text:span text:style-name="T1">interface</text:span></text:p>
          </draw:text-box>
        </draw:frame>
        <draw:g draw:style-name="gr3" xml:id="id120" draw:id="id12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0" draw:text-style-name="P7" xml:id="id119" draw:id="id119" draw:layer="layout" svg:width="4.068cm" svg:height="2cm" svg:x="9.632cm" svg:y="4.8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App</text:span></text:p>
            <draw:enhanced-geometry svg:viewBox="0 0 21600 21600" draw:type="rectangle" draw:enhanced-path="M 0 0 L 21600 0 21600 21600 0 21600 0 0 Z N"/>
          </draw:custom-shape>
          <draw:connector draw:style-name="gr201" draw:text-style-name="P8" draw:layer="layout" draw:type="line" svg:x1="13.23cm" svg:y1="5.152cm" svg:x2="13.23cm" svg:y2="5.402cm" draw:start-shape="id119" draw:start-glue-point="16" draw:end-shape="id119" draw:end-glue-point="17" svg:d="M13230 5152v250" svg:viewBox="0 0 1 251">
            <text:p/>
          </draw:connector>
        </draw:g>
        <draw:connector draw:style-name="gr202" draw:text-style-name="P9" draw:layer="layout" draw:type="line" svg:x1="9.632cm" svg:y1="6.375cm" svg:x2="8.096cm" svg:y2="8.426cm" draw:start-shape="id120" draw:start-glue-point="9" draw:end-shape="id116" draw:end-glue-point="3" svg:d="M9632 6375l-1536 2051" svg:viewBox="0 0 1537 2052">
          <text:p/>
        </draw:connector>
        <draw:connector draw:style-name="gr203" draw:text-style-name="P9" xml:id="id121" draw:id="id121" draw:layer="layout" draw:type="line" svg:x1="5.706cm" svg:y1="12.492cm" svg:x2="6.164cm" svg:y2="10.648cm" draw:start-shape="id96" draw:start-glue-point="4" svg:d="M5706 12492l458-1844" svg:viewBox="0 0 459 1845">
          <text:p/>
        </draw:connector>
        <draw:connector draw:style-name="gr204" draw:text-style-name="P9" draw:layer="layout" draw:type="line" svg:x1="5.477cm" svg:y1="8.397cm" svg:x2="6.164cm" svg:y2="10.648cm" draw:start-shape="id118" draw:start-glue-point="13" draw:end-shape="id121" draw:end-glue-point="3" svg:d="M5477 8397l687 2251" svg:viewBox="0 0 688 2252">
          <text:p/>
        </draw:connector>
        <draw:frame draw:style-name="gr22" draw:text-style-name="P2" draw:layer="layout" svg:width="2.222cm" svg:height="0.725cm" svg:x="3.857cm" svg:y="10.182cm">
          <draw:text-box>
            <text:p><text:span text:style-name="T1">T</text:span><text:span text:style-name="T1">C</text:span><text:span text:style-name="T1">P/</text:span><text:span text:style-name="T1">IP</text:span></text:p>
          </draw:text-box>
        </draw:frame>
        <draw:custom-shape draw:style-name="gr205" draw:text-style-name="P1" draw:layer="layout" svg:width="28.449cm" svg:height="19.685cm" svg:x="0.708cm" svg:y="0.682cm">
          <text:p/>
          <draw:enhanced-geometry svg:viewBox="0 0 21600 21600" draw:mirror-horizontal="false" draw:mirror-vertical="false" draw:type="rectangle" draw:enhanced-path="M 0 0 L 21600 0 21600 21600 0 21600 0 0 Z N"/>
        </draw:custom-shape>
      </draw:page>
      <draw:page draw:name="Messaging" draw:style-name="dp1" draw:master-page-name="Default">
        <draw:custom-shape draw:style-name="gr206" draw:text-style-name="P1" draw:layer="layout" svg:width="27.7cm" svg:height="17.162cm" svg:x="1cm" svg:y="1.935cm">
          <text:p/>
          <draw:enhanced-geometry svg:viewBox="0 0 21600 21600" draw:mirror-horizontal="false" draw:mirror-vertical="false" draw:type="rectangle" draw:enhanced-path="M 0 0 L 21600 0 21600 21600 0 21600 0 0 Z N"/>
        </draw:custom-shape>
        <draw:connector draw:style-name="gr207" draw:text-style-name="P9" xml:id="id136" draw:id="id136" draw:layer="layout" draw:type="line" svg:x1="11.625cm" svg:y1="4.61cm" svg:x2="10.708cm" svg:y2="6.848cm" draw:start-shape="id122" draw:start-glue-point="10" svg:d="M11625 4610l-917 2238" svg:viewBox="0 0 918 2239">
          <text:p/>
        </draw:connector>
        <draw:custom-shape draw:style-name="gr208" draw:text-style-name="P17" draw:layer="layout" svg:width="27.7cm" svg:height="0.952cm" svg:x="1cm" svg:y="1cm">
          <text:p text:style-name="P16"><text:span text:style-name="T5">Components Interface: Messaging-Commands</text:span></text:p>
          <draw:enhanced-geometry svg:viewBox="0 0 21600 21600" draw:type="rectangle" draw:enhanced-path="M 0 0 L 21600 0 21600 21600 0 21600 0 0 Z N"/>
        </draw:custom-shape>
        <draw:g draw:style-name="gr3" xml:id="id134" draw:id="id13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9" draw:text-style-name="P7" xml:id="id123" draw:id="id123" draw:layer="layout" svg:width="4.762cm" svg:height="2cm" svg:x="14.835cm" svg:y="16.3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210" draw:text-style-name="P8" draw:layer="layout" draw:type="line" svg:x1="19.127cm" svg:y1="16.657cm" svg:x2="19.127cm" svg:y2="16.907cm" draw:start-shape="id123" draw:start-glue-point="16" draw:end-shape="id123" draw:end-glue-point="17" svg:d="M19127 16657v250" svg:viewBox="0 0 1 251">
            <text:p/>
          </draw:connector>
        </draw:g>
        <draw:g draw:style-name="gr3" xml:id="id135" draw:id="id1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1" draw:text-style-name="P7" xml:id="id124" draw:id="id124" draw:layer="layout" svg:width="4.385cm" svg:height="2cm" svg:x="5.122cm" svg:y="5.76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212" draw:text-style-name="P8" draw:layer="layout" draw:type="line" svg:x1="9.037cm" svg:y1="6.039cm" svg:x2="9.037cm" svg:y2="6.289cm" draw:start-shape="id124" draw:start-glue-point="16" draw:end-shape="id124" draw:end-glue-point="17" svg:d="M9037 6039v250" svg:viewBox="0 0 1 251">
            <text:p/>
          </draw:connector>
        </draw:g>
        <draw:g draw:style-name="gr3" xml:id="id142" draw:id="id14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3" draw:text-style-name="P7" xml:id="id125" draw:id="id125" draw:layer="layout" svg:width="4.385cm" svg:height="1.905cm" svg:x="3.882cm" svg:y="12.9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214" draw:text-style-name="P8" draw:layer="layout" draw:type="line" svg:x1="7.797cm" svg:y1="13.259cm" svg:x2="7.797cm" svg:y2="13.509cm" draw:start-shape="id125" draw:start-glue-point="16" draw:end-shape="id125" draw:end-glue-point="17" svg:d="M7797 13259v250" svg:viewBox="0 0 1 251">
            <text:p/>
          </draw:connector>
        </draw:g>
        <draw:g draw:style-name="gr3" xml:id="id138" draw:id="id13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5" draw:text-style-name="P7" xml:id="id126" draw:id="id126" draw:layer="layout" svg:width="4.385cm" svg:height="2cm" svg:x="4.782cm" svg:y="8.20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216" draw:text-style-name="P8" draw:layer="layout" draw:type="line" svg:x1="8.697cm" svg:y1="8.479cm" svg:x2="8.697cm" svg:y2="8.729cm" draw:start-shape="id126" draw:start-glue-point="16" draw:end-shape="id126" draw:end-glue-point="17" svg:d="M8697 8479v250" svg:viewBox="0 0 1 251">
            <text:p/>
          </draw:connector>
        </draw:g>
        <draw:g draw:style-name="gr3" xml:id="id131" draw:id="id13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7" draw:text-style-name="P7" xml:id="id127" draw:id="id127" draw:layer="layout" svg:width="4.385cm" svg:height="2cm" svg:x="9.055cm" svg:y="16.2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218" draw:text-style-name="P8" draw:layer="layout" draw:type="line" svg:x1="12.97cm" svg:y1="16.574cm" svg:x2="12.97cm" svg:y2="16.824cm" draw:start-shape="id127" draw:start-glue-point="16" draw:end-shape="id127" draw:end-glue-point="17" svg:d="M12970 16574v250" svg:viewBox="0 0 1 251">
            <text:p/>
          </draw:connector>
        </draw:g>
        <draw:g draw:style-name="gr3" xml:id="id140" draw:id="id14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19" draw:text-style-name="P7" xml:id="id128" draw:id="id128" draw:layer="layout" svg:width="4.385cm" svg:height="1.905cm" svg:x="4.222cm" svg:y="10.6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220" draw:text-style-name="P8" draw:layer="layout" draw:type="line" svg:x1="8.137cm" svg:y1="10.919cm" svg:x2="8.137cm" svg:y2="11.169cm" draw:start-shape="id128" draw:start-glue-point="16" draw:end-shape="id128" draw:end-glue-point="17" svg:d="M8137 10919v250" svg:viewBox="0 0 1 251">
            <text:p/>
          </draw:connector>
        </draw:g>
        <draw:g draw:style-name="gr3" xml:id="id148" draw:id="id14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21" draw:text-style-name="P7" xml:id="id129" draw:id="id129" draw:layer="layout" svg:width="4.385cm" svg:height="1.905cm" svg:x="23.597cm" svg:y="4.3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222" draw:text-style-name="P8" draw:layer="layout" draw:type="line" svg:x1="27.512cm" svg:y1="4.604cm" svg:x2="27.512cm" svg:y2="4.854cm" draw:start-shape="id129" draw:start-glue-point="16" draw:end-shape="id129" draw:end-glue-point="17" svg:d="M27512 4604v250" svg:viewBox="0 0 1 251">
            <text:p/>
          </draw:connector>
        </draw:g>
        <draw:g draw:style-name="gr3" xml:id="id144" draw:id="id1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23" draw:text-style-name="P7" xml:id="id130" draw:id="id130" draw:layer="layout" svg:width="4.385cm" svg:height="1.905cm" svg:x="3.422cm" svg:y="15.3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224" draw:text-style-name="P8" draw:layer="layout" draw:type="line" svg:x1="7.337cm" svg:y1="15.582cm" svg:x2="7.337cm" svg:y2="15.832cm" draw:start-shape="id130" draw:start-glue-point="16" draw:end-shape="id130" draw:end-glue-point="17" svg:d="M7337 15582v250" svg:viewBox="0 0 1 251">
            <text:p/>
          </draw:connector>
        </draw:g>
        <draw:connector draw:style-name="gr225" draw:text-style-name="P9" draw:layer="layout" draw:type="line" svg:x1="12.562cm" svg:y1="16.297cm" svg:x2="15.035cm" svg:y2="12.824cm" draw:start-shape="id131" draw:start-glue-point="4" draw:end-shape="id132" draw:end-glue-point="3" svg:d="M12562 16297l2473-3473" svg:viewBox="0 0 2474 3474">
          <text:p/>
        </draw:connector>
        <draw:g draw:style-name="gr3" xml:id="id122" draw:id="id12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1.816cm" svg:y="5.135cm"/>
          <draw:glue-point draw:id="17" svg:x="4.091cm" svg:y="5.135cm"/>
          <draw:glue-point draw:id="18" svg:x="2cm" svg:y="5cm"/>
          <draw:custom-shape draw:style-name="gr226" draw:text-style-name="P7" xml:id="id133" draw:id="id133" draw:layer="layout" svg:width="9.525cm" svg:height="2cm" svg:x="9.72cm" svg:y="2.6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essaging</text:span></text:p>
            <text:p text:style-name="P6"><text:span text:style-name="T3"/></text:p>
            <draw:enhanced-geometry svg:viewBox="0 0 21600 21600" draw:type="rectangle" draw:enhanced-path="M 0 0 L 21600 0 21600 21600 0 21600 0 0 Z N"/>
          </draw:custom-shape>
          <draw:connector draw:style-name="gr227" draw:text-style-name="P8" draw:layer="layout" draw:type="line" svg:x1="18.775cm" svg:y1="2.887cm" svg:x2="18.775cm" svg:y2="3.137cm" draw:start-shape="id133" draw:start-glue-point="16" draw:end-shape="id133" draw:end-glue-point="17" svg:d="M18775 2887v250" svg:viewBox="0 0 1 251">
            <text:p/>
          </draw:connector>
        </draw:g>
        <draw:connector draw:style-name="gr228" draw:text-style-name="P9" xml:id="id152" draw:id="id152" draw:layer="layout" draw:type="line" svg:x1="16.74cm" svg:y1="16.38cm" svg:x2="17.929cm" svg:y2="11.766cm" draw:start-shape="id134" draw:start-glue-point="6" svg:d="M16740 16380l1189-4614" svg:viewBox="0 0 1190 4615">
          <text:p/>
        </draw:connector>
        <draw:connector draw:style-name="gr229" draw:text-style-name="P9" draw:layer="layout" draw:type="line" svg:x1="9.506cm" svg:y1="7.262cm" svg:x2="10.708cm" svg:y2="6.848cm" draw:start-shape="id135" draw:start-glue-point="14" draw:end-shape="id136" draw:end-glue-point="3" svg:d="M9506 7262l1202-414" svg:viewBox="0 0 1203 415">
          <text:p/>
        </draw:connector>
        <draw:connector draw:style-name="gr230" draw:text-style-name="P9" draw:layer="layout" draw:type="line" svg:x1="15.434cm" svg:y1="4.61cm" svg:x2="13.727cm" svg:y2="11.361cm" draw:start-shape="id122" draw:start-glue-point="12" draw:end-shape="id137" draw:end-glue-point="3" svg:d="M15434 4610l-1707 6751" svg:viewBox="0 0 1708 6752">
          <text:p/>
        </draw:connector>
        <draw:connector draw:style-name="gr231" draw:text-style-name="P9" xml:id="id139" draw:id="id139" draw:layer="layout" draw:type="line" svg:x1="12.753cm" svg:y1="4.61cm" svg:x2="11.299cm" svg:y2="8.124cm" draw:start-shape="id122" draw:start-glue-point="16" svg:d="M12753 4610l-1454 3514" svg:viewBox="0 0 1455 3515">
          <text:p/>
        </draw:connector>
        <draw:connector draw:style-name="gr232" draw:text-style-name="P9" xml:id="id141" draw:id="id141" draw:layer="layout" draw:type="line" svg:x1="13.53cm" svg:y1="4.61cm" svg:x2="11.984cm" svg:y2="9.245cm" draw:start-shape="id122" draw:start-glue-point="11" svg:d="M13530 4610l-1546 4635" svg:viewBox="0 0 1547 4636">
          <text:p/>
        </draw:connector>
        <draw:connector draw:style-name="gr233" draw:text-style-name="P9" xml:id="id143" draw:id="id143" draw:layer="layout" draw:type="line" svg:x1="14.482cm" svg:y1="4.61cm" svg:x2="12.638cm" svg:y2="10.116cm" draw:start-shape="id122" draw:start-glue-point="2" svg:d="M14482 4610l-1844 5506" svg:viewBox="0 0 1845 5507">
          <text:p/>
        </draw:connector>
        <draw:connector draw:style-name="gr234" draw:text-style-name="P9" draw:layer="layout" draw:type="line" svg:x1="9.166cm" svg:y1="8.702cm" svg:x2="11.299cm" svg:y2="8.124cm" draw:start-shape="id138" draw:start-glue-point="15" draw:end-shape="id139" draw:end-glue-point="3" svg:d="M9166 8702l2133-578" svg:viewBox="0 0 2134 579">
          <text:p/>
        </draw:connector>
        <draw:connector draw:style-name="gr235" draw:text-style-name="P9" draw:layer="layout" draw:type="line" svg:x1="8.606cm" svg:y1="11.118cm" svg:x2="11.984cm" svg:y2="9.245cm" draw:start-shape="id140" draw:start-glue-point="15" draw:end-shape="id141" draw:end-glue-point="3" svg:d="M8606 11118l3378-1873" svg:viewBox="0 0 3379 1874">
          <text:p/>
        </draw:connector>
        <draw:connector draw:style-name="gr236" draw:text-style-name="P9" draw:layer="layout" draw:type="line" svg:x1="8.266cm" svg:y1="13.458cm" svg:x2="12.638cm" svg:y2="10.116cm" draw:start-shape="id142" draw:start-glue-point="15" draw:end-shape="id143" draw:end-glue-point="3" svg:d="M8266 13458l4372-3342" svg:viewBox="0 0 4373 3343">
          <text:p/>
        </draw:connector>
        <draw:connector draw:style-name="gr237" draw:text-style-name="P9" xml:id="id137" draw:id="id137" draw:layer="layout" draw:type="line" svg:x1="7.806cm" svg:y1="15.781cm" svg:x2="13.727cm" svg:y2="11.361cm" draw:start-shape="id144" draw:start-glue-point="15" svg:d="M7806 15781l5921-4420" svg:viewBox="0 0 5922 4421">
          <text:p/>
        </draw:connector>
        <draw:connector draw:style-name="gr238" draw:text-style-name="P9" xml:id="id132" draw:id="id132" draw:layer="layout" draw:type="line" svg:x1="16.387cm" svg:y1="4.61cm" svg:x2="15.035cm" svg:y2="12.824cm" draw:start-shape="id122" draw:start-glue-point="18" svg:d="M16387 4610l-1352 8214" svg:viewBox="0 0 1353 8215">
          <text:p/>
        </draw:connector>
        <draw:g draw:style-name="gr3" xml:id="id149" draw:id="id1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9" draw:text-style-name="P7" xml:id="id145" draw:id="id145" draw:layer="layout" svg:width="4.385cm" svg:height="1.905cm" svg:x="23.597cm" svg:y="7.18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astapi_server</text:span></text:p>
            <draw:enhanced-geometry svg:viewBox="0 0 21600 21600" draw:type="rectangle" draw:enhanced-path="M 0 0 L 21600 0 21600 21600 0 21600 0 0 Z N"/>
          </draw:custom-shape>
          <draw:connector draw:style-name="gr240" draw:text-style-name="P8" draw:layer="layout" draw:type="line" svg:x1="27.512cm" svg:y1="7.462cm" svg:x2="27.512cm" svg:y2="7.712cm" draw:start-shape="id145" draw:start-glue-point="16" draw:end-shape="id145" draw:end-glue-point="17" svg:d="M27512 7462v250" svg:viewBox="0 0 1 251">
            <text:p/>
          </draw:connector>
        </draw:g>
        <draw:g draw:style-name="gr3" xml:id="id150" draw:id="id1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1" draw:text-style-name="P7" xml:id="id146" draw:id="id146" draw:layer="layout" svg:width="4.385cm" svg:height="1.905cm" svg:x="23.137cm" svg:y="10.02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type="rectangle" draw:enhanced-path="M 0 0 L 21600 0 21600 21600 0 21600 0 0 Z N"/>
          </draw:custom-shape>
          <draw:connector draw:style-name="gr242" draw:text-style-name="P8" draw:layer="layout" draw:type="line" svg:x1="27.052cm" svg:y1="10.302cm" svg:x2="27.052cm" svg:y2="10.552cm" draw:start-shape="id146" draw:start-glue-point="16" draw:end-shape="id146" draw:end-glue-point="17" svg:d="M27052 10302v250" svg:viewBox="0 0 1 251">
            <text:p/>
          </draw:connector>
        </draw:g>
        <draw:g draw:style-name="gr3" xml:id="id151" draw:id="id15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3" draw:text-style-name="P7" xml:id="id147" draw:id="id147" draw:layer="layout" svg:width="4.385cm" svg:height="1.905cm" svg:x="21.437cm" svg:y="12.78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244" draw:text-style-name="P8" draw:layer="layout" draw:type="line" svg:x1="25.352cm" svg:y1="13.059cm" svg:x2="25.352cm" svg:y2="13.309cm" draw:start-shape="id147" draw:start-glue-point="16" draw:end-shape="id147" draw:end-glue-point="17" svg:d="M25352 13059v250" svg:viewBox="0 0 1 251">
            <text:p/>
          </draw:connector>
        </draw:g>
        <draw:connector draw:style-name="gr245" draw:text-style-name="P9" draw:layer="layout" draw:type="line" svg:x1="23.597cm" svg:y1="5.755cm" svg:x2="21.666cm" svg:y2="6.07cm" draw:start-shape="id148" draw:start-glue-point="9" svg:d="M23597 5755l-1931 315" svg:viewBox="0 0 1932 316">
          <text:p/>
        </draw:connector>
        <draw:connector draw:style-name="gr246" draw:text-style-name="P9" draw:layer="layout" draw:type="line" svg:x1="23.597cm" svg:y1="8.613cm" svg:x2="21.666cm" svg:y2="6.07cm" draw:start-shape="id149" draw:start-glue-point="9" svg:d="M23597 8613l-1931-2543" svg:viewBox="0 0 1932 2544">
          <text:p/>
        </draw:connector>
        <draw:connector draw:style-name="gr247" draw:text-style-name="P9" draw:layer="layout" draw:type="line" svg:x1="23.137cm" svg:y1="10.501cm" svg:x2="21.666cm" svg:y2="6.07cm" draw:start-shape="id150" draw:start-glue-point="8" svg:d="M23137 10501l-1471-4431" svg:viewBox="0 0 1472 4432">
          <text:p/>
        </draw:connector>
        <draw:connector draw:style-name="gr248" draw:text-style-name="P9" xml:id="id153" draw:id="id153" draw:layer="layout" draw:type="line" svg:x1="22.314cm" svg:y1="12.782cm" svg:x2="21.666cm" svg:y2="6.07cm" draw:start-shape="id151" draw:start-glue-point="7" svg:d="M22314 12782l-648-6712" svg:viewBox="0 0 649 6713">
          <text:p/>
        </draw:connector>
        <draw:connector draw:style-name="gr249" draw:text-style-name="P9" draw:layer="layout" draw:type="line" svg:x1="17.339cm" svg:y1="4.61cm" svg:x2="17.929cm" svg:y2="11.766cm" draw:start-shape="id122" draw:start-glue-point="13" draw:end-shape="id152" draw:end-glue-point="3" svg:d="M17339 4610l590 7156" svg:viewBox="0 0 591 7157">
          <text:p/>
        </draw:connector>
        <draw:frame draw:style-name="gr22" draw:text-style-name="P14" draw:layer="layout" svg:width="4.445cm" svg:height="1.199cm" svg:x="20.367cm" svg:y="2.658cm">
          <draw:text-box>
            <text:p><text:span text:style-name="T6">API:</text:span></text:p>
            <text:p><text:span text:style-name="T6">publish_command()</text:span></text:p>
          </draw:text-box>
        </draw:frame>
        <draw:connector draw:style-name="gr250" draw:text-style-name="P9" draw:layer="layout" svg:x1="19.244cm" svg:y1="3.11cm" svg:x2="21.666cm" svg:y2="6.07cm" draw:start-shape="id122" draw:start-glue-point="15" draw:end-shape="id153" draw:end-glue-point="3" svg:d="M19244 3110h1076v2960h1346" svg:viewBox="0 0 2423 2961">
          <text:p/>
        </draw:connector>
        <draw:connector draw:style-name="gr251" draw:text-style-name="P9" xml:id="id154" draw:id="id154" draw:layer="layout" draw:line-skew="2.121cm" svg:x1="9.72cm" svg:y1="3.11cm" svg:x2="1.899cm" svg:y2="4.295cm" draw:start-shape="id122" draw:start-glue-point="8" svg:d="M9720 3110h-2053v1185h-5768" svg:viewBox="0 0 7822 1186">
          <text:p/>
        </draw:connector>
        <draw:connector draw:style-name="gr252" draw:text-style-name="P9" draw:layer="layout" draw:type="line" svg:x1="5.122cm" svg:y1="6.262cm" svg:x2="1.899cm" svg:y2="4.295cm" draw:start-shape="id135" draw:start-glue-point="8" draw:end-shape="id154" draw:end-glue-point="3" svg:d="M5122 6262l-3223-1967" svg:viewBox="0 0 3224 1968">
          <text:p/>
        </draw:connector>
        <draw:connector draw:style-name="gr253" draw:text-style-name="P9" draw:layer="layout" draw:type="line" svg:x1="4.782cm" svg:y1="8.702cm" svg:x2="1.899cm" svg:y2="4.295cm" draw:start-shape="id138" draw:start-glue-point="8" draw:end-shape="id154" draw:end-glue-point="3" svg:d="M4782 8702l-2883-4407" svg:viewBox="0 0 2884 4408">
          <text:p/>
        </draw:connector>
        <draw:connector draw:style-name="gr254" draw:text-style-name="P9" draw:layer="layout" draw:type="line" svg:x1="4.222cm" svg:y1="11.118cm" svg:x2="1.899cm" svg:y2="4.295cm" draw:start-shape="id140" draw:start-glue-point="8" draw:end-shape="id154" draw:end-glue-point="3" svg:d="M4222 11118l-2323-6823" svg:viewBox="0 0 2324 6824">
          <text:p/>
        </draw:connector>
        <draw:connector draw:style-name="gr255" draw:text-style-name="P9" draw:layer="layout" draw:type="line" svg:x1="3.882cm" svg:y1="13.458cm" svg:x2="1.899cm" svg:y2="4.295cm" draw:start-shape="id142" draw:start-glue-point="8" draw:end-shape="id154" draw:end-glue-point="3" svg:d="M3882 13458l-1983-9163" svg:viewBox="0 0 1984 9164">
          <text:p/>
        </draw:connector>
        <draw:connector draw:style-name="gr256" draw:text-style-name="P9" draw:layer="layout" draw:type="line" svg:x1="3.422cm" svg:y1="15.781cm" svg:x2="1.899cm" svg:y2="4.295cm" draw:start-shape="id144" draw:start-glue-point="8" draw:end-shape="id154" draw:end-glue-point="3" svg:d="M3422 15781l-1523-11486" svg:viewBox="0 0 1524 11487">
          <text:p/>
        </draw:connector>
        <draw:frame draw:style-name="gr257" draw:text-style-name="P14" draw:layer="layout" svg:width="5.08cm" svg:height="1.199cm" svg:x="1.952cm" svg:y="2.905cm">
          <draw:text-box>
            <text:p><text:span text:style-name="T6">API:</text:span></text:p>
            <text:p><text:span text:style-name="T6">subscribe_commands()</text:span></text:p>
          </draw:text-box>
        </draw:frame>
        <draw:custom-shape draw:style-name="gr258" draw:text-style-name="P19" draw:layer="layout" svg:width="7.62cm" svg:height="0.634cm" svg:x="10.525cm" svg:y="3.975cm">
          <text:p text:style-name="P18">queue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 draw:display-name="Square 45" svg:viewBox="0 0 1131 1131" svg:d="M0 564l564 567 567-567-567-564z"/>
    <draw:marker draw:name="Square_20_unfilled" draw:display-name="Square unfilled" svg:viewBox="0 0 300 300" svg:d="M0 0h300v300h-300zM20 20h260v260h-26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6-21T16:49:48.990031389</dc:date>
    <meta:editing-duration>PT12H51S</meta:editing-duration>
    <meta:editing-cycles>88</meta:editing-cycles>
    <meta:print-date>2026-04-03T16:45:26.431431754</meta:print-date>
    <dc:creator>Henk</dc:creator>
    <meta:document-statistic meta:object-count="354"/>
  </office:meta>
</office:document-meta>
</file>