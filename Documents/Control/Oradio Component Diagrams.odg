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3.617cm" fo:min-width="22.626cm" fo:padding-top="0.151cm" fo:padding-bottom="0.151cm" fo:padding-left="0.276cm" fo:padding-right="0.276cm" loext:decorative="false"/>
    </style:style>
    <style:style style:name="gr2" style:family="graphic" style:parent-style-name="standard">
      <style:graphic-properties draw:stroke="none" svg:stroke-color="#000000" draw:fill="none" draw:fill-color="#ffffff" draw:auto-grow-height="true" draw:auto-grow-width="false" fo:min-height="0.949cm" loext:decorative="false"/>
      <style:paragraph-properties style:writing-mode="lr-tb"/>
    </style:style>
    <style:style style:name="gr3" style:family="graphic">
      <style:graphic-properties style:writing-mode="lr-tb" loext:decorative="false"/>
    </style:style>
    <style:style style:name="gr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4.418cm" fo:min-width="22.72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47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758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2"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gr2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138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7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7"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9" style:family="graphic" style:parent-style-name="standard" style:list-style-name="L1">
      <style:graphic-properties draw:stroke="none" svg:stroke-color="#000000" draw:fill="none" draw:fill-color="#ffffff" draw:auto-grow-height="true" draw:auto-grow-width="false" fo:min-height="1.02cm" loext:decorative="false"/>
      <style:paragraph-properties style:writing-mode="lr-tb"/>
    </style:style>
    <style:style style:name="gr30" style:family="graphic" style:parent-style-name="standard" style:list-style-name="L1">
      <style:graphic-properties svg:stroke-width="0.053cm" svg:stroke-color="#000000" draw:marker-start-width="0.279cm" draw:marker-end-width="0.279cm" draw:fill="none" loext:fill-use-slide-background="false" draw:textarea-horizontal-align="justify" draw:textarea-vertical-align="middle" draw:auto-grow-height="false" fo:min-height="0.65cm" fo:min-width="22.626cm" fo:padding-top="0.151cm" fo:padding-bottom="0.151cm" fo:padding-left="0.276cm" fo:padding-right="0.276cm" style:writing-mode="lr-tb" loext:decorative="false"/>
      <style:paragraph-properties style:writing-mode="lr-tb"/>
    </style:style>
    <style:style style:name="gr3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601cm" fo:min-width="3.35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5"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36"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7"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3.617cm" fo:min-width="15.006cm" fo:padding-top="0.151cm" fo:padding-bottom="0.151cm" fo:padding-left="0.276cm" fo:padding-right="0.276cm" loext:decorative="false"/>
    </style:style>
    <style:style style:name="gr3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4.359cm" fo:min-width="13.83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40" style:family="graphic" style:parent-style-name="standard" style:list-style-name="L1">
      <style:graphic-properties svg:stroke-width="0.053cm" svg:stroke-color="#000000" draw:marker-start-width="0.279cm" draw:marker-end-width="0.279cm" draw:fill="none" loext:fill-use-slide-background="false" draw:textarea-horizontal-align="justify" draw:textarea-vertical-align="middle" draw:auto-grow-height="false" fo:min-height="0.65cm" fo:min-width="15.006cm" fo:padding-top="0.151cm" fo:padding-bottom="0.151cm" fo:padding-left="0.276cm" fo:padding-right="0.276cm" style:writing-mode="lr-tb" loext:decorative="false"/>
      <style:paragraph-properties style:writing-mode="lr-tb"/>
    </style:style>
    <style:style style:name="gr4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601cm" fo:min-width="3.35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3"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4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50"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51"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5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3" style:family="graphic" style:parent-style-name="standard" style:list-style-name="L2">
      <style:graphic-properties draw:stroke="solid" draw:stroke-dash="Dashed_20__28_var_29__20_4" svg:stroke-width="0.053cm" svg:stroke-color="#000000" draw:marker-start="" draw:marker-start-width="0.4cm" draw:marker-start-center="false" draw:marker-end="Square_20_45"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56"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57"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3.471cm" fo:min-width="13.83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6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6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64"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5"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66"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7"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6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7.216cm" fo:min-width="7.48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7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3.844cm" fo:min-width="16.408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7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7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7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7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3"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3.398cm" fo:min-width="17.228cm" fo:padding-top="0.151cm" fo:padding-bottom="0.151cm" fo:padding-left="0.276cm" fo:padding-right="0.276cm" loext:decorative="false"/>
    </style:style>
    <style:style style:name="gr84"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0.425cm" fo:min-width="17.228cm" fo:padding-top="0.151cm" fo:padding-bottom="0.151cm" fo:padding-left="0.276cm" fo:padding-right="0.276cm" style:writing-mode="lr-tb" loext:decorative="false"/>
      <style:paragraph-properties style:writing-mode="lr-tb"/>
    </style:style>
    <style:style style:name="gr8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9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9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9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94"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9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96" style:family="graphic" style:parent-style-name="standard">
      <style:graphic-properties draw:stroke="none" svg:stroke-color="#000000" draw:fill="none" draw:fill-color="#ffffff" draw:auto-grow-height="true" draw:auto-grow-width="false" fo:min-height="0.99cm" loext:decorative="false"/>
      <style:paragraph-properties style:writing-mode="lr-tb"/>
    </style:style>
    <style:style style:name="gr9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3.209cm" fo:min-width="18.91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9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0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0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0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6"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07"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0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9"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10"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6.048cm" fo:min-width="12.226cm" fo:padding-top="0.151cm" fo:padding-bottom="0.151cm" fo:padding-left="0.276cm" fo:padding-right="0.276cm" loext:decorative="false"/>
    </style:style>
    <style:style style:name="gr11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8.493cm" fo:min-width="11.05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1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1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069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1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1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1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17"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1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1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2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3"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0.65cm" fo:min-width="12.226cm" fo:padding-top="0.151cm" fo:padding-bottom="0.151cm" fo:padding-left="0.276cm" fo:padding-right="0.276cm" style:writing-mode="lr-tb" loext:decorative="false"/>
      <style:paragraph-properties style:writing-mode="lr-tb"/>
    </style:style>
    <style:style style:name="gr12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4.876cm" fo:min-width="12.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2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601cm" fo:min-width="3.35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2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2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3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3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069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3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601cm" fo:min-width="3.35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39"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4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4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4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43"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44"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4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2.979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4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4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2.979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4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4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5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5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3.021cm" fo:min-width="7.08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53" style:family="graphic" style:parent-style-name="standard">
      <style:graphic-properties draw:stroke="none" svg:stroke-color="#000000" draw:fill="none" draw:fill-color="#ffffff" draw:auto-grow-height="true" draw:auto-grow-width="false" fo:min-height="1.108cm" loext:decorative="false"/>
      <style:paragraph-properties style:writing-mode="lr-tb"/>
    </style:style>
    <style:style style:name="gr154"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5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56"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5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59"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6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5.071cm" fo:min-width="12.51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6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4"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6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7"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6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69"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70"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16.86cm" fo:min-width="24.848cm" fo:padding-top="0.151cm" fo:padding-bottom="0.151cm" fo:padding-left="0.276cm" fo:padding-right="0.276cm" loext:decorative="false"/>
    </style:style>
    <style:style style:name="gr171"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72"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0.65cm" fo:min-width="24.848cm" fo:padding-top="0.151cm" fo:padding-bottom="0.151cm" fo:padding-left="0.276cm" fo:padding-right="0.276cm" style:writing-mode="lr-tb" loext:decorative="false"/>
      <style:paragraph-properties style:writing-mode="lr-tb"/>
    </style:style>
    <style:style style:name="gr17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7.89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7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7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7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7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7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7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8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8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8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8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8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8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8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8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8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8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9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9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9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6.5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9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94"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9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96"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97"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9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9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0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01"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02" style:family="graphic" style:parent-style-name="standard">
      <style:graphic-properties svg:stroke-width="0.053cm" svg:stroke-color="#000000" draw:marker-start-width="0.279cm" draw:marker-end-width="0.279cm" draw:textarea-vertical-align="middle" fo:padding-top="0.151cm" fo:padding-bottom="0.151cm" fo:padding-left="0.276cm" fo:padding-right="0.276cm" loext:decorative="false"/>
    </style:style>
    <style:style style:name="gr203"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0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4.308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0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0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0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0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0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1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1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1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1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1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1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1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1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1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1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2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2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9.07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2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23"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24"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25"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26"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27"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2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29"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3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3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3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33"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3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3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3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3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3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3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4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4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4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43"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44"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45" style:family="graphic" style:parent-style-name="standard" style:list-style-name="L2">
      <style:graphic-properties draw:stroke="solid" draw:stroke-dash="Dashed_20__28_var_29__20_4" svg:stroke-width="0.053cm" svg:stroke-color="#000000" draw:marker-start="Square_20_unfilled" draw:marker-start-width="0.4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46" style:family="graphic" style:parent-style-name="standard">
      <style:graphic-properties draw:stroke="none" svg:stroke-color="#000000" draw:fill="none" draw:fill-color="#ffffff" draw:auto-grow-height="true" draw:auto-grow-width="false" fo:min-height="0.703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text-properties fo:font-size="12pt"/>
    </style:style>
    <style:style style:name="P3"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5"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100%" fo:text-indent="0cm"/>
    </style:style>
    <style:style style:name="P11" style:family="paragraph">
      <loext:graphic-properties draw:fill="none" draw:fill-color="#ffffff"/>
      <style:paragraph-properties fo:margin-left="0cm" fo:margin-right="0cm" fo:margin-top="0cm" fo:margin-bottom="0cm" fo:line-height="100%" fo:text-indent="0cm"/>
    </style:style>
    <style:style style:name="P12" style:family="paragraph">
      <style:paragraph-properties fo:margin-left="0cm" fo:margin-right="0cm" fo:text-align="center" fo:text-indent="0cm"/>
      <style:text-properties style:font-name="Liberation Sans" fo:font-size="18pt" style:letter-kerning="true" style:font-name-asian="Noto Sans CJK SC" style:font-size-asian="18pt" style:font-name-complex="Noto Sans Devanagari" style:font-size-complex="18pt"/>
    </style:style>
    <style:style style:name="P13" style:family="paragraph">
      <loext:graphic-properties draw:fill="none"/>
      <style:paragraph-properties fo:margin-left="0cm" fo:margin-right="0cm" fo:text-align="center" fo:text-indent="0cm" style:writing-mode="lr-tb"/>
      <style:text-properties style:font-name="Liberation Sans" fo:font-size="18pt" style:letter-kerning="true" style:font-name-asian="Noto Sans CJK SC" style:font-size-asian="18pt" style:font-name-complex="Noto Sans Devanagari" style:font-size-complex="18pt"/>
    </style:style>
    <style:style style:name="P14" style:family="paragraph">
      <loext:graphic-properties draw:fill="none" draw:fill-color="#ffffff"/>
      <style:text-properties fo:font-size="12pt" style:font-size-asian="12pt" style:font-size-complex="12pt"/>
    </style:style>
    <style:style style:name="P1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6" style:family="paragraph">
      <style:paragraph-properties fo:margin-left="0cm" fo:margin-right="0cm" fo:text-align="center" fo:text-indent="0cm"/>
    </style:style>
    <style:style style:name="P17" style:family="paragraph">
      <loext:graphic-properties draw:fill="none"/>
      <style:paragraph-properties fo:margin-left="0cm" fo:margin-right="0cm" fo:text-align="center" fo:text-indent="0cm" style:writing-mode="lr-tb"/>
    </style:style>
    <style:style style:name="P18" style:family="paragraph">
      <style:paragraph-properties fo:text-align="center"/>
    </style:style>
    <style:style style:name="P19" style:family="paragraph">
      <style:text-properties fo:font-size="12pt" style:font-size-asian="12pt" style:font-size-complex="12pt"/>
    </style:style>
    <style:style style:name="T1" style:family="text">
      <style:text-properties fo:font-size="12pt"/>
    </style:style>
    <style:style style:name="T2"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5" style:family="text">
      <style:text-properties style:font-name="Liberation Sans" fo:font-size="18pt" style:letter-kerning="true" style:font-name-asian="Noto Sans CJK SC" style:font-size-asian="18pt" style:font-name-complex="Noto Sans Devanagari" style:font-size-complex="18pt"/>
    </style:style>
    <style:style style:name="T6" style:family="text">
      <style:text-properties fo:font-size="12p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RaspiOS" draw:style-name="dp1" draw:master-page-name="Default">
        <draw:custom-shape draw:style-name="gr1" draw:text-style-name="P1" draw:layer="layout" svg:width="23.178cm" svg:height="3.919cm" svg:x="1.317cm" svg:y="1.843cm">
          <text:p/>
          <draw:enhanced-geometry svg:viewBox="0 0 21600 21600" draw:mirror-horizontal="false" draw:mirror-vertical="false" draw:type="rectangle" draw:enhanced-path="M 0 0 L 21600 0 21600 21600 0 21600 0 0 Z N"/>
        </draw:custom-shape>
        <draw:frame draw:style-name="gr2" draw:text-style-name="P2" draw:layer="layout" svg:width="2.54cm" svg:height="1.199cm" svg:x="10.842cm" svg:y="6.42cm">
          <draw:text-box>
            <text:p><text:span text:style-name="T1">network</text:span></text:p>
            <text:p><text:span text:style-name="T1">interface</text:span></text:p>
          </draw:text-box>
        </draw:fram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4" draw:text-style-name="P3" draw:layer="layout" svg:width="23.178cm" svg:height="4.622cm" svg:x="1.317cm" svg:y="8.1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5" draw:text-style-name="P5" draw:layer="layout" svg:width="2.449cm" svg:height="0.779cm" svg:x="1.317cm" svg:y="8.125cm">
            <text:p text:style-name="P4"><text:span text:style-name="T2">RaspiOS</text:span></text:p>
            <draw:enhanced-geometry svg:viewBox="0 0 21600 21600" draw:type="non-primitve" draw:enhanced-path="M 0 0 L 21600 0 19000 21600 0 21600 0 0 Z N"/>
          </draw:custom-shape>
        </draw:g>
        <draw:frame draw:style-name="gr2" draw:text-style-name="P2" draw:layer="layout" svg:width="2.54cm" svg:height="1.199cm" svg:x="20.747cm" svg:y="6.808cm">
          <draw:text-box>
            <text:p><text:span text:style-name="T1">ALSA</text:span></text:p>
            <text:p><text:span text:style-name="T1">interface</text:span></text:p>
          </draw:text-box>
        </draw:frame>
        <draw:g draw:style-name="gr3" xml:id="id3" draw:id="id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 draw:text-style-name="P7" xml:id="id1" draw:id="id1" draw:layer="layout" svg:width="3.93cm" svg:height="2cm" svg:x="19.16cm" svg:y="9.6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ALSA library</text:span></text:p>
            <draw:enhanced-geometry svg:viewBox="0 0 21600 21600" draw:type="rectangle" draw:enhanced-path="M 0 0 L 21600 0 21600 21600 0 21600 0 0 Z N"/>
          </draw:custom-shape>
          <draw:connector draw:style-name="gr7" draw:text-style-name="P8" draw:layer="layout" draw:type="line" svg:x1="22.62cm" svg:y1="9.907cm" svg:x2="22.62cm" svg:y2="10.157cm" draw:start-shape="id1" draw:start-glue-point="16" draw:end-shape="id1" draw:end-glue-point="17" svg:d="M22620 9907v250" svg:viewBox="0 0 1 251">
            <text:p/>
          </draw:connector>
        </draw:g>
        <draw:g draw:style-name="gr3" xml:id="id4" draw:id="id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 draw:text-style-name="P7" xml:id="id2" draw:id="id2" draw:layer="layout" svg:width="4.212cm" svg:height="2cm" svg:x="18.81cm" svg:y="2.76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system_sound</text:span></text:p>
            <draw:enhanced-geometry svg:viewBox="0 0 21600 21600" draw:type="rectangle" draw:enhanced-path="M 0 0 L 21600 0 21600 21600 0 21600 0 0 Z N"/>
          </draw:custom-shape>
          <draw:connector draw:style-name="gr9" draw:text-style-name="P8" draw:layer="layout" draw:type="line" svg:x1="22.552cm" svg:y1="3.04cm" svg:x2="22.552cm" svg:y2="3.29cm" draw:start-shape="id2" draw:start-glue-point="16" draw:end-shape="id2" draw:end-glue-point="17" svg:d="M22552 3040v250" svg:viewBox="0 0 1 251">
            <text:p/>
          </draw:connector>
        </draw:g>
        <draw:connector draw:style-name="gr10" draw:text-style-name="P9" xml:id="id5" draw:id="id5" draw:layer="layout" draw:type="line" svg:x1="19.946cm" svg:y1="9.63cm" svg:x2="20.327cm" svg:y2="6.547cm" draw:start-shape="id3" draw:start-glue-point="7" svg:d="M19946 9630l381-3083" svg:viewBox="0 0 382 3084">
          <text:p/>
        </draw:connector>
        <draw:connector draw:style-name="gr11" draw:text-style-name="P9" draw:layer="layout" draw:type="line" svg:x1="21.337cm" svg:y1="4.763cm" svg:x2="20.327cm" svg:y2="6.547cm" draw:start-shape="id4" draw:start-glue-point="12" draw:end-shape="id5" draw:end-glue-point="3" svg:d="M21337 4763l-1010 1784" svg:viewBox="0 0 1011 1785">
          <text:p/>
        </draw:connector>
        <draw:g draw:style-name="gr3" xml:id="id22" draw:id="id2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 draw:text-style-name="P7" xml:id="id6" draw:id="id6" draw:layer="layout" svg:width="4.128cm" svg:height="2cm" svg:x="13.584cm" svg:y="2.80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remote_monitoring</text:span></text:p>
            <draw:enhanced-geometry svg:viewBox="0 0 21600 21600" draw:mirror-horizontal="false" draw:mirror-vertical="false" draw:type="rectangle" draw:enhanced-path="M 0 0 L 21600 0 21600 21600 0 21600 0 0 Z N"/>
          </draw:custom-shape>
          <draw:connector draw:style-name="gr13" draw:text-style-name="P8" draw:layer="layout" draw:type="line" svg:x1="17.242cm" svg:y1="3.082cm" svg:x2="17.242cm" svg:y2="3.332cm" draw:start-shape="id6" draw:start-glue-point="16" draw:end-shape="id6" draw:end-glue-point="17" svg:d="M17242 3082v250" svg:viewBox="0 0 1 251">
            <text:p/>
          </draw:connector>
        </draw:g>
        <draw:g draw:style-name="gr3" xml:id="id11" draw:id="id1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4" draw:text-style-name="P7" xml:id="id7" draw:id="id7" draw:layer="layout" svg:width="4.128cm" svg:height="2cm" svg:x="2.877cm" svg:y="2.74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oradio_logging</text:span></text:p>
            <draw:enhanced-geometry svg:viewBox="0 0 21600 21600" draw:type="rectangle" draw:enhanced-path="M 0 0 L 21600 0 21600 21600 0 21600 0 0 Z N"/>
          </draw:custom-shape>
          <draw:connector draw:style-name="gr15" draw:text-style-name="P8" draw:layer="layout" draw:type="line" svg:x1="6.535cm" svg:y1="3.025cm" svg:x2="6.535cm" svg:y2="3.275cm" draw:start-shape="id7" draw:start-glue-point="16" draw:end-shape="id7" draw:end-glue-point="17" svg:d="M6535 3025v250" svg:viewBox="0 0 1 251">
            <text:p/>
          </draw:connector>
        </draw:g>
        <draw:g draw:style-name="gr3" xml:id="id10" draw:id="id1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 draw:text-style-name="P7" xml:id="id8" draw:id="id8" draw:layer="layout" svg:width="3.75cm" svg:height="2cm" svg:x="1.695cm" svg:y="9.6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console</text:span></text:p>
            <draw:enhanced-geometry svg:viewBox="0 0 21600 21600" draw:mirror-horizontal="false" draw:mirror-vertical="false" draw:type="rectangle" draw:enhanced-path="M 0 0 L 21600 0 21600 21600 0 21600 0 0 Z N"/>
          </draw:custom-shape>
          <draw:connector draw:style-name="gr17" draw:text-style-name="P8" draw:layer="layout" draw:type="line" svg:x1="4.975cm" svg:y1="9.907cm" svg:x2="4.975cm" svg:y2="10.157cm" draw:start-shape="id8" draw:start-glue-point="16" draw:end-shape="id8" draw:end-glue-point="17" svg:d="M4975 9907v250" svg:viewBox="0 0 1 251">
            <text:p/>
          </draw:connector>
        </draw:g>
        <draw:connector draw:style-name="gr18" draw:text-style-name="P9" xml:id="id13" draw:id="id13" draw:layer="layout" draw:type="line" svg:x1="7.417cm" svg:y1="9.63cm" svg:x2="6.475cm" svg:y2="7.014cm" draw:start-shape="id9" draw:start-glue-point="6" svg:d="M7417 9630l-942-2616" svg:viewBox="0 0 943 2617">
          <text:p/>
        </draw:connector>
        <draw:connector draw:style-name="gr19" draw:text-style-name="P9" xml:id="id12" draw:id="id12" draw:layer="layout" draw:type="line" svg:x1="4.695cm" svg:y1="9.63cm" svg:x2="4.545cm" svg:y2="7.2cm" draw:start-shape="id10" draw:start-glue-point="4" svg:d="M4695 9630l-150-2430" svg:viewBox="0 0 151 2431">
          <text:p/>
        </draw:connector>
        <draw:connector draw:style-name="gr20" draw:text-style-name="P9" draw:layer="layout" draw:type="line" svg:x1="3.703cm" svg:y1="4.748cm" svg:x2="4.545cm" svg:y2="7.2cm" draw:start-shape="id11" draw:start-glue-point="10" draw:end-shape="id12" draw:end-glue-point="3" svg:d="M3703 4748l842 2452" svg:viewBox="0 0 843 2453">
          <text:p/>
        </draw:connector>
        <draw:connector draw:style-name="gr21" draw:text-style-name="P9" draw:layer="layout" draw:type="line" svg:x1="6.179cm" svg:y1="4.748cm" svg:x2="6.475cm" svg:y2="7.014cm" draw:start-shape="id11" draw:start-glue-point="13" draw:end-shape="id13" draw:end-glue-point="3" svg:d="M6179 4748l296 2266" svg:viewBox="0 0 297 2267">
          <text:p/>
        </draw:connector>
        <draw:frame draw:style-name="gr22" draw:text-style-name="P2" draw:layer="layout" svg:width="2.223cm" svg:height="0.725cm" svg:x="2.269cm" svg:y="6.647cm">
          <draw:text-box>
            <text:p><text:span text:style-name="T1">stdout</text:span></text:p>
          </draw:text-box>
        </draw:frame>
        <draw:g draw:style-name="gr3" xml:id="id9" draw:id="id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3" draw:text-style-name="P7" xml:id="id14" draw:id="id14" draw:layer="layout" svg:width="3.592cm" svg:height="2cm" svg:x="5.98cm" svg:y="9.6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file system</text:span></text:p>
            <draw:enhanced-geometry svg:viewBox="0 0 21600 21600" draw:type="rectangle" draw:enhanced-path="M 0 0 L 21600 0 21600 21600 0 21600 0 0 Z N"/>
          </draw:custom-shape>
          <draw:connector draw:style-name="gr24" draw:text-style-name="P8" draw:layer="layout" draw:type="line" svg:x1="9.102cm" svg:y1="9.907cm" svg:x2="9.102cm" svg:y2="10.157cm" draw:start-shape="id14" draw:start-glue-point="16" draw:end-shape="id14" draw:end-glue-point="17" svg:d="M9102 9907v250" svg:viewBox="0 0 1 251">
            <text:p/>
          </draw:connector>
        </draw:g>
        <draw:g draw:style-name="gr3" xml:id="id16" draw:id="id1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5" draw:text-style-name="P7" xml:id="id15" draw:id="id15" draw:layer="layout" svg:width="3.73cm" svg:height="2cm" svg:x="10.29cm" svg:y="9.6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network manager</text:span></text:p>
            <draw:enhanced-geometry svg:viewBox="0 0 21600 21600" draw:type="rectangle" draw:enhanced-path="M 0 0 L 21600 0 21600 21600 0 21600 0 0 Z N"/>
          </draw:custom-shape>
          <draw:connector draw:style-name="gr26" draw:text-style-name="P8" draw:layer="layout" draw:type="line" svg:x1="13.55cm" svg:y1="9.907cm" svg:x2="13.55cm" svg:y2="10.157cm" draw:start-shape="id15" draw:start-glue-point="16" draw:end-shape="id15" draw:end-glue-point="17" svg:d="M13550 9907v250" svg:viewBox="0 0 1 251">
            <text:p/>
          </draw:connector>
        </draw:g>
        <draw:connector draw:style-name="gr27" draw:text-style-name="P9" xml:id="id18" draw:id="id18" draw:layer="layout" draw:type="line" svg:x1="11.036cm" svg:y1="9.63cm" svg:x2="10.397cm" svg:y2="7.605cm" draw:start-shape="id16" draw:start-glue-point="7" svg:d="M11036 9630l-639-2025" svg:viewBox="0 0 640 2026">
          <text:p/>
        </draw:connector>
        <draw:connector draw:style-name="gr28" draw:text-style-name="P9" draw:layer="layout" draw:type="line" svg:x1="10.793cm" svg:y1="4.763cm" svg:x2="10.397cm" svg:y2="7.605cm" draw:start-shape="id17" draw:start-glue-point="12" draw:end-shape="id18" draw:end-glue-point="3" svg:d="M10793 4763l-396 2842" svg:viewBox="0 0 397 2843">
          <text:p/>
        </draw:connector>
        <draw:frame draw:style-name="gr29" draw:text-style-name="P11" draw:layer="layout" svg:width="3.175cm" svg:height="1.27cm" svg:x="6.715cm" svg:y="6.42cm">
          <draw:text-box>
            <text:p text:style-name="P10"><text:span text:style-name="T1">file system </text:span></text:p>
            <text:p text:style-name="P10"><text:span text:style-name="T1">interface</text:span></text:p>
          </draw:text-box>
        </draw:frame>
        <draw:custom-shape draw:style-name="gr30" draw:text-style-name="P13" draw:layer="layout" svg:width="23.178cm" svg:height="0.952cm" svg:x="1.317cm" svg:y="0.908cm">
          <text:p text:style-name="P12"><text:span text:style-name="T5">Com</text:span><text:span text:style-name="T5">pone</text:span><text:span text:style-name="T5">nts </text:span><text:span text:style-name="T5">Inter</text:span><text:span text:style-name="T5">face: </text:span><text:span text:style-name="T5">OS </text:span><text:span text:style-name="T5">Serv</text:span><text:span text:style-name="T5">ice</text:span></text:p>
          <draw:enhanced-geometry svg:viewBox="0 0 21600 21600" draw:type="rectangle" draw:enhanced-path="M 0 0 L 21600 0 21600 21600 0 21600 0 0 Z N"/>
        </draw:custom-shape>
        <draw:g draw:style-name="gr3" xml:id="id17" draw:id="id1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1" draw:text-style-name="P7" xml:id="id19" draw:id="id19" draw:layer="layout" svg:width="4.128cm" svg:height="2cm" svg:x="8.317cm" svg:y="2.76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wifi_service</text:span></text:p>
            <draw:enhanced-geometry svg:viewBox="0 0 21600 21600" draw:mirror-horizontal="false" draw:mirror-vertical="false" draw:type="rectangle" draw:enhanced-path="M 0 0 L 21600 0 21600 21600 0 21600 0 0 Z N"/>
          </draw:custom-shape>
          <draw:connector draw:style-name="gr32" draw:text-style-name="P8" draw:layer="layout" draw:type="line" svg:x1="11.975cm" svg:y1="3.04cm" svg:x2="11.975cm" svg:y2="3.29cm" draw:start-shape="id19" draw:start-glue-point="16" draw:end-shape="id19" draw:end-glue-point="17" svg:d="M11975 3040v250" svg:viewBox="0 0 1 251">
            <text:p/>
          </draw:connector>
        </draw:g>
        <draw:g draw:style-name="gr3" xml:id="id21" draw:id="id2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3" draw:text-style-name="P7" xml:id="id20" draw:id="id20" draw:layer="layout" svg:width="3.81cm" svg:height="1.805cm" svg:x="14.617cm" svg:y="9.7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HTTP library</text:span></text:p>
            <draw:enhanced-geometry svg:viewBox="0 0 21600 21600" draw:type="rectangle" draw:enhanced-path="M 0 0 L 21600 0 21600 21600 0 21600 0 0 Z N"/>
          </draw:custom-shape>
          <draw:connector draw:style-name="gr34" draw:text-style-name="P8" draw:layer="layout" draw:type="line" svg:x1="17.957cm" svg:y1="10.007cm" svg:x2="17.957cm" svg:y2="10.257cm" draw:start-shape="id20" draw:start-glue-point="16" draw:end-shape="id20" draw:end-glue-point="17" svg:d="M17957 10007v250" svg:viewBox="0 0 1 251">
            <text:p/>
          </draw:connector>
        </draw:g>
        <draw:connector draw:style-name="gr35" draw:text-style-name="P9" xml:id="id23" draw:id="id23" draw:layer="layout" draw:type="line" svg:x1="16.141cm" svg:y1="9.73cm" svg:x2="16.716cm" svg:y2="7.605cm" draw:start-shape="id21" draw:start-glue-point="6" svg:d="M16141 9730l575-2125" svg:viewBox="0 0 576 2126">
          <text:p/>
        </draw:connector>
        <draw:connector draw:style-name="gr36" draw:text-style-name="P9" draw:layer="layout" draw:type="line" svg:x1="16.886cm" svg:y1="4.805cm" svg:x2="16.716cm" svg:y2="7.605cm" draw:start-shape="id22" draw:start-glue-point="13" draw:end-shape="id23" draw:end-glue-point="3" svg:d="M16886 4805l-170 2800" svg:viewBox="0 0 171 2801">
          <text:p/>
        </draw:connector>
        <draw:frame draw:style-name="gr2" draw:text-style-name="P14" draw:layer="layout" svg:width="2.222cm" svg:height="1.199cm" svg:x="14.018cm" svg:y="6.715cm">
          <draw:text-box>
            <text:p><text:span text:style-name="T6">HTTP</text:span></text:p>
            <text:p><text:span text:style-name="T6">interface</text:span></text:p>
          </draw:text-box>
        </draw:frame>
      </draw:page>
      <draw:page draw:name="Web Service" draw:style-name="dp1" draw:master-page-name="Default">
        <draw:custom-shape draw:style-name="gr37" draw:text-style-name="P1" draw:layer="layout" svg:width="15.558cm" svg:height="3.919cm" svg:x="11.477cm" svg:y="1.843cm">
          <text:p/>
          <draw:enhanced-geometry svg:viewBox="0 0 21600 21600" draw:mirror-horizontal="false" draw:mirror-vertical="false" draw:type="rectangle" draw:enhanced-path="M 0 0 L 21600 0 21600 21600 0 21600 0 0 Z N"/>
        </draw:custom-shap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38" draw:text-style-name="P3" draw:layer="layout" svg:width="14.287cm" svg:height="4.563cm" svg:x="1.635cm" svg:y="8.0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39" draw:text-style-name="P5" draw:layer="layout" svg:width="3.741cm" svg:height="0.779cm" svg:x="1.635cm" svg:y="8.037cm">
            <text:p text:style-name="P4"><text:span text:style-name="T2">R</text:span><text:span text:style-name="T2">a</text:span><text:span text:style-name="T2">s</text:span><text:span text:style-name="T2">p</text:span><text:span text:style-name="T2">i</text:span><text:span text:style-name="T2">O</text:span><text:span text:style-name="T2">S</text:span><text:span text:style-name="T2">-</text:span><text:span text:style-name="T2">k</text:span><text:span text:style-name="T2">e</text:span><text:span text:style-name="T2">r</text:span><text:span text:style-name="T2">n</text:span><text:span text:style-name="T2">e</text:span><text:span text:style-name="T2">l</text:span></text:p>
            <draw:enhanced-geometry svg:viewBox="0 0 21600 21600" draw:type="non-primitve" draw:enhanced-path="M 0 0 L 21600 0 19000 21600 0 21600 0 0 Z N"/>
          </draw:custom-shape>
        </draw:g>
        <draw:custom-shape draw:style-name="gr40" draw:text-style-name="P13" draw:layer="layout" svg:width="15.558cm" svg:height="0.952cm" svg:x="11.477cm" svg:y="0.908cm">
          <text:p text:style-name="P12"><text:span text:style-name="T5">Components Interface: Web Service</text:span></text:p>
          <draw:enhanced-geometry svg:viewBox="0 0 21600 21600" draw:type="rectangle" draw:enhanced-path="M 0 0 L 21600 0 21600 21600 0 21600 0 0 Z N"/>
        </draw:custom-shape>
        <draw:g draw:style-name="gr3" xml:id="id25" draw:id="id2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1" draw:text-style-name="P7" xml:id="id24" draw:id="id24" draw:layer="layout" svg:width="3.81cm" svg:height="1.805cm" svg:x="10.842cm" svg:y="8.47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BSD socket</text:span></text:p>
            <draw:enhanced-geometry svg:viewBox="0 0 21600 21600" draw:type="rectangle" draw:enhanced-path="M 0 0 L 21600 0 21600 21600 0 21600 0 0 Z N"/>
          </draw:custom-shape>
          <draw:connector draw:style-name="gr42" draw:text-style-name="P8" draw:layer="layout" draw:type="line" svg:x1="14.182cm" svg:y1="8.749cm" svg:x2="14.182cm" svg:y2="8.999cm" draw:start-shape="id24" draw:start-glue-point="16" draw:end-shape="id24" draw:end-glue-point="17" svg:d="M14182 8749v250" svg:viewBox="0 0 1 251">
            <text:p/>
          </draw:connector>
        </draw:g>
        <draw:connector draw:style-name="gr43" draw:text-style-name="P9" draw:layer="layout" draw:type="line" svg:x1="14.652cm" svg:y1="9.825cm" svg:x2="17.024cm" svg:y2="10.039cm" draw:start-shape="id25" draw:start-glue-point="14" draw:end-shape="id26" draw:end-glue-point="3" svg:d="M14652 9825l2372 214" svg:viewBox="0 0 2373 215">
          <text:p/>
        </draw:connector>
        <draw:g draw:style-name="gr3" xml:id="id31" draw:id="id3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4" draw:text-style-name="P7" xml:id="id27" draw:id="id27" draw:layer="layout" svg:width="4.068cm" svg:height="2cm" svg:x="21.819cm" svg:y="8.69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uvicorn server</text:span></text:p>
            <draw:enhanced-geometry svg:viewBox="0 0 21600 21600" draw:type="rectangle" draw:enhanced-path="M 0 0 L 21600 0 21600 21600 0 21600 0 0 Z N"/>
          </draw:custom-shape>
          <draw:connector draw:style-name="gr45" draw:text-style-name="P8" draw:layer="layout" draw:type="line" svg:x1="25.417cm" svg:y1="8.972cm" svg:x2="25.417cm" svg:y2="9.222cm" draw:start-shape="id27" draw:start-glue-point="16" draw:end-shape="id27" draw:end-glue-point="17" svg:d="M25417 8972v250" svg:viewBox="0 0 1 251">
            <text:p/>
          </draw:connector>
        </draw:g>
        <draw:g draw:style-name="gr3" xml:id="id33" draw:id="id3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6" draw:text-style-name="P7" xml:id="id28" draw:id="id28" draw:layer="layout" svg:width="4.128cm" svg:height="2cm" svg:x="18.779cm" svg:y="2.8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eb_service</text:span></text:p>
            <draw:enhanced-geometry svg:viewBox="0 0 21600 21600" draw:mirror-horizontal="false" draw:mirror-vertical="false" draw:type="rectangle" draw:enhanced-path="M 0 0 L 21600 0 21600 21600 0 21600 0 0 Z N"/>
          </draw:custom-shape>
          <draw:connector draw:style-name="gr47" draw:text-style-name="P8" draw:layer="layout" draw:type="line" svg:x1="22.437cm" svg:y1="3.134cm" svg:x2="22.437cm" svg:y2="3.384cm" draw:start-shape="id28" draw:start-glue-point="16" draw:end-shape="id28" draw:end-glue-point="17" svg:d="M22437 3134v250" svg:viewBox="0 0 1 251">
            <text:p/>
          </draw:connector>
        </draw:g>
        <draw:g draw:style-name="gr3" xml:id="id30" draw:id="id3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8" draw:text-style-name="P7" xml:id="id29" draw:id="id29" draw:layer="layout" svg:width="4.068cm" svg:height="2cm" svg:x="21.76cm" svg:y="12.28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fast_api.api_app</text:span></text:p>
            <draw:enhanced-geometry svg:viewBox="0 0 21600 21600" draw:type="rectangle" draw:enhanced-path="M 0 0 L 21600 0 21600 21600 0 21600 0 0 Z N"/>
          </draw:custom-shape>
          <draw:connector draw:style-name="gr49" draw:text-style-name="P8" draw:layer="layout" draw:type="line" svg:x1="25.358cm" svg:y1="12.559cm" svg:x2="25.358cm" svg:y2="12.809cm" draw:start-shape="id29" draw:start-glue-point="16" draw:end-shape="id29" draw:end-glue-point="17" svg:d="M25358 12559v250" svg:viewBox="0 0 1 251">
            <text:p/>
          </draw:connector>
        </draw:g>
        <draw:connector draw:style-name="gr50" draw:text-style-name="P9" xml:id="id32" draw:id="id32" draw:layer="layout" draw:type="line" svg:x1="25.014cm" svg:y1="12.282cm" svg:x2="24.438cm" svg:y2="11.679cm" draw:start-shape="id30" draw:start-glue-point="4" svg:d="M25014 12282l-576-603" svg:viewBox="0 0 577 604">
          <text:p/>
        </draw:connector>
        <draw:frame draw:style-name="gr51" draw:text-style-name="P2" draw:layer="layout" svg:width="2.222cm" svg:height="1.27cm" svg:x="22.078cm" svg:y="10.795cm">
          <draw:text-box>
            <text:p><text:span text:style-name="T1">ASGI</text:span></text:p>
            <text:p><text:span text:style-name="T1">interface</text:span></text:p>
          </draw:text-box>
        </draw:frame>
        <draw:connector draw:style-name="gr52" draw:text-style-name="P9" draw:layer="layout" draw:type="line" svg:x1="25.073cm" svg:y1="10.695cm" svg:x2="24.438cm" svg:y2="11.679cm" draw:start-shape="id31" draw:start-glue-point="13" draw:end-shape="id32" draw:end-glue-point="3" svg:d="M25073 10695l-635 984" svg:viewBox="0 0 636 985">
          <text:p/>
        </draw:connector>
        <draw:connector draw:style-name="gr53" draw:text-style-name="P15" draw:layer="layout" svg:x1="24.259cm" svg:y1="8.695cm" svg:x2="21.255cm" svg:y2="4.857cm" draw:start-shape="id31" draw:start-glue-point="5" draw:end-shape="id33" draw:end-glue-point="12" svg:d="M24259 8695v-1919h-3004v-1919" svg:viewBox="0 0 3005 3839">
          <text:p/>
        </draw:connector>
        <draw:g draw:style-name="gr3" xml:id="id37" draw:id="id3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54" draw:text-style-name="P7" xml:id="id34" draw:id="id34" draw:layer="layout" svg:width="4.068cm" svg:height="2cm" svg:x="11.219cm" svg:y="15.6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Browser</text:span></text:p>
            <draw:enhanced-geometry svg:viewBox="0 0 21600 21600" draw:type="rectangle" draw:enhanced-path="M 0 0 L 21600 0 21600 21600 0 21600 0 0 Z N"/>
          </draw:custom-shape>
          <draw:connector draw:style-name="gr55" draw:text-style-name="P8" draw:layer="layout" draw:type="line" svg:x1="14.817cm" svg:y1="15.974cm" svg:x2="14.817cm" svg:y2="16.224cm" draw:start-shape="id34" draw:start-glue-point="16" draw:end-shape="id34" draw:end-glue-point="17" svg:d="M14817 15974v250" svg:viewBox="0 0 1 251">
            <text:p/>
          </draw:connector>
        </draw:g>
        <draw:connector draw:style-name="gr56" draw:text-style-name="P9" draw:layer="layout" draw:type="line" svg:x1="7.667cm" svg:y1="10.465cm" svg:x2="9.075cm" svg:y2="10.092cm" draw:start-shape="id35" draw:start-glue-point="15" draw:end-shape="id36" draw:end-glue-point="3" svg:d="M7667 10465l1408-373" svg:viewBox="0 0 1409 374">
          <text:p/>
        </draw:connector>
        <draw:connector draw:style-name="gr57" draw:text-style-name="P9" xml:id="id42" draw:id="id42" draw:layer="layout" draw:type="line" svg:x1="11.219cm" svg:y1="17.197cm" svg:x2="9.499cm" svg:y2="17.338cm" draw:start-shape="id37" draw:start-glue-point="9" svg:d="M11219 17197l-1720 141" svg:viewBox="0 0 1721 142">
          <text:p/>
        </draw:connector>
        <draw:frame draw:style-name="gr2" draw:text-style-name="P2" draw:layer="layout" svg:width="2.222cm" svg:height="1.199cm" svg:x="8.303cm" svg:y="10.448cm">
          <draw:text-box>
            <text:p><text:span text:style-name="T1">TCP/IP-API</text:span></text:p>
          </draw:text-box>
        </draw:fram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58" draw:text-style-name="P3" draw:layer="layout" svg:width="14.287cm" svg:height="3.675cm" svg:x="1.635cm" svg:y="14.5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59" draw:text-style-name="P5" draw:layer="layout" svg:width="3.415cm" svg:height="0.779cm" svg:x="1.635cm" svg:y="14.557cm">
            <text:p text:style-name="P4"><text:span text:style-name="T2">Mobile Device</text:span></text:p>
            <draw:enhanced-geometry svg:viewBox="0 0 21600 21600" draw:type="non-primitve" draw:enhanced-path="M 0 0 L 21600 0 19000 21600 0 21600 0 0 Z N"/>
          </draw:custom-shape>
        </draw:g>
        <draw:g draw:style-name="gr3" xml:id="id41" draw:id="id4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0" draw:text-style-name="P7" xml:id="id38" draw:id="id38" draw:layer="layout" svg:width="4.068cm" svg:height="2cm" svg:x="3.54cm" svg:y="15.6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iFi Network</text:span></text:p>
            <draw:enhanced-geometry svg:viewBox="0 0 21600 21600" draw:type="rectangle" draw:enhanced-path="M 0 0 L 21600 0 21600 21600 0 21600 0 0 Z N"/>
          </draw:custom-shape>
          <draw:connector draw:style-name="gr61" draw:text-style-name="P8" draw:layer="layout" draw:type="line" svg:x1="7.138cm" svg:y1="15.974cm" svg:x2="7.138cm" svg:y2="16.224cm" draw:start-shape="id38" draw:start-glue-point="16" draw:end-shape="id38" draw:end-glue-point="17" svg:d="M7138 15974v250" svg:viewBox="0 0 1 251">
            <text:p/>
          </draw:connector>
        </draw:g>
        <draw:g draw:style-name="gr3" xml:id="id35" draw:id="id3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2" draw:text-style-name="P7" xml:id="id39" draw:id="id39" draw:layer="layout" svg:width="4.068cm" svg:height="2cm" svg:x="3.599cm" svg:y="9.96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iFi AccessPoint</text:span></text:p>
            <draw:enhanced-geometry svg:viewBox="0 0 21600 21600" draw:type="rectangle" draw:enhanced-path="M 0 0 L 21600 0 21600 21600 0 21600 0 0 Z N"/>
          </draw:custom-shape>
          <draw:connector draw:style-name="gr63" draw:text-style-name="P8" draw:layer="layout" draw:type="line" svg:x1="7.197cm" svg:y1="10.242cm" svg:x2="7.197cm" svg:y2="10.492cm" draw:start-shape="id39" draw:start-glue-point="16" draw:end-shape="id39" draw:end-glue-point="17" svg:d="M7197 10242v250" svg:viewBox="0 0 1 251">
            <text:p/>
          </draw:connector>
        </draw:g>
        <draw:connector draw:style-name="gr64" draw:text-style-name="P9" xml:id="id36" draw:id="id36" draw:layer="layout" draw:type="line" svg:x1="10.842cm" svg:y1="9.825cm" svg:x2="9.075cm" svg:y2="10.092cm" draw:start-shape="id25" draw:start-glue-point="9" svg:d="M10842 9825l-1767 267" svg:viewBox="0 0 1768 268">
          <text:p/>
        </draw:connector>
        <draw:connector draw:style-name="gr65" draw:text-style-name="P9" draw:layer="layout" draw:type="line" svg:x1="6.039cm" svg:y1="11.965cm" svg:x2="6.35cm" svg:y2="13.77cm" draw:start-shape="id35" draw:start-glue-point="12" draw:end-shape="id40" draw:end-glue-point="3" svg:d="M6039 11965l311 1805" svg:viewBox="0 0 312 1806">
          <text:p/>
        </draw:connector>
        <draw:connector draw:style-name="gr66" draw:text-style-name="P9" xml:id="id40" draw:id="id40" draw:layer="layout" draw:type="line" svg:x1="5.98cm" svg:y1="15.697cm" svg:x2="6.35cm" svg:y2="13.77cm" draw:start-shape="id41" draw:start-glue-point="5" svg:d="M5980 15697l370-1927" svg:viewBox="0 0 371 1928">
          <text:p/>
        </draw:connector>
        <draw:frame draw:style-name="gr22" draw:text-style-name="P2" draw:layer="layout" svg:width="2.222cm" svg:height="0.725cm" svg:x="7.032cm" svg:y="13.462cm">
          <draw:text-box>
            <text:p><text:span text:style-name="T1">TCP/IP</text:span></text:p>
          </draw:text-box>
        </draw:frame>
        <draw:connector draw:style-name="gr67" draw:text-style-name="P9" draw:layer="layout" draw:type="line" svg:x1="7.608cm" svg:y1="17.197cm" svg:x2="9.499cm" svg:y2="17.338cm" draw:start-shape="id41" draw:start-glue-point="14" draw:end-shape="id42" draw:end-glue-point="3" svg:d="M7608 17197l1891 141" svg:viewBox="0 0 1892 142">
          <text:p/>
        </draw:connector>
        <draw:frame draw:style-name="gr2" draw:text-style-name="P2" draw:layer="layout" svg:width="2.222cm" svg:height="1.199cm" svg:x="8.62cm" svg:y="15.692cm">
          <draw:text-box>
            <text:p><text:span text:style-name="T1">HTTP</text:span></text:p>
            <text:p><text:span text:style-name="T1">interface</text:span></text:p>
          </draw:text-box>
        </draw:fram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68" draw:text-style-name="P3" draw:layer="layout" svg:width="7.938cm" svg:height="7.42cm" svg:x="18.902cm" svg:y="7.4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69" draw:text-style-name="P5" draw:layer="layout" svg:width="4.685cm" svg:height="0.779cm" svg:x="18.902cm" svg:y="7.402cm">
            <text:p text:style-name="P4"><text:span text:style-name="T2">RaspiOS-UserSpace</text:span></text:p>
            <draw:enhanced-geometry svg:viewBox="0 0 21600 21600" draw:type="non-primitve" draw:enhanced-path="M 0 0 L 21600 0 19000 21600 0 21600 0 0 Z N"/>
          </draw:custom-shape>
        </draw:g>
        <draw:connector draw:style-name="gr70" draw:text-style-name="P9" xml:id="id26" draw:id="id26" draw:layer="layout" draw:type="line" svg:x1="21.819cm" svg:y1="10.195cm" svg:x2="17.024cm" svg:y2="10.039cm" draw:start-shape="id31" draw:start-glue-point="9" svg:d="M21819 10195l-4795-156" svg:viewBox="0 0 4796 157">
          <text:p/>
        </draw:connector>
        <draw:frame draw:style-name="gr2" draw:text-style-name="P2" draw:layer="layout" svg:width="2.222cm" svg:height="1.199cm" svg:x="16.828cm" svg:y="8.226cm">
          <draw:text-box>
            <text:p><text:span text:style-name="T1">socket-API</text:span></text:p>
          </draw:text-box>
        </draw:frame>
      </draw:page>
      <draw:page draw:name="GPIO" draw:style-name="dp1" draw:master-page-name="Default">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71" draw:text-style-name="P3" draw:layer="layout" svg:width="16.862cm" svg:height="4.048cm" svg:x="8.585cm" svg:y="7.7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72" draw:text-style-name="P5" draw:layer="layout" svg:width="1.814cm" svg:height="0.779cm" svg:x="8.585cm" svg:y="7.717cm">
            <text:p text:style-name="P4"><text:span text:style-name="T2">GPIO</text:span></text:p>
            <draw:enhanced-geometry svg:viewBox="0 0 21600 21600" draw:mirror-horizontal="false" draw:mirror-vertical="false" draw:type="non-primitve" draw:enhanced-path="M 0 0 L 21600 0 19000 21600 0 21600 0 0 Z N"/>
          </draw:custom-shape>
        </draw:g>
        <draw:g draw:style-name="gr3" xml:id="id51" draw:id="id5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73" draw:text-style-name="P7" xml:id="id43" draw:id="id43" draw:layer="layout" svg:width="4.128cm" svg:height="2cm" svg:x="15.26cm" svg:y="2.46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led_control</text:span></text:p>
            <draw:enhanced-geometry svg:viewBox="0 0 21600 21600" draw:type="rectangle" draw:enhanced-path="M 0 0 L 21600 0 21600 21600 0 21600 0 0 Z N"/>
          </draw:custom-shape>
          <draw:connector draw:style-name="gr74" draw:text-style-name="P8" draw:layer="layout" draw:type="line" svg:x1="18.918cm" svg:y1="2.744cm" svg:x2="18.918cm" svg:y2="2.994cm" draw:start-shape="id43" draw:start-glue-point="16" draw:end-shape="id43" draw:end-glue-point="17" svg:d="M18918 2744v250" svg:viewBox="0 0 1 251">
            <text:p/>
          </draw:connector>
        </draw:g>
        <draw:g draw:style-name="gr3" xml:id="id58" draw:id="id5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75" draw:text-style-name="P7" xml:id="id44" draw:id="id44" draw:layer="layout" svg:width="3.75cm" svg:height="2cm" svg:x="10.095cm" svg:y="14.7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light_sensor</text:span></text:p>
            <draw:enhanced-geometry svg:viewBox="0 0 21600 21600" draw:type="rectangle" draw:enhanced-path="M 0 0 L 21600 0 21600 21600 0 21600 0 0 Z N"/>
          </draw:custom-shape>
          <draw:connector draw:style-name="gr76" draw:text-style-name="P8" draw:layer="layout" draw:type="line" svg:x1="13.375cm" svg:y1="15.034cm" svg:x2="13.375cm" svg:y2="15.284cm" draw:start-shape="id44" draw:start-glue-point="16" draw:end-shape="id44" draw:end-glue-point="17" svg:d="M13375 15034v250" svg:viewBox="0 0 1 251">
            <text:p/>
          </draw:connector>
        </draw:g>
        <draw:g draw:style-name="gr3" xml:id="id60" draw:id="id6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77" draw:text-style-name="P7" xml:id="id45" draw:id="id45" draw:layer="layout" svg:width="3.75cm" svg:height="2cm" svg:x="14.317cm" svg:y="14.7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da_converter</text:span></text:p>
            <draw:enhanced-geometry svg:viewBox="0 0 21600 21600" draw:type="rectangle" draw:enhanced-path="M 0 0 L 21600 0 21600 21600 0 21600 0 0 Z N"/>
          </draw:custom-shape>
          <draw:connector draw:style-name="gr78" draw:text-style-name="P8" draw:layer="layout" draw:type="line" svg:x1="17.597cm" svg:y1="15.034cm" svg:x2="17.597cm" svg:y2="15.284cm" draw:start-shape="id45" draw:start-glue-point="16" draw:end-shape="id45" draw:end-glue-point="17" svg:d="M17597 15034v250" svg:viewBox="0 0 1 251">
            <text:p/>
          </draw:connector>
        </draw:g>
        <draw:g draw:style-name="gr3" xml:id="id56" draw:id="id5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79" draw:text-style-name="P7" xml:id="id46" draw:id="id46" draw:layer="layout" svg:width="3.75cm" svg:height="2cm" svg:x="9.692cm" svg:y="2.46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i2c_service</text:span></text:p>
            <draw:enhanced-geometry svg:viewBox="0 0 21600 21600" draw:type="rectangle" draw:enhanced-path="M 0 0 L 21600 0 21600 21600 0 21600 0 0 Z N"/>
          </draw:custom-shape>
          <draw:connector draw:style-name="gr80" draw:text-style-name="P8" draw:layer="layout" draw:type="line" svg:x1="12.972cm" svg:y1="2.739cm" svg:x2="12.972cm" svg:y2="2.989cm" draw:start-shape="id46" draw:start-glue-point="16" draw:end-shape="id46" draw:end-glue-point="17" svg:d="M12972 2739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1" draw:text-style-name="P7" xml:id="id47" draw:id="id47" draw:layer="layout" svg:width="4.068cm" svg:height="2cm" svg:x="18.145cm" svg:y="24.49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i2c_service</text:span></text:p>
            <draw:enhanced-geometry svg:viewBox="0 0 21600 21600" draw:type="rectangle" draw:enhanced-path="M 0 0 L 21600 0 21600 21600 0 21600 0 0 Z N"/>
          </draw:custom-shape>
          <draw:connector draw:style-name="gr82" draw:text-style-name="P8" draw:layer="layout" draw:type="line" svg:x1="21.743cm" svg:y1="24.772cm" svg:x2="21.743cm" svg:y2="25.022cm" draw:start-shape="id47" draw:start-glue-point="16" draw:end-shape="id47" draw:end-glue-point="17" svg:d="M21743 24772v250" svg:viewBox="0 0 1 251">
            <text:p/>
          </draw:connector>
        </draw:g>
        <draw:g draw:style-name="gr3">
          <draw:custom-shape draw:style-name="gr83" draw:text-style-name="P1" draw:layer="layout" svg:width="17.78cm" svg:height="3.7cm" svg:x="8.302cm" svg:y="1.427cm">
            <text:p/>
            <draw:enhanced-geometry svg:viewBox="0 0 21600 21600" draw:mirror-horizontal="false" draw:mirror-vertical="false" draw:type="rectangle" draw:enhanced-path="M 0 0 L 21600 0 21600 21600 0 21600 0 0 Z N"/>
          </draw:custom-shape>
          <draw:custom-shape draw:style-name="gr84" draw:text-style-name="P17" draw:layer="layout" svg:width="17.78cm" svg:height="0.727cm" svg:x="8.302cm" svg:y="0.7cm">
            <text:p text:style-name="P16"><text:span text:style-name="T5">Components Interface: GPIO</text:span></text:p>
            <draw:enhanced-geometry svg:viewBox="0 0 21600 21600" draw:type="rectangle" draw:enhanced-path="M 0 0 L 21600 0 21600 21600 0 21600 0 0 Z N"/>
          </draw:custom-shape>
        </draw:g>
        <draw:g draw:style-name="gr3" xml:id="id53" draw:id="id5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5" draw:text-style-name="P7" xml:id="id48" draw:id="id48" draw:layer="layout" svg:width="4.128cm" svg:height="2cm" svg:x="20.657cm" svg:y="2.56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touch_buttons</text:span></text:p>
            <draw:enhanced-geometry svg:viewBox="0 0 21600 21600" draw:type="rectangle" draw:enhanced-path="M 0 0 L 21600 0 21600 21600 0 21600 0 0 Z N"/>
          </draw:custom-shape>
          <draw:connector draw:style-name="gr86" draw:text-style-name="P8" draw:layer="layout" draw:type="line" svg:x1="24.315cm" svg:y1="2.844cm" svg:x2="24.315cm" svg:y2="3.094cm" draw:start-shape="id48" draw:start-glue-point="16" draw:end-shape="id48" draw:end-glue-point="17" svg:d="M24315 2844v250" svg:viewBox="0 0 1 251">
            <text:p/>
          </draw:connector>
        </draw:g>
        <draw:g draw:style-name="gr3" xml:id="id50" draw:id="id5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7" draw:text-style-name="P7" xml:id="id49" draw:id="id49" draw:layer="layout" svg:width="3.75cm" svg:height="2cm" svg:x="19.455cm" svg:y="8.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rpi.GPIO</text:span></text:p>
            <draw:enhanced-geometry svg:viewBox="0 0 21600 21600" draw:type="rectangle" draw:enhanced-path="M 0 0 L 21600 0 21600 21600 0 21600 0 0 Z N"/>
          </draw:custom-shape>
          <draw:connector draw:style-name="gr88" draw:text-style-name="P8" draw:layer="layout" draw:type="line" svg:x1="22.735cm" svg:y1="8.847cm" svg:x2="22.735cm" svg:y2="9.097cm" draw:start-shape="id49" draw:start-glue-point="16" draw:end-shape="id49" draw:end-glue-point="17" svg:d="M22735 8847v250" svg:viewBox="0 0 1 251">
            <text:p/>
          </draw:connector>
        </draw:g>
        <draw:connector draw:style-name="gr89" draw:text-style-name="P9" xml:id="id52" draw:id="id52" draw:layer="layout" draw:type="line" svg:x1="20.205cm" svg:y1="8.57cm" svg:x2="20.373cm" svg:y2="6.959cm" draw:start-shape="id50" draw:start-glue-point="7" svg:d="M20205 8570l168-1611" svg:viewBox="0 0 169 1612">
          <text:p/>
        </draw:connector>
        <draw:connector draw:style-name="gr90" draw:text-style-name="P9" draw:layer="layout" draw:type="line" svg:x1="16.912cm" svg:y1="4.467cm" svg:x2="20.373cm" svg:y2="6.959cm" draw:start-shape="id51" draw:start-glue-point="11" draw:end-shape="id52" draw:end-glue-point="3" svg:d="M16912 4467l3461 2492" svg:viewBox="0 0 3462 2493">
          <text:p/>
        </draw:connector>
        <draw:connector draw:style-name="gr91" draw:text-style-name="P9" draw:layer="layout" draw:type="line" svg:x1="21.483cm" svg:y1="4.567cm" svg:x2="20.373cm" svg:y2="6.959cm" draw:start-shape="id53" draw:start-glue-point="10" draw:end-shape="id52" draw:end-glue-point="3" svg:d="M21483 4567l-1110 2392" svg:viewBox="0 0 1111 2393">
          <text:p/>
        </draw:connector>
        <draw:frame draw:style-name="gr51" draw:text-style-name="P14" draw:layer="layout" svg:width="2.54cm" svg:height="1.27cm" svg:x="16.875cm" svg:y="6.08cm">
          <draw:text-box>
            <text:p><text:span text:style-name="T6">GPIO-</text:span></text:p>
            <text:p><text:span text:style-name="T6">API</text:span></text:p>
          </draw:text-box>
        </draw:frame>
        <draw:g draw:style-name="gr3" xml:id="id55" draw:id="id5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92" draw:text-style-name="P7" xml:id="id54" draw:id="id54" draw:layer="layout" svg:width="3.75cm" svg:height="2cm" svg:x="10.58cm" svg:y="8.65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SMBus</text:span></text:p>
            <draw:enhanced-geometry svg:viewBox="0 0 21600 21600" draw:type="rectangle" draw:enhanced-path="M 0 0 L 21600 0 21600 21600 0 21600 0 0 Z N"/>
          </draw:custom-shape>
          <draw:connector draw:style-name="gr93" draw:text-style-name="P8" draw:layer="layout" draw:type="line" svg:x1="13.86cm" svg:y1="8.935cm" svg:x2="13.86cm" svg:y2="9.185cm" draw:start-shape="id54" draw:start-glue-point="16" draw:end-shape="id54" draw:end-glue-point="17" svg:d="M13860 8935v250" svg:viewBox="0 0 1 251">
            <text:p/>
          </draw:connector>
        </draw:g>
        <draw:connector draw:style-name="gr94" draw:text-style-name="P9" xml:id="id57" draw:id="id57" draw:layer="layout" draw:type="line" svg:x1="12.83cm" svg:y1="8.658cm" svg:x2="12.145cm" svg:y2="6.716cm" draw:start-shape="id55" draw:start-glue-point="5" svg:d="M12830 8658l-685-1942" svg:viewBox="0 0 686 1943">
          <text:p/>
        </draw:connector>
        <draw:connector draw:style-name="gr95" draw:text-style-name="P9" draw:layer="layout" draw:type="line" svg:x1="11.942cm" svg:y1="4.462cm" svg:x2="12.145cm" svg:y2="6.716cm" draw:start-shape="id56" draw:start-glue-point="12" draw:end-shape="id57" draw:end-glue-point="3" svg:d="M11942 4462l203 2254" svg:viewBox="0 0 204 2255">
          <text:p/>
        </draw:connector>
        <draw:frame draw:style-name="gr96" draw:text-style-name="P14" draw:layer="layout" svg:width="2.54cm" svg:height="1.24cm" svg:x="9.255cm" svg:y="6.08cm">
          <draw:text-box>
            <text:p><text:span text:style-name="T6">SMBus-</text:span></text:p>
            <text:p><text:span text:style-name="T6">API</text:span></text:p>
          </draw:text-box>
        </draw:fram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97" draw:text-style-name="P3" draw:layer="layout" svg:width="19.367cm" svg:height="3.413cm" svg:x="8.62cm" svg:y="1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98" draw:text-style-name="P5" draw:layer="layout" svg:width="2.259cm" svg:height="0.779cm" svg:x="8.62cm" svg:y="13.7cm">
            <text:p text:style-name="P4"><text:span text:style-name="T2">Devices</text:span></text:p>
            <draw:enhanced-geometry svg:viewBox="0 0 21600 21600" draw:mirror-horizontal="false" draw:mirror-vertical="false" draw:type="non-primitve" draw:enhanced-path="M 0 0 L 21600 0 19000 21600 0 21600 0 0 Z N"/>
          </draw:custom-shape>
        </draw:g>
        <draw:connector draw:style-name="gr99" draw:text-style-name="P9" xml:id="id59" draw:id="id59" draw:layer="layout" draw:type="line" svg:x1="12.83cm" svg:y1="10.658cm" svg:x2="13.044cm" svg:y2="12.409cm" draw:start-shape="id55" draw:start-glue-point="12" svg:d="M12830 10658l214 1751" svg:viewBox="0 0 215 1752">
          <text:p/>
        </draw:connector>
        <draw:connector draw:style-name="gr100" draw:text-style-name="P9" draw:layer="layout" draw:type="line" svg:x1="11.595cm" svg:y1="14.757cm" svg:x2="13.044cm" svg:y2="12.409cm" draw:start-shape="id58" draw:start-glue-point="6" draw:end-shape="id59" draw:end-glue-point="3" svg:d="M11595 14757l1449-2348" svg:viewBox="0 0 1450 2349">
          <text:p/>
        </draw:connector>
        <draw:connector draw:style-name="gr101" draw:text-style-name="P9" draw:layer="layout" draw:type="line" svg:x1="15.067cm" svg:y1="14.757cm" svg:x2="13.044cm" svg:y2="12.409cm" draw:start-shape="id60" draw:start-glue-point="7" draw:end-shape="id59" draw:end-glue-point="3" svg:d="M15067 14757l-2023-2348" svg:viewBox="0 0 2024 2349">
          <text:p/>
        </draw:connector>
        <draw:frame draw:style-name="gr96" draw:text-style-name="P14" draw:layer="layout" svg:width="2.54cm" svg:height="1.24cm" svg:x="10.525cm" svg:y="12.112cm">
          <draw:text-box>
            <text:p><text:span text:style-name="T6">I2C</text:span></text:p>
            <text:p><text:span text:style-name="T6">interface</text:span></text:p>
          </draw:text-box>
        </draw:frame>
        <draw:g draw:style-name="gr3" xml:id="id63" draw:id="id6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02" draw:text-style-name="P7" xml:id="id61" draw:id="id61" draw:layer="layout" svg:width="3.75cm" svg:height="2cm" svg:x="18.78cm" svg:y="14.75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leds</text:span></text:p>
            <draw:enhanced-geometry svg:viewBox="0 0 21600 21600" draw:type="rectangle" draw:enhanced-path="M 0 0 L 21600 0 21600 21600 0 21600 0 0 Z N"/>
          </draw:custom-shape>
          <draw:connector draw:style-name="gr103" draw:text-style-name="P8" draw:layer="layout" draw:type="line" svg:x1="22.06cm" svg:y1="15.029cm" svg:x2="22.06cm" svg:y2="15.279cm" draw:start-shape="id61" draw:start-glue-point="16" draw:end-shape="id61" draw:end-glue-point="17" svg:d="M22060 15029v250" svg:viewBox="0 0 1 251">
            <text:p/>
          </draw:connector>
        </draw:g>
        <draw:g draw:style-name="gr3" xml:id="id65" draw:id="id6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04" draw:text-style-name="P7" xml:id="id62" draw:id="id62" draw:layer="layout" svg:width="3.75cm" svg:height="2cm" svg:x="23.225cm" svg:y="14.65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buttons</text:span></text:p>
            <draw:enhanced-geometry svg:viewBox="0 0 21600 21600" draw:type="rectangle" draw:enhanced-path="M 0 0 L 21600 0 21600 21600 0 21600 0 0 Z N"/>
          </draw:custom-shape>
          <draw:connector draw:style-name="gr105" draw:text-style-name="P8" draw:layer="layout" draw:type="line" svg:x1="26.505cm" svg:y1="14.929cm" svg:x2="26.505cm" svg:y2="15.179cm" draw:start-shape="id62" draw:start-glue-point="16" draw:end-shape="id62" draw:end-glue-point="17" svg:d="M26505 14929v250" svg:viewBox="0 0 1 251">
            <text:p/>
          </draw:connector>
        </draw:g>
        <draw:connector draw:style-name="gr106" draw:text-style-name="P9" xml:id="id64" draw:id="id64" draw:layer="layout" draw:type="line" svg:x1="20.28cm" svg:y1="14.752cm" svg:x2="20.691cm" svg:y2="12.832cm" draw:start-shape="id63" draw:start-glue-point="6" svg:d="M20280 14752l411-1920" svg:viewBox="0 0 412 1921">
          <text:p/>
        </draw:connector>
        <draw:connector draw:style-name="gr107" draw:text-style-name="P9" xml:id="id66" draw:id="id66" draw:layer="layout" draw:type="line" svg:x1="22.455cm" svg:y1="10.57cm" svg:x2="23.416cm" svg:y2="12.832cm" draw:start-shape="id50" draw:start-glue-point="13" svg:d="M22455 10570l961 2262" svg:viewBox="0 0 962 2263">
          <text:p/>
        </draw:connector>
        <draw:connector draw:style-name="gr108" draw:text-style-name="P9" draw:layer="layout" draw:type="line" svg:x1="20.955cm" svg:y1="10.57cm" svg:x2="20.691cm" svg:y2="12.832cm" draw:start-shape="id50" draw:start-glue-point="11" draw:end-shape="id64" draw:end-glue-point="3" svg:d="M20955 10570l-264 2262" svg:viewBox="0 0 265 2263">
          <text:p/>
        </draw:connector>
        <draw:connector draw:style-name="gr109" draw:text-style-name="P9" draw:layer="layout" draw:type="line" svg:x1="25.475cm" svg:y1="14.652cm" svg:x2="23.416cm" svg:y2="12.832cm" draw:start-shape="id65" draw:start-glue-point="5" draw:end-shape="id66" draw:end-glue-point="3" svg:d="M25475 14652l-2059-1820" svg:viewBox="0 0 2060 1821">
          <text:p/>
        </draw:connector>
        <draw:frame draw:style-name="gr2" draw:text-style-name="P14" draw:layer="layout" svg:width="2.54cm" svg:height="1.199cm" svg:x="24.177cm" svg:y="12.112cm">
          <draw:text-box>
            <text:p><text:span text:style-name="T6">PIN</text:span></text:p>
            <text:p><text:span text:style-name="T6">Input</text:span></text:p>
          </draw:text-box>
        </draw:frame>
        <draw:frame draw:style-name="gr51" draw:text-style-name="P14" draw:layer="layout" svg:width="2.54cm" svg:height="1.27cm" svg:x="18.21cm" svg:y="12.112cm">
          <draw:text-box>
            <text:p><text:span text:style-name="T6">PIN</text:span></text:p>
            <text:p><text:span text:style-name="T6">Outputs</text:span></text:p>
          </draw:text-box>
        </draw:frame>
      </draw:page>
      <draw:page draw:name="Music Players" draw:style-name="dp1" draw:master-page-name="Default">
        <draw:custom-shape draw:style-name="gr110" draw:text-style-name="P1" draw:layer="layout" svg:width="12.778cm" svg:height="6.35cm" svg:x="15.922cm" svg:y="1.635cm">
          <text:p/>
          <draw:enhanced-geometry svg:viewBox="0 0 21600 21600" draw:mirror-horizontal="false" draw:mirror-vertical="false" draw:type="rectangle" draw:enhanced-path="M 0 0 L 21600 0 21600 21600 0 21600 0 0 Z N"/>
        </draw:custom-shap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111" draw:text-style-name="P3" draw:layer="layout" svg:width="11.508cm" svg:height="8.697cm" svg:x="17.192cm" svg:y="1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12" draw:text-style-name="P5" draw:layer="layout" svg:width="4.685cm" svg:height="0.779cm" svg:x="17.192cm" svg:y="10.4cm">
            <text:p text:style-name="P4"><text:span text:style-name="T2">RaspiOS-UserSpace</text:span></text:p>
            <draw:enhanced-geometry svg:viewBox="0 0 21600 21600" draw:type="non-primitve" draw:enhanced-path="M 0 0 L 21600 0 19000 21600 0 21600 0 0 Z N"/>
          </draw:custom-shape>
        </draw:g>
        <draw:g draw:style-name="gr3" xml:id="id69" draw:id="id6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13" draw:text-style-name="P7" xml:id="id67" draw:id="id67" draw:layer="layout" svg:width="3.523cm" svg:height="2cm" svg:x="24.147cm" svg:y="12.30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MPD server</text:span></text:p>
            <draw:enhanced-geometry svg:viewBox="0 0 21600 21600" draw:type="rectangle" draw:enhanced-path="M 0 0 L 21600 0 21600 21600 0 21600 0 0 Z N"/>
          </draw:custom-shape>
          <draw:connector draw:style-name="gr114" draw:text-style-name="P8" draw:layer="layout" draw:type="line" svg:x1="27.2cm" svg:y1="12.582cm" svg:x2="27.2cm" svg:y2="12.832cm" draw:start-shape="id67" draw:start-glue-point="16" draw:end-shape="id67" draw:end-glue-point="17" svg:d="M27200 12582v250" svg:viewBox="0 0 1 251">
            <text:p/>
          </draw:connector>
        </draw:g>
        <draw:g draw:style-name="gr3" xml:id="id71" draw:id="id7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15" draw:text-style-name="P7" xml:id="id68" draw:id="id68" draw:layer="layout" svg:width="4.128cm" svg:height="2cm" svg:x="22.437cm" svg:y="2.4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mpd_control</text:span></text:p>
            <draw:enhanced-geometry svg:viewBox="0 0 21600 21600" draw:type="rectangle" draw:enhanced-path="M 0 0 L 21600 0 21600 21600 0 21600 0 0 Z N"/>
          </draw:custom-shape>
          <draw:connector draw:style-name="gr116" draw:text-style-name="P8" draw:layer="layout" draw:type="line" svg:x1="26.095cm" svg:y1="2.687cm" svg:x2="26.095cm" svg:y2="2.937cm" draw:start-shape="id68" draw:start-glue-point="16" draw:end-shape="id68" draw:end-glue-point="17" svg:d="M26095 2687v250" svg:viewBox="0 0 1 251">
            <text:p/>
          </draw:connector>
        </draw:g>
        <draw:frame draw:style-name="gr2" draw:text-style-name="P2" draw:layer="layout" svg:width="2.222cm" svg:height="1.199cm" svg:x="26.7cm" svg:y="8.812cm">
          <draw:text-box>
            <text:p><text:span text:style-name="T1">event </text:span></text:p>
            <text:p><text:span text:style-name="T1">interface</text:span></text:p>
          </draw:text-box>
        </draw:frame>
        <draw:frame draw:style-name="gr51" draw:text-style-name="P2" draw:layer="layout" svg:width="2.54cm" svg:height="1.27cm" svg:x="24.177cm" svg:y="9.13cm">
          <draw:text-box>
            <text:p><text:span text:style-name="T1">playback </text:span></text:p>
            <text:p><text:span text:style-name="T1">interface</text:span></text:p>
          </draw:text-box>
        </draw:frame>
        <draw:connector draw:style-name="gr117" draw:text-style-name="P9" xml:id="id72" draw:id="id72" draw:layer="layout" draw:type="line" svg:x1="24.852cm" svg:y1="12.305cm" svg:x2="24.05cm" svg:y2="9.4cm" draw:start-shape="id69" draw:start-glue-point="7" svg:d="M24852 12305l-802-2905" svg:viewBox="0 0 803 2906">
          <text:p/>
        </draw:connector>
        <draw:connector draw:style-name="gr118" draw:text-style-name="P9" xml:id="id74" draw:id="id74" draw:layer="layout" draw:type="line" svg:x1="26.964cm" svg:y1="12.305cm" svg:x2="26.538cm" svg:y2="8.897cm" draw:start-shape="id69" draw:start-glue-point="4" svg:d="M26964 12305l-426-3408" svg:viewBox="0 0 427 3409">
          <text:p/>
        </draw:connector>
        <draw:g draw:style-name="gr3" xml:id="id73" draw:id="id7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19" draw:text-style-name="P7" xml:id="id70" draw:id="id70" draw:layer="layout" svg:width="4.128cm" svg:height="2cm" svg:x="24.03cm" svg:y="5.25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mpd_monitor</text:span></text:p>
            <draw:enhanced-geometry svg:viewBox="0 0 21600 21600" draw:type="rectangle" draw:enhanced-path="M 0 0 L 21600 0 21600 21600 0 21600 0 0 Z N"/>
          </draw:custom-shape>
          <draw:connector draw:style-name="gr120" draw:text-style-name="P8" draw:layer="layout" draw:type="line" svg:x1="27.688cm" svg:y1="5.532cm" svg:x2="27.688cm" svg:y2="5.782cm" draw:start-shape="id70" draw:start-glue-point="16" draw:end-shape="id70" draw:end-glue-point="17" svg:d="M27688 5532v250" svg:viewBox="0 0 1 251">
            <text:p/>
          </draw:connector>
        </draw:g>
        <draw:connector draw:style-name="gr121" draw:text-style-name="P9" draw:layer="layout" draw:type="line" svg:x1="23.263cm" svg:y1="4.41cm" svg:x2="24.05cm" svg:y2="9.4cm" draw:start-shape="id71" draw:start-glue-point="10" draw:end-shape="id72" draw:end-glue-point="3" svg:d="M23263 4410l787 4990" svg:viewBox="0 0 788 4991">
          <text:p/>
        </draw:connector>
        <draw:connector draw:style-name="gr122" draw:text-style-name="P9" draw:layer="layout" draw:type="line" svg:x1="25.682cm" svg:y1="7.255cm" svg:x2="26.538cm" svg:y2="8.897cm" draw:start-shape="id73" draw:start-glue-point="11" draw:end-shape="id74" draw:end-glue-point="3" svg:d="M25682 7255l856 1642" svg:viewBox="0 0 857 1643">
          <text:p/>
        </draw:connector>
        <draw:custom-shape draw:style-name="gr123" draw:text-style-name="P17" draw:layer="layout" svg:width="12.778cm" svg:height="0.952cm" svg:x="15.922cm" svg:y="0.7cm">
          <text:p text:style-name="P16"><text:span text:style-name="T5">Components Interface: Music Players</text:span></text:p>
          <draw:enhanced-geometry svg:viewBox="0 0 21600 21600" draw:type="rectangle" draw:enhanced-path="M 0 0 L 21600 0 21600 21600 0 21600 0 0 Z N"/>
        </draw:custom-shap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124" draw:text-style-name="P3" draw:layer="layout" svg:width="12.764cm" svg:height="5.08cm" svg:x="1.788cm" svg:y="10.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25" draw:text-style-name="P5" draw:layer="layout" svg:width="3.741cm" svg:height="0.779cm" svg:x="1.788cm" svg:y="10.525cm">
            <text:p text:style-name="P4"><text:span text:style-name="T2">RaspiOS-kernel</text:span></text:p>
            <draw:enhanced-geometry svg:viewBox="0 0 21600 21600" draw:type="non-primitve" draw:enhanced-path="M 0 0 L 21600 0 19000 21600 0 21600 0 0 Z N"/>
          </draw:custom-shape>
        </draw:g>
        <draw:g draw:style-name="gr3" xml:id="id76" draw:id="id7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6" draw:text-style-name="P7" xml:id="id75" draw:id="id75" draw:layer="layout" svg:width="3.81cm" svg:height="1.805cm" svg:x="9.795cm" svg:y="10.999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BSD socket</text:span></text:p>
            <draw:enhanced-geometry svg:viewBox="0 0 21600 21600" draw:type="rectangle" draw:enhanced-path="M 0 0 L 21600 0 21600 21600 0 21600 0 0 Z N"/>
          </draw:custom-shape>
          <draw:connector draw:style-name="gr127" draw:text-style-name="P8" draw:layer="layout" draw:type="line" svg:x1="13.135cm" svg:y1="11.276cm" svg:x2="13.135cm" svg:y2="11.526cm" draw:start-shape="id75" draw:start-glue-point="16" draw:end-shape="id75" draw:end-glue-point="17" svg:d="M13135 11276v250" svg:viewBox="0 0 1 251">
            <text:p/>
          </draw:connector>
        </draw:g>
        <draw:connector draw:style-name="gr128" draw:text-style-name="P9" xml:id="id85" draw:id="id85" draw:layer="layout" draw:type="line" svg:x1="13.605cm" svg:y1="12.352cm" svg:x2="15.663cm" svg:y2="11.801cm" draw:start-shape="id76" draw:start-glue-point="14" svg:d="M13605 12352l2058-551" svg:viewBox="0 0 2059 552">
          <text:p/>
        </draw:connector>
        <draw:connector draw:style-name="gr129" draw:text-style-name="P9" xml:id="id79" draw:id="id79" draw:layer="layout" draw:type="line" svg:x1="6.52cm" svg:y1="13.292cm" svg:x2="8.069cm" svg:y2="12.541cm" draw:start-shape="id77" draw:start-glue-point="14" svg:d="M6520 13292l1549-751" svg:viewBox="0 0 1550 752">
          <text:p/>
        </draw:connector>
        <draw:frame draw:style-name="gr2" draw:text-style-name="P2" draw:layer="layout" svg:width="2.222cm" svg:height="1.199cm" svg:x="7.033cm" svg:y="13.382cm">
          <draw:text-box>
            <text:p><text:span text:style-name="T1">TCP/IP-API</text:span></text:p>
          </draw:text-box>
        </draw:frame>
        <draw:g draw:style-name="gr3" xml:id="id77" draw:id="id7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30" draw:text-style-name="P7" xml:id="id78" draw:id="id78" draw:layer="layout" svg:width="4.068cm" svg:height="2cm" svg:x="2.452cm" svg:y="11.79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iFi network</text:span></text:p>
            <draw:enhanced-geometry svg:viewBox="0 0 21600 21600" draw:type="rectangle" draw:enhanced-path="M 0 0 L 21600 0 21600 21600 0 21600 0 0 Z N"/>
          </draw:custom-shape>
          <draw:connector draw:style-name="gr131" draw:text-style-name="P8" draw:layer="layout" draw:type="line" svg:x1="6.05cm" svg:y1="12.069cm" svg:x2="6.05cm" svg:y2="12.319cm" draw:start-shape="id78" draw:start-glue-point="16" draw:end-shape="id78" draw:end-glue-point="17" svg:d="M6050 12069v250" svg:viewBox="0 0 1 251">
            <text:p/>
          </draw:connector>
        </draw:g>
        <draw:connector draw:style-name="gr132" draw:text-style-name="P9" draw:layer="layout" draw:type="line" svg:x1="9.795cm" svg:y1="12.352cm" svg:x2="8.069cm" svg:y2="12.541cm" draw:start-shape="id76" draw:start-glue-point="9" draw:end-shape="id79" draw:end-glue-point="3" svg:d="M9795 12352l-1726 189" svg:viewBox="0 0 1727 190">
          <text:p/>
        </draw:connector>
        <draw:g draw:style-name="gr3" xml:id="id84" draw:id="id8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33" draw:text-style-name="P7" xml:id="id80" draw:id="id80" draw:layer="layout" svg:width="3.523cm" svg:height="2cm" svg:x="19.049cm" svg:y="11.59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librespot</text:span></text:p>
            <draw:enhanced-geometry svg:viewBox="0 0 21600 21600" draw:type="rectangle" draw:enhanced-path="M 0 0 L 21600 0 21600 21600 0 21600 0 0 Z N"/>
          </draw:custom-shape>
          <draw:connector draw:style-name="gr134" draw:text-style-name="P8" draw:layer="layout" draw:type="line" svg:x1="22.102cm" svg:y1="11.869cm" svg:x2="22.102cm" svg:y2="12.119cm" draw:start-shape="id80" draw:start-glue-point="16" draw:end-shape="id80" draw:end-glue-point="17" svg:d="M22102 11869v250" svg:viewBox="0 0 1 251">
            <text:p/>
          </draw:connector>
        </draw:g>
        <draw:connector draw:style-name="gr135" draw:text-style-name="P9" draw:layer="layout" draw:type="line" svg:x1="24.147cm" svg:y1="13.805cm" svg:x2="15.901cm" svg:y2="14.658cm" draw:start-shape="id69" draw:start-glue-point="9" draw:end-shape="id81" draw:end-glue-point="3" svg:d="M24147 13805l-8246 853" svg:viewBox="0 0 8247 854">
          <text:p/>
        </draw:connector>
        <draw:g draw:style-name="gr3" xml:id="id83" draw:id="id8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36" draw:text-style-name="P7" xml:id="id82" draw:id="id82" draw:layer="layout" svg:width="3.81cm" svg:height="1.805cm" svg:x="9.86cm" svg:y="13.3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BSD socket</text:span></text:p>
            <draw:enhanced-geometry svg:viewBox="0 0 21600 21600" draw:type="rectangle" draw:enhanced-path="M 0 0 L 21600 0 21600 21600 0 21600 0 0 Z N"/>
          </draw:custom-shape>
          <draw:connector draw:style-name="gr137" draw:text-style-name="P8" draw:layer="layout" draw:type="line" svg:x1="13.2cm" svg:y1="13.634cm" svg:x2="13.2cm" svg:y2="13.884cm" draw:start-shape="id82" draw:start-glue-point="16" draw:end-shape="id82" draw:end-glue-point="17" svg:d="M13200 13634v250" svg:viewBox="0 0 1 251">
            <text:p/>
          </draw:connector>
        </draw:g>
        <draw:connector draw:style-name="gr138" draw:text-style-name="P9" xml:id="id81" draw:id="id81" draw:layer="layout" draw:type="line" svg:x1="13.67cm" svg:y1="14.71cm" svg:x2="15.901cm" svg:y2="14.658cm" draw:start-shape="id83" draw:start-glue-point="14" svg:d="M13670 14710l2231-52" svg:viewBox="0 0 2232 53">
          <text:p/>
        </draw:connector>
        <draw:connector draw:style-name="gr139" draw:text-style-name="P9" draw:layer="layout" draw:type="line" svg:x1="19.049cm" svg:y1="12.092cm" svg:x2="15.663cm" svg:y2="11.801cm" draw:start-shape="id84" draw:start-glue-point="8" draw:end-shape="id85" draw:end-glue-point="3" svg:d="M19049 12092l-3386-291" svg:viewBox="0 0 3387 292">
          <text:p/>
        </draw:connector>
        <draw:connector draw:style-name="gr140" draw:text-style-name="P9" draw:layer="layout" draw:type="line" svg:x1="9.86cm" svg:y1="13.808cm" svg:x2="8.069cm" svg:y2="12.541cm" draw:start-shape="id83" draw:start-glue-point="8" draw:end-shape="id79" draw:end-glue-point="3" svg:d="M9860 13808l-1791-1267" svg:viewBox="0 0 1792 1268">
          <text:p/>
        </draw:connector>
        <draw:frame draw:style-name="gr2" draw:text-style-name="P2" draw:layer="layout" svg:width="2.222cm" svg:height="1.199cm" svg:x="14.97cm" svg:y="12.43cm">
          <draw:text-box>
            <text:p><text:span text:style-name="T1">socket-API</text:span></text:p>
          </draw:text-box>
        </draw:frame>
        <draw:g draw:style-name="gr3" xml:id="id87" draw:id="id8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41" draw:text-style-name="P7" xml:id="id86" draw:id="id86" draw:layer="layout" svg:width="4.128cm" svg:height="2cm" svg:x="17.257cm" svg:y="2.4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spotify_connect</text:span></text:p>
            <draw:enhanced-geometry svg:viewBox="0 0 21600 21600" draw:type="rectangle" draw:enhanced-path="M 0 0 L 21600 0 21600 21600 0 21600 0 0 Z N"/>
          </draw:custom-shape>
          <draw:connector draw:style-name="gr142" draw:text-style-name="P8" draw:layer="layout" draw:type="line" svg:x1="20.915cm" svg:y1="2.727cm" svg:x2="20.915cm" svg:y2="2.977cm" draw:start-shape="id86" draw:start-glue-point="16" draw:end-shape="id86" draw:end-glue-point="17" svg:d="M20915 2727v250" svg:viewBox="0 0 1 251">
            <text:p/>
          </draw:connector>
        </draw:g>
        <draw:connector draw:style-name="gr143" draw:text-style-name="P9" xml:id="id88" draw:id="id88" draw:layer="layout" draw:type="line" svg:x1="21.866cm" svg:y1="11.592cm" svg:x2="22.622cm" svg:y2="9.506cm" draw:start-shape="id84" draw:start-glue-point="4" svg:d="M21866 11592l756-2086" svg:viewBox="0 0 757 2087">
          <text:p/>
        </draw:connector>
        <draw:connector draw:style-name="gr144" draw:text-style-name="P9" draw:layer="layout" draw:type="line" svg:x1="19.733cm" svg:y1="4.45cm" svg:x2="22.622cm" svg:y2="9.506cm" draw:start-shape="id87" draw:start-glue-point="12" draw:end-shape="id88" draw:end-glue-point="3" svg:d="M19733 4450l2889 5056" svg:viewBox="0 0 2890 5057">
          <text:p/>
        </draw:connector>
        <draw:g draw:style-name="gr3" xml:id="id93" draw:id="id9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45" draw:text-style-name="P7" xml:id="id89" draw:id="id89" draw:layer="layout" svg:width="3.433cm" svg:height="2cm" svg:x="20.062cm" svg:y="16.2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libasound</text:span></text:p>
            <draw:enhanced-geometry svg:viewBox="0 0 21600 21600" draw:type="rectangle" draw:enhanced-path="M 0 0 L 21600 0 21600 21600 0 21600 0 0 Z N"/>
          </draw:custom-shape>
          <draw:connector draw:style-name="gr146" draw:text-style-name="P8" draw:layer="layout" draw:type="line" svg:x1="23.025cm" svg:y1="16.557cm" svg:x2="23.025cm" svg:y2="16.807cm" draw:start-shape="id89" draw:start-glue-point="16" draw:end-shape="id89" draw:end-glue-point="17" svg:d="M23025 16557v250" svg:viewBox="0 0 1 251">
            <text:p/>
          </draw:connector>
        </draw:g>
        <draw:g draw:style-name="gr3" xml:id="id91" draw:id="id9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47" draw:text-style-name="P7" xml:id="id90" draw:id="id90" draw:layer="layout" svg:width="3.433cm" svg:height="2cm" svg:x="9.402cm" svg:y="16.5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sound device</text:span></text:p>
            <draw:enhanced-geometry svg:viewBox="0 0 21600 21600" draw:mirror-horizontal="false" draw:mirror-vertical="false" draw:type="rectangle" draw:enhanced-path="M 0 0 L 21600 0 21600 21600 0 21600 0 0 Z N"/>
          </draw:custom-shape>
          <draw:connector draw:style-name="gr148" draw:text-style-name="P8" draw:layer="layout" draw:type="line" svg:x1="12.365cm" svg:y1="16.834cm" svg:x2="12.365cm" svg:y2="17.084cm" draw:start-shape="id90" draw:start-glue-point="16" draw:end-shape="id90" draw:end-glue-point="17" svg:d="M12365 16834v250" svg:viewBox="0 0 1 251">
            <text:p/>
          </draw:connector>
        </draw:g>
        <draw:connector draw:style-name="gr149" draw:text-style-name="P9" draw:layer="layout" draw:type="line" svg:x1="12.834cm" svg:y1="18.057cm" svg:x2="13.837cm" svg:y2="17.992cm" draw:start-shape="id91" draw:start-glue-point="14" draw:end-shape="id92" draw:end-glue-point="3" svg:d="M12834 18057l1003-65" svg:viewBox="0 0 1004 66">
          <text:p/>
        </draw:connector>
        <draw:frame draw:style-name="gr22" draw:text-style-name="P2" draw:layer="layout" svg:width="3.175cm" svg:height="0.725cm" svg:x="23.46cm" svg:y="15.287cm">
          <draw:text-box>
            <text:p><text:span text:style-name="T1">PCM frames</text:span></text:p>
          </draw:text-box>
        </draw:frame>
        <draw:connector draw:style-name="gr150" draw:text-style-name="P9" xml:id="id92" draw:id="id92" draw:layer="layout" draw:type="line" svg:x1="20.062cm" svg:y1="17.78cm" svg:x2="13.837cm" svg:y2="17.992cm" draw:start-shape="id93" draw:start-glue-point="9" svg:d="M20062 17780l-6225 212" svg:viewBox="0 0 6226 213">
          <text:p/>
        </draw:connector>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151" draw:text-style-name="P3" draw:layer="layout" svg:width="7.537cm" svg:height="3.225cm" svg:x="7.032cm" svg:y="16.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52" draw:text-style-name="P5" draw:layer="layout" svg:width="2.259cm" svg:height="0.779cm" svg:x="7.032cm" svg:y="16.19cm">
            <text:p text:style-name="P4"><text:span text:style-name="T2">Devices</text:span></text:p>
            <draw:enhanced-geometry svg:viewBox="0 0 21600 21600" draw:type="non-primitve" draw:enhanced-path="M 0 0 L 21600 0 19000 21600 0 21600 0 0 Z N"/>
          </draw:custom-shape>
        </draw:g>
        <draw:frame draw:style-name="gr153" draw:text-style-name="P2" draw:layer="layout" svg:width="2.857cm" svg:height="1.358cm" svg:x="14.652cm" svg:y="16.787cm">
          <draw:text-box>
            <text:p><text:span text:style-name="T1">PCM over</text:span></text:p>
            <text:p><text:span text:style-name="T1">I2S-bus</text:span></text:p>
          </draw:text-box>
        </draw:frame>
        <draw:connector draw:style-name="gr154" draw:text-style-name="P9" xml:id="id94" draw:id="id94" draw:layer="layout" draw:type="line" svg:x1="22.807cm" svg:y1="16.28cm" svg:x2="22.728cm" svg:y2="15.663cm" draw:start-shape="id93" draw:start-glue-point="4" svg:d="M22807 16280l-79-617" svg:viewBox="0 0 80 618">
          <text:p/>
        </draw:connector>
        <draw:connector draw:style-name="gr155" draw:text-style-name="P9" draw:layer="layout" draw:type="line" svg:x1="21.162cm" svg:y1="13.592cm" svg:x2="22.728cm" svg:y2="15.663cm" draw:start-shape="id84" draw:start-glue-point="12" draw:end-shape="id94" draw:end-glue-point="3" svg:d="M21162 13592l1566 2071" svg:viewBox="0 0 1567 2072">
          <text:p/>
        </draw:connector>
        <draw:connector draw:style-name="gr156" draw:text-style-name="P9" draw:layer="layout" draw:type="line" svg:x1="24.852cm" svg:y1="14.305cm" svg:x2="22.728cm" svg:y2="15.663cm" draw:start-shape="id69" draw:start-glue-point="10" draw:end-shape="id94" draw:end-glue-point="3" svg:d="M24852 14305l-2124 1358" svg:viewBox="0 0 2125 1359">
          <text:p/>
        </draw:connector>
        <draw:g draw:style-name="gr3" xml:id="id96" draw:id="id9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57" draw:text-style-name="P7" xml:id="id95" draw:id="id95" draw:layer="layout" svg:width="4.068cm" svg:height="2cm" svg:x="9.902cm" svg:y="6.5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Browser/</text:span></text:p>
            <text:p text:style-name="P6"><text:span text:style-name="T3">App</text:span></text:p>
            <draw:enhanced-geometry svg:viewBox="0 0 21600 21600" draw:type="rectangle" draw:enhanced-path="M 0 0 L 21600 0 21600 21600 0 21600 0 0 Z N"/>
          </draw:custom-shape>
          <draw:connector draw:style-name="gr158" draw:text-style-name="P8" draw:layer="layout" draw:type="line" svg:x1="13.5cm" svg:y1="6.874cm" svg:x2="13.5cm" svg:y2="7.124cm" draw:start-shape="id95" draw:start-glue-point="16" draw:end-shape="id95" draw:end-glue-point="17" svg:d="M13500 6874v250" svg:viewBox="0 0 1 251">
            <text:p/>
          </draw:connector>
        </draw:g>
        <draw:connector draw:style-name="gr159" draw:text-style-name="P9" draw:layer="layout" draw:type="line" svg:x1="9.902cm" svg:y1="8.097cm" svg:x2="8.096cm" svg:y2="7.726cm" draw:start-shape="id96" draw:start-glue-point="9" draw:end-shape="id97" draw:end-glue-point="3" svg:d="M9902 8097l-1806-371" svg:viewBox="0 0 1807 372">
          <text:p/>
        </draw:connector>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160" draw:text-style-name="P3" draw:layer="layout" svg:width="12.97cm" svg:height="5.275cm" svg:x="1.635cm" svg:y="3.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61" draw:text-style-name="P5" draw:layer="layout" svg:width="3.415cm" svg:height="0.779cm" svg:x="1.635cm" svg:y="3.857cm">
            <text:p text:style-name="P4"><text:span text:style-name="T2">Mobile Device</text:span></text:p>
            <draw:enhanced-geometry svg:viewBox="0 0 21600 21600" draw:type="non-primitve" draw:enhanced-path="M 0 0 L 21600 0 19000 21600 0 21600 0 0 Z N"/>
          </draw:custom-shape>
        </draw:g>
        <draw:g draw:style-name="gr3" xml:id="id99" draw:id="id9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2" draw:text-style-name="P7" xml:id="id98" draw:id="id98" draw:layer="layout" svg:width="4.068cm" svg:height="2cm" svg:x="2.223cm" svg:y="5.6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iFi Network</text:span></text:p>
            <draw:enhanced-geometry svg:viewBox="0 0 21600 21600" draw:type="rectangle" draw:enhanced-path="M 0 0 L 21600 0 21600 21600 0 21600 0 0 Z N"/>
          </draw:custom-shape>
          <draw:connector draw:style-name="gr163" draw:text-style-name="P8" draw:layer="layout" draw:type="line" svg:x1="5.821cm" svg:y1="5.974cm" svg:x2="5.821cm" svg:y2="6.224cm" draw:start-shape="id98" draw:start-glue-point="16" draw:end-shape="id98" draw:end-glue-point="17" svg:d="M5821 5974v250" svg:viewBox="0 0 1 251">
            <text:p/>
          </draw:connector>
        </draw:g>
        <draw:connector draw:style-name="gr164" draw:text-style-name="P9" xml:id="id97" draw:id="id97" draw:layer="layout" draw:type="line" svg:x1="6.291cm" svg:y1="7.197cm" svg:x2="8.096cm" svg:y2="7.726cm" draw:start-shape="id99" draw:start-glue-point="14" svg:d="M6291 7197l1805 529" svg:viewBox="0 0 1806 530">
          <text:p/>
        </draw:connector>
        <draw:frame draw:style-name="gr51" draw:text-style-name="P2" draw:layer="layout" svg:width="2.222cm" svg:height="1.27cm" svg:x="6.715cm" svg:y="5.892cm">
          <draw:text-box>
            <text:p><text:span text:style-name="T1">HTTP</text:span></text:p>
            <text:p><text:span text:style-name="T1">interface</text:span></text:p>
          </draw:text-box>
        </draw:frame>
        <draw:g draw:style-name="gr3" xml:id="id101" draw:id="id10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5" draw:text-style-name="P7" xml:id="id100" draw:id="id100" draw:layer="layout" svg:width="4.068cm" svg:height="2cm" svg:x="9.632cm" svg:y="4.17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SpotifyApp</text:span></text:p>
            <draw:enhanced-geometry svg:viewBox="0 0 21600 21600" draw:type="rectangle" draw:enhanced-path="M 0 0 L 21600 0 21600 21600 0 21600 0 0 Z N"/>
          </draw:custom-shape>
          <draw:connector draw:style-name="gr166" draw:text-style-name="P8" draw:layer="layout" draw:type="line" svg:x1="13.23cm" svg:y1="4.452cm" svg:x2="13.23cm" svg:y2="4.702cm" draw:start-shape="id100" draw:start-glue-point="16" draw:end-shape="id100" draw:end-glue-point="17" svg:d="M13230 4452v250" svg:viewBox="0 0 1 251">
            <text:p/>
          </draw:connector>
        </draw:g>
        <draw:connector draw:style-name="gr167" draw:text-style-name="P9" draw:layer="layout" draw:type="line" svg:x1="9.632cm" svg:y1="5.675cm" svg:x2="8.096cm" svg:y2="7.726cm" draw:start-shape="id101" draw:start-glue-point="9" draw:end-shape="id97" draw:end-glue-point="3" svg:d="M9632 5675l-1536 2051" svg:viewBox="0 0 1537 2052">
          <text:p/>
        </draw:connector>
        <draw:connector draw:style-name="gr168" draw:text-style-name="P9" xml:id="id102" draw:id="id102" draw:layer="layout" draw:type="line" svg:x1="5.706cm" svg:y1="11.792cm" svg:x2="6.164cm" svg:y2="9.948cm" draw:start-shape="id77" draw:start-glue-point="4" svg:d="M5706 11792l458-1844" svg:viewBox="0 0 459 1845">
          <text:p/>
        </draw:connector>
        <draw:connector draw:style-name="gr169" draw:text-style-name="P9" draw:layer="layout" draw:type="line" svg:x1="5.477cm" svg:y1="7.697cm" svg:x2="6.164cm" svg:y2="9.948cm" draw:start-shape="id99" draw:start-glue-point="13" draw:end-shape="id102" draw:end-glue-point="3" svg:d="M5477 7697l687 2251" svg:viewBox="0 0 688 2252">
          <text:p/>
        </draw:connector>
        <draw:frame draw:style-name="gr22" draw:text-style-name="P2" draw:layer="layout" svg:width="2.222cm" svg:height="0.725cm" svg:x="3.857cm" svg:y="9.482cm">
          <draw:text-box>
            <text:p><text:span text:style-name="T1">T</text:span><text:span text:style-name="T1">C</text:span><text:span text:style-name="T1">P/</text:span><text:span text:style-name="T1">IP</text:span></text:p>
          </draw:text-box>
        </draw:frame>
      </draw:page>
      <draw:page draw:name="Queue" draw:style-name="dp1" draw:master-page-name="Default">
        <draw:custom-shape draw:style-name="gr170" draw:text-style-name="P1" draw:layer="layout" svg:width="25.4cm" svg:height="17.162cm" svg:x="2.27cm" svg:y="1.935cm">
          <text:p/>
          <draw:enhanced-geometry svg:viewBox="0 0 21600 21600" draw:mirror-horizontal="false" draw:mirror-vertical="false" draw:type="rectangle" draw:enhanced-path="M 0 0 L 21600 0 21600 21600 0 21600 0 0 Z N"/>
        </draw:custom-shape>
        <draw:connector draw:style-name="gr171" draw:text-style-name="P9" xml:id="id120" draw:id="id120" draw:layer="layout" draw:type="line" svg:x1="10.822cm" svg:y1="4.81cm" svg:x2="10.832cm" svg:y2="12.513cm" draw:start-shape="id103" draw:start-glue-point="12" svg:d="M10822 4810l10 7703" svg:viewBox="0 0 11 7704">
          <text:p/>
        </draw:connector>
        <draw:frame draw:style-name="gr51" draw:text-style-name="P14" draw:layer="layout" svg:width="2.857cm" svg:height="1.27cm" svg:x="10.843cm" svg:y="6.397cm">
          <draw:text-box>
            <text:p><text:span text:style-name="T6">command_</text:span></text:p>
            <text:p><text:span text:style-name="T6">queue</text:span></text:p>
          </draw:text-box>
        </draw:frame>
        <draw:custom-shape draw:style-name="gr172" draw:text-style-name="P17" draw:layer="layout" svg:width="25.4cm" svg:height="0.952cm" svg:x="2.27cm" svg:y="1cm">
          <text:p text:style-name="P16"><text:span text:style-name="T5">Components Interface: queues</text:span></text:p>
          <draw:enhanced-geometry svg:viewBox="0 0 21600 21600" draw:type="rectangle" draw:enhanced-path="M 0 0 L 21600 0 21600 21600 0 21600 0 0 Z N"/>
        </draw:custom-shape>
        <draw:g draw:style-name="gr3" xml:id="id103" draw:id="id10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73" draw:text-style-name="P7" xml:id="id104" draw:id="id104" draw:layer="layout" svg:width="8.347cm" svg:height="2cm" svg:x="5.815cm" svg:y="2.8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oradio_control</text:span></text:p>
            <draw:enhanced-geometry svg:viewBox="0 0 21600 21600" draw:type="rectangle" draw:enhanced-path="M 0 0 L 21600 0 21600 21600 0 21600 0 0 Z N"/>
          </draw:custom-shape>
          <draw:connector draw:style-name="gr174" draw:text-style-name="P8" draw:layer="layout" draw:type="line" svg:x1="13.692cm" svg:y1="3.087cm" svg:x2="13.692cm" svg:y2="3.337cm" draw:start-shape="id104" draw:start-glue-point="16" draw:end-shape="id104" draw:end-glue-point="17" svg:d="M13692 3087v250" svg:viewBox="0 0 1 251">
            <text:p/>
          </draw:connector>
        </draw:g>
        <draw:g draw:style-name="gr3" xml:id="id123" draw:id="id12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75" draw:text-style-name="P7" xml:id="id105" draw:id="id105" draw:layer="layout" svg:width="4.385cm" svg:height="2cm" svg:x="14.797cm" svg:y="6.96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usb_service</text:span></text:p>
            <draw:enhanced-geometry svg:viewBox="0 0 21600 21600" draw:mirror-horizontal="false" draw:mirror-vertical="false" draw:type="rectangle" draw:enhanced-path="M 0 0 L 21600 0 21600 21600 0 21600 0 0 Z N"/>
          </draw:custom-shape>
          <draw:connector draw:style-name="gr176" draw:text-style-name="P8" draw:layer="layout" draw:type="line" svg:x1="18.712cm" svg:y1="7.244cm" svg:x2="18.712cm" svg:y2="7.494cm" draw:start-shape="id105" draw:start-glue-point="16" draw:end-shape="id105" draw:end-glue-point="17" svg:d="M18712 7244v250" svg:viewBox="0 0 1 251">
            <text:p/>
          </draw:connector>
        </draw:g>
        <draw:g draw:style-name="gr3" xml:id="id122" draw:id="id12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77" draw:text-style-name="P7" xml:id="id106" draw:id="id106" draw:layer="layout" svg:width="4.385cm" svg:height="1.905cm" svg:x="14.797cm" svg:y="16.17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eb_service</text:span></text:p>
            <draw:enhanced-geometry svg:viewBox="0 0 21600 21600" draw:type="rectangle" draw:enhanced-path="M 0 0 L 21600 0 21600 21600 0 21600 0 0 Z N"/>
          </draw:custom-shape>
          <draw:connector draw:style-name="gr178" draw:text-style-name="P8" draw:layer="layout" draw:type="line" svg:x1="18.712cm" svg:y1="16.452cm" svg:x2="18.712cm" svg:y2="16.702cm" draw:start-shape="id106" draw:start-glue-point="16" draw:end-shape="id106" draw:end-glue-point="17" svg:d="M18712 16452v250" svg:viewBox="0 0 1 251">
            <text:p/>
          </draw:connector>
        </draw:g>
        <draw:g draw:style-name="gr3" xml:id="id125" draw:id="id12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79" draw:text-style-name="P7" xml:id="id107" draw:id="id107" draw:layer="layout" svg:width="4.385cm" svg:height="2cm" svg:x="14.797cm" svg:y="9.50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touch_buttons</text:span></text:p>
            <draw:enhanced-geometry svg:viewBox="0 0 21600 21600" draw:type="rectangle" draw:enhanced-path="M 0 0 L 21600 0 21600 21600 0 21600 0 0 Z N"/>
          </draw:custom-shape>
          <draw:connector draw:style-name="gr180" draw:text-style-name="P8" draw:layer="layout" draw:type="line" svg:x1="18.712cm" svg:y1="9.784cm" svg:x2="18.712cm" svg:y2="10.034cm" draw:start-shape="id107" draw:start-glue-point="16" draw:end-shape="id107" draw:end-glue-point="17" svg:d="M18712 9784v250" svg:viewBox="0 0 1 251">
            <text:p/>
          </draw:connector>
        </draw:g>
        <draw:g draw:style-name="gr3" xml:id="id126" draw:id="id12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81" draw:text-style-name="P7" xml:id="id108" draw:id="id108" draw:layer="layout" svg:width="4.385cm" svg:height="2cm" svg:x="14.797cm" svg:y="11.7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spotify_connect</text:span></text:p>
            <draw:enhanced-geometry svg:viewBox="0 0 21600 21600" draw:type="rectangle" draw:enhanced-path="M 0 0 L 21600 0 21600 21600 0 21600 0 0 Z N"/>
          </draw:custom-shape>
          <draw:connector draw:style-name="gr182" draw:text-style-name="P8" draw:layer="layout" draw:type="line" svg:x1="18.712cm" svg:y1="12.007cm" svg:x2="18.712cm" svg:y2="12.257cm" draw:start-shape="id108" draw:start-glue-point="16" draw:end-shape="id108" draw:end-glue-point="17" svg:d="M18712 12007v250" svg:viewBox="0 0 1 251">
            <text:p/>
          </draw:connector>
        </draw:g>
        <draw:g draw:style-name="gr3" xml:id="id127" draw:id="id12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83" draw:text-style-name="P7" xml:id="id109" draw:id="id109" draw:layer="layout" svg:width="4.385cm" svg:height="1.905cm" svg:x="14.797cm" svg:y="13.95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volume_control</text:span></text:p>
            <draw:enhanced-geometry svg:viewBox="0 0 21600 21600" draw:type="rectangle" draw:enhanced-path="M 0 0 L 21600 0 21600 21600 0 21600 0 0 Z N"/>
          </draw:custom-shape>
          <draw:connector draw:style-name="gr184" draw:text-style-name="P8" draw:layer="layout" draw:type="line" svg:x1="18.712cm" svg:y1="14.229cm" svg:x2="18.712cm" svg:y2="14.479cm" draw:start-shape="id109" draw:start-glue-point="16" draw:end-shape="id109" draw:end-glue-point="17" svg:d="M18712 14229v250" svg:viewBox="0 0 1 251">
            <text:p/>
          </draw:connector>
        </draw:g>
        <draw:g draw:style-name="gr3" xml:id="id114" draw:id="id11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85" draw:text-style-name="P7" xml:id="id110" draw:id="id110" draw:layer="layout" svg:width="4.385cm" svg:height="1.905cm" svg:x="6.523cm" svg:y="16.30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ifi_service</text:span></text:p>
            <draw:enhanced-geometry svg:viewBox="0 0 21600 21600" draw:type="rectangle" draw:enhanced-path="M 0 0 L 21600 0 21600 21600 0 21600 0 0 Z N"/>
          </draw:custom-shape>
          <draw:connector draw:style-name="gr186" draw:text-style-name="P8" draw:layer="layout" draw:type="line" svg:x1="10.438cm" svg:y1="16.584cm" svg:x2="10.438cm" svg:y2="16.834cm" draw:start-shape="id110" draw:start-glue-point="16" draw:end-shape="id110" draw:end-glue-point="17" svg:d="M10438 16584v250" svg:viewBox="0 0 1 251">
            <text:p/>
          </draw:connector>
        </draw:g>
        <draw:g draw:style-name="gr3" xml:id="id112" draw:id="id11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87" draw:text-style-name="P7" xml:id="id111" draw:id="id111" draw:layer="layout" svg:width="4.385cm" svg:height="1.905cm" svg:x="3.077cm" svg:y="12.19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remote_monitoring</text:span></text:p>
            <draw:enhanced-geometry svg:viewBox="0 0 21600 21600" draw:type="rectangle" draw:enhanced-path="M 0 0 L 21600 0 21600 21600 0 21600 0 0 Z N"/>
          </draw:custom-shape>
          <draw:connector draw:style-name="gr188" draw:text-style-name="P8" draw:layer="layout" draw:type="line" svg:x1="6.992cm" svg:y1="12.472cm" svg:x2="6.992cm" svg:y2="12.722cm" draw:start-shape="id111" draw:start-glue-point="16" draw:end-shape="id111" draw:end-glue-point="17" svg:d="M6992 12472v250" svg:viewBox="0 0 1 251">
            <text:p/>
          </draw:connector>
        </draw:g>
        <draw:connector draw:style-name="gr189" draw:text-style-name="P9" draw:layer="layout" draw:type="line" svg:x1="3.954cm" svg:y1="14.099cm" svg:x2="4.457cm" svg:y2="16.432cm" draw:start-shape="id112" draw:start-glue-point="10" draw:end-shape="id113" draw:end-glue-point="3" svg:d="M3954 14099l503 2333" svg:viewBox="0 0 504 2334">
          <text:p/>
        </draw:connector>
        <draw:connector draw:style-name="gr190" draw:text-style-name="P9" xml:id="id113" draw:id="id113" draw:layer="layout" draw:type="line" svg:x1="6.523cm" svg:y1="17.259cm" svg:x2="4.457cm" svg:y2="16.432cm" draw:start-shape="id114" draw:start-glue-point="3" svg:d="M6523 17259l-2066-827" svg:viewBox="0 0 2067 828">
          <text:p/>
        </draw:connector>
        <draw:connector draw:style-name="gr191" draw:text-style-name="P9" draw:layer="layout" draw:type="line" svg:x1="10.907cm" svg:y1="17.735cm" svg:x2="12.482cm" svg:y2="17.462cm" draw:start-shape="id114" draw:start-glue-point="14" draw:end-shape="id115" draw:end-glue-point="3" svg:d="M10907 17735l1575-273" svg:viewBox="0 0 1576 274">
          <text:p/>
        </draw:connector>
        <draw:frame draw:style-name="gr22" draw:text-style-name="P2" draw:layer="layout" svg:width="2.857cm" svg:height="0.725cm" svg:x="11.477cm" svg:y="17.827cm">
          <draw:text-box>
            <text:p><text:span text:style-name="T1">web_queue</text:span></text:p>
          </draw:text-box>
        </draw:frame>
        <draw:frame draw:style-name="gr2" draw:text-style-name="P2" draw:layer="layout" svg:width="2.354cm" svg:height="1.199cm" svg:x="4.678cm" svg:y="14.652cm">
          <draw:text-box>
            <text:p><text:span text:style-name="T1">rms_</text:span></text:p>
            <text:p><text:span text:style-name="T1">queue</text:span></text:p>
          </draw:text-box>
        </draw:frame>
        <draw:g draw:style-name="gr3" xml:id="id117" draw:id="id11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92" draw:text-style-name="P7" xml:id="id116" draw:id="id116" draw:layer="layout" svg:width="6.985cm" svg:height="2cm" svg:x="19.567cm" svg:y="2.8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error_service</text:span></text:p>
            <draw:enhanced-geometry svg:viewBox="0 0 21600 21600" draw:type="rectangle" draw:enhanced-path="M 0 0 L 21600 0 21600 21600 0 21600 0 0 Z N"/>
          </draw:custom-shape>
          <draw:connector draw:style-name="gr193" draw:text-style-name="P8" draw:layer="layout" draw:type="line" svg:x1="26.082cm" svg:y1="3.087cm" svg:x2="26.082cm" svg:y2="3.337cm" draw:start-shape="id116" draw:start-glue-point="16" draw:end-shape="id116" draw:end-glue-point="17" svg:d="M26082 3087v250" svg:viewBox="0 0 1 251">
            <text:p/>
          </draw:connector>
        </draw:g>
        <draw:connector draw:style-name="gr194" draw:text-style-name="P9" xml:id="id118" draw:id="id118" draw:layer="layout" draw:type="line" svg:x1="19.567cm" svg:y1="3.31cm" svg:x2="17.898cm" svg:y2="2.926cm" draw:start-shape="id117" draw:start-glue-point="8" svg:d="M19567 3310l-1669-384" svg:viewBox="0 0 1670 385">
          <text:p/>
        </draw:connector>
        <draw:connector draw:style-name="gr195" draw:text-style-name="P9" draw:layer="layout" draw:type="line" svg:x1="14.161cm" svg:y1="3.31cm" svg:x2="17.898cm" svg:y2="2.926cm" draw:start-shape="id103" draw:start-glue-point="15" draw:end-shape="id118" draw:end-glue-point="3" svg:d="M14161 3310l3737-384" svg:viewBox="0 0 3738 385">
          <text:p/>
        </draw:connector>
        <draw:connector draw:style-name="gr196" draw:text-style-name="P9" xml:id="id119" draw:id="id119" draw:layer="layout" draw:type="line" svg:x1="10.769cm" svg:y1="6.191cm" svg:x2="16.622cm" svg:y2="6.132cm" svg:d="M10769 6191l5853-59" svg:viewBox="0 0 5854 60">
          <text:p/>
        </draw:connector>
        <draw:connector draw:style-name="gr197" draw:text-style-name="P9" draw:layer="layout" draw:type="line" svg:x1="19.567cm" svg:y1="4.31cm" svg:x2="16.622cm" svg:y2="6.132cm" draw:start-shape="id117" draw:start-glue-point="9" draw:end-shape="id119" draw:end-glue-point="3" svg:d="M19567 4310l-2945 1822" svg:viewBox="0 0 2946 1823">
          <text:p/>
        </draw:connector>
        <draw:connector draw:style-name="gr198" draw:text-style-name="P9" xml:id="id128" draw:id="id128" draw:layer="layout" draw:type="line" svg:x1="12.594cm" svg:y1="12.488cm" svg:x2="10.832cm" svg:y2="12.513cm" draw:end-shape="id120" draw:end-glue-point="3" svg:d="M12594 12488l-1762 25" svg:viewBox="0 0 1763 26">
          <text:p/>
        </draw:connector>
        <draw:connector draw:style-name="gr199" draw:text-style-name="P9" xml:id="id121" draw:id="id121" draw:layer="layout" draw:type="line" svg:x1="23.757cm" svg:y1="4.81cm" svg:x2="23.759cm" svg:y2="11.192cm" draw:start-shape="id117" draw:start-glue-point="12" svg:d="M23757 4810l2 6382" svg:viewBox="0 0 3 6383">
          <text:p/>
        </draw:connector>
        <draw:connector draw:style-name="gr200" draw:text-style-name="P9" xml:id="id124" draw:id="id124" draw:layer="layout" draw:type="line" svg:x1="22.357cm" svg:y1="11.192cm" svg:x2="23.759cm" svg:y2="11.192cm" draw:end-shape="id121" draw:end-glue-point="3" svg:d="M22357 11192h1402" svg:viewBox="0 0 1403 1">
          <text:p/>
        </draw:connector>
        <draw:frame draw:style-name="gr2" draw:text-style-name="P2" draw:layer="layout" svg:width="1.904cm" svg:height="1.199cm" svg:x="24.495cm" svg:y="7.667cm">
          <draw:text-box>
            <text:p><text:span text:style-name="T1">error_</text:span></text:p>
            <text:p><text:span text:style-name="T1">queue</text:span></text:p>
          </draw:text-box>
        </draw:frame>
        <draw:frame draw:style-name="gr2" draw:text-style-name="P2" draw:layer="layout" svg:width="1.905cm" svg:height="1.199cm" svg:x="16.24cm" svg:y="3.022cm">
          <draw:text-box>
            <text:p><text:span text:style-name="T1">error_</text:span></text:p>
            <text:p><text:span text:style-name="T1">queue</text:span></text:p>
          </draw:text-box>
        </draw:frame>
        <draw:connector draw:style-name="gr201" draw:text-style-name="P9" xml:id="id115" draw:id="id115" draw:layer="layout" draw:type="line" svg:x1="14.797cm" svg:y1="17.603cm" svg:x2="12.482cm" svg:y2="17.462cm" draw:start-shape="id122" draw:start-glue-point="9" svg:d="M14797 17603l-2315-141" svg:viewBox="0 0 2316 142">
          <text:p/>
        </draw:connector>
        <draw:connector draw:style-name="gr202" draw:text-style-name="P18" draw:layer="layout" svg:x1="19.181cm" svg:y1="8.467cm" svg:x2="22.357cm" svg:y2="11.192cm" draw:start-shape="id123" draw:start-glue-point="14" draw:end-shape="id124" draw:end-glue-point="2" svg:d="M19181 8467h1588v2725h1588" svg:viewBox="0 0 3177 2726">
          <text:p/>
        </draw:connector>
        <draw:connector draw:style-name="gr202" draw:text-style-name="P18" draw:layer="layout" svg:x1="19.181cm" svg:y1="11.007cm" svg:x2="22.357cm" svg:y2="11.192cm" draw:start-shape="id125" draw:start-glue-point="14" draw:end-shape="id124" draw:end-glue-point="2" svg:d="M19181 11007h1588v185h1588" svg:viewBox="0 0 3177 186">
          <text:p/>
        </draw:connector>
        <draw:connector draw:style-name="gr202" draw:text-style-name="P18" draw:layer="layout" svg:x1="19.181cm" svg:y1="13.23cm" svg:x2="22.357cm" svg:y2="11.192cm" draw:start-shape="id126" draw:start-glue-point="14" draw:end-shape="id124" draw:end-glue-point="2" svg:d="M19181 13230h1588v-2038h1588" svg:viewBox="0 0 3177 2039">
          <text:p/>
        </draw:connector>
        <draw:connector draw:style-name="gr202" draw:text-style-name="P18" draw:layer="layout" svg:x1="19.181cm" svg:y1="15.38cm" svg:x2="22.357cm" svg:y2="11.192cm" draw:start-shape="id127" draw:start-glue-point="14" draw:end-shape="id124" draw:end-glue-point="2" svg:d="M19181 15380h1588v-4188h1588" svg:viewBox="0 0 3177 4189">
          <text:p/>
        </draw:connector>
        <draw:connector draw:style-name="gr202" draw:text-style-name="P18" draw:layer="layout" svg:x1="19.182cm" svg:y1="17.127cm" svg:x2="22.357cm" svg:y2="11.192cm" draw:start-shape="id122" draw:end-shape="id124" draw:end-glue-point="2" svg:d="M19182 17127h1587v-5935h1588" svg:viewBox="0 0 3176 5936">
          <text:p/>
        </draw:connector>
        <draw:connector draw:style-name="gr202" draw:text-style-name="P18" draw:layer="layout" svg:x1="14.797cm" svg:y1="7.467cm" svg:x2="12.594cm" svg:y2="12.488cm" draw:start-shape="id123" draw:start-glue-point="8" draw:end-shape="id128" draw:end-glue-point="2" svg:d="M14797 7467h-1102v5021h-1101" svg:viewBox="0 0 2204 5022">
          <text:p/>
        </draw:connector>
        <draw:connector draw:style-name="gr202" draw:text-style-name="P18" draw:layer="layout" svg:x1="14.797cm" svg:y1="10.007cm" svg:x2="12.594cm" svg:y2="12.488cm" draw:start-shape="id125" draw:start-glue-point="8" draw:end-shape="id128" draw:end-glue-point="2" svg:d="M14797 10007h-1102v2481h-1101" svg:viewBox="0 0 2204 2482">
          <text:p/>
        </draw:connector>
        <draw:connector draw:style-name="gr202" draw:text-style-name="P18" draw:layer="layout" svg:x1="14.797cm" svg:y1="13.23cm" svg:x2="12.594cm" svg:y2="12.488cm" draw:start-shape="id126" draw:start-glue-point="9" draw:end-shape="id128" draw:end-glue-point="2" svg:d="M14797 13230h-1102v-742h-1101" svg:viewBox="0 0 2204 743">
          <text:p/>
        </draw:connector>
        <draw:connector draw:style-name="gr202" draw:text-style-name="P18" draw:layer="layout" svg:x1="14.797cm" svg:y1="16.651cm" svg:x2="12.594cm" svg:y2="12.488cm" draw:start-shape="id122" draw:start-glue-point="8" draw:end-shape="id128" draw:end-glue-point="2" svg:d="M14797 16651h-1102v-4163h-1101" svg:viewBox="0 0 2204 4164">
          <text:p/>
        </draw:connector>
        <draw:connector draw:style-name="gr202" draw:text-style-name="P18" draw:layer="layout" svg:x1="14.797cm" svg:y1="14.904cm" svg:x2="12.594cm" svg:y2="12.488cm" draw:start-shape="id127" draw:start-glue-point="3" draw:end-shape="id128" draw:end-glue-point="2" svg:d="M14797 14904h-1102v-2416h-1101" svg:viewBox="0 0 2204 2417">
          <text:p/>
        </draw:connector>
      </draw:page>
      <draw:page draw:name="page6" draw:style-name="dp1" draw:master-page-name="Default">
        <draw:custom-shape draw:style-name="gr170" draw:text-style-name="P1" draw:layer="layout" svg:width="25.4cm" svg:height="17.162cm" svg:x="2.27cm" svg:y="1.935cm">
          <text:p/>
          <draw:enhanced-geometry svg:viewBox="0 0 21600 21600" draw:mirror-horizontal="false" draw:mirror-vertical="false" draw:type="rectangle" draw:enhanced-path="M 0 0 L 21600 0 21600 21600 0 21600 0 0 Z N"/>
        </draw:custom-shape>
        <draw:connector draw:style-name="gr203" draw:text-style-name="P9" xml:id="id143" draw:id="id143" draw:layer="layout" draw:type="line" svg:x1="10.525cm" svg:y1="4.61cm" svg:x2="10.054cm" svg:y2="6.723cm" draw:start-shape="id129" draw:start-glue-point="10" svg:d="M10525 4610l-471 2113" svg:viewBox="0 0 472 2114">
          <text:p/>
        </draw:connector>
        <draw:custom-shape draw:style-name="gr172" draw:text-style-name="P17" draw:layer="layout" svg:width="25.4cm" svg:height="0.952cm" svg:x="2.27cm" svg:y="1cm">
          <text:p text:style-name="P16"><text:span text:style-name="T5">Components Interface: Messaging</text:span></text:p>
          <draw:enhanced-geometry svg:viewBox="0 0 21600 21600" draw:type="rectangle" draw:enhanced-path="M 0 0 L 21600 0 21600 21600 0 21600 0 0 Z N"/>
        </draw:custom-shape>
        <draw:g draw:style-name="gr3" xml:id="id141" draw:id="id14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04" draw:text-style-name="P7" xml:id="id130" draw:id="id130" draw:layer="layout" svg:width="4.762cm" svg:height="2cm" svg:x="14.335cm" svg:y="16.7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oradio_control</text:span></text:p>
            <draw:enhanced-geometry svg:viewBox="0 0 21600 21600" draw:type="rectangle" draw:enhanced-path="M 0 0 L 21600 0 21600 21600 0 21600 0 0 Z N"/>
          </draw:custom-shape>
          <draw:connector draw:style-name="gr205" draw:text-style-name="P8" draw:layer="layout" draw:type="line" svg:x1="18.627cm" svg:y1="17.057cm" svg:x2="18.627cm" svg:y2="17.307cm" draw:start-shape="id130" draw:start-glue-point="16" draw:end-shape="id130" draw:end-glue-point="17" svg:d="M18627 17057v250" svg:viewBox="0 0 1 251">
            <text:p/>
          </draw:connector>
        </draw:g>
        <draw:g draw:style-name="gr3" xml:id="id142" draw:id="id14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06" draw:text-style-name="P7" xml:id="id131" draw:id="id131" draw:layer="layout" svg:width="4.385cm" svg:height="2cm" svg:x="3.222cm" svg:y="5.76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usb_service</text:span></text:p>
            <draw:enhanced-geometry svg:viewBox="0 0 21600 21600" draw:mirror-horizontal="false" draw:mirror-vertical="false" draw:type="rectangle" draw:enhanced-path="M 0 0 L 21600 0 21600 21600 0 21600 0 0 Z N"/>
          </draw:custom-shape>
          <draw:connector draw:style-name="gr207" draw:text-style-name="P8" draw:layer="layout" draw:type="line" svg:x1="7.137cm" svg:y1="6.039cm" svg:x2="7.137cm" svg:y2="6.289cm" draw:start-shape="id131" draw:start-glue-point="16" draw:end-shape="id131" draw:end-glue-point="17" svg:d="M7137 6039v250" svg:viewBox="0 0 1 251">
            <text:p/>
          </draw:connector>
        </draw:g>
        <draw:g draw:style-name="gr3" xml:id="id149" draw:id="id14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08" draw:text-style-name="P7" xml:id="id132" draw:id="id132" draw:layer="layout" svg:width="4.385cm" svg:height="1.905cm" svg:x="3.282cm" svg:y="13.38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eb_service</text:span></text:p>
            <draw:enhanced-geometry svg:viewBox="0 0 21600 21600" draw:type="rectangle" draw:enhanced-path="M 0 0 L 21600 0 21600 21600 0 21600 0 0 Z N"/>
          </draw:custom-shape>
          <draw:connector draw:style-name="gr209" draw:text-style-name="P8" draw:layer="layout" draw:type="line" svg:x1="7.197cm" svg:y1="13.659cm" svg:x2="7.197cm" svg:y2="13.909cm" draw:start-shape="id132" draw:start-glue-point="16" draw:end-shape="id132" draw:end-glue-point="17" svg:d="M7197 13659v250" svg:viewBox="0 0 1 251">
            <text:p/>
          </draw:connector>
        </draw:g>
        <draw:g draw:style-name="gr3" xml:id="id145" draw:id="id14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10" draw:text-style-name="P7" xml:id="id133" draw:id="id133" draw:layer="layout" svg:width="4.385cm" svg:height="2cm" svg:x="3.282cm" svg:y="8.30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touch_buttons</text:span></text:p>
            <draw:enhanced-geometry svg:viewBox="0 0 21600 21600" draw:type="rectangle" draw:enhanced-path="M 0 0 L 21600 0 21600 21600 0 21600 0 0 Z N"/>
          </draw:custom-shape>
          <draw:connector draw:style-name="gr211" draw:text-style-name="P8" draw:layer="layout" draw:type="line" svg:x1="7.197cm" svg:y1="8.579cm" svg:x2="7.197cm" svg:y2="8.829cm" draw:start-shape="id133" draw:start-glue-point="16" draw:end-shape="id133" draw:end-glue-point="17" svg:d="M7197 8579v250" svg:viewBox="0 0 1 251">
            <text:p/>
          </draw:connector>
        </draw:g>
        <draw:g draw:style-name="gr3" xml:id="id138" draw:id="id13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12" draw:text-style-name="P7" xml:id="id134" draw:id="id134" draw:layer="layout" svg:width="4.385cm" svg:height="2cm" svg:x="8.755cm" svg:y="16.6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spotify_connect</text:span></text:p>
            <draw:enhanced-geometry svg:viewBox="0 0 21600 21600" draw:type="rectangle" draw:enhanced-path="M 0 0 L 21600 0 21600 21600 0 21600 0 0 Z N"/>
          </draw:custom-shape>
          <draw:connector draw:style-name="gr213" draw:text-style-name="P8" draw:layer="layout" draw:type="line" svg:x1="12.67cm" svg:y1="16.974cm" svg:x2="12.67cm" svg:y2="17.224cm" draw:start-shape="id134" draw:start-glue-point="16" draw:end-shape="id134" draw:end-glue-point="17" svg:d="M12670 16974v250" svg:viewBox="0 0 1 251">
            <text:p/>
          </draw:connector>
        </draw:g>
        <draw:g draw:style-name="gr3" xml:id="id147" draw:id="id14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14" draw:text-style-name="P7" xml:id="id135" draw:id="id135" draw:layer="layout" svg:width="4.385cm" svg:height="1.905cm" svg:x="3.222cm" svg:y="10.84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volume_control</text:span></text:p>
            <draw:enhanced-geometry svg:viewBox="0 0 21600 21600" draw:type="rectangle" draw:enhanced-path="M 0 0 L 21600 0 21600 21600 0 21600 0 0 Z N"/>
          </draw:custom-shape>
          <draw:connector draw:style-name="gr215" draw:text-style-name="P8" draw:layer="layout" draw:type="line" svg:x1="7.137cm" svg:y1="11.119cm" svg:x2="7.137cm" svg:y2="11.369cm" draw:start-shape="id135" draw:start-glue-point="16" draw:end-shape="id135" draw:end-glue-point="17" svg:d="M7137 11119v250" svg:viewBox="0 0 1 251">
            <text:p/>
          </draw:connector>
        </draw:g>
        <draw:g draw:style-name="gr3" xml:id="id155" draw:id="id15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16" draw:text-style-name="P7" xml:id="id136" draw:id="id136" draw:layer="layout" svg:width="4.385cm" svg:height="1.905cm" svg:x="21.697cm" svg:y="4.32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ifi_service</text:span></text:p>
            <draw:enhanced-geometry svg:viewBox="0 0 21600 21600" draw:type="rectangle" draw:enhanced-path="M 0 0 L 21600 0 21600 21600 0 21600 0 0 Z N"/>
          </draw:custom-shape>
          <draw:connector draw:style-name="gr217" draw:text-style-name="P8" draw:layer="layout" draw:type="line" svg:x1="25.612cm" svg:y1="4.604cm" svg:x2="25.612cm" svg:y2="4.854cm" draw:start-shape="id136" draw:start-glue-point="16" draw:end-shape="id136" draw:end-glue-point="17" svg:d="M25612 4604v250" svg:viewBox="0 0 1 251">
            <text:p/>
          </draw:connector>
        </draw:g>
        <draw:g draw:style-name="gr3" xml:id="id151" draw:id="id15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18" draw:text-style-name="P7" xml:id="id137" draw:id="id137" draw:layer="layout" svg:width="4.385cm" svg:height="1.905cm" svg:x="3.222cm" svg:y="15.60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remote_monitoring</text:span></text:p>
            <draw:enhanced-geometry svg:viewBox="0 0 21600 21600" draw:type="rectangle" draw:enhanced-path="M 0 0 L 21600 0 21600 21600 0 21600 0 0 Z N"/>
          </draw:custom-shape>
          <draw:connector draw:style-name="gr219" draw:text-style-name="P8" draw:layer="layout" draw:type="line" svg:x1="7.137cm" svg:y1="15.882cm" svg:x2="7.137cm" svg:y2="16.132cm" draw:start-shape="id137" draw:start-glue-point="16" draw:end-shape="id137" draw:end-glue-point="17" svg:d="M7137 15882v250" svg:viewBox="0 0 1 251">
            <text:p/>
          </draw:connector>
        </draw:g>
        <draw:connector draw:style-name="gr220" draw:text-style-name="P9" draw:layer="layout" draw:type="line" svg:x1="12.262cm" svg:y1="16.697cm" svg:x2="15.284cm" svg:y2="10.241cm" draw:start-shape="id138" draw:start-glue-point="4" draw:end-shape="id139" draw:end-glue-point="3" svg:d="M12262 16697l3022-6456" svg:viewBox="0 0 3023 6457">
          <text:p/>
        </draw:connector>
        <draw:g draw:style-name="gr3" xml:id="id129" draw:id="id12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1.816cm" svg:y="5.135cm"/>
          <draw:glue-point draw:id="17" svg:x="4.091cm" svg:y="5.135cm"/>
          <draw:glue-point draw:id="18" svg:x="2cm" svg:y="5cm"/>
          <draw:custom-shape draw:style-name="gr221" draw:text-style-name="P7" xml:id="id140" draw:id="id140" draw:layer="layout" svg:width="9.525cm" svg:height="2cm" svg:x="8.62cm" svg:y="2.6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messaging</text:span></text:p>
            <draw:enhanced-geometry svg:viewBox="0 0 21600 21600" draw:type="rectangle" draw:enhanced-path="M 0 0 L 21600 0 21600 21600 0 21600 0 0 Z N"/>
          </draw:custom-shape>
          <draw:connector draw:style-name="gr222" draw:text-style-name="P8" draw:layer="layout" draw:type="line" svg:x1="17.675cm" svg:y1="2.887cm" svg:x2="17.675cm" svg:y2="3.137cm" draw:start-shape="id140" draw:start-glue-point="16" draw:end-shape="id140" draw:end-glue-point="17" svg:d="M17675 2887v250" svg:viewBox="0 0 1 251">
            <text:p/>
          </draw:connector>
        </draw:g>
        <draw:connector draw:style-name="gr223" draw:text-style-name="P9" xml:id="id159" draw:id="id159" draw:layer="layout" draw:type="line" svg:x1="16.24cm" svg:y1="16.78cm" svg:x2="16.186cm" svg:y2="10.739cm" draw:start-shape="id141" draw:start-glue-point="6" svg:d="M16240 16780l-54-6041" svg:viewBox="0 0 55 6042">
          <text:p/>
        </draw:connector>
        <draw:connector draw:style-name="gr224" draw:text-style-name="P9" draw:layer="layout" draw:type="line" svg:x1="7.606cm" svg:y1="7.262cm" svg:x2="10.054cm" svg:y2="6.723cm" draw:start-shape="id142" draw:start-glue-point="14" draw:end-shape="id143" draw:end-glue-point="3" svg:d="M7606 7262l2448-539" svg:viewBox="0 0 2449 540">
          <text:p/>
        </draw:connector>
        <draw:connector draw:style-name="gr225" draw:text-style-name="P9" draw:layer="layout" draw:type="line" svg:x1="14.334cm" svg:y1="4.61cm" svg:x2="14.319cm" svg:y2="9.774cm" draw:start-shape="id129" draw:start-glue-point="12" draw:end-shape="id144" draw:end-glue-point="3" svg:d="M14334 4610l-15 5164" svg:viewBox="0 0 16 5165">
          <text:p/>
        </draw:connector>
        <draw:connector draw:style-name="gr226" draw:text-style-name="P9" xml:id="id146" draw:id="id146" draw:layer="layout" draw:type="line" svg:x1="11.653cm" svg:y1="4.61cm" svg:x2="11.019cm" svg:y2="7.439cm" draw:start-shape="id129" draw:start-glue-point="16" svg:d="M11653 4610l-634 2829" svg:viewBox="0 0 635 2830">
          <text:p/>
        </draw:connector>
        <draw:connector draw:style-name="gr227" draw:text-style-name="P9" xml:id="id148" draw:id="id148" draw:layer="layout" draw:type="line" svg:x1="12.43cm" svg:y1="4.61cm" svg:x2="12.389cm" svg:y2="8.062cm" draw:start-shape="id129" draw:start-glue-point="11" svg:d="M12430 4610l-41 3452" svg:viewBox="0 0 42 3453">
          <text:p/>
        </draw:connector>
        <draw:connector draw:style-name="gr228" draw:text-style-name="P9" xml:id="id150" draw:id="id150" draw:layer="layout" draw:type="line" svg:x1="13.382cm" svg:y1="4.61cm" svg:x2="13.136cm" svg:y2="8.871cm" draw:start-shape="id129" draw:start-glue-point="2" svg:d="M13382 4610l-246 4261" svg:viewBox="0 0 247 4262">
          <text:p/>
        </draw:connector>
        <draw:connector draw:style-name="gr229" draw:text-style-name="P9" draw:layer="layout" draw:type="line" svg:x1="7.666cm" svg:y1="8.802cm" svg:x2="11.019cm" svg:y2="7.439cm" draw:start-shape="id145" draw:start-glue-point="15" draw:end-shape="id146" draw:end-glue-point="3" svg:d="M7666 8802l3353-1363" svg:viewBox="0 0 3354 1364">
          <text:p/>
        </draw:connector>
        <draw:connector draw:style-name="gr230" draw:text-style-name="P9" draw:layer="layout" draw:type="line" svg:x1="7.606cm" svg:y1="11.318cm" svg:x2="12.389cm" svg:y2="8.062cm" draw:start-shape="id147" draw:start-glue-point="15" draw:end-shape="id148" draw:end-glue-point="3" svg:d="M7606 11318l4783-3256" svg:viewBox="0 0 4784 3257">
          <text:p/>
        </draw:connector>
        <draw:connector draw:style-name="gr231" draw:text-style-name="P9" draw:layer="layout" draw:type="line" svg:x1="7.666cm" svg:y1="13.858cm" svg:x2="13.136cm" svg:y2="8.871cm" draw:start-shape="id149" draw:start-glue-point="15" draw:end-shape="id150" draw:end-glue-point="3" svg:d="M7666 13858l5470-4987" svg:viewBox="0 0 5471 4988">
          <text:p/>
        </draw:connector>
        <draw:connector draw:style-name="gr232" draw:text-style-name="P9" xml:id="id144" draw:id="id144" draw:layer="layout" draw:type="line" svg:x1="7.606cm" svg:y1="16.081cm" svg:x2="14.319cm" svg:y2="9.774cm" draw:start-shape="id151" draw:start-glue-point="15" svg:d="M7606 16081l6713-6307" svg:viewBox="0 0 6714 6308">
          <text:p/>
        </draw:connector>
        <draw:connector draw:style-name="gr233" draw:text-style-name="P9" xml:id="id139" draw:id="id139" draw:layer="layout" draw:type="line" svg:x1="15.287cm" svg:y1="4.61cm" svg:x2="15.284cm" svg:y2="10.241cm" draw:start-shape="id129" draw:start-glue-point="18" svg:d="M15287 4610l-3 5631" svg:viewBox="0 0 4 5632">
          <text:p/>
        </draw:connector>
        <draw:g draw:style-name="gr3" xml:id="id156" draw:id="id15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34" draw:text-style-name="P7" xml:id="id152" draw:id="id152" draw:layer="layout" svg:width="4.385cm" svg:height="1.905cm" svg:x="21.697cm" svg:y="7.18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text:span><text:span text:style-name="T3">c</text:span><text:span text:style-name="T3">o</text:span><text:span text:style-name="T3">m</text:span><text:span text:style-name="T3">p</text:span><text:span text:style-name="T3">o</text:span><text:span text:style-name="T3">n</text:span><text:span text:style-name="T3">e</text:span><text:span text:style-name="T3">n</text:span><text:span text:style-name="T3">t</text:span><text:span text:style-name="T3">»</text:span></text:p>
            <text:p text:style-name="P6"><text:span text:style-name="T3">f</text:span><text:span text:style-name="T3">a</text:span><text:span text:style-name="T3">s</text:span><text:span text:style-name="T3">t</text:span><text:span text:style-name="T3">a</text:span><text:span text:style-name="T3">p</text:span><text:span text:style-name="T3">i</text:span><text:span text:style-name="T3">_</text:span><text:span text:style-name="T3">s</text:span><text:span text:style-name="T3">e</text:span><text:span text:style-name="T3">r</text:span><text:span text:style-name="T3">v</text:span><text:span text:style-name="T3">e</text:span><text:span text:style-name="T3">r</text:span></text:p>
            <draw:enhanced-geometry svg:viewBox="0 0 21600 21600" draw:type="rectangle" draw:enhanced-path="M 0 0 L 21600 0 21600 21600 0 21600 0 0 Z N"/>
          </draw:custom-shape>
          <draw:connector draw:style-name="gr235" draw:text-style-name="P8" draw:layer="layout" draw:type="line" svg:x1="25.612cm" svg:y1="7.462cm" svg:x2="25.612cm" svg:y2="7.712cm" draw:start-shape="id152" draw:start-glue-point="16" draw:end-shape="id152" draw:end-glue-point="17" svg:d="M25612 7462v250" svg:viewBox="0 0 1 251">
            <text:p/>
          </draw:connector>
        </draw:g>
        <draw:g draw:style-name="gr3" xml:id="id157" draw:id="id15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36" draw:text-style-name="P7" xml:id="id153" draw:id="id153" draw:layer="layout" svg:width="4.385cm" svg:height="1.905cm" svg:x="21.237cm" svg:y="10.02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usb_service</text:span></text:p>
            <draw:enhanced-geometry svg:viewBox="0 0 21600 21600" draw:type="rectangle" draw:enhanced-path="M 0 0 L 21600 0 21600 21600 0 21600 0 0 Z N"/>
          </draw:custom-shape>
          <draw:connector draw:style-name="gr237" draw:text-style-name="P8" draw:layer="layout" draw:type="line" svg:x1="25.152cm" svg:y1="10.302cm" svg:x2="25.152cm" svg:y2="10.552cm" draw:start-shape="id153" draw:start-glue-point="16" draw:end-shape="id153" draw:end-glue-point="17" svg:d="M25152 10302v250" svg:viewBox="0 0 1 251">
            <text:p/>
          </draw:connector>
        </draw:g>
        <draw:g draw:style-name="gr3" xml:id="id158" draw:id="id15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38" draw:text-style-name="P7" xml:id="id154" draw:id="id154" draw:layer="layout" svg:width="4.385cm" svg:height="1.905cm" svg:x="19.537cm" svg:y="12.78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eb_service</text:span></text:p>
            <draw:enhanced-geometry svg:viewBox="0 0 21600 21600" draw:type="rectangle" draw:enhanced-path="M 0 0 L 21600 0 21600 21600 0 21600 0 0 Z N"/>
          </draw:custom-shape>
          <draw:connector draw:style-name="gr239" draw:text-style-name="P8" draw:layer="layout" draw:type="line" svg:x1="23.452cm" svg:y1="13.059cm" svg:x2="23.452cm" svg:y2="13.309cm" draw:start-shape="id154" draw:start-glue-point="16" draw:end-shape="id154" draw:end-glue-point="17" svg:d="M23452 13059v250" svg:viewBox="0 0 1 251">
            <text:p/>
          </draw:connector>
        </draw:g>
        <draw:connector draw:style-name="gr240" draw:text-style-name="P9" draw:layer="layout" draw:type="line" svg:x1="21.697cm" svg:y1="5.755cm" svg:x2="19.766cm" svg:y2="6.07cm" draw:start-shape="id155" draw:start-glue-point="9" svg:d="M21697 5755l-1931 315" svg:viewBox="0 0 1932 316">
          <text:p/>
        </draw:connector>
        <draw:connector draw:style-name="gr241" draw:text-style-name="P9" draw:layer="layout" draw:type="line" svg:x1="21.697cm" svg:y1="8.613cm" svg:x2="19.766cm" svg:y2="6.07cm" draw:start-shape="id156" draw:start-glue-point="9" svg:d="M21697 8613l-1931-2543" svg:viewBox="0 0 1932 2544">
          <text:p/>
        </draw:connector>
        <draw:connector draw:style-name="gr242" draw:text-style-name="P9" draw:layer="layout" draw:type="line" svg:x1="21.237cm" svg:y1="10.501cm" svg:x2="19.766cm" svg:y2="6.07cm" draw:start-shape="id157" draw:start-glue-point="8" svg:d="M21237 10501l-1471-4431" svg:viewBox="0 0 1472 4432">
          <text:p/>
        </draw:connector>
        <draw:connector draw:style-name="gr243" draw:text-style-name="P9" xml:id="id160" draw:id="id160" draw:layer="layout" draw:type="line" svg:x1="20.414cm" svg:y1="12.782cm" svg:x2="19.766cm" svg:y2="6.07cm" draw:start-shape="id158" draw:start-glue-point="7" svg:d="M20414 12782l-648-6712" svg:viewBox="0 0 649 6713">
          <text:p/>
        </draw:connector>
        <draw:connector draw:style-name="gr244" draw:text-style-name="P9" draw:layer="layout" draw:type="line" svg:x1="16.239cm" svg:y1="4.61cm" svg:x2="16.186cm" svg:y2="10.739cm" draw:start-shape="id129" draw:start-glue-point="13" draw:end-shape="id159" draw:end-glue-point="3" svg:d="M16239 4610l-53 6129" svg:viewBox="0 0 54 6130">
          <text:p/>
        </draw:connector>
        <draw:frame draw:style-name="gr22" draw:text-style-name="P14" draw:layer="layout" svg:width="4.445cm" svg:height="0.725cm" svg:x="19.097cm" svg:y="2.905cm">
          <draw:text-box>
            <text:p text:style-name="P19"><text:span text:style-name="T6">publish_command()</text:span></text:p>
          </draw:text-box>
        </draw:frame>
        <draw:connector draw:style-name="gr245" draw:text-style-name="P9" draw:layer="layout" svg:x1="18.144cm" svg:y1="3.11cm" svg:x2="19.766cm" svg:y2="6.07cm" draw:start-shape="id129" draw:start-glue-point="15" draw:end-shape="id160" draw:end-glue-point="3" svg:d="M18144 3110h676v2960h946" svg:viewBox="0 0 1623 2961">
          <text:p/>
        </draw:connector>
        <draw:frame draw:style-name="gr246" draw:text-style-name="P14" draw:layer="layout" svg:width="5.08cm" svg:height="0.953cm" svg:x="11.16cm" svg:y="5.762cm">
          <draw:text-box>
            <text:p text:style-name="P19"><text:span text:style-name="T6">subscribe_command()</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Component" svg:viewBox="0 0 338 419" svg:d="M1 86c1-2 2-3 4-4 1-1 2-1 4-1h55v-72c0-2 0-3 1-4 1-2 2-3 4-4 1-1 2-1 4-1h256c2 0 3 0 5 1 1 1 2 2 3 4 1 1 1 2 1 4v400c0 2 0 3-1 5-1 1-2 2-3 3-2 1-3 1-5 1h-252c-1 1-3 1-4 1-2 0-3 0-4-1-2-1-3-2-4-3-1-2-1-3-1-5v-1-70h-55c-2 0-3 0-4-1-2-1-3-2-4-3-1-2-1-3-1-5v-80c0-2 0-3 1-4 1-2 2-3 4-4 1-1 2-1 4-1h55v-63h-51c-1 1-3 1-4 1-2 0-3 0-4-1-2-1-3-2-4-3-1-2-1-3-1-5v-1-79c0-2 0-3 1-4zM137 81c2 0 3 0 5 1 1 1 2 2 3 4 1 1 1 2 1 4v79 1c0 2 0 3-1 5-1 1-2 2-3 3-2 1-3 1-5 1-1 0-3 0-4-1h-51v63h55c2 0 3 0 5 1 1 1 2 2 3 4 1 1 1 2 1 4v80c0 2 0 3-1 5-1 1-2 2-3 3-2 1-3 1-5 1h-55v61h238v-382h-238v63zM18 99v61h55 55v-61zM128 321v-62h-110v62h55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Square_20_45" draw:display-name="Square 45" svg:viewBox="0 0 1131 1131" svg:d="M0 564l564 567 567-567-567-564z"/>
    <draw:marker draw:name="Square_20_unfilled" draw:display-name="Square unfilled" svg:viewBox="0 0 300 300" svg:d="M0 0h300v300h-300zM20 20h260v260h-26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3T16:23:47.322558208</meta:creation-date>
    <meta:generator>LibreOffice/24.2.7.2$Linux_X86_64 LibreOffice_project/420$Build-2</meta:generator>
    <dc:date>2026-06-20T18:01:50.504720539</dc:date>
    <meta:editing-duration>PT11H28M</meta:editing-duration>
    <meta:editing-cycles>85</meta:editing-cycles>
    <meta:print-date>2026-04-03T16:45:26.431431754</meta:print-date>
    <dc:creator>Henk</dc:creator>
    <meta:document-statistic meta:object-count="350"/>
  </office:meta>
</office:document-meta>
</file>