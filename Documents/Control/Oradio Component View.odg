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5.73cm" fo:min-width="23.973cm" fo:padding-top="0.151cm" fo:padding-bottom="0.151cm" fo:padding-left="0.276cm" fo:padding-right="0.276cm" loext:decorative="false"/>
    </style:style>
    <style:style style:name="gr2"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3" style:family="graphic">
      <style:graphic-properties style:writing-mode="lr-tb" loext:decorative="false"/>
    </style:style>
    <style:style style:name="gr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511cm" fo:min-width="24.38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47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75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 style:family="graphic" style:parent-style-name="standard">
      <style:graphic-properties draw:stroke="none" svg:stroke-color="#000000" draw:fill="none" draw:fill-color="#ffffff" draw:auto-grow-height="true" draw:auto-grow-width="false" fo:min-height="0.385cm" loext:decorative="false"/>
      <style:paragraph-properties style:writing-mode="lr-tb"/>
    </style:style>
    <style:style style:name="gr2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89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 style:family="graphic" style:parent-style-name="standard" style:list-style-name="L1">
      <style:graphic-properties draw:stroke="none" svg:stroke-color="#000000" draw:fill="none" draw:fill-color="#ffffff" draw:auto-grow-height="true" draw:auto-grow-width="false" fo:min-height="1.02cm" loext:decorative="false"/>
      <style:paragraph-properties style:writing-mode="lr-tb"/>
    </style:style>
    <style:style style:name="gr3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6" style:family="graphic" style:parent-style-name="standard" style:list-style-name="L1">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3.973cm" fo:padding-top="0.151cm" fo:padding-bottom="0.151cm" fo:padding-left="0.276cm" fo:padding-right="0.276cm" style:writing-mode="lr-tb" loext:decorative="false"/>
      <style:paragraph-properties style:writing-mode="lr-tb"/>
    </style:style>
    <style:style style:name="gr3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47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4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3" style:family="graphic" style:parent-style-name="standard">
      <style:graphic-properties draw:stroke="none" svg:stroke-color="#000000" draw:fill="none" draw:fill-color="#ffffff" draw:auto-grow-height="true" draw:auto-grow-width="false" fo:min-height="0.703cm" loext:decorative="false"/>
      <style:paragraph-properties style:writing-mode="lr-tb"/>
    </style:style>
    <style:style style:name="gr44"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9.54cm" fo:min-width="27.705cm" fo:padding-top="0.151cm" fo:padding-bottom="0.151cm" fo:padding-left="0.276cm" fo:padding-right="0.276cm" loext:decorative="false"/>
    </style:style>
    <style:style style:name="gr4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511cm" fo:min-width="27.48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4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2.58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5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06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1" style:family="graphic" style:parent-style-name="standard">
      <style:graphic-properties draw:stroke="none" svg:stroke-color="#000000" draw:fill="none" draw:fill-color="#ffffff" draw:auto-grow-height="true" draw:auto-grow-width="false" fo:min-height="1.338cm" loext:decorative="false"/>
      <style:paragraph-properties style:writing-mode="lr-tb"/>
    </style:style>
    <style:style style:name="gr62"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6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64"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6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72"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7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8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4.94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7" style:family="graphic" style:parent-style-name="standard" style:list-style-name="L1">
      <style:graphic-properties draw:stroke="none" svg:stroke-color="#000000" draw:fill="none" draw:fill-color="#ffffff" draw:auto-grow-height="true" draw:auto-grow-width="false" fo:min-height="1.02cm" loext:decorative="false"/>
      <style:paragraph-properties style:writing-mode="lr-tb"/>
    </style:style>
    <style:style style:name="gr8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4"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9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9"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loext:decorative="false"/>
    </style:style>
    <style:style style:name="gr100"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9.54cm" fo:min-width="27.705cm" fo:padding-top="0.151cm" fo:padding-bottom="0.151cm" fo:padding-left="0.276cm" fo:padding-right="0.276cm" style:writing-mode="lr-tb" loext:decorative="false"/>
      <style:paragraph-properties style:writing-mode="lr-tb"/>
    </style:style>
    <style:style style:name="gr10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511cm" fo:min-width="27.48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0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4.94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5" style:family="graphic" style:parent-style-name="standard" style:list-style-name="L1">
      <style:graphic-properties draw:stroke="none" svg:stroke-color="#000000" draw:fill="none" draw:fill-color="#ffffff" draw:auto-grow-height="true" draw:auto-grow-width="false" fo:min-height="1.02cm" loext:decorative="false"/>
      <style:paragraph-properties style:writing-mode="lr-tb"/>
    </style:style>
    <style:style style:name="gr12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2"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3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7" style:family="graphic" style:parent-style-name="standard" style:list-style-name="L1">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7.705cm" fo:padding-top="0.151cm" fo:padding-bottom="0.151cm" fo:padding-left="0.276cm" fo:padding-right="0.276cm" style:writing-mode="lr-tb" loext:decorative="false"/>
      <style:paragraph-properties style:writing-mode="lr-tb"/>
    </style:style>
    <style:style style:name="gr138"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14.638cm" fo:min-width="27.705cm" fo:padding-top="0.151cm" fo:padding-bottom="0.151cm" fo:padding-left="0.276cm" fo:padding-right="0.276cm" loext:decorative="false"/>
    </style:style>
    <style:style style:name="gr13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40"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14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5"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14.638cm" fo:min-width="27.705cm" fo:padding-top="0.151cm" fo:padding-bottom="0.151cm" fo:padding-left="0.276cm" fo:padding-right="0.276cm" style:writing-mode="lr-tb" loext:decorative="false"/>
      <style:paragraph-properties style:writing-mode="lr-tb"/>
    </style:style>
    <style:style style:name="gr14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9.96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5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6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65"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6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P1" style:family="paragraph">
      <loext:graphic-properties draw:fill="none"/>
      <style:paragraph-properties fo:text-align="center"/>
    </style:style>
    <style:style style:name="P2" style:family="paragraph">
      <loext:graphic-properties draw:fill="none" draw:fill-color="#ffffff"/>
      <style:text-properties fo:font-size="12pt"/>
    </style:style>
    <style:style style:name="P3"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paragraph-properties fo:margin-left="0cm" fo:margin-right="0cm" fo:margin-top="0cm" fo:margin-bottom="0cm" fo:line-height="100%" fo:text-indent="0cm"/>
    </style:style>
    <style:style style:name="P12" style:family="paragraph">
      <style:paragraph-properties fo:margin-left="0cm" fo:margin-right="0cm" fo:text-align="center" fo:text-indent="0cm"/>
      <style:text-properties style:font-name="Liberation Sans" fo:font-size="18pt" style:letter-kerning="true" style:font-name-asian="Noto Sans CJK SC" style:font-size-asian="18pt" style:font-name-complex="Noto Sans Devanagari" style:font-size-complex="18pt"/>
    </style:style>
    <style:style style:name="P13" style:family="paragraph">
      <loext:graphic-properties draw:fill="none"/>
      <style:paragraph-properties fo:margin-left="0cm" fo:margin-right="0cm" fo:text-align="center" fo:text-indent="0cm" style:writing-mode="lr-tb"/>
      <style:text-properties style:font-name="Liberation Sans" fo:font-size="18pt" style:letter-kerning="true" style:font-name-asian="Noto Sans CJK SC" style:font-size-asian="18pt" style:font-name-complex="Noto Sans Devanagari" style:font-size-complex="18pt"/>
    </style:style>
    <style:style style:name="P14" style:family="paragraph">
      <style:text-properties fo:font-size="12pt" style:font-size-asian="12pt" style:font-size-complex="12pt"/>
    </style:style>
    <style:style style:name="P15" style:family="paragraph">
      <loext:graphic-properties draw:fill="none" draw:fill-color="#ffffff"/>
      <style:text-properties fo:font-size="12pt" style:font-size-asian="12pt" style:font-size-complex="12pt"/>
    </style:style>
    <style:style style:name="P16" style:family="paragraph">
      <style:paragraph-properties fo:text-align="center"/>
    </style:style>
    <style:style style:name="P17" style:family="paragraph">
      <loext:graphic-properties draw:fill="none"/>
      <style:paragraph-properties fo:text-align="center" style:writing-mode="lr-tb"/>
    </style:style>
    <style:style style:name="P18" style:family="paragraph">
      <style:text-properties fo:font-size="12pt"/>
    </style:style>
    <style:style style:name="T1" style:family="text">
      <style:text-properties fo:font-size="12pt"/>
    </style:style>
    <style:style style:name="T2"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RaspiOS" draw:style-name="dp1" draw:master-page-name="Default">
        <draw:custom-shape draw:style-name="gr1" draw:text-style-name="P1" draw:layer="layout" svg:width="24.525cm" svg:height="6.032cm" svg:x="4.175cm" svg:y="5.335cm">
          <text:p/>
          <draw:enhanced-geometry svg:viewBox="0 0 21600 21600" draw:mirror-horizontal="false" draw:mirror-vertical="false" draw:type="rectangle" draw:enhanced-path="M 0 0 L 21600 0 21600 21600 0 21600 0 0 Z N"/>
        </draw:custom-shape>
        <draw:frame draw:style-name="gr2" draw:text-style-name="P2" draw:layer="layout" svg:width="2.54cm" svg:height="1.199cm" svg:x="15.605cm" svg:y="12.43cm">
          <draw:text-box>
            <text:p><text:span text:style-name="T1">network_</text:span></text:p>
            <text:p><text:span text:style-name="T1">interfac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4" draw:text-style-name="P3" draw:layer="layout" svg:width="24.843cm" svg:height="5.715cm" svg:x="3.857cm" svg:y="14.0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 draw:text-style-name="P5" draw:layer="layout" svg:width="2.449cm" svg:height="0.779cm" svg:x="3.857cm" svg:y="14.017cm">
            <text:p text:style-name="P4"><text:span text:style-name="T2">RaspiOS</text:span></text:p>
            <draw:enhanced-geometry svg:viewBox="0 0 21600 21600" draw:type="non-primitve" draw:enhanced-path="M 0 0 L 21600 0 19000 21600 0 21600 0 0 Z N"/>
          </draw:custom-shape>
        </draw:g>
        <draw:frame draw:style-name="gr2" draw:text-style-name="P2" draw:layer="layout" svg:width="2.54cm" svg:height="1.199cm" svg:x="25.802cm" svg:y="12.747cm">
          <draw:text-box>
            <text:p><text:span text:style-name="T1">ALSA_</text:span></text:p>
            <text:p><text:span text:style-name="T1">interface</text:span></text:p>
          </draw:text-box>
        </draw:frame>
        <draw:g draw:style-name="gr3" xml:id="id3" draw:id="id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 draw:text-style-name="P7" xml:id="id1" draw:id="id1" draw:layer="layout" svg:width="3.93cm" svg:height="2cm" svg:x="24.077cm" svg:y="16.0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ALSA library</text:span></text:p>
            <draw:enhanced-geometry svg:viewBox="0 0 21600 21600" draw:type="rectangle" draw:enhanced-path="M 0 0 L 21600 0 21600 21600 0 21600 0 0 Z N"/>
          </draw:custom-shape>
          <draw:connector draw:style-name="gr7" draw:text-style-name="P8" draw:layer="layout" draw:type="line" svg:x1="27.537cm" svg:y1="16.357cm" svg:x2="27.537cm" svg:y2="16.607cm" draw:start-shape="id1" draw:start-glue-point="16" draw:end-shape="id1" draw:end-glue-point="17" svg:d="M27537 16357v250" svg:viewBox="0 0 1 251">
            <text:p/>
          </draw:connector>
        </draw:g>
        <draw:g draw:style-name="gr3" xml:id="id4" draw:id="id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 draw:text-style-name="P7" xml:id="id2" draw:id="id2" draw:layer="layout" svg:width="4.212cm" svg:height="2cm" svg:x="23.075cm" svg:y="7.25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system_sound</text:span></text:p>
            <draw:enhanced-geometry svg:viewBox="0 0 21600 21600" draw:type="rectangle" draw:enhanced-path="M 0 0 L 21600 0 21600 21600 0 21600 0 0 Z N"/>
          </draw:custom-shape>
          <draw:connector draw:style-name="gr9" draw:text-style-name="P8" draw:layer="layout" draw:type="line" svg:x1="26.817cm" svg:y1="7.532cm" svg:x2="26.817cm" svg:y2="7.782cm" draw:start-shape="id2" draw:start-glue-point="16" draw:end-shape="id2" draw:end-glue-point="17" svg:d="M26817 7532v250" svg:viewBox="0 0 1 251">
            <text:p/>
          </draw:connector>
        </draw:g>
        <draw:connector draw:style-name="gr10" draw:text-style-name="P9" xml:id="id5" draw:id="id5" draw:layer="layout" draw:type="line" svg:x1="24.863cm" svg:y1="16.08cm" svg:x2="25.663cm" svg:y2="12.496cm" draw:start-shape="id3" draw:start-glue-point="7" svg:d="M24863 16080l800-3584" svg:viewBox="0 0 801 3585">
          <text:p/>
        </draw:connector>
        <draw:connector draw:style-name="gr11" draw:text-style-name="P9" draw:layer="layout" draw:type="line" svg:x1="25.602cm" svg:y1="9.255cm" svg:x2="25.663cm" svg:y2="12.496cm" draw:start-shape="id4" draw:start-glue-point="12" draw:end-shape="id5" draw:end-glue-point="3" svg:d="M25602 9255l61 3241" svg:viewBox="0 0 62 3242">
          <text:p/>
        </draw:connector>
        <draw:g draw:style-name="gr3" xml:id="id25" draw:id="id2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 draw:text-style-name="P7" xml:id="id6" draw:id="id6" draw:layer="layout" svg:width="4.128cm" svg:height="2cm" svg:x="17.849cm" svg:y="7.2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remote_monitoring</text:span></text:p>
            <draw:enhanced-geometry svg:viewBox="0 0 21600 21600" draw:mirror-horizontal="false" draw:mirror-vertical="false" draw:type="rectangle" draw:enhanced-path="M 0 0 L 21600 0 21600 21600 0 21600 0 0 Z N"/>
          </draw:custom-shape>
          <draw:connector draw:style-name="gr13" draw:text-style-name="P8" draw:layer="layout" draw:type="line" svg:x1="21.507cm" svg:y1="7.574cm" svg:x2="21.507cm" svg:y2="7.824cm" draw:start-shape="id6" draw:start-glue-point="16" draw:end-shape="id6" draw:end-glue-point="17" svg:d="M21507 7574v250" svg:viewBox="0 0 1 251">
            <text:p/>
          </draw:connector>
        </draw:g>
        <draw:g draw:style-name="gr3" xml:id="id11" draw:id="id1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 draw:text-style-name="P7" xml:id="id7" draw:id="id7" draw:layer="layout" svg:width="4.128cm" svg:height="2cm" svg:x="7.342cm" svg:y="7.24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logging</text:span></text:p>
            <draw:enhanced-geometry svg:viewBox="0 0 21600 21600" draw:type="rectangle" draw:enhanced-path="M 0 0 L 21600 0 21600 21600 0 21600 0 0 Z N"/>
          </draw:custom-shape>
          <draw:connector draw:style-name="gr15" draw:text-style-name="P8" draw:layer="layout" draw:type="line" svg:x1="11cm" svg:y1="7.517cm" svg:x2="11cm" svg:y2="7.767cm" draw:start-shape="id7" draw:start-glue-point="16" draw:end-shape="id7" draw:end-glue-point="17" svg:d="M11000 7517v250" svg:viewBox="0 0 1 251">
            <text:p/>
          </draw:connector>
        </draw:g>
        <draw:g draw:style-name="gr3" xml:id="id10" draw:id="id1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 draw:text-style-name="P7" xml:id="id8" draw:id="id8" draw:layer="layout" svg:width="3.75cm" svg:height="2cm" svg:x="4.412cm" svg:y="15.9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console</text:span></text:p>
            <draw:enhanced-geometry svg:viewBox="0 0 21600 21600" draw:mirror-horizontal="false" draw:mirror-vertical="false" draw:type="rectangle" draw:enhanced-path="M 0 0 L 21600 0 21600 21600 0 21600 0 0 Z N"/>
          </draw:custom-shape>
          <draw:connector draw:style-name="gr17" draw:text-style-name="P8" draw:layer="layout" draw:type="line" svg:x1="7.692cm" svg:y1="16.234cm" svg:x2="7.692cm" svg:y2="16.484cm" draw:start-shape="id8" draw:start-glue-point="16" draw:end-shape="id8" draw:end-glue-point="17" svg:d="M7692 16234v250" svg:viewBox="0 0 1 251">
            <text:p/>
          </draw:connector>
        </draw:g>
        <draw:connector draw:style-name="gr18" draw:text-style-name="P9" xml:id="id13" draw:id="id13" draw:layer="layout" draw:type="line" svg:x1="10.415cm" svg:y1="15.957cm" svg:x2="9.805cm" svg:y2="12.762cm" draw:start-shape="id9" draw:start-glue-point="6" svg:d="M10415 15957l-610-3195" svg:viewBox="0 0 611 3196">
          <text:p/>
        </draw:connector>
        <draw:connector draw:style-name="gr19" draw:text-style-name="P9" xml:id="id12" draw:id="id12" draw:layer="layout" draw:type="line" svg:x1="7.412cm" svg:y1="15.957cm" svg:x2="7.097cm" svg:y2="12.886cm" draw:start-shape="id10" draw:start-glue-point="4" svg:d="M7412 15957l-315-3071" svg:viewBox="0 0 316 3072">
          <text:p/>
        </draw:connector>
        <draw:connector draw:style-name="gr20" draw:text-style-name="P9" draw:layer="layout" draw:type="line" svg:x1="8.168cm" svg:y1="9.24cm" svg:x2="7.097cm" svg:y2="12.886cm" draw:start-shape="id11" draw:start-glue-point="10" draw:end-shape="id12" draw:end-glue-point="3" svg:d="M8168 9240l-1071 3646" svg:viewBox="0 0 1072 3647">
          <text:p/>
        </draw:connector>
        <draw:connector draw:style-name="gr21" draw:text-style-name="P9" draw:layer="layout" draw:type="line" svg:x1="10.644cm" svg:y1="9.24cm" svg:x2="9.805cm" svg:y2="12.762cm" draw:start-shape="id11" draw:start-glue-point="13" draw:end-shape="id13" draw:end-glue-point="3" svg:d="M10644 9240l-839 3522" svg:viewBox="0 0 840 3523">
          <text:p/>
        </draw:connector>
        <draw:frame draw:style-name="gr22" draw:text-style-name="P2" draw:layer="layout" svg:width="2.223cm" svg:height="0.725cm" svg:x="4.81cm" svg:y="12.43cm">
          <draw:text-box>
            <text:p><text:span text:style-name="T1">stdout</text:span></text:p>
          </draw:text-box>
        </draw:frame>
        <draw:g draw:style-name="gr3" xml:id="id9" draw:id="id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3" draw:text-style-name="P7" xml:id="id14" draw:id="id14" draw:layer="layout" svg:width="3.75cm" svg:height="2cm" svg:x="8.915cm" svg:y="15.9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ile system</text:span></text:p>
            <draw:enhanced-geometry svg:viewBox="0 0 21600 21600" draw:type="rectangle" draw:enhanced-path="M 0 0 L 21600 0 21600 21600 0 21600 0 0 Z N"/>
          </draw:custom-shape>
          <draw:connector draw:style-name="gr24" draw:text-style-name="P8" draw:layer="layout" draw:type="line" svg:x1="12.195cm" svg:y1="16.234cm" svg:x2="12.195cm" svg:y2="16.484cm" draw:start-shape="id14" draw:start-glue-point="16" draw:end-shape="id14" draw:end-glue-point="17" svg:d="M12195 16234v250" svg:viewBox="0 0 1 251">
            <text:p/>
          </draw:connector>
        </draw:g>
        <draw:g draw:style-name="gr3" xml:id="id16" draw:id="id1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5" draw:text-style-name="P7" xml:id="id15" draw:id="id15" draw:layer="layout" svg:width="4.345cm" svg:height="2cm" svg:x="13.622cm" svg:y="16.04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network manager</text:span></text:p>
            <draw:enhanced-geometry svg:viewBox="0 0 21600 21600" draw:type="rectangle" draw:enhanced-path="M 0 0 L 21600 0 21600 21600 0 21600 0 0 Z N"/>
          </draw:custom-shape>
          <draw:connector draw:style-name="gr26" draw:text-style-name="P8" draw:layer="layout" draw:type="line" svg:x1="17.497cm" svg:y1="16.317cm" svg:x2="17.497cm" svg:y2="16.567cm" draw:start-shape="id15" draw:start-glue-point="16" draw:end-shape="id15" draw:end-glue-point="17" svg:d="M17497 16317v250" svg:viewBox="0 0 1 251">
            <text:p/>
          </draw:connector>
        </draw:g>
        <draw:connector draw:style-name="gr27" draw:text-style-name="P9" xml:id="id18" draw:id="id18" draw:layer="layout" draw:type="line" svg:x1="14.491cm" svg:y1="16.04cm" svg:x2="14.256cm" svg:y2="13.291cm" draw:start-shape="id16" draw:start-glue-point="7" svg:d="M14491 16040l-235-2749" svg:viewBox="0 0 236 2750">
          <text:p/>
        </draw:connector>
        <draw:connector draw:style-name="gr28" draw:text-style-name="P9" draw:layer="layout" draw:type="line" svg:x1="15.058cm" svg:y1="9.255cm" svg:x2="14.256cm" svg:y2="13.291cm" draw:start-shape="id17" draw:start-glue-point="12" draw:end-shape="id18" draw:end-glue-point="3" svg:d="M15058 9255l-802 4036" svg:viewBox="0 0 803 4037">
          <text:p/>
        </draw:connector>
        <draw:frame draw:style-name="gr29" draw:text-style-name="P11" draw:layer="layout" svg:width="3.175cm" svg:height="1.27cm" svg:x="10.425cm" svg:y="12.212cm">
          <draw:text-box>
            <text:p text:style-name="P10"><text:span text:style-name="T1">file_system_</text:span></text:p>
            <text:p text:style-name="P10"><text:span text:style-name="T1">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0" draw:text-style-name="P7" xml:id="id19" draw:id="id19" draw:layer="layout" svg:width="3.75cm" svg:height="2cm" svg:x="8.62cm" svg:y="22.5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ght_sensor</text:span></text:p>
            <draw:enhanced-geometry svg:viewBox="0 0 21600 21600" draw:type="rectangle" draw:enhanced-path="M 0 0 L 21600 0 21600 21600 0 21600 0 0 Z N"/>
          </draw:custom-shape>
          <draw:connector draw:style-name="gr31" draw:text-style-name="P8" draw:layer="layout" draw:type="line" svg:x1="11.9cm" svg:y1="22.867cm" svg:x2="11.9cm" svg:y2="23.117cm" draw:start-shape="id19" draw:start-glue-point="16" draw:end-shape="id19" draw:end-glue-point="17" svg:d="M11900 22867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2" draw:text-style-name="P7" xml:id="id20" draw:id="id20" draw:layer="layout" svg:width="3.75cm" svg:height="2cm" svg:x="13.065cm" svg:y="22.5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da_converter</text:span></text:p>
            <draw:enhanced-geometry svg:viewBox="0 0 21600 21600" draw:type="rectangle" draw:enhanced-path="M 0 0 L 21600 0 21600 21600 0 21600 0 0 Z N"/>
          </draw:custom-shape>
          <draw:connector draw:style-name="gr33" draw:text-style-name="P8" draw:layer="layout" draw:type="line" svg:x1="16.345cm" svg:y1="22.867cm" svg:x2="16.345cm" svg:y2="23.117cm" draw:start-shape="id20" draw:start-glue-point="16" draw:end-shape="id20" draw:end-glue-point="17" svg:d="M16345 22867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4" draw:text-style-name="P7" xml:id="id21" draw:id="id21" draw:layer="layout" svg:width="4.068cm" svg:height="2cm" svg:x="18.145cm" svg:y="24.4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35" draw:text-style-name="P8" draw:layer="layout" draw:type="line" svg:x1="21.743cm" svg:y1="24.772cm" svg:x2="21.743cm" svg:y2="25.022cm" draw:start-shape="id21" draw:start-glue-point="16" draw:end-shape="id21" draw:end-glue-point="17" svg:d="M21743 24772v250" svg:viewBox="0 0 1 251">
            <text:p/>
          </draw:connector>
        </draw:g>
        <draw:custom-shape draw:style-name="gr36" draw:text-style-name="P13" draw:layer="layout" svg:width="24.525cm" svg:height="0.952cm" svg:x="4.175cm" svg:y="4.4cm">
          <text:p text:style-name="P12">Components Interface: raspiOS</text:p>
          <draw:enhanced-geometry svg:viewBox="0 0 21600 21600" draw:type="rectangle" draw:enhanced-path="M 0 0 L 21600 0 21600 21600 0 21600 0 0 Z N"/>
        </draw:custom-shape>
        <draw:g draw:style-name="gr3" xml:id="id17" draw:id="id1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7" draw:text-style-name="P7" xml:id="id22" draw:id="id22" draw:layer="layout" svg:width="4.128cm" svg:height="2cm" svg:x="12.582cm" svg:y="7.25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wifi_service</text:span></text:p>
            <draw:enhanced-geometry svg:viewBox="0 0 21600 21600" draw:mirror-horizontal="false" draw:mirror-vertical="false" draw:type="rectangle" draw:enhanced-path="M 0 0 L 21600 0 21600 21600 0 21600 0 0 Z N"/>
          </draw:custom-shape>
          <draw:connector draw:style-name="gr38" draw:text-style-name="P8" draw:layer="layout" draw:type="line" svg:x1="16.24cm" svg:y1="7.532cm" svg:x2="16.24cm" svg:y2="7.782cm" draw:start-shape="id22" draw:start-glue-point="16" draw:end-shape="id22" draw:end-glue-point="17" svg:d="M16240 7532v250" svg:viewBox="0 0 1 251">
            <text:p/>
          </draw:connector>
        </draw:g>
        <draw:g draw:style-name="gr3" xml:id="id24" draw:id="id2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9" draw:text-style-name="P7" xml:id="id23" draw:id="id23" draw:layer="layout" svg:width="3.93cm" svg:height="2cm" svg:x="19.077cm" svg:y="16.02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HTTP library</text:span></text:p>
            <draw:enhanced-geometry svg:viewBox="0 0 21600 21600" draw:type="rectangle" draw:enhanced-path="M 0 0 L 21600 0 21600 21600 0 21600 0 0 Z N"/>
          </draw:custom-shape>
          <draw:connector draw:style-name="gr40" draw:text-style-name="P8" draw:layer="layout" draw:type="line" svg:x1="22.537cm" svg:y1="16.299cm" svg:x2="22.537cm" svg:y2="16.549cm" draw:start-shape="id23" draw:start-glue-point="16" draw:end-shape="id23" draw:end-glue-point="17" svg:d="M22537 16299v250" svg:viewBox="0 0 1 251">
            <text:p/>
          </draw:connector>
        </draw:g>
        <draw:connector draw:style-name="gr41" draw:text-style-name="P9" xml:id="id26" draw:id="id26" draw:layer="layout" draw:type="line" svg:x1="20.649cm" svg:y1="16.022cm" svg:x2="20.108cm" svg:y2="13.135cm" draw:start-shape="id24" draw:start-glue-point="6" svg:d="M20649 16022l-541-2887" svg:viewBox="0 0 542 2888">
          <text:p/>
        </draw:connector>
        <draw:connector draw:style-name="gr42" draw:text-style-name="P9" draw:layer="layout" draw:type="line" svg:x1="21.151cm" svg:y1="9.297cm" svg:x2="20.108cm" svg:y2="13.135cm" draw:start-shape="id25" draw:start-glue-point="13" draw:end-shape="id26" draw:end-glue-point="3" svg:d="M21151 9297l-1043 3838" svg:viewBox="0 0 1044 3839">
          <text:p/>
        </draw:connector>
        <draw:frame draw:style-name="gr43" draw:text-style-name="P15" draw:layer="layout" svg:width="2.857cm" svg:height="1.199cm" svg:x="20.685cm" svg:y="12.183cm">
          <draw:text-box>
            <text:p text:style-name="P14"><text:span text:style-name="T5">requests_</text:span></text:p>
            <text:p text:style-name="P14"><text:span text:style-name="T5">interface</text:span></text:p>
          </draw:text-box>
        </draw:frame>
      </draw:page>
      <draw:page draw:name="gpio" draw:style-name="dp1" draw:master-page-name="Default">
        <draw:custom-shape draw:style-name="gr44" draw:text-style-name="P1" draw:layer="layout" svg:width="28.257cm" svg:height="9.842cm" svg:x="1cm" svg:y="1.635cm">
          <text:p/>
          <draw:enhanced-geometry svg:viewBox="0 0 21600 21600" draw:mirror-horizontal="false" draw:mirror-vertical="false" draw:type="rectangle" draw:enhanced-path="M 0 0 L 21600 0 21600 21600 0 21600 0 0 Z N"/>
        </draw:custom-shape>
        <draw:frame draw:style-name="gr2" draw:text-style-name="P2" xml:id="id49" draw:id="id49" draw:layer="layout" svg:width="2.54cm" svg:height="1.199cm" svg:x="6.932cm" svg:y="12.43cm">
          <draw:text-box>
            <text:p><text:span text:style-name="T1">network_</text:span></text:p>
            <text:p><text:span text:style-name="T1">interfac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45" draw:text-style-name="P3" draw:layer="layout" svg:width="27.94cm" svg:height="5.715cm" svg:x="1cm" svg:y="14.0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46" draw:text-style-name="P5" draw:layer="layout" svg:width="2.449cm" svg:height="0.779cm" svg:x="1cm" svg:y="14.017cm">
            <text:p text:style-name="P4"><text:span text:style-name="T2">RaspiOS</text:span></text:p>
            <draw:enhanced-geometry svg:viewBox="0 0 21600 21600" draw:type="non-primitve" draw:enhanced-path="M 0 0 L 21600 0 19000 21600 0 21600 0 0 Z N"/>
          </draw:custom-shape>
        </draw:g>
        <draw:frame draw:style-name="gr2" draw:text-style-name="P2" draw:layer="layout" svg:width="2.54cm" svg:height="1.199cm" svg:x="21.102cm" svg:y="12.747cm">
          <draw:text-box>
            <text:p><text:span text:style-name="T1">ALSA_</text:span></text:p>
            <text:p><text:span text:style-name="T1">interface</text:span></text:p>
          </draw:text-box>
        </draw:frame>
        <draw:g draw:style-name="gr3" xml:id="id66" draw:id="id6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7" draw:text-style-name="P7" xml:id="id27" draw:id="id27" draw:layer="layout" svg:width="3.04cm" svg:height="2cm" svg:x="20.367cm" svg:y="16.7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ALSA library</text:span></text:p>
            <draw:enhanced-geometry svg:viewBox="0 0 21600 21600" draw:type="rectangle" draw:enhanced-path="M 0 0 L 21600 0 21600 21600 0 21600 0 0 Z N"/>
          </draw:custom-shape>
          <draw:connector draw:style-name="gr48" draw:text-style-name="P8" draw:layer="layout" draw:type="line" svg:x1="22.937cm" svg:y1="17.057cm" svg:x2="22.937cm" svg:y2="17.307cm" draw:start-shape="id27" draw:start-glue-point="16" draw:end-shape="id27" draw:end-glue-point="17" svg:d="M22937 17057v250" svg:viewBox="0 0 1 251">
            <text:p/>
          </draw:connector>
        </draw:g>
        <draw:g draw:style-name="gr3" xml:id="id29" draw:id="id2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9" draw:text-style-name="P7" xml:id="id28" draw:id="id28" draw:layer="layout" svg:width="3.75cm" svg:height="2cm" svg:x="19.075cm" svg:y="7.25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system_sound</text:span></text:p>
            <draw:enhanced-geometry svg:viewBox="0 0 21600 21600" draw:type="rectangle" draw:enhanced-path="M 0 0 L 21600 0 21600 21600 0 21600 0 0 Z N"/>
          </draw:custom-shape>
          <draw:connector draw:style-name="gr50" draw:text-style-name="P8" draw:layer="layout" draw:type="line" svg:x1="22.355cm" svg:y1="7.532cm" svg:x2="22.355cm" svg:y2="7.782cm" draw:start-shape="id28" draw:start-glue-point="16" draw:end-shape="id28" draw:end-glue-point="17" svg:d="M22355 7532v250" svg:viewBox="0 0 1 251">
            <text:p/>
          </draw:connector>
        </draw:g>
        <draw:connector draw:style-name="gr51" draw:text-style-name="P9" xml:id="id30" draw:id="id30" draw:layer="layout" draw:type="line" svg:x1="21.004cm" svg:y1="14.898cm" svg:x2="20.963cm" svg:y2="12.496cm" svg:d="M21004 14898l-41-2402" svg:viewBox="0 0 42 2403">
          <text:p/>
        </draw:connector>
        <draw:connector draw:style-name="gr52" draw:text-style-name="P9" draw:layer="layout" draw:type="line" svg:x1="21.325cm" svg:y1="9.255cm" svg:x2="20.963cm" svg:y2="12.496cm" draw:start-shape="id29" draw:start-glue-point="12" draw:end-shape="id30" draw:end-glue-point="3" svg:d="M21325 9255l-362 3241" svg:viewBox="0 0 363 3242">
          <text:p/>
        </draw:connector>
        <draw:g draw:style-name="gr3" xml:id="id62" draw:id="id6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53" draw:text-style-name="P7" xml:id="id31" draw:id="id31" draw:layer="layout" svg:width="4.128cm" svg:height="2cm" svg:x="4.249cm" svg:y="4.3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remote_monitoring</text:span></text:p>
            <draw:enhanced-geometry svg:viewBox="0 0 21600 21600" draw:mirror-horizontal="false" draw:mirror-vertical="false" draw:type="rectangle" draw:enhanced-path="M 0 0 L 21600 0 21600 21600 0 21600 0 0 Z N"/>
          </draw:custom-shape>
          <draw:connector draw:style-name="gr54" draw:text-style-name="P8" draw:layer="layout" draw:type="line" svg:x1="7.907cm" svg:y1="4.674cm" svg:x2="7.907cm" svg:y2="4.924cm" draw:start-shape="id31" draw:start-glue-point="16" draw:end-shape="id31" draw:end-glue-point="17" svg:d="M7907 4674v250" svg:viewBox="0 0 1 251">
            <text:p/>
          </draw:connector>
        </draw:g>
        <draw:g draw:style-name="gr3" xml:id="id44" draw:id="id4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55" draw:text-style-name="P7" xml:id="id32" draw:id="id32" draw:layer="layout" svg:width="4.128cm" svg:height="2cm" svg:x="1.752cm" svg:y="7.6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logging</text:span></text:p>
            <draw:enhanced-geometry svg:viewBox="0 0 21600 21600" draw:type="rectangle" draw:enhanced-path="M 0 0 L 21600 0 21600 21600 0 21600 0 0 Z N"/>
          </draw:custom-shape>
          <draw:connector draw:style-name="gr56" draw:text-style-name="P8" draw:layer="layout" draw:type="line" svg:x1="5.41cm" svg:y1="7.944cm" svg:x2="5.41cm" svg:y2="8.194cm" draw:start-shape="id32" draw:start-glue-point="16" draw:end-shape="id32" draw:end-glue-point="17" svg:d="M5410 7944v250" svg:viewBox="0 0 1 251">
            <text:p/>
          </draw:connector>
        </draw:g>
        <draw:g draw:style-name="gr3" xml:id="id35" draw:id="id3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57" draw:text-style-name="P7" xml:id="id33" draw:id="id33" draw:layer="layout" svg:width="3.523cm" svg:height="2cm" svg:x="24.177cm" svg:y="16.7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MPD server</text:span></text:p>
            <draw:enhanced-geometry svg:viewBox="0 0 21600 21600" draw:type="rectangle" draw:enhanced-path="M 0 0 L 21600 0 21600 21600 0 21600 0 0 Z N"/>
          </draw:custom-shape>
          <draw:connector draw:style-name="gr58" draw:text-style-name="P8" draw:layer="layout" draw:type="line" svg:x1="27.23cm" svg:y1="17.057cm" svg:x2="27.23cm" svg:y2="17.307cm" draw:start-shape="id33" draw:start-glue-point="16" draw:end-shape="id33" draw:end-glue-point="17" svg:d="M27230 17057v250" svg:viewBox="0 0 1 251">
            <text:p/>
          </draw:connector>
        </draw:g>
        <draw:g draw:style-name="gr3" xml:id="id65" draw:id="id6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59" draw:text-style-name="P7" xml:id="id34" draw:id="id34" draw:layer="layout" svg:width="4.128cm" svg:height="2cm" svg:x="21.837cm" svg:y="4.3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mpd_control</text:span></text:p>
            <draw:enhanced-geometry svg:viewBox="0 0 21600 21600" draw:type="rectangle" draw:enhanced-path="M 0 0 L 21600 0 21600 21600 0 21600 0 0 Z N"/>
          </draw:custom-shape>
          <draw:connector draw:style-name="gr60" draw:text-style-name="P8" draw:layer="layout" draw:type="line" svg:x1="25.495cm" svg:y1="4.587cm" svg:x2="25.495cm" svg:y2="4.837cm" draw:start-shape="id34" draw:start-glue-point="16" draw:end-shape="id34" draw:end-glue-point="17" svg:d="M25495 4587v250" svg:viewBox="0 0 1 251">
            <text:p/>
          </draw:connector>
        </draw:g>
        <draw:frame draw:style-name="gr61" draw:text-style-name="P2" draw:layer="layout" svg:width="2.54cm" svg:height="1.588cm" svg:x="26.282cm" svg:y="12.647cm">
          <draw:text-box>
            <text:p><text:span text:style-name="T1">event_</text:span></text:p>
            <text:p><text:span text:style-name="T1">interface</text:span></text:p>
          </draw:text-box>
        </draw:frame>
        <draw:frame draw:style-name="gr62" draw:text-style-name="P2" draw:layer="layout" svg:width="2.54cm" svg:height="1.27cm" svg:x="23.525cm" svg:y="12.23cm">
          <draw:text-box>
            <text:p><text:span text:style-name="T1">playback_</text:span></text:p>
            <text:p><text:span text:style-name="T1">interface</text:span></text:p>
          </draw:text-box>
        </draw:frame>
        <draw:connector draw:style-name="gr63" draw:text-style-name="P9" xml:id="id37" draw:id="id37" draw:layer="layout" draw:type="line" svg:x1="24.882cm" svg:y1="16.78cm" svg:x2="23.121cm" svg:y2="12.089cm" draw:start-shape="id35" draw:start-glue-point="7" svg:d="M24882 16780l-1761-4691" svg:viewBox="0 0 1762 4692">
          <text:p/>
        </draw:connector>
        <draw:connector draw:style-name="gr64" draw:text-style-name="P9" xml:id="id39" draw:id="id39" draw:layer="layout" draw:type="line" svg:x1="26.994cm" svg:y1="16.78cm" svg:x2="25.889cm" svg:y2="12.455cm" draw:start-shape="id35" draw:start-glue-point="4" svg:d="M26994 16780l-1105-4325" svg:viewBox="0 0 1106 4326">
          <text:p/>
        </draw:connector>
        <draw:g draw:style-name="gr3" xml:id="id38" draw:id="id3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5" draw:text-style-name="P7" xml:id="id36" draw:id="id36" draw:layer="layout" svg:width="4.128cm" svg:height="2cm" svg:x="24.63cm" svg:y="7.25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mpd_monitor</text:span></text:p>
            <draw:enhanced-geometry svg:viewBox="0 0 21600 21600" draw:type="rectangle" draw:enhanced-path="M 0 0 L 21600 0 21600 21600 0 21600 0 0 Z N"/>
          </draw:custom-shape>
          <draw:connector draw:style-name="gr66" draw:text-style-name="P8" draw:layer="layout" draw:type="line" svg:x1="28.288cm" svg:y1="7.532cm" svg:x2="28.288cm" svg:y2="7.782cm" draw:start-shape="id36" draw:start-glue-point="16" draw:end-shape="id36" draw:end-glue-point="17" svg:d="M28288 7532v250" svg:viewBox="0 0 1 251">
            <text:p/>
          </draw:connector>
        </draw:g>
        <draw:connector draw:style-name="gr67" draw:text-style-name="P9" xml:id="id64" draw:id="id64" draw:layer="layout" draw:type="line" svg:x1="23.813cm" svg:y1="10.299cm" svg:x2="23.121cm" svg:y2="12.089cm" draw:end-shape="id37" draw:end-glue-point="3" svg:d="M23813 10299l-692 1790" svg:viewBox="0 0 693 1791">
          <text:p/>
        </draw:connector>
        <draw:connector draw:style-name="gr68" draw:text-style-name="P9" draw:layer="layout" draw:type="line" svg:x1="26.282cm" svg:y1="9.255cm" svg:x2="25.889cm" svg:y2="12.455cm" draw:start-shape="id38" draw:start-glue-point="11" draw:end-shape="id39" draw:end-glue-point="3" svg:d="M26282 9255l-393 3200" svg:viewBox="0 0 394 3201">
          <text:p/>
        </draw:connector>
        <draw:g draw:style-name="gr3" xml:id="id41" draw:id="id4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9" draw:text-style-name="P7" xml:id="id40" draw:id="id40" draw:layer="layout" svg:width="3.75cm" svg:height="2cm" svg:x="2.112cm" svg:y="17.3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console</text:span></text:p>
            <draw:enhanced-geometry svg:viewBox="0 0 21600 21600" draw:mirror-horizontal="false" draw:mirror-vertical="false" draw:type="rectangle" draw:enhanced-path="M 0 0 L 21600 0 21600 21600 0 21600 0 0 Z N"/>
          </draw:custom-shape>
          <draw:connector draw:style-name="gr70" draw:text-style-name="P8" draw:layer="layout" draw:type="line" svg:x1="5.392cm" svg:y1="17.634cm" svg:x2="5.392cm" svg:y2="17.884cm" draw:start-shape="id40" draw:start-glue-point="16" draw:end-shape="id40" draw:end-glue-point="17" svg:d="M5392 17634v250" svg:viewBox="0 0 1 251">
            <text:p/>
          </draw:connector>
        </draw:g>
        <draw:connector draw:style-name="gr71" draw:text-style-name="P9" draw:layer="layout" draw:type="line" svg:x1="3.612cm" svg:y1="17.357cm" svg:x2="3.739cm" svg:y2="13.247cm" draw:start-shape="id41" draw:start-glue-point="6" draw:end-shape="id42" draw:end-glue-point="3" svg:d="M3612 17357l127-4110" svg:viewBox="0 0 128 4111">
          <text:p/>
        </draw:connector>
        <draw:connector draw:style-name="gr72" draw:text-style-name="P9" xml:id="id45" draw:id="id45" draw:layer="layout" draw:type="line" svg:x1="6.665cm" svg:y1="14.857cm" svg:x2="6.595cm" svg:y2="13.27cm" draw:start-shape="id43" draw:start-glue-point="5" svg:d="M6665 14857l-70-1587" svg:viewBox="0 0 71 1588">
          <text:p/>
        </draw:connector>
        <draw:connector draw:style-name="gr73" draw:text-style-name="P9" draw:layer="layout" draw:type="line" svg:x1="2.578cm" svg:y1="9.667cm" svg:x2="3.739cm" svg:y2="13.247cm" draw:start-shape="id44" draw:start-glue-point="10" draw:end-shape="id42" draw:end-glue-point="3" svg:d="M2578 9667l1161 3580" svg:viewBox="0 0 1162 3581">
          <text:p/>
        </draw:connector>
        <draw:connector draw:style-name="gr74" draw:text-style-name="P9" draw:layer="layout" draw:type="line" svg:x1="5.054cm" svg:y1="9.667cm" svg:x2="6.595cm" svg:y2="13.27cm" draw:start-shape="id44" draw:start-glue-point="13" draw:end-shape="id45" draw:end-glue-point="3" svg:d="M5054 9667l1541 3603" svg:viewBox="0 0 1542 3604">
          <text:p/>
        </draw:connector>
        <draw:frame draw:style-name="gr61" draw:text-style-name="P2" draw:layer="layout" svg:width="2.223cm" svg:height="1.588cm" svg:x="1.652cm" svg:y="11.795cm">
          <draw:text-box>
            <text:p><text:span text:style-name="T1">stdout</text:span></text:p>
          </draw:text-box>
        </draw:frame>
        <draw:g draw:style-name="gr3" xml:id="id43" draw:id="id4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5" draw:text-style-name="P7" xml:id="id46" draw:id="id46" draw:layer="layout" svg:width="3.75cm" svg:height="2cm" svg:x="4.415cm" svg:y="14.8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ile system</text:span></text:p>
            <draw:enhanced-geometry svg:viewBox="0 0 21600 21600" draw:type="rectangle" draw:enhanced-path="M 0 0 L 21600 0 21600 21600 0 21600 0 0 Z N"/>
          </draw:custom-shape>
          <draw:connector draw:style-name="gr76" draw:text-style-name="P8" draw:layer="layout" draw:type="line" svg:x1="7.695cm" svg:y1="15.134cm" svg:x2="7.695cm" svg:y2="15.384cm" draw:start-shape="id46" draw:start-glue-point="16" draw:end-shape="id46" draw:end-glue-point="17" svg:d="M7695 15134v250" svg:viewBox="0 0 1 251">
            <text:p/>
          </draw:connector>
        </draw:g>
        <draw:g draw:style-name="gr3" xml:id="id48" draw:id="id4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7" draw:text-style-name="P7" xml:id="id47" draw:id="id47" draw:layer="layout" svg:width="3.75cm" svg:height="2cm" svg:x="7.327cm" svg:y="17.41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network manager</text:span></text:p>
            <draw:enhanced-geometry svg:viewBox="0 0 21600 21600" draw:type="rectangle" draw:enhanced-path="M 0 0 L 21600 0 21600 21600 0 21600 0 0 Z N"/>
          </draw:custom-shape>
          <draw:connector draw:style-name="gr78" draw:text-style-name="P8" draw:layer="layout" draw:type="line" svg:x1="10.607cm" svg:y1="17.692cm" svg:x2="10.607cm" svg:y2="17.942cm" draw:start-shape="id47" draw:start-glue-point="16" draw:end-shape="id47" draw:end-glue-point="17" svg:d="M10607 17692v250" svg:viewBox="0 0 1 251">
            <text:p/>
          </draw:connector>
        </draw:g>
        <draw:connector draw:style-name="gr79" draw:text-style-name="P9" draw:layer="layout" draw:type="line" svg:x1="8.827cm" svg:y1="17.415cm" svg:x2="9.472cm" svg:y2="13.029cm" draw:start-shape="id48" draw:start-glue-point="6" draw:end-shape="id49" draw:end-glue-point="1" svg:d="M8827 17415l645-4386" svg:viewBox="0 0 646 4387">
          <text:p/>
        </draw:connector>
        <draw:connector draw:style-name="gr80" draw:text-style-name="P9" xml:id="id61" draw:id="id61" draw:layer="layout" draw:type="line" svg:x1="7.531cm" svg:y1="10.461cm" svg:x2="9.472cm" svg:y2="13.029cm" draw:end-shape="id49" draw:end-glue-point="1" svg:d="M7531 10461l1941 2568" svg:viewBox="0 0 1942 2569">
          <text:p/>
        </draw:connector>
        <draw:g draw:style-name="gr3" xml:id="id63" draw:id="id6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1" draw:text-style-name="P7" xml:id="id50" draw:id="id50" draw:layer="layout" svg:width="5.398cm" svg:height="2cm" svg:x="10.524cm" svg:y="4.42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power_supply_control</text:span></text:p>
            <draw:enhanced-geometry svg:viewBox="0 0 21600 21600" draw:type="rectangle" draw:enhanced-path="M 0 0 L 21600 0 21600 21600 0 21600 0 0 Z N"/>
          </draw:custom-shape>
          <draw:connector draw:style-name="gr82" draw:text-style-name="P8" draw:layer="layout" draw:type="line" svg:x1="15.452cm" svg:y1="4.704cm" svg:x2="15.452cm" svg:y2="4.954cm" draw:start-shape="id50" draw:start-glue-point="16" draw:end-shape="id50" draw:end-glue-point="17" svg:d="M15452 4704v250" svg:viewBox="0 0 1 251">
            <text:p/>
          </draw:connector>
        </draw:g>
        <draw:g draw:style-name="gr3" xml:id="id57" draw:id="id5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3" draw:text-style-name="P7" xml:id="id51" draw:id="id51" draw:layer="layout" svg:width="4.128cm" svg:height="2cm" svg:x="8.077cm" svg:y="8.17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acklighting</text:span></text:p>
            <draw:enhanced-geometry svg:viewBox="0 0 21600 21600" draw:type="rectangle" draw:enhanced-path="M 0 0 L 21600 0 21600 21600 0 21600 0 0 Z N"/>
          </draw:custom-shape>
          <draw:connector draw:style-name="gr84" draw:text-style-name="P8" draw:layer="layout" draw:type="line" svg:x1="11.735cm" svg:y1="8.449cm" svg:x2="11.735cm" svg:y2="8.699cm" draw:start-shape="id51" draw:start-glue-point="16" draw:end-shape="id51" draw:end-glue-point="17" svg:d="M11735 8449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5" draw:text-style-name="P7" xml:id="id52" draw:id="id52" draw:layer="layout" svg:width="4.128cm" svg:height="2cm" svg:x="14.017cm" svg:y="7.3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led_control</text:span></text:p>
            <draw:enhanced-geometry svg:viewBox="0 0 21600 21600" draw:type="rectangle" draw:enhanced-path="M 0 0 L 21600 0 21600 21600 0 21600 0 0 Z N"/>
          </draw:custom-shape>
          <draw:connector draw:style-name="gr86" draw:text-style-name="P8" draw:layer="layout" draw:type="line" svg:x1="17.675cm" svg:y1="7.627cm" svg:x2="17.675cm" svg:y2="7.877cm" draw:start-shape="id52" draw:start-glue-point="16" draw:end-shape="id52" draw:end-glue-point="17" svg:d="M17675 7627v250" svg:viewBox="0 0 1 251">
            <text:p/>
          </draw:connector>
        </draw:g>
        <draw:frame draw:style-name="gr87" draw:text-style-name="P11" xml:id="id42" draw:id="id42" draw:layer="layout" svg:width="3.493cm" svg:height="1.27cm" svg:x="3.739cm" svg:y="12.612cm">
          <draw:text-box>
            <text:p text:style-name="P10"><text:span text:style-name="T1">file_syste</text:span><text:span text:style-name="T1">m_</text:span></text:p>
            <text:p text:style-name="P10"><text:span text:style-name="T1">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8" draw:text-style-name="P7" xml:id="id53" draw:id="id53" draw:layer="layout" svg:width="3.75cm" svg:height="2cm" svg:x="8.62cm" svg:y="22.5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ght_sensor</text:span></text:p>
            <draw:enhanced-geometry svg:viewBox="0 0 21600 21600" draw:type="rectangle" draw:enhanced-path="M 0 0 L 21600 0 21600 21600 0 21600 0 0 Z N"/>
          </draw:custom-shape>
          <draw:connector draw:style-name="gr89" draw:text-style-name="P8" draw:layer="layout" draw:type="line" svg:x1="11.9cm" svg:y1="22.867cm" svg:x2="11.9cm" svg:y2="23.117cm" draw:start-shape="id53" draw:start-glue-point="16" draw:end-shape="id53" draw:end-glue-point="17" svg:d="M11900 22867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0" draw:text-style-name="P7" xml:id="id54" draw:id="id54" draw:layer="layout" svg:width="3.75cm" svg:height="2cm" svg:x="13.065cm" svg:y="22.5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da_converter</text:span></text:p>
            <draw:enhanced-geometry svg:viewBox="0 0 21600 21600" draw:type="rectangle" draw:enhanced-path="M 0 0 L 21600 0 21600 21600 0 21600 0 0 Z N"/>
          </draw:custom-shape>
          <draw:connector draw:style-name="gr91" draw:text-style-name="P8" draw:layer="layout" draw:type="line" svg:x1="16.345cm" svg:y1="22.867cm" svg:x2="16.345cm" svg:y2="23.117cm" draw:start-shape="id54" draw:start-glue-point="16" draw:end-shape="id54" draw:end-glue-point="17" svg:d="M16345 22867v250" svg:viewBox="0 0 1 251">
            <text:p/>
          </draw:connector>
        </draw:g>
        <draw:g draw:style-name="gr3" xml:id="id56" draw:id="id5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2" draw:text-style-name="P7" xml:id="id55" draw:id="id55" draw:layer="layout" svg:width="3.75cm" svg:height="2cm" svg:x="10.342cm" svg:y="14.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93" draw:text-style-name="P8" draw:layer="layout" draw:type="line" svg:x1="13.622cm" svg:y1="15.247cm" svg:x2="13.622cm" svg:y2="15.497cm" draw:start-shape="id55" draw:start-glue-point="16" draw:end-shape="id55" draw:end-glue-point="17" svg:d="M13622 15247v250" svg:viewBox="0 0 1 251">
            <text:p/>
          </draw:connector>
        </draw:g>
        <draw:connector draw:style-name="gr94" draw:text-style-name="P9" xml:id="id58" draw:id="id58" draw:layer="layout" draw:type="line" svg:x1="11.842cm" svg:y1="14.97cm" svg:x2="12.415cm" svg:y2="12.822cm" draw:start-shape="id56" draw:start-glue-point="6" svg:d="M11842 14970l573-2148" svg:viewBox="0 0 574 2149">
          <text:p/>
        </draw:connector>
        <draw:connector draw:style-name="gr95" draw:text-style-name="P9" draw:layer="layout" draw:type="line" svg:x1="11.379cm" svg:y1="10.172cm" svg:x2="12.415cm" svg:y2="12.822cm" draw:start-shape="id57" draw:start-glue-point="13" draw:end-shape="id58" draw:end-glue-point="3" svg:d="M11379 10172l1036 2650" svg:viewBox="0 0 1037 2651">
          <text:p/>
        </draw:connector>
        <draw:frame draw:style-name="gr62" draw:text-style-name="P15" draw:layer="layout" svg:width="2.54cm" svg:height="1.27cm" svg:x="10.207cm" svg:y="12.43cm">
          <draw:text-box>
            <text:p><text:span text:style-name="T5">i2c_</text:span></text:p>
            <text:p><text:span text:style-name="T5">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6" draw:text-style-name="P7" xml:id="id59" draw:id="id59" draw:layer="layout" svg:width="4.068cm" svg:height="2cm" svg:x="18.145cm" svg:y="24.4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97" draw:text-style-name="P8" draw:layer="layout" draw:type="line" svg:x1="21.743cm" svg:y1="24.772cm" svg:x2="21.743cm" svg:y2="25.022cm" draw:start-shape="id59" draw:start-glue-point="16" draw:end-shape="id59" draw:end-glue-point="17" svg:d="M21743 24772v250" svg:viewBox="0 0 1 251">
            <text:p/>
          </draw:connector>
        </draw:g>
        <draw:connector draw:style-name="gr98" draw:text-style-name="P9" draw:layer="layout" draw:type="line" svg:x1="13.352cm" svg:y1="10.258cm" svg:x2="12.415cm" svg:y2="12.822cm" draw:start-shape="id60" draw:start-glue-point="2" draw:end-shape="id58" draw:end-glue-point="3" svg:d="M13352 10258l-937 2564" svg:viewBox="0 0 938 2565">
          <text:p/>
        </draw:connector>
        <draw:connector draw:style-name="gr99" draw:text-style-name="P16" draw:layer="layout" draw:line-skew="-1.012cm" svg:x1="7.531cm" svg:y1="10.461cm" svg:x2="6.725cm" svg:y2="6.397cm" draw:start-shape="id61" draw:start-glue-point="2" draw:end-shape="id62" draw:end-glue-point="12" svg:d="M7531 10461v-3044h-806v-1020" svg:viewBox="0 0 807 4065">
          <text:p/>
        </draw:connector>
        <draw:connector draw:style-name="gr99" draw:text-style-name="P16" xml:id="id60" draw:id="id60" draw:layer="layout" draw:line-skew="-0.989cm" svg:x1="13.352cm" svg:y1="10.258cm" svg:x2="12.684cm" svg:y2="6.427cm" draw:end-shape="id63" draw:end-glue-point="11" svg:d="M13352 10258v-2641h-668v-1190" svg:viewBox="0 0 669 3832">
          <text:p/>
        </draw:connector>
        <draw:connector draw:style-name="gr99" draw:text-style-name="P16" draw:layer="layout" svg:x1="23.813cm" svg:y1="10.299cm" svg:x2="23.489cm" svg:y2="6.31cm" draw:start-shape="id64" draw:start-glue-point="2" draw:end-shape="id65" draw:end-glue-point="11" svg:d="M23813 10299v-1994h-324v-1995" svg:viewBox="0 0 325 3990">
          <text:p/>
        </draw:connector>
        <draw:connector draw:style-name="gr99" draw:text-style-name="P16" draw:layer="layout" draw:line-skew="-0.552cm" svg:x1="22.799cm" svg:y1="16.78cm" svg:x2="21.004cm" svg:y2="14.898cm" draw:start-shape="id66" draw:start-glue-point="4" draw:end-shape="id30" draw:end-glue-point="2" svg:d="M22799 16780v-1493h-1795v-389" svg:viewBox="0 0 1796 1883">
          <text:p/>
        </draw:connector>
        <draw:custom-shape draw:style-name="gr100" draw:text-style-name="P17" draw:layer="layout" svg:width="28.257cm" svg:height="0.952cm" svg:x="1cm" svg:y="0.7cm">
          <text:p text:style-name="P12">Components Interface: gpio</text:p>
          <draw:enhanced-geometry svg:viewBox="0 0 21600 21600" draw:type="rectangle" draw:enhanced-path="M 0 0 L 21600 0 21600 21600 0 21600 0 0 Z N"/>
        </draw:custom-shape>
      </draw:page>
      <draw:page draw:name="page3" draw:style-name="dp1" draw:master-page-name="Default">
        <draw:custom-shape draw:style-name="gr44" draw:text-style-name="P1" draw:layer="layout" svg:width="28.257cm" svg:height="9.842cm" svg:x="1cm" svg:y="1.635cm">
          <text:p/>
          <draw:enhanced-geometry svg:viewBox="0 0 21600 21600" draw:mirror-horizontal="false" draw:mirror-vertical="false" draw:type="rectangle" draw:enhanced-path="M 0 0 L 21600 0 21600 21600 0 21600 0 0 Z N"/>
        </draw:custom-shape>
        <draw:frame draw:style-name="gr2" draw:text-style-name="P2" xml:id="id78" draw:id="id78" draw:layer="layout" svg:width="2.54cm" svg:height="1.199cm" svg:x="6.932cm" svg:y="12.43cm">
          <draw:text-box>
            <text:p><text:span text:style-name="T1">network_</text:span></text:p>
            <text:p><text:span text:style-name="T1">interfac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01" draw:text-style-name="P3" draw:layer="layout" svg:width="27.94cm" svg:height="5.715cm" svg:x="1cm" svg:y="14.0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02" draw:text-style-name="P5" draw:layer="layout" svg:width="2.449cm" svg:height="0.779cm" svg:x="1cm" svg:y="14.017cm">
            <text:p text:style-name="P4"><text:span text:style-name="T2">RaspiOS</text:span></text:p>
            <draw:enhanced-geometry svg:viewBox="0 0 21600 21600" draw:type="non-primitve" draw:enhanced-path="M 0 0 L 21600 0 19000 21600 0 21600 0 0 Z N"/>
          </draw:custom-shape>
        </draw:g>
        <draw:g draw:style-name="gr3" xml:id="id91" draw:id="id9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03" draw:text-style-name="P7" xml:id="id67" draw:id="id67" draw:layer="layout" svg:width="4.128cm" svg:height="2cm" svg:x="4.249cm" svg:y="4.3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text:span><text:span text:style-name="T3">nt»</text:span></text:p>
            <text:p text:style-name="P6"><text:span text:style-name="T4">remote_m</text:span><text:span text:style-name="T4">onitoring</text:span></text:p>
            <draw:enhanced-geometry svg:viewBox="0 0 21600 21600" draw:mirror-horizontal="false" draw:mirror-vertical="false" draw:type="rectangle" draw:enhanced-path="M 0 0 L 21600 0 21600 21600 0 21600 0 0 Z N"/>
          </draw:custom-shape>
          <draw:connector draw:style-name="gr104" draw:text-style-name="P8" draw:layer="layout" draw:type="line" svg:x1="7.907cm" svg:y1="4.674cm" svg:x2="7.907cm" svg:y2="4.924cm" draw:start-shape="id67" draw:start-glue-point="16" draw:end-shape="id67" draw:end-glue-point="17" svg:d="M7907 4674v250" svg:viewBox="0 0 1 251">
            <text:p/>
          </draw:connector>
        </draw:g>
        <draw:g draw:style-name="gr3" xml:id="id73" draw:id="id7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05" draw:text-style-name="P7" xml:id="id68" draw:id="id68" draw:layer="layout" svg:width="4.128cm" svg:height="2cm" svg:x="1.752cm" svg:y="7.6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text:span><text:span text:style-name="T3">o</text:span><text:span text:style-name="T3">m</text:span><text:span text:style-name="T3">po</text:span><text:span text:style-name="T3">ne</text:span><text:span text:style-name="T3">nt</text:span><text:span text:style-name="T3">»</text:span></text:p>
            <text:p text:style-name="P6"><text:span text:style-name="T3">or</text:span><text:span text:style-name="T3">ad</text:span><text:span text:style-name="T3">io</text:span><text:span text:style-name="T3">_l</text:span><text:span text:style-name="T3">og</text:span><text:span text:style-name="T3">gi</text:span><text:span text:style-name="T3">ng</text:span></text:p>
            <draw:enhanced-geometry svg:viewBox="0 0 21600 21600" draw:type="rectangle" draw:enhanced-path="M 0 0 L 21600 0 21600 21600 0 21600 0 0 Z N"/>
          </draw:custom-shape>
          <draw:connector draw:style-name="gr106" draw:text-style-name="P8" draw:layer="layout" draw:type="line" svg:x1="5.41cm" svg:y1="7.944cm" svg:x2="5.41cm" svg:y2="8.194cm" draw:start-shape="id68" draw:start-glue-point="16" draw:end-shape="id68" draw:end-glue-point="17" svg:d="M5410 7944v250" svg:viewBox="0 0 1 251">
            <text:p/>
          </draw:connector>
        </draw:g>
        <draw:g draw:style-name="gr3" xml:id="id70" draw:id="id7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07" draw:text-style-name="P7" xml:id="id69" draw:id="id69" draw:layer="layout" svg:width="3.75cm" svg:height="2cm" svg:x="2.112cm" svg:y="17.3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text:span><text:span text:style-name="T3">c</text:span><text:span text:style-name="T3">o</text:span><text:span text:style-name="T3">m</text:span><text:span text:style-name="T3">p</text:span><text:span text:style-name="T3">o</text:span><text:span text:style-name="T3">n</text:span><text:span text:style-name="T3">e</text:span><text:span text:style-name="T3">n</text:span><text:span text:style-name="T3">t</text:span><text:span text:style-name="T3">»</text:span></text:p>
            <text:p text:style-name="P6"><text:span text:style-name="T3">c</text:span><text:span text:style-name="T3">o</text:span><text:span text:style-name="T3">n</text:span><text:span text:style-name="T3">s</text:span><text:span text:style-name="T3">o</text:span><text:span text:style-name="T3">l</text:span><text:span text:style-name="T3">e</text:span></text:p>
            <draw:enhanced-geometry svg:viewBox="0 0 21600 21600" draw:mirror-horizontal="false" draw:mirror-vertical="false" draw:type="rectangle" draw:enhanced-path="M 0 0 L 21600 0 21600 21600 0 21600 0 0 Z N"/>
          </draw:custom-shape>
          <draw:connector draw:style-name="gr108" draw:text-style-name="P8" draw:layer="layout" draw:type="line" svg:x1="5.392cm" svg:y1="17.634cm" svg:x2="5.392cm" svg:y2="17.884cm" draw:start-shape="id69" draw:start-glue-point="16" draw:end-shape="id69" draw:end-glue-point="17" svg:d="M5392 17634v250" svg:viewBox="0 0 1 251">
            <text:p/>
          </draw:connector>
        </draw:g>
        <draw:connector draw:style-name="gr109" draw:text-style-name="P9" draw:layer="layout" draw:type="line" svg:x1="3.612cm" svg:y1="17.357cm" svg:x2="3.739cm" svg:y2="13.247cm" draw:start-shape="id70" draw:start-glue-point="6" draw:end-shape="id71" draw:end-glue-point="3" svg:d="M3612 17357l127-4110" svg:viewBox="0 0 128 4111">
          <text:p/>
        </draw:connector>
        <draw:connector draw:style-name="gr110" draw:text-style-name="P9" xml:id="id74" draw:id="id74" draw:layer="layout" draw:type="line" svg:x1="6.665cm" svg:y1="14.857cm" svg:x2="6.595cm" svg:y2="13.27cm" draw:start-shape="id72" draw:start-glue-point="5" svg:d="M6665 14857l-70-1587" svg:viewBox="0 0 71 1588">
          <text:p/>
        </draw:connector>
        <draw:connector draw:style-name="gr111" draw:text-style-name="P9" draw:layer="layout" draw:type="line" svg:x1="2.578cm" svg:y1="9.667cm" svg:x2="3.739cm" svg:y2="13.247cm" draw:start-shape="id73" draw:start-glue-point="10" draw:end-shape="id71" draw:end-glue-point="3" svg:d="M2578 9667l1161 3580" svg:viewBox="0 0 1162 3581">
          <text:p/>
        </draw:connector>
        <draw:connector draw:style-name="gr112" draw:text-style-name="P9" draw:layer="layout" draw:type="line" svg:x1="5.054cm" svg:y1="9.667cm" svg:x2="6.595cm" svg:y2="13.27cm" draw:start-shape="id73" draw:start-glue-point="13" draw:end-shape="id74" draw:end-glue-point="3" svg:d="M5054 9667l1541 3603" svg:viewBox="0 0 1542 3604">
          <text:p/>
        </draw:connector>
        <draw:frame draw:style-name="gr61" draw:text-style-name="P2" draw:layer="layout" svg:width="2.223cm" svg:height="1.588cm" svg:x="1.652cm" svg:y="11.795cm">
          <draw:text-box>
            <text:p><text:span text:style-name="T1">stdout</text:span></text:p>
          </draw:text-box>
        </draw:frame>
        <draw:g draw:style-name="gr3" xml:id="id72" draw:id="id7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3" draw:text-style-name="P7" xml:id="id75" draw:id="id75" draw:layer="layout" svg:width="3.75cm" svg:height="2cm" svg:x="4.415cm" svg:y="14.8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ile system</text:span></text:p>
            <draw:enhanced-geometry svg:viewBox="0 0 21600 21600" draw:type="rectangle" draw:enhanced-path="M 0 0 L 21600 0 21600 21600 0 21600 0 0 Z N"/>
          </draw:custom-shape>
          <draw:connector draw:style-name="gr114" draw:text-style-name="P8" draw:layer="layout" draw:type="line" svg:x1="7.695cm" svg:y1="15.134cm" svg:x2="7.695cm" svg:y2="15.384cm" draw:start-shape="id75" draw:start-glue-point="16" draw:end-shape="id75" draw:end-glue-point="17" svg:d="M7695 15134v250" svg:viewBox="0 0 1 251">
            <text:p/>
          </draw:connector>
        </draw:g>
        <draw:g draw:style-name="gr3" xml:id="id77" draw:id="id7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5" draw:text-style-name="P7" xml:id="id76" draw:id="id76" draw:layer="layout" svg:width="3.75cm" svg:height="2cm" svg:x="7.327cm" svg:y="17.41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network manager</text:span></text:p>
            <draw:enhanced-geometry svg:viewBox="0 0 21600 21600" draw:type="rectangle" draw:enhanced-path="M 0 0 L 21600 0 21600 21600 0 21600 0 0 Z N"/>
          </draw:custom-shape>
          <draw:connector draw:style-name="gr116" draw:text-style-name="P8" draw:layer="layout" draw:type="line" svg:x1="10.607cm" svg:y1="17.692cm" svg:x2="10.607cm" svg:y2="17.942cm" draw:start-shape="id76" draw:start-glue-point="16" draw:end-shape="id76" draw:end-glue-point="17" svg:d="M10607 17692v250" svg:viewBox="0 0 1 251">
            <text:p/>
          </draw:connector>
        </draw:g>
        <draw:connector draw:style-name="gr117" draw:text-style-name="P9" draw:layer="layout" draw:type="line" svg:x1="8.827cm" svg:y1="17.415cm" svg:x2="9.472cm" svg:y2="13.029cm" draw:start-shape="id77" draw:start-glue-point="6" draw:end-shape="id78" draw:end-glue-point="1" svg:d="M8827 17415l645-4386" svg:viewBox="0 0 646 4387">
          <text:p/>
        </draw:connector>
        <draw:connector draw:style-name="gr118" draw:text-style-name="P9" xml:id="id90" draw:id="id90" draw:layer="layout" draw:type="line" svg:x1="7.531cm" svg:y1="10.461cm" svg:x2="9.472cm" svg:y2="13.029cm" draw:end-shape="id78" draw:end-glue-point="1" svg:d="M7531 10461l1941 2568" svg:viewBox="0 0 1942 2569">
          <text:p/>
        </draw:connector>
        <draw:g draw:style-name="gr3" xml:id="id92" draw:id="id9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9" draw:text-style-name="P7" xml:id="id79" draw:id="id79" draw:layer="layout" svg:width="5.398cm" svg:height="2cm" svg:x="10.524cm" svg:y="4.42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text:span><text:span text:style-name="T3">c</text:span><text:span text:style-name="T3">o</text:span><text:span text:style-name="T3">m</text:span><text:span text:style-name="T3">p</text:span><text:span text:style-name="T3">o</text:span><text:span text:style-name="T3">n</text:span><text:span text:style-name="T3">e</text:span><text:span text:style-name="T3">n</text:span><text:span text:style-name="T3">t</text:span><text:span text:style-name="T3">»</text:span></text:p>
            <text:p text:style-name="P6"><text:span text:style-name="T4">p</text:span><text:span text:style-name="T4">o</text:span><text:span text:style-name="T4">w</text:span><text:span text:style-name="T4">e</text:span><text:span text:style-name="T4">r</text:span><text:span text:style-name="T4">_</text:span><text:span text:style-name="T4">s</text:span><text:span text:style-name="T4">u</text:span><text:span text:style-name="T4">p</text:span><text:span text:style-name="T4">p</text:span><text:span text:style-name="T4">l</text:span><text:span text:style-name="T4">y</text:span><text:span text:style-name="T4">_</text:span><text:span text:style-name="T4">c</text:span><text:span text:style-name="T4">o</text:span><text:span text:style-name="T4">n</text:span><text:span text:style-name="T4">t</text:span><text:span text:style-name="T4">r</text:span><text:span text:style-name="T4">o</text:span><text:span text:style-name="T4">l</text:span></text:p>
            <draw:enhanced-geometry svg:viewBox="0 0 21600 21600" draw:type="rectangle" draw:enhanced-path="M 0 0 L 21600 0 21600 21600 0 21600 0 0 Z N"/>
          </draw:custom-shape>
          <draw:connector draw:style-name="gr120" draw:text-style-name="P8" draw:layer="layout" draw:type="line" svg:x1="15.452cm" svg:y1="4.704cm" svg:x2="15.452cm" svg:y2="4.954cm" draw:start-shape="id79" draw:start-glue-point="16" draw:end-shape="id79" draw:end-glue-point="17" svg:d="M15452 4704v250" svg:viewBox="0 0 1 251">
            <text:p/>
          </draw:connector>
        </draw:g>
        <draw:g draw:style-name="gr3" xml:id="id86" draw:id="id8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1" draw:text-style-name="P7" xml:id="id80" draw:id="id80" draw:layer="layout" svg:width="4.128cm" svg:height="2cm" svg:x="8.077cm" svg:y="8.17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acklighting</text:span></text:p>
            <draw:enhanced-geometry svg:viewBox="0 0 21600 21600" draw:type="rectangle" draw:enhanced-path="M 0 0 L 21600 0 21600 21600 0 21600 0 0 Z N"/>
          </draw:custom-shape>
          <draw:connector draw:style-name="gr122" draw:text-style-name="P8" draw:layer="layout" draw:type="line" svg:x1="11.735cm" svg:y1="8.449cm" svg:x2="11.735cm" svg:y2="8.699cm" draw:start-shape="id80" draw:start-glue-point="16" draw:end-shape="id80" draw:end-glue-point="17" svg:d="M11735 8449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3" draw:text-style-name="P7" xml:id="id81" draw:id="id81" draw:layer="layout" svg:width="4.128cm" svg:height="2cm" svg:x="14.017cm" svg:y="7.3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text:span><text:span text:style-name="T3">o</text:span><text:span text:style-name="T3">m</text:span><text:span text:style-name="T3">po</text:span><text:span text:style-name="T3">ne</text:span><text:span text:style-name="T3">nt</text:span><text:span text:style-name="T3">»</text:span></text:p>
            <text:p text:style-name="P6"><text:span text:style-name="T4">le</text:span><text:span text:style-name="T4">d_</text:span><text:span text:style-name="T4">co</text:span><text:span text:style-name="T4">ntr</text:span><text:span text:style-name="T4">ol</text:span></text:p>
            <draw:enhanced-geometry svg:viewBox="0 0 21600 21600" draw:type="rectangle" draw:enhanced-path="M 0 0 L 21600 0 21600 21600 0 21600 0 0 Z N"/>
          </draw:custom-shape>
          <draw:connector draw:style-name="gr124" draw:text-style-name="P8" draw:layer="layout" draw:type="line" svg:x1="17.675cm" svg:y1="7.627cm" svg:x2="17.675cm" svg:y2="7.877cm" draw:start-shape="id81" draw:start-glue-point="16" draw:end-shape="id81" draw:end-glue-point="17" svg:d="M17675 7627v250" svg:viewBox="0 0 1 251">
            <text:p/>
          </draw:connector>
        </draw:g>
        <draw:frame draw:style-name="gr125" draw:text-style-name="P11" xml:id="id71" draw:id="id71" draw:layer="layout" svg:width="3.493cm" svg:height="1.27cm" svg:x="3.739cm" svg:y="12.612cm">
          <draw:text-box>
            <text:p text:style-name="P10"><text:span text:style-name="T1">file_system_</text:span></text:p>
            <text:p text:style-name="P10"><text:span text:style-name="T1">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6" draw:text-style-name="P7" xml:id="id82" draw:id="id82" draw:layer="layout" svg:width="3.75cm" svg:height="2cm" svg:x="8.62cm" svg:y="22.5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text:span><text:span text:style-name="T3">c</text:span><text:span text:style-name="T3">o</text:span><text:span text:style-name="T3">m</text:span><text:span text:style-name="T3">p</text:span><text:span text:style-name="T3">o</text:span><text:span text:style-name="T3">n</text:span><text:span text:style-name="T3">e</text:span><text:span text:style-name="T3">n</text:span><text:span text:style-name="T3">t</text:span><text:span text:style-name="T3">»</text:span></text:p>
            <text:p text:style-name="P6"><text:span text:style-name="T3">l</text:span><text:span text:style-name="T3">i</text:span><text:span text:style-name="T3">g</text:span><text:span text:style-name="T3">h</text:span><text:span text:style-name="T3">t</text:span><text:span text:style-name="T3">_</text:span><text:span text:style-name="T3">s</text:span><text:span text:style-name="T3">e</text:span><text:span text:style-name="T3">n</text:span><text:span text:style-name="T3">s</text:span><text:span text:style-name="T3">o</text:span><text:span text:style-name="T3">r</text:span></text:p>
            <draw:enhanced-geometry svg:viewBox="0 0 21600 21600" draw:type="rectangle" draw:enhanced-path="M 0 0 L 21600 0 21600 21600 0 21600 0 0 Z N"/>
          </draw:custom-shape>
          <draw:connector draw:style-name="gr127" draw:text-style-name="P8" draw:layer="layout" draw:type="line" svg:x1="11.9cm" svg:y1="22.867cm" svg:x2="11.9cm" svg:y2="23.117cm" draw:start-shape="id82" draw:start-glue-point="16" draw:end-shape="id82" draw:end-glue-point="17" svg:d="M11900 22867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8" draw:text-style-name="P7" xml:id="id83" draw:id="id83" draw:layer="layout" svg:width="3.75cm" svg:height="2cm" svg:x="13.065cm" svg:y="22.5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text:span><text:span text:style-name="T3">c</text:span><text:span text:style-name="T3">o</text:span><text:span text:style-name="T3">m</text:span><text:span text:style-name="T3">p</text:span><text:span text:style-name="T3">o</text:span><text:span text:style-name="T3">n</text:span><text:span text:style-name="T3">e</text:span><text:span text:style-name="T3">n</text:span><text:span text:style-name="T3">t</text:span><text:span text:style-name="T3">»</text:span></text:p>
            <text:p text:style-name="P6"><text:span text:style-name="T3">d</text:span><text:span text:style-name="T3">a</text:span><text:span text:style-name="T3">_</text:span><text:span text:style-name="T3">c</text:span><text:span text:style-name="T3">o</text:span><text:span text:style-name="T3">n</text:span><text:span text:style-name="T3">v</text:span><text:span text:style-name="T3">e</text:span><text:span text:style-name="T3">r</text:span><text:span text:style-name="T3">t</text:span><text:span text:style-name="T3">e</text:span><text:span text:style-name="T3">r</text:span></text:p>
            <draw:enhanced-geometry svg:viewBox="0 0 21600 21600" draw:type="rectangle" draw:enhanced-path="M 0 0 L 21600 0 21600 21600 0 21600 0 0 Z N"/>
          </draw:custom-shape>
          <draw:connector draw:style-name="gr129" draw:text-style-name="P8" draw:layer="layout" draw:type="line" svg:x1="16.345cm" svg:y1="22.867cm" svg:x2="16.345cm" svg:y2="23.117cm" draw:start-shape="id83" draw:start-glue-point="16" draw:end-shape="id83" draw:end-glue-point="17" svg:d="M16345 22867v250" svg:viewBox="0 0 1 251">
            <text:p/>
          </draw:connector>
        </draw:g>
        <draw:g draw:style-name="gr3" xml:id="id85" draw:id="id8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0" draw:text-style-name="P7" xml:id="id84" draw:id="id84" draw:layer="layout" svg:width="3.75cm" svg:height="2cm" svg:x="10.342cm" svg:y="14.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text:span><text:span text:style-name="T3">c</text:span><text:span text:style-name="T3">o</text:span><text:span text:style-name="T3">m</text:span><text:span text:style-name="T3">p</text:span><text:span text:style-name="T3">o</text:span><text:span text:style-name="T3">n</text:span><text:span text:style-name="T3">e</text:span><text:span text:style-name="T3">n</text:span><text:span text:style-name="T3">t</text:span><text:span text:style-name="T3">»</text:span></text:p>
            <text:p text:style-name="P6"><text:span text:style-name="T3">i</text:span><text:span text:style-name="T3">2</text:span><text:span text:style-name="T3">c</text:span><text:span text:style-name="T3">_</text:span><text:span text:style-name="T3">s</text:span><text:span text:style-name="T3">e</text:span><text:span text:style-name="T3">r</text:span><text:span text:style-name="T3">v</text:span><text:span text:style-name="T3">i</text:span><text:span text:style-name="T3">c</text:span><text:span text:style-name="T3">e</text:span></text:p>
            <draw:enhanced-geometry svg:viewBox="0 0 21600 21600" draw:type="rectangle" draw:enhanced-path="M 0 0 L 21600 0 21600 21600 0 21600 0 0 Z N"/>
          </draw:custom-shape>
          <draw:connector draw:style-name="gr131" draw:text-style-name="P8" draw:layer="layout" draw:type="line" svg:x1="13.622cm" svg:y1="15.247cm" svg:x2="13.622cm" svg:y2="15.497cm" draw:start-shape="id84" draw:start-glue-point="16" draw:end-shape="id84" draw:end-glue-point="17" svg:d="M13622 15247v250" svg:viewBox="0 0 1 251">
            <text:p/>
          </draw:connector>
        </draw:g>
        <draw:connector draw:style-name="gr132" draw:text-style-name="P9" xml:id="id87" draw:id="id87" draw:layer="layout" draw:type="line" svg:x1="11.842cm" svg:y1="14.97cm" svg:x2="12.415cm" svg:y2="12.822cm" draw:start-shape="id85" draw:start-glue-point="6" svg:d="M11842 14970l573-2148" svg:viewBox="0 0 574 2149">
          <text:p/>
        </draw:connector>
        <draw:connector draw:style-name="gr133" draw:text-style-name="P9" draw:layer="layout" draw:type="line" svg:x1="11.379cm" svg:y1="10.172cm" svg:x2="12.415cm" svg:y2="12.822cm" draw:start-shape="id86" draw:start-glue-point="13" draw:end-shape="id87" draw:end-glue-point="3" svg:d="M11379 10172l1036 2650" svg:viewBox="0 0 1037 2651">
          <text:p/>
        </draw:connector>
        <draw:frame draw:style-name="gr62" draw:text-style-name="P15" draw:layer="layout" svg:width="2.54cm" svg:height="1.27cm" svg:x="10.207cm" svg:y="12.43cm">
          <draw:text-box>
            <text:p><text:span text:style-name="T5">i2c_</text:span></text:p>
            <text:p><text:span text:style-name="T5">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4" draw:text-style-name="P7" xml:id="id88" draw:id="id88" draw:layer="layout" svg:width="4.068cm" svg:height="2cm" svg:x="18.145cm" svg:y="24.4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text:span><text:span text:style-name="T3">o</text:span><text:span text:style-name="T3">m</text:span><text:span text:style-name="T3">po</text:span><text:span text:style-name="T3">ne</text:span><text:span text:style-name="T3">nt</text:span><text:span text:style-name="T3">»</text:span></text:p>
            <text:p text:style-name="P6"><text:span text:style-name="T3">i2</text:span><text:span text:style-name="T3">c_</text:span><text:span text:style-name="T3">se</text:span><text:span text:style-name="T3">rvi</text:span><text:span text:style-name="T3">ce</text:span></text:p>
            <draw:enhanced-geometry svg:viewBox="0 0 21600 21600" draw:type="rectangle" draw:enhanced-path="M 0 0 L 21600 0 21600 21600 0 21600 0 0 Z N"/>
          </draw:custom-shape>
          <draw:connector draw:style-name="gr135" draw:text-style-name="P8" draw:layer="layout" draw:type="line" svg:x1="21.743cm" svg:y1="24.772cm" svg:x2="21.743cm" svg:y2="25.022cm" draw:start-shape="id88" draw:start-glue-point="16" draw:end-shape="id88" draw:end-glue-point="17" svg:d="M21743 24772v250" svg:viewBox="0 0 1 251">
            <text:p/>
          </draw:connector>
        </draw:g>
        <draw:connector draw:style-name="gr136" draw:text-style-name="P9" draw:layer="layout" draw:type="line" svg:x1="13.352cm" svg:y1="10.258cm" svg:x2="12.415cm" svg:y2="12.822cm" draw:start-shape="id89" draw:start-glue-point="2" draw:end-shape="id87" draw:end-glue-point="3" svg:d="M13352 10258l-937 2564" svg:viewBox="0 0 938 2565">
          <text:p/>
        </draw:connector>
        <draw:connector draw:style-name="gr99" draw:text-style-name="P16" draw:layer="layout" draw:line-skew="-1.012cm" svg:x1="7.531cm" svg:y1="10.461cm" svg:x2="6.725cm" svg:y2="6.397cm" draw:start-shape="id90" draw:start-glue-point="2" draw:end-shape="id91" draw:end-glue-point="12" svg:d="M7531 10461v-3044h-806v-1020" svg:viewBox="0 0 807 4065">
          <text:p/>
        </draw:connector>
        <draw:connector draw:style-name="gr99" draw:text-style-name="P16" xml:id="id89" draw:id="id89" draw:layer="layout" draw:line-skew="-0.989cm" svg:x1="13.352cm" svg:y1="10.258cm" svg:x2="12.684cm" svg:y2="6.427cm" draw:end-shape="id92" draw:end-glue-point="11" svg:d="M13352 10258v-2641h-668v-1190" svg:viewBox="0 0 669 3832">
          <text:p/>
        </draw:connector>
        <draw:custom-shape draw:style-name="gr137" draw:text-style-name="P13" draw:layer="layout" svg:width="28.257cm" svg:height="0.952cm" svg:x="1cm" svg:y="0.7cm">
          <text:p text:style-name="P12">Components Interface: gpio</text:p>
          <draw:enhanced-geometry svg:viewBox="0 0 21600 21600" draw:type="rectangle" draw:enhanced-path="M 0 0 L 21600 0 21600 21600 0 21600 0 0 Z N"/>
        </draw:custom-shape>
      </draw:page>
      <draw:page draw:name="Queue" draw:style-name="dp1" draw:master-page-name="Default">
        <draw:custom-shape draw:style-name="gr138" draw:text-style-name="P1" draw:layer="layout" svg:width="28.257cm" svg:height="14.94cm" svg:x="1cm" svg:y="1.935cm">
          <text:p/>
          <draw:enhanced-geometry svg:viewBox="0 0 21600 21600" draw:mirror-horizontal="false" draw:mirror-vertical="false" draw:type="rectangle" draw:enhanced-path="M 0 0 L 21600 0 21600 21600 0 21600 0 0 Z N"/>
        </draw:custom-shape>
        <draw:connector draw:style-name="gr139" draw:text-style-name="P9" xml:id="id95" draw:id="id95" draw:layer="layout" draw:type="line" svg:x1="14.394cm" svg:y1="4.81cm" svg:x2="14.532cm" svg:y2="6.268cm" draw:start-shape="id93" draw:start-glue-point="12" svg:d="M14394 4810l138 1458" svg:viewBox="0 0 139 1459">
          <text:p/>
        </draw:connector>
        <draw:frame draw:style-name="gr140" draw:text-style-name="P15" draw:layer="layout" svg:width="3.492cm" svg:height="0.725cm" svg:x="10.525cm" svg:y="5.445cm">
          <draw:text-box>
            <text:p><text:span text:style-name="T5">shared_queue</text:span></text:p>
          </draw:text-box>
        </draw:frame>
        <draw:connector draw:style-name="gr141" draw:text-style-name="P9" draw:layer="layout" draw:type="line" svg:x1="4.505cm" svg:y1="8.995cm" svg:x2="14.532cm" svg:y2="6.268cm" draw:start-shape="id94" draw:start-glue-point="5" draw:end-shape="id95" draw:end-glue-point="3" svg:d="M4505 8995l10027-2727" svg:viewBox="0 0 10028 2728">
          <text:p/>
        </draw:connector>
        <draw:connector draw:style-name="gr142" draw:text-style-name="P9" draw:layer="layout" draw:type="line" svg:x1="9.98cm" svg:y1="8.995cm" svg:x2="14.532cm" svg:y2="6.268cm" draw:start-shape="id96" draw:start-glue-point="5" draw:end-shape="id95" draw:end-glue-point="3" svg:d="M9980 8995l4552-2727" svg:viewBox="0 0 4553 2728">
          <text:p/>
        </draw:connector>
        <draw:connector draw:style-name="gr143" draw:text-style-name="P9" draw:layer="layout" draw:type="line" svg:x1="15.595cm" svg:y1="8.9cm" svg:x2="14.532cm" svg:y2="6.268cm" draw:start-shape="id97" draw:start-glue-point="5" draw:end-shape="id95" draw:end-glue-point="3" svg:d="M15595 8900l-1063-2632" svg:viewBox="0 0 1064 2633">
          <text:p/>
        </draw:connector>
        <draw:connector draw:style-name="gr144" draw:text-style-name="P9" draw:layer="layout" draw:type="line" svg:x1="21.15cm" svg:y1="8.995cm" svg:x2="14.532cm" svg:y2="6.268cm" draw:start-shape="id98" draw:start-glue-point="5" draw:end-shape="id95" draw:end-glue-point="3" svg:d="M21150 8995l-6618-2727" svg:viewBox="0 0 6619 2728">
          <text:p/>
        </draw:connector>
        <draw:custom-shape draw:style-name="gr145" draw:text-style-name="P17" draw:layer="layout" svg:width="28.257cm" svg:height="0.952cm" svg:x="1cm" svg:y="1cm">
          <text:p text:style-name="P12">Components Interface: queue</text:p>
          <draw:enhanced-geometry svg:viewBox="0 0 21600 21600" draw:type="rectangle" draw:enhanced-path="M 0 0 L 21600 0 21600 21600 0 21600 0 0 Z N"/>
        </draw:custom-shape>
        <draw:g draw:style-name="gr3" xml:id="id93" draw:id="id9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6" draw:text-style-name="P7" xml:id="id99" draw:id="id99" draw:layer="layout" svg:width="10.417cm" svg:height="2cm" svg:x="8.145cm" svg:y="2.8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control</text:span></text:p>
            <draw:enhanced-geometry svg:viewBox="0 0 21600 21600" draw:type="rectangle" draw:enhanced-path="M 0 0 L 21600 0 21600 21600 0 21600 0 0 Z N"/>
          </draw:custom-shape>
          <draw:connector draw:style-name="gr147" draw:text-style-name="P8" draw:layer="layout" draw:type="line" svg:x1="18.092cm" svg:y1="3.087cm" svg:x2="18.092cm" svg:y2="3.337cm" draw:start-shape="id99" draw:start-glue-point="16" draw:end-shape="id99" draw:end-glue-point="17" svg:d="M18092 3087v250" svg:viewBox="0 0 1 251">
            <text:p/>
          </draw:connector>
        </draw:g>
        <draw:g draw:style-name="gr3" xml:id="id94" draw:id="id9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8" draw:text-style-name="P7" xml:id="id100" draw:id="id100" draw:layer="layout" svg:width="4.385cm" svg:height="2cm" svg:x="1.875cm" svg:y="8.9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sb_service</text:span></text:p>
            <draw:enhanced-geometry svg:viewBox="0 0 21600 21600" draw:type="rectangle" draw:enhanced-path="M 0 0 L 21600 0 21600 21600 0 21600 0 0 Z N"/>
          </draw:custom-shape>
          <draw:connector draw:style-name="gr149" draw:text-style-name="P8" draw:layer="layout" draw:type="line" svg:x1="5.79cm" svg:y1="9.272cm" svg:x2="5.79cm" svg:y2="9.522cm" draw:start-shape="id100" draw:start-glue-point="16" draw:end-shape="id100" draw:end-glue-point="17" svg:d="M5790 9272v250" svg:viewBox="0 0 1 251">
            <text:p/>
          </draw:connector>
        </draw:g>
        <draw:g draw:style-name="gr3" xml:id="id98" draw:id="id9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0" draw:text-style-name="P7" xml:id="id101" draw:id="id101" draw:layer="layout" svg:width="4.385cm" svg:height="1.905cm" svg:x="18.52cm" svg:y="8.9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eb_service</text:span></text:p>
            <draw:enhanced-geometry svg:viewBox="0 0 21600 21600" draw:type="rectangle" draw:enhanced-path="M 0 0 L 21600 0 21600 21600 0 21600 0 0 Z N"/>
          </draw:custom-shape>
          <draw:connector draw:style-name="gr151" draw:text-style-name="P8" draw:layer="layout" draw:type="line" svg:x1="22.435cm" svg:y1="9.272cm" svg:x2="22.435cm" svg:y2="9.522cm" draw:start-shape="id101" draw:start-glue-point="16" draw:end-shape="id101" draw:end-glue-point="17" svg:d="M22435 9272v250" svg:viewBox="0 0 1 251">
            <text:p/>
          </draw:connector>
        </draw:g>
        <draw:g draw:style-name="gr3" xml:id="id96" draw:id="id9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2" draw:text-style-name="P7" xml:id="id102" draw:id="id102" draw:layer="layout" svg:width="4.385cm" svg:height="2cm" svg:x="7.35cm" svg:y="8.9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touch_buttons</text:span></text:p>
            <draw:enhanced-geometry svg:viewBox="0 0 21600 21600" draw:type="rectangle" draw:enhanced-path="M 0 0 L 21600 0 21600 21600 0 21600 0 0 Z N"/>
          </draw:custom-shape>
          <draw:connector draw:style-name="gr153" draw:text-style-name="P8" draw:layer="layout" draw:type="line" svg:x1="11.265cm" svg:y1="9.272cm" svg:x2="11.265cm" svg:y2="9.522cm" draw:start-shape="id102" draw:start-glue-point="16" draw:end-shape="id102" draw:end-glue-point="17" svg:d="M11265 9272v250" svg:viewBox="0 0 1 251">
            <text:p/>
          </draw:connector>
        </draw:g>
        <draw:g draw:style-name="gr3" xml:id="id97" draw:id="id9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4" draw:text-style-name="P7" xml:id="id103" draw:id="id103" draw:layer="layout" svg:width="4.385cm" svg:height="2cm" svg:x="12.965cm" svg:y="8.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potify_connect</text:span></text:p>
            <draw:enhanced-geometry svg:viewBox="0 0 21600 21600" draw:type="rectangle" draw:enhanced-path="M 0 0 L 21600 0 21600 21600 0 21600 0 0 Z N"/>
          </draw:custom-shape>
          <draw:connector draw:style-name="gr155" draw:text-style-name="P8" draw:layer="layout" draw:type="line" svg:x1="16.88cm" svg:y1="9.177cm" svg:x2="16.88cm" svg:y2="9.427cm" draw:start-shape="id103" draw:start-glue-point="16" draw:end-shape="id103" draw:end-glue-point="17" svg:d="M16880 9177v250" svg:viewBox="0 0 1 251">
            <text:p/>
          </draw:connector>
        </draw:g>
        <draw:g draw:style-name="gr3" xml:id="id105" draw:id="id10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6" draw:text-style-name="P7" xml:id="id104" draw:id="id104" draw:layer="layout" svg:width="4.385cm" svg:height="1.905cm" svg:x="23.977cm" svg:y="8.93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volume_control</text:span></text:p>
            <draw:enhanced-geometry svg:viewBox="0 0 21600 21600" draw:type="rectangle" draw:enhanced-path="M 0 0 L 21600 0 21600 21600 0 21600 0 0 Z N"/>
          </draw:custom-shape>
          <draw:connector draw:style-name="gr157" draw:text-style-name="P8" draw:layer="layout" draw:type="line" svg:x1="27.892cm" svg:y1="9.214cm" svg:x2="27.892cm" svg:y2="9.464cm" draw:start-shape="id104" draw:start-glue-point="16" draw:end-shape="id104" draw:end-glue-point="17" svg:d="M27892 9214v250" svg:viewBox="0 0 1 251">
            <text:p/>
          </draw:connector>
        </draw:g>
        <draw:connector draw:style-name="gr158" draw:text-style-name="P9" draw:layer="layout" draw:type="line" svg:x1="25.731cm" svg:y1="8.937cm" svg:x2="14.532cm" svg:y2="6.268cm" draw:start-shape="id105" draw:start-glue-point="6" draw:end-shape="id95" draw:end-glue-point="3" svg:d="M25731 8937l-11199-2669" svg:viewBox="0 0 11200 2670">
          <text:p/>
        </draw:connector>
        <draw:g draw:style-name="gr3" xml:id="id109" draw:id="id10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9" draw:text-style-name="P7" xml:id="id106" draw:id="id106" draw:layer="layout" svg:width="4.385cm" svg:height="1.905cm" svg:x="18.337cm" svg:y="13.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text:span><text:span text:style-name="T3">o</text:span><text:span text:style-name="T3">m</text:span><text:span text:style-name="T3">po</text:span><text:span text:style-name="T3">ne</text:span><text:span text:style-name="T3">nt</text:span><text:span text:style-name="T3">»</text:span></text:p>
            <text:p text:style-name="P6"><text:span text:style-name="T3">wi</text:span><text:span text:style-name="T3">fi_</text:span><text:span text:style-name="T3">se</text:span><text:span text:style-name="T3">rvi</text:span><text:span text:style-name="T3">ce</text:span></text:p>
            <draw:enhanced-geometry svg:viewBox="0 0 21600 21600" draw:type="rectangle" draw:enhanced-path="M 0 0 L 21600 0 21600 21600 0 21600 0 0 Z N"/>
          </draw:custom-shape>
          <draw:connector draw:style-name="gr160" draw:text-style-name="P8" draw:layer="layout" draw:type="line" svg:x1="22.252cm" svg:y1="13.777cm" svg:x2="22.252cm" svg:y2="14.027cm" draw:start-shape="id106" draw:start-glue-point="16" draw:end-shape="id106" draw:end-glue-point="17" svg:d="M22252 13777v250" svg:viewBox="0 0 1 251">
            <text:p/>
          </draw:connector>
        </draw:g>
        <draw:g draw:style-name="gr3" xml:id="id108" draw:id="id10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1" draw:text-style-name="P7" xml:id="id107" draw:id="id107" draw:layer="layout" svg:width="4.385cm" svg:height="1.905cm" svg:x="9.205cm" svg:y="13.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text:span><text:span text:style-name="T3">ent»</text:span></text:p>
            <text:p text:style-name="P6"><text:span text:style-name="T3">remote_</text:span><text:span text:style-name="T3">monitorin</text:span><text:span text:style-name="T3">g</text:span></text:p>
            <draw:enhanced-geometry svg:viewBox="0 0 21600 21600" draw:type="rectangle" draw:enhanced-path="M 0 0 L 21600 0 21600 21600 0 21600 0 0 Z N"/>
          </draw:custom-shape>
          <draw:connector draw:style-name="gr162" draw:text-style-name="P8" draw:layer="layout" draw:type="line" svg:x1="13.12cm" svg:y1="13.777cm" svg:x2="13.12cm" svg:y2="14.027cm" draw:start-shape="id107" draw:start-glue-point="16" draw:end-shape="id107" draw:end-glue-point="17" svg:d="M13120 13777v250" svg:viewBox="0 0 1 251">
            <text:p/>
          </draw:connector>
        </draw:g>
        <draw:connector draw:style-name="gr163" draw:text-style-name="P9" xml:id="id110" draw:id="id110" draw:layer="layout" draw:type="line" svg:x1="13.589cm" svg:y1="14.928cm" svg:x2="16.28cm" svg:y2="15.345cm" draw:start-shape="id108" draw:start-glue-point="14" svg:d="M13589 14928l2691 417" svg:viewBox="0 0 2692 418">
          <text:p/>
        </draw:connector>
        <draw:connector draw:style-name="gr164" draw:text-style-name="P9" draw:layer="layout" draw:type="line" svg:x1="18.337cm" svg:y1="14.928cm" svg:x2="16.28cm" svg:y2="15.345cm" draw:start-shape="id109" draw:start-glue-point="9" draw:end-shape="id110" draw:end-glue-point="3" svg:d="M18337 14928l-2057 417" svg:viewBox="0 0 2058 418">
          <text:p/>
        </draw:connector>
        <draw:connector draw:style-name="gr165" draw:text-style-name="P9" draw:layer="layout" draw:type="line" svg:x1="21.15cm" svg:y1="10.899cm" svg:x2="22.225cm" svg:y2="12.233cm" draw:start-shape="id98" draw:start-glue-point="12" draw:end-shape="id111" draw:end-glue-point="3" svg:d="M21150 10899l1075 1334" svg:viewBox="0 0 1076 1335">
          <text:p/>
        </draw:connector>
        <draw:connector draw:style-name="gr166" draw:text-style-name="P9" xml:id="id111" draw:id="id111" draw:layer="layout" draw:type="line" svg:x1="21.844cm" svg:y1="13.5cm" svg:x2="22.225cm" svg:y2="12.233cm" draw:start-shape="id109" draw:start-glue-point="4" svg:d="M21844 13500l381-1267" svg:viewBox="0 0 382 1268">
          <text:p/>
        </draw:connector>
        <draw:frame draw:style-name="gr22" draw:text-style-name="P2" draw:layer="layout" svg:width="2.857cm" svg:height="0.725cm" svg:x="22.273cm" svg:y="12.747cm">
          <draw:text-box>
            <text:p text:style-name="P18">web_queue</text:p>
          </draw:text-box>
        </draw:frame>
        <draw:frame draw:style-name="gr22" draw:text-style-name="P2" draw:layer="layout" svg:width="3.492cm" svg:height="0.725cm" svg:x="14.652cm" svg:y="15.605cm">
          <draw:text-box>
            <text:p text:style-name="P18">remote_queue</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Component" svg:viewBox="0 0 338 419" svg:d="M1 86c1-2 2-3 4-4 1-1 2-1 4-1h55v-72c0-2 0-3 1-4 1-2 2-3 4-4 1-1 2-1 4-1h256c2 0 3 0 5 1 1 1 2 2 3 4 1 1 1 2 1 4v400c0 2 0 3-1 5-1 1-2 2-3 3-2 1-3 1-5 1h-252c-1 1-3 1-4 1-2 0-3 0-4-1-2-1-3-2-4-3-1-2-1-3-1-5v-1-70h-55c-2 0-3 0-4-1-2-1-3-2-4-3-1-2-1-3-1-5v-80c0-2 0-3 1-4 1-2 2-3 4-4 1-1 2-1 4-1h55v-63h-51c-1 1-3 1-4 1-2 0-3 0-4-1-2-1-3-2-4-3-1-2-1-3-1-5v-1-79c0-2 0-3 1-4zM137 81c2 0 3 0 5 1 1 1 2 2 3 4 1 1 1 2 1 4v79 1c0 2 0 3-1 5-1 1-2 2-3 3-2 1-3 1-5 1-1 0-3 0-4-1h-51v63h55c2 0 3 0 5 1 1 1 2 2 3 4 1 1 1 2 1 4v80c0 2 0 3-1 5-1 1-2 2-3 3-2 1-3 1-5 1h-55v61h238v-382h-238v63zM18 99v61h55 55v-61zM128 321v-62h-110v62h5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3T16:23:47.322558208</meta:creation-date>
    <meta:generator>LibreOffice/24.2.7.2$Linux_X86_64 LibreOffice_project/420$Build-2</meta:generator>
    <dc:date>2026-05-05T17:59:46.637683409</dc:date>
    <meta:editing-duration>PT8H6M7S</meta:editing-duration>
    <meta:editing-cycles>69</meta:editing-cycles>
    <meta:print-date>2026-04-03T16:45:26.431431754</meta:print-date>
    <dc:creator>Henk</dc:creator>
    <meta:document-statistic meta:object-count="233"/>
  </office:meta>
</office:document-meta>
</file>