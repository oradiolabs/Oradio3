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73cm" fo:min-width="26.43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9.271cm" fo:min-width="26.53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6.436cm" fo:padding-top="0.151cm" fo:padding-bottom="0.151cm" fo:padding-left="0.276cm" fo:padding-right="0.276cm"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7.953cm" fo:min-width="27.705cm" fo:padding-top="0.151cm" fo:padding-bottom="0.151cm" fo:padding-left="0.276cm" fo:padding-right="0.276cm"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079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0"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style:writing-mode="lr-tb" loext:decorative="false"/>
      <style:paragraph-properties style:writing-mode="lr-tb"/>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graphic-properties draw:stroke="none" svg:stroke-color="#000000" draw:fill="none" draw:fill-color="#ffffff" draw:auto-grow-height="true" draw:auto-grow-width="false" fo:min-height="0.808cm" loext:decorative="false"/>
      <style:paragraph-properties style:writing-mode="lr-tb"/>
    </style:style>
    <style:style style:name="gr8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0"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4"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11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705cm" fo:padding-top="0.151cm" fo:padding-bottom="0.151cm" fo:padding-left="0.276cm" fo:padding-right="0.276cm" style:writing-mode="lr-tb" loext:decorative="false"/>
      <style:paragraph-properties style:writing-mode="lr-tb"/>
    </style:style>
    <style:style style:name="gr1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0"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2"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705cm" fo:padding-top="0.151cm" fo:padding-bottom="0.151cm" fo:padding-left="0.276cm" fo:padding-right="0.276cm" style:writing-mode="lr-tb" loext:decorative="false"/>
      <style:paragraph-properties style:writing-mode="lr-tb"/>
    </style:style>
    <style:style style:name="gr15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5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56"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8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style:text-properties fo:font-size="12pt"/>
    </style:style>
    <style:style style:name="P1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text-align="center" fo:text-indent="0cm"/>
    </style:style>
    <style:style style:name="P18" style:family="paragraph">
      <loext:graphic-properties draw:fill="none"/>
      <style:paragraph-properties fo:text-align="center" style:writing-mode="lr-tb"/>
    </style:style>
    <style:style style:name="P19" style:family="paragraph">
      <style:paragraph-properties fo:text-align="center"/>
    </style:style>
    <style:style style:name="P20" style:family="paragraph">
      <loext:graphic-properties draw:fill="none"/>
      <style:paragraph-properties fo:margin-left="0cm" fo:margin-right="0cm" fo:text-align="center" fo:text-indent="0cm" style:writing-mode="lr-tb"/>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6.988cm" svg:height="6.032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8.62cm">
          <draw:text-box>
            <text:p><text:span text:style-name="T1">network</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6.988cm" svg:height="9.475cm" svg:x="1.317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10.5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5.447cm" svg:y="9.008cm">
          <draw:text-box>
            <text:p><text:span text:style-name="T1">ALSA</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23.86cm" svg:y="11.8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7.32cm" svg:y1="12.107cm" svg:x2="27.32cm" svg:y2="12.357cm" draw:start-shape="id1" draw:start-glue-point="16" draw:end-shape="id1" draw:end-glue-point="17" svg:d="M27320 121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23.51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7.252cm" svg:y1="4.04cm" svg:x2="27.252cm" svg:y2="4.29cm" draw:start-shape="id2" draw:start-glue-point="16" draw:end-shape="id2" draw:end-glue-point="17" svg:d="M27252 4040v250" svg:viewBox="0 0 1 251">
            <text:p/>
          </draw:connector>
        </draw:g>
        <draw:connector draw:style-name="gr10" draw:text-style-name="P9" xml:id="id5" draw:id="id5" draw:layer="layout" draw:type="line" svg:x1="24.646cm" svg:y1="11.83cm" svg:x2="25.027cm" svg:y2="8.747cm" draw:start-shape="id3" draw:start-glue-point="7" svg:d="M24646 11830l381-3083" svg:viewBox="0 0 382 3084">
          <text:p/>
        </draw:connector>
        <draw:connector draw:style-name="gr11" draw:text-style-name="P9" draw:layer="layout" draw:type="line" svg:x1="26.037cm" svg:y1="5.763cm" svg:x2="25.027cm" svg:y2="8.747cm" draw:start-shape="id4" draw:start-glue-point="12" draw:end-shape="id5" draw:end-glue-point="3" svg:d="M26037 5763l-1010 2984" svg:viewBox="0 0 1011 2985">
          <text:p/>
        </draw:connector>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3.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4.082cm" svg:x2="17.242cm" svg:y2="4.332cm" draw:start-shape="id6" draw:start-glue-point="16" draw:end-shape="id6" draw:end-glue-point="17" svg:d="M17242 4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3.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4.025cm" svg:x2="6.535cm" svg:y2="4.275cm" draw:start-shape="id7" draw:start-glue-point="16" draw:end-shape="id7" draw:end-glue-point="17" svg:d="M6535 4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11.8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12.107cm" svg:x2="4.975cm" svg:y2="12.357cm" draw:start-shape="id8" draw:start-glue-point="16" draw:end-shape="id8" draw:end-glue-point="17" svg:d="M4975 12107v250" svg:viewBox="0 0 1 251">
            <text:p/>
          </draw:connector>
        </draw:g>
        <draw:connector draw:style-name="gr18" draw:text-style-name="P9" xml:id="id13" draw:id="id13" draw:layer="layout" draw:type="line" svg:x1="7.417cm" svg:y1="11.83cm" svg:x2="6.475cm" svg:y2="9.214cm" draw:start-shape="id9" draw:start-glue-point="6" svg:d="M7417 11830l-942-2616" svg:viewBox="0 0 943 2617">
          <text:p/>
        </draw:connector>
        <draw:connector draw:style-name="gr19" draw:text-style-name="P9" xml:id="id12" draw:id="id12" draw:layer="layout" draw:type="line" svg:x1="4.695cm" svg:y1="11.83cm" svg:x2="4.545cm" svg:y2="9.4cm" draw:start-shape="id10" draw:start-glue-point="4" svg:d="M4695 11830l-150-2430" svg:viewBox="0 0 151 2431">
          <text:p/>
        </draw:connector>
        <draw:connector draw:style-name="gr20" draw:text-style-name="P9" draw:layer="layout" draw:type="line" svg:x1="3.703cm" svg:y1="5.748cm" svg:x2="4.545cm" svg:y2="9.4cm" draw:start-shape="id11" draw:start-glue-point="10" draw:end-shape="id12" draw:end-glue-point="3" svg:d="M3703 5748l842 3652" svg:viewBox="0 0 843 3653">
          <text:p/>
        </draw:connector>
        <draw:connector draw:style-name="gr21" draw:text-style-name="P9" draw:layer="layout" draw:type="line" svg:x1="6.179cm" svg:y1="5.748cm" svg:x2="6.475cm" svg:y2="9.214cm" draw:start-shape="id11" draw:start-glue-point="13" draw:end-shape="id13" draw:end-glue-point="3" svg:d="M6179 5748l296 3466" svg:viewBox="0 0 297 3467">
          <text:p/>
        </draw:connector>
        <draw:frame draw:style-name="gr22" draw:text-style-name="P2" draw:layer="layout" svg:width="2.223cm" svg:height="0.725cm" svg:x="2.269cm" svg:y="8.847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11.8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12.107cm" svg:x2="9.102cm" svg:y2="12.357cm" draw:start-shape="id14" draw:start-glue-point="16" draw:end-shape="id14" draw:end-glue-point="17" svg:d="M9102 121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11.8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12.107cm" svg:x2="13.55cm" svg:y2="12.357cm" draw:start-shape="id15" draw:start-glue-point="16" draw:end-shape="id15" draw:end-glue-point="17" svg:d="M13550 12107v250" svg:viewBox="0 0 1 251">
            <text:p/>
          </draw:connector>
        </draw:g>
        <draw:connector draw:style-name="gr27" draw:text-style-name="P9" xml:id="id18" draw:id="id18" draw:layer="layout" draw:type="line" svg:x1="11.036cm" svg:y1="11.83cm" svg:x2="10.397cm" svg:y2="9.805cm" draw:start-shape="id16" draw:start-glue-point="7" svg:d="M11036 11830l-639-2025" svg:viewBox="0 0 640 2026">
          <text:p/>
        </draw:connector>
        <draw:connector draw:style-name="gr28" draw:text-style-name="P9" draw:layer="layout" draw:type="line" svg:x1="10.793cm" svg:y1="5.763cm" svg:x2="10.397cm" svg:y2="9.805cm" draw:start-shape="id17" draw:start-glue-point="12" draw:end-shape="id18" draw:end-glue-point="3" svg:d="M10793 5763l-396 4042" svg:viewBox="0 0 397 4043">
          <text:p/>
        </draw:connector>
        <draw:frame draw:style-name="gr29" draw:text-style-name="P11" draw:layer="layout" svg:width="3.175cm" svg:height="1.27cm" svg:x="6.715cm" svg:y="8.62cm">
          <draw:text-box>
            <text:p text:style-name="P10"><text:span text:style-name="T1">fil</text:span><text:span text:style-name="T1">e </text:span><text:span text:style-name="T1">sy</text:span><text:span text:style-name="T1">st</text:span><text:span text:style-name="T1">e</text:span><text:span text:style-name="T1">m </text:span></text:p>
            <text:p text:style-name="P10"><text:span text:style-name="T1">int</text:span><text:span text:style-name="T1">erf</text:span><text:span text:style-name="T1">ac</text:span><text:span text:style-name="T1">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0" draw:text-style-name="P7" xml:id="id19" draw:id="id19" draw:layer="layout" svg:width="3.75cm" svg:height="2cm" svg:x="6.08cm" svg:y="21.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31" draw:text-style-name="P8" draw:layer="layout" draw:type="line" svg:x1="9.36cm" svg:y1="21.587cm" svg:x2="9.36cm" svg:y2="21.837cm" draw:start-shape="id19" draw:start-glue-point="16" draw:end-shape="id19" draw:end-glue-point="17" svg:d="M9360 2158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2" draw:text-style-name="P7" xml:id="id20" draw:id="id20" draw:layer="layout" svg:width="3.75cm" svg:height="2cm" svg:x="11.16cm" svg:y="21.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33" draw:text-style-name="P8" draw:layer="layout" draw:type="line" svg:x1="14.44cm" svg:y1="21.587cm" svg:x2="14.44cm" svg:y2="21.837cm" draw:start-shape="id20" draw:start-glue-point="16" draw:end-shape="id20" draw:end-glue-point="17" svg:d="M14440 2158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4" draw:text-style-name="P7" xml:id="id21" draw:id="id21" draw:layer="layout" svg:width="4.068cm" svg:height="2cm" svg:x="0.742cm" svg:y="21.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mirror-horizontal="false" draw:mirror-vertical="false" draw:type="rectangle" draw:enhanced-path="M 0 0 L 21600 0 21600 21600 0 21600 0 0 Z N"/>
          </draw:custom-shape>
          <draw:connector draw:style-name="gr35" draw:text-style-name="P8" draw:layer="layout" draw:type="line" svg:x1="4.34cm" svg:y1="21.587cm" svg:x2="4.34cm" svg:y2="21.837cm" draw:start-shape="id21" draw:start-glue-point="16" draw:end-shape="id21" draw:end-glue-point="17" svg:d="M4340 21587v250" svg:viewBox="0 0 1 251">
            <text:p/>
          </draw:connector>
        </draw:g>
        <draw:custom-shape draw:style-name="gr36" draw:text-style-name="P13" draw:layer="layout" svg:width="26.988cm" svg:height="0.952cm" svg:x="1.317cm" svg:y="0.908cm">
          <text:p text:style-name="P12"><text:span text:style-name="T5">Components Interface: raspiOS</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7" draw:text-style-name="P7" xml:id="id22" draw:id="id22" draw:layer="layout" svg:width="4.128cm" svg:height="2cm" svg:x="8.317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8" draw:text-style-name="P8" draw:layer="layout" draw:type="line" svg:x1="11.975cm" svg:y1="4.04cm" svg:x2="11.975cm" svg:y2="4.29cm" draw:start-shape="id22" draw:start-glue-point="16" draw:end-shape="id22" draw:end-glue-point="17" svg:d="M11975 4040v250" svg:viewBox="0 0 1 251">
            <text:p/>
          </draw:connector>
        </draw:g>
        <draw:g draw:style-name="gr3" xml:id="id24" draw:id="id2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9" draw:text-style-name="P7" xml:id="id23" draw:id="id23" draw:layer="layout" svg:width="3.81cm" svg:height="1.805cm" svg:x="14.617cm" svg:y="11.9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40" draw:text-style-name="P8" draw:layer="layout" draw:type="line" svg:x1="17.957cm" svg:y1="12.207cm" svg:x2="17.957cm" svg:y2="12.457cm" draw:start-shape="id23" draw:start-glue-point="16" draw:end-shape="id23" draw:end-glue-point="17" svg:d="M17957 12207v250" svg:viewBox="0 0 1 251">
            <text:p/>
          </draw:connector>
        </draw:g>
        <draw:connector draw:style-name="gr41" draw:text-style-name="P9" xml:id="id26" draw:id="id26" draw:layer="layout" draw:type="line" svg:x1="16.141cm" svg:y1="11.93cm" svg:x2="16.716cm" svg:y2="9.805cm" draw:start-shape="id24" draw:start-glue-point="6" svg:d="M16141 11930l575-2125" svg:viewBox="0 0 576 2126">
          <text:p/>
        </draw:connector>
        <draw:connector draw:style-name="gr42" draw:text-style-name="P9" draw:layer="layout" draw:type="line" svg:x1="16.886cm" svg:y1="5.805cm" svg:x2="16.716cm" svg:y2="9.805cm" draw:start-shape="id25" draw:start-glue-point="13" draw:end-shape="id26" draw:end-glue-point="3" svg:d="M16886 5805l-170 4000" svg:viewBox="0 0 171 4001">
          <text:p/>
        </draw:connector>
        <draw:frame draw:style-name="gr2" draw:text-style-name="P14" draw:layer="layout" svg:width="2.857cm" svg:height="1.199cm" svg:x="14.018cm" svg:y="8.373cm">
          <draw:text-box>
            <text:p><text:span text:style-name="T6">HTTP</text:span></text:p>
            <text:p><text:span text:style-name="T6">interface</text:span></text:p>
          </draw:text-box>
        </draw:frame>
        <draw:g draw:style-name="gr3" xml:id="id31" draw:id="id3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3" draw:text-style-name="P7" xml:id="id27" draw:id="id27" draw:layer="layout" svg:width="4.068cm" svg:height="2cm" svg:x="19.157cm" svg:y="11.8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vicorn server</text:span></text:p>
            <draw:enhanced-geometry svg:viewBox="0 0 21600 21600" draw:type="rectangle" draw:enhanced-path="M 0 0 L 21600 0 21600 21600 0 21600 0 0 Z N"/>
          </draw:custom-shape>
          <draw:connector draw:style-name="gr44" draw:text-style-name="P8" draw:layer="layout" draw:type="line" svg:x1="22.755cm" svg:y1="12.107cm" svg:x2="22.755cm" svg:y2="12.357cm" draw:start-shape="id27" draw:start-glue-point="16" draw:end-shape="id27" draw:end-glue-point="17" svg:d="M22755 12107v250" svg:viewBox="0 0 1 251">
            <text:p/>
          </draw:connector>
        </draw:g>
        <draw:g draw:style-name="gr3" xml:id="id33" draw:id="id3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7" xml:id="id28" draw:id="id28" draw:layer="layout" svg:width="4.128cm" svg:height="2cm" svg:x="18.779cm" svg:y="3.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mirror-horizontal="false" draw:mirror-vertical="false" draw:type="rectangle" draw:enhanced-path="M 0 0 L 21600 0 21600 21600 0 21600 0 0 Z N"/>
          </draw:custom-shape>
          <draw:connector draw:style-name="gr46" draw:text-style-name="P8" draw:layer="layout" draw:type="line" svg:x1="22.437cm" svg:y1="4.134cm" svg:x2="22.437cm" svg:y2="4.384cm" draw:start-shape="id28" draw:start-glue-point="16" draw:end-shape="id28" draw:end-glue-point="17" svg:d="M22437 4134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7" draw:text-style-name="P7" xml:id="id29" draw:id="id29" draw:layer="layout" svg:width="4.068cm" svg:height="2cm" svg:x="17.55cm" svg:y="16.43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api_app</text:span></text:p>
            <draw:enhanced-geometry svg:viewBox="0 0 21600 21600" draw:type="rectangle" draw:enhanced-path="M 0 0 L 21600 0 21600 21600 0 21600 0 0 Z N"/>
          </draw:custom-shape>
          <draw:connector draw:style-name="gr48" draw:text-style-name="P8" draw:layer="layout" draw:type="line" svg:x1="21.148cm" svg:y1="16.709cm" svg:x2="21.148cm" svg:y2="16.959cm" draw:start-shape="id29" draw:start-glue-point="16" draw:end-shape="id29" draw:end-glue-point="17" svg:d="M21148 16709v250" svg:viewBox="0 0 1 251">
            <text:p/>
          </draw:connector>
        </draw:g>
        <draw:connector draw:style-name="gr49" draw:text-style-name="P9" xml:id="id32" draw:id="id32" draw:layer="layout" draw:type="line" svg:x1="19.99cm" svg:y1="16.432cm" svg:x2="20.426cm" svg:y2="15.319cm" draw:start-shape="id30" draw:start-glue-point="5" svg:d="M19990 16432l436-1113" svg:viewBox="0 0 437 1114">
          <text:p/>
        </draw:connector>
        <draw:frame draw:style-name="gr50" draw:text-style-name="P2" draw:layer="layout" svg:width="2.222cm" svg:height="1.27cm" svg:x="21.003cm" svg:y="14.017cm">
          <draw:text-box>
            <text:p text:style-name="P15">ASGI</text:p>
            <text:p text:style-name="P15">interface</text:p>
          </draw:text-box>
        </draw:frame>
        <draw:connector draw:style-name="gr51" draw:text-style-name="P9" draw:layer="layout" draw:type="line" svg:x1="20.785cm" svg:y1="13.83cm" svg:x2="20.426cm" svg:y2="15.319cm" draw:start-shape="id31" draw:start-glue-point="11" draw:end-shape="id32" draw:end-glue-point="3" svg:d="M20785 13830l-359 1489" svg:viewBox="0 0 360 1490">
          <text:p/>
        </draw:connector>
        <draw:connector draw:style-name="gr52" draw:text-style-name="P16" draw:layer="layout" svg:x1="21.597cm" svg:y1="11.83cm" svg:x2="21.255cm" svg:y2="5.857cm" draw:start-shape="id31" draw:start-glue-point="5" draw:end-shape="id33" draw:end-glue-point="12" svg:d="M21597 11830v-2986h-342v-2987" svg:viewBox="0 0 343 5974">
          <text:p/>
        </draw:connector>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3" draw:text-style-name="P7" xml:id="id34" draw:id="id34" draw:layer="layout" svg:width="4.068cm" svg:height="2cm" svg:x="9.58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martphone</text:span></text:p>
            <draw:enhanced-geometry svg:viewBox="0 0 21600 21600" draw:type="rectangle" draw:enhanced-path="M 0 0 L 21600 0 21600 21600 0 21600 0 0 Z N"/>
          </draw:custom-shape>
          <draw:connector draw:style-name="gr54" draw:text-style-name="P8" draw:layer="layout" draw:type="line" svg:x1="13.185cm" svg:y1="16.452cm" svg:x2="13.185cm" svg:y2="16.702cm" draw:start-shape="id34" draw:start-glue-point="16" draw:end-shape="id34" draw:end-glue-point="17" svg:d="M13185 16452v250" svg:viewBox="0 0 1 251">
            <text:p/>
          </draw:connector>
        </draw:g>
        <draw:connector draw:style-name="gr55" draw:text-style-name="P9" xml:id="id36" draw:id="id36" draw:layer="layout" draw:type="line" svg:x1="17.55cm" svg:y1="17.432cm" svg:x2="15.531cm" svg:y2="16.96cm" draw:start-shape="id30" draw:start-glue-point="3" svg:d="M17550 17432l-2019-472" svg:viewBox="0 0 2020 473">
          <text:p/>
        </draw:connector>
        <draw:connector draw:style-name="gr56" draw:text-style-name="P9" draw:layer="layout" draw:type="line" svg:x1="13.655cm" svg:y1="17.675cm" svg:x2="15.531cm" svg:y2="16.96cm" draw:start-shape="id35" draw:start-glue-point="14" draw:end-shape="id36" draw:end-glue-point="3" svg:d="M13655 17675l1876-715" svg:viewBox="0 0 1877 716">
          <text:p/>
        </draw:connector>
        <draw:frame draw:style-name="gr50" draw:text-style-name="P2" draw:layer="layout" svg:width="2.222cm" svg:height="1.27cm" svg:x="14.652cm" svg:y="17.51cm">
          <draw:text-box>
            <text:p text:style-name="P15">HTTP</text:p>
            <text:p text:style-name="P15">interface</text:p>
          </draw:text-box>
        </draw:frame>
      </draw:page>
      <draw:page draw:name="gpio" draw:style-name="dp1" draw:master-page-name="Default">
        <draw:custom-shape draw:style-name="gr57" draw:text-style-name="P1" draw:layer="layout" svg:width="28.257cm" svg:height="8.255cm" svg:x="1cm" svg:y="1.635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8" draw:text-style-name="P3" draw:layer="layout" svg:width="27.94cm" svg:height="8.283cm" svg:x="1cm" svg:y="11.7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9" draw:text-style-name="P5" draw:layer="layout" svg:width="1.814cm" svg:height="0.779cm" svg:x="1cm" svg:y="11.717cm">
            <text:p text:style-name="P4"><text:span text:style-name="T2">GPIO</text:span></text:p>
            <draw:enhanced-geometry svg:viewBox="0 0 21600 21600" draw:mirror-horizontal="false" draw:mirror-vertical="false" draw:type="non-primitve" draw:enhanced-path="M 0 0 L 21600 0 19000 21600 0 21600 0 0 Z N"/>
          </draw:custom-shape>
        </draw:g>
        <draw:g draw:style-name="gr3" xml:id="id46" draw:id="id4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0" draw:text-style-name="P7" xml:id="id37" draw:id="id37" draw:layer="layout" svg:width="4.128cm" svg:height="2cm" svg:x="15.26cm" svg:y="5.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61" draw:text-style-name="P8" draw:layer="layout" draw:type="line" svg:x1="18.918cm" svg:y1="5.944cm" svg:x2="18.918cm" svg:y2="6.194cm" draw:start-shape="id37" draw:start-glue-point="16" draw:end-shape="id37" draw:end-glue-point="17" svg:d="M18918 594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2" draw:text-style-name="P7" xml:id="id38" draw:id="id38"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63" draw:text-style-name="P8" draw:layer="layout" draw:type="line" svg:x1="11.9cm" svg:y1="22.867cm" svg:x2="11.9cm" svg:y2="23.117cm" draw:start-shape="id38" draw:start-glue-point="16" draw:end-shape="id38"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4" draw:text-style-name="P7" xml:id="id39" draw:id="id39"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65" draw:text-style-name="P8" draw:layer="layout" draw:type="line" svg:x1="16.345cm" svg:y1="22.867cm" svg:x2="16.345cm" svg:y2="23.117cm" draw:start-shape="id39" draw:start-glue-point="16" draw:end-shape="id39" draw:end-glue-point="17" svg:d="M16345 22867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6" draw:text-style-name="P7" xml:id="id40" draw:id="id40" draw:layer="layout" svg:width="3.75cm" svg:height="2cm" svg:x="4.492cm" svg:y="5.7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67" draw:text-style-name="P8" draw:layer="layout" draw:type="line" svg:x1="7.772cm" svg:y1="6.039cm" svg:x2="7.772cm" svg:y2="6.289cm" draw:start-shape="id40" draw:start-glue-point="16" draw:end-shape="id40" draw:end-glue-point="17" svg:d="M7772 603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8" draw:text-style-name="P7" xml:id="id41" draw:id="id41"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69" draw:text-style-name="P8" draw:layer="layout" draw:type="line" svg:x1="21.743cm" svg:y1="24.772cm" svg:x2="21.743cm" svg:y2="25.022cm" draw:start-shape="id41" draw:start-glue-point="16" draw:end-shape="id41" draw:end-glue-point="17" svg:d="M21743 24772v250" svg:viewBox="0 0 1 251">
            <text:p/>
          </draw:connector>
        </draw:g>
        <draw:custom-shape draw:style-name="gr70" draw:text-style-name="P18" draw:layer="layout" svg:width="28.257cm" svg:height="0.952cm" svg:x="1cm" svg:y="0.7cm">
          <text:p text:style-name="P17"><text:span text:style-name="T5">Components Interface: GPIO</text:span></text:p>
          <draw:enhanced-geometry svg:viewBox="0 0 21600 21600" draw:type="rectangle" draw:enhanced-path="M 0 0 L 21600 0 21600 21600 0 21600 0 0 Z N"/>
        </draw:custom-shape>
        <draw:g draw:style-name="gr3" xml:id="id47" draw:id="id4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1" draw:text-style-name="P7" xml:id="id42" draw:id="id42" draw:layer="layout" svg:width="4.128cm" svg:height="2cm" svg:x="20.657cm" svg:y="5.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text:span><text:span text:style-name="T3">nent»</text:span></text:p>
            <text:p text:style-name="P6"><text:span text:style-name="T4">touch_b</text:span><text:span text:style-name="T4">uttons</text:span></text:p>
            <draw:enhanced-geometry svg:viewBox="0 0 21600 21600" draw:type="rectangle" draw:enhanced-path="M 0 0 L 21600 0 21600 21600 0 21600 0 0 Z N"/>
          </draw:custom-shape>
          <draw:connector draw:style-name="gr72" draw:text-style-name="P8" draw:layer="layout" draw:type="line" svg:x1="24.315cm" svg:y1="5.944cm" svg:x2="24.315cm" svg:y2="6.194cm" draw:start-shape="id42" draw:start-glue-point="16" draw:end-shape="id42" draw:end-glue-point="17" svg:d="M24315 5944v250" svg:viewBox="0 0 1 251">
            <text:p/>
          </draw:connector>
        </draw:g>
        <draw:g draw:style-name="gr3" xml:id="id44" draw:id="id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3" draw:text-style-name="P7" xml:id="id43" draw:id="id43" draw:layer="layout" svg:width="3.75cm" svg:height="2cm" svg:x="16.055cm" svg:y="13.1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rpi</text:span><text:span text:style-name="T3">.G</text:span><text:span text:style-name="T3">PI</text:span><text:span text:style-name="T3">O</text:span></text:p>
            <draw:enhanced-geometry svg:viewBox="0 0 21600 21600" draw:type="rectangle" draw:enhanced-path="M 0 0 L 21600 0 21600 21600 0 21600 0 0 Z N"/>
          </draw:custom-shape>
          <draw:connector draw:style-name="gr74" draw:text-style-name="P8" draw:layer="layout" draw:type="line" svg:x1="19.335cm" svg:y1="13.447cm" svg:x2="19.335cm" svg:y2="13.697cm" draw:start-shape="id43" draw:start-glue-point="16" draw:end-shape="id43" draw:end-glue-point="17" svg:d="M19335 13447v250" svg:viewBox="0 0 1 251">
            <text:p/>
          </draw:connector>
        </draw:g>
        <draw:connector draw:style-name="gr75" draw:text-style-name="P9" draw:layer="layout" draw:type="line" svg:x1="18.305cm" svg:y1="13.17cm" svg:x2="18.361cm" svg:y2="10.874cm" draw:start-shape="id44" draw:start-glue-point="5" draw:end-shape="id45" draw:end-glue-point="3" svg:d="M18305 13170l56-2296" svg:viewBox="0 0 57 2297">
          <text:p/>
        </draw:connector>
        <draw:connector draw:style-name="gr76" draw:text-style-name="P9" draw:layer="layout" draw:type="line" svg:x1="16.912cm" svg:y1="7.667cm" svg:x2="18.361cm" svg:y2="10.874cm" draw:start-shape="id46" draw:start-glue-point="11" svg:d="M16912 7667l1449 3207" svg:viewBox="0 0 1450 3208">
          <text:p/>
        </draw:connector>
        <draw:connector draw:style-name="gr77" draw:text-style-name="P9" xml:id="id45" draw:id="id45" draw:layer="layout" draw:type="line" svg:x1="22.309cm" svg:y1="7.667cm" svg:x2="18.361cm" svg:y2="10.874cm" draw:start-shape="id47" draw:start-glue-point="11" svg:d="M22309 7667l-3948 3207" svg:viewBox="0 0 3949 3208">
          <text:p/>
        </draw:connector>
        <draw:frame draw:style-name="gr50" draw:text-style-name="P14" draw:layer="layout" svg:width="2.54cm" svg:height="1.27cm" svg:x="19.387cm" svg:y="10.63cm">
          <draw:text-box>
            <text:p><text:span text:style-name="T6">G</text:span><text:span text:style-name="T6">P</text:span><text:span text:style-name="T6">I</text:span><text:span text:style-name="T6">O</text:span></text:p>
            <text:p><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p>
          </draw:text-box>
        </draw:frame>
        <draw:g draw:style-name="gr3" xml:id="id49" draw:id="id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8" draw:text-style-name="P7" xml:id="id48" draw:id="id48" draw:layer="layout" svg:width="3.75cm" svg:height="2cm" svg:x="6.08cm" svg:y="14.05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MBus</text:span></text:p>
            <draw:enhanced-geometry svg:viewBox="0 0 21600 21600" draw:type="rectangle" draw:enhanced-path="M 0 0 L 21600 0 21600 21600 0 21600 0 0 Z N"/>
          </draw:custom-shape>
          <draw:connector draw:style-name="gr79" draw:text-style-name="P8" draw:layer="layout" draw:type="line" svg:x1="9.36cm" svg:y1="14.335cm" svg:x2="9.36cm" svg:y2="14.585cm" draw:start-shape="id48" draw:start-glue-point="16" draw:end-shape="id48" draw:end-glue-point="17" svg:d="M9360 14335v250" svg:viewBox="0 0 1 251">
            <text:p/>
          </draw:connector>
        </draw:g>
        <draw:connector draw:style-name="gr80" draw:text-style-name="P9" xml:id="id51" draw:id="id51" draw:layer="layout" draw:type="line" svg:x1="8.33cm" svg:y1="14.058cm" svg:x2="7.276cm" svg:y2="10.716cm" draw:start-shape="id49" draw:start-glue-point="5" svg:d="M8330 14058l-1054-3342" svg:viewBox="0 0 1055 3343">
          <text:p/>
        </draw:connector>
        <draw:connector draw:style-name="gr81" draw:text-style-name="P9" draw:layer="layout" draw:type="line" svg:x1="6.742cm" svg:y1="7.762cm" svg:x2="7.276cm" svg:y2="10.716cm" draw:start-shape="id50" draw:start-glue-point="12" draw:end-shape="id51" draw:end-glue-point="3" svg:d="M6742 7762l534 2954" svg:viewBox="0 0 535 2955">
          <text:p/>
        </draw:connector>
        <draw:frame draw:style-name="gr82" draw:text-style-name="P14" draw:layer="layout" svg:width="2.54cm" svg:height="1.199cm" svg:x="7.985cm" svg:y="10.278cm">
          <draw:text-box>
            <text:p><text:span text:style-name="T6">SMBus</text:span></text:p>
            <text:p><text:span text:style-name="T6">interface</text:span></text:p>
          </draw:text-box>
        </draw:frame>
      </draw:page>
      <draw:page draw:name="page3" draw:style-name="dp1" draw:master-page-name="Default">
        <draw:custom-shape draw:style-name="gr83"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84"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85" draw:text-style-name="P5" draw:layer="layout" svg:width="1.814cm" svg:height="0.779cm" svg:x="1cm" svg:y="14.017cm">
            <text:p text:style-name="P4"><text:span text:style-name="T2">G</text:span><text:span text:style-name="T2">PI</text:span><text:span text:style-name="T2">O</text:span></text:p>
            <draw:enhanced-geometry svg:viewBox="0 0 21600 21600" draw:type="non-primitve" draw:enhanced-path="M 0 0 L 21600 0 19000 21600 0 21600 0 0 Z N"/>
          </draw:custom-shape>
        </draw:g>
        <draw:g draw:style-name="gr3" xml:id="id54" draw:id="id5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6" draw:text-style-name="P7" xml:id="id52" draw:id="id52" draw:layer="layout" svg:width="3.523cm" svg:height="2cm" svg:x="19.27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87" draw:text-style-name="P8" draw:layer="layout" draw:type="line" svg:x1="22.33cm" svg:y1="17.057cm" svg:x2="22.33cm" svg:y2="17.307cm" draw:start-shape="id52" draw:start-glue-point="16" draw:end-shape="id52" draw:end-glue-point="17" svg:d="M22330 17057v250" svg:viewBox="0 0 1 251">
            <text:p/>
          </draw:connector>
        </draw:g>
        <draw:g draw:style-name="gr3" xml:id="id72" draw:id="id7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8" draw:text-style-name="P7" xml:id="id53" draw:id="id53" draw:layer="layout" svg:width="4.128cm" svg:height="2cm" svg:x="16.937cm" svg:y="4.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4">m</text:span><text:span text:style-name="T4">p</text:span><text:span text:style-name="T4">d</text:span><text:span text:style-name="T4">_</text:span><text:span text:style-name="T4">c</text:span><text:span text:style-name="T4">o</text:span><text:span text:style-name="T4">n</text:span><text:span text:style-name="T4">t</text:span><text:span text:style-name="T4">r</text:span><text:span text:style-name="T4">o</text:span><text:span text:style-name="T4">l</text:span></text:p>
            <draw:enhanced-geometry svg:viewBox="0 0 21600 21600" draw:type="rectangle" draw:enhanced-path="M 0 0 L 21600 0 21600 21600 0 21600 0 0 Z N"/>
          </draw:custom-shape>
          <draw:connector draw:style-name="gr89" draw:text-style-name="P8" draw:layer="layout" draw:type="line" svg:x1="20.595cm" svg:y1="4.587cm" svg:x2="20.595cm" svg:y2="4.837cm" draw:start-shape="id53" draw:start-glue-point="16" draw:end-shape="id53" draw:end-glue-point="17" svg:d="M20595 4587v250" svg:viewBox="0 0 1 251">
            <text:p/>
          </draw:connector>
        </draw:g>
        <draw:frame draw:style-name="gr90" draw:text-style-name="P2" draw:layer="layout" svg:width="2.54cm" svg:height="1.588cm" svg:x="21.382cm" svg:y="12.647cm">
          <draw:text-box>
            <text:p><text:span text:style-name="T1">event_</text:span></text:p>
            <text:p><text:span text:style-name="T1">interface</text:span></text:p>
          </draw:text-box>
        </draw:frame>
        <draw:frame draw:style-name="gr50" draw:text-style-name="P2" draw:layer="layout" svg:width="2.54cm" svg:height="1.27cm" svg:x="18.625cm" svg:y="12.23cm">
          <draw:text-box>
            <text:p><text:span text:style-name="T1">playback_</text:span></text:p>
            <text:p><text:span text:style-name="T1">interface</text:span></text:p>
          </draw:text-box>
        </draw:frame>
        <draw:connector draw:style-name="gr91" draw:text-style-name="P9" xml:id="id56" draw:id="id56" draw:layer="layout" draw:type="line" svg:x1="19.982cm" svg:y1="16.78cm" svg:x2="18.221cm" svg:y2="12.089cm" draw:start-shape="id54" draw:start-glue-point="7" svg:d="M19982 16780l-1761-4691" svg:viewBox="0 0 1762 4692">
          <text:p/>
        </draw:connector>
        <draw:connector draw:style-name="gr92" draw:text-style-name="P9" xml:id="id58" draw:id="id58" draw:layer="layout" draw:type="line" svg:x1="22.094cm" svg:y1="16.78cm" svg:x2="20.989cm" svg:y2="12.455cm" draw:start-shape="id54" draw:start-glue-point="4" svg:d="M22094 16780l-1105-4325" svg:viewBox="0 0 1106 4326">
          <text:p/>
        </draw:connector>
        <draw:g draw:style-name="gr3" xml:id="id57" draw:id="id5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3" draw:text-style-name="P7" xml:id="id55" draw:id="id55" draw:layer="layout" svg:width="4.128cm" svg:height="2cm" svg:x="19.73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4">m</text:span><text:span text:style-name="T4">p</text:span><text:span text:style-name="T4">d</text:span><text:span text:style-name="T4">_</text:span><text:span text:style-name="T4">m</text:span><text:span text:style-name="T4">o</text:span><text:span text:style-name="T4">n</text:span><text:span text:style-name="T4">i</text:span><text:span text:style-name="T4">t</text:span><text:span text:style-name="T4">o</text:span><text:span text:style-name="T4">r</text:span></text:p>
            <draw:enhanced-geometry svg:viewBox="0 0 21600 21600" draw:type="rectangle" draw:enhanced-path="M 0 0 L 21600 0 21600 21600 0 21600 0 0 Z N"/>
          </draw:custom-shape>
          <draw:connector draw:style-name="gr94" draw:text-style-name="P8" draw:layer="layout" draw:type="line" svg:x1="23.388cm" svg:y1="7.532cm" svg:x2="23.388cm" svg:y2="7.782cm" draw:start-shape="id55" draw:start-glue-point="16" draw:end-shape="id55" draw:end-glue-point="17" svg:d="M23388 7532v250" svg:viewBox="0 0 1 251">
            <text:p/>
          </draw:connector>
        </draw:g>
        <draw:connector draw:style-name="gr95" draw:text-style-name="P9" xml:id="id71" draw:id="id71" draw:layer="layout" draw:type="line" svg:x1="18.913cm" svg:y1="10.299cm" svg:x2="18.221cm" svg:y2="12.089cm" draw:end-shape="id56" draw:end-glue-point="3" svg:d="M18913 10299l-692 1790" svg:viewBox="0 0 693 1791">
          <text:p/>
        </draw:connector>
        <draw:connector draw:style-name="gr96" draw:text-style-name="P9" draw:layer="layout" draw:type="line" svg:x1="21.382cm" svg:y1="9.255cm" svg:x2="20.989cm" svg:y2="12.455cm" draw:start-shape="id57" draw:start-glue-point="11" draw:end-shape="id58" draw:end-glue-point="3" svg:d="M21382 9255l-393 3200" svg:viewBox="0 0 394 3201">
          <text:p/>
        </draw:connector>
        <draw:g draw:style-name="gr3" xml:id="id70" draw:id="id7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7" draw:text-style-name="P7" xml:id="id59" draw:id="id59" draw:layer="layout" svg:width="5.398cm" svg:height="2cm" svg:x="5.3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span text:style-name="T3">»</text:span></text:p>
            <text:p text:style-name="P6"><text:span text:style-name="T4">power_supp</text:span><text:span text:style-name="T4">ly_control</text:span></text:p>
            <draw:enhanced-geometry svg:viewBox="0 0 21600 21600" draw:type="rectangle" draw:enhanced-path="M 0 0 L 21600 0 21600 21600 0 21600 0 0 Z N"/>
          </draw:custom-shape>
          <draw:connector draw:style-name="gr98" draw:text-style-name="P8" draw:layer="layout" draw:type="line" svg:x1="10.252cm" svg:y1="4.704cm" svg:x2="10.252cm" svg:y2="4.954cm" draw:start-shape="id59" draw:start-glue-point="16" draw:end-shape="id59" draw:end-glue-point="17" svg:d="M10252 4704v250" svg:viewBox="0 0 1 251">
            <text:p/>
          </draw:connector>
        </draw:g>
        <draw:g draw:style-name="gr3" xml:id="id66" draw:id="id6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9" draw:text-style-name="P7" xml:id="id60" draw:id="id60" draw:layer="layout" svg:width="4.128cm" svg:height="2cm" svg:x="2.8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b</text:span><text:span text:style-name="T3">a</text:span><text:span text:style-name="T3">c</text:span><text:span text:style-name="T3">k</text:span><text:span text:style-name="T3">l</text:span><text:span text:style-name="T3">i</text:span><text:span text:style-name="T3">g</text:span><text:span text:style-name="T3">h</text:span><text:span text:style-name="T3">t</text:span><text:span text:style-name="T3">i</text:span><text:span text:style-name="T3">n</text:span><text:span text:style-name="T3">g</text:span></text:p>
            <draw:enhanced-geometry svg:viewBox="0 0 21600 21600" draw:type="rectangle" draw:enhanced-path="M 0 0 L 21600 0 21600 21600 0 21600 0 0 Z N"/>
          </draw:custom-shape>
          <draw:connector draw:style-name="gr100" draw:text-style-name="P8" draw:layer="layout" draw:type="line" svg:x1="6.535cm" svg:y1="8.449cm" svg:x2="6.535cm" svg:y2="8.699cm" draw:start-shape="id60" draw:start-glue-point="16" draw:end-shape="id60" draw:end-glue-point="17" svg:d="M65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1" draw:text-style-name="P7" xml:id="id61" draw:id="id61" draw:layer="layout" svg:width="4.128cm" svg:height="2cm" svg:x="11.16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102" draw:text-style-name="P8" draw:layer="layout" draw:type="line" svg:x1="14.818cm" svg:y1="7.944cm" svg:x2="14.818cm" svg:y2="8.194cm" draw:start-shape="id61" draw:start-glue-point="16" draw:end-shape="id61" draw:end-glue-point="17" svg:d="M14818 794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3" draw:text-style-name="P7" xml:id="id62" draw:id="id62"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lig</text:span><text:span text:style-name="T3">ht</text:span><text:span text:style-name="T3">_s</text:span><text:span text:style-name="T3">en</text:span><text:span text:style-name="T3">so</text:span><text:span text:style-name="T3">r</text:span></text:p>
            <draw:enhanced-geometry svg:viewBox="0 0 21600 21600" draw:type="rectangle" draw:enhanced-path="M 0 0 L 21600 0 21600 21600 0 21600 0 0 Z N"/>
          </draw:custom-shape>
          <draw:connector draw:style-name="gr104" draw:text-style-name="P8" draw:layer="layout" draw:type="line" svg:x1="11.9cm" svg:y1="22.867cm" svg:x2="11.9cm" svg:y2="23.117cm" draw:start-shape="id62" draw:start-glue-point="16" draw:end-shape="id62"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5" draw:text-style-name="P7" xml:id="id63" draw:id="id63"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106" draw:text-style-name="P8" draw:layer="layout" draw:type="line" svg:x1="16.345cm" svg:y1="22.867cm" svg:x2="16.345cm" svg:y2="23.117cm" draw:start-shape="id63" draw:start-glue-point="16" draw:end-shape="id63" draw:end-glue-point="17" svg:d="M16345 22867v250" svg:viewBox="0 0 1 251">
            <text:p/>
          </draw:connector>
        </draw:g>
        <draw:g draw:style-name="gr3" xml:id="id65" draw:id="id6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7" draw:text-style-name="P7" xml:id="id64" draw:id="id64" draw:layer="layout" svg:width="3.75cm" svg:height="2cm" svg:x="5.1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8" draw:text-style-name="P8" draw:layer="layout" draw:type="line" svg:x1="8.422cm" svg:y1="15.247cm" svg:x2="8.422cm" svg:y2="15.497cm" draw:start-shape="id64" draw:start-glue-point="16" draw:end-shape="id64" draw:end-glue-point="17" svg:d="M8422 15247v250" svg:viewBox="0 0 1 251">
            <text:p/>
          </draw:connector>
        </draw:g>
        <draw:connector draw:style-name="gr109" draw:text-style-name="P9" xml:id="id67" draw:id="id67" draw:layer="layout" draw:type="line" svg:x1="6.642cm" svg:y1="14.97cm" svg:x2="7.215cm" svg:y2="12.822cm" draw:start-shape="id65" draw:start-glue-point="6" svg:d="M6642 14970l573-2148" svg:viewBox="0 0 574 2149">
          <text:p/>
        </draw:connector>
        <draw:connector draw:style-name="gr110" draw:text-style-name="P9" draw:layer="layout" draw:type="line" svg:x1="6.179cm" svg:y1="10.172cm" svg:x2="7.215cm" svg:y2="12.822cm" draw:start-shape="id66" draw:start-glue-point="13" draw:end-shape="id67" draw:end-glue-point="3" svg:d="M6179 10172l1036 2650" svg:viewBox="0 0 1037 2651">
          <text:p/>
        </draw:connector>
        <draw:frame draw:style-name="gr50" draw:text-style-name="P14" draw:layer="layout" svg:width="2.54cm" svg:height="1.27cm" svg:x="5.007cm" svg:y="12.43cm">
          <draw:text-box>
            <text:p><text:span text:style-name="T6">i2</text:span><text:span text:style-name="T6">c_</text:span></text:p>
            <text:p><text:span text:style-name="T6">int</text:span><text:span text:style-name="T6">erf</text:span><text:span text:style-name="T6">ac</text:span><text:span text:style-name="T6">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1" draw:text-style-name="P7" xml:id="id68" draw:id="id68"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i2</text:span><text:span text:style-name="T3">c_</text:span><text:span text:style-name="T3">se</text:span><text:span text:style-name="T3">rvi</text:span><text:span text:style-name="T3">ce</text:span></text:p>
            <draw:enhanced-geometry svg:viewBox="0 0 21600 21600" draw:type="rectangle" draw:enhanced-path="M 0 0 L 21600 0 21600 21600 0 21600 0 0 Z N"/>
          </draw:custom-shape>
          <draw:connector draw:style-name="gr112" draw:text-style-name="P8" draw:layer="layout" draw:type="line" svg:x1="21.743cm" svg:y1="24.772cm" svg:x2="21.743cm" svg:y2="25.022cm" draw:start-shape="id68" draw:start-glue-point="16" draw:end-shape="id68" draw:end-glue-point="17" svg:d="M21743 24772v250" svg:viewBox="0 0 1 251">
            <text:p/>
          </draw:connector>
        </draw:g>
        <draw:connector draw:style-name="gr113" draw:text-style-name="P9" draw:layer="layout" draw:type="line" svg:x1="8.152cm" svg:y1="10.258cm" svg:x2="7.215cm" svg:y2="12.822cm" draw:start-shape="id69" draw:start-glue-point="2" draw:end-shape="id67" draw:end-glue-point="3" svg:d="M8152 10258l-937 2564" svg:viewBox="0 0 938 2565">
          <text:p/>
        </draw:connector>
        <draw:connector draw:style-name="gr114" draw:text-style-name="P19" xml:id="id69" draw:id="id69" draw:layer="layout" draw:line-skew="-0.989cm" svg:x1="8.152cm" svg:y1="10.258cm" svg:x2="7.484cm" svg:y2="6.427cm" draw:end-shape="id70" draw:end-glue-point="11" svg:d="M8152 10258v-2641h-668v-1190" svg:viewBox="0 0 669 3832">
          <text:p/>
        </draw:connector>
        <draw:connector draw:style-name="gr114" draw:text-style-name="P19" draw:layer="layout" svg:x1="18.913cm" svg:y1="10.299cm" svg:x2="18.589cm" svg:y2="6.31cm" draw:start-shape="id71" draw:start-glue-point="2" draw:end-shape="id72" draw:end-glue-point="11" svg:d="M18913 10299v-1994h-324v-1995" svg:viewBox="0 0 325 3990">
          <text:p/>
        </draw:connector>
        <draw:custom-shape draw:style-name="gr115" draw:text-style-name="P20" draw:layer="layout" svg:width="28.257cm" svg:height="0.952cm" svg:x="1cm" svg:y="0.7cm">
          <text:p text:style-name="P17"><text:span text:style-name="T5">Components Interface: GPIO</text:span></text:p>
          <draw:enhanced-geometry svg:viewBox="0 0 21600 21600" draw:type="rectangle" draw:enhanced-path="M 0 0 L 21600 0 21600 21600 0 21600 0 0 Z N"/>
        </draw:custom-shape>
      </draw:page>
      <draw:page draw:name="page4" draw:style-name="dp1" draw:master-page-name="Default">
        <draw:custom-shape draw:style-name="gr83"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84" draw:id="id84" draw:layer="layout" svg:width="2.54cm" svg:height="1.199cm" svg:x="6.932cm" svg:y="12.43cm">
          <draw:text-box>
            <text:p><text:span text:style-name="T1">ne</text:span><text:span text:style-name="T1">tw</text:span><text:span text:style-name="T1">or</text:span><text:span text:style-name="T1">k_</text:span></text:p>
            <text:p><text:span text:style-name="T1">int</text:span><text:span text:style-name="T1">erf</text:span><text:span text:style-name="T1">ac</text:span><text:span text:style-name="T1">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16"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17"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g draw:style-name="gr3" xml:id="id97" draw:id="id9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8" draw:text-style-name="P7" xml:id="id73" draw:id="id73"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19" draw:text-style-name="P8" draw:layer="layout" draw:type="line" svg:x1="7.907cm" svg:y1="4.674cm" svg:x2="7.907cm" svg:y2="4.924cm" draw:start-shape="id73" draw:start-glue-point="16" draw:end-shape="id73" draw:end-glue-point="17" svg:d="M7907 4674v250" svg:viewBox="0 0 1 251">
            <text:p/>
          </draw:connector>
        </draw:g>
        <draw:g draw:style-name="gr3" xml:id="id79" draw:id="id7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0" draw:text-style-name="P7" xml:id="id74" draw:id="id74"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21" draw:text-style-name="P8" draw:layer="layout" draw:type="line" svg:x1="5.41cm" svg:y1="7.944cm" svg:x2="5.41cm" svg:y2="8.194cm" draw:start-shape="id74" draw:start-glue-point="16" draw:end-shape="id74" draw:end-glue-point="17" svg:d="M5410 7944v250" svg:viewBox="0 0 1 251">
            <text:p/>
          </draw:connector>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2" draw:text-style-name="P7" xml:id="id75" draw:id="id75"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23" draw:text-style-name="P8" draw:layer="layout" draw:type="line" svg:x1="5.392cm" svg:y1="17.634cm" svg:x2="5.392cm" svg:y2="17.884cm" draw:start-shape="id75" draw:start-glue-point="16" draw:end-shape="id75" draw:end-glue-point="17" svg:d="M5392 17634v250" svg:viewBox="0 0 1 251">
            <text:p/>
          </draw:connector>
        </draw:g>
        <draw:connector draw:style-name="gr124" draw:text-style-name="P9" draw:layer="layout" draw:type="line" svg:x1="3.612cm" svg:y1="17.357cm" svg:x2="3.739cm" svg:y2="13.247cm" draw:start-shape="id76" draw:start-glue-point="6" draw:end-shape="id77" draw:end-glue-point="3" svg:d="M3612 17357l127-4110" svg:viewBox="0 0 128 4111">
          <text:p/>
        </draw:connector>
        <draw:connector draw:style-name="gr125" draw:text-style-name="P9" xml:id="id80" draw:id="id80" draw:layer="layout" draw:type="line" svg:x1="6.665cm" svg:y1="14.857cm" svg:x2="6.595cm" svg:y2="13.27cm" draw:start-shape="id78" draw:start-glue-point="5" svg:d="M6665 14857l-70-1587" svg:viewBox="0 0 71 1588">
          <text:p/>
        </draw:connector>
        <draw:connector draw:style-name="gr126" draw:text-style-name="P9" draw:layer="layout" draw:type="line" svg:x1="2.578cm" svg:y1="9.667cm" svg:x2="3.739cm" svg:y2="13.247cm" draw:start-shape="id79" draw:start-glue-point="10" draw:end-shape="id77" draw:end-glue-point="3" svg:d="M2578 9667l1161 3580" svg:viewBox="0 0 1162 3581">
          <text:p/>
        </draw:connector>
        <draw:connector draw:style-name="gr127" draw:text-style-name="P9" draw:layer="layout" draw:type="line" svg:x1="5.054cm" svg:y1="9.667cm" svg:x2="6.595cm" svg:y2="13.27cm" draw:start-shape="id79" draw:start-glue-point="13" draw:end-shape="id80" draw:end-glue-point="3" svg:d="M5054 9667l1541 3603" svg:viewBox="0 0 1542 3604">
          <text:p/>
        </draw:connector>
        <draw:frame draw:style-name="gr90" draw:text-style-name="P2" draw:layer="layout" svg:width="2.223cm" svg:height="1.588cm" svg:x="1.652cm" svg:y="11.795cm">
          <draw:text-box>
            <text:p><text:span text:style-name="T1">stdout</text:span></text:p>
          </draw:text-box>
        </draw:frame>
        <draw:g draw:style-name="gr3" xml:id="id78" draw:id="id7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8" draw:text-style-name="P7" xml:id="id81" draw:id="id81"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129" draw:text-style-name="P8" draw:layer="layout" draw:type="line" svg:x1="7.695cm" svg:y1="15.134cm" svg:x2="7.695cm" svg:y2="15.384cm" draw:start-shape="id81" draw:start-glue-point="16" draw:end-shape="id81" draw:end-glue-point="17" svg:d="M7695 15134v250" svg:viewBox="0 0 1 251">
            <text:p/>
          </draw:connector>
        </draw:g>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82" draw:id="id82"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131" draw:text-style-name="P8" draw:layer="layout" draw:type="line" svg:x1="10.607cm" svg:y1="17.692cm" svg:x2="10.607cm" svg:y2="17.942cm" draw:start-shape="id82" draw:start-glue-point="16" draw:end-shape="id82" draw:end-glue-point="17" svg:d="M10607 17692v250" svg:viewBox="0 0 1 251">
            <text:p/>
          </draw:connector>
        </draw:g>
        <draw:connector draw:style-name="gr132" draw:text-style-name="P9" draw:layer="layout" draw:type="line" svg:x1="8.827cm" svg:y1="17.415cm" svg:x2="9.472cm" svg:y2="13.029cm" draw:start-shape="id83" draw:start-glue-point="6" draw:end-shape="id84" draw:end-glue-point="1" svg:d="M8827 17415l645-4386" svg:viewBox="0 0 646 4387">
          <text:p/>
        </draw:connector>
        <draw:connector draw:style-name="gr133" draw:text-style-name="P9" xml:id="id96" draw:id="id96" draw:layer="layout" draw:type="line" svg:x1="7.531cm" svg:y1="10.461cm" svg:x2="9.472cm" svg:y2="13.029cm" draw:end-shape="id84" draw:end-glue-point="1" svg:d="M7531 10461l1941 2568" svg:viewBox="0 0 1942 2569">
          <text:p/>
        </draw:connector>
        <draw:g draw:style-name="gr3" xml:id="id98" draw:id="id9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4" draw:text-style-name="P7" xml:id="id85" draw:id="id85" draw:layer="layout" svg:width="5.398cm" svg:height="2cm" svg:x="16.557cm" svg:y="4.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135" draw:text-style-name="P8" draw:layer="layout" draw:type="line" svg:x1="21.485cm" svg:y1="4.452cm" svg:x2="21.485cm" svg:y2="4.702cm" draw:start-shape="id85" draw:start-glue-point="16" draw:end-shape="id85" draw:end-glue-point="17" svg:d="M21485 4452v250" svg:viewBox="0 0 1 251">
            <text:p/>
          </draw:connector>
        </draw:g>
        <draw:g draw:style-name="gr3" xml:id="id92" draw:id="id9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6" draw:text-style-name="P7" xml:id="id86" draw:id="id86" draw:layer="layout" svg:width="4.128cm" svg:height="2cm" svg:x="12.747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137" draw:text-style-name="P8" draw:layer="layout" draw:type="line" svg:x1="16.405cm" svg:y1="7.532cm" svg:x2="16.405cm" svg:y2="7.782cm" draw:start-shape="id86" draw:start-glue-point="16" draw:end-shape="id86" draw:end-glue-point="17" svg:d="M16405 7532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8" draw:text-style-name="P7" xml:id="id87" draw:id="id87" draw:layer="layout" svg:width="4.128cm" svg:height="2cm" svg:x="23.86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139" draw:text-style-name="P8" draw:layer="layout" draw:type="line" svg:x1="27.518cm" svg:y1="4.674cm" svg:x2="27.518cm" svg:y2="4.924cm" draw:start-shape="id87" draw:start-glue-point="16" draw:end-shape="id87" draw:end-glue-point="17" svg:d="M27518 4674v250" svg:viewBox="0 0 1 251">
            <text:p/>
          </draw:connector>
        </draw:g>
        <draw:frame draw:style-name="gr140" draw:text-style-name="P11" xml:id="id77" draw:id="id77"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1" draw:text-style-name="P7" xml:id="id88" draw:id="id88" draw:layer="layout" svg:width="3.75cm" svg:height="2cm" svg:x="10.26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142" draw:text-style-name="P8" draw:layer="layout" draw:type="line" svg:x1="13.547cm" svg:y1="21.914cm" svg:x2="13.547cm" svg:y2="22.164cm" draw:start-shape="id88" draw:start-glue-point="16" draw:end-shape="id88" draw:end-glue-point="17" svg:d="M1354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3" draw:text-style-name="P7" xml:id="id89" draw:id="id89" draw:layer="layout" svg:width="3.75cm" svg:height="2cm" svg:x="15.347cm" svg:y="21.8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144" draw:text-style-name="P8" draw:layer="layout" draw:type="line" svg:x1="18.627cm" svg:y1="22.137cm" svg:x2="18.627cm" svg:y2="22.387cm" draw:start-shape="id89" draw:start-glue-point="16" draw:end-shape="id89" draw:end-glue-point="17" svg:d="M18627 2213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5" draw:text-style-name="P7" xml:id="id90" draw:id="id90" draw:layer="layout" svg:width="3.75cm" svg:height="2cm" svg:x="18.145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46" draw:text-style-name="P8" draw:layer="layout" draw:type="line" svg:x1="21.425cm" svg:y1="15.247cm" svg:x2="21.425cm" svg:y2="15.497cm" draw:start-shape="id90" draw:start-glue-point="16" draw:end-shape="id90" draw:end-glue-point="17" svg:d="M21425 15247v250" svg:viewBox="0 0 1 251">
            <text:p/>
          </draw:connector>
        </draw:g>
        <draw:connector draw:style-name="gr147" draw:text-style-name="P9" xml:id="id93" draw:id="id93" draw:layer="layout" draw:type="line" svg:x1="19.645cm" svg:y1="14.97cm" svg:x2="17.908cm" svg:y2="12.505cm" draw:start-shape="id91" draw:start-glue-point="6" svg:d="M19645 14970l-1737-2465" svg:viewBox="0 0 1738 2466">
          <text:p/>
        </draw:connector>
        <draw:connector draw:style-name="gr148" draw:text-style-name="P9" draw:layer="layout" draw:type="line" svg:x1="16.049cm" svg:y1="9.255cm" svg:x2="17.908cm" svg:y2="12.505cm" draw:start-shape="id92" draw:start-glue-point="13" draw:end-shape="id93" draw:end-glue-point="3" svg:d="M16049 9255l1859 3250" svg:viewBox="0 0 1860 3251">
          <text:p/>
        </draw:connector>
        <draw:frame draw:style-name="gr50" draw:text-style-name="P14" draw:layer="layout" svg:width="2.54cm" svg:height="1.27cm" svg:x="14.01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9" draw:text-style-name="P7" xml:id="id94" draw:id="id94" draw:layer="layout" svg:width="4.068cm" svg:height="2cm" svg:x="20.367cm" svg:y="22.17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50" draw:text-style-name="P8" draw:layer="layout" draw:type="line" svg:x1="23.965cm" svg:y1="22.454cm" svg:x2="23.965cm" svg:y2="22.704cm" draw:start-shape="id94" draw:start-glue-point="16" draw:end-shape="id94" draw:end-glue-point="17" svg:d="M23965 22454v250" svg:viewBox="0 0 1 251">
            <text:p/>
          </draw:connector>
        </draw:g>
        <draw:connector draw:style-name="gr151" draw:text-style-name="P9" draw:layer="layout" draw:type="line" svg:x1="19.357cm" svg:y1="9.943cm" svg:x2="17.908cm" svg:y2="12.505cm" draw:start-shape="id95" draw:start-glue-point="2" draw:end-shape="id93" draw:end-glue-point="3" svg:d="M19357 9943l-1449 2562" svg:viewBox="0 0 1450 2563">
          <text:p/>
        </draw:connector>
        <draw:connector draw:style-name="gr114" draw:text-style-name="P19" draw:layer="layout" draw:line-skew="-1.012cm" svg:x1="7.531cm" svg:y1="10.461cm" svg:x2="6.725cm" svg:y2="6.397cm" draw:start-shape="id96" draw:start-glue-point="2" draw:end-shape="id97" draw:end-glue-point="12" svg:d="M7531 10461v-3044h-806v-1020" svg:viewBox="0 0 807 4065">
          <text:p/>
        </draw:connector>
        <draw:connector draw:style-name="gr114" draw:text-style-name="P19" xml:id="id95" draw:id="id95" draw:layer="layout" svg:x1="19.357cm" svg:y1="9.943cm" svg:x2="18.717cm" svg:y2="6.175cm" draw:end-shape="id98" draw:end-glue-point="11" svg:d="M19357 9943v-1620h-640v-2148" svg:viewBox="0 0 641 3769">
          <text:p/>
        </draw:connector>
        <draw:custom-shape draw:style-name="gr152" draw:text-style-name="P13" draw:layer="layout" svg:width="28.257cm" svg:height="0.952cm" svg:x="1cm" svg:y="0.7cm">
          <text:p text:style-name="P12"><text:span text:style-name="T5">Components Interface: gpio</text:span></text:p>
          <draw:enhanced-geometry svg:viewBox="0 0 21600 21600" draw:type="rectangle" draw:enhanced-path="M 0 0 L 21600 0 21600 21600 0 21600 0 0 Z N"/>
        </draw:custom-shape>
      </draw:page>
      <draw:page draw:name="Queue" draw:style-name="dp1" draw:master-page-name="Default">
        <draw:custom-shape draw:style-name="gr153"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54" draw:text-style-name="P9" xml:id="id117" draw:id="id117" draw:layer="layout" draw:type="line" svg:x1="10.822cm" svg:y1="4.81cm" svg:x2="10.832cm" svg:y2="12.513cm" draw:start-shape="id99" draw:start-glue-point="12" svg:d="M10822 4810l10 7703" svg:viewBox="0 0 11 7704">
          <text:p/>
        </draw:connector>
        <draw:frame draw:style-name="gr155" draw:text-style-name="P14" draw:layer="layout" svg:width="2.857cm" svg:height="1.673cm" svg:x="10.843cm" svg:y="5.445cm">
          <draw:text-box>
            <text:p><text:span text:style-name="T6">c</text:span><text:span text:style-name="T6">o</text:span><text:span text:style-name="T6">m</text:span><text:span text:style-name="T6">m</text:span><text:span text:style-name="T6">a</text:span><text:span text:style-name="T6">n</text:span><text:span text:style-name="T6">d</text:span><text:span text:style-name="T6">_</text:span></text:p>
            <text:p><text:span text:style-name="T6">q</text:span><text:span text:style-name="T6">u</text:span><text:span text:style-name="T6">e</text:span><text:span text:style-name="T6">u</text:span><text:span text:style-name="T6">e</text:span></text:p>
          </draw:text-box>
        </draw:frame>
        <draw:custom-shape draw:style-name="gr156" draw:text-style-name="P20" draw:layer="layout" svg:width="25.4cm" svg:height="0.952cm" svg:x="2.27cm" svg:y="1cm">
          <text:p text:style-name="P17"><text:span text:style-name="T5">Components Interface: queues</text:span></text:p>
          <draw:enhanced-geometry svg:viewBox="0 0 21600 21600" draw:type="rectangle" draw:enhanced-path="M 0 0 L 21600 0 21600 21600 0 21600 0 0 Z N"/>
        </draw:custom-shape>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7" draw:text-style-name="P7" xml:id="id100" draw:id="id100"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58" draw:text-style-name="P8" draw:layer="layout" draw:type="line" svg:x1="13.692cm" svg:y1="3.087cm" svg:x2="13.692cm" svg:y2="3.337cm" draw:start-shape="id100" draw:start-glue-point="16" draw:end-shape="id100" draw:end-glue-point="17" svg:d="M13692 3087v250" svg:viewBox="0 0 1 251">
            <text:p/>
          </draw:connector>
        </draw:g>
        <draw:g draw:style-name="gr3" xml:id="id116" draw:id="id1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9" draw:text-style-name="P7" xml:id="id101" draw:id="id101"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60" draw:text-style-name="P8" draw:layer="layout" draw:type="line" svg:x1="18.712cm" svg:y1="7.244cm" svg:x2="18.712cm" svg:y2="7.494cm" draw:start-shape="id101" draw:start-glue-point="16" draw:end-shape="id101" draw:end-glue-point="17" svg:d="M18712 7244v250" svg:viewBox="0 0 1 251">
            <text:p/>
          </draw:connector>
        </draw:g>
        <draw:g draw:style-name="gr3" xml:id="id121" draw:id="id1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1" draw:text-style-name="P7" xml:id="id102" draw:id="id102"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62" draw:text-style-name="P8" draw:layer="layout" draw:type="line" svg:x1="18.712cm" svg:y1="16.452cm" svg:x2="18.712cm" svg:y2="16.702cm" draw:start-shape="id102" draw:start-glue-point="16" draw:end-shape="id102" draw:end-glue-point="17" svg:d="M18712 16452v250" svg:viewBox="0 0 1 251">
            <text:p/>
          </draw:connector>
        </draw:g>
        <draw:g draw:style-name="gr3" xml:id="id118" draw:id="id1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3" draw:text-style-name="P7" xml:id="id103" draw:id="id103"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64" draw:text-style-name="P8" draw:layer="layout" draw:type="line" svg:x1="18.712cm" svg:y1="9.784cm" svg:x2="18.712cm" svg:y2="10.034cm" draw:start-shape="id103" draw:start-glue-point="16" draw:end-shape="id103" draw:end-glue-point="17" svg:d="M18712 9784v250" svg:viewBox="0 0 1 251">
            <text:p/>
          </draw:connector>
        </draw:g>
        <draw:g draw:style-name="gr3" xml:id="id119" draw:id="id11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5" draw:text-style-name="P7" xml:id="id104" draw:id="id104"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66" draw:text-style-name="P8" draw:layer="layout" draw:type="line" svg:x1="18.712cm" svg:y1="12.007cm" svg:x2="18.712cm" svg:y2="12.257cm" draw:start-shape="id104" draw:start-glue-point="16" draw:end-shape="id104" draw:end-glue-point="17" svg:d="M18712 12007v250" svg:viewBox="0 0 1 251">
            <text:p/>
          </draw:connector>
        </draw:g>
        <draw:g draw:style-name="gr3" xml:id="id120" draw:id="id12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7" draw:text-style-name="P7" xml:id="id105" draw:id="id105"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68" draw:text-style-name="P8" draw:layer="layout" draw:type="line" svg:x1="18.712cm" svg:y1="14.229cm" svg:x2="18.712cm" svg:y2="14.479cm" draw:start-shape="id105" draw:start-glue-point="16" draw:end-shape="id105" draw:end-glue-point="17" svg:d="M18712 14229v250" svg:viewBox="0 0 1 251">
            <text:p/>
          </draw:connector>
        </draw:g>
        <draw:g draw:style-name="gr3" xml:id="id110" draw:id="id1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9" draw:text-style-name="P7" xml:id="id106" draw:id="id106"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70" draw:text-style-name="P8" draw:layer="layout" draw:type="line" svg:x1="10.438cm" svg:y1="16.584cm" svg:x2="10.438cm" svg:y2="16.834cm" draw:start-shape="id106" draw:start-glue-point="16" draw:end-shape="id106" draw:end-glue-point="17" svg:d="M10438 16584v250" svg:viewBox="0 0 1 251">
            <text:p/>
          </draw:connector>
        </draw:g>
        <draw:g draw:style-name="gr3" xml:id="id108" draw:id="id10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1" draw:text-style-name="P7" xml:id="id107" draw:id="id107"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72" draw:text-style-name="P8" draw:layer="layout" draw:type="line" svg:x1="6.992cm" svg:y1="12.472cm" svg:x2="6.992cm" svg:y2="12.722cm" draw:start-shape="id107" draw:start-glue-point="16" draw:end-shape="id107" draw:end-glue-point="17" svg:d="M6992 12472v250" svg:viewBox="0 0 1 251">
            <text:p/>
          </draw:connector>
        </draw:g>
        <draw:connector draw:style-name="gr173" draw:text-style-name="P9" draw:layer="layout" draw:type="line" svg:x1="3.954cm" svg:y1="14.099cm" svg:x2="4.457cm" svg:y2="16.432cm" draw:start-shape="id108" draw:start-glue-point="10" draw:end-shape="id109" draw:end-glue-point="3" svg:d="M3954 14099l503 2333" svg:viewBox="0 0 504 2334">
          <text:p/>
        </draw:connector>
        <draw:connector draw:style-name="gr174" draw:text-style-name="P9" xml:id="id109" draw:id="id109" draw:layer="layout" draw:type="line" svg:x1="6.523cm" svg:y1="17.259cm" svg:x2="4.457cm" svg:y2="16.432cm" draw:start-shape="id110" draw:start-glue-point="3" svg:d="M6523 17259l-2066-827" svg:viewBox="0 0 2067 828">
          <text:p/>
        </draw:connector>
        <draw:connector draw:style-name="gr175" draw:text-style-name="P9" draw:layer="layout" draw:type="line" svg:x1="10.907cm" svg:y1="17.735cm" svg:x2="12.482cm" svg:y2="17.462cm" draw:start-shape="id110" draw:start-glue-point="14" draw:end-shape="id111" draw:end-glue-point="3" svg:d="M10907 17735l1575-273" svg:viewBox="0 0 1576 274">
          <text:p/>
        </draw:connector>
        <draw:frame draw:style-name="gr22" draw:text-style-name="P2" draw:layer="layout" svg:width="2.857cm" svg:height="0.725cm" svg:x="11.477cm" svg:y="17.827cm">
          <draw:text-box>
            <text:p><text:span text:style-name="T1">w</text:span><text:span text:style-name="T1">e</text:span><text:span text:style-name="T1">b</text:span><text:span text:style-name="T1">_</text:span><text:span text:style-name="T1">q</text:span><text:span text:style-name="T1">u</text:span><text:span text:style-name="T1">e</text:span><text:span text:style-name="T1">u</text:span><text:span text:style-name="T1">e</text:span></text:p>
          </draw:text-box>
        </draw:frame>
        <draw:frame draw:style-name="gr2" draw:text-style-name="P2" draw:layer="layout" svg:width="2.354cm" svg:height="1.199cm" svg:x="4.678cm" svg:y="14.652cm">
          <draw:text-box>
            <text:p><text:span text:style-name="T1">r</text:span><text:span text:style-name="T1">m</text:span><text:span text:style-name="T1">s</text:span><text:span text:style-name="T1">_</text:span></text:p>
            <text:p><text:span text:style-name="T1">q</text:span><text:span text:style-name="T1">u</text:span><text:span text:style-name="T1">e</text:span><text:span text:style-name="T1">u</text:span><text:span text:style-name="T1">e</text:span></text:p>
          </draw:text-box>
        </draw:frame>
        <draw:g draw:style-name="gr3" xml:id="id113" draw:id="id11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6" draw:text-style-name="P7" xml:id="id112" draw:id="id112"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77" draw:text-style-name="P8" draw:layer="layout" draw:type="line" svg:x1="26.082cm" svg:y1="3.087cm" svg:x2="26.082cm" svg:y2="3.337cm" draw:start-shape="id112" draw:start-glue-point="16" draw:end-shape="id112" draw:end-glue-point="17" svg:d="M26082 3087v250" svg:viewBox="0 0 1 251">
            <text:p/>
          </draw:connector>
        </draw:g>
        <draw:connector draw:style-name="gr178" draw:text-style-name="P9" xml:id="id114" draw:id="id114" draw:layer="layout" draw:type="line" svg:x1="19.567cm" svg:y1="3.31cm" svg:x2="17.898cm" svg:y2="2.926cm" draw:start-shape="id113" draw:start-glue-point="8" svg:d="M19567 3310l-1669-384" svg:viewBox="0 0 1670 385">
          <text:p/>
        </draw:connector>
        <draw:connector draw:style-name="gr179" draw:text-style-name="P9" draw:layer="layout" draw:type="line" svg:x1="14.161cm" svg:y1="3.31cm" svg:x2="17.898cm" svg:y2="2.926cm" draw:start-shape="id99" draw:start-glue-point="15" draw:end-shape="id114" draw:end-glue-point="3" svg:d="M14161 3310l3737-384" svg:viewBox="0 0 3738 385">
          <text:p/>
        </draw:connector>
        <draw:connector draw:style-name="gr180" draw:text-style-name="P9" xml:id="id115" draw:id="id115" draw:layer="layout" draw:type="line" svg:x1="10.827cm" svg:y1="4.898cm" svg:x2="16.622cm" svg:y2="6.132cm" svg:d="M10827 4898l5795 1234" svg:viewBox="0 0 5796 1235">
          <text:p/>
        </draw:connector>
        <draw:connector draw:style-name="gr181" draw:text-style-name="P9" draw:layer="layout" draw:type="line" svg:x1="19.567cm" svg:y1="4.31cm" svg:x2="16.622cm" svg:y2="6.132cm" draw:start-shape="id113" draw:start-glue-point="9" draw:end-shape="id115" draw:end-glue-point="3" svg:d="M19567 4310l-2945 1822" svg:viewBox="0 0 2946 1823">
          <text:p/>
        </draw:connector>
        <draw:connector draw:style-name="gr182" draw:text-style-name="P9" draw:layer="layout" draw:type="line" svg:x1="14.797cm" svg:y1="8.467cm" svg:x2="10.832cm" svg:y2="12.513cm" draw:start-shape="id116" draw:start-glue-point="9" draw:end-shape="id117" draw:end-glue-point="3" svg:d="M14797 8467l-3965 4046" svg:viewBox="0 0 3966 4047">
          <text:p/>
        </draw:connector>
        <draw:connector draw:style-name="gr183" draw:text-style-name="P9" draw:layer="layout" draw:type="line" svg:x1="14.797cm" svg:y1="11.007cm" svg:x2="10.832cm" svg:y2="12.513cm" draw:start-shape="id118" draw:start-glue-point="9" draw:end-shape="id117" draw:end-glue-point="3" svg:d="M14797 11007l-3965 1506" svg:viewBox="0 0 3966 1507">
          <text:p/>
        </draw:connector>
        <draw:connector draw:style-name="gr184" draw:text-style-name="P9" draw:layer="layout" draw:type="line" svg:x1="14.797cm" svg:y1="13.23cm" svg:x2="10.832cm" svg:y2="12.513cm" draw:start-shape="id119" draw:start-glue-point="9" draw:end-shape="id117" draw:end-glue-point="3" svg:d="M14797 13230l-3965-717" svg:viewBox="0 0 3966 718">
          <text:p/>
        </draw:connector>
        <draw:connector draw:style-name="gr185" draw:text-style-name="P9" draw:layer="layout" draw:type="line" svg:x1="14.797cm" svg:y1="14.428cm" svg:x2="10.832cm" svg:y2="12.513cm" draw:start-shape="id120" draw:start-glue-point="8" draw:end-shape="id117" draw:end-glue-point="3" svg:d="M14797 14428l-3965-1915" svg:viewBox="0 0 3966 1916">
          <text:p/>
        </draw:connector>
        <draw:connector draw:style-name="gr186" draw:text-style-name="P9" draw:layer="layout" draw:type="line" svg:x1="14.797cm" svg:y1="16.651cm" svg:x2="10.832cm" svg:y2="12.513cm" draw:start-shape="id121" draw:start-glue-point="8" draw:end-shape="id117" draw:end-glue-point="3" svg:d="M14797 16651l-3965-4138" svg:viewBox="0 0 3966 4139">
          <text:p/>
        </draw:connector>
        <draw:connector draw:style-name="gr187" draw:text-style-name="P9" xml:id="id122" draw:id="id122" draw:layer="layout" draw:type="line" svg:x1="23.757cm" svg:y1="4.81cm" svg:x2="23.666cm" svg:y2="11.859cm" draw:start-shape="id113" draw:start-glue-point="12" svg:d="M23757 4810l-91 7049" svg:viewBox="0 0 92 7050">
          <text:p/>
        </draw:connector>
        <draw:connector draw:style-name="gr188" draw:text-style-name="P9" draw:layer="layout" draw:type="line" svg:x1="19.181cm" svg:y1="8.467cm" svg:x2="23.666cm" svg:y2="11.859cm" draw:start-shape="id116" draw:start-glue-point="14" draw:end-shape="id122" draw:end-glue-point="3" svg:d="M19181 8467l4485 3392" svg:viewBox="0 0 4486 3393">
          <text:p/>
        </draw:connector>
        <draw:connector draw:style-name="gr189" draw:text-style-name="P9" draw:layer="layout" draw:type="line" svg:x1="19.181cm" svg:y1="11.007cm" svg:x2="23.666cm" svg:y2="11.859cm" draw:start-shape="id118" draw:start-glue-point="14" draw:end-shape="id122" draw:end-glue-point="3" svg:d="M19181 11007l4485 852" svg:viewBox="0 0 4486 853">
          <text:p/>
        </draw:connector>
        <draw:connector draw:style-name="gr190" draw:text-style-name="P9" draw:layer="layout" draw:type="line" svg:x1="19.181cm" svg:y1="13.23cm" svg:x2="23.666cm" svg:y2="11.859cm" draw:start-shape="id119" draw:start-glue-point="14" draw:end-shape="id122" draw:end-glue-point="3" svg:d="M19181 13230l4485-1371" svg:viewBox="0 0 4486 1372">
          <text:p/>
        </draw:connector>
        <draw:connector draw:style-name="gr191" draw:text-style-name="P9" draw:layer="layout" draw:type="line" svg:x1="19.181cm" svg:y1="15.38cm" svg:x2="23.666cm" svg:y2="11.859cm" draw:start-shape="id120" draw:start-glue-point="14" draw:end-shape="id122" draw:end-glue-point="3" svg:d="M19181 15380l4485-3521" svg:viewBox="0 0 4486 3522">
          <text:p/>
        </draw:connector>
        <draw:connector draw:style-name="gr192" draw:text-style-name="P9" draw:layer="layout" draw:type="line" svg:x1="19.181cm" svg:y1="17.603cm" svg:x2="23.666cm" svg:y2="11.859cm" draw:start-shape="id121" draw:start-glue-point="14" draw:end-shape="id122" draw:end-glue-point="3" svg:d="M19181 17603l4485-5744" svg:viewBox="0 0 4486 5745">
          <text:p/>
        </draw:connector>
        <draw:frame draw:style-name="gr2" draw:text-style-name="P2" draw:layer="layout" svg:width="1.904cm" svg:height="1.199cm" svg:x="21.637cm" svg:y="7.421cm">
          <draw:text-box>
            <text:p><text:span text:style-name="T1">e</text:span><text:span text:style-name="T1">r</text:span><text:span text:style-name="T1">r</text:span><text:span text:style-name="T1">o</text:span><text:span text:style-name="T1">r</text:span><text:span text:style-name="T1">_</text:span></text:p>
            <text:p><text:span text:style-name="T1">q</text:span><text:span text:style-name="T1">u</text:span><text:span text:style-name="T1">e</text:span><text:span text:style-name="T1">u</text:span><text:span text:style-name="T1">e</text:span></text:p>
          </draw:text-box>
        </draw:frame>
        <draw:frame draw:style-name="gr2" draw:text-style-name="P2" draw:layer="layout" svg:width="1.905cm" svg:height="1.199cm" svg:x="16.24cm" svg:y="3.022cm">
          <draw:text-box>
            <text:p><text:span text:style-name="T1">e</text:span><text:span text:style-name="T1">r</text:span><text:span text:style-name="T1">r</text:span><text:span text:style-name="T1">o</text:span><text:span text:style-name="T1">r</text:span><text:span text:style-name="T1">_</text:span></text:p>
            <text:p><text:span text:style-name="T1">q</text:span><text:span text:style-name="T1">u</text:span><text:span text:style-name="T1">e</text:span><text:span text:style-name="T1">u</text:span><text:span text:style-name="T1">e</text:span></text:p>
          </draw:text-box>
        </draw:frame>
        <draw:connector draw:style-name="gr193" draw:text-style-name="P9" xml:id="id111" draw:id="id111" draw:layer="layout" draw:type="line" svg:x1="14.797cm" svg:y1="17.603cm" svg:x2="12.482cm" svg:y2="17.462cm" draw:start-shape="id121" draw:start-glue-point="9" svg:d="M14797 17603l-2315-141" svg:viewBox="0 0 2316 14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45" draw:display-name="Square 45" svg:viewBox="0 0 1131 1131" svg:d="M0 564l564 567 567-567-567-564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14T18:01:01.859473260</dc:date>
    <meta:editing-duration>PT10H23M25S</meta:editing-duration>
    <meta:editing-cycles>76</meta:editing-cycles>
    <meta:print-date>2026-04-03T16:45:26.431431754</meta:print-date>
    <dc:creator>Henk</dc:creator>
    <meta:document-statistic meta:object-count="268"/>
  </office:meta>
</office:document-meta>
</file>