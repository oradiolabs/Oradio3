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73cm" fo:min-width="26.43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6.53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6.436cm" fo:padding-top="0.151cm" fo:padding-bottom="0.151cm" fo:padding-left="0.276cm" fo:padding-right="0.276cm"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5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8"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6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10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style:writing-mode="lr-tb" loext:decorative="false"/>
      <style:paragraph-properties style:writing-mode="lr-tb"/>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4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4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1"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1"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style:paragraph-properties fo:text-align="center"/>
    </style:style>
    <style:style style:name="P16" style:family="paragraph">
      <style:paragraph-properties fo:margin-left="0cm" fo:margin-right="0cm" fo:text-align="center" fo:text-indent="0cm"/>
    </style:style>
    <style:style style:name="P17" style:family="paragraph">
      <loext:graphic-properties draw:fill="none"/>
      <style:paragraph-properties fo:text-align="center" style:writing-mode="lr-tb"/>
    </style:style>
    <style:style style:name="P18" style:family="paragraph">
      <loext:graphic-properties draw:fill="none"/>
      <style:paragraph-properties fo:margin-left="0cm" fo:margin-right="0cm" fo:text-align="center" fo:text-indent="0cm" style:writing-mode="lr-tb"/>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1"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6.988cm" svg:height="6.032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8.62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6.988cm" svg:height="5.715cm" svg:x="1.317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10.5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5.447cm" svg:y="9.008cm">
          <draw:text-box>
            <text:p><text:span text:style-name="T1">ALSA_</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3.86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7.32cm" svg:y1="12.707cm" svg:x2="27.32cm" svg:y2="12.957cm" draw:start-shape="id1" draw:start-glue-point="16" draw:end-shape="id1" draw:end-glue-point="17" svg:d="M27320 127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3.51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7.252cm" svg:y1="4.04cm" svg:x2="27.252cm" svg:y2="4.29cm" draw:start-shape="id2" draw:start-glue-point="16" draw:end-shape="id2" draw:end-glue-point="17" svg:d="M27252 4040v250" svg:viewBox="0 0 1 251">
            <text:p/>
          </draw:connector>
        </draw:g>
        <draw:connector draw:style-name="gr10" draw:text-style-name="P9" xml:id="id5" draw:id="id5" draw:layer="layout" draw:type="line" svg:x1="24.646cm" svg:y1="12.43cm" svg:x2="25.027cm" svg:y2="8.747cm" draw:start-shape="id3" draw:start-glue-point="7" svg:d="M24646 12430l381-3683" svg:viewBox="0 0 382 3684">
          <text:p/>
        </draw:connector>
        <draw:connector draw:style-name="gr11" draw:text-style-name="P9" draw:layer="layout" draw:type="line" svg:x1="26.037cm" svg:y1="5.763cm" svg:x2="25.027cm" svg:y2="8.747cm" draw:start-shape="id4" draw:start-glue-point="12" draw:end-shape="id5" draw:end-glue-point="3" svg:d="M26037 5763l-1010 2984" svg:viewBox="0 0 1011 2985">
          <text:p/>
        </draw:connector>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3.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4.082cm" svg:x2="17.242cm" svg:y2="4.332cm" draw:start-shape="id6" draw:start-glue-point="16" draw:end-shape="id6" draw:end-glue-point="17" svg:d="M17242 4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3.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4.025cm" svg:x2="6.535cm" svg:y2="4.275cm" draw:start-shape="id7" draw:start-glue-point="16" draw:end-shape="id7" draw:end-glue-point="17" svg:d="M6535 4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12.707cm" svg:x2="4.975cm" svg:y2="12.957cm" draw:start-shape="id8" draw:start-glue-point="16" draw:end-shape="id8" draw:end-glue-point="17" svg:d="M4975 12707v250" svg:viewBox="0 0 1 251">
            <text:p/>
          </draw:connector>
        </draw:g>
        <draw:connector draw:style-name="gr18" draw:text-style-name="P9" xml:id="id13" draw:id="id13" draw:layer="layout" draw:type="line" svg:x1="7.417cm" svg:y1="12.43cm" svg:x2="6.475cm" svg:y2="9.214cm" draw:start-shape="id9" draw:start-glue-point="6" svg:d="M7417 12430l-942-3216" svg:viewBox="0 0 943 3217">
          <text:p/>
        </draw:connector>
        <draw:connector draw:style-name="gr19" draw:text-style-name="P9" xml:id="id12" draw:id="id12" draw:layer="layout" draw:type="line" svg:x1="4.695cm" svg:y1="12.43cm" svg:x2="4.545cm" svg:y2="9.4cm" draw:start-shape="id10" draw:start-glue-point="4" svg:d="M4695 12430l-150-3030" svg:viewBox="0 0 151 3031">
          <text:p/>
        </draw:connector>
        <draw:connector draw:style-name="gr20" draw:text-style-name="P9" draw:layer="layout" draw:type="line" svg:x1="3.703cm" svg:y1="5.748cm" svg:x2="4.545cm" svg:y2="9.4cm" draw:start-shape="id11" draw:start-glue-point="10" draw:end-shape="id12" draw:end-glue-point="3" svg:d="M3703 5748l842 3652" svg:viewBox="0 0 843 3653">
          <text:p/>
        </draw:connector>
        <draw:connector draw:style-name="gr21" draw:text-style-name="P9" draw:layer="layout" draw:type="line" svg:x1="6.179cm" svg:y1="5.748cm" svg:x2="6.475cm" svg:y2="9.214cm" draw:start-shape="id11" draw:start-glue-point="13" draw:end-shape="id13" draw:end-glue-point="3" svg:d="M6179 5748l296 3466" svg:viewBox="0 0 297 3467">
          <text:p/>
        </draw:connector>
        <draw:frame draw:style-name="gr22" draw:text-style-name="P2" draw:layer="layout" svg:width="2.223cm" svg:height="0.725cm" svg:x="2.269cm" svg:y="8.8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12.707cm" svg:x2="9.102cm" svg:y2="12.957cm" draw:start-shape="id14" draw:start-glue-point="16" draw:end-shape="id14" draw:end-glue-point="17" svg:d="M9102 127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12.707cm" svg:x2="13.55cm" svg:y2="12.957cm" draw:start-shape="id15" draw:start-glue-point="16" draw:end-shape="id15" draw:end-glue-point="17" svg:d="M13550 12707v250" svg:viewBox="0 0 1 251">
            <text:p/>
          </draw:connector>
        </draw:g>
        <draw:connector draw:style-name="gr27" draw:text-style-name="P9" xml:id="id18" draw:id="id18" draw:layer="layout" draw:type="line" svg:x1="11.036cm" svg:y1="12.43cm" svg:x2="10.397cm" svg:y2="9.805cm" draw:start-shape="id16" draw:start-glue-point="7" svg:d="M11036 12430l-639-2625" svg:viewBox="0 0 640 2626">
          <text:p/>
        </draw:connector>
        <draw:connector draw:style-name="gr28" draw:text-style-name="P9" draw:layer="layout" draw:type="line" svg:x1="10.793cm" svg:y1="5.763cm" svg:x2="10.397cm" svg:y2="9.805cm" draw:start-shape="id17" draw:start-glue-point="12" draw:end-shape="id18" draw:end-glue-point="3" svg:d="M10793 5763l-396 4042" svg:viewBox="0 0 397 4043">
          <text:p/>
        </draw:connector>
        <draw:frame draw:style-name="gr29" draw:text-style-name="P11" draw:layer="layout" svg:width="3.175cm" svg:height="1.27cm" svg:x="6.715cm" svg:y="8.6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0" draw:text-style-name="P7" xml:id="id19" draw:id="id19" draw:layer="layout" svg:width="3.75cm" svg:height="2cm" svg:x="8.93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31" draw:text-style-name="P8" draw:layer="layout" draw:type="line" svg:x1="12.217cm" svg:y1="21.914cm" svg:x2="12.217cm" svg:y2="22.164cm" draw:start-shape="id19" draw:start-glue-point="16" draw:end-shape="id19" draw:end-glue-point="17" svg:d="M1221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2" draw:text-style-name="P7" xml:id="id20" draw:id="id20" draw:layer="layout" svg:width="3.75cm" svg:height="2cm" svg:x="13.76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33" draw:text-style-name="P8" draw:layer="layout" draw:type="line" svg:x1="17.04cm" svg:y1="21.819cm" svg:x2="17.04cm" svg:y2="22.069cm" draw:start-shape="id20" draw:start-glue-point="16" draw:end-shape="id20" draw:end-glue-point="17" svg:d="M17040 2181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7" xml:id="id21" draw:id="id21" draw:layer="layout" svg:width="4.068cm" svg:height="2cm" svg:x="18.204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35" draw:text-style-name="P8" draw:layer="layout" draw:type="line" svg:x1="21.802cm" svg:y1="21.819cm" svg:x2="21.802cm" svg:y2="22.069cm" draw:start-shape="id21" draw:start-glue-point="16" draw:end-shape="id21" draw:end-glue-point="17" svg:d="M21802 21819v250" svg:viewBox="0 0 1 251">
            <text:p/>
          </draw:connector>
        </draw:g>
        <draw:custom-shape draw:style-name="gr36" draw:text-style-name="P13" draw:layer="layout" svg:width="26.988cm" svg:height="0.952cm" svg:x="1.317cm" svg:y="0.908cm">
          <text:p text:style-name="P12"><text:span text:style-name="T5">Component</text:span><text:span text:style-name="T5">s Interface: </text:span><text:span text:style-name="T5">raspiOS</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7" draw:text-style-name="P7" xml:id="id22" draw:id="id22" draw:layer="layout" svg:width="4.128cm" svg:height="2cm" svg:x="8.317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8" draw:text-style-name="P8" draw:layer="layout" draw:type="line" svg:x1="11.975cm" svg:y1="4.04cm" svg:x2="11.975cm" svg:y2="4.29cm" draw:start-shape="id22" draw:start-glue-point="16" draw:end-shape="id22" draw:end-glue-point="17" svg:d="M11975 4040v250" svg:viewBox="0 0 1 251">
            <text:p/>
          </draw:connector>
        </draw:g>
        <draw:g draw:style-name="gr3" xml:id="id24" draw:id="id2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9" draw:text-style-name="P7" xml:id="id23" draw:id="id23" draw:layer="layout" svg:width="3.81cm" svg:height="1.805cm" svg:x="14.617cm" svg:y="12.5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40" draw:text-style-name="P8" draw:layer="layout" draw:type="line" svg:x1="17.957cm" svg:y1="12.807cm" svg:x2="17.957cm" svg:y2="13.057cm" draw:start-shape="id23" draw:start-glue-point="16" draw:end-shape="id23" draw:end-glue-point="17" svg:d="M17957 12807v250" svg:viewBox="0 0 1 251">
            <text:p/>
          </draw:connector>
        </draw:g>
        <draw:connector draw:style-name="gr41" draw:text-style-name="P9" xml:id="id26" draw:id="id26" draw:layer="layout" draw:type="line" svg:x1="16.141cm" svg:y1="12.53cm" svg:x2="16.716cm" svg:y2="9.805cm" draw:start-shape="id24" draw:start-glue-point="6" svg:d="M16141 12530l575-2725" svg:viewBox="0 0 576 2726">
          <text:p/>
        </draw:connector>
        <draw:connector draw:style-name="gr42" draw:text-style-name="P9" draw:layer="layout" draw:type="line" svg:x1="16.886cm" svg:y1="5.805cm" svg:x2="16.716cm" svg:y2="9.805cm" draw:start-shape="id25" draw:start-glue-point="13" draw:end-shape="id26" draw:end-glue-point="3" svg:d="M16886 5805l-170 4000" svg:viewBox="0 0 171 4001">
          <text:p/>
        </draw:connector>
        <draw:frame draw:style-name="gr2" draw:text-style-name="P14" draw:layer="layout" svg:width="2.857cm" svg:height="1.199cm" svg:x="14.018cm" svg:y="8.373cm">
          <draw:text-box>
            <text:p><text:span text:style-name="T6">http_</text:span></text:p>
            <text:p><text:span text:style-name="T6">requests</text:span></text:p>
          </draw:text-box>
        </draw:frame>
        <draw:g draw:style-name="gr3" xml:id="id29" draw:id="id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3" draw:text-style-name="P7" xml:id="id27" draw:id="id27" draw:layer="layout" svg:width="4.068cm" svg:height="2cm" svg:x="19.157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nicorn server</text:span></text:p>
            <draw:enhanced-geometry svg:viewBox="0 0 21600 21600" draw:type="rectangle" draw:enhanced-path="M 0 0 L 21600 0 21600 21600 0 21600 0 0 Z N"/>
          </draw:custom-shape>
          <draw:connector draw:style-name="gr44" draw:text-style-name="P8" draw:layer="layout" draw:type="line" svg:x1="22.755cm" svg:y1="12.707cm" svg:x2="22.755cm" svg:y2="12.957cm" draw:start-shape="id27" draw:start-glue-point="16" draw:end-shape="id27" draw:end-glue-point="17" svg:d="M22755 12707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7" xml:id="id28" draw:id="id28" draw:layer="layout" svg:width="4.128cm" svg:height="2cm" svg:x="18.779cm" svg:y="3.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6" draw:text-style-name="P8" draw:layer="layout" draw:type="line" svg:x1="22.437cm" svg:y1="4.134cm" svg:x2="22.437cm" svg:y2="4.384cm" draw:start-shape="id28" draw:start-glue-point="16" draw:end-shape="id28" draw:end-glue-point="17" svg:d="M22437 4134v250" svg:viewBox="0 0 1 251">
            <text:p/>
          </draw:connector>
        </draw:g>
        <draw:connector draw:style-name="gr47" draw:text-style-name="P9" xml:id="id31" draw:id="id31" draw:layer="layout" draw:type="line" svg:x1="21.597cm" svg:y1="12.43cm" svg:x2="20.887cm" svg:y2="9.587cm" draw:start-shape="id29" draw:start-glue-point="5" svg:d="M21597 12430l-710-2843" svg:viewBox="0 0 711 2844">
          <text:p/>
        </draw:connector>
        <draw:connector draw:style-name="gr48" draw:text-style-name="P9" draw:layer="layout" draw:type="line" svg:x1="21.255cm" svg:y1="5.857cm" svg:x2="20.887cm" svg:y2="9.587cm" draw:start-shape="id30" draw:start-glue-point="12" draw:end-shape="id31" draw:end-glue-point="3" svg:d="M21255 5857l-368 3730" svg:viewBox="0 0 369 3731">
          <text:p/>
        </draw:connector>
        <draw:frame draw:style-name="gr2" draw:text-style-name="P14" draw:layer="layout" svg:width="2.857cm" svg:height="1.199cm" svg:x="17.192cm" svg:y="17.263cm">
          <draw:text-box>
            <text:p><text:span text:style-name="T6">http_</text:span></text:p>
            <text:p><text:span text:style-name="T6">requests</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9" draw:text-style-name="P7" xml:id="id32" draw:id="id32" draw:layer="layout" svg:width="4.068cm" svg:height="2cm" svg:x="20.367cm" svg:y="16.8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text:span></text:p>
            <draw:enhanced-geometry svg:viewBox="0 0 21600 21600" draw:type="rectangle" draw:enhanced-path="M 0 0 L 21600 0 21600 21600 0 21600 0 0 Z N"/>
          </draw:custom-shape>
          <draw:connector draw:style-name="gr50" draw:text-style-name="P8" draw:layer="layout" draw:type="line" svg:x1="23.965cm" svg:y1="17.152cm" svg:x2="23.965cm" svg:y2="17.402cm" draw:start-shape="id32" draw:start-glue-point="16" draw:end-shape="id32" draw:end-glue-point="17" svg:d="M23965 17152v250" svg:viewBox="0 0 1 251">
            <text:p/>
          </draw:connector>
        </draw:g>
      </draw:page>
      <draw:page draw:name="gpio"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55" draw:id="id55"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2"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3"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1.102cm" svg:y="12.747cm">
          <draw:text-box>
            <text:p><text:span text:style-name="T1">ALSA_</text:span></text:p>
            <text:p><text:span text:style-name="T1">interface</text:span></text:p>
          </draw:text-box>
        </draw:frame>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3" draw:id="id33" draw:layer="layout" svg:width="3.04cm" svg:height="2cm" svg:x="20.36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55" draw:text-style-name="P8" draw:layer="layout" draw:type="line" svg:x1="22.937cm" svg:y1="17.057cm" svg:x2="22.937cm" svg:y2="17.307cm" draw:start-shape="id33" draw:start-glue-point="16" draw:end-shape="id33" draw:end-glue-point="17" svg:d="M22937 17057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6" draw:text-style-name="P7" xml:id="id34" draw:id="id34" draw:layer="layout" svg:width="3.75cm" svg:height="2cm" svg:x="19.075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57" draw:text-style-name="P8" draw:layer="layout" draw:type="line" svg:x1="22.355cm" svg:y1="7.532cm" svg:x2="22.355cm" svg:y2="7.782cm" draw:start-shape="id34" draw:start-glue-point="16" draw:end-shape="id34" draw:end-glue-point="17" svg:d="M22355 7532v250" svg:viewBox="0 0 1 251">
            <text:p/>
          </draw:connector>
        </draw:g>
        <draw:connector draw:style-name="gr58" draw:text-style-name="P9" xml:id="id36" draw:id="id36" draw:layer="layout" draw:type="line" svg:x1="21.004cm" svg:y1="14.898cm" svg:x2="20.963cm" svg:y2="12.496cm" svg:d="M21004 14898l-41-2402" svg:viewBox="0 0 42 2403">
          <text:p/>
        </draw:connector>
        <draw:connector draw:style-name="gr59" draw:text-style-name="P9" draw:layer="layout" draw:type="line" svg:x1="21.325cm" svg:y1="9.255cm" svg:x2="20.963cm" svg:y2="12.496cm" draw:start-shape="id35" draw:start-glue-point="12" draw:end-shape="id36" draw:end-glue-point="3" svg:d="M21325 9255l-362 3241" svg:viewBox="0 0 363 3242">
          <text:p/>
        </draw:connector>
        <draw:g draw:style-name="gr3" xml:id="id68" draw:id="id6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7" draw:id="id37"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61" draw:text-style-name="P8" draw:layer="layout" draw:type="line" svg:x1="7.907cm" svg:y1="4.674cm" svg:x2="7.907cm" svg:y2="4.924cm" draw:start-shape="id37" draw:start-glue-point="16" draw:end-shape="id37" draw:end-glue-point="17" svg:d="M7907 467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8" draw:id="id38"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63" draw:text-style-name="P8" draw:layer="layout" draw:type="line" svg:x1="5.41cm" svg:y1="7.944cm" svg:x2="5.41cm" svg:y2="8.194cm" draw:start-shape="id38" draw:start-glue-point="16" draw:end-shape="id38" draw:end-glue-point="17" svg:d="M5410 7944v250" svg:viewBox="0 0 1 251">
            <text:p/>
          </draw:connector>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4" draw:text-style-name="P7" xml:id="id39" draw:id="id39" draw:layer="layout" svg:width="3.523cm" svg:height="2cm" svg:x="24.17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65" draw:text-style-name="P8" draw:layer="layout" draw:type="line" svg:x1="27.23cm" svg:y1="17.057cm" svg:x2="27.23cm" svg:y2="17.307cm" draw:start-shape="id39" draw:start-glue-point="16" draw:end-shape="id39" draw:end-glue-point="17" svg:d="M27230 17057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6" draw:text-style-name="P7" xml:id="id40" draw:id="id40" draw:layer="layout" svg:width="4.128cm" svg:height="2cm" svg:x="21.837cm" svg:y="4.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67" draw:text-style-name="P8" draw:layer="layout" draw:type="line" svg:x1="25.495cm" svg:y1="4.587cm" svg:x2="25.495cm" svg:y2="4.837cm" draw:start-shape="id40" draw:start-glue-point="16" draw:end-shape="id40" draw:end-glue-point="17" svg:d="M25495 4587v250" svg:viewBox="0 0 1 251">
            <text:p/>
          </draw:connector>
        </draw:g>
        <draw:frame draw:style-name="gr68" draw:text-style-name="P2" draw:layer="layout" svg:width="2.54cm" svg:height="1.588cm" svg:x="26.282cm" svg:y="12.647cm">
          <draw:text-box>
            <text:p><text:span text:style-name="T1">event_</text:span></text:p>
            <text:p><text:span text:style-name="T1">interface</text:span></text:p>
          </draw:text-box>
        </draw:frame>
        <draw:frame draw:style-name="gr69" draw:text-style-name="P2" draw:layer="layout" svg:width="2.54cm" svg:height="1.27cm" svg:x="23.525cm" svg:y="12.23cm">
          <draw:text-box>
            <text:p><text:span text:style-name="T1">playback_</text:span></text:p>
            <text:p><text:span text:style-name="T1">interface</text:span></text:p>
          </draw:text-box>
        </draw:frame>
        <draw:connector draw:style-name="gr70" draw:text-style-name="P9" xml:id="id43" draw:id="id43" draw:layer="layout" draw:type="line" svg:x1="24.882cm" svg:y1="16.78cm" svg:x2="23.121cm" svg:y2="12.089cm" draw:start-shape="id41" draw:start-glue-point="7" svg:d="M24882 16780l-1761-4691" svg:viewBox="0 0 1762 4692">
          <text:p/>
        </draw:connector>
        <draw:connector draw:style-name="gr71" draw:text-style-name="P9" xml:id="id45" draw:id="id45" draw:layer="layout" draw:type="line" svg:x1="26.994cm" svg:y1="16.78cm" svg:x2="25.889cm" svg:y2="12.455cm" draw:start-shape="id41" draw:start-glue-point="4" svg:d="M26994 16780l-1105-4325" svg:viewBox="0 0 1106 4326">
          <text:p/>
        </draw:connector>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2" draw:text-style-name="P7" xml:id="id42" draw:id="id42" draw:layer="layout" svg:width="4.128cm" svg:height="2cm" svg:x="24.63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73" draw:text-style-name="P8" draw:layer="layout" draw:type="line" svg:x1="28.288cm" svg:y1="7.532cm" svg:x2="28.288cm" svg:y2="7.782cm" draw:start-shape="id42" draw:start-glue-point="16" draw:end-shape="id42" draw:end-glue-point="17" svg:d="M28288 7532v250" svg:viewBox="0 0 1 251">
            <text:p/>
          </draw:connector>
        </draw:g>
        <draw:connector draw:style-name="gr74" draw:text-style-name="P9" xml:id="id70" draw:id="id70" draw:layer="layout" draw:type="line" svg:x1="23.813cm" svg:y1="10.299cm" svg:x2="23.121cm" svg:y2="12.089cm" draw:end-shape="id43" draw:end-glue-point="3" svg:d="M23813 10299l-692 1790" svg:viewBox="0 0 693 1791">
          <text:p/>
        </draw:connector>
        <draw:connector draw:style-name="gr75" draw:text-style-name="P9" draw:layer="layout" draw:type="line" svg:x1="26.282cm" svg:y1="9.255cm" svg:x2="25.889cm" svg:y2="12.455cm" draw:start-shape="id44" draw:start-glue-point="11" draw:end-shape="id45" draw:end-glue-point="3" svg:d="M26282 9255l-393 3200" svg:viewBox="0 0 394 3201">
          <text:p/>
        </draw:connector>
        <draw:g draw:style-name="gr3" xml:id="id47" draw:id="id4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6" draw:text-style-name="P7" xml:id="id46" draw:id="id46"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77" draw:text-style-name="P8" draw:layer="layout" draw:type="line" svg:x1="5.392cm" svg:y1="17.634cm" svg:x2="5.392cm" svg:y2="17.884cm" draw:start-shape="id46" draw:start-glue-point="16" draw:end-shape="id46" draw:end-glue-point="17" svg:d="M5392 17634v250" svg:viewBox="0 0 1 251">
            <text:p/>
          </draw:connector>
        </draw:g>
        <draw:connector draw:style-name="gr78" draw:text-style-name="P9" draw:layer="layout" draw:type="line" svg:x1="3.612cm" svg:y1="17.357cm" svg:x2="3.739cm" svg:y2="13.247cm" draw:start-shape="id47" draw:start-glue-point="6" draw:end-shape="id48" draw:end-glue-point="3" svg:d="M3612 17357l127-4110" svg:viewBox="0 0 128 4111">
          <text:p/>
        </draw:connector>
        <draw:connector draw:style-name="gr79" draw:text-style-name="P9" xml:id="id51" draw:id="id51" draw:layer="layout" draw:type="line" svg:x1="6.665cm" svg:y1="14.857cm" svg:x2="6.595cm" svg:y2="13.27cm" draw:start-shape="id49" draw:start-glue-point="5" svg:d="M6665 14857l-70-1587" svg:viewBox="0 0 71 1588">
          <text:p/>
        </draw:connector>
        <draw:connector draw:style-name="gr80" draw:text-style-name="P9" draw:layer="layout" draw:type="line" svg:x1="2.578cm" svg:y1="9.667cm" svg:x2="3.739cm" svg:y2="13.247cm" draw:start-shape="id50" draw:start-glue-point="10" draw:end-shape="id48" draw:end-glue-point="3" svg:d="M2578 9667l1161 3580" svg:viewBox="0 0 1162 3581">
          <text:p/>
        </draw:connector>
        <draw:connector draw:style-name="gr81" draw:text-style-name="P9" draw:layer="layout" draw:type="line" svg:x1="5.054cm" svg:y1="9.667cm" svg:x2="6.595cm" svg:y2="13.27cm" draw:start-shape="id50" draw:start-glue-point="13" draw:end-shape="id51"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49" draw:id="id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2" draw:text-style-name="P7" xml:id="id52" draw:id="id52"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83" draw:text-style-name="P8" draw:layer="layout" draw:type="line" svg:x1="7.695cm" svg:y1="15.134cm" svg:x2="7.695cm" svg:y2="15.384cm" draw:start-shape="id52" draw:start-glue-point="16" draw:end-shape="id52" draw:end-glue-point="17" svg:d="M7695 15134v250" svg:viewBox="0 0 1 251">
            <text:p/>
          </draw:connector>
        </draw:g>
        <draw:g draw:style-name="gr3" xml:id="id54" draw:id="id5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4" draw:text-style-name="P7" xml:id="id53" draw:id="id53"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85" draw:text-style-name="P8" draw:layer="layout" draw:type="line" svg:x1="10.607cm" svg:y1="17.692cm" svg:x2="10.607cm" svg:y2="17.942cm" draw:start-shape="id53" draw:start-glue-point="16" draw:end-shape="id53" draw:end-glue-point="17" svg:d="M10607 17692v250" svg:viewBox="0 0 1 251">
            <text:p/>
          </draw:connector>
        </draw:g>
        <draw:connector draw:style-name="gr86" draw:text-style-name="P9" draw:layer="layout" draw:type="line" svg:x1="8.827cm" svg:y1="17.415cm" svg:x2="9.472cm" svg:y2="13.029cm" draw:start-shape="id54" draw:start-glue-point="6" draw:end-shape="id55" draw:end-glue-point="1" svg:d="M8827 17415l645-4386" svg:viewBox="0 0 646 4387">
          <text:p/>
        </draw:connector>
        <draw:connector draw:style-name="gr87" draw:text-style-name="P9" xml:id="id67" draw:id="id67" draw:layer="layout" draw:type="line" svg:x1="7.531cm" svg:y1="10.461cm" svg:x2="9.472cm" svg:y2="13.029cm" draw:end-shape="id55" draw:end-glue-point="1" svg:d="M7531 10461l1941 2568" svg:viewBox="0 0 1942 2569">
          <text:p/>
        </draw:connector>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6" draw:id="id56"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89" draw:text-style-name="P8" draw:layer="layout" draw:type="line" svg:x1="15.452cm" svg:y1="4.704cm" svg:x2="15.452cm" svg:y2="4.954cm" draw:start-shape="id56" draw:start-glue-point="16" draw:end-shape="id56" draw:end-glue-point="17" svg:d="M15452 4704v250" svg:viewBox="0 0 1 251">
            <text:p/>
          </draw:connector>
        </draw:g>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0" draw:text-style-name="P7" xml:id="id57" draw:id="id57"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91" draw:text-style-name="P8" draw:layer="layout" draw:type="line" svg:x1="11.735cm" svg:y1="8.449cm" svg:x2="11.735cm" svg:y2="8.699cm" draw:start-shape="id57" draw:start-glue-point="16" draw:end-shape="id57"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8" draw:id="id58"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93" draw:text-style-name="P8" draw:layer="layout" draw:type="line" svg:x1="17.675cm" svg:y1="7.627cm" svg:x2="17.675cm" svg:y2="7.877cm" draw:start-shape="id58" draw:start-glue-point="16" draw:end-shape="id58" draw:end-glue-point="17" svg:d="M17675 7627v250" svg:viewBox="0 0 1 251">
            <text:p/>
          </draw:connector>
        </draw:g>
        <draw:frame draw:style-name="gr94" draw:text-style-name="P11" xml:id="id48" draw:id="id48"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5" draw:text-style-name="P7" xml:id="id59" draw:id="id59"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96" draw:text-style-name="P8" draw:layer="layout" draw:type="line" svg:x1="11.9cm" svg:y1="22.867cm" svg:x2="11.9cm" svg:y2="23.117cm" draw:start-shape="id59" draw:start-glue-point="16" draw:end-shape="id59"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7" draw:text-style-name="P7" xml:id="id60" draw:id="id60"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98" draw:text-style-name="P8" draw:layer="layout" draw:type="line" svg:x1="16.345cm" svg:y1="22.867cm" svg:x2="16.345cm" svg:y2="23.117cm" draw:start-shape="id60" draw:start-glue-point="16" draw:end-shape="id60" draw:end-glue-point="17" svg:d="M16345 22867v250" svg:viewBox="0 0 1 251">
            <text:p/>
          </draw:connector>
        </draw:g>
        <draw:g draw:style-name="gr3" xml:id="id62" draw:id="id6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9" draw:text-style-name="P7" xml:id="id61" draw:id="id61"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0" draw:text-style-name="P8" draw:layer="layout" draw:type="line" svg:x1="13.622cm" svg:y1="15.247cm" svg:x2="13.622cm" svg:y2="15.497cm" draw:start-shape="id61" draw:start-glue-point="16" draw:end-shape="id61" draw:end-glue-point="17" svg:d="M13622 15247v250" svg:viewBox="0 0 1 251">
            <text:p/>
          </draw:connector>
        </draw:g>
        <draw:connector draw:style-name="gr101" draw:text-style-name="P9" xml:id="id64" draw:id="id64" draw:layer="layout" draw:type="line" svg:x1="11.842cm" svg:y1="14.97cm" svg:x2="12.415cm" svg:y2="12.822cm" draw:start-shape="id62" draw:start-glue-point="6" svg:d="M11842 14970l573-2148" svg:viewBox="0 0 574 2149">
          <text:p/>
        </draw:connector>
        <draw:connector draw:style-name="gr102" draw:text-style-name="P9" draw:layer="layout" draw:type="line" svg:x1="11.379cm" svg:y1="10.172cm" svg:x2="12.415cm" svg:y2="12.822cm" draw:start-shape="id63" draw:start-glue-point="13" draw:end-shape="id64" draw:end-glue-point="3" svg:d="M11379 10172l1036 2650" svg:viewBox="0 0 1037 2651">
          <text:p/>
        </draw:connector>
        <draw:frame draw:style-name="gr69" draw:text-style-name="P14" draw:layer="layout" svg:width="2.54cm" svg:height="1.27cm" svg:x="10.20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3" draw:text-style-name="P7" xml:id="id65" draw:id="id65"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4" draw:text-style-name="P8" draw:layer="layout" draw:type="line" svg:x1="21.743cm" svg:y1="24.772cm" svg:x2="21.743cm" svg:y2="25.022cm" draw:start-shape="id65" draw:start-glue-point="16" draw:end-shape="id65" draw:end-glue-point="17" svg:d="M21743 24772v250" svg:viewBox="0 0 1 251">
            <text:p/>
          </draw:connector>
        </draw:g>
        <draw:connector draw:style-name="gr105" draw:text-style-name="P9" draw:layer="layout" draw:type="line" svg:x1="13.352cm" svg:y1="10.258cm" svg:x2="12.415cm" svg:y2="12.822cm" draw:start-shape="id66" draw:start-glue-point="2" draw:end-shape="id64" draw:end-glue-point="3" svg:d="M13352 10258l-937 2564" svg:viewBox="0 0 938 2565">
          <text:p/>
        </draw:connector>
        <draw:connector draw:style-name="gr106" draw:text-style-name="P15" draw:layer="layout" draw:line-skew="-1.012cm" svg:x1="7.531cm" svg:y1="10.461cm" svg:x2="6.725cm" svg:y2="6.397cm" draw:start-shape="id67" draw:start-glue-point="2" draw:end-shape="id68" draw:end-glue-point="12" svg:d="M7531 10461v-3044h-806v-1020" svg:viewBox="0 0 807 4065">
          <text:p/>
        </draw:connector>
        <draw:connector draw:style-name="gr106" draw:text-style-name="P15" xml:id="id66" draw:id="id66" draw:layer="layout" draw:line-skew="-0.989cm" svg:x1="13.352cm" svg:y1="10.258cm" svg:x2="12.684cm" svg:y2="6.427cm" draw:end-shape="id69" draw:end-glue-point="11" svg:d="M13352 10258v-2641h-668v-1190" svg:viewBox="0 0 669 3832">
          <text:p/>
        </draw:connector>
        <draw:connector draw:style-name="gr106" draw:text-style-name="P15" draw:layer="layout" svg:x1="23.813cm" svg:y1="10.299cm" svg:x2="23.489cm" svg:y2="6.31cm" draw:start-shape="id70" draw:start-glue-point="2" draw:end-shape="id71" draw:end-glue-point="11" svg:d="M23813 10299v-1994h-324v-1995" svg:viewBox="0 0 325 3990">
          <text:p/>
        </draw:connector>
        <draw:connector draw:style-name="gr106" draw:text-style-name="P15" draw:layer="layout" draw:line-skew="-0.552cm" svg:x1="22.799cm" svg:y1="16.78cm" svg:x2="21.004cm" svg:y2="14.898cm" draw:start-shape="id72" draw:start-glue-point="4" draw:end-shape="id36" draw:end-glue-point="2" svg:d="M22799 16780v-1493h-1795v-389" svg:viewBox="0 0 1796 1883">
          <text:p/>
        </draw:connector>
        <draw:custom-shape draw:style-name="gr107" draw:text-style-name="P17" draw:layer="layout" svg:width="28.257cm" svg:height="0.952cm" svg:x="1cm" svg:y="0.7cm">
          <text:p text:style-name="P16"><text:span text:style-name="T5">Components Interface: gpio</text:span></text:p>
          <draw:enhanced-geometry svg:viewBox="0 0 21600 21600" draw:type="rectangle" draw:enhanced-path="M 0 0 L 21600 0 21600 21600 0 21600 0 0 Z N"/>
        </draw:custom-shape>
      </draw:page>
      <draw:page draw:name="page3"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84" draw:id="id84"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8"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9"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g draw:style-name="gr3" xml:id="id97" draw:id="id9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0" draw:text-style-name="P7" xml:id="id73" draw:id="id73"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11" draw:text-style-name="P8" draw:layer="layout" draw:type="line" svg:x1="7.907cm" svg:y1="4.674cm" svg:x2="7.907cm" svg:y2="4.924cm" draw:start-shape="id73" draw:start-glue-point="16" draw:end-shape="id73" draw:end-glue-point="17" svg:d="M7907 4674v250" svg:viewBox="0 0 1 251">
            <text:p/>
          </draw:connector>
        </draw:g>
        <draw:g draw:style-name="gr3" xml:id="id79" draw:id="id7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2" draw:text-style-name="P7" xml:id="id74" draw:id="id74"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13" draw:text-style-name="P8" draw:layer="layout" draw:type="line" svg:x1="5.41cm" svg:y1="7.944cm" svg:x2="5.41cm" svg:y2="8.194cm" draw:start-shape="id74" draw:start-glue-point="16" draw:end-shape="id74" draw:end-glue-point="17" svg:d="M5410 7944v250" svg:viewBox="0 0 1 251">
            <text:p/>
          </draw:connector>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4" draw:text-style-name="P7" xml:id="id75" draw:id="id75"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15" draw:text-style-name="P8" draw:layer="layout" draw:type="line" svg:x1="5.392cm" svg:y1="17.634cm" svg:x2="5.392cm" svg:y2="17.884cm" draw:start-shape="id75" draw:start-glue-point="16" draw:end-shape="id75" draw:end-glue-point="17" svg:d="M5392 17634v250" svg:viewBox="0 0 1 251">
            <text:p/>
          </draw:connector>
        </draw:g>
        <draw:connector draw:style-name="gr116" draw:text-style-name="P9" draw:layer="layout" draw:type="line" svg:x1="3.612cm" svg:y1="17.357cm" svg:x2="3.739cm" svg:y2="13.247cm" draw:start-shape="id76" draw:start-glue-point="6" draw:end-shape="id77" draw:end-glue-point="3" svg:d="M3612 17357l127-4110" svg:viewBox="0 0 128 4111">
          <text:p/>
        </draw:connector>
        <draw:connector draw:style-name="gr117" draw:text-style-name="P9" xml:id="id80" draw:id="id80" draw:layer="layout" draw:type="line" svg:x1="6.665cm" svg:y1="14.857cm" svg:x2="6.595cm" svg:y2="13.27cm" draw:start-shape="id78" draw:start-glue-point="5" svg:d="M6665 14857l-70-1587" svg:viewBox="0 0 71 1588">
          <text:p/>
        </draw:connector>
        <draw:connector draw:style-name="gr118" draw:text-style-name="P9" draw:layer="layout" draw:type="line" svg:x1="2.578cm" svg:y1="9.667cm" svg:x2="3.739cm" svg:y2="13.247cm" draw:start-shape="id79" draw:start-glue-point="10" draw:end-shape="id77" draw:end-glue-point="3" svg:d="M2578 9667l1161 3580" svg:viewBox="0 0 1162 3581">
          <text:p/>
        </draw:connector>
        <draw:connector draw:style-name="gr119" draw:text-style-name="P9" draw:layer="layout" draw:type="line" svg:x1="5.054cm" svg:y1="9.667cm" svg:x2="6.595cm" svg:y2="13.27cm" draw:start-shape="id79" draw:start-glue-point="13" draw:end-shape="id80"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78" draw:id="id7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0" draw:text-style-name="P7" xml:id="id81" draw:id="id81"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121" draw:text-style-name="P8" draw:layer="layout" draw:type="line" svg:x1="7.695cm" svg:y1="15.134cm" svg:x2="7.695cm" svg:y2="15.384cm" draw:start-shape="id81" draw:start-glue-point="16" draw:end-shape="id81" draw:end-glue-point="17" svg:d="M7695 15134v250" svg:viewBox="0 0 1 251">
            <text:p/>
          </draw:connector>
        </draw:g>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2" draw:text-style-name="P7" xml:id="id82" draw:id="id82"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123" draw:text-style-name="P8" draw:layer="layout" draw:type="line" svg:x1="10.607cm" svg:y1="17.692cm" svg:x2="10.607cm" svg:y2="17.942cm" draw:start-shape="id82" draw:start-glue-point="16" draw:end-shape="id82" draw:end-glue-point="17" svg:d="M10607 17692v250" svg:viewBox="0 0 1 251">
            <text:p/>
          </draw:connector>
        </draw:g>
        <draw:connector draw:style-name="gr124" draw:text-style-name="P9" draw:layer="layout" draw:type="line" svg:x1="8.827cm" svg:y1="17.415cm" svg:x2="9.472cm" svg:y2="13.029cm" draw:start-shape="id83" draw:start-glue-point="6" draw:end-shape="id84" draw:end-glue-point="1" svg:d="M8827 17415l645-4386" svg:viewBox="0 0 646 4387">
          <text:p/>
        </draw:connector>
        <draw:connector draw:style-name="gr125" draw:text-style-name="P9" xml:id="id96" draw:id="id96" draw:layer="layout" draw:type="line" svg:x1="7.531cm" svg:y1="10.461cm" svg:x2="9.472cm" svg:y2="13.029cm" draw:end-shape="id84" draw:end-glue-point="1" svg:d="M7531 10461l1941 2568" svg:viewBox="0 0 1942 2569">
          <text:p/>
        </draw:connector>
        <draw:g draw:style-name="gr3" xml:id="id98" draw:id="id9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85" draw:id="id85" draw:layer="layout" svg:width="5.398cm" svg:height="2cm" svg:x="16.557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127" draw:text-style-name="P8" draw:layer="layout" draw:type="line" svg:x1="21.485cm" svg:y1="4.452cm" svg:x2="21.485cm" svg:y2="4.702cm" draw:start-shape="id85" draw:start-glue-point="16" draw:end-shape="id85" draw:end-glue-point="17" svg:d="M21485 4452v250" svg:viewBox="0 0 1 251">
            <text:p/>
          </draw:connector>
        </draw:g>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86" draw:id="id86" draw:layer="layout" svg:width="4.128cm" svg:height="2cm" svg:x="12.747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129" draw:text-style-name="P8" draw:layer="layout" draw:type="line" svg:x1="16.405cm" svg:y1="7.532cm" svg:x2="16.405cm" svg:y2="7.782cm" draw:start-shape="id86" draw:start-glue-point="16" draw:end-shape="id86" draw:end-glue-point="17" svg:d="M16405 7532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87" draw:id="id87" draw:layer="layout" svg:width="4.128cm" svg:height="2cm" svg:x="23.86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31" draw:text-style-name="P8" draw:layer="layout" draw:type="line" svg:x1="27.518cm" svg:y1="4.674cm" svg:x2="27.518cm" svg:y2="4.924cm" draw:start-shape="id87" draw:start-glue-point="16" draw:end-shape="id87" draw:end-glue-point="17" svg:d="M27518 4674v250" svg:viewBox="0 0 1 251">
            <text:p/>
          </draw:connector>
        </draw:g>
        <draw:frame draw:style-name="gr132" draw:text-style-name="P11" xml:id="id77" draw:id="id77"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3" draw:text-style-name="P7" xml:id="id88" draw:id="id88" draw:layer="layout" svg:width="3.75cm" svg:height="2cm" svg:x="10.26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134" draw:text-style-name="P8" draw:layer="layout" draw:type="line" svg:x1="13.547cm" svg:y1="21.914cm" svg:x2="13.547cm" svg:y2="22.164cm" draw:start-shape="id88" draw:start-glue-point="16" draw:end-shape="id88" draw:end-glue-point="17" svg:d="M1354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5" draw:text-style-name="P7" xml:id="id89" draw:id="id89" draw:layer="layout" svg:width="3.75cm" svg:height="2cm" svg:x="15.347cm" svg:y="21.8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36" draw:text-style-name="P8" draw:layer="layout" draw:type="line" svg:x1="18.627cm" svg:y1="22.137cm" svg:x2="18.627cm" svg:y2="22.387cm" draw:start-shape="id89" draw:start-glue-point="16" draw:end-shape="id89" draw:end-glue-point="17" svg:d="M18627 2213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7" draw:text-style-name="P7" xml:id="id90" draw:id="id90" draw:layer="layout" svg:width="3.75cm" svg:height="2cm" svg:x="18.145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38" draw:text-style-name="P8" draw:layer="layout" draw:type="line" svg:x1="21.425cm" svg:y1="15.247cm" svg:x2="21.425cm" svg:y2="15.497cm" draw:start-shape="id90" draw:start-glue-point="16" draw:end-shape="id90" draw:end-glue-point="17" svg:d="M21425 15247v250" svg:viewBox="0 0 1 251">
            <text:p/>
          </draw:connector>
        </draw:g>
        <draw:connector draw:style-name="gr139" draw:text-style-name="P9" xml:id="id93" draw:id="id93" draw:layer="layout" draw:type="line" svg:x1="19.645cm" svg:y1="14.97cm" svg:x2="17.908cm" svg:y2="12.505cm" draw:start-shape="id91" draw:start-glue-point="6" svg:d="M19645 14970l-1737-2465" svg:viewBox="0 0 1738 2466">
          <text:p/>
        </draw:connector>
        <draw:connector draw:style-name="gr140" draw:text-style-name="P9" draw:layer="layout" draw:type="line" svg:x1="16.049cm" svg:y1="9.255cm" svg:x2="17.908cm" svg:y2="12.505cm" draw:start-shape="id92" draw:start-glue-point="13" draw:end-shape="id93" draw:end-glue-point="3" svg:d="M16049 9255l1859 3250" svg:viewBox="0 0 1860 3251">
          <text:p/>
        </draw:connector>
        <draw:frame draw:style-name="gr69" draw:text-style-name="P14" draw:layer="layout" svg:width="2.54cm" svg:height="1.27cm" svg:x="14.01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94" draw:id="id94" draw:layer="layout" svg:width="4.068cm" svg:height="2cm" svg:x="20.367cm" svg:y="22.17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42" draw:text-style-name="P8" draw:layer="layout" draw:type="line" svg:x1="23.965cm" svg:y1="22.454cm" svg:x2="23.965cm" svg:y2="22.704cm" draw:start-shape="id94" draw:start-glue-point="16" draw:end-shape="id94" draw:end-glue-point="17" svg:d="M23965 22454v250" svg:viewBox="0 0 1 251">
            <text:p/>
          </draw:connector>
        </draw:g>
        <draw:connector draw:style-name="gr143" draw:text-style-name="P9" draw:layer="layout" draw:type="line" svg:x1="19.357cm" svg:y1="9.943cm" svg:x2="17.908cm" svg:y2="12.505cm" draw:start-shape="id95" draw:start-glue-point="2" draw:end-shape="id93" draw:end-glue-point="3" svg:d="M19357 9943l-1449 2562" svg:viewBox="0 0 1450 2563">
          <text:p/>
        </draw:connector>
        <draw:connector draw:style-name="gr106" draw:text-style-name="P15" draw:layer="layout" draw:line-skew="-1.012cm" svg:x1="7.531cm" svg:y1="10.461cm" svg:x2="6.725cm" svg:y2="6.397cm" draw:start-shape="id96" draw:start-glue-point="2" draw:end-shape="id97" draw:end-glue-point="12" svg:d="M7531 10461v-3044h-806v-1020" svg:viewBox="0 0 807 4065">
          <text:p/>
        </draw:connector>
        <draw:connector draw:style-name="gr106" draw:text-style-name="P15" xml:id="id95" draw:id="id95" draw:layer="layout" svg:x1="19.357cm" svg:y1="9.943cm" svg:x2="18.717cm" svg:y2="6.175cm" draw:end-shape="id98" draw:end-glue-point="11" svg:d="M19357 9943v-1620h-640v-2148" svg:viewBox="0 0 641 3769">
          <text:p/>
        </draw:connector>
        <draw:custom-shape draw:style-name="gr144" draw:text-style-name="P13" draw:layer="layout" svg:width="28.257cm" svg:height="0.952cm" svg:x="1cm" svg:y="0.7cm">
          <text:p text:style-name="P12"><text:span text:style-name="T5">Components Interface: gpio</text:span></text:p>
          <draw:enhanced-geometry svg:viewBox="0 0 21600 21600" draw:type="rectangle" draw:enhanced-path="M 0 0 L 21600 0 21600 21600 0 21600 0 0 Z N"/>
        </draw:custom-shape>
      </draw:page>
      <draw:page draw:name="Queue" draw:style-name="dp1" draw:master-page-name="Default">
        <draw:custom-shape draw:style-name="gr145"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46" draw:text-style-name="P9" xml:id="id117" draw:id="id117" draw:layer="layout" draw:type="line" svg:x1="10.822cm" svg:y1="4.81cm" svg:x2="10.832cm" svg:y2="12.513cm" draw:start-shape="id99" draw:start-glue-point="12" svg:d="M10822 4810l10 7703" svg:viewBox="0 0 11 7704">
          <text:p/>
        </draw:connector>
        <draw:frame draw:style-name="gr147" draw:text-style-name="P14" draw:layer="layout" svg:width="2.857cm" svg:height="1.673cm" svg:x="10.843cm" svg:y="5.445cm">
          <draw:text-box>
            <text:p><text:span text:style-name="T6">command_</text:span></text:p>
            <text:p><text:span text:style-name="T6">queue</text:span></text:p>
          </draw:text-box>
        </draw:frame>
        <draw:custom-shape draw:style-name="gr148" draw:text-style-name="P18"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9" draw:text-style-name="P7" xml:id="id100" draw:id="id100"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50" draw:text-style-name="P8" draw:layer="layout" draw:type="line" svg:x1="13.692cm" svg:y1="3.087cm" svg:x2="13.692cm" svg:y2="3.337cm" draw:start-shape="id100" draw:start-glue-point="16" draw:end-shape="id100" draw:end-glue-point="17" svg:d="M13692 3087v250" svg:viewBox="0 0 1 251">
            <text:p/>
          </draw:connector>
        </draw:g>
        <draw:g draw:style-name="gr3" xml:id="id116" draw:id="id1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1" draw:text-style-name="P7" xml:id="id101" draw:id="id101"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52" draw:text-style-name="P8" draw:layer="layout" draw:type="line" svg:x1="18.712cm" svg:y1="7.244cm" svg:x2="18.712cm" svg:y2="7.494cm" draw:start-shape="id101" draw:start-glue-point="16" draw:end-shape="id101" draw:end-glue-point="17" svg:d="M18712 7244v250" svg:viewBox="0 0 1 251">
            <text:p/>
          </draw:connector>
        </draw:g>
        <draw:g draw:style-name="gr3" xml:id="id121" draw:id="id1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3" draw:text-style-name="P7" xml:id="id102" draw:id="id102"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54" draw:text-style-name="P8" draw:layer="layout" draw:type="line" svg:x1="18.712cm" svg:y1="16.452cm" svg:x2="18.712cm" svg:y2="16.702cm" draw:start-shape="id102" draw:start-glue-point="16" draw:end-shape="id102" draw:end-glue-point="17" svg:d="M18712 16452v250" svg:viewBox="0 0 1 251">
            <text:p/>
          </draw:connector>
        </draw:g>
        <draw:g draw:style-name="gr3" xml:id="id118" draw:id="id1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5" draw:text-style-name="P7" xml:id="id103" draw:id="id103"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56" draw:text-style-name="P8" draw:layer="layout" draw:type="line" svg:x1="18.712cm" svg:y1="9.784cm" svg:x2="18.712cm" svg:y2="10.034cm" draw:start-shape="id103" draw:start-glue-point="16" draw:end-shape="id103" draw:end-glue-point="17" svg:d="M18712 9784v250" svg:viewBox="0 0 1 251">
            <text:p/>
          </draw:connector>
        </draw:g>
        <draw:g draw:style-name="gr3" xml:id="id119" draw:id="id11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104" draw:id="id104"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58" draw:text-style-name="P8" draw:layer="layout" draw:type="line" svg:x1="18.712cm" svg:y1="12.007cm" svg:x2="18.712cm" svg:y2="12.257cm" draw:start-shape="id104" draw:start-glue-point="16" draw:end-shape="id104" draw:end-glue-point="17" svg:d="M18712 12007v250" svg:viewBox="0 0 1 251">
            <text:p/>
          </draw:connector>
        </draw:g>
        <draw:g draw:style-name="gr3" xml:id="id120" draw:id="id12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105" draw:id="id105"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60" draw:text-style-name="P8" draw:layer="layout" draw:type="line" svg:x1="18.712cm" svg:y1="14.229cm" svg:x2="18.712cm" svg:y2="14.479cm" draw:start-shape="id105" draw:start-glue-point="16" draw:end-shape="id105" draw:end-glue-point="17" svg:d="M18712 14229v250" svg:viewBox="0 0 1 251">
            <text:p/>
          </draw:connector>
        </draw:g>
        <draw:g draw:style-name="gr3" xml:id="id110" draw:id="id1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106" draw:id="id106"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62" draw:text-style-name="P8" draw:layer="layout" draw:type="line" svg:x1="10.438cm" svg:y1="16.584cm" svg:x2="10.438cm" svg:y2="16.834cm" draw:start-shape="id106" draw:start-glue-point="16" draw:end-shape="id106" draw:end-glue-point="17" svg:d="M10438 16584v250" svg:viewBox="0 0 1 251">
            <text:p/>
          </draw:connector>
        </draw:g>
        <draw:g draw:style-name="gr3" xml:id="id108" draw:id="id10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3" draw:text-style-name="P7" xml:id="id107" draw:id="id107"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64" draw:text-style-name="P8" draw:layer="layout" draw:type="line" svg:x1="6.992cm" svg:y1="12.472cm" svg:x2="6.992cm" svg:y2="12.722cm" draw:start-shape="id107" draw:start-glue-point="16" draw:end-shape="id107" draw:end-glue-point="17" svg:d="M6992 12472v250" svg:viewBox="0 0 1 251">
            <text:p/>
          </draw:connector>
        </draw:g>
        <draw:connector draw:style-name="gr165" draw:text-style-name="P9" draw:layer="layout" draw:type="line" svg:x1="3.954cm" svg:y1="14.099cm" svg:x2="4.457cm" svg:y2="16.432cm" draw:start-shape="id108" draw:start-glue-point="10" draw:end-shape="id109" draw:end-glue-point="3" svg:d="M3954 14099l503 2333" svg:viewBox="0 0 504 2334">
          <text:p/>
        </draw:connector>
        <draw:connector draw:style-name="gr166" draw:text-style-name="P9" xml:id="id109" draw:id="id109" draw:layer="layout" draw:type="line" svg:x1="6.523cm" svg:y1="17.259cm" svg:x2="4.457cm" svg:y2="16.432cm" draw:start-shape="id110" draw:start-glue-point="3" svg:d="M6523 17259l-2066-827" svg:viewBox="0 0 2067 828">
          <text:p/>
        </draw:connector>
        <draw:connector draw:style-name="gr167" draw:text-style-name="P9" draw:layer="layout" draw:type="line" svg:x1="10.907cm" svg:y1="17.735cm" svg:x2="12.482cm" svg:y2="17.462cm" draw:start-shape="id110" draw:start-glue-point="14" draw:end-shape="id111" draw:end-glue-point="3" svg:d="M10907 17735l1575-273" svg:viewBox="0 0 1576 274">
          <text:p/>
        </draw:connector>
        <draw:frame draw:style-name="gr22" draw:text-style-name="P2" draw:layer="layout" svg:width="2.857cm" svg:height="0.725cm" svg:x="11.477cm" svg:y="17.827cm">
          <draw:text-box>
            <text:p><text:span text:style-name="T1">web_queue</text:span></text:p>
          </draw:text-box>
        </draw:frame>
        <draw:frame draw:style-name="gr2" draw:text-style-name="P2" draw:layer="layout" svg:width="2.354cm" svg:height="1.199cm" svg:x="4.678cm" svg:y="14.652cm">
          <draw:text-box>
            <text:p><text:span text:style-name="T1">remote_</text:span></text:p>
            <text:p><text:span text:style-name="T1">queue</text:span></text:p>
          </draw:text-box>
        </draw:frame>
        <draw:g draw:style-name="gr3" xml:id="id113" draw:id="id11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8" draw:text-style-name="P7" xml:id="id112" draw:id="id112"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69" draw:text-style-name="P8" draw:layer="layout" draw:type="line" svg:x1="26.082cm" svg:y1="3.087cm" svg:x2="26.082cm" svg:y2="3.337cm" draw:start-shape="id112" draw:start-glue-point="16" draw:end-shape="id112" draw:end-glue-point="17" svg:d="M26082 3087v250" svg:viewBox="0 0 1 251">
            <text:p/>
          </draw:connector>
        </draw:g>
        <draw:connector draw:style-name="gr170" draw:text-style-name="P9" xml:id="id114" draw:id="id114" draw:layer="layout" draw:type="line" svg:x1="19.567cm" svg:y1="3.31cm" svg:x2="17.898cm" svg:y2="2.926cm" draw:start-shape="id113" draw:start-glue-point="8" svg:d="M19567 3310l-1669-384" svg:viewBox="0 0 1670 385">
          <text:p/>
        </draw:connector>
        <draw:connector draw:style-name="gr171" draw:text-style-name="P9" draw:layer="layout" draw:type="line" svg:x1="14.161cm" svg:y1="3.31cm" svg:x2="17.898cm" svg:y2="2.926cm" draw:start-shape="id99" draw:start-glue-point="15" draw:end-shape="id114" draw:end-glue-point="3" svg:d="M14161 3310l3737-384" svg:viewBox="0 0 3738 385">
          <text:p/>
        </draw:connector>
        <draw:connector draw:style-name="gr172" draw:text-style-name="P9" xml:id="id115" draw:id="id115" draw:layer="layout" draw:type="line" svg:x1="10.827cm" svg:y1="4.898cm" svg:x2="16.622cm" svg:y2="6.132cm" svg:d="M10827 4898l5795 1234" svg:viewBox="0 0 5796 1235">
          <text:p/>
        </draw:connector>
        <draw:connector draw:style-name="gr173" draw:text-style-name="P9" draw:layer="layout" draw:type="line" svg:x1="19.567cm" svg:y1="4.31cm" svg:x2="16.622cm" svg:y2="6.132cm" draw:start-shape="id113" draw:start-glue-point="9" draw:end-shape="id115" draw:end-glue-point="3" svg:d="M19567 4310l-2945 1822" svg:viewBox="0 0 2946 1823">
          <text:p/>
        </draw:connector>
        <draw:connector draw:style-name="gr174" draw:text-style-name="P9" draw:layer="layout" draw:type="line" svg:x1="14.797cm" svg:y1="8.467cm" svg:x2="10.832cm" svg:y2="12.513cm" draw:start-shape="id116" draw:start-glue-point="9" draw:end-shape="id117" draw:end-glue-point="3" svg:d="M14797 8467l-3965 4046" svg:viewBox="0 0 3966 4047">
          <text:p/>
        </draw:connector>
        <draw:connector draw:style-name="gr175" draw:text-style-name="P9" draw:layer="layout" draw:type="line" svg:x1="14.797cm" svg:y1="11.007cm" svg:x2="10.832cm" svg:y2="12.513cm" draw:start-shape="id118" draw:start-glue-point="9" draw:end-shape="id117" draw:end-glue-point="3" svg:d="M14797 11007l-3965 1506" svg:viewBox="0 0 3966 1507">
          <text:p/>
        </draw:connector>
        <draw:connector draw:style-name="gr176" draw:text-style-name="P9" draw:layer="layout" draw:type="line" svg:x1="14.797cm" svg:y1="13.23cm" svg:x2="10.832cm" svg:y2="12.513cm" draw:start-shape="id119" draw:start-glue-point="9" draw:end-shape="id117" draw:end-glue-point="3" svg:d="M14797 13230l-3965-717" svg:viewBox="0 0 3966 718">
          <text:p/>
        </draw:connector>
        <draw:connector draw:style-name="gr177" draw:text-style-name="P9" draw:layer="layout" draw:type="line" svg:x1="14.797cm" svg:y1="14.428cm" svg:x2="10.832cm" svg:y2="12.513cm" draw:start-shape="id120" draw:start-glue-point="8" draw:end-shape="id117" draw:end-glue-point="3" svg:d="M14797 14428l-3965-1915" svg:viewBox="0 0 3966 1916">
          <text:p/>
        </draw:connector>
        <draw:connector draw:style-name="gr178" draw:text-style-name="P9" draw:layer="layout" draw:type="line" svg:x1="14.797cm" svg:y1="16.651cm" svg:x2="10.832cm" svg:y2="12.513cm" draw:start-shape="id121" draw:start-glue-point="8" draw:end-shape="id117" draw:end-glue-point="3" svg:d="M14797 16651l-3965-4138" svg:viewBox="0 0 3966 4139">
          <text:p/>
        </draw:connector>
        <draw:connector draw:style-name="gr179" draw:text-style-name="P9" xml:id="id122" draw:id="id122" draw:layer="layout" draw:type="line" svg:x1="23.757cm" svg:y1="4.81cm" svg:x2="23.666cm" svg:y2="11.859cm" draw:start-shape="id113" draw:start-glue-point="12" svg:d="M23757 4810l-91 7049" svg:viewBox="0 0 92 7050">
          <text:p/>
        </draw:connector>
        <draw:connector draw:style-name="gr180" draw:text-style-name="P9" draw:layer="layout" draw:type="line" svg:x1="19.181cm" svg:y1="8.467cm" svg:x2="23.666cm" svg:y2="11.859cm" draw:start-shape="id116" draw:start-glue-point="14" draw:end-shape="id122" draw:end-glue-point="3" svg:d="M19181 8467l4485 3392" svg:viewBox="0 0 4486 3393">
          <text:p/>
        </draw:connector>
        <draw:connector draw:style-name="gr181" draw:text-style-name="P9" draw:layer="layout" draw:type="line" svg:x1="19.181cm" svg:y1="11.007cm" svg:x2="23.666cm" svg:y2="11.859cm" draw:start-shape="id118" draw:start-glue-point="14" draw:end-shape="id122" draw:end-glue-point="3" svg:d="M19181 11007l4485 852" svg:viewBox="0 0 4486 853">
          <text:p/>
        </draw:connector>
        <draw:connector draw:style-name="gr182" draw:text-style-name="P9" draw:layer="layout" draw:type="line" svg:x1="19.181cm" svg:y1="13.23cm" svg:x2="23.666cm" svg:y2="11.859cm" draw:start-shape="id119" draw:start-glue-point="14" draw:end-shape="id122" draw:end-glue-point="3" svg:d="M19181 13230l4485-1371" svg:viewBox="0 0 4486 1372">
          <text:p/>
        </draw:connector>
        <draw:connector draw:style-name="gr183" draw:text-style-name="P9" draw:layer="layout" draw:type="line" svg:x1="19.181cm" svg:y1="15.38cm" svg:x2="23.666cm" svg:y2="11.859cm" draw:start-shape="id120" draw:start-glue-point="14" draw:end-shape="id122" draw:end-glue-point="3" svg:d="M19181 15380l4485-3521" svg:viewBox="0 0 4486 3522">
          <text:p/>
        </draw:connector>
        <draw:connector draw:style-name="gr184" draw:text-style-name="P9" draw:layer="layout" draw:type="line" svg:x1="19.181cm" svg:y1="17.603cm" svg:x2="23.666cm" svg:y2="11.859cm" draw:start-shape="id121" draw:start-glue-point="14" draw:end-shape="id122" draw:end-glue-point="3" svg:d="M19181 17603l4485-5744" svg:viewBox="0 0 4486 5745">
          <text:p/>
        </draw:connector>
        <draw:frame draw:style-name="gr2" draw:text-style-name="P2" draw:layer="layout" svg:width="1.904cm" svg:height="1.199cm" svg:x="21.637cm" svg:y="7.421cm">
          <draw:text-box>
            <text:p><text:span text:style-name="T1">error_</text:span></text:p>
            <text:p><text:span text:style-name="T1">queu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185" draw:text-style-name="P9" xml:id="id111" draw:id="id111" draw:layer="layout" draw:type="line" svg:x1="14.797cm" svg:y1="17.603cm" svg:x2="12.482cm" svg:y2="17.462cm" draw:start-shape="id121" draw:start-glue-point="9" svg:d="M14797 17603l-2315-141" svg:viewBox="0 0 2316 14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09T17:06:46.232353001</dc:date>
    <meta:editing-duration>PT10H8M34S</meta:editing-duration>
    <meta:editing-cycles>74</meta:editing-cycles>
    <meta:print-date>2026-04-03T16:45:26.431431754</meta:print-date>
    <dc:creator>Henk</dc:creator>
    <meta:document-statistic meta:object-count="260"/>
  </office:meta>
</office:document-meta>
</file>