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5cm" fo:min-width="26.54cm" style:writing-mode="lr-tb" loext:decorative="false"/>
      <style:paragraph-properties style:writing-mode="lr-tb"/>
    </style:style>
    <style:style style:name="gr2" style:family="graphic" style:parent-style-name="standard">
      <style:graphic-properties draw:textarea-horizontal-align="justify" draw:textarea-vertical-align="middle" draw:auto-grow-height="false" fo:min-height="0.45cm" fo:min-width="26.59cm" style:writing-mode="lr-tb"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462cm" fo:min-width="4.626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6f9d4"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6f9d4"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graphic-properties draw:textarea-horizontal-align="justify" draw:textarea-vertical-align="middle" draw:auto-grow-height="false" fo:min-height="0.45cm" fo:min-width="26.883cm" style:writing-mode="lr-tb" loext:decorative="false"/>
      <style:paragraph-properties style:writing-mode="lr-tb"/>
    </style:style>
    <style:style style:name="gr10"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12"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9.198cm" fo:min-width="27.705cm" fo:padding-top="0.151cm" fo:padding-bottom="0.151cm" fo:padding-left="0.276cm" fo:padding-right="0.276cm" loext:decorative="false"/>
    </style:style>
    <style:style style:name="gr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5.463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4.828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4.943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4.943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8.321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6.098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6.098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4.779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5.261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3.674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4.101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6"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8"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1"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 style:family="graphic" style:parent-style-name="standard" style:list-style-name="L2">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462cm" fo:min-width="4.626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6f9d4"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6f9d4"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5.463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4.828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4.943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4.943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8.321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6.098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6.098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4.779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5.261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3.674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0.552cm" fo:min-width="4.101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689cm" fo:min-width="22.61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9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9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P1" style:family="paragraph">
      <style:paragraph-properties fo:text-align="center"/>
    </style:style>
    <style:style style:name="P2" style:family="paragraph">
      <style:paragraph-properties fo:text-align="center" style:writing-mode="lr-tb"/>
    </style:style>
    <style:style style:name="P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 style:family="paragraph">
      <loext:graphic-properties draw:fill="solid" draw:fill-color="#fafaf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loext:tab-stop-distance="0cm">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solid" draw:fill-color="#f6f9d4"/>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0" style:family="paragraph">
      <loext:graphic-properties draw:fill="solid" draw:fill-color="#f6f9d4"/>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ffffff"/>
      <style:text-properties fo:font-size="12pt" style:font-size-asian="12pt" style:font-size-complex="12pt"/>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1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9" style:family="paragraph">
      <style:text-properties fo:font-size="12pt" style:font-size-asian="12pt" style:font-size-complex="12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Oradio_control" draw:style-name="dp1" draw:master-page-name="Default">
        <draw:custom-shape draw:style-name="gr1" draw:text-style-name="P2" draw:layer="layout" svg:width="27.04cm" svg:height="0.7cm" svg:x="1.9cm" svg:y="1.25cm">
          <text:p text:style-name="P1">Application Layer</text:p>
          <draw:enhanced-geometry svg:viewBox="0 0 21600 21600" draw:mirror-horizontal="false" draw:mirror-vertical="false" draw:type="rectangle" draw:enhanced-path="M 0 0 L 21600 0 21600 21600 0 21600 0 0 Z N"/>
        </draw:custom-shape>
        <draw:custom-shape draw:style-name="gr2" draw:text-style-name="P2" draw:layer="layout" svg:width="27.09cm" svg:height="0.7cm" svg:x="1.85cm" svg:y="4.75cm">
          <text:p text:style-name="P1"><text:s text:c="3"/>Middle-ware Layer</text:p>
          <draw:enhanced-geometry svg:viewBox="0 0 21600 21600" draw:mirror-horizontal="false" draw:mirror-vertical="false" draw:type="rectangle" draw:enhanced-path="M 0 0 L 21600 0 21600 21600 0 21600 0 0 Z N"/>
        </draw:custom-shape>
        <draw:g draw:style-name="gr3">
          <draw:custom-shape draw:style-name="gr4" draw:text-style-name="P4" draw:layer="layout" svg:width="5.08cm" svg:height="1.153cm" svg:x="1.317cm" svg:y="6.959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led_control.LEDControl</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5.08cm" svg:height="0.671cm" svg:x="1.317cm" svg:y="8.112cm">
            <text:p/>
            <draw:enhanced-geometry svg:viewBox="0 0 21600 21600" draw:mirror-horizontal="false" draw:mirror-vertical="false" draw:type="rectangle" draw:enhanced-path="M 0 0 L 21600 0 21600 21600 0 21600 0 0 Z N"/>
          </draw:custom-shape>
          <draw:custom-shape draw:style-name="gr6" draw:text-style-name="P5" draw:layer="layout" svg:width="5.08cm" svg:height="2.963cm" svg:x="1.317cm" svg:y="8.78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 turn_on_led()</text:span></text:p>
            <text:p text:style-name="P6"><text:span text:style-name="T2">+ turn_off_led()</text:span></text:p>
            <text:p text:style-name="P6"><text:span text:style-name="T2">+ </text:span><text:span text:style-name="T2">turn_off_all_leds</text:span><text:span text:style-name="T2">()</text:span></text:p>
            <text:p text:style-name="P6"><text:span text:style-name="T2">+ </text:span><text:span text:style-name="T2">turn_off_all_leds</text:span><text:span text:style-name="T2">()</text:span></text:p>
            <text:p text:style-name="P6"><text:span text:style-name="T2">+ </text:span><text:span text:style-name="T2">get_led_state()l</text:span></text:p>
            <text:p text:style-name="P6"><text:span text:style-name="T2">+ </text:span><text:span text:style-name="T2">oneshot_on_led(</text:span><text:span text:style-name="T2">)</text:span></text:p>
            <text:p text:style-name="P6"><text:span text:style-name="T2">+ </text:span><text:span text:style-name="T2">control_blinking</text:span><text:span text:style-name="T2">_led( )</text:span></text:p>
            <draw:enhanced-geometry svg:viewBox="0 0 21600 21600" draw:mirror-horizontal="false" draw:mirror-vertical="false" draw:type="rectangle" draw:enhanced-path="M 0 0 L 21600 0 21600 21600 0 21600 0 0 Z N"/>
          </draw:custom-shape>
        </draw:g>
        <draw:g draw:style-name="gr3" xml:id="id1" draw:id="id1">
          <draw:glue-point draw:id="4" svg:x="-3cm" svg:y="5cm"/>
          <draw:glue-point draw:id="5" svg:x="2.945cm" svg:y="5.141cm"/>
          <draw:glue-point draw:id="6" svg:x="1cm" svg:y="5cm"/>
          <draw:glue-point draw:id="7" svg:x="2.587cm" svg:y="5.141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glue-point draw:id="16" svg:x="-10.099cm" svg:y="0.916cm" draw:align="center"/>
          <draw:glue-point draw:id="17" svg:x="-3.667cm" svg:y="5.141cm"/>
          <draw:glue-point draw:id="18" svg:x="-4.384cm" svg:y="0.916cm" draw:align="center"/>
          <draw:glue-point draw:id="19" svg:x="-3.809cm" svg:y="5.141cm"/>
          <draw:glue-point draw:id="20" svg:x="-2.672cm" svg:y="5.141cm"/>
          <draw:glue-point draw:id="21" svg:x="-3.383cm" svg:y="5.141cm"/>
          <draw:glue-point draw:id="22" svg:x="-2.246cm" svg:y="5.141cm"/>
          <draw:glue-point draw:id="23" svg:x="-1.633cm" svg:y="5.141cm"/>
          <draw:glue-point draw:id="24" svg:x="0.498cm" svg:y="5.141cm"/>
          <draw:glue-point draw:id="25" svg:x="1.492cm" svg:y="5.141cm"/>
          <draw:glue-point draw:id="26" svg:x="0.639cm" svg:y="5.141cm"/>
          <draw:glue-point draw:id="27" svg:x="1.35cm" svg:y="5.141cm"/>
          <draw:glue-point draw:id="28" svg:x="2.06cm" svg:y="5.141cm"/>
          <draw:glue-point draw:id="29" svg:x="2.203cm" svg:y="5.141cm"/>
          <draw:glue-point draw:id="30" svg:x="1.776cm" svg:y="5.141cm"/>
          <draw:glue-point draw:id="31" svg:x="2.349cm" svg:y="5.141cm"/>
          <draw:glue-point draw:id="32" svg:x="2.587cm" svg:y="5.141cm"/>
          <draw:glue-point draw:id="33" svg:x="3.66cm" svg:y="5.141cm"/>
          <draw:glue-point draw:id="34" svg:x="2.945cm" svg:y="5.141cm"/>
          <draw:glue-point draw:id="35" svg:x="-1.224cm" svg:y="5.141cm"/>
          <draw:glue-point draw:id="36" svg:x="3.183cm" svg:y="5.12cm"/>
          <draw:glue-point draw:id="37" svg:x="2.707cm" svg:y="5.12cm"/>
          <draw:glue-point draw:id="38" svg:x="3.302cm" svg:y="5.12cm"/>
          <draw:glue-point draw:id="39" svg:x="3.898cm" svg:y="5.12cm"/>
          <draw:custom-shape draw:style-name="gr7" draw:text-style-name="P8" draw:layer="layout" svg:width="26.65cm" svg:height="1.153cm" svg:x="2.05cm" svg:y="2.338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7"><text:span text:style-name="T1">o</text:span><text:span text:style-name="T1">r</text:span><text:span text:style-name="T1">a</text:span><text:span text:style-name="T1">d</text:span><text:span text:style-name="T1">i</text:span><text:span text:style-name="T1">o</text:span><text:span text:style-name="T1">_</text:span><text:span text:style-name="T1">c</text:span><text:span text:style-name="T1">o</text:span><text:span text:style-name="T1">n</text:span><text:span text:style-name="T1">t</text:span><text:span text:style-name="T1">r</text:span><text:span text:style-name="T1">o</text:span><text:span text:style-name="T1">l</text:span><text:span text:style-name="T1">.</text:span><text:span text:style-name="T1">p</text:span><text:span text:style-name="T1">y</text:span></text:p>
            <text:p text:style-name="P7"><text:span text:style-name="T1">&lt;</text:span><text:span text:style-name="T1">&lt;</text:span><text:span text:style-name="T1">m</text:span><text:span text:style-name="T1">o</text:span><text:span text:style-name="T1">d</text:span><text:span text:style-name="T1">u</text:span><text:span text:style-name="T1">l</text:span><text:span text:style-name="T1">e</text:span><text:span text:style-name="T1">&gt;</text:span><text:span text:style-name="T1">&gt;</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65cm" svg:height="0.679cm" svg:x="2.05cm" svg:y="3.491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9"><text:span text:style-name="T1">+ execute(): void</text:span></text:p>
            <draw:enhanced-geometry svg:viewBox="0 0 21600 21600" draw:mirror-horizontal="false" draw:mirror-vertical="false" draw:type="rectangle" draw:enhanced-path="M 0 0 L 21600 0 21600 21600 0 21600 0 0 Z N"/>
          </draw:custom-shape>
        </draw:g>
        <draw:custom-shape draw:style-name="gr9" draw:text-style-name="P2" draw:layer="layout" svg:width="27.383cm" svg:height="0.7cm" svg:x="1.317cm" svg:y="19.6cm">
          <text:p text:style-name="P1">Hardware Abstraction Layer</text:p>
          <draw:enhanced-geometry svg:viewBox="0 0 21600 21600" draw:mirror-horizontal="false" draw:mirror-vertical="false" draw:type="rectangle" draw:enhanced-path="M 0 0 L 21600 0 21600 21600 0 21600 0 0 Z N"/>
        </draw:custom-shape>
        <draw:connector draw:style-name="gr10" draw:text-style-name="P11" draw:layer="layout" svg:x1="1.601cm" svg:y1="7.043cm" svg:x2="5.276cm" svg:y2="4.17cm" draw:end-shape="id1" draw:end-glue-point="16" svg:d="M1601 7043v-1173h3675v-1700" svg:viewBox="0 0 3676 2874">
          <text:p/>
        </draw:connector>
        <draw:frame draw:style-name="gr11" draw:text-style-name="P12" draw:layer="layout" svg:width="3.147cm" svg:height="0.725cm" svg:x="2.27cm" svg:y="6.007cm">
          <draw:text-box>
            <text:p><text:span text:style-name="T3">&lt;&lt;creates&gt;&gt;</text:span></text:p>
          </draw:text-box>
        </draw:frame>
        <draw:custom-shape draw:style-name="gr12" draw:text-style-name="P13" draw:layer="layout" svg:width="28.257cm" svg:height="19.5cm" svg:x="1cm" svg:y="1cm">
          <text:p/>
          <draw:enhanced-geometry svg:viewBox="0 0 21600 21600" draw:mirror-horizontal="false" draw:mirror-vertical="false" draw:type="rectangle" draw:enhanced-path="M 0 0 L 21600 0 21600 21600 0 21600 0 0 Z N"/>
        </draw:custom-shape>
        <draw:g draw:style-name="gr3" xml:id="id2" draw:id="id2">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13" draw:text-style-name="P4" draw:layer="layout" svg:width="5.917cm" svg:height="1.153cm" svg:x="1.12cm" svg:y="12.405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touch_buttons.TouchButtons</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14" draw:text-style-name="P5" draw:layer="layout" svg:width="5.917cm" svg:height="0.761cm" svg:x="1.12cm" svg:y="13.558cm">
              <text:p text:style-name="P14"><text:span text:style-name="T2">- shared_queue: Queue</text:span></text:p>
              <draw:enhanced-geometry svg:viewBox="0 0 21600 21600" draw:mirror-horizontal="false" draw:mirror-vertical="false" draw:type="rectangle" draw:enhanced-path="M 0 0 L 21600 0 21600 21600 0 21600 0 0 Z N"/>
            </draw:custom-shape>
            <draw:custom-shape draw:style-name="gr15" draw:text-style-name="P5" draw:layer="layout" svg:width="5.917cm" svg:height="0.599cm" svg:x="1.12cm" svg:y="14.31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 __init__(queue: Queue)</text:span></text:p>
              <draw:enhanced-geometry svg:viewBox="0 0 21600 21600" draw:mirror-horizontal="false" draw:mirror-vertical="false" draw:type="rectangle" draw:enhanced-path="M 0 0 L 21600 0 21600 21600 0 21600 0 0 Z N"/>
            </draw:custom-shape>
          </draw:g>
        </draw:g>
        <draw:g draw:style-name="gr3" xml:id="id4" draw:id="id4">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16" draw:text-style-name="P4" draw:layer="layout" svg:width="5.282cm" svg:height="1.153cm" svg:x="2.378cm" svg:y="15.475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backlighting.BackLighting</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17" draw:text-style-name="P5" draw:layer="layout" svg:width="5.282cm" svg:height="0.761cm" svg:x="2.378cm" svg:y="16.628cm">
              <text:p/>
              <draw:enhanced-geometry svg:viewBox="0 0 21600 21600" draw:mirror-horizontal="false" draw:mirror-vertical="false" draw:type="rectangle" draw:enhanced-path="M 0 0 L 21600 0 21600 21600 0 21600 0 0 Z N"/>
            </draw:custom-shape>
            <draw:custom-shape draw:style-name="gr18" draw:text-style-name="P5" draw:layer="layout" svg:width="5.282cm" svg:height="0.803cm" svg:x="2.378cm" svg:y="17.38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draw:enhanced-geometry svg:viewBox="0 0 21600 21600" draw:mirror-horizontal="false" draw:mirror-vertical="false" draw:type="rectangle" draw:enhanced-path="M 0 0 L 21600 0 21600 21600 0 21600 0 0 Z N"/>
            </draw:custom-shape>
          </draw:g>
        </draw:g>
        <draw:g draw:style-name="gr3" xml:id="id7" draw:id="id7">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19" draw:text-style-name="P4" draw:layer="layout" svg:width="5.397cm" svg:height="1.153cm" svg:x="15.67cm" svg:y="6.95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mpd_monitor.MPDMonitor</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20" draw:text-style-name="P5" draw:layer="layout" svg:width="5.397cm" svg:height="0.761cm" svg:x="15.67cm" svg:y="8.103cm">
              <text:p/>
              <draw:enhanced-geometry svg:viewBox="0 0 21600 21600" draw:mirror-horizontal="false" draw:mirror-vertical="false" draw:type="rectangle" draw:enhanced-path="M 0 0 L 21600 0 21600 21600 0 21600 0 0 Z N"/>
            </draw:custom-shape>
            <draw:custom-shape draw:style-name="gr21" draw:text-style-name="P5" draw:layer="layout" svg:width="5.397cm" svg:height="0.803cm" svg:x="15.67cm" svg:y="8.864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draw:enhanced-geometry svg:viewBox="0 0 21600 21600" draw:mirror-horizontal="false" draw:mirror-vertical="false" draw:type="rectangle" draw:enhanced-path="M 0 0 L 21600 0 21600 21600 0 21600 0 0 Z N"/>
            </draw:custom-shape>
          </draw:g>
        </draw:g>
        <draw:g draw:style-name="gr3">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22" draw:text-style-name="P4" draw:layer="layout" svg:width="5.397cm" svg:height="1.153cm" svg:x="14.97cm" svg:y="10.342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mpd_control.MPDControl</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23" draw:text-style-name="P5" draw:layer="layout" svg:width="5.397cm" svg:height="0.761cm" svg:x="14.97cm" svg:y="11.495cm">
              <text:p/>
              <draw:enhanced-geometry svg:viewBox="0 0 21600 21600" draw:mirror-horizontal="false" draw:mirror-vertical="false" draw:type="rectangle" draw:enhanced-path="M 0 0 L 21600 0 21600 21600 0 21600 0 0 Z N"/>
            </draw:custom-shape>
            <draw:custom-shape draw:style-name="gr24" draw:text-style-name="P5" draw:layer="layout" svg:width="5.397cm" svg:height="2.569cm" svg:x="14.97cm" svg:y="12.256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 update-database()</text:span></text:p>
              <text:p text:style-name="P6"><text:span text:style-name="T2">+ is_web_radio()</text:span></text:p>
              <text:p text:style-name="P6"><text:span text:style-name="T2">+ next()</text:span></text:p>
              <text:p text:style-name="P6"><text:span text:style-name="T2">+ play()</text:span></text:p>
              <text:p text:style-name="P6"><text:span text:style-name="T2">+ stop()</text:span></text:p>
              <text:p text:style-name="P6"><text:span text:style-name="T2">+ pause()</text:span></text:p>
              <draw:enhanced-geometry svg:viewBox="0 0 21600 21600" draw:mirror-horizontal="false" draw:mirror-vertical="false" draw:type="rectangle" draw:enhanced-path="M 0 0 L 21600 0 21600 21600 0 21600 0 0 Z N"/>
            </draw:custom-shape>
          </draw:g>
        </draw:g>
        <draw:g draw:style-name="gr3" xml:id="id6" draw:id="id6">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lue-point draw:id="23" svg:x="1.382cm" svg:y="-4.998cm"/>
          <draw:g draw:style-name="gr3">
            <draw:custom-shape draw:style-name="gr25" draw:text-style-name="P4" draw:layer="layout" svg:width="8.775cm" svg:height="1.153cm" svg:x="8.152cm" svg:y="15.54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power_supply_control.PowerSupplyService&lt;&lt;class&gt;&gt;</text:span></text:p>
              <draw:enhanced-geometry svg:viewBox="0 0 21600 21600" draw:mirror-horizontal="false" draw:mirror-vertical="false" draw:type="rectangle" draw:enhanced-path="M 0 0 L 21600 0 21600 21600 0 21600 0 0 Z N"/>
            </draw:custom-shape>
            <draw:custom-shape draw:style-name="gr26" draw:text-style-name="P5" draw:layer="layout" svg:width="8.775cm" svg:height="0.761cm" svg:x="8.152cm" svg:y="16.693cm">
              <text:p/>
              <draw:enhanced-geometry svg:viewBox="0 0 21600 21600" draw:mirror-horizontal="false" draw:mirror-vertical="false" draw:type="rectangle" draw:enhanced-path="M 0 0 L 21600 0 21600 21600 0 21600 0 0 Z N"/>
            </draw:custom-shape>
            <draw:custom-shape draw:style-name="gr27" draw:text-style-name="P5" draw:layer="layout" svg:width="8.775cm" svg:height="1.781cm" svg:x="8.152cm" svg:y="17.454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 set_nom_voltage()</text:span></text:p>
              <text:p text:style-name="P6"><text:span text:style-name="T2">+ set_max_voltage()</text:span></text:p>
              <text:p text:style-name="P6"><text:span text:style-name="T2">+ set_standby_voltage()</text:span></text:p>
              <text:p text:style-name="P6"><text:span text:style-name="T2">+ read_status()</text:span></text:p>
              <draw:enhanced-geometry svg:viewBox="0 0 21600 21600" draw:mirror-horizontal="false" draw:mirror-vertical="false" draw:type="rectangle" draw:enhanced-path="M 0 0 L 21600 0 21600 21600 0 21600 0 0 Z N"/>
            </draw:custom-shape>
          </draw:g>
        </draw:g>
        <draw:g draw:style-name="gr3" xml:id="id9" draw:id="id9">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lue-point draw:id="23" svg:x="-2.753cm" svg:y="5.097cm"/>
          <draw:g draw:style-name="gr3">
            <draw:custom-shape draw:style-name="gr28" draw:text-style-name="P4" draw:layer="layout" svg:width="6.552cm" svg:height="1.153cm" svg:x="21.555cm" svg:y="12.653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remote_monitoring.RMService</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6.552cm" svg:height="0.761cm" svg:x="21.555cm" svg:y="13.806cm">
              <text:p/>
              <draw:enhanced-geometry svg:viewBox="0 0 21600 21600" draw:mirror-horizontal="false" draw:mirror-vertical="false" draw:type="rectangle" draw:enhanced-path="M 0 0 L 21600 0 21600 21600 0 21600 0 0 Z N"/>
            </draw:custom-shape>
            <draw:custom-shape draw:style-name="gr30" draw:text-style-name="P5" draw:layer="layout" svg:width="6.552cm" svg:height="0.803cm" svg:x="21.555cm" svg:y="14.56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draw:enhanced-geometry svg:viewBox="0 0 21600 21600" draw:mirror-horizontal="false" draw:mirror-vertical="false" draw:type="rectangle" draw:enhanced-path="M 0 0 L 21600 0 21600 21600 0 21600 0 0 Z N"/>
            </draw:custom-shape>
          </draw:g>
        </draw:g>
        <draw:g draw:style-name="gr3" xml:id="id8" draw:id="id8">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lue-point draw:id="23" svg:x="-0.009cm" svg:y="-4.346cm"/>
          <draw:glue-point draw:id="24" svg:x="3.714cm" svg:y="-5.101cm"/>
          <draw:g draw:style-name="gr3">
            <draw:custom-shape draw:style-name="gr31" draw:text-style-name="P4" draw:layer="layout" svg:width="6.552cm" svg:height="1.153cm" svg:x="17.602cm" svg:y="15.98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spotify_connect.SpotifyConnect</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32" draw:text-style-name="P5" draw:layer="layout" svg:width="6.552cm" svg:height="0.761cm" svg:x="17.602cm" svg:y="17.133cm">
              <text:p/>
              <draw:enhanced-geometry svg:viewBox="0 0 21600 21600" draw:mirror-horizontal="false" draw:mirror-vertical="false" draw:type="rectangle" draw:enhanced-path="M 0 0 L 21600 0 21600 21600 0 21600 0 0 Z N"/>
            </draw:custom-shape>
            <draw:custom-shape draw:style-name="gr33" draw:text-style-name="P5" draw:layer="layout" svg:width="6.552cm" svg:height="0.803cm" svg:x="17.602cm" svg:y="17.894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draw:enhanced-geometry svg:viewBox="0 0 21600 21600" draw:mirror-horizontal="false" draw:mirror-vertical="false" draw:type="rectangle" draw:enhanced-path="M 0 0 L 21600 0 21600 21600 0 21600 0 0 Z N"/>
            </draw:custom-shape>
          </draw:g>
        </draw:g>
        <draw:g draw:style-name="gr3" xml:id="id3" draw:id="id3">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34" draw:text-style-name="P4" draw:layer="layout" svg:width="5.233cm" svg:height="1.153cm" svg:x="8.867cm" svg:y="6.708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usb_service.USBService</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35" draw:text-style-name="P5" draw:layer="layout" svg:width="5.233cm" svg:height="0.761cm" svg:x="8.867cm" svg:y="7.861cm">
              <text:p text:style-name="P14"><text:span text:style-name="T2">- shared_queue: Queue</text:span></text:p>
              <draw:enhanced-geometry svg:viewBox="0 0 21600 21600" draw:mirror-horizontal="false" draw:mirror-vertical="false" draw:type="rectangle" draw:enhanced-path="M 0 0 L 21600 0 21600 21600 0 21600 0 0 Z N"/>
            </draw:custom-shape>
            <draw:custom-shape draw:style-name="gr36" draw:text-style-name="P5" draw:layer="layout" svg:width="5.233cm" svg:height="1.387cm" svg:x="8.867cm" svg:y="8.62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 __init__(queue: Queue)</text:span></text:p>
              <text:p text:style-name="P6"><text:span text:style-name="T2">+ get_state()</text:span></text:p>
              <text:p text:style-name="P6"><text:span text:style-name="T2">+ close()</text:span></text:p>
              <draw:enhanced-geometry svg:viewBox="0 0 21600 21600" draw:mirror-horizontal="false" draw:mirror-vertical="false" draw:type="rectangle" draw:enhanced-path="M 0 0 L 21600 0 21600 21600 0 21600 0 0 Z N"/>
            </draw:custom-shape>
          </draw:g>
        </draw:g>
        <draw:g draw:style-name="gr3" xml:id="id5" draw:id="id5">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37" draw:text-style-name="P4" draw:layer="layout" svg:width="5.715cm" svg:height="1.153cm" svg:x="8.172cm" svg:y="10.798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web_service.WebService</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38" draw:text-style-name="P5" draw:layer="layout" svg:width="5.715cm" svg:height="0.761cm" svg:x="8.172cm" svg:y="11.951cm">
              <text:p text:style-name="P14"><text:span text:style-name="T2">- shared_queue: Queue</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5.715cm" svg:height="2.175cm" svg:x="8.172cm" svg:y="12.71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 __init__(queue: Queue)</text:span></text:p>
              <text:p text:style-name="P6"><text:span text:style-name="T2">+ stop()</text:span></text:p>
              <text:p text:style-name="P6"><text:span text:style-name="T2">+ get_state()</text:span></text:p>
              <text:p text:style-name="P6"><text:span text:style-name="T2">+ start()</text:span></text:p>
              <text:p text:style-name="P6"><text:span text:style-name="T2">+ close()</text:span></text:p>
              <draw:enhanced-geometry svg:viewBox="0 0 21600 21600" draw:mirror-horizontal="false" draw:mirror-vertical="false" draw:type="rectangle" draw:enhanced-path="M 0 0 L 21600 0 21600 21600 0 21600 0 0 Z N"/>
            </draw:custom-shape>
          </draw:g>
        </draw:g>
        <draw:g draw:style-name="gr3" xml:id="id11" draw:id="id11">
          <draw:glue-point draw:id="4" svg:x="1.153cm" svg:y="-4.294cm"/>
          <draw:glue-point draw:id="5" svg:x="3.461cm" svg:y="-5.146cm"/>
          <draw:custom-shape draw:style-name="gr40" draw:text-style-name="P4" draw:layer="layout" svg:width="4.128cm" svg:height="1.153cm" svg:x="24.177cm" svg:y="6.932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system_sounds.py</text:span></text:p>
            <text:p text:style-name="P3"><text:span text:style-name="T1">&lt;&lt;module&gt;&gt;</text:span></text:p>
            <draw:enhanced-geometry svg:viewBox="0 0 21600 21600" draw:mirror-horizontal="false" draw:mirror-vertical="false" draw:type="rectangle" draw:enhanced-path="M 0 0 L 21600 0 21600 21600 0 21600 0 0 Z N"/>
          </draw:custom-shape>
          <draw:custom-shape draw:style-name="gr41" draw:text-style-name="P5" draw:layer="layout" svg:width="4.128cm" svg:height="0.761cm" svg:x="24.177cm" svg:y="8.085cm">
            <text:p text:style-name="P6"><text:span text:style-name="T2">+ play_sound()</text:span></text:p>
            <draw:enhanced-geometry svg:viewBox="0 0 21600 21600" draw:mirror-horizontal="false" draw:mirror-vertical="false" draw:type="rectangle" draw:enhanced-path="M 0 0 L 21600 0 21600 21600 0 21600 0 0 Z N"/>
          </draw:custom-shape>
        </draw:g>
        <draw:g draw:style-name="gr3" xml:id="id10" draw:id="id10">
          <draw:glue-point draw:id="4" svg:x="-3.94cm" svg:y="-4.644cm"/>
          <draw:custom-shape draw:style-name="gr42" draw:text-style-name="P4" draw:layer="layout" svg:width="4.555cm" svg:height="1.153cm" svg:x="23.06cm" svg:y="9.857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oradio_logging.py</text:span></text:p>
            <text:p text:style-name="P3"><text:span text:style-name="T1">&lt;&lt;module&gt;&gt;</text:span></text:p>
            <draw:enhanced-geometry svg:viewBox="0 0 21600 21600" draw:mirror-horizontal="false" draw:mirror-vertical="false" draw:type="rectangle" draw:enhanced-path="M 0 0 L 21600 0 21600 21600 0 21600 0 0 Z N"/>
          </draw:custom-shape>
          <draw:custom-shape draw:style-name="gr43" draw:text-style-name="P5" draw:layer="layout" svg:width="4.555cm" svg:height="0.761cm" svg:x="23.06cm" svg:y="11.01cm">
            <text:p text:style-name="P6"><text:span text:style-name="T2">+ oradio_log()</text:span></text:p>
            <draw:enhanced-geometry svg:viewBox="0 0 21600 21600" draw:mirror-horizontal="false" draw:mirror-vertical="false" draw:type="rectangle" draw:enhanced-path="M 0 0 L 21600 0 21600 21600 0 21600 0 0 Z N"/>
          </draw:custom-shape>
        </draw:g>
        <draw:connector draw:style-name="gr44" draw:text-style-name="P11" draw:layer="layout" draw:line-skew="-2.103cm" svg:x1="6.708cm" svg:y1="12.406cm" svg:x2="6.36cm" svg:y2="4.17cm" draw:start-shape="id2" draw:start-glue-point="15" draw:end-shape="id1" draw:end-glue-point="21" svg:d="M6708 12406v-6222h-348v-2014" svg:viewBox="0 0 349 8237">
          <text:p/>
        </draw:connector>
        <draw:connector draw:style-name="gr45" draw:text-style-name="P11" draw:layer="layout" svg:x1="10.322cm" svg:y1="6.709cm" svg:x2="11.024cm" svg:y2="4.17cm" draw:start-shape="id3" draw:start-glue-point="5" draw:end-shape="id1" draw:end-glue-point="23" svg:d="M10322 6709v-1271h702v-1268" svg:viewBox="0 0 703 2540">
          <text:p/>
        </draw:connector>
        <draw:connector draw:style-name="gr46" draw:text-style-name="P11" draw:layer="layout" svg:x1="7.367cm" svg:y1="15.476cm" svg:x2="7.38cm" svg:y2="4.17cm" draw:start-shape="id4" draw:start-glue-point="15" draw:end-shape="id1" draw:end-glue-point="4" svg:d="M7367 15476v-5654h13v-5652" svg:viewBox="0 0 14 11307">
          <text:p/>
        </draw:connector>
        <draw:connector draw:style-name="gr47" draw:text-style-name="P11" draw:layer="layout" svg:x1="8.491cm" svg:y1="10.799cm" svg:x2="8.266cm" svg:y2="4.119cm" draw:start-shape="id5" draw:start-glue-point="4" svg:d="M8491 10799v-3604h-225v-3076" svg:viewBox="0 0 226 6681">
          <text:p/>
        </draw:connector>
        <draw:connector draw:style-name="gr48" draw:text-style-name="P11" draw:layer="layout" draw:line-skew="-3.957cm" svg:x1="14.489cm" svg:y1="15.541cm" svg:x2="12.114cm" svg:y2="4.17cm" draw:start-shape="id6" draw:start-glue-point="14" draw:end-shape="id1" draw:end-glue-point="35" svg:d="M14489 15541v-9644h-2375v-1727" svg:viewBox="0 0 2376 11372">
          <text:p/>
        </draw:connector>
        <draw:connector draw:style-name="gr49" draw:text-style-name="P11" draw:layer="layout" draw:line-skew="0.725cm" svg:x1="17.17cm" svg:y1="6.951cm" svg:x2="20.864cm" svg:y2="4.17cm" draw:start-shape="id7" draw:start-glue-point="5" draw:end-shape="id1" draw:end-glue-point="28" svg:d="M17170 6951v-667h3694v-2114" svg:viewBox="0 0 3695 2782">
          <text:p/>
        </draw:connector>
        <draw:connector draw:style-name="gr50" draw:text-style-name="P11" draw:layer="layout" draw:line-skew="-1.814cm" svg:x1="15.21cm" svg:y1="10.53cm" svg:x2="19.351cm" svg:y2="4.17cm" draw:end-shape="id1" draw:end-glue-point="25" svg:d="M15210 10530v-4731h4141v-1629" svg:viewBox="0 0 4142 6361">
          <text:p/>
        </draw:connector>
        <draw:connector draw:style-name="gr51" draw:text-style-name="P11" draw:layer="layout" draw:line-skew="0.12cm" svg:x1="20.873cm" svg:y1="16.158cm" svg:x2="21.635cm" svg:y2="4.17cm" draw:start-shape="id8" draw:start-glue-point="23" draw:end-shape="id1" draw:end-glue-point="31" svg:d="M20873 16158v-5964h762v-6024" svg:viewBox="0 0 763 11989">
          <text:p/>
        </draw:connector>
        <draw:connector draw:style-name="gr52" draw:text-style-name="P11" draw:layer="layout" svg:x1="21.921cm" svg:y1="12.654cm" svg:x2="22.269cm" svg:y2="4.17cm" draw:start-shape="id9" draw:start-glue-point="4" draw:end-shape="id1" draw:end-glue-point="7" svg:d="M21921 12654v-4243h348v-4241" svg:viewBox="0 0 349 8485">
          <text:p/>
        </draw:connector>
        <draw:connector draw:style-name="gr53" draw:text-style-name="P11" draw:layer="layout" svg:x1="23.543cm" svg:y1="9.926cm" svg:x2="23.223cm" svg:y2="4.17cm" draw:start-shape="id10" draw:start-glue-point="4" draw:end-shape="id1" draw:end-glue-point="5" svg:d="M23543 9926v-2913h-320v-2843" svg:viewBox="0 0 321 5757">
          <text:p/>
        </draw:connector>
        <draw:connector draw:style-name="gr54" draw:text-style-name="P11" draw:layer="layout" svg:x1="26.716cm" svg:y1="7.068cm" svg:x2="25.763cm" svg:y2="4.17cm" draw:start-shape="id11" draw:start-glue-point="4" draw:end-shape="id1" draw:end-glue-point="39" svg:d="M26716 7068v-1518h-953v-1380" svg:viewBox="0 0 954 2899">
          <text:p/>
        </draw:connector>
      </draw:page>
      <draw:page draw:name="page2" draw:style-name="dp1" draw:master-page-name="Default">
        <draw:g draw:style-name="gr3">
          <draw:custom-shape draw:style-name="gr55" draw:text-style-name="P4" draw:layer="layout" svg:width="5.08cm" svg:height="1.153cm" svg:x="-8.842cm" svg:y="7.325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led_control.LEDControl</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56" draw:text-style-name="P5" draw:layer="layout" svg:width="5.08cm" svg:height="0.671cm" svg:x="-8.842cm" svg:y="8.478cm">
            <text:p/>
            <draw:enhanced-geometry svg:viewBox="0 0 21600 21600" draw:mirror-horizontal="false" draw:mirror-vertical="false" draw:type="rectangle" draw:enhanced-path="M 0 0 L 21600 0 21600 21600 0 21600 0 0 Z N"/>
          </draw:custom-shape>
          <draw:custom-shape draw:style-name="gr57" draw:text-style-name="P5" draw:layer="layout" svg:width="5.08cm" svg:height="2.963cm" svg:x="-8.842cm" svg:y="9.14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 turn_on_led()</text:span></text:p>
            <text:p text:style-name="P6"><text:span text:style-name="T2">+ turn_off_led()</text:span></text:p>
            <text:p text:style-name="P6"><text:span text:style-name="T2">+ turn_off_all_leds()</text:span></text:p>
            <text:p text:style-name="P6"><text:span text:style-name="T2">+ turn_off_all_leds()</text:span></text:p>
            <text:p text:style-name="P6"><text:span text:style-name="T2">+ get_led_state()l</text:span></text:p>
            <text:p text:style-name="P6"><text:span text:style-name="T2">+ oneshot_on_led()</text:span></text:p>
            <text:p text:style-name="P6"><text:span text:style-name="T2">+ control_blinking_led( )</text:span></text:p>
            <draw:enhanced-geometry svg:viewBox="0 0 21600 21600" draw:mirror-horizontal="false" draw:mirror-vertical="false" draw:type="rectangle" draw:enhanced-path="M 0 0 L 21600 0 21600 21600 0 21600 0 0 Z N"/>
          </draw:custom-shape>
        </draw:g>
        <draw:g draw:style-name="gr3" xml:id="id12" draw:id="id12">
          <draw:glue-point draw:id="4" svg:x="-3cm" svg:y="5cm"/>
          <draw:glue-point draw:id="5" svg:x="2.945cm" svg:y="5.141cm"/>
          <draw:glue-point draw:id="6" svg:x="1cm" svg:y="5cm"/>
          <draw:glue-point draw:id="7" svg:x="2.587cm" svg:y="5.141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glue-point draw:id="16" svg:x="-10.099cm" svg:y="0.916cm" draw:align="center"/>
          <draw:glue-point draw:id="17" svg:x="-3.667cm" svg:y="5.141cm"/>
          <draw:glue-point draw:id="18" svg:x="-4.384cm" svg:y="0.916cm" draw:align="center"/>
          <draw:glue-point draw:id="19" svg:x="-3.809cm" svg:y="5.141cm"/>
          <draw:glue-point draw:id="20" svg:x="-2.672cm" svg:y="5.141cm"/>
          <draw:glue-point draw:id="21" svg:x="-3.383cm" svg:y="5.141cm"/>
          <draw:glue-point draw:id="22" svg:x="-2.246cm" svg:y="5.141cm"/>
          <draw:glue-point draw:id="23" svg:x="-1.633cm" svg:y="5.141cm"/>
          <draw:glue-point draw:id="24" svg:x="0.498cm" svg:y="5.141cm"/>
          <draw:glue-point draw:id="25" svg:x="1.492cm" svg:y="5.141cm"/>
          <draw:glue-point draw:id="26" svg:x="0.639cm" svg:y="5.141cm"/>
          <draw:glue-point draw:id="27" svg:x="1.35cm" svg:y="5.141cm"/>
          <draw:glue-point draw:id="28" svg:x="2.06cm" svg:y="5.141cm"/>
          <draw:glue-point draw:id="29" svg:x="2.203cm" svg:y="5.141cm"/>
          <draw:glue-point draw:id="30" svg:x="1.776cm" svg:y="5.141cm"/>
          <draw:glue-point draw:id="31" svg:x="2.349cm" svg:y="5.141cm"/>
          <draw:glue-point draw:id="32" svg:x="2.587cm" svg:y="5.141cm"/>
          <draw:glue-point draw:id="33" svg:x="3.66cm" svg:y="5.141cm"/>
          <draw:glue-point draw:id="34" svg:x="2.945cm" svg:y="5.141cm"/>
          <draw:glue-point draw:id="35" svg:x="-1.224cm" svg:y="5.141cm"/>
          <draw:glue-point draw:id="36" svg:x="3.183cm" svg:y="5.12cm"/>
          <draw:glue-point draw:id="37" svg:x="2.707cm" svg:y="5.12cm"/>
          <draw:glue-point draw:id="38" svg:x="3.302cm" svg:y="5.12cm"/>
          <draw:glue-point draw:id="39" svg:x="3.898cm" svg:y="5.12cm"/>
          <draw:custom-shape draw:style-name="gr58" draw:text-style-name="P8" draw:layer="layout" svg:width="13.555cm" svg:height="1.153cm" svg:x="5.75cm" svg:y="2.338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7"><text:span text:style-name="T1">oradio_control.py</text:span></text:p>
            <text:p text:style-name="P7"><text:span text:style-name="T1">&lt;&lt;module&gt;&gt;</text:span></text:p>
            <draw:enhanced-geometry svg:viewBox="0 0 21600 21600" draw:mirror-horizontal="false" draw:mirror-vertical="false" draw:type="rectangle" draw:enhanced-path="M 0 0 L 21600 0 21600 21600 0 21600 0 0 Z N"/>
          </draw:custom-shape>
          <draw:custom-shape draw:style-name="gr59" draw:text-style-name="P10" draw:layer="layout" svg:width="13.555cm" svg:height="0.679cm" svg:x="5.75cm" svg:y="3.491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9"><text:span text:style-name="T1">+ execute(): void</text:span></text:p>
            <draw:enhanced-geometry svg:viewBox="0 0 21600 21600" draw:mirror-horizontal="false" draw:mirror-vertical="false" draw:type="rectangle" draw:enhanced-path="M 0 0 L 21600 0 21600 21600 0 21600 0 0 Z N"/>
          </draw:custom-shape>
        </draw:g>
        <draw:custom-shape draw:style-name="gr9" draw:text-style-name="P2" draw:layer="layout" svg:width="27.383cm" svg:height="0.7cm" svg:x="1.317cm" svg:y="19.6cm">
          <text:p text:style-name="P1">Hardware Abstraction Layer</text:p>
          <draw:enhanced-geometry svg:viewBox="0 0 21600 21600" draw:mirror-horizontal="false" draw:mirror-vertical="false" draw:type="rectangle" draw:enhanced-path="M 0 0 L 21600 0 21600 21600 0 21600 0 0 Z N"/>
        </draw:custom-shape>
        <draw:custom-shape draw:style-name="gr12" draw:text-style-name="P13" draw:layer="layout" svg:width="28.257cm" svg:height="19.5cm" svg:x="1cm" svg:y="1cm">
          <text:p/>
          <draw:enhanced-geometry svg:viewBox="0 0 21600 21600" draw:mirror-horizontal="false" draw:mirror-vertical="false" draw:type="rectangle" draw:enhanced-path="M 0 0 L 21600 0 21600 21600 0 21600 0 0 Z N"/>
        </draw:custom-shape>
        <draw:g draw:style-name="gr3" xml:id="id17" draw:id="id17">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60" draw:text-style-name="P4" draw:layer="layout" svg:width="5.917cm" svg:height="1.153cm" svg:x="17.719cm" svg:y="11.905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touch_buttons.TouchButtons</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61" draw:text-style-name="P5" draw:layer="layout" svg:width="5.917cm" svg:height="0.761cm" svg:x="17.719cm" svg:y="13.058cm">
              <text:p text:style-name="P14"><text:span text:style-name="T2"/></text:p>
              <draw:enhanced-geometry svg:viewBox="0 0 21600 21600" draw:mirror-horizontal="false" draw:mirror-vertical="false" draw:type="rectangle" draw:enhanced-path="M 0 0 L 21600 0 21600 21600 0 21600 0 0 Z N"/>
            </draw:custom-shape>
            <draw:custom-shape draw:style-name="gr62" draw:text-style-name="P5" draw:layer="layout" svg:width="5.917cm" svg:height="0.599cm" svg:x="17.719cm" svg:y="13.81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text:p>
              <draw:enhanced-geometry svg:viewBox="0 0 21600 21600" draw:mirror-horizontal="false" draw:mirror-vertical="false" draw:type="rectangle" draw:enhanced-path="M 0 0 L 21600 0 21600 21600 0 21600 0 0 Z N"/>
            </draw:custom-shape>
          </draw:g>
        </draw:g>
        <draw:g draw:style-name="gr3">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63" draw:text-style-name="P4" draw:layer="layout" svg:width="5.282cm" svg:height="1.153cm" svg:x="-8.525cm" svg:y="14.017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backlighting.BackLighting</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64" draw:text-style-name="P5" draw:layer="layout" svg:width="5.282cm" svg:height="0.761cm" svg:x="-8.525cm" svg:y="15.17cm">
              <text:p/>
              <draw:enhanced-geometry svg:viewBox="0 0 21600 21600" draw:mirror-horizontal="false" draw:mirror-vertical="false" draw:type="rectangle" draw:enhanced-path="M 0 0 L 21600 0 21600 21600 0 21600 0 0 Z N"/>
            </draw:custom-shape>
            <draw:custom-shape draw:style-name="gr65" draw:text-style-name="P5" draw:layer="layout" svg:width="5.282cm" svg:height="0.803cm" svg:x="-8.525cm" svg:y="15.931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draw:enhanced-geometry svg:viewBox="0 0 21600 21600" draw:mirror-horizontal="false" draw:mirror-vertical="false" draw:type="rectangle" draw:enhanced-path="M 0 0 L 21600 0 21600 21600 0 21600 0 0 Z N"/>
            </draw:custom-shape>
          </draw:g>
        </draw:g>
        <draw:g draw:style-name="gr3">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66" draw:text-style-name="P4" draw:layer="layout" svg:width="5.397cm" svg:height="1.153cm" svg:x="29.957cm" svg:y="19.885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mpd_monitor.MPDMonitor</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67" draw:text-style-name="P5" draw:layer="layout" svg:width="5.397cm" svg:height="0.761cm" svg:x="29.957cm" svg:y="21.038cm">
              <text:p/>
              <draw:enhanced-geometry svg:viewBox="0 0 21600 21600" draw:mirror-horizontal="false" draw:mirror-vertical="false" draw:type="rectangle" draw:enhanced-path="M 0 0 L 21600 0 21600 21600 0 21600 0 0 Z N"/>
            </draw:custom-shape>
            <draw:custom-shape draw:style-name="gr68" draw:text-style-name="P5" draw:layer="layout" svg:width="5.397cm" svg:height="0.803cm" svg:x="29.957cm" svg:y="21.7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draw:enhanced-geometry svg:viewBox="0 0 21600 21600" draw:mirror-horizontal="false" draw:mirror-vertical="false" draw:type="rectangle" draw:enhanced-path="M 0 0 L 21600 0 21600 21600 0 21600 0 0 Z N"/>
            </draw:custom-shape>
          </draw:g>
        </draw:g>
        <draw:g draw:style-name="gr3">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69" draw:text-style-name="P4" draw:layer="layout" svg:width="5.397cm" svg:height="1.153cm" svg:x="29.257cm" svg:y="23.277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mpd_control.MPDControl</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70" draw:text-style-name="P5" draw:layer="layout" svg:width="5.397cm" svg:height="0.761cm" svg:x="29.257cm" svg:y="24.43cm">
              <text:p/>
              <draw:enhanced-geometry svg:viewBox="0 0 21600 21600" draw:mirror-horizontal="false" draw:mirror-vertical="false" draw:type="rectangle" draw:enhanced-path="M 0 0 L 21600 0 21600 21600 0 21600 0 0 Z N"/>
            </draw:custom-shape>
            <draw:custom-shape draw:style-name="gr71" draw:text-style-name="P5" draw:layer="layout" svg:width="5.397cm" svg:height="2.569cm" svg:x="29.257cm" svg:y="25.191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 update-database()</text:span></text:p>
              <text:p text:style-name="P6"><text:span text:style-name="T2">+ is_web_radio()</text:span></text:p>
              <text:p text:style-name="P6"><text:span text:style-name="T2">+ next()</text:span></text:p>
              <text:p text:style-name="P6"><text:span text:style-name="T2">+ play()</text:span></text:p>
              <text:p text:style-name="P6"><text:span text:style-name="T2">+ stop()</text:span></text:p>
              <text:p text:style-name="P6"><text:span text:style-name="T2">+ pause()</text:span></text:p>
              <draw:enhanced-geometry svg:viewBox="0 0 21600 21600" draw:mirror-horizontal="false" draw:mirror-vertical="false" draw:type="rectangle" draw:enhanced-path="M 0 0 L 21600 0 21600 21600 0 21600 0 0 Z N"/>
            </draw:custom-shape>
          </draw:g>
        </draw:g>
        <draw:g draw:style-name="gr3">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lue-point draw:id="23" svg:x="1.382cm" svg:y="-4.998cm"/>
          <draw:g draw:style-name="gr3">
            <draw:custom-shape draw:style-name="gr72" draw:text-style-name="P4" draw:layer="layout" svg:width="8.775cm" svg:height="1.153cm" svg:x="-10.747cm" svg:y="17.827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power_supply_control.PowerSupplyService&lt;&lt;class&gt;&gt;</text:span></text:p>
              <draw:enhanced-geometry svg:viewBox="0 0 21600 21600" draw:mirror-horizontal="false" draw:mirror-vertical="false" draw:type="rectangle" draw:enhanced-path="M 0 0 L 21600 0 21600 21600 0 21600 0 0 Z N"/>
            </draw:custom-shape>
            <draw:custom-shape draw:style-name="gr73" draw:text-style-name="P5" draw:layer="layout" svg:width="8.775cm" svg:height="0.761cm" svg:x="-10.747cm" svg:y="18.98cm">
              <text:p/>
              <draw:enhanced-geometry svg:viewBox="0 0 21600 21600" draw:mirror-horizontal="false" draw:mirror-vertical="false" draw:type="rectangle" draw:enhanced-path="M 0 0 L 21600 0 21600 21600 0 21600 0 0 Z N"/>
            </draw:custom-shape>
            <draw:custom-shape draw:style-name="gr74" draw:text-style-name="P5" draw:layer="layout" svg:width="8.775cm" svg:height="1.781cm" svg:x="-10.747cm" svg:y="19.741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 set_nom_voltage()</text:span></text:p>
              <text:p text:style-name="P6"><text:span text:style-name="T2">+ set_max_voltage()</text:span></text:p>
              <text:p text:style-name="P6"><text:span text:style-name="T2">+ set_standby_voltage()</text:span></text:p>
              <text:p text:style-name="P6"><text:span text:style-name="T2">+ read_status()</text:span></text:p>
              <draw:enhanced-geometry svg:viewBox="0 0 21600 21600" draw:mirror-horizontal="false" draw:mirror-vertical="false" draw:type="rectangle" draw:enhanced-path="M 0 0 L 21600 0 21600 21600 0 21600 0 0 Z N"/>
            </draw:custom-shape>
          </draw:g>
        </draw:g>
        <draw:g draw:style-name="gr3">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lue-point draw:id="23" svg:x="-2.753cm" svg:y="5.097cm"/>
          <draw:g draw:style-name="gr3">
            <draw:custom-shape draw:style-name="gr75" draw:text-style-name="P4" draw:layer="layout" svg:width="6.552cm" svg:height="1.153cm" svg:x="35.842cm" svg:y="25.588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remote_monitoring.RMService</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76" draw:text-style-name="P5" draw:layer="layout" svg:width="6.552cm" svg:height="0.761cm" svg:x="35.842cm" svg:y="26.741cm">
              <text:p/>
              <draw:enhanced-geometry svg:viewBox="0 0 21600 21600" draw:mirror-horizontal="false" draw:mirror-vertical="false" draw:type="rectangle" draw:enhanced-path="M 0 0 L 21600 0 21600 21600 0 21600 0 0 Z N"/>
            </draw:custom-shape>
            <draw:custom-shape draw:style-name="gr77" draw:text-style-name="P5" draw:layer="layout" svg:width="6.552cm" svg:height="0.803cm" svg:x="35.842cm" svg:y="27.50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draw:enhanced-geometry svg:viewBox="0 0 21600 21600" draw:mirror-horizontal="false" draw:mirror-vertical="false" draw:type="rectangle" draw:enhanced-path="M 0 0 L 21600 0 21600 21600 0 21600 0 0 Z N"/>
            </draw:custom-shape>
          </draw:g>
        </draw:g>
        <draw:g draw:style-name="gr3">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lue-point draw:id="23" svg:x="-0.009cm" svg:y="-4.346cm"/>
          <draw:glue-point draw:id="24" svg:x="3.714cm" svg:y="-5.101cm"/>
          <draw:g draw:style-name="gr3">
            <draw:custom-shape draw:style-name="gr78" draw:text-style-name="P4" draw:layer="layout" svg:width="6.552cm" svg:height="1.153cm" svg:x="-5.552cm" svg:y="22.73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spotify_connect.SpotifyConnect</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79" draw:text-style-name="P5" draw:layer="layout" svg:width="6.552cm" svg:height="0.761cm" svg:x="-5.552cm" svg:y="23.883cm">
              <text:p/>
              <draw:enhanced-geometry svg:viewBox="0 0 21600 21600" draw:mirror-horizontal="false" draw:mirror-vertical="false" draw:type="rectangle" draw:enhanced-path="M 0 0 L 21600 0 21600 21600 0 21600 0 0 Z N"/>
            </draw:custom-shape>
            <draw:custom-shape draw:style-name="gr80" draw:text-style-name="P5" draw:layer="layout" svg:width="6.552cm" svg:height="0.803cm" svg:x="-5.552cm" svg:y="24.644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draw:enhanced-geometry svg:viewBox="0 0 21600 21600" draw:mirror-horizontal="false" draw:mirror-vertical="false" draw:type="rectangle" draw:enhanced-path="M 0 0 L 21600 0 21600 21600 0 21600 0 0 Z N"/>
            </draw:custom-shape>
          </draw:g>
        </draw:g>
        <draw:g draw:style-name="gr3" xml:id="id15" draw:id="id15">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81" draw:text-style-name="P4" draw:layer="layout" svg:width="5.233cm" svg:height="1.153cm" svg:x="3.432cm" svg:y="11.822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usb_service.USBService</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82" draw:text-style-name="P5" draw:layer="layout" svg:width="5.233cm" svg:height="0.761cm" svg:x="3.432cm" svg:y="12.975cm">
              <text:p text:style-name="P14"><text:span text:style-name="T2"/></text:p>
              <draw:enhanced-geometry svg:viewBox="0 0 21600 21600" draw:mirror-horizontal="false" draw:mirror-vertical="false" draw:type="rectangle" draw:enhanced-path="M 0 0 L 21600 0 21600 21600 0 21600 0 0 Z N"/>
            </draw:custom-shape>
            <draw:custom-shape draw:style-name="gr83" draw:text-style-name="P5" draw:layer="layout" svg:width="5.233cm" svg:height="0.599cm" svg:x="3.432cm" svg:y="13.736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text:p>
              <draw:enhanced-geometry svg:viewBox="0 0 21600 21600" draw:mirror-horizontal="false" draw:mirror-vertical="false" draw:type="rectangle" draw:enhanced-path="M 0 0 L 21600 0 21600 21600 0 21600 0 0 Z N"/>
            </draw:custom-shape>
          </draw:g>
        </draw:g>
        <draw:g draw:style-name="gr3" xml:id="id16" draw:id="id16">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glue-point draw:id="16" svg:x="5cm" svg:y="-1.566cm"/>
          <draw:glue-point draw:id="17" svg:x="3.828cm" svg:y="2.77cm"/>
          <draw:glue-point draw:id="18" svg:x="0.112cm" svg:y="-1.306cm"/>
          <draw:glue-point draw:id="19" svg:x="-1.011cm" svg:y="-2.499cm"/>
          <draw:glue-point draw:id="20" svg:x="-5.03cm" svg:y="-1.688cm"/>
          <draw:glue-point draw:id="21" svg:x="-5.03cm" svg:y="-2.784cm"/>
          <draw:glue-point draw:id="22" svg:x="-5cm" svg:y="-0.947cm"/>
          <draw:g draw:style-name="gr3">
            <draw:custom-shape draw:style-name="gr84" draw:text-style-name="P4" draw:layer="layout" svg:width="5.715cm" svg:height="1.153cm" svg:x="10.099cm" svg:y="11.843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web_service.WebService</text:span></text:p>
              <text:p text:style-name="P3"><text:span text:style-name="T1">&lt;&lt;class&gt;&gt;</text:span></text:p>
              <draw:enhanced-geometry svg:viewBox="0 0 21600 21600" draw:mirror-horizontal="false" draw:mirror-vertical="false" draw:type="rectangle" draw:enhanced-path="M 0 0 L 21600 0 21600 21600 0 21600 0 0 Z N"/>
            </draw:custom-shape>
            <draw:custom-shape draw:style-name="gr85" draw:text-style-name="P5" draw:layer="layout" svg:width="5.715cm" svg:height="0.761cm" svg:x="10.099cm" svg:y="12.996cm">
              <text:p text:style-name="P14"><text:span text:style-name="T2"/></text:p>
              <draw:enhanced-geometry svg:viewBox="0 0 21600 21600" draw:mirror-horizontal="false" draw:mirror-vertical="false" draw:type="rectangle" draw:enhanced-path="M 0 0 L 21600 0 21600 21600 0 21600 0 0 Z N"/>
            </draw:custom-shape>
            <draw:custom-shape draw:style-name="gr86" draw:text-style-name="P5" draw:layer="layout" svg:width="5.715cm" svg:height="0.599cm" svg:x="10.099cm" svg:y="13.75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text:span text:style-name="T2"/></text:p>
              <draw:enhanced-geometry svg:viewBox="0 0 21600 21600" draw:mirror-horizontal="false" draw:mirror-vertical="false" draw:type="rectangle" draw:enhanced-path="M 0 0 L 21600 0 21600 21600 0 21600 0 0 Z N"/>
            </draw:custom-shape>
          </draw:g>
        </draw:g>
        <draw:g draw:style-name="gr3">
          <draw:glue-point draw:id="4" svg:x="1.153cm" svg:y="-4.294cm"/>
          <draw:glue-point draw:id="5" svg:x="3.461cm" svg:y="-5.146cm"/>
          <draw:custom-shape draw:style-name="gr87" draw:text-style-name="P4" draw:layer="layout" svg:width="4.128cm" svg:height="1.153cm" svg:x="38.464cm" svg:y="19.867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system_sounds.py</text:span></text:p>
            <text:p text:style-name="P3"><text:span text:style-name="T1">&lt;&lt;module&gt;&gt;</text:span></text:p>
            <draw:enhanced-geometry svg:viewBox="0 0 21600 21600" draw:mirror-horizontal="false" draw:mirror-vertical="false" draw:type="rectangle" draw:enhanced-path="M 0 0 L 21600 0 21600 21600 0 21600 0 0 Z N"/>
          </draw:custom-shape>
          <draw:custom-shape draw:style-name="gr88" draw:text-style-name="P5" draw:layer="layout" svg:width="4.128cm" svg:height="0.761cm" svg:x="38.464cm" svg:y="21.02cm">
            <text:p text:style-name="P6"><text:span text:style-name="T2">+ play_sound()</text:span></text:p>
            <draw:enhanced-geometry svg:viewBox="0 0 21600 21600" draw:mirror-horizontal="false" draw:mirror-vertical="false" draw:type="rectangle" draw:enhanced-path="M 0 0 L 21600 0 21600 21600 0 21600 0 0 Z N"/>
          </draw:custom-shape>
        </draw:g>
        <draw:g draw:style-name="gr3">
          <draw:glue-point draw:id="4" svg:x="-3.94cm" svg:y="-4.644cm"/>
          <draw:custom-shape draw:style-name="gr89" draw:text-style-name="P4" draw:layer="layout" svg:width="4.555cm" svg:height="1.153cm" svg:x="37.347cm" svg:y="22.792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3"><text:span text:style-name="T1">oradio_logging.py</text:span></text:p>
            <text:p text:style-name="P3"><text:span text:style-name="T1">&lt;&lt;module&gt;&gt;</text:span></text:p>
            <draw:enhanced-geometry svg:viewBox="0 0 21600 21600" draw:mirror-horizontal="false" draw:mirror-vertical="false" draw:type="rectangle" draw:enhanced-path="M 0 0 L 21600 0 21600 21600 0 21600 0 0 Z N"/>
          </draw:custom-shape>
          <draw:custom-shape draw:style-name="gr90" draw:text-style-name="P5" draw:layer="layout" svg:width="4.555cm" svg:height="0.761cm" svg:x="37.347cm" svg:y="23.945cm">
            <text:p text:style-name="P6"><text:span text:style-name="T2">+ oradio_log()</text:span></text:p>
            <draw:enhanced-geometry svg:viewBox="0 0 21600 21600" draw:mirror-horizontal="false" draw:mirror-vertical="false" draw:type="rectangle" draw:enhanced-path="M 0 0 L 21600 0 21600 21600 0 21600 0 0 Z N"/>
          </draw:custom-shape>
        </draw:g>
        <draw:g draw:style-name="gr3" xml:id="id13" draw:id="id13">
          <draw:custom-shape draw:style-name="gr91" draw:text-style-name="P15" draw:layer="layout" svg:width="23.07cm" svg:height="5.893cm" svg:x="2.587cm" svg:y="9.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92" draw:text-style-name="P16" draw:layer="layout" svg:width="1.975cm" svg:height="0.779cm" svg:x="2.587cm" svg:y="9.712cm">
            <text:p text:style-name="P7"><text:span text:style-name="T1">Frame</text:span></text:p>
            <draw:enhanced-geometry svg:viewBox="0 0 21600 21600" draw:type="non-primitve" draw:enhanced-path="M 0 0 L 21600 0 19000 21600 0 21600 0 0 Z N"/>
          </draw:custom-shape>
        </draw:g>
        <draw:connector draw:style-name="gr93" draw:text-style-name="P18" xml:id="id14" draw:id="id14" draw:layer="layout" draw:type="line" svg:x1="13.882cm" svg:y1="4.17cm" svg:x2="13.951cm" svg:y2="7.408cm" draw:start-shape="id12" draw:start-glue-point="6" svg:d="M13882 4170l69 3238" svg:viewBox="0 0 70 3239">
          <text:p text:style-name="P17"><text:span text:style-name="T4"/></text:p>
        </draw:connector>
        <draw:frame draw:style-name="gr11" draw:text-style-name="P12" draw:layer="layout" svg:width="3.492cm" svg:height="0.725cm" svg:x="14.97cm" svg:y="5.753cm">
          <draw:text-box>
            <text:p text:style-name="P19"><text:span text:style-name="T3">shared_queue</text:span></text:p>
          </draw:text-box>
        </draw:frame>
        <draw:connector draw:style-name="gr94" draw:text-style-name="P18" draw:layer="layout" draw:type="line" svg:x1="14.122cm" svg:y1="9.712cm" svg:x2="13.951cm" svg:y2="7.408cm" draw:start-shape="id13" draw:end-shape="id14" draw:end-glue-point="3" svg:d="M14122 9712l-171-2304" svg:viewBox="0 0 172 2305">
          <text:p/>
        </draw:connector>
        <draw:connector draw:style-name="gr95" draw:text-style-name="P18" draw:layer="layout" draw:type="line" svg:x1="7.211cm" svg:y1="11.823cm" svg:x2="7.214cm" svg:y2="10.528cm" draw:start-shape="id15" draw:start-glue-point="14" svg:d="M7211 11823l3-1295" svg:viewBox="0 0 4 1296">
          <text:p/>
        </draw:connector>
        <draw:connector draw:style-name="gr96" draw:text-style-name="P18" draw:layer="layout" draw:type="line" svg:x1="14.226cm" svg:y1="11.844cm" svg:x2="14.149cm" svg:y2="10.556cm" draw:start-shape="id16" draw:start-glue-point="14" svg:d="M14226 11844l-77-1288" svg:viewBox="0 0 78 1289">
          <text:p/>
        </draw:connector>
        <draw:connector draw:style-name="gr97" draw:text-style-name="P18" draw:layer="layout" draw:type="line" svg:x1="20.677cm" svg:y1="11.905cm" svg:x2="20.582cm" svg:y2="10.611cm" draw:start-shape="id17" draw:start-glue-point="0" svg:d="M20677 11905l-95-1294" svg:viewBox="0 0 96 1295">
          <text:p/>
        </draw:connector>
        <draw:frame draw:style-name="gr11" draw:text-style-name="P12" draw:layer="layout" svg:width="3.492cm" svg:height="0.725cm" svg:x="5.763cm" svg:y="9.89cm">
          <draw:text-box>
            <text:p text:style-name="P19"><text:span text:style-name="T3">shared_queue</text:span></text:p>
          </draw:text-box>
        </draw:frame>
        <draw:frame draw:style-name="gr11" draw:text-style-name="P12" draw:layer="layout" svg:width="3.492cm" svg:height="0.725cm" svg:x="12.43cm" svg:y="9.89cm">
          <draw:text-box>
            <text:p text:style-name="P19"><text:span text:style-name="T3">shared_queue</text:span></text:p>
          </draw:text-box>
        </draw:frame>
        <draw:frame draw:style-name="gr11" draw:text-style-name="P12" draw:layer="layout" svg:width="3.492cm" svg:height="0.725cm" svg:x="19.097cm" svg:y="9.89cm">
          <draw:text-box>
            <text:p text:style-name="P19"><text:span text:style-name="T3">shared_queu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Navigation" svg:viewBox="0 0 786 1228" svg:d="M151 1228l-76-25-75-25 318-952 76-226 75 226 317 952-76 25-75 25-162-486v462h-80-79v-464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16:23:47.322558208</meta:creation-date>
    <meta:generator>LibreOffice/24.2.7.2$Linux_X86_64 LibreOffice_project/420$Build-2</meta:generator>
    <dc:date>2026-05-01T18:01:18.678733685</dc:date>
    <meta:editing-duration>PT7H28M40S</meta:editing-duration>
    <meta:editing-cycles>62</meta:editing-cycles>
    <meta:print-date>2026-04-03T16:45:26.431431754</meta:print-date>
    <dc:creator>Henk</dc:creator>
    <meta:document-statistic meta:object-count="147"/>
  </office:meta>
</office:document-meta>
</file>