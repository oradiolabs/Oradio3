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34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216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textarea-horizontal-align="justify" draw:textarea-vertical-align="middle" draw:auto-grow-height="false" fo:min-height="0.45cm" fo:min-width="18.749cm" style:writing-mode="lr-tb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45cm" fo:min-width="18.637cm" style:writing-mode="lr-tb" loext:decorative="false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45cm" fo:min-width="18.874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>
      <style:graphic-properties draw:textarea-horizontal-align="justify" draw:textarea-vertical-align="middle" draw:auto-grow-height="false" fo:min-height="0.45cm" fo:min-width="20.641cm" style:writing-mode="lr-tb" loext:decorative="false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cm" fo:min-width="20.519cm" style:writing-mode="lr-tb" loext:decorative="false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45cm" fo:min-width="20.779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023cm" fo:padding-top="0.151cm" fo:padding-bottom="0.151cm" fo:padding-left="0.276cm" fo:padding-right="0.276cm" loext:decorative="false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9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84cm" fo:min-width="4.0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4.2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1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9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9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1" style:family="graphic" style:parent-style-name="standard">
      <style:graphic-properties draw:textarea-horizontal-align="justify" draw:textarea-vertical-align="middle" draw:auto-grow-height="false" fo:min-height="0.45cm" fo:min-width="19.3cm" style:writing-mode="lr-tb" loext:decorative="false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middle" draw:auto-grow-height="false" fo:min-height="0.45cm" fo:min-width="19.189cm" style:writing-mode="lr-tb" loext:decorative="false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0.45cm" fo:min-width="19.121cm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07cm" fo:padding-top="0.151cm" fo:padding-bottom="0.151cm" fo:padding-left="0.276cm" fo:padding-right="0.276cm" loext:decorative="false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02cm" fo:min-width="5.3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07cm" fo:padding-top="0.151cm" fo:padding-bottom="0.151cm" fo:padding-left="0.276cm" fo:padding-right="0.276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5.40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8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2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1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32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233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3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4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65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66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6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>
      <style:graphic-properties draw:textarea-horizontal-align="justify" draw:textarea-vertical-align="middle" draw:auto-grow-height="false" fo:min-height="0.45cm" fo:min-width="28.075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331cm" fo:min-width="28.658cm" fo:padding-top="0.151cm" fo:padding-bottom="0.151cm" fo:padding-left="0.276cm" fo:padding-right="0.276cm" loext:decorative="false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6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59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5.33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921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89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969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59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5.33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921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7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89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969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37cm" fo:min-width="5.55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6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417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4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6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7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468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1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47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4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4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4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5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506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5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9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5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341cm" fo:padding-top="0.151cm" fo:padding-bottom="0.151cm" fo:padding-left="0.276cm" fo:padding-right="0.276cm" loext:decorative="false"/>
    </style:style>
    <style:style style:name="gr5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5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0" style:family="graphic">
      <style:graphic-properties loext:decorative="false"/>
    </style:style>
    <style:style style:name="gr561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5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5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5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none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fo:font-size="10pt" style:font-size-asian="12pt" style:font-size-complex="12pt"/>
    </style:style>
    <style:style style:name="P34" style:family="paragraph">
      <style:paragraph-properties fo:text-align="start"/>
    </style:style>
    <style:style style:name="P3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start" style:writing-mode="lr-tb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2pt" style:font-size-complex="12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log_servic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log_service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1.8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1.852cm" svg:y="9.282cm">
              <text:p text:style-name="P8"><text:span text:style-name="T3">- 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1.8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135cm" svg:y="11.187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4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4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4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4.5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4.5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4.5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1.825cm" svg:y1="12.777cm" svg:x2="3.851cm" svg:y2="11.061cm" draw:start-shape="id13" draw:start-glue-point="4" draw:end-shape="id14" draw:end-glue-point="8" svg:d="M18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845cm" svg:height="1.153cm" svg:x="22.96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845cm" svg:height="0.711cm" svg:x="22.96cm" svg:y="8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845cm" svg:height="0.993cm" svg:x="22.96cm" svg:y="8.6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2.7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2.7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2.7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3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80" draw:text-style-name="P13" draw:layer="layout" draw:type="line" svg:x1="14.739cm" svg:y1="12.108cm" svg:x2="13.926cm" svg:y2="11.142cm" draw:start-shape="id15" draw:start-glue-point="5" draw:end-shape="id16" draw:end-glue-point="6" svg:d="M14739 12108l-813-966" svg:viewBox="0 0 814 967">
          <text:p/>
        </draw:connector>
        <draw:connector draw:style-name="gr81" draw:text-style-name="P10" draw:layer="layout" svg:x1="12.708cm" svg:y1="12.743cm" svg:x2="8.643cm" svg:y2="11.061cm" draw:start-shape="id15" draw:start-glue-point="6" draw:end-shape="id14" draw:end-glue-point="10" svg:d="M12708 12743h-4065v-1682" svg:viewBox="0 0 4066 1683">
          <text:p/>
        </draw:connector>
        <draw:frame draw:style-name="gr5" draw:text-style-name="P5" draw:layer="layout" svg:width="3.81cm" svg:height="0.725cm" svg:x="8.755cm" svg:y="12.022cm">
          <draw:text-box>
            <text:p><text:span text:style-name="T1">&lt;&lt;consists of&gt;&gt;</text:span></text:p>
          </draw:text-box>
        </draw:frame>
        <draw:connector draw:style-name="gr82" draw:text-style-name="P10" draw:layer="layout" svg:x1="4.576cm" svg:y1="17.918cm" svg:x2="1.825cm" svg:y2="15.899cm" draw:start-shape="id17" draw:start-glue-point="11" draw:end-shape="id13" draw:end-glue-point="7" svg:d="M4576 17918h-2751v-2019" svg:viewBox="0 0 2752 2020">
          <text:p/>
        </draw:connector>
        <draw:frame draw:style-name="gr5" draw:text-style-name="P5" draw:layer="layout" svg:width="3.81cm" svg:height="0.725cm" svg:x="0.817cm" svg:y="17.827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&lt;uses&gt;&gt;</text:span></text:p>
          </draw:text-box>
        </draw:frame>
        <draw:connector draw:style-name="gr87" draw:text-style-name="P10" draw:layer="layout" svg:x1="7.045cm" svg:y1="8.13cm" svg:x2="8.073cm" svg:y2="5.664cm" draw:start-shape="id14" draw:start-glue-point="14" draw:end-shape="id18" draw:end-glue-point="4" svg:d="M7045 8130v-1234h1028v-1232" svg:viewBox="0 0 1029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0.9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0.9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0.9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2.96cm" svg:y1="8.276cm" svg:x2="9.042cm" svg:y2="9.595cm" draw:start-shape="id19" draw:end-shape="id14" draw:end-glue-point="1" svg:d="M22960 8276h-6959v1319h-6959" svg:viewBox="0 0 13919 1320">
          <text:p/>
        </draw:connector>
        <draw:connector draw:style-name="gr93" draw:text-style-name="P10" draw:layer="layout" svg:x1="10.901cm" svg:y1="17.556cm" svg:x2="8.12cm" svg:y2="14.337cm" draw:start-shape="id20" draw:start-glue-point="6" draw:end-shape="id13" draw:end-glue-point="1" svg:d="M10901 17556h-1391v-3219h-1390" svg:viewBox="0 0 2782 3220">
          <text:p/>
        </draw:connector>
        <draw:frame draw:style-name="gr94" draw:text-style-name="P25" draw:layer="layout" svg:width="4.445cm" svg:height="1.039cm" svg:x="9.707cm" svg:y="15.287cm">
          <draw:text-box>
            <text:p><text:span text:style-name="T3">onTimerExpired( </text:span></text:p>
            <text:p><text:span text:style-name="T3">msg_type: HEARTBEAT)</text:span></text:p>
          </draw:text-box>
        </draw:frame>
        <draw:frame draw:style-name="gr5" draw:text-style-name="P26" draw:layer="layout" svg:width="5.715cm" svg:height="0.725cm" svg:x="9.707cm" svg:y="8.847cm">
          <draw:text-box>
            <text:p><text:span text:style-name="T1">returns Queue&lt;message&gt;</text:span></text:p>
          </draw:text-box>
        </draw:frame>
        <draw:connector draw:style-name="gr95" draw:text-style-name="P10" draw:layer="layout" svg:x1="15.021cm" svg:y1="17.948cm" svg:x2="19.61cm" svg:y2="14.816cm" draw:start-shape="id20" draw:start-glue-point="12" draw:end-shape="id15" draw:end-glue-point="10" svg:d="M15021 17948h4589v-3132" svg:viewBox="0 0 4590 3133">
          <text:p/>
        </draw:connector>
        <draw:frame draw:style-name="gr94" draw:text-style-name="P25" draw:layer="layout" svg:width="4.445cm" svg:height="1.039cm" svg:x="15.245cm" svg:y="16.753cm">
          <draw:text-box>
            <text:p><text:span text:style-name="T3">onWIFI_CONNECTED( </text:span></text:p>
            <text:p><text:span text:style-name="T3">msg_type: SYS_INFO)</text:span></text:p>
          </draw:text-box>
        </draw:frame>
        <draw:g draw:style-name="gr6" xml:id="id21" draw:id="id2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96" draw:text-style-name="P19" draw:layer="layout" svg:width="6.35cm" svg:height="1.153cm" svg:x="22.607cm" svg:y="14.3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6.35cm" svg:height="0.711cm" svg:x="22.607cm" svg:y="15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6.35cm" svg:height="0.993cm" svg:x="22.607cm" svg:y="16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0" draw:layer="layout" svg:x1="25.782cm" svg:y1="14.366cm" svg:x2="20.014cm" svg:y2="12.743cm" draw:start-shape="id21" draw:start-glue-point="0" draw:end-shape="id15" draw:end-glue-point="13" svg:d="M25782 14366v-1623h-5768" svg:viewBox="0 0 5769 1624">
          <text:p/>
        </draw:connector>
      </draw:page>
      <draw:page draw:name="Web service" draw:style-name="dp1" draw:master-page-name="Default">
        <draw:custom-shape draw:style-name="gr91" draw:text-style-name="P2" draw:layer="layout" svg:width="0.911cm" svg:height="16.193cm" svg:x="20.939cm" svg:y="2.805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19.249cm" svg:height="0.7cm" svg:x="1.436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draw:layer="layout" svg:width="19.137cm" svg:height="0.7cm" svg:x="1.54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draw:layer="layout" svg:width="19.374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7.51cm" svg:y="9.255cm">
          <draw:text-box>
            <text:p><text:span text:style-name="T1">&lt;&lt;uses&gt;&gt;</text:span></text:p>
          </draw:text-box>
        </draw:frame>
        <draw:custom-shape draw:style-name="gr103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6.985cm" svg:height="1.627cm" svg:x="9.025cm" svg:y="8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6.985cm" svg:height="0.949cm" svg:x="9.025cm" svg:y="9.795cm"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8" draw:layer="layout" svg:width="6.985cm" svg:height="1.781cm" svg:x="9.025cm" svg:y="10.7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state()::[WEB_ACTIVE | WEB_IDLE ]</text:span></text:p>
              <text:p text:style-name="P27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7" draw:text-style-name="P4" draw:layer="layout" svg:width="27.7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8" draw:text-style-name="P7" draw:layer="layout" svg:width="4.763cm" svg:height="1.627cm" svg:x="13.665cm" svg:y="14.1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4.763cm" svg:height="0.473cm" svg:x="13.665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9" draw:layer="layout" svg:width="4.763cm" svg:height="1.781cm" svg:x="13.665cm" svg:y="16.20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11" draw:text-style-name="P7" draw:layer="layout" svg:width="5.602cm" svg:height="1.627cm" svg:x="-3.967cm" svg:y="13.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2" draw:text-style-name="P9" draw:layer="layout" svg:width="5.602cm" svg:height="0.676cm" svg:x="-3.967cm" svg:y="15.327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9" draw:layer="layout" svg:width="5.602cm" svg:height="2.175cm" svg:x="-3.967cm" svg:y="15.99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1.795cm" svg:y="13.065cm">
          <draw:text-box>
            <text:p><text:span text:style-name="T1">&lt;&lt;consists of&gt;&gt;</text:span></text:p>
          </draw:text-box>
        </draw:frame>
        <draw:connector draw:style-name="gr114" draw:text-style-name="P10" draw:layer="layout" svg:x1="17.104cm" svg:y1="14.106cm" svg:x2="15.622cm" svg:y2="12.525cm" draw:start-shape="id22" draw:start-glue-point="14" draw:end-shape="id23" draw:end-glue-point="10" svg:d="M17104 14106v-792h-1482v-789" svg:viewBox="0 0 1483 1582">
          <text:p/>
        </draw:connector>
        <draw:connector draw:style-name="gr115" draw:text-style-name="P10" draw:layer="layout" svg:x1="13.665cm" svg:y1="16.045cm" svg:x2="1.634cm" svg:y2="14.336cm" draw:start-shape="id22" draw:start-glue-point="3" draw:end-shape="id24" draw:end-glue-point="13" svg:d="M13665 16045h-6015v-1709h-6016" svg:viewBox="0 0 12032 1710">
          <text:p/>
        </draw:connector>
        <draw:frame draw:style-name="gr5" draw:text-style-name="P5" draw:layer="layout" svg:width="3.085cm" svg:height="0.725cm" svg:x="2.27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.725cm" svg:y="9.89cm">
          <draw:text-box>
            <text:p><text:span text:style-name="T1">&lt;&lt;uses&gt;&gt;</text:span></text:p>
          </draw:text-box>
        </draw:frame>
        <draw:g draw:style-name="gr6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6" draw:text-style-name="P19" draw:layer="layout" svg:width="8.39cm" svg:height="1.153cm" svg:x="4.0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8.39cm" svg:height="0.784cm" svg:x="4.0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draw:layer="layout" svg:width="8.39cm" svg:height="0.599cm" svg:x="4.0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12" xml:id="id27" draw:id="id27" draw:layer="layout" svg:width="6.667cm" svg:height="1.5cm" svg:x="1cm" svg:y="11.56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20" draw:text-style-name="P10" draw:layer="layout" svg:x1="12.022cm" svg:y1="15.288cm" svg:x2="10.967cm" svg:y2="12.525cm" draw:start-shape="id25" draw:start-glue-point="15" draw:end-shape="id23" draw:end-glue-point="8" svg:d="M12022 15288v-1383h-1055v-1380" svg:viewBox="0 0 1056 2764">
          <text:p/>
        </draw:connector>
        <draw:frame draw:style-name="gr5" draw:text-style-name="P5" draw:layer="layout" svg:width="3.81cm" svg:height="0.725cm" svg:x="3.16cm" svg:y="14.335cm">
          <draw:text-box>
            <text:p><text:span text:style-name="T1">&lt;&lt;consists of&gt;&gt;</text:span></text:p>
          </draw:text-box>
        </draw:frame>
        <draw:connector draw:style-name="gr121" draw:text-style-name="P10" draw:layer="layout" svg:x1="22.055cm" svg:y1="8.514cm" svg:x2="16.009cm" svg:y2="8.804cm" draw:start-shape="id26" draw:end-shape="id23" draw:end-glue-point="13" svg:d="M22055 8514h-3023v290h-3023" svg:viewBox="0 0 6047 291">
          <text:p/>
        </draw:connector>
        <draw:connector draw:style-name="gr122" draw:text-style-name="P13" draw:layer="layout" draw:type="line" svg:x1="7.667cm" svg:y1="12.315cm" svg:x2="6.43cm" svg:y2="15.288cm" draw:start-shape="id27" draw:start-glue-point="7" draw:end-shape="id25" draw:end-glue-point="5" svg:d="M7667 12315l-1237 2973" svg:viewBox="0 0 1238 297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3" draw:text-style-name="P21" draw:layer="layout" svg:width="18.913cm" svg:height="0.679cm" svg:x="1.57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2" draw:layer="layout" svg:width="18.913cm" svg:height="2.101cm" svg:x="1.57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8" draw:id="id2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5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7" draw:text-style-name="P10" draw:layer="layout" draw:line-skew="0.552cm" svg:x1="9.415cm" svg:y1="8.169cm" svg:x2="8.309cm" svg:y2="5.663cm" draw:start-shape="id23" draw:start-glue-point="4" draw:end-shape="id28" draw:end-glue-point="4" svg:d="M9415 8169v-702h-1106v-1804" svg:viewBox="0 0 1107 2507">
          <text:p/>
        </draw:connector>
        <draw:g draw:style-name="gr6" xml:id="id26" draw:id="id2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28" draw:text-style-name="P19" draw:layer="layout" svg:width="6.492cm" svg:height="1.153cm" svg:x="22.055cm" svg:y="7.1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9" draw:layer="layout" svg:width="6.492cm" svg:height="0.711cm" svg:x="22.055cm" svg:y="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9" draw:layer="layout" svg:width="6.492cm" svg:height="0.993cm" svg:x="22.055cm" svg:y="8.8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17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31" draw:text-style-name="P19" draw:layer="layout" svg:width="6.35cm" svg:height="1.153cm" svg:x="22.15cm" svg:y="14.5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layout" svg:width="6.35cm" svg:height="0.711cm" svg:x="22.15cm" svg:y="15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6.35cm" svg:height="0.993cm" svg:x="22.15cm" svg:y="16.2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9" draw:id="id2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34" draw:text-style-name="P19" draw:layer="layout" svg:width="6.492cm" svg:height="1.153cm" svg:x="22.055cm" svg:y="10.3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9" draw:layer="layout" svg:width="6.492cm" svg:height="0.711cm" svg:x="22.055cm" svg:y="11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9" draw:layer="layout" svg:width="6.492cm" svg:height="0.993cm" svg:x="22.055cm" svg:y="12.0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8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7" draw:text-style-name="P10" draw:layer="layout" draw:line-skew="-1.505cm" svg:x1="22.055cm" svg:y1="11.689cm" svg:x2="16.01cm" svg:y2="10.346cm" draw:start-shape="id29" draw:end-shape="id23" draw:end-glue-point="1" svg:d="M22055 11689h-4528v-1343h-1517" svg:viewBox="0 0 6046 1344">
          <text:p/>
        </draw:connector>
        <draw:frame draw:style-name="gr5" draw:text-style-name="P5" draw:layer="layout" svg:width="3.085cm" svg:height="0.725cm" svg:x="16.965cm" svg:y="7.985cm">
          <draw:text-box>
            <text:p><text:span text:style-name="T1">::state()</text:span></text:p>
          </draw:text-box>
        </draw:frame>
        <draw:frame draw:style-name="gr5" draw:text-style-name="P5" draw:layer="layout" svg:width="4.99cm" svg:height="0.725cm" svg:x="16.147cm" svg:y="11.795cm">
          <draw:text-box>
            <text:p><text:span text:style-name="T1">::WEB_ERROR_STOP</text:span></text:p>
          </draw:text-box>
        </draw:frame>
      </draw:page>
      <draw:page draw:name="WiFi" draw:style-name="dp1" draw:master-page-name="Default">
        <draw:custom-shape draw:style-name="gr138" draw:text-style-name="P2" draw:layer="layout" svg:width="21.141cm" svg:height="0.7cm" svg:x="1.44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" draw:layer="layout" svg:width="21.019cm" svg:height="0.7cm" svg:x="1.57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" draw:layer="layout" svg:width="21.279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505cm" svg:y="7.26cm">
          <draw:text-box>
            <text:p><text:span text:style-name="T1">&lt;&lt;uses&gt;&gt;</text:span></text:p>
          </draw:text-box>
        </draw:frame>
        <draw:custom-shape draw:style-name="gr141" draw:text-style-name="P3" draw:layer="layout" svg:width="28.57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5.047cm" svg:y="2.399cm"/>
          <draw:g draw:style-name="gr6">
            <draw:custom-shape draw:style-name="gr142" draw:text-style-name="P7" draw:layer="layout" svg:width="5.654cm" svg:height="1.627cm" svg:x="12.648cm" svg:y="7.4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9" draw:layer="layout" svg:width="5.654cm" svg:height="0.478cm" svg:x="12.648cm" svg:y="9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8" draw:layer="layout" svg:width="5.654cm" svg:height="1.781cm" svg:x="12.648cm" svg:y="9.5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5" draw:text-style-name="P4" draw:layer="layout" svg:width="28.575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6.08cm" svg:y="15.415cm">
          <draw:text-box>
            <text:p><text:span text:style-name="T1">&lt;&lt;consists of&gt;&gt;</text:span></text:p>
          </draw:text-box>
        </draw:frame>
        <draw:connector draw:style-name="gr146" draw:text-style-name="P10" draw:layer="layout" svg:x1="14.835cm" svg:y1="16.33cm" svg:x2="11.354cm" svg:y2="15.317cm" draw:end-shape="id30" draw:end-glue-point="9" svg:d="M14835 16330v-243h-3481v-770" svg:viewBox="0 0 3482 1014">
          <text:p/>
        </draw:connector>
        <draw:g draw:style-name="gr6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7" draw:text-style-name="P7" draw:layer="layout" svg:width="4.775cm" svg:height="1.627cm" svg:x="13.74cm" svg:y="12.7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9" draw:layer="layout" svg:width="4.775cm" svg:height="0.779cm" svg:x="13.74cm" svg:y="14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9" draw:layer="layout" svg:width="4.775cm" svg:height="0.599cm" svg:x="13.74cm" svg:y="15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18.462cm" svg:y="12.43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4.425cm" svg:y="12.112cm">
          <draw:text-box>
            <text:p><text:span text:style-name="T1">&lt;&lt;uses&gt;&gt;</text:span></text:p>
          </draw:text-box>
        </draw:frame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 draw:style-name="gr6">
            <draw:custom-shape draw:style-name="gr150" draw:text-style-name="P19" draw:layer="layout" svg:width="4.47cm" svg:height="1.153cm" svg:x="1.717cm" svg:y="13.06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static&gt;&gt;</text:span></text:p>
              <text:p text:style-name="P18"><text:span text:style-name="T2">Wifi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4.47cm" svg:height="0.593cm" svg:x="1.717cm" svg:y="14.218cm">
              <text:p text:style-name="P8"><text:span text:style-name="T3"><text:s/>- wifi_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30" draw:layer="layout" svg:width="4.47cm" svg:height="0.599cm" svg:x="1.717cm" svg:y="14.7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9"><text:span text:style-name="T3">+ get_active_ssids()::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3" draw:text-style-name="P7" draw:layer="layout" svg:width="7.072cm" svg:height="1.153cm" svg:x="2.0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9" draw:layer="layout" svg:width="7.072cm" svg:height="0.486cm" svg:x="2.0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9" draw:layer="layout" svg:width="7.072cm" svg:height="0.373cm" svg:x="2.0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6" draw:text-style-name="P7" draw:layer="layout" svg:width="7.072cm" svg:height="1.153cm" svg:x="9.6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9" draw:layer="layout" svg:width="7.072cm" svg:height="0.448cm" svg:x="9.6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9" draw:layer="layout" svg:width="7.072cm" svg:height="0.345cm" svg:x="9.6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9" draw:text-style-name="P7" draw:layer="layout" svg:width="4.665cm" svg:height="1.153cm" svg:x="7.985cm" svg:y="13.1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9" draw:layer="layout" svg:width="4.665cm" svg:height="0.553cm" svg:x="7.985cm" svg:y="14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9" draw:layer="layout" svg:width="4.665cm" svg:height="0.425cm" svg:x="7.985cm" svg:y="14.8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2" draw:text-style-name="P10" draw:layer="layout" svg:x1="8.687cm" svg:y1="16.281cm" svg:x2="9.282cm" svg:y2="15.317cm" draw:end-shape="id30" draw:end-glue-point="8" svg:d="M8687 16281v-219h595v-745" svg:viewBox="0 0 596 965">
          <text:p/>
        </draw:connector>
        <draw:connector draw:style-name="gr163" draw:text-style-name="P10" draw:layer="layout" svg:x1="12.649cm" svg:y1="13.918cm" svg:x2="13.741cm" svg:y2="13.378cm" draw:start-shape="id30" draw:start-glue-point="16" draw:end-shape="id31" draw:end-glue-point="6" svg:d="M12649 13918h545v-540h547" svg:viewBox="0 0 1093 541">
          <text:p/>
        </draw:connector>
        <draw:connector draw:style-name="gr164" draw:text-style-name="P10" draw:layer="layout" svg:x1="17.188cm" svg:y1="12.743cm" svg:x2="15.475cm" svg:y2="11.336cm" draw:start-shape="id31" draw:start-glue-point="14" draw:end-shape="id32" draw:end-glue-point="2" svg:d="M17188 12743v-705h-1713v-702" svg:viewBox="0 0 1714 1408">
          <text:p/>
        </draw:connector>
        <draw:custom-shape draw:style-name="gr165" draw:text-style-name="P12" xml:id="id33" draw:id="id33" draw:layer="layout" svg:width="7.703cm" svg:height="1.905cm" svg:x="20.685cm" svg:y="21.95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66" draw:text-style-name="P13" draw:layer="layout" draw:type="line" svg:x1="15.454cm" svg:y1="23.031cm" svg:x2="24.536cm" svg:y2="23.86cm" draw:end-shape="id33" draw:end-glue-point="2" svg:d="M15454 23031l9082 829" svg:viewBox="0 0 9083 830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67" draw:text-style-name="P21" draw:layer="layout" svg:width="20.809cm" svg:height="0.679cm" svg:x="1.583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2" draw:layer="layout" svg:width="20.809cm" svg:height="2.101cm" svg:x="1.583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4" draw:id="id3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9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1" draw:text-style-name="P10" draw:layer="layout" draw:line-skew="-0.158cm" svg:x1="16.731cm" svg:y1="7.451cm" svg:x2="13.575cm" svg:y2="5.662cm" draw:start-shape="id32" draw:start-glue-point="14" draw:end-shape="id34" draw:end-glue-point="7" svg:d="M16731 7451v-1054h-3156v-735" svg:viewBox="0 0 3157 1790">
          <text:p/>
        </draw:connector>
        <draw:custom-shape draw:style-name="gr91" draw:text-style-name="P2" draw:layer="layout" svg:width="0.911cm" svg:height="16.193cm" svg:x="22.749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5" draw:id="id3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72" draw:text-style-name="P19" draw:layer="layout" svg:width="5.347cm" svg:height="1.153cm" svg:x="24.053cm" svg:y="6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9" draw:layer="layout" svg:width="5.347cm" svg:height="0.656cm" svg:x="24.053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9" draw:layer="layout" svg:width="5.347cm" svg:height="0.993cm" svg:x="24.053cm" svg:y="8.4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75" draw:text-style-name="P19" draw:layer="layout" svg:width="4.762cm" svg:height="1.153cm" svg:x="23.995cm" svg:y="14.3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9" draw:layer="layout" svg:width="4.762cm" svg:height="0.711cm" svg:x="23.995cm" svg:y="15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9" draw:layer="layout" svg:width="4.762cm" svg:height="1.387cm" svg:x="23.995cm" svg:y="16.0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</text:span></text:p>
            <text:p text:style-name="P8"><text:span text:style-name="T3"><text:s text:c="2"/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6" draw:id="id3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178" draw:text-style-name="P19" draw:layer="layout" svg:width="5.205cm" svg:height="1.153cm" svg:x="24.095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9" draw:layer="layout" svg:width="5.205cm" svg:height="0.711cm" svg:x="24.095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9" draw:layer="layout" svg:width="5.205cm" svg:height="0.993cm" svg:x="24.095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1" draw:text-style-name="P10" draw:layer="layout" svg:x1="24.053cm" svg:y1="8.067cm" svg:x2="18.301cm" svg:y2="8.086cm" draw:start-shape="id35" draw:end-shape="id32" draw:end-glue-point="13" svg:d="M24053 8067h-2876v19h-2876" svg:viewBox="0 0 5753 20">
          <text:p/>
        </draw:connector>
        <draw:frame draw:style-name="gr182" draw:text-style-name="P31" draw:layer="layout" svg:width="4.128cm" svg:height="1.588cm" svg:x="18.462cm" svg:y="8.102cm">
          <draw:text-box>
            <text:p><text:span text:style-name="T5">::[ WIFI_ACCESS_POINT | </text:span></text:p>
            <text:p><text:span text:style-name="T5">WIFI_CONNECTED |</text:span></text:p>
            <text:p><text:span text:style-name="T5">WIFI_DISCONNECTED | </text:span></text:p>
            <text:p><text:span text:style-name="T5">get_state() ]</text:span></text:p>
          </draw:text-box>
        </draw:frame>
        <draw:connector draw:style-name="gr183" draw:text-style-name="P10" draw:layer="layout" svg:x1="24.095cm" svg:y1="10.526cm" svg:x2="18.302cm" svg:y2="10.325cm" draw:start-shape="id36" draw:start-glue-point="9" draw:end-shape="id32" draw:end-glue-point="23" svg:d="M24095 10526h-2897v-201h-2896" svg:viewBox="0 0 5794 202">
          <text:p/>
        </draw:connector>
        <draw:connector draw:style-name="gr184" draw:text-style-name="P10" draw:layer="layout" draw:line-skew="0.618cm" svg:x1="24.095cm" svg:y1="11.371cm" svg:x2="12.029cm" svg:y2="11.811cm" draw:start-shape="id36" draw:start-glue-point="3" draw:end-shape="id37" draw:end-glue-point="8" svg:d="M24095 11371h-5415v440h-6651" svg:viewBox="0 0 12067 441">
          <text:p/>
        </draw:connector>
        <draw:g draw:style-name="gr6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5cm" svg:y="4.022cm"/>
          <draw:custom-shape draw:style-name="gr185" draw:text-style-name="P19" draw:layer="layout" svg:width="8.355cm" svg:height="1.153cm" svg:x="3.675cm" svg:y="8.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wifi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9" draw:layer="layout" svg:width="8.355cm" svg:height="0.435cm" svg:x="3.67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30" draw:layer="layout" svg:width="8.355cm" svg:height="2.569cm" svg:x="3.675cm" svg:y="9.6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9"><text:span text:style-name="T3">+ get_saved_network():: str</text:span></text:p>
            <text:p text:style-name="P29"><text:span text:style-name="T3">+ get_wifi_networks():: list</text:span></text:p>
            <text:p text:style-name="P29"><text:span text:style-name="T3">+ get_wifi_connection():: str</text:span></text:p>
            <text:p text:style-name="P29"><text:span text:style-name="T3">+ get_wifi_password(network):: str</text:span></text:p>
            <text:p text:style-name="P29"><text:span text:style-name="T3">+ networkmanager_list():: list</text:span></text:p>
            <text:p text:style-name="P29"><text:span text:style-name="T3">+ networkmanager_add(network,passwprd):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8" draw:text-style-name="P31" draw:layer="layout" svg:width="4.128cm" svg:height="0.953cm" svg:x="18.462cm" svg:y="14.335cm">
          <draw:text-box>
            <text:p><text:span text:style-name="T5">::[ WIFI_ERROR_DBUS | </text:span></text:p>
            <text:p><text:span text:style-name="T5">WIFI_ERROR_CONNECT</text:span></text:p>
          </draw:text-box>
        </draw:frame>
        <draw:frame draw:style-name="gr189" draw:text-style-name="P31" draw:layer="layout" svg:width="4.763cm" svg:height="0.635cm" svg:x="18.144cm" svg:y="10.525cm">
          <draw:text-box>
            <text:p><text:span text:style-name="T5">::[WIFI_ERROR_DISCONNECT]</text:span></text:p>
          </draw:text-box>
        </draw:frame>
        <draw:connector draw:style-name="gr190" draw:text-style-name="P10" draw:layer="layout" svg:x1="24.095cm" svg:y1="12.429cm" svg:x2="18.502cm" svg:y2="14.183cm" draw:start-shape="id36" draw:start-glue-point="10" svg:d="M24095 12429h-3060v1754h-2533" svg:viewBox="0 0 5594 1755">
          <text:p/>
        </draw:connector>
        <draw:frame draw:style-name="gr189" draw:text-style-name="P31" draw:layer="layout" svg:width="3.811cm" svg:height="0.635cm" svg:x="18.78cm" svg:y="11.477cm">
          <draw:text-box>
            <text:p><text:span text:style-name="T5">::[WIFI_ERROR_NMCLI]</text:span></text:p>
          </draw:text-box>
        </draw:frame>
      </draw:page>
      <draw:page draw:name="USB" draw:style-name="dp1" draw:master-page-name="Default">
        <draw:custom-shape draw:style-name="gr191" draw:text-style-name="P2" draw:layer="layout" svg:width="19.8cm" svg:height="0.7cm" svg:x="1.46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" draw:layer="layout" svg:width="19.689cm" svg:height="0.7cm" svg:x="1.573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" draw:layer="layout" svg:width="19.621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725cm" svg:y="13.292cm">
          <draw:text-box>
            <text:p><text:span text:style-name="T1">&lt;&lt;uses&gt;&gt;</text:span></text:p>
          </draw:text-box>
        </draw:frame>
        <draw:custom-shape draw:style-name="gr194" draw:text-style-name="P3" draw:layer="layout" svg:width="27.62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5" draw:text-style-name="P7" draw:layer="layout" svg:width="5.828cm" svg:height="1.153cm" svg:x="10.412cm" svg:y="8.6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9" draw:layer="layout" svg:width="5.828cm" svg:height="0.711cm" svg:x="10.412cm" svg:y="9.77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9" draw:layer="layout" svg:width="5.828cm" svg:height="0.993cm" svg:x="10.412cm" svg:y="10.48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98" draw:text-style-name="P4" draw:layer="layout" svg:width="27.622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99" draw:text-style-name="P7" draw:layer="layout" svg:width="5.448cm" svg:height="1.153cm" svg:x="5.149cm" svg:y="12.4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0" draw:text-style-name="P9" draw:layer="layout" svg:width="5.448cm" svg:height="0.692cm" svg:x="5.149cm" svg:y="13.5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1" draw:text-style-name="P9" draw:layer="layout" svg:width="5.448cm" svg:height="0.993cm" svg:x="5.149cm" svg:y="14.2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2" draw:text-style-name="P7" draw:layer="layout" svg:width="5.858cm" svg:height="1.153cm" svg:x="3.4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9" draw:layer="layout" svg:width="5.858cm" svg:height="0.366cm" svg:x="3.4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5.858cm" svg:height="0.993cm" svg:x="3.4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5" draw:text-style-name="P23" draw:layer="layout" svg:width="4.41cm" svg:height="1.627cm" svg:x="13.11cm" svg:y="13.6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32"><text:span text:style-name="T2">watchdog.observers.</text:span></text:p>
              <text:p text:style-name="P32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9" draw:layer="layout" svg:width="4.41cm" svg:height="0.599cm" svg:x="13.11cm" svg:y="15.2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9" draw:layer="layout" svg:width="4.41cm" svg:height="0.993cm" svg:x="13.11cm" svg:y="15.8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08" draw:text-style-name="P5" draw:layer="layout" svg:width="2.223cm" svg:height="0.862cm" svg:x="10.207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2.112cm" svg:y="11.795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9" draw:text-style-name="P21" draw:layer="layout" svg:width="19.745cm" svg:height="0.679cm" svg:x="1.575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2" draw:layer="layout" svg:width="19.745cm" svg:height="2.101cm" svg:x="1.575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9" draw:id="id3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1" draw:text-style-name="P23" draw:layer="layout" svg:width="8.002cm" svg:height="0.679cm" svg:x="7.5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24" draw:layer="layout" svg:width="8.002cm" svg:height="0.679cm" svg:x="7.5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3" draw:text-style-name="P10" draw:layer="layout" draw:line-skew="0.697cm" svg:x1="12.033cm" svg:y1="8.622cm" svg:x2="10.729cm" svg:y2="5.867cm" draw:start-shape="id38" draw:start-glue-point="5" draw:end-shape="id39" draw:end-glue-point="5" svg:d="M12033 8622v-682h-1304v-2073" svg:viewBox="0 0 1305 2756">
          <text:p/>
        </draw:connector>
        <draw:g draw:style-name="gr6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14" draw:text-style-name="P7" draw:layer="layout" svg:width="5.397cm" svg:height="1.153cm" svg:x="1.635cm" svg:y="9.21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9" draw:layer="layout" svg:width="5.397cm" svg:height="0.434cm" svg:x="1.635cm" svg:y="10.3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9" draw:layer="layout" svg:width="5.397cm" svg:height="0.993cm" svg:x="1.635cm" svg:y="10.8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7" draw:text-style-name="P10" draw:layer="layout" svg:x1="1.936cm" svg:y1="11.795cm" svg:x2="5.149cm" svg:y2="13.034cm" draw:start-shape="id40" draw:start-glue-point="7" draw:end-shape="id41" draw:end-glue-point="21" svg:d="M1936 11795v1239h3213" svg:viewBox="0 0 3214 1240">
          <text:p/>
        </draw:connector>
        <draw:frame draw:style-name="gr5" draw:text-style-name="P5" draw:layer="layout" svg:width="3.81cm" svg:height="0.725cm" svg:x="12.112cm" svg:y="12.657cm">
          <draw:text-box>
            <text:p><text:span text:style-name="T1">&lt;&lt;schedules&gt;&gt;</text:span></text:p>
          </draw:text-box>
        </draw:frame>
        <draw:connector draw:style-name="gr218" draw:text-style-name="P10" draw:layer="layout" svg:x1="16.295cm" svg:y1="13.639cm" svg:x2="12.033cm" svg:y2="11.478cm" draw:start-shape="id42" draw:start-glue-point="14" draw:end-shape="id38" draw:end-glue-point="8" svg:d="M16295 13639v-1082h-4262v-1079" svg:viewBox="0 0 4263 2162">
          <text:p/>
        </draw:connector>
        <draw:connector draw:style-name="gr219" draw:text-style-name="P10" draw:layer="layout" svg:x1="10.596cm" svg:y1="14.699cm" svg:x2="13.111cm" svg:y2="14.274cm" draw:start-shape="id41" draw:start-glue-point="12" draw:end-shape="id42" draw:end-glue-point="6" svg:d="M10596 14699h1258v-425h1257" svg:viewBox="0 0 2516 426">
          <text:p/>
        </draw:connector>
        <draw:frame draw:style-name="gr5" draw:text-style-name="P5" draw:layer="layout" svg:width="2.857cm" svg:height="0.725cm" svg:x="10.525cm" svg:y="13.61cm">
          <draw:text-box>
            <text:p><text:span text:style-name="T1">&lt;&lt;uses&gt;&gt;</text:span></text:p>
          </draw:text-box>
        </draw:frame>
        <draw:connector draw:style-name="gr220" draw:text-style-name="P10" draw:layer="layout" svg:x1="10.295cm" svg:y1="15.243cm" svg:x2="9.299cm" svg:y2="16.458cm" draw:start-shape="id41" draw:start-glue-point="10" draw:end-shape="id43" draw:end-glue-point="13" svg:d="M10295 15243v1215h-996" svg:viewBox="0 0 997 1216">
          <text:p/>
        </draw:connector>
        <draw:frame draw:style-name="gr5" draw:text-style-name="P5" draw:layer="layout" svg:width="3.085cm" svg:height="0.725cm" svg:x="13.932cm" svg:y="7.577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1.662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5" draw:id="id4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221" draw:text-style-name="P19" draw:layer="layout" svg:width="5.347cm" svg:height="1.153cm" svg:x="22.90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9" draw:layer="layout" svg:width="5.347cm" svg:height="0.656cm" svg:x="22.907cm" svg:y="1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9" draw:layer="layout" svg:width="5.347cm" svg:height="0.993cm" svg:x="22.907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4" draw:id="id44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224" draw:text-style-name="P19" draw:layer="layout" svg:width="5.205cm" svg:height="1.153cm" svg:x="23.008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9" draw:layer="layout" svg:width="5.205cm" svg:height="0.711cm" svg:x="23.008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9" draw:layer="layout" svg:width="5.205cm" svg:height="0.993cm" svg:x="23.008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7" draw:text-style-name="P10" draw:layer="layout" svg:x1="23.008cm" svg:y1="10.526cm" svg:x2="16.24cm" svg:y2="10.049cm" draw:start-shape="id44" draw:start-glue-point="9" draw:end-shape="id38" draw:end-glue-point="1" svg:d="M23008 10526h-3384v-477h-3384" svg:viewBox="0 0 6769 478">
          <text:p/>
        </draw:connector>
        <draw:frame draw:style-name="gr228" draw:text-style-name="P33" draw:layer="layout" svg:width="4.99cm" svg:height="0.645cm" svg:x="16.557cm" svg:y="9.237cm">
          <draw:text-box>
            <text:p><text:span text:style-name="T6">::USB_ERROR_SERVICE</text:span></text:p>
          </draw:text-box>
        </draw:frame>
        <draw:connector draw:style-name="gr229" draw:text-style-name="P10" draw:layer="layout" draw:line-skew="1.056cm" svg:x1="23.008cm" svg:y1="12.429cm" svg:x2="17.519cm" svg:y2="14.274cm" draw:start-shape="id44" draw:start-glue-point="10" draw:end-shape="id42" draw:end-glue-point="13" svg:d="M23008 12429h-1688v1845h-3801" svg:viewBox="0 0 5490 1846">
          <text:p/>
        </draw:connector>
        <draw:frame draw:style-name="gr228" draw:text-style-name="P33" draw:layer="layout" svg:width="4.037cm" svg:height="0.645cm" svg:x="17.483cm" svg:y="13.382cm">
          <draw:text-box>
            <text:p><text:span text:style-name="T6">::USB_ERROR_FILE</text:span></text:p>
          </draw:text-box>
        </draw:frame>
        <draw:connector draw:style-name="gr230" draw:text-style-name="P10" draw:layer="layout" svg:x1="22.907cm" svg:y1="16.639cm" svg:x2="17.519cm" svg:y2="16.313cm" draw:start-shape="id45" draw:end-shape="id42" draw:end-glue-point="12" svg:d="M22907 16639h-2694v-326h-2694" svg:viewBox="0 0 5389 327">
          <text:p/>
        </draw:connector>
        <draw:frame draw:style-name="gr231" draw:text-style-name="P33" draw:layer="layout" svg:width="4.037cm" svg:height="1.039cm" svg:x="17.6cm" svg:y="15.201cm">
          <draw:text-box>
            <text:p><text:span text:style-name="T6">::[USB_PRESENT |</text:span></text:p>
            <text:p><text:span text:style-name="T6">USB_ABSENT ]</text:span></text:p>
          </draw:text-box>
        </draw:frame>
      </draw:page>
      <draw:page draw:name="Volume" draw:style-name="dp1" draw:master-page-name="Default">
        <draw:custom-shape draw:style-name="gr232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draw:layer="layout" svg:width="23.819cm" svg:height="0.7cm" svg:x="1.311cm" svg:y="17cm">
          <text:p text:style-name="P34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235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7" draw:id="id4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6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36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7">+ set_notify()</text:span></text:p>
              <text:p text:style-name="P35"><text:span text:style-name="T7">+ start()</text:span></text:p>
              <text:p text:style-name="P35"><text:span text:style-name="T7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9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40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3" draw:text-style-name="P10" draw:layer="layout" svg:x1="22.449cm" svg:y1="8.906cm" svg:x2="13.941cm" svg:y2="8.247cm" draw:start-shape="id46" draw:start-glue-point="14" draw:end-shape="id47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44" draw:text-style-name="P37" draw:layer="layout" svg:width="7.937cm" svg:height="1.673cm" svg:x="2.587cm" svg:y="18.145cm">
          <draw:text-box>
            <text:p><text:span text:style-name="T10">Waarom start(), stop(), set_notify(). Staat altijd op notify. Dus notify default aan. Gaat nooit gestopt 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5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8" draw:id="id4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7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9" draw:text-style-name="P10" draw:layer="layout" draw:line-skew="0.457cm" svg:x1="9.115cm" svg:y1="7.612cm" svg:x2="7.552cm" svg:y2="5.566cm" draw:start-shape="id47" draw:start-glue-point="5" draw:end-shape="id48" draw:end-glue-point="4" svg:d="M9115 7612v-567h-1563v-1479" svg:viewBox="0 0 1564 2047">
          <text:p/>
        </draw:connector>
        <draw:g draw:style-name="gr6" xml:id="id49" draw:id="id4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50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3" draw:text-style-name="P10" draw:layer="layout" svg:x1="11.841cm" svg:y1="12.932cm" svg:x2="13.571cm" svg:y2="10.916cm" draw:start-shape="id49" draw:start-glue-point="0" draw:end-shape="id47" draw:end-glue-point="10" svg:d="M11841 12932v-1009h1730v-1007" svg:viewBox="0 0 1731 2017">
          <text:p/>
        </draw:connector>
        <draw:g draw:style-name="gr6" xml:id="id50" draw:id="id5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54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7" draw:text-style-name="P10" draw:layer="layout" svg:x1="5.288cm" svg:y1="11.412cm" svg:x2="7.257cm" svg:y2="10.372cm" draw:start-shape="id50" draw:start-glue-point="0" draw:end-shape="id47" draw:end-glue-point="11" svg:d="M5288 11412v-1040h1969" svg:viewBox="0 0 1970 1041">
          <text:p/>
        </draw:connector>
        <draw:custom-shape draw:style-name="gr258" draw:text-style-name="P12" xml:id="id51" draw:id="id51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259" draw:text-style-name="P13" draw:layer="layout" draw:type="line" svg:x1="14.11cm" svg:y1="14.427cm" svg:x2="16.24cm" svg:y2="15.281cm" draw:start-shape="id49" draw:end-shape="id51" draw:end-glue-point="5" svg:d="M14110 14427l2130 854" svg:viewBox="0 0 2131 855">
          <text:p/>
        </draw:connector>
        <draw:g draw:style-name="gr6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0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3" draw:text-style-name="P10" draw:layer="layout" svg:x1="15.358cm" svg:y1="18.188cm" svg:x2="13.941cm" svg:y2="10.372cm" draw:start-shape="id52" draw:start-glue-point="5" draw:end-shape="id47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64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267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8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9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0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71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3" draw:id="id53">
          <draw:glue-point draw:id="4" svg:x="-4cm" svg:y="-5cm"/>
          <draw:custom-shape draw:style-name="gr272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5" draw:text-style-name="P10" draw:layer="layout" svg:x1="13.989cm" svg:y1="14cm" svg:x2="11.881cm" svg:y2="12.492cm" draw:start-shape="id53" draw:end-shape="id54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54" draw:id="id5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76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8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9" draw:text-style-name="P10" draw:layer="layout" svg:x1="10.712cm" svg:y1="11.105cm" svg:x2="7.984cm" svg:y2="9.547cm" draw:start-shape="id54" draw:end-shape="id55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80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1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6" draw:id="id5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2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4" draw:text-style-name="P10" draw:layer="layout" draw:line-skew="0.409cm" svg:x1="3.488cm" svg:y1="8.912cm" svg:x2="7.159cm" svg:y2="5.606cm" draw:start-shape="id55" draw:start-glue-point="5" draw:end-shape="id56" draw:end-glue-point="4" svg:d="M3488 8912v-1245h3671v-2061" svg:viewBox="0 0 3672 3307">
          <text:p/>
        </draw:connector>
      </draw:page>
      <draw:page draw:name="Messaging Commands" draw:style-name="dp1" draw:master-page-name="Default">
        <draw:custom-shape draw:style-name="gr285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21" draw:layer="layout" svg:width="28.083cm" svg:height="0.679cm" svg:x="0.617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22" draw:layer="layout" svg:width="28.323cm" svg:height="3.049cm" svg:x="0.617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draw:glue-point draw:id="10" svg:x="4.245cm" svg:y="5.086cm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1.57cm" svg:y="3.767cm">
          <draw:text-box>
            <text:p><text:span text:style-name="T1">&lt;&lt;uses&gt;&gt;</text:span></text:p>
          </draw:text-box>
        </draw:frame>
        <draw:custom-shape draw:style-name="gr288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89" draw:text-style-name="P7" draw:layer="layout" svg:width="7.19cm" svg:height="1.153cm" svg:x="20.162cm" svg:y="8.611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0" draw:text-style-name="P9" draw:layer="layout" svg:width="7.19cm" svg:height="1.379cm" svg:x="20.162cm" svg:y="9.764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1" draw:text-style-name="P9" draw:layer="layout" svg:width="7.19cm" svg:height="1.387cm" svg:x="20.162cm" svg:y="11.043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</text:span></text:p>
                <text:p text:style-name="P8"><text:span text:style-name="T3"><text:s text:c="7"/>CommandMessage | ErrorMessage</text:span></text:p>
                <text:p text:style-name="P8"><text:span text:style-name="T3">+ safe_put(queue:Queue, message:objec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292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3" draw:text-style-name="P7" draw:layer="layout" svg:width="4.128cm" svg:height="1.627cm" svg:x="9.632cm" svg:y="14.0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9" draw:layer="layout" svg:width="4.128cm" svg:height="1.494cm" svg:x="9.632cm" svg:y="15.69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9" draw:layer="layout" svg:width="4.128cm" svg:height="0.599cm" svg:x="9.632cm" svg:y="17.1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6" draw:text-style-name="P39" draw:layer="layout" svg:width="7.62cm" svg:height="0.841cm" svg:x="20.05cm" svg:y="13.3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PubSubManager</text:span></text:p>
              <text:p text:style-name="P38"><text:span text:style-name="T11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41" draw:layer="layout" svg:width="7.62cm" svg:height="1.468cm" svg:x="20.05cm" svg:y="14.223cm">
              <text:p text:style-name="P40"><text:span text:style-name="T11">- Topic.COMMAND: []</text:span></text:p>
              <text:p text:style-name="P40"><text:span text:style-name="T11">- Topic.ERROR: []</text:span></text:p>
              <text:p text:style-name="P40"><text:span text:style-name="T11">- queue: Queue()</text:span></text:p>
              <text:p text:style-name="P40"><text:span text:style-name="T11">- subscribers:</text:span><text:span text:style-name="T3"> </text:span><text:span text:style-name="T11">dict[Topic,list[tuple[Queue,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43" draw:layer="layout" svg:width="7.62cm" svg:height="1.477cm" svg:x="20.05cm" svg:y="15.6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42"><text:span text:style-name="T11">+ subscribe(topic: Topic, sources: tuple[str,...]::Queue</text:span></text:p>
              <text:p text:style-name="P42"><text:span text:style-name="T11">+ unsubscripe(topic: Topic, queue:Queue)</text:span></text:p>
              <text:p text:style-name="P42"><text:span text:style-name="T11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9" draw:text-style-name="P7" draw:layer="layout" svg:width="3.81cm" svg:height="1.153cm" svg:x="14.277cm" svg:y="14.84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9" draw:layer="layout" svg:width="3.81cm" svg:height="0.994cm" svg:x="14.277cm" svg:y="15.999cm">
              <text:p text:style-name="P8"><text:span text:style-name="T3">+ COMMAND</text:span></text:p>
              <text:p text:style-name="P8"><text:span text:style-name="T3">+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9" draw:layer="layout" svg:width="3.81cm" svg:height="0.599cm" svg:x="14.277cm" svg:y="16.9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02" draw:text-style-name="P44" draw:layer="layout" svg:x1="27.669cm" svg:y1="18.247cm" svg:x2="27.669cm" svg:y2="16.624cm" draw:start-shape="id57" draw:start-glue-point="13" draw:end-shape="id58" draw:end-glue-point="12" svg:d="M27669 18247h528v-1623h-528" svg:viewBox="0 0 529 1624">
          <text:p/>
        </draw:connector>
        <draw:frame draw:style-name="gr5" draw:text-style-name="P33" draw:layer="layout" svg:width="2.54cm" svg:height="0.725cm" svg:x="11.477cm" svg:y="18.372cm">
          <draw:text-box>
            <text:p><text:span text:style-name="T6">&lt;&lt;has&gt;&gt;</text:span></text:p>
          </draw:text-box>
        </draw:frame>
        <draw:connector draw:style-name="gr303" draw:text-style-name="P44" draw:layer="layout" svg:x1="14.49cm" svg:y1="14.847cm" svg:x2="15.129cm" svg:y2="12.552cm" draw:start-shape="id59" draw:start-glue-point="4" draw:end-shape="id60" draw:end-glue-point="9" svg:d="M14490 14847v-1149h639v-1146" svg:viewBox="0 0 640 2296">
          <text:p/>
        </draw:connector>
        <draw:connector draw:style-name="gr304" draw:text-style-name="P44" draw:layer="layout" svg:x1="10.78cm" svg:y1="14.073cm" svg:x2="12.027cm" svg:y2="12.552cm" draw:start-shape="id61" draw:start-glue-point="5" draw:end-shape="id60" draw:end-glue-point="8" svg:d="M10780 14073v-762h1247v-759" svg:viewBox="0 0 1248 1522">
          <text:p/>
        </draw:connector>
        <draw:g draw:style-name="gr6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g draw:style-name="gr6">
            <draw:custom-shape draw:style-name="gr305" draw:text-style-name="P19" draw:layer="layout" svg:width="5.793cm" svg:height="1.153cm" svg:x="21.992cm" svg:y="4.35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thread&gt;&gt;</text:span></text:p>
              <text:p text:style-name="P18"><text:span text:style-name="T2">subscription_liste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9" draw:layer="layout" svg:width="5.793cm" svg:height="0.56cm" svg:x="21.992cm" svg:y="5.504cm">
              <text:p text:style-name="P8"><text:span text:style-name="T3">- queue: Commands.subscrib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7" draw:text-style-name="P9" draw:layer="layout" svg:width="5.793cm" svg:height="0.504cm" svg:x="21.992cm" svg:y="6.0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3" draw:id="id6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8" draw:text-style-name="P23" draw:layer="layout" svg:width="8.27cm" svg:height="0.679cm" svg:x="13.06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24" draw:layer="layout" svg:width="8.27cm" svg:height="0.679cm" svg:x="13.06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0" draw:text-style-name="P10" draw:layer="layout" svg:x1="21.993cm" svg:y1="6.024cm" svg:x2="19.681cm" svg:y2="5.35cm" draw:start-shape="id62" draw:start-glue-point="11" draw:end-shape="id63" draw:end-glue-point="7" svg:d="M21993 6024h-2312v-674" svg:viewBox="0 0 2313 675">
          <text:p/>
        </draw:connector>
        <draw:custom-shape draw:style-name="gr311" draw:text-style-name="P12" xml:id="id64" draw:id="id64" draw:layer="layout" svg:width="5.158cm" svg:height="2.572cm" svg:x="30.21cm" svg:y="-0.27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12" draw:text-style-name="P13" draw:layer="layout" draw:type="line" svg:x1="27.784cm" svg:y1="6.024cm" svg:x2="30.21cm" svg:y2="1.016cm" draw:start-shape="id62" draw:start-glue-point="12" draw:end-shape="id64" draw:end-glue-point="5" svg:d="M27784 6024l2426-5008" svg:viewBox="0 0 2427 5009">
          <text:p/>
        </draw:connector>
        <draw:g draw:style-name="gr6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3" draw:text-style-name="P19" draw:layer="layout" svg:width="3.175cm" svg:height="1.153cm" svg:x="1.017cm" svg:y="4.2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9" draw:layer="layout" svg:width="3.175cm" svg:height="0.517cm" svg:x="1.017cm" svg:y="5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5" draw:text-style-name="P9" draw:layer="layout" svg:width="3.175cm" svg:height="0.465cm" svg:x="1.017cm" svg:y="5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6" draw:text-style-name="P10" draw:layer="layout" svg:x1="4.191cm" svg:y1="5.853cm" svg:x2="13.065cm" svg:y2="4.695cm" draw:start-shape="id65" draw:start-glue-point="12" draw:end-shape="id63" draw:end-glue-point="9" svg:d="M4191 5853h4437v-1158h4437" svg:viewBox="0 0 8875 1159">
          <text:p/>
        </draw:connector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7" draw:text-style-name="P39" draw:layer="layout" svg:width="6.032cm" svg:height="0.841cm" svg:x="21.638cm" svg:y="1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subscribers</text:span></text:p>
              <text:p text:style-name="P38"><text:span text:style-name="T1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8" draw:text-style-name="P9" draw:layer="layout" svg:width="6.032cm" svg:height="0.688cm" svg:x="21.638cm" svg:y="18.452cm">
              <text:p text:style-name="P8"><text:span text:style-name="T11">dict[Topic, 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9" draw:text-style-name="P9" draw:layer="layout" svg:width="6.032cm" svg:height="0.275cm" svg:x="21.638cm" svg:y="19.1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20" draw:text-style-name="P46" xml:id="id66" draw:id="id66" draw:layer="layout" svg:width="3.175cm" svg:height="2.222cm" svg:x="0.765cm" svg:y="13.065cm">
          <text:p text:style-name="P45"><text:span text:style-name="T12">The handle_message() will be overruled by handle_message() of child class (subclass)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21" draw:text-style-name="P13" draw:layer="layout" draw:type="line" svg:x1="3.94cm" svg:y1="14.176cm" svg:x2="6.339cm" svg:y2="12.43cm" draw:start-shape="id66" draw:start-glue-point="7" draw:end-shape="id67" draw:end-glue-point="9" svg:d="M3940 14176l2399-1746" svg:viewBox="0 0 2400 1747">
          <text:p/>
        </draw:connector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22" draw:text-style-name="P7" draw:layer="layout" svg:width="6.985cm" svg:height="1.153cm" svg:x="10.085cm" svg:y="8.66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3" draw:text-style-name="P9" draw:layer="layout" svg:width="6.985cm" svg:height="0.956cm" svg:x="10.085cm" svg:y="9.815cm">
                <text:p text:style-name="P8"><text:span text:style-name="T3">+ COMMAND</text:span></text:p>
                <text:p text:style-name="P8"><text:span text:style-name="T3">+ ERR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4" draw:text-style-name="P9" draw:layer="layout" svg:width="6.985cm" svg:height="1.781cm" svg:x="10.085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25" draw:text-style-name="P44" draw:layer="layout" svg:x1="20.051cm" svg:y1="14.018cm" svg:x2="20.163cm" svg:y2="11.886cm" draw:start-shape="id58" draw:start-glue-point="6" draw:end-shape="id68" draw:end-glue-point="11" svg:d="M20051 14018h-528v-2132h640" svg:viewBox="0 0 641 2133">
          <text:p/>
        </draw:connector>
        <draw:frame draw:style-name="gr5" draw:text-style-name="P5" draw:layer="layout" svg:width="3.085cm" svg:height="0.725cm" svg:x="30.3cm" svg:y="2.815cm">
          <draw:text-box>
            <text:p><text:span text:style-name="T1">&lt;&lt;uses&gt;&gt;</text:span></text:p>
          </draw:text-box>
        </draw:frame>
        <draw:connector draw:style-name="gr326" draw:text-style-name="P10" draw:layer="layout" draw:line-skew="-0.608cm" svg:x1="12.027cm" svg:y1="8.663cm" svg:x2="14.719cm" svg:y2="5.35cm" draw:start-shape="id60" draw:start-glue-point="5" draw:end-shape="id63" draw:end-glue-point="4" svg:d="M12027 8663v-2266h2692v-1047" svg:viewBox="0 0 2693 3314">
          <text:p/>
        </draw:connector>
        <draw:g draw:style-name="gr6" xml:id="id67" draw:id="id6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27" draw:text-style-name="P7" draw:layer="layout" svg:width="6.033cm" svg:height="1.153cm" svg:x="1.982cm" svg:y="8.47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8" draw:text-style-name="P9" draw:layer="layout" svg:width="6.033cm" svg:height="1.019cm" svg:x="1.982cm" svg:y="9.63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9" draw:text-style-name="P9" draw:layer="layout" svg:width="6.033cm" svg:height="1.781cm" svg:x="1.982cm" svg:y="10.649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0" draw:text-style-name="P7" draw:layer="layout" svg:width="4.128cm" svg:height="1.153cm" svg:x="0.817cm" svg:y="16.26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e_loop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1" draw:text-style-name="P9" draw:layer="layout" svg:width="4.128cm" svg:height="1.198cm" svg:x="0.817cm" svg:y="17.419cm">
              <text:p text:style-name="P8"><text:span text:style-name="T3">- message_loop()</text:span></text:p>
              <text:p text:style-name="P8"><text:span text:style-name="T3">- safe_get(queue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2" draw:text-style-name="P9" draw:layer="layout" svg:width="4.128cm" svg:height="0.48cm" svg:x="0.817cm" svg:y="18.61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3" draw:text-style-name="P10" draw:layer="layout" svg:x1="4.716cm" svg:y1="16.267cm" svg:x2="7.68cm" svg:y2="12.43cm" draw:start-shape="id69" draw:start-glue-point="15" draw:end-shape="id67" draw:end-glue-point="10" svg:d="M4716 16267v-1920h2964v-1917" svg:viewBox="0 0 2965 3838">
          <text:p/>
        </draw:connector>
        <draw:custom-shape draw:style-name="gr334" draw:text-style-name="P46" xml:id="id70" draw:id="id70" draw:layer="layout" svg:width="3.175cm" svg:height="1.27cm" svg:x="5.48cm" svg:y="17.91cm">
          <text:p text:style-name="P45"><text:span text:style-name="T12">message_loop() waits for incomming message in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35" draw:text-style-name="P13" draw:layer="layout" draw:type="line" svg:x1="6.115cm" svg:y1="17.91cm" svg:x2="4.944cm" svg:y2="16.902cm" draw:start-shape="id70" draw:start-glue-point="4" draw:end-shape="id69" draw:end-glue-point="13" svg:d="M6115 17910l-1171-1008" svg:viewBox="0 0 1172 1009">
          <text:p/>
        </draw:connector>
        <draw:connector draw:style-name="gr336" draw:text-style-name="P44" draw:layer="layout" svg:x1="20.162cm" svg:y1="9.457cm" svg:x2="18.027cm" svg:y2="5.35cm" draw:start-shape="id68" draw:start-glue-point="21" draw:end-shape="id63" draw:end-glue-point="6" svg:d="M20162 9457h-2135v-4107" svg:viewBox="0 0 2136 4108">
          <text:p/>
        </draw:connector>
      </draw:page>
      <draw:page draw:name="Messaging Errors" draw:style-name="dp1" draw:master-page-name="Default">
        <draw:custom-shape draw:style-name="gr285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21" draw:layer="layout" svg:width="19.115cm" svg:height="0.679cm" svg:x="0.617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8" draw:text-style-name="P22" draw:layer="layout" svg:width="19.115cm" svg:height="3.049cm" svg:x="0.617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draw:glue-point draw:id="10" svg:x="4.245cm" svg:y="5.086cm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1.57cm" svg:y="3.767cm">
          <draw:text-box>
            <text:p><text:span text:style-name="T1">&lt;&lt;uses&gt;&gt;</text:span></text:p>
          </draw:text-box>
        </draw:frame>
        <draw:custom-shape draw:style-name="gr288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4" draw:id="id8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39" draw:text-style-name="P7" draw:layer="layout" svg:width="7.19cm" svg:height="1.153cm" svg:x="21.955cm" svg:y="8.7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0" draw:text-style-name="P9" draw:layer="layout" svg:width="7.19cm" svg:height="1.379cm" svg:x="21.955cm" svg:y="9.873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1" draw:text-style-name="P9" draw:layer="layout" svg:width="7.19cm" svg:height="1.387cm" svg:x="21.955cm" svg:y="11.15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</text:span></text:p>
                <text:p text:style-name="P8"><text:span text:style-name="T3"><text:s text:c="7"/>CommandMessage | ErrorMessage</text:span></text:p>
                <text:p text:style-name="P8"><text:span text:style-name="T3">+ safe_put(queue:Queue, message:objec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292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7" draw:id="id7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2" draw:text-style-name="P7" draw:layer="layout" svg:width="4.128cm" svg:height="1.627cm" svg:x="7.032cm" svg:y="13.4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9" draw:layer="layout" svg:width="4.128cm" svg:height="1.494cm" svg:x="7.032cm" svg:y="15.09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9" draw:layer="layout" svg:width="4.128cm" svg:height="0.599cm" svg:x="7.032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5" draw:text-style-name="P7" draw:layer="layout" svg:width="3.81cm" svg:height="1.627cm" svg:x="15.605cm" svg:y="14.3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6" draw:text-style-name="P9" draw:layer="layout" svg:width="3.81cm" svg:height="0.994cm" svg:x="15.605cm" svg:y="15.962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7" draw:text-style-name="P9" draw:layer="layout" svg:width="3.81cm" svg:height="0.599cm" svg:x="15.605cm" svg:y="16.95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8" draw:text-style-name="P39" draw:layer="layout" svg:width="7.62cm" svg:height="0.841cm" svg:x="21.002cm" svg:y="13.32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PubSubManager</text:span></text:p>
              <text:p text:style-name="P38"><text:span text:style-name="T11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41" draw:layer="layout" svg:width="7.62cm" svg:height="1.468cm" svg:x="21.002cm" svg:y="14.165cm">
              <text:p text:style-name="P40"><text:span text:style-name="T11">- Topic.COMMAND: []</text:span></text:p>
              <text:p text:style-name="P40"><text:span text:style-name="T11">- Topic.ERROR: []</text:span></text:p>
              <text:p text:style-name="P40"><text:span text:style-name="T11">- queue: Queue()</text:span></text:p>
              <text:p text:style-name="P40"><text:span text:style-name="T11">- subscribers:</text:span><text:span text:style-name="T3"> </text:span><text:span text:style-name="T11">dict[Topic,list[tuple[Queue,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43" draw:layer="layout" svg:width="7.62cm" svg:height="1.477cm" svg:x="21.002cm" svg:y="15.63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42"><text:span text:style-name="T11">+ subscribe(topic: Topic, sources: tuple[str,...]::Queue</text:span></text:p>
              <text:p text:style-name="P42"><text:span text:style-name="T11">+ unsubscripe(topic: Topic, queue:Queue)</text:span></text:p>
              <text:p text:style-name="P42"><text:span text:style-name="T11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51" draw:text-style-name="P7" draw:layer="layout" svg:width="3.81cm" svg:height="1.153cm" svg:x="11.477cm" svg:y="14.44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9" draw:layer="layout" svg:width="3.81cm" svg:height="0.994cm" svg:x="11.477cm" svg:y="15.599cm">
              <text:p text:style-name="P8"><text:span text:style-name="T3">+ COMMAND</text:span></text:p>
              <text:p text:style-name="P8"><text:span text:style-name="T3">+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9" draw:layer="layout" svg:width="3.81cm" svg:height="0.599cm" svg:x="11.477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54" draw:text-style-name="P44" draw:layer="layout" svg:x1="28.399cm" svg:y1="18.332cm" svg:x2="28.621cm" svg:y2="16.566cm" draw:start-shape="id71" draw:start-glue-point="13" draw:end-shape="id72" draw:end-glue-point="12" svg:d="M28399 18332h750v-1766h-528" svg:viewBox="0 0 751 1767">
          <text:p/>
        </draw:connector>
        <draw:frame draw:style-name="gr5" draw:text-style-name="P33" draw:layer="layout" svg:width="2.54cm" svg:height="0.725cm" svg:x="11.477cm" svg:y="18.372cm">
          <draw:text-box>
            <text:p><text:span text:style-name="T6">&lt;&lt;has&gt;&gt;</text:span></text:p>
          </draw:text-box>
        </draw:frame>
        <draw:connector draw:style-name="gr355" draw:text-style-name="P44" draw:layer="layout" svg:x1="11.69cm" svg:y1="14.447cm" svg:x2="12.129cm" svg:y2="12.552cm" draw:start-shape="id73" draw:start-glue-point="4" draw:end-shape="id74" draw:end-glue-point="9" svg:d="M11690 14447v-949h439v-946" svg:viewBox="0 0 440 1896">
          <text:p/>
        </draw:connector>
        <draw:connector draw:style-name="gr356" draw:text-style-name="P44" draw:layer="layout" svg:x1="16.665cm" svg:y1="14.336cm" svg:x2="20.184cm" svg:y2="12.56cm" draw:start-shape="id75" draw:start-glue-point="5" draw:end-shape="id76" draw:end-glue-point="10" svg:d="M16665 14336v-889h3519v-887" svg:viewBox="0 0 3520 1777">
          <text:p/>
        </draw:connector>
        <draw:connector draw:style-name="gr357" draw:text-style-name="P44" draw:layer="layout" svg:x1="8.18cm" svg:y1="13.473cm" svg:x2="10.577cm" svg:y2="12.552cm" draw:start-shape="id77" draw:start-glue-point="5" draw:end-shape="id74" draw:end-glue-point="2" svg:d="M8180 13473v-462h2397v-459" svg:viewBox="0 0 2398 922">
          <text:p/>
        </draw:connector>
        <draw:g draw:style-name="gr6" xml:id="id78" draw:id="id7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g draw:style-name="gr6">
            <draw:custom-shape draw:style-name="gr358" draw:text-style-name="P19" draw:layer="layout" svg:width="5.793cm" svg:height="1.153cm" svg:x="13.417cm" svg:y="4.63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thread&gt;&gt;</text:span></text:p>
              <text:p text:style-name="P18"><text:span text:style-name="T2">subscription_liste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9" draw:layer="layout" svg:width="5.793cm" svg:height="0.486cm" svg:x="13.417cm" svg:y="5.792cm">
              <text:p text:style-name="P8"><text:span text:style-name="T3">- queue: Commands.subscrib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9" draw:layer="layout" svg:width="5.793cm" svg:height="0.437cm" svg:x="13.417cm" svg:y="6.27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9" draw:id="id7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61" draw:text-style-name="P23" draw:layer="layout" svg:width="6.285cm" svg:height="0.679cm" svg:x="5.8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24" draw:layer="layout" svg:width="6.285cm" svg:height="0.679cm" svg:x="5.8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3" draw:text-style-name="P10" draw:layer="layout" svg:x1="13.418cm" svg:y1="6.171cm" svg:x2="10.877cm" svg:y2="5.35cm" draw:start-shape="id78" draw:start-glue-point="11" draw:end-shape="id79" draw:end-glue-point="7" svg:d="M13418 6171h-2541v-821" svg:viewBox="0 0 2542 822">
          <text:p/>
        </draw:connector>
        <draw:custom-shape draw:style-name="gr364" draw:text-style-name="P12" xml:id="id80" draw:id="id80" draw:layer="layout" svg:width="5.158cm" svg:height="2.572cm" svg:x="18.067cm" svg:y="-0.302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65" draw:text-style-name="P13" draw:layer="layout" draw:type="line" svg:x1="19.209cm" svg:y1="6.171cm" svg:x2="18.067cm" svg:y2="0.984cm" draw:start-shape="id78" draw:start-glue-point="12" draw:end-shape="id80" draw:end-glue-point="5" svg:d="M19209 6171l-1142-5187" svg:viewBox="0 0 1143 5188">
          <text:p/>
        </draw:connector>
        <draw:g draw:style-name="gr6" xml:id="id81" draw:id="id8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66" draw:text-style-name="P19" draw:layer="layout" svg:width="3.175cm" svg:height="1.153cm" svg:x="1.017cm" svg:y="4.2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9" draw:layer="layout" svg:width="3.175cm" svg:height="0.517cm" svg:x="1.017cm" svg:y="5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8" draw:text-style-name="P9" draw:layer="layout" svg:width="3.175cm" svg:height="0.465cm" svg:x="1.017cm" svg:y="5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9" draw:text-style-name="P10" draw:layer="layout" svg:x1="4.191cm" svg:y1="5.853cm" svg:x2="5.85cm" svg:y2="4.695cm" draw:start-shape="id81" draw:start-glue-point="12" draw:end-shape="id79" draw:end-glue-point="9" svg:d="M4191 5853h829v-1158h830" svg:viewBox="0 0 1660 1159">
          <text:p/>
        </draw:connector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0" draw:text-style-name="P39" draw:layer="layout" svg:width="6.032cm" svg:height="0.841cm" svg:x="22.368cm" svg:y="17.69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subscribers</text:span></text:p>
              <text:p text:style-name="P38"><text:span text:style-name="T1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1" draw:text-style-name="P9" draw:layer="layout" svg:width="6.032cm" svg:height="0.688cm" svg:x="22.368cm" svg:y="18.537cm">
              <text:p text:style-name="P8"><text:span text:style-name="T11">dict[Topic, 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2" draw:text-style-name="P9" draw:layer="layout" svg:width="6.032cm" svg:height="0.275cm" svg:x="22.368cm" svg:y="19.2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73" draw:text-style-name="P46" xml:id="id82" draw:id="id82" draw:layer="layout" svg:width="3.175cm" svg:height="2.222cm" svg:x="0.765cm" svg:y="13.065cm">
          <text:p text:style-name="P45"><text:span text:style-name="T12">The handle_message() will be overruled by handle_message() of child class (subclass)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74" draw:text-style-name="P13" draw:layer="layout" draw:type="line" svg:x1="3.94cm" svg:y1="14.176cm" svg:x2="5.074cm" svg:y2="12.552cm" draw:start-shape="id82" draw:start-glue-point="7" draw:end-shape="id83" draw:end-glue-point="9" svg:d="M3940 14176l1134-1624" svg:viewBox="0 0 1135 1625">
          <text:p/>
        </draw:connector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75" draw:text-style-name="P7" draw:layer="layout" svg:width="6.985cm" svg:height="1.153cm" svg:x="7.085cm" svg:y="8.66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6" draw:text-style-name="P9" draw:layer="layout" svg:width="6.985cm" svg:height="0.956cm" svg:x="7.085cm" svg:y="9.815cm">
                <text:p text:style-name="P8"><text:span text:style-name="T3">+ COMMAND</text:span></text:p>
                <text:p text:style-name="P8"><text:span text:style-name="T3">+ ERR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7" draw:text-style-name="P9" draw:layer="layout" svg:width="6.985cm" svg:height="1.781cm" svg:x="7.085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78" draw:text-style-name="P7" draw:layer="layout" svg:width="6.032cm" svg:height="1.153cm" svg:x="14.487cm" svg:y="8.7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Error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9" draw:text-style-name="P9" draw:layer="layout" svg:width="6.032cm" svg:height="0.906cm" svg:x="14.487cm" svg:y="9.873cm">
                <text:p text:style-name="P8"><text:span text:style-name="T3">+ COMMAND</text:span></text:p>
                <text:p text:style-name="P8"><text:span text:style-name="T3">+ 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0" draw:text-style-name="P9" draw:layer="layout" svg:width="6.032cm" svg:height="1.781cm" svg:x="14.487cm" svg:y="10.779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 </text:span></text:p>
                <text:p text:style-name="P8"><text:span text:style-name="T3">+ unsubscribe(queue:Queue)</text:span></text:p>
                <text:p text:style-name="P8"><text:span text:style-name="T3">+ publish(message:Error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81" draw:text-style-name="P44" draw:layer="layout" svg:x1="21.428cm" svg:y1="13.325cm" svg:x2="21.955cm" svg:y2="10.629cm" draw:start-shape="id72" draw:start-glue-point="4" draw:end-shape="id84" draw:end-glue-point="3" svg:d="M21428 13325v-2696h527" svg:viewBox="0 0 528 2697">
          <text:p/>
        </draw:connector>
        <draw:frame draw:style-name="gr5" draw:text-style-name="P5" draw:layer="layout" svg:width="3.085cm" svg:height="0.725cm" svg:x="30.3cm" svg:y="2.815cm">
          <draw:text-box>
            <text:p><text:span text:style-name="T1">&lt;&lt;uses&gt;&gt;</text:span></text:p>
          </draw:text-box>
        </draw:frame>
        <draw:connector draw:style-name="gr382" draw:text-style-name="P10" draw:layer="layout" draw:line-skew="-0.608cm" svg:x1="9.027cm" svg:y1="8.663cm" svg:x2="7.107cm" svg:y2="5.35cm" draw:start-shape="id74" draw:start-glue-point="5" draw:end-shape="id79" draw:end-glue-point="4" svg:d="M9027 8663v-2266h-1920v-1047" svg:viewBox="0 0 1921 3314">
          <text:p/>
        </draw:connector>
        <draw:connector draw:style-name="gr383" draw:text-style-name="P44" draw:layer="layout" svg:x1="14.228cm" svg:y1="14.447cm" svg:x2="14.824cm" svg:y2="12.56cm" draw:start-shape="id73" draw:start-glue-point="14" draw:end-shape="id76" draw:end-glue-point="7" svg:d="M14228 14447v-945h596v-942" svg:viewBox="0 0 597 1888">
          <text:p/>
        </draw:connector>
        <draw:g draw:style-name="gr6" xml:id="id83" draw:id="id8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84" draw:text-style-name="P7" draw:layer="layout" svg:width="6.033cm" svg:height="1.153cm" svg:x="0.717cm" svg:y="8.59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5" draw:text-style-name="P9" draw:layer="layout" svg:width="6.033cm" svg:height="1.019cm" svg:x="0.717cm" svg:y="9.752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6" draw:text-style-name="P9" draw:layer="layout" svg:width="6.033cm" svg:height="1.781cm" svg:x="0.717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85" draw:id="id8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87" draw:text-style-name="P7" draw:layer="layout" svg:width="4.128cm" svg:height="1.153cm" svg:x="0.817cm" svg:y="16.26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e_loop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8" draw:text-style-name="P9" draw:layer="layout" svg:width="4.128cm" svg:height="1.198cm" svg:x="0.817cm" svg:y="17.419cm">
              <text:p text:style-name="P8"><text:span text:style-name="T3">- message_loop()</text:span></text:p>
              <text:p text:style-name="P8"><text:span text:style-name="T3">- safe_get(queue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9" draw:text-style-name="P9" draw:layer="layout" svg:width="4.128cm" svg:height="0.48cm" svg:x="0.817cm" svg:y="18.61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90" draw:text-style-name="P10" draw:layer="layout" svg:x1="4.716cm" svg:y1="16.267cm" svg:x2="6.415cm" svg:y2="12.552cm" draw:start-shape="id85" draw:start-glue-point="15" draw:end-shape="id83" draw:end-glue-point="10" svg:d="M4716 16267v-1859h1699v-1856" svg:viewBox="0 0 1700 3716">
          <text:p/>
        </draw:connector>
        <draw:custom-shape draw:style-name="gr391" draw:text-style-name="P46" xml:id="id86" draw:id="id86" draw:layer="layout" svg:width="3.175cm" svg:height="1.27cm" svg:x="5.48cm" svg:y="17.91cm">
          <text:p text:style-name="P45"><text:span text:style-name="T12">message_loop() waits for incomming message in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92" draw:text-style-name="P13" draw:layer="layout" draw:type="line" svg:x1="6.115cm" svg:y1="17.91cm" svg:x2="4.944cm" svg:y2="16.902cm" draw:start-shape="id86" draw:start-glue-point="4" draw:end-shape="id85" draw:end-glue-point="13" svg:d="M6115 17910l-1171-1008" svg:viewBox="0 0 1172 1009">
          <text:p/>
        </draw:connector>
        <draw:custom-shape draw:style-name="gr393" draw:text-style-name="P21" draw:layer="layout" svg:width="9.207cm" svg:height="0.679cm" svg:x="20.0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error_service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22" draw:layer="layout" svg:width="9.189cm" svg:height="3.049cm" svg:x="20.0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7" draw:id="id8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95" draw:text-style-name="P19" draw:layer="layout" svg:width="3.492cm" svg:height="1.153cm" svg:x="20.425cm" svg:y="4.5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Error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9" draw:layer="layout" svg:width="3.492cm" svg:height="0.517cm" svg:x="20.425cm" svg:y="5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7" draw:text-style-name="P9" draw:layer="layout" svg:width="3.492cm" svg:height="0.465cm" svg:x="20.425cm" svg:y="6.2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98" draw:text-style-name="P19" draw:layer="layout" svg:width="6.007cm" svg:height="1.153cm" svg:x="24.52cm" svg:y="4.39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s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9" draw:layer="layout" svg:width="6.007cm" svg:height="0.946cm" svg:x="24.52cm" svg:y="5.552cm">
            <text:p text:style-name="P8"><text:span text:style-name="T3">- queue:Commands.subscrib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9" draw:layer="layout" svg:width="6.007cm" svg:height="0.852cm" svg:x="24.52cm" svg:y="6.4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01" draw:text-style-name="P10" draw:layer="layout" svg:x1="22.358cm" svg:y1="8.722cm" svg:x2="9.62cm" svg:y2="5.35cm" draw:end-shape="id79" draw:end-glue-point="6" svg:d="M22358 8722v-1423h-12738v-1949" svg:viewBox="0 0 12739 3373">
          <text:p/>
        </draw:connector>
        <draw:connector draw:style-name="gr402" draw:text-style-name="P10" draw:layer="layout" draw:line-skew="0cm -3.265cm" svg:x1="20.62cm" svg:y1="4.575cm" svg:x2="12.135cm" svg:y2="4.695cm" draw:start-shape="id87" draw:start-glue-point="4" draw:end-shape="id79" draw:end-glue-point="8" svg:d="M20620 4575v-528h-7605v648h-880" svg:viewBox="0 0 8486 649">
          <text:p/>
        </draw:connector>
      </draw:page>
      <draw:page draw:name="Power Supply" draw:style-name="dp1" draw:master-page-name="Default">
        <draw:custom-shape draw:style-name="gr264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403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9" draw:id="id8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04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5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6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71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8" draw:id="id8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07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8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9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10" draw:text-style-name="P10" draw:layer="layout" svg:x1="14.261cm" svg:y1="11.428cm" svg:x2="10.747cm" svg:y2="10.657cm" draw:start-shape="id88" draw:start-glue-point="5" draw:end-shape="id89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11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2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0" draw:id="id9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13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5" draw:text-style-name="P10" draw:layer="layout" draw:line-skew="0.926cm" svg:x1="4.255cm" svg:y1="8.889cm" svg:x2="7.942cm" svg:y2="5.866cm" draw:start-shape="id89" draw:start-glue-point="5" draw:end-shape="id90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416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6" draw:id="id96">
          <draw:glue-point draw:id="4" svg:x="-0.787cm" svg:y="5.055cm"/>
          <draw:glue-point draw:id="5" svg:x="-5.063cm" svg:y="-3.065cm"/>
          <draw:glue-point draw:id="6" svg:x="-3.788cm" svg:y="5.05cm"/>
          <draw:custom-shape draw:style-name="gr418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9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1" draw:text-style-name="P47" draw:layer="layout" svg:width="27.204cm" svg:height="0.7cm" svg:x="1.101cm" svg:y="16.947cm">
          <text:p text:style-name="P34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3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4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5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26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7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8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107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9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0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1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2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3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4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1" draw:id="id9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5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6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7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38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48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41" draw:text-style-name="P10" draw:layer="layout" draw:line-skew="-2.199cm" svg:x1="18.991cm" svg:y1="17.936cm" svg:x2="20.911cm" svg:y2="11.342cm" draw:start-shape="id91" draw:start-glue-point="4" draw:end-shape="id92" draw:end-glue-point="10" svg:d="M18991 17936v-5497h1920v-1097" svg:viewBox="0 0 1921 6595">
          <text:p/>
        </draw:connector>
        <draw:connector draw:style-name="gr442" draw:text-style-name="P10" draw:layer="layout" draw:line-skew="-2.581cm" svg:x1="17.899cm" svg:y1="17.97cm" svg:x2="19.696cm" svg:y2="11.342cm" draw:start-shape="id93" draw:start-glue-point="15" draw:end-shape="id92" draw:end-glue-point="9" svg:d="M17899 17970v-5896h1797v-732" svg:viewBox="0 0 1798 6629">
          <text:p/>
        </draw:connector>
        <draw:connector draw:style-name="gr443" draw:text-style-name="P10" draw:layer="layout" svg:x1="8.319cm" svg:y1="14.283cm" svg:x2="8.465cm" svg:y2="11.434cm" draw:start-shape="id94" draw:start-glue-point="14" draw:end-shape="id95" draw:end-glue-point="8" svg:d="M8319 14283v-1426h146v-1423" svg:viewBox="0 0 147 2850">
          <text:p/>
        </draw:connector>
        <draw:connector draw:style-name="gr444" draw:text-style-name="P10" draw:layer="layout" svg:x1="6.204cm" svg:y1="14.283cm" svg:x2="3.498cm" svg:y2="12.946cm" draw:start-shape="id94" draw:start-glue-point="4" draw:end-shape="id96" draw:end-glue-point="2" svg:d="M6204 14283v-670h-2706v-667" svg:viewBox="0 0 2707 1338">
          <text:p/>
        </draw:connector>
        <draw:connector draw:style-name="gr445" draw:text-style-name="P10" draw:layer="layout" svg:x1="21.91cm" svg:y1="13.161cm" svg:x2="21.214cm" svg:y2="10.798cm" draw:start-shape="id97" draw:start-glue-point="5" draw:end-shape="id92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446" draw:text-style-name="P37" draw:layer="layout" svg:width="6.35cm" svg:height="2.147cm" svg:x="1.635cm" svg:y="17.51cm">
          <draw:text-box>
            <text:p><text:span text:style-name="T10">Waarom backlighting thread met stop en off. Staat eigenlijk altijd aan! Wordt ook in de module gestart!</text:span></text:p>
          </draw:text-box>
        </draw:frame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47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9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50" draw:text-style-name="P10" draw:layer="layout" svg:x1="23.323cm" svg:y1="9.403cm" svg:x2="21.214cm" svg:y2="8.656cm" draw:start-shape="id98" draw:start-glue-point="6" draw:end-shape="id92" draw:end-glue-point="13" svg:d="M23323 9403h-1055v-747h-1054" svg:viewBox="0 0 2110 748">
          <text:p/>
        </draw:connector>
        <draw:connector draw:style-name="gr451" draw:text-style-name="P10" draw:layer="layout" svg:x1="25.577cm" svg:y1="13.161cm" svg:x2="26.907cm" svg:y2="11.747cm" draw:start-shape="id97" draw:start-glue-point="14" draw:end-shape="id98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of&gt;&gt;</text:span></text:p>
          </draw:text-box>
        </draw:frame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52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4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55" draw:text-style-name="P10" draw:layer="layout" svg:x1="2.471cm" svg:y1="14.187cm" svg:x2="1.846cm" svg:y2="12.946cm" draw:start-shape="id99" draw:start-glue-point="5" draw:end-shape="id96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56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7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00" draw:id="id10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58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9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60" draw:text-style-name="P10" draw:layer="layout" svg:x1="8.465cm" svg:y1="8.061cm" svg:x2="11.394cm" svg:y2="6.115cm" draw:start-shape="id95" draw:start-glue-point="5" draw:end-shape="id100" draw:end-glue-point="5" svg:d="M8465 8061v-974h2929v-972" svg:viewBox="0 0 2930 1947">
          <text:p/>
        </draw:connector>
        <draw:connector draw:style-name="gr461" draw:text-style-name="P10" draw:layer="layout" svg:x1="3.498cm" svg:y1="7.685cm" svg:x2="9.461cm" svg:y2="6.115cm" draw:end-shape="id100" draw:end-glue-point="4" svg:d="M3498 7685v-522h5963v-1048" svg:viewBox="0 0 5964 1571">
          <text:p/>
        </draw:connector>
        <draw:connector draw:style-name="gr462" draw:text-style-name="P10" draw:layer="layout" svg:x1="20.911cm" svg:y1="8.021cm" svg:x2="17.192cm" svg:y2="5.46cm" draw:start-shape="id92" draw:start-glue-point="15" draw:end-shape="id100" draw:end-glue-point="8" svg:d="M20911 8021v-2561h-3719" svg:viewBox="0 0 3720 2562">
          <text:p/>
        </draw:connector>
        <draw:g draw:style-name="gr6" xml:id="id101" draw:id="id10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463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4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5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66" draw:text-style-name="P10" draw:layer="layout" svg:x1="13.738cm" svg:y1="12.219cm" svg:x2="11.786cm" svg:y2="10.89cm" draw:start-shape="id101" draw:end-shape="id95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467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69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0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71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02" draw:id="id10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473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4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5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4" draw:id="id10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6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7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8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5" draw:id="id10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79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1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82" draw:text-style-name="P10" draw:layer="layout" draw:line-skew="0.511cm" svg:x1="9.155cm" svg:y1="9.143cm" svg:x2="10.029cm" svg:y2="6.816cm" draw:start-shape="id102" draw:start-glue-point="5" draw:end-shape="id103" draw:end-glue-point="5" svg:d="M9155 9143v-654h874v-1673" svg:viewBox="0 0 875 2328">
          <text:p/>
        </draw:connector>
        <draw:connector draw:style-name="gr483" draw:text-style-name="P10" draw:layer="layout" draw:line-skew="0.218cm" svg:x1="1.841cm" svg:y1="9.094cm" svg:x2="8.429cm" svg:y2="6.816cm" draw:start-shape="id104" draw:start-glue-point="4" draw:end-shape="id103" draw:end-glue-point="4" svg:d="M1841 9094v-922h6588v-1356" svg:viewBox="0 0 6589 2279">
          <text:p/>
        </draw:connector>
        <draw:connector draw:style-name="gr484" draw:text-style-name="P10" draw:layer="layout" svg:x1="24.127cm" svg:y1="8.795cm" svg:x2="14.83cm" svg:y2="5.146cm" draw:start-shape="id105" draw:start-glue-point="14" draw:end-shape="id103" draw:end-glue-point="14" svg:d="M24127 8795v-3649h-9297" svg:viewBox="0 0 9298 3650">
          <text:p/>
        </draw:connector>
        <draw:custom-shape draw:style-name="gr485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107" draw:id="id107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486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7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8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06" draw:id="id106">
          <draw:custom-shape draw:style-name="gr489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0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1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92" draw:text-style-name="P10" draw:layer="layout" svg:x1="14.252cm" svg:y1="15.889cm" svg:x2="13cm" svg:y2="15.652cm" draw:start-shape="id106" draw:start-glue-point="3" draw:end-shape="id107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493" draw:text-style-name="P10" draw:layer="layout" svg:x1="12.636cm" svg:y1="14.048cm" svg:x2="11.552cm" svg:y2="11.833cm" draw:start-shape="id107" draw:start-glue-point="6" draw:end-shape="id102" draw:end-glue-point="9" svg:d="M12636 14048v-1108h-1084v-1107" svg:viewBox="0 0 1085 2216">
          <text:p/>
        </draw:connector>
        <draw:connector draw:style-name="gr494" draw:text-style-name="P10" draw:layer="layout" svg:x1="7.603cm" svg:y1="15.652cm" svg:x2="6.637cm" svg:y2="13.489cm" draw:start-shape="id107" draw:start-glue-point="3" draw:end-shape="id104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of&gt;&gt;</text:span></text:p>
          </draw:text-box>
        </draw:frame>
        <draw:g draw:style-name="gr6" xml:id="id108" draw:id="id108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95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6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7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98" draw:text-style-name="P10" draw:layer="layout" svg:x1="4.461cm" svg:y1="15.276cm" svg:x2="3.04cm" svg:y2="13.489cm" draw:start-shape="id108" draw:start-glue-point="8" draw:end-shape="id104" draw:end-glue-point="8" svg:d="M4461 15276v-894h-1421v-893" svg:viewBox="0 0 1422 1788">
          <text:p/>
        </draw:connector>
        <draw:g draw:style-name="gr6" xml:id="id109" draw:id="id10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499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0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1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2" draw:text-style-name="P10" draw:layer="layout" svg:x1="14.335cm" svg:y1="10.515cm" svg:x2="13.051cm" svg:y2="9.778cm" draw:start-shape="id109" draw:end-shape="id102" draw:end-glue-point="13" svg:d="M14335 10515h-642v-737h-642" svg:viewBox="0 0 1285 738">
          <text:p/>
        </draw:connector>
        <draw:g draw:style-name="gr6" xml:id="id103" draw:id="id10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03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4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of&gt;&gt;</text:span></text:p>
          </draw:text-box>
        </draw:frame>
      </draw:page>
      <draw:page draw:name="Top Level" draw:style-name="dp1" draw:master-page-name="Default">
        <draw:custom-shape draw:style-name="gr505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507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8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9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3" draw:layer="layout" svg:width="28.893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15" draw:id="id1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511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2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3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2" draw:id="id1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4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5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6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1" draw:id="id1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517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8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9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520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521" draw:text-style-name="P7" draw:layer="layout" svg:width="4.513cm" svg:height="1.153cm" svg:x="24.387cm" svg:y="2.8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log_service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2" draw:text-style-name="P9" draw:layer="layout" svg:width="4.513cm" svg:height="2.827cm" svg:x="24.387cm" svg:y="4.028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4" draw:id="id114">
          <draw:custom-shape draw:style-name="gr523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ing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4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5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526" draw:text-style-name="P7" draw:layer="layout" svg:width="4.445cm" svg:height="1.153cm" svg:x="24.395cm" svg:y="7.2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7" draw:text-style-name="P9" draw:layer="layout" svg:width="4.445cm" svg:height="0.47cm" svg:x="24.395cm" svg:y="8.4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3" draw:id="id1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528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9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0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31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2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3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8" draw:id="id1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34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5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6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1" draw:id="id1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37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8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9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2" draw:id="id1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40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1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2" draw:text-style-name="P36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0" draw:id="id1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543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4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5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6" draw:id="id1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46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7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8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549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0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1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9" draw:id="id1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52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3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4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7" draw:id="id1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555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6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7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0" draw:id="id110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558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9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60">
          <draw:connector draw:style-name="gr561" draw:text-style-name="P49" draw:layer="layout" draw:type="line" svg:x1="4.811cm" svg:y1="6.168cm" svg:x2="4.798cm" svg:y2="16.137cm" draw:start-shape="id110" draw:start-glue-point="16" draw:end-shape="id111" draw:end-glue-point="15" svg:d="M4811 6168l-13 9969" svg:viewBox="0 0 14 9970">
            <text:p/>
          </draw:connector>
          <draw:connector draw:style-name="gr561" draw:text-style-name="P49" draw:layer="layout" draw:type="line" svg:x1="4.793cm" svg:y1="9.463cm" svg:x2="4.269cm" svg:y2="9.573cm" draw:end-shape="id112" draw:end-glue-point="13" svg:d="M4793 9463l-524 110" svg:viewBox="0 0 525 111">
            <text:p/>
          </draw:connector>
          <draw:connector draw:style-name="gr561" draw:text-style-name="P49" draw:layer="layout" draw:type="line" svg:x1="4.807cm" svg:y1="9.44cm" svg:x2="5.71cm" svg:y2="9.573cm" draw:end-shape="id113" draw:end-glue-point="6" svg:d="M4807 9440l903 133" svg:viewBox="0 0 904 134">
            <text:p/>
          </draw:connector>
          <draw:connector draw:style-name="gr561" draw:text-style-name="P49" draw:layer="layout" draw:type="line" svg:x1="4.762cm" svg:y1="12.918cm" svg:x2="5.762cm" svg:y2="12.829cm" draw:end-shape="id114" svg:d="M4762 12918l1000-89" svg:viewBox="0 0 1001 90">
            <text:p/>
          </draw:connector>
          <draw:connector draw:style-name="gr561" draw:text-style-name="P49" draw:layer="layout" draw:type="line" svg:x1="4.749cm" svg:y1="12.916cm" svg:x2="4.174cm" svg:y2="13.074cm" draw:end-shape="id115" draw:end-glue-point="13" svg:d="M4749 12916l-575 158" svg:viewBox="0 0 576 159">
            <text:p/>
          </draw:connector>
          <draw:connector draw:style-name="gr561" draw:text-style-name="P49" draw:layer="layout" draw:type="line" svg:x1="4.855cm" svg:y1="15.066cm" svg:x2="5.784cm" svg:y2="14.998cm" draw:end-shape="id116" draw:end-glue-point="6" svg:d="M4855 15066l929-68" svg:viewBox="0 0 930 69">
            <text:p/>
          </draw:connector>
        </draw:g>
        <draw:connector draw:style-name="gr561" draw:text-style-name="P49" draw:layer="layout" draw:type="line" svg:x1="14.651cm" svg:y1="6.168cm" svg:x2="14.635cm" svg:y2="14.97cm" draw:start-shape="id110" draw:start-glue-point="19" draw:end-shape="id117" draw:end-glue-point="0" svg:d="M14651 6168l-16 8802" svg:viewBox="0 0 17 8803">
          <text:p/>
        </draw:connector>
        <draw:connector draw:style-name="gr561" draw:text-style-name="P49" draw:layer="layout" draw:type="line" svg:x1="14.541cm" svg:y1="10.732cm" svg:x2="14.017cm" svg:y2="10.842cm" svg:d="M14541 10732l-524 110" svg:viewBox="0 0 525 111">
          <text:p/>
        </draw:connector>
        <draw:connector draw:style-name="gr561" draw:text-style-name="P49" draw:layer="layout" draw:type="line" svg:x1="14.692cm" svg:y1="10.179cm" svg:x2="15.248cm" svg:y2="10.226cm" draw:end-shape="id118" draw:end-glue-point="3" svg:d="M14692 10179l556 47" svg:viewBox="0 0 557 48">
          <text:p/>
        </draw:connector>
        <draw:connector draw:style-name="gr561" draw:text-style-name="P49" draw:layer="layout" draw:type="line" svg:x1="14.661cm" svg:y1="12.576cm" svg:x2="15.227cm" svg:y2="12.464cm" draw:end-shape="id119" draw:end-glue-point="21" svg:d="M14661 12576l566-112" svg:viewBox="0 0 567 113">
          <text:p/>
        </draw:connector>
        <draw:connector draw:style-name="gr561" draw:text-style-name="P49" draw:layer="layout" draw:type="line" svg:x1="14.723cm" svg:y1="13.914cm" svg:x2="14.077cm" svg:y2="13.858cm" svg:d="M14723 13914l-646-56" svg:viewBox="0 0 647 57">
          <text:p/>
        </draw:connector>
        <draw:connector draw:style-name="gr561" draw:text-style-name="P49" draw:layer="layout" draw:type="line" svg:x1="18.779cm" svg:y1="6.168cm" svg:x2="18.675cm" svg:y2="14.894cm" draw:start-shape="id110" draw:start-glue-point="7" draw:end-shape="id120" draw:end-glue-point="4" svg:d="M18779 6168l-104 8726" svg:viewBox="0 0 105 8727">
          <text:p/>
        </draw:connector>
        <draw:connector draw:style-name="gr561" draw:text-style-name="P49" draw:layer="layout" draw:type="line" svg:x1="18.769cm" svg:y1="9.525cm" svg:x2="19.516cm" svg:y2="9.578cm" draw:end-shape="id121" draw:end-glue-point="6" svg:d="M18769 9525l747 53" svg:viewBox="0 0 748 54">
          <text:p/>
        </draw:connector>
        <draw:connector draw:style-name="gr561" draw:text-style-name="P49" draw:layer="layout" draw:type="line" svg:x1="18.738cm" svg:y1="12.016cm" svg:x2="19.281cm" svg:y2="12.363cm" draw:end-shape="id122" draw:end-glue-point="6" svg:d="M18738 12016l543 347" svg:viewBox="0 0 544 348">
          <text:p/>
        </draw:connector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562" draw:text-style-name="P19" draw:layer="layout" svg:width="4.845cm" svg:height="1.153cm" svg:x="24.412cm" svg:y="12.3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3" draw:text-style-name="P9" draw:layer="layout" svg:width="4.845cm" svg:height="0.514cm" svg:x="24.412cm" svg:y="1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4" draw:text-style-name="P9" draw:layer="layout" svg:width="4.845cm" svg:height="0.993cm" svg:x="24.412cm" svg:y="13.91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565" draw:text-style-name="P19" draw:layer="layout" svg:width="4.763cm" svg:height="1.153cm" svg:x="24.347cm" svg:y="15.48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6" draw:text-style-name="P9" draw:layer="layout" svg:width="4.763cm" svg:height="0.574cm" svg:x="24.347cm" svg:y="16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7" draw:text-style-name="P9" draw:layer="layout" svg:width="4.763cm" svg:height="1.387cm" svg:x="24.347cm" svg:y="17.1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</text:span></text:p>
            <text:p text:style-name="P8"><text:span text:style-name="T3"><text:s text:c="2"/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568" draw:text-style-name="P19" draw:layer="layout" svg:width="4.845cm" svg:height="1.153cm" svg:x="24.412cm" svg:y="9.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9" draw:text-style-name="P9" draw:layer="layout" svg:width="4.845cm" svg:height="0.571cm" svg:x="24.412cm" svg:y="10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0" draw:text-style-name="P9" draw:layer="layout" svg:width="4.845cm" svg:height="0.993cm" svg:x="24.412cm" svg:y="10.8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3T16:23:47.322558208</meta:creation-date>
    <meta:generator>LibreOffice/25.8.7.3$Windows_X86_64 LibreOffice_project/30742500f2d3eb4366ac312fa33d3dcabdb3eba5</meta:generator>
    <dc:date>2026-06-28T17:59:33.394231100</dc:date>
    <meta:editing-duration>PT20H41S</meta:editing-duration>
    <meta:editing-cycles>149</meta:editing-cycles>
    <meta:print-date>2026-05-31T17:56:35.806719548</meta:print-date>
    <meta:printed-by>PDF files: Henk</meta:printed-by>
    <meta:document-statistic meta:object-count="871"/>
  </office:meta>
</office:document-meta>
</file>