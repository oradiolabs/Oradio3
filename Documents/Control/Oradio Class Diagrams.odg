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2.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3.11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3.89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2.87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25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7.385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19.978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19.847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1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9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7" style:family="graphic" style:parent-style-name="standard">
      <style:graphic-properties draw:textarea-horizontal-align="justify" draw:textarea-vertical-align="middle" draw:auto-grow-height="false" fo:min-height="0.45cm" fo:min-width="24.661cm" style:writing-mode="lr-tb" loext:decorative="false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0.45cm" fo:min-width="24.515cm" style:writing-mode="lr-tb" loext:decorative="false"/>
      <style:paragraph-properties style:writing-mode="lr-tb"/>
    </style:style>
    <style:style style:name="gr129" style:family="graphic" style:parent-style-name="standard">
      <style:graphic-properties draw:textarea-horizontal-align="justify" draw:textarea-vertical-align="middle" draw:auto-grow-height="false" fo:min-height="0.45cm" fo:min-width="24.825cm" style:writing-mode="lr-tb" loext:decorative="false"/>
      <style:paragraph-properties style:writing-mode="lr-tb"/>
    </style:style>
    <style:style style:name="gr13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8cm" fo:padding-top="0.151cm" fo:padding-bottom="0.151cm" fo:padding-left="0.276cm" fo:padding-right="0.276cm" loext:decorative="false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2" style:family="graphic" style:parent-style-name="standard">
      <style:graphic-properties draw:textarea-horizontal-align="justify" draw:textarea-vertical-align="middle" draw:auto-grow-height="false" fo:min-height="0.45cm" fo:min-width="23.405cm" style:writing-mode="lr-tb" loext:decorative="false"/>
      <style:paragraph-properties style:writing-mode="lr-tb"/>
    </style:style>
    <style:style style:name="gr163" style:family="graphic" style:parent-style-name="standard">
      <style:graphic-properties draw:textarea-horizontal-align="justify" draw:textarea-vertical-align="middle" draw:auto-grow-height="false" fo:min-height="0.45cm" fo:min-width="23.271cm" style:writing-mode="lr-tb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45cm" fo:min-width="23.188cm" style:writing-mode="lr-tb" loext:decorative="false"/>
      <style:paragraph-properties style:writing-mode="lr-tb"/>
    </style:style>
    <style:style style:name="gr1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848cm" fo:padding-top="0.151cm" fo:padding-bottom="0.151cm" fo:padding-left="0.276cm" fo:padding-right="0.276cm" loext:decorative="false"/>
    </style:style>
    <style:style style:name="gr1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8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197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198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19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7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29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3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8" style:family="graphic" style:parent-style-name="standard">
      <style:graphic-properties draw:textarea-horizontal-align="justify" draw:textarea-vertical-align="middle" draw:auto-grow-height="false" fo:min-height="0.45cm" fo:min-width="26.321cm" style:writing-mode="lr-tb" loext:decorative="false"/>
      <style:paragraph-properties style:writing-mode="lr-tb"/>
    </style:style>
    <style:style style:name="gr249" style:family="graphic" style:parent-style-name="standard">
      <style:graphic-properties draw:textarea-horizontal-align="justify" draw:textarea-vertical-align="middle" draw:auto-grow-height="false" fo:min-height="0.45cm" fo:min-width="25.846cm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0.45cm" fo:min-width="26.172cm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8.31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62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683cm" fo:min-width="8.7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3.54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83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39cm" fo:min-width="3.57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3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304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0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3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4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55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5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1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393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6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39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04cm" fo:padding-top="0.151cm" fo:padding-bottom="0.151cm" fo:padding-left="0.276cm" fo:padding-right="0.276cm" loext:decorative="false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618cm" fo:min-width="4.05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81cm" fo:min-width="4.2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9" style:family="graphic">
      <style:graphic-properties loext:decorative="false"/>
    </style:style>
    <style:style style:name="gr450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weight="normal"/>
    </style:style>
    <style:style style:name="P26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start"/>
    </style:style>
    <style:style style:name="P3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" draw:style-name="dp1" draw:master-page-name="Default">
        <draw:custom-shape draw:style-name="gr1" draw:text-style-name="P2" draw:layer="layout" svg:width="22.96cm" svg:height="0.7cm" svg:x="1.535cm" svg:y="2.27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614cm" svg:height="0.7cm" svg:x="1.516cm" svg:y="18.462cm">
          <text:p text:style-name="P1">HW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7cm" svg:height="0.952cm" svg:x="1cm" svg:y="1.1cm">
          <text:p text:style-name="P1">Class Diagram: Log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5.217cm" svg:y="-2.492cm">
          <draw:text-box>
            <text:p><text:span text:style-name="T1">&lt;&lt;uses&gt;&gt;</text:span></text:p>
          </draw:text-box>
        </draw:frame>
        <draw:g draw:style-name="gr6" xml:id="id3" draw:id="id3">
          <draw:glue-point draw:id="4" svg:x="-3.94cm" svg:y="-4.644cm"/>
          <draw:glue-point draw:id="5" svg:x="4.311cm" svg:y="-5.137cm"/>
          <draw:glue-point draw:id="6" svg:x="3.601cm" svg:y="-5.137cm"/>
          <draw:glue-point draw:id="7" svg:x="5.002cm" svg:y="-4.324cm"/>
          <draw:custom-shape draw:style-name="gr7" draw:text-style-name="P7" draw:layer="layout" svg:width="5.397cm" svg:height="1.153cm" svg:x="2.292cm" svg:y="6.7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oradio_log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397cm" svg:height="2.681cm" svg:x="2.292cm" svg:y="7.926cm">
            <text:p text:style-name="P8"><text:span text:style-name="T3">+ oradio_log.debug()</text:span></text:p>
            <text:p text:style-name="P8"><text:span text:style-name="T3">+ oradio_log.warning()</text:span></text:p>
            <text:p text:style-name="P8"><text:span text:style-name="T3">+ oradio_log.info()</text:span></text:p>
            <text:p text:style-name="P8"><text:span text:style-name="T3">+ oradio_log.error()</text:span></text:p>
            <text:p text:style-name="P8"><text:span text:style-name="T3">+ oradio_log.critical()</text:span></text:p>
            <text:p text:style-name="P8"><text:span text:style-name="T3">+ oradio_log.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3.379cm" svg:height="0.7cm" svg:x="1.433cm" svg:y="5.133cm">
          <text:p text:style-name="P1"><text:s text:c="3"/>Middle-ware Layer (global functions)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g draw:style-name="gr6">
                <draw:custom-shape draw:style-name="gr10" draw:text-style-name="P7" draw:layer="layout" svg:width="5.08cm" svg:height="1.627cm" svg:x="11.265cm" svg:y="9.255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6"><text:span text:style-name="T2">&lt;&lt;class&gt;&gt;</text:span></text:p>
                  <text:p text:style-name="P6"><text:span text:style-name="T2">oradio_logging.</text:span></text:p>
                  <text:p text:style-name="P6"><text:span text:style-name="T2">SafeLogg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9" draw:layer="layout" svg:width="5.08cm" svg:height="1.134cm" svg:x="11.265cm" svg:y="10.882cm">
                  <text:p text:style-name="P8"><text:span text:style-name="T3">DEBUG, INFO, WARNING, ERROR, CRITICAL</text:span></text:p>
                  <text:p text:style-name="P8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5.08cm" svg:height="3.357cm" svg:x="11.265cm" svg:y="12.016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+ trace(msg:string)</text:span></text:p>
                  <text:p text:style-name="P8"><text:span text:style-name="T3">+ debug(msg:string)</text:span></text:p>
                  <text:p text:style-name="P8"><text:span text:style-name="T3">+ info(msg:string)</text:span></text:p>
                  <text:p text:style-name="P8"><text:span text:style-name="T3">+ warning(msg:string)</text:span></text:p>
                  <text:p text:style-name="P8"><text:span text:style-name="T3">+ error(msg:string)</text:span></text:p>
                  <text:p text:style-name="P8"><text:span text:style-name="T3">+ critical(msg:string)</text:span></text:p>
                  <text:p text:style-name="P8"><text:span text:style-name="T3">+ exception(msg:string)</text:span></text:p>
                  <text:p text:style-name="P8"><text:span text:style-name="T3">- safe_log(lev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 draw:style-name="gr6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7" draw:layer="layout" svg:width="4.465cm" svg:height="1.153cm" svg:x="19.78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python-library&gt;&gt;</text:span></text:p>
            <text:p text:style-name="P6"><text:span text:style-name="T2">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465cm" svg:height="3.029cm" svg:x="19.782cm" svg:y="12.948cm">
            <text:p text:style-name="P8"><text:span text:style-name="T3">+ trace(msg:string)</text:span></text:p>
            <text:p text:style-name="P8"><text:span text:style-name="T3">+ debug(msg:string)</text:span></text:p>
            <text:p text:style-name="P8"><text:span text:style-name="T3">+ info(msg:string)</text:span></text:p>
            <text:p text:style-name="P8"><text:span text:style-name="T3">+ warning(msg:string)</text:span></text:p>
            <text:p text:style-name="P8"><text:span text:style-name="T3">+ error(msg:string)</text:span></text:p>
            <text:p text:style-name="P8"><text:span text:style-name="T3">+ critical(msg:string)</text:span></text:p>
            <text:p text:style-name="P8"><text:span text:style-name="T3">+ exception(msg: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0" draw:layer="layout" svg:x1="19.782cm" svg:y1="13.886cm" svg:x2="16.345cm" svg:y2="12.314cm" draw:start-shape="id1" draw:end-shape="id2" draw:end-glue-point="1" svg:d="M19782 13886h-1719v-1572h-1718" svg:viewBox="0 0 3438 1573">
          <text:p/>
        </draw:connector>
        <draw:frame draw:style-name="gr5" draw:text-style-name="P5" draw:layer="layout" svg:width="3.085cm" svg:height="0.725cm" svg:x="16.262cm" svg:y="14.335cm">
          <draw:text-box>
            <text:p><text:span text:style-name="T1">&lt;&lt;uses&gt;&gt;</text:span></text:p>
          </draw:text-box>
        </draw:frame>
        <draw:connector draw:style-name="gr16" draw:text-style-name="P10" draw:layer="layout" svg:x1="11.265cm" svg:y1="12.314cm" svg:x2="7.689cm" svg:y2="8.69cm" draw:start-shape="id2" draw:start-glue-point="3" draw:end-shape="id3" svg:d="M11265 12314h-1788v-3624h-1788" svg:viewBox="0 0 3577 3625">
          <text:p/>
        </draw:connector>
        <draw:frame draw:style-name="gr5" draw:text-style-name="P5" draw:layer="layout" svg:width="3.085cm" svg:height="0.725cm" svg:x="7.78cm" svg:y="12.747cm">
          <draw:text-box>
            <text:p><text:span text:style-name="T1">&lt;&lt;uses&gt;&gt;</text:span></text:p>
          </draw:text-box>
        </draw:frame>
        <draw:custom-shape draw:style-name="gr17" draw:text-style-name="P12" xml:id="id4" draw:id="id4" draw:layer="layout" svg:width="7.937cm" svg:height="1.719cm" svg:x="11.5cm" svg:y="6.715cm">
          <text:p text:style-name="P11"><text:span text:style-name="T4">The oradio_log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8" draw:text-style-name="P13" draw:layer="layout" draw:type="line" svg:x1="11.5cm" svg:y1="7.575cm" svg:x2="7.689cm" svg:y2="7.033cm" draw:start-shape="id4" draw:start-glue-point="5" draw:end-shape="id3" draw:end-glue-point="7" svg:d="M11500 7575l-3811-542" svg:viewBox="0 0 3812 543">
          <text:p/>
        </draw:connector>
      </draw:page>
      <draw:page draw:name="Throttle" draw:style-name="dp1" draw:master-page-name="Default">
        <draw:custom-shape draw:style-name="gr19" draw:text-style-name="P2" draw:layer="layout" svg:width="20.827cm" svg:height="0.7cm" svg:x="1.44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0.457cm" svg:height="0.7cm" svg:x="1.56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0.71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7.122cm" svg:y="7.26cm">
          <draw:text-box>
            <text:p><text:span text:style-name="T1">&lt;&lt;uses&gt;&gt;</text:span></text:p>
          </draw:text-box>
        </draw:frame>
        <draw:custom-shape draw:style-name="gr22" draw:text-style-name="P3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1.907cm" svg:height="0.952cm" svg:x="1cm" svg:y="1.1cm">
          <text:p text:style-name="P1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" draw:id="id6">
          <draw:custom-shape draw:style-name="gr24" draw:text-style-name="P7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throttling_monitor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4"><text:span text:style-name="T3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7" draw:text-style-name="P1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throttled_monitor.RpiThrottlingMonitor</text:span></text:p>
            <text:p text:style-name="P16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7.62cm" svg:height="0.591cm" svg:x="4.58cm" svg:y="13.474cm">
            <text:p text:style-name="P8"><text:span text:style-name="T3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init()</text:span></text:p>
            <text:p text:style-name="P8"><text:span text:style-name="T3">+ start()</text:span></text:p>
            <text:p text:style-name="P8"><text:span text:style-name="T3">+ stop()</text:span></text:p>
            <text:p text:style-name="P8"><text:span text:style-name="T3">+ run()</text:span></text:p>
            <text:p text:style-name="P8"><text:span text:style-name="T3">+ force_throttled()</text:span></text:p>
            <text:p text:style-name="P8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0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5" draw:text-style-name="P5" draw:layer="layout" svg:width="3.085cm" svg:height="0.725cm" svg:x="6.17cm" svg:y="10.525cm">
          <draw:text-box>
            <text:p><text:span text:style-name="T1">&lt;&lt;uses&gt;&gt;</text:span></text:p>
          </draw:text-box>
        </draw:frame>
        <draw:g draw:style-name="gr6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6">
            <draw:g draw:style-name="gr6">
              <draw:g draw:style-name="gr6">
                <draw:custom-shape draw:style-name="gr31" draw:text-style-name="P19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18"><text:span text:style-name="T2">&lt;&lt;thread&gt;&gt;</text:span></text:p>
                  <text:p text:style-name="P18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9" draw:layer="layout" svg:width="5.64cm" svg:height="1.037cm" svg:x="15.997cm" svg:y="14.654cm">
                  <text:p text:style-name="P8"><text:span text:style-name="T3">+ stop_event: Event()</text:span></text:p>
                  <text:p text:style-name="P8"><text:span text:style-name="T3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9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4" draw:text-style-name="P10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5" draw:text-style-name="P5" draw:layer="layout" svg:width="3.81cm" svg:height="0.725cm" svg:x="12.43cm" svg:y="13.292cm">
          <draw:text-box>
            <text:p><text:span text:style-name="T1">&lt;&lt;consists of&gt;&gt;</text:span></text:p>
          </draw:text-box>
        </draw:frame>
        <draw:custom-shape draw:style-name="gr35" draw:text-style-name="P12" xml:id="id8" draw:id="id8" draw:layer="layout" svg:width="6.667cm" svg:height="1.5cm" svg:x="15.288cm" svg:y="11.265cm">
          <text:p text:style-name="P11"><text:span text:style-name="T4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6" draw:text-style-name="P13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" draw:text-style-name="P2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4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throttling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2" draw:text-style-name="P2" draw:layer="layout" svg:width="16.66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6.512cm" svg:height="0.7cm" svg:x="1.633cm" svg:y="7.032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7.151cm" svg:height="0.7cm" svg:x="1.311cm" svg:y="13.382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8.415cm" svg:height="0.952cm" svg:x="1cm" svg:y="1.1cm">
          <text:p text:style-name="P1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7" draw:text-style-name="P2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9" draw:text-style-name="P2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4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" draw:text-style-name="P7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9" draw:layer="layout" svg:width="4.602cm" svg:height="0.754cm" svg:x="4.653cm" svg:y="10.882cm">
              <text:p text:style-name="P8"><text:span text:style-name="T3">- play_sound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9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" draw:id="id10">
          <draw:glue-point draw:id="4" svg:x="1.153cm" svg:y="-4.294cm"/>
          <draw:glue-point draw:id="5" svg:x="3.461cm" svg:y="-5.146cm"/>
          <draw:custom-shape draw:style-name="gr54" draw:text-style-name="P7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system_sounds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047cm" svg:height="1.266cm" svg:x="13.145cm" svg:y="10.40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0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57" draw:text-style-name="P10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58" draw:text-style-name="P2" draw:layer="layout" svg:width="20.478cm" svg:height="0.7cm" svg:x="1.4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20.347cm" svg:height="0.7cm" svg:x="1.608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1.3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2" draw:text-style-name="P7" draw:layer="layout" svg:width="7.19cm" svg:height="1.153cm" svg:x="2.3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9" draw:layer="layout" svg:width="7.19cm" svg:height="0.786cm" svg:x="2.352cm" svg:y="9.282cm">
              <text:p text:style-name="P8"><text:span text:style-name="T3">- wifi_cmd_queue: Queue&lt;message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9" draw:layer="layout" svg:width="7.19cm" svg:height="0.993cm" svg:x="2.3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)</text:span></text:p>
              <text:p text:style-name="P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7.7cm" svg:height="0.952cm" svg:x="1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635cm" svg:y="11.187cm">
          <draw:text-box>
            <text:p><text:span text:style-name="T1">&lt;&lt;uses&gt;&gt;</text:span></text:p>
          </draw:text-box>
        </draw:frame>
        <draw:g draw:style-name="gr6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6" draw:text-style-name="P7" draw:layer="layout" svg:width="6.668cm" svg:height="1.153cm" svg:x="1.9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9" draw:layer="layout" svg:width="6.668cm" svg:height="0.583cm" svg:x="1.9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9" draw:layer="layout" svg:width="6.668cm" svg:height="1.387cm" svg:x="1.9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_heartbeat()</text:span></text:p>
              <text:p text:style-name="P8"><text:span text:style-name="T3">+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9" draw:text-style-name="P7" draw:layer="layout" svg:width="4.18cm" svg:height="1.153cm" svg:x="5.0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9" draw:layer="layout" svg:width="4.18cm" svg:height="0.178cm" svg:x="5.0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9" draw:layer="layout" svg:width="4.18cm" svg:height="0.993cm" svg:x="5.0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0" draw:layer="layout" svg:x1="2.325cm" svg:y1="12.777cm" svg:x2="4.351cm" svg:y2="11.061cm" draw:start-shape="id13" draw:start-glue-point="4" draw:end-shape="id14" draw:end-glue-point="8" svg:d="M2325 12777v-859h2026v-857" svg:viewBox="0 0 2027 1717">
          <text:p/>
        </draw:connector>
        <draw:g draw:style-name="gr6" xml:id="id19" draw:id="id1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3" draw:text-style-name="P19" draw:layer="layout" svg:width="4.645cm" svg:height="1.153cm" svg:x="23.86cm" svg:y="7.7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4.645cm" svg:height="0.711cm" svg:x="23.86cm" svg:y="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layout" svg:width="4.645cm" svg:height="0.993cm" svg:x="23.86cm" svg:y="9.4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_commands(): Queue&lt;message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6" draw:text-style-name="P19" draw:layer="layout" svg:width="7.308cm" svg:height="1.153cm" svg:x="14.107cm" svg:y="12.1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7.308cm" svg:height="0.563cm" svg:x="14.107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7.308cm" svg:height="0.993cm" svg:x="14.107cm" svg:y="13.8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</text:span><text:span text:style-name="T3"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12" xml:id="id16" draw:id="id16" draw:layer="layout" svg:width="7.302cm" svg:height="1.182cm" svg:x="13.835cm" svg:y="9.96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0" draw:text-style-name="P13" draw:layer="layout" draw:type="line" svg:x1="16.139cm" svg:y1="12.108cm" svg:x2="14.426cm" svg:y2="11.142cm" draw:start-shape="id15" draw:start-glue-point="5" draw:end-shape="id16" draw:end-glue-point="6" svg:d="M16139 12108l-1713-966" svg:viewBox="0 0 1714 967">
          <text:p/>
        </draw:connector>
        <draw:connector draw:style-name="gr81" draw:text-style-name="P10" draw:layer="layout" svg:x1="14.108cm" svg:y1="12.743cm" svg:x2="9.143cm" svg:y2="11.061cm" draw:start-shape="id15" draw:start-glue-point="6" draw:end-shape="id14" draw:end-glue-point="10" svg:d="M14108 12743h-4965v-1682" svg:viewBox="0 0 4966 1683">
          <text:p/>
        </draw:connector>
        <draw:frame draw:style-name="gr5" draw:text-style-name="P5" draw:layer="layout" svg:width="3.81cm" svg:height="0.725cm" svg:x="9.255cm" svg:y="12.022cm">
          <draw:text-box>
            <text:p><text:span text:style-name="T1">&lt;&lt;consists of&gt;&gt;</text:span></text:p>
          </draw:text-box>
        </draw:frame>
        <draw:connector draw:style-name="gr82" draw:text-style-name="P10" draw:layer="layout" svg:x1="5.076cm" svg:y1="17.918cm" svg:x2="2.325cm" svg:y2="15.899cm" draw:start-shape="id17" draw:start-glue-point="11" draw:end-shape="id13" draw:end-glue-point="7" svg:d="M5076 17918h-2751v-2019" svg:viewBox="0 0 2752 2020">
          <text:p/>
        </draw:connector>
        <draw:frame draw:style-name="gr5" draw:text-style-name="P5" draw:layer="layout" svg:width="3.81cm" svg:height="0.725cm" svg:x="1.317cm" svg:y="17.827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3" draw:text-style-name="P21" draw:layer="layout" svg:width="20.32cm" svg:height="0.679cm" svg:x="1.635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2" draw:layer="layout" svg:width="20.32cm" svg:height="2.101cm" svg:x="1.635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5" draw:text-style-name="P23" draw:layer="layout" svg:width="7.706cm" svg:height="0.679cm" svg:x="7.259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4" draw:layer="layout" svg:width="7.706cm" svg:height="0.679cm" svg:x="7.259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582cm" svg:y="7.515cm">
          <draw:text-box>
            <text:p><text:span text:style-name="T1">&lt;&lt;uses&gt;&gt;</text:span></text:p>
          </draw:text-box>
        </draw:frame>
        <draw:connector draw:style-name="gr87" draw:text-style-name="P10" draw:layer="layout" svg:x1="7.545cm" svg:y1="8.13cm" svg:x2="8.801cm" svg:y2="5.664cm" draw:start-shape="id14" draw:start-glue-point="14" draw:end-shape="id18" draw:end-glue-point="4" svg:d="M7545 8130v-1234h1256v-1232" svg:viewBox="0 0 1257 2467">
          <text:p/>
        </draw:connector>
        <draw:g draw:style-name="gr6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8" draw:text-style-name="P19" draw:layer="layout" svg:width="4.122cm" svg:height="0.679cm" svg:x="11.8cm" svg:y="16.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layout" svg:width="4.122cm" svg:height="0.323cm" svg:x="11.8cm" svg:y="17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9" draw:layer="layout" svg:width="4.122cm" svg:height="0.57cm" svg:x="11.8cm" svg:y="17.9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1" draw:text-style-name="P2" draw:layer="layout" svg:width="0.911cm" svg:height="16.193cm" svg:x="22.3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0" draw:layer="layout" svg:x1="23.86cm" svg:y1="9.076cm" svg:x2="9.542cm" svg:y2="9.595cm" draw:start-shape="id19" draw:end-shape="id14" draw:end-glue-point="1" svg:d="M23860 9076h-7159v519h-7159" svg:viewBox="0 0 14319 520">
          <text:p/>
        </draw:connector>
        <draw:connector draw:style-name="gr93" draw:text-style-name="P10" draw:layer="layout" svg:x1="11.801cm" svg:y1="17.556cm" svg:x2="8.62cm" svg:y2="14.337cm" draw:start-shape="id20" draw:start-glue-point="6" draw:end-shape="id13" draw:end-glue-point="1" svg:d="M11801 17556h-1591v-3219h-1590" svg:viewBox="0 0 3182 3220">
          <text:p/>
        </draw:connector>
        <draw:frame draw:style-name="gr94" draw:text-style-name="P25" draw:layer="layout" svg:width="4.445cm" svg:height="1.039cm" svg:x="10.207cm" svg:y="15.287cm">
          <draw:text-box>
            <text:p><text:span text:style-name="T3">onTimerExpired( </text:span></text:p>
            <text:p><text:span text:style-name="T3">msg_type: HEARTBEAT)</text:span></text:p>
          </draw:text-box>
        </draw:frame>
        <draw:frame draw:style-name="gr5" draw:text-style-name="P26" draw:layer="layout" svg:width="5.715cm" svg:height="0.725cm" svg:x="10.207cm" svg:y="8.847cm">
          <draw:text-box>
            <text:p><text:span text:style-name="T1">returns Queue&lt;message&gt;</text:span></text:p>
          </draw:text-box>
        </draw:frame>
        <draw:connector draw:style-name="gr95" draw:text-style-name="P10" draw:layer="layout" svg:x1="15.921cm" svg:y1="17.948cm" svg:x2="21.01cm" svg:y2="14.816cm" draw:start-shape="id20" draw:start-glue-point="12" draw:end-shape="id15" draw:end-glue-point="10" svg:d="M15921 17948h5089v-3132" svg:viewBox="0 0 5090 3133">
          <text:p/>
        </draw:connector>
        <draw:frame draw:style-name="gr94" draw:text-style-name="P25" draw:layer="layout" svg:width="4.445cm" svg:height="1.039cm" svg:x="16.445cm" svg:y="16.753cm">
          <draw:text-box>
            <text:p><text:span text:style-name="T3">onWIFI_CONNECTED( </text:span></text:p>
            <text:p><text:span text:style-name="T3">msg_type: SYS_INFO)</text:span></text:p>
          </draw:text-box>
        </draw:frame>
      </draw:page>
      <draw:page draw:name="Web service" draw:style-name="dp1" draw:master-page-name="Default">
        <draw:custom-shape draw:style-name="gr96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" draw:layer="layout" svg:width="23.452cm" svg:height="0.7cm" svg:x="1.602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1.477cm" svg:y="7.577cm">
          <draw:text-box>
            <text:p><text:span text:style-name="T1">&lt;&lt;uses&gt;&gt;</text:span></text:p>
          </draw:text-box>
        </draw:frame>
        <draw:custom-shape draw:style-name="gr99" draw:text-style-name="P3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0" draw:text-style-name="P7" draw:layer="layout" svg:width="6.985cm" svg:height="1.627cm" svg:x="10.525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ice.</text:span></text:p>
              <text:p text:style-name="P6"><text:span text:style-name="T2">We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1" draw:text-style-name="P9" draw:layer="layout" svg:width="6.985cm" svg:height="0.949cm" svg:x="10.525cm" svg:y="10.195cm">
              <text:p text:style-name="P14"><text:span text:style-name="T3">- cmd_queue: subscribe_commands()</text:span></text:p>
              <text:p text:style-name="P14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28" draw:layer="layout" svg:width="6.985cm" svg:height="2.175cm" svg:x="10.525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stop()</text:span></text:p>
              <text:p text:style-name="P27"><text:span text:style-name="T3">+ get_state()</text:span></text:p>
              <text:p text:style-name="P27"><text:span text:style-name="T3">+ start()</text:span></text:p>
              <text:p text:style-name="P27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3" draw:text-style-name="P4" draw:layer="layout" svg:width="24.765cm" svg:height="0.952cm" svg:x="1cm" svg:y="1.1cm">
          <text:p text:style-name="P1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4" draw:text-style-name="P7" draw:layer="layout" svg:width="4.763cm" svg:height="1.627cm" svg:x="20.0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er.</text:span></text:p>
              <text:p text:style-name="P6"><text:span text:style-name="T2">UvicornServer</text:span></text:p>
              <text:p text:style-name="P6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9" draw:layer="layout" svg:width="4.763cm" svg:height="0.473cm" svg:x="20.0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9" draw:layer="layout" svg:width="4.763cm" svg:height="1.781cm" svg:x="20.0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app:FastAPI)</text:span></text:p>
              <text:p text:style-name="P8"><text:span text:style-name="T3">+ run()</text:span></text:p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07" draw:text-style-name="P7" draw:layer="layout" svg:width="5.602cm" svg:height="1.627cm" svg:x="18.72cm" svg:y="14.01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fastapi_server.</text:span></text:p>
                <text:p text:style-name="P6"><text:span text:style-name="T2">api_ap</text:span></text:p>
                <text:p text:style-name="P6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9" draw:layer="layout" svg:width="5.602cm" svg:height="0.676cm" svg:x="18.72cm" svg:y="15.644cm">
                <text:p text:style-name="P8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9" draw:layer="layout" svg:width="5.602cm" svg:height="2.175cm" svg:x="18.72cm" svg:y="16.31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@api_app.get()</text:span></text:p>
                <text:p text:style-name="P8"><text:span text:style-name="T3">+ @api_app.put()</text:span></text:p>
                <text:p text:style-name="P8"><text:span text:style-name="T3">+ @api_app.post()</text:span></text:p>
                <text:p text:style-name="P8"><text:span text:style-name="T3">+ @api_app.api_route()</text:span></text:p>
                <text:p text:style-name="P8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5" draw:layer="layout" svg:width="3.81cm" svg:height="0.725cm" svg:x="17.51cm" svg:y="8.53cm">
          <draw:text-box>
            <text:p><text:span text:style-name="T1">&lt;&lt;consists of&gt;&gt;</text:span></text:p>
          </draw:text-box>
        </draw:frame>
        <draw:connector draw:style-name="gr110" draw:text-style-name="P10" draw:layer="layout" svg:x1="20.047cm" svg:y1="11.124cm" svg:x2="17.509cm" svg:y2="9.204cm" draw:start-shape="id21" draw:start-glue-point="3" draw:end-shape="id22" draw:end-glue-point="13" svg:d="M20047 11124h-1269v-1920h-1269" svg:viewBox="0 0 2539 1921">
          <text:p/>
        </draw:connector>
        <draw:connector draw:style-name="gr111" draw:text-style-name="P10" draw:layer="layout" svg:x1="24.809cm" svg:y1="12.521cm" svg:x2="24.321cm" svg:y2="14.653cm" draw:start-shape="id21" draw:start-glue-point="12" draw:end-shape="id23" draw:end-glue-point="13" svg:d="M24809 12521h527v2132h-1015" svg:viewBox="0 0 1016 2133">
          <text:p/>
        </draw:connector>
        <draw:frame draw:style-name="gr5" draw:text-style-name="P5" draw:layer="layout" svg:width="3.085cm" svg:height="0.725cm" svg:x="8.302cm" svg:y="8.53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21.955cm" svg:y="13.065cm">
          <draw:text-box>
            <text:p><text:span text:style-name="T1">&lt;&lt;uses&gt;&gt;</text:span></text:p>
          </draw:text-box>
        </draw:frame>
        <draw:g draw:style-name="gr6" xml:id="id25" draw:id="id2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12" draw:text-style-name="P19" draw:layer="layout" svg:width="6.35cm" svg:height="1.153cm" svg:x="1.922cm" svg:y="8.6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9" draw:layer="layout" svg:width="6.35cm" svg:height="0.601cm" svg:x="1.922cm" svg:y="9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9" draw:layer="layout" svg:width="6.35cm" svg:height="0.599cm" svg:x="1.922cm" svg:y="10.3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5" draw:text-style-name="P19" draw:layer="layout" svg:width="8.39cm" svg:height="1.153cm" svg:x="6.8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9" draw:layer="layout" svg:width="8.39cm" svg:height="0.784cm" svg:x="6.897cm" svg:y="16.44cm">
            <text:p text:style-name="P8"><text:span text:style-name="T3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8.39cm" svg:height="0.599cm" svg:x="6.8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8" draw:text-style-name="P12" xml:id="id26" draw:id="id26" draw:layer="layout" svg:width="6.667cm" svg:height="1.5cm" svg:x="1.552cm" svg:y="13.235cm">
          <text:p text:style-name="P11"><text:span text:style-name="T4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19" draw:text-style-name="P10" draw:layer="layout" svg:x1="14.822cm" svg:y1="15.288cm" svg:x2="12.467cm" svg:y2="13.319cm" draw:start-shape="id24" draw:start-glue-point="15" draw:end-shape="id22" draw:end-glue-point="8" svg:d="M14822 15288v-986h-2355v-983" svg:viewBox="0 0 2356 1970">
          <text:p/>
        </draw:connector>
        <draw:frame draw:style-name="gr5" draw:text-style-name="P5" draw:layer="layout" svg:width="3.81cm" svg:height="0.725cm" svg:x="11.16cm" svg:y="14.335cm">
          <draw:text-box>
            <text:p><text:span text:style-name="T1">&lt;&lt;consists of&gt;&gt;</text:span></text:p>
          </draw:text-box>
        </draw:frame>
        <draw:connector draw:style-name="gr120" draw:text-style-name="P10" draw:layer="layout" svg:x1="8.272cm" svg:y1="9.786cm" svg:x2="10.526cm" svg:y2="9.204cm" draw:start-shape="id25" draw:end-shape="id22" draw:end-glue-point="6" svg:d="M8272 9786h1126v-582h1128" svg:viewBox="0 0 2255 583">
          <text:p/>
        </draw:connector>
        <draw:connector draw:style-name="gr121" draw:text-style-name="P13" draw:layer="layout" draw:type="line" svg:x1="8.219cm" svg:y1="13.985cm" svg:x2="9.23cm" svg:y2="15.288cm" draw:start-shape="id26" draw:start-glue-point="7" draw:end-shape="id24" draw:end-glue-point="5" svg:d="M8219 13985l1011 1303" svg:viewBox="0 0 1012 130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2" draw:text-style-name="P21" draw:layer="layout" svg:width="23.177cm" svg:height="0.679cm" svg:x="1.63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2" draw:layer="layout" svg:width="23.177cm" svg:height="2.101cm" svg:x="1.63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7" draw:id="id2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4" draw:text-style-name="P2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4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6" draw:text-style-name="P10" draw:layer="layout" draw:line-skew="0.552cm" svg:x1="10.915cm" svg:y1="8.569cm" svg:x2="8.309cm" svg:y2="5.663cm" draw:start-shape="id22" draw:start-glue-point="4" draw:end-shape="id27" draw:end-glue-point="4" svg:d="M10915 8569v-902h-2606v-2004" svg:viewBox="0 0 2607 2907">
          <text:p/>
        </draw:connector>
      </draw:page>
      <draw:page draw:name="WiFi" draw:style-name="dp1" draw:master-page-name="Default">
        <draw:custom-shape draw:style-name="gr127" draw:text-style-name="P2" draw:layer="layout" svg:width="25.161cm" svg:height="0.7cm" svg:x="1.47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" draw:layer="layout" svg:width="25.015cm" svg:height="0.7cm" svg:x="1.621cm" svg:y="6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" draw:layer="layout" svg:width="25.325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.857cm" svg:y="7.577cm">
          <draw:text-box>
            <text:p><text:span text:style-name="T1">&lt;&lt;uses&gt;&gt;</text:span></text:p>
          </draw:text-box>
        </draw:frame>
        <draw:custom-shape draw:style-name="gr130" draw:text-style-name="P3" draw:layer="layout" svg:width="26.35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31" draw:text-style-name="P7" draw:layer="layout" svg:width="5.654cm" svg:height="1.627cm" svg:x="1.913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9" draw:layer="layout" svg:width="5.654cm" svg:height="0.949cm" svg:x="1.913cm" svg:y="10.1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28" draw:layer="layout" svg:width="5.654cm" svg:height="2.175cm" svg:x="1.913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get_state()</text:span></text:p>
              <text:p text:style-name="P27"><text:span text:style-name="T3">+ wifi_connect()</text:span></text:p>
              <text:p text:style-name="P27"><text:span text:style-name="T3">+ wifi_disconnect()</text:span></text:p>
              <text:p text:style-name="P27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4" draw:text-style-name="P4" draw:layer="layout" svg:width="26.352cm" svg:height="0.952cm" svg:x="1cm" svg:y="1.1cm">
          <text:p text:style-name="P1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81cm" svg:height="0.725cm" svg:x="17.51cm" svg:y="15.515cm">
          <draw:text-box>
            <text:p><text:span text:style-name="T1">&lt;&lt;consists of&gt;&gt;</text:span></text:p>
          </draw:text-box>
        </draw:frame>
        <draw:connector draw:style-name="gr135" draw:text-style-name="P10" draw:layer="layout" svg:x1="22.935cm" svg:y1="16.33cm" svg:x2="21.486cm" svg:y2="14.752cm" draw:start-shape="id28" draw:start-glue-point="14" draw:end-shape="id29" draw:end-glue-point="9" svg:d="M22935 16330v-790h-1449v-788" svg:viewBox="0 0 1450 1579">
          <text:p/>
        </draw:connector>
        <draw:connector draw:style-name="gr136" draw:text-style-name="P10" draw:layer="layout" svg:x1="11.841cm" svg:y1="10.137cm" svg:x2="7.566cm" svg:y2="9.204cm" draw:start-shape="id30" draw:start-glue-point="0" draw:end-shape="id31" draw:end-glue-point="13" svg:d="M11841 10137v-933h-4275" svg:viewBox="0 0 4276 934">
          <text:p/>
        </draw:connector>
        <draw:g draw:style-name="gr6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37" draw:text-style-name="P7" draw:layer="layout" svg:width="7.072cm" svg:height="1.627cm" svg:x="2.022cm" svg:y="15.0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EventListen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9" draw:layer="layout" svg:width="7.072cm" svg:height="0.779cm" svg:x="2.022cm" svg:y="16.6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9" draw:layer="layout" svg:width="7.072cm" svg:height="0.599cm" svg:x="2.022cm" svg:y="17.4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3.085cm" svg:height="0.725cm" svg:x="4.175cm" svg:y="13.41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8.392cm" svg:y="8.212cm">
          <draw:text-box>
            <text:p><text:span text:style-name="T1">&lt;&lt;uses&gt;&gt;</text:span></text:p>
          </draw:text-box>
        </draw:frame>
        <draw:g draw:style-name="gr6" xml:id="id30" draw:id="id3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40" draw:text-style-name="P19" draw:layer="layout" svg:width="7.327cm" svg:height="1.153cm" svg:x="8.178cm" svg:y="10.1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9" draw:layer="layout" svg:width="7.327cm" svg:height="0.435cm" svg:x="8.17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9" draw:layer="layout" svg:width="7.327cm" svg:height="0.993cm" svg:x="8.178cm" svg:y="11.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4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3" draw:text-style-name="P7" draw:layer="layout" svg:width="7.072cm" svg:height="1.153cm" svg:x="10.2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SystemBus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9" draw:layer="layout" svg:width="7.072cm" svg:height="0.486cm" svg:x="10.2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9" draw:layer="layout" svg:width="7.072cm" svg:height="0.373cm" svg:x="10.2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6" draw:text-style-name="P7" draw:layer="layout" svg:width="7.072cm" svg:height="1.153cm" svg:x="17.8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Interface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9" draw:layer="layout" svg:width="7.072cm" svg:height="0.448cm" svg:x="17.8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9" draw:layer="layout" svg:width="7.072cm" svg:height="0.345cm" svg:x="17.8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9" draw:text-style-name="P7" draw:layer="layout" svg:width="7.072cm" svg:height="1.153cm" svg:x="16.378cm" svg:y="12.2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event_listener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9" draw:layer="layout" svg:width="7.072cm" svg:height="0.779cm" svg:x="16.378cm" svg:y="1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9" draw:layer="layout" svg:width="7.072cm" svg:height="0.599cm" svg:x="16.378cm" svg:y="14.15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2" draw:text-style-name="P10" draw:layer="layout" svg:x1="16.887cm" svg:y1="16.281cm" svg:x2="18.345cm" svg:y2="14.752cm" draw:start-shape="id32" draw:start-glue-point="15" draw:end-shape="id29" draw:end-glue-point="8" svg:d="M16887 16281v-766h1458v-763" svg:viewBox="0 0 1459 1530">
          <text:p/>
        </draw:connector>
        <draw:connector draw:style-name="gr153" draw:text-style-name="P10" draw:layer="layout" svg:x1="16.379cm" svg:y1="14.208cm" svg:x2="9.093cm" svg:y2="15.666cm" draw:start-shape="id29" draw:start-glue-point="11" draw:end-shape="id33" draw:end-glue-point="13" svg:d="M16379 14208h-3643v1458h-3643" svg:viewBox="0 0 7287 1459">
          <text:p/>
        </draw:connector>
        <draw:connector draw:style-name="gr154" draw:text-style-name="P10" draw:layer="layout" svg:x1="7.13cm" svg:y1="15.031cm" svg:x2="3.485cm" svg:y2="13.319cm" draw:start-shape="id33" draw:start-glue-point="14" draw:end-shape="id31" draw:end-glue-point="8" svg:d="M7130 15031v-857h-3645v-855" svg:viewBox="0 0 3646 1713">
          <text:p/>
        </draw:connector>
        <draw:custom-shape draw:style-name="gr155" draw:text-style-name="P12" xml:id="id34" draw:id="id34" draw:layer="layout" svg:width="7.703cm" svg:height="1.905cm" svg:x="18.432cm" svg:y="8.915cm">
          <text:p text:style-name="P11"><text:span text:style-name="T4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56" draw:text-style-name="P13" draw:layer="layout" draw:type="line" svg:x1="23.058cm" svg:y1="12.222cm" svg:x2="22.283cm" svg:y2="10.82cm" draw:start-shape="id29" draw:start-glue-point="15" draw:end-shape="id34" draw:end-glue-point="2" svg:d="M23058 12222l-775-1402" svg:viewBox="0 0 776 1403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57" draw:text-style-name="P21" draw:layer="layout" svg:width="24.765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22" draw:layer="layout" svg:width="24.765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5" draw:id="id3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59" draw:text-style-name="P2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24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1" draw:text-style-name="P10" draw:layer="layout" draw:line-skew="0.553cm" svg:x1="3.485cm" svg:y1="8.569cm" svg:x2="8.767cm" svg:y2="5.662cm" draw:start-shape="id31" draw:start-glue-point="5" draw:end-shape="id35" draw:end-glue-point="4" svg:d="M3485 8569v-902h5282v-2005" svg:viewBox="0 0 5283 2908">
          <text:p/>
        </draw:connector>
      </draw:page>
      <draw:page draw:name="USB" draw:style-name="dp1" draw:master-page-name="Default">
        <draw:custom-shape draw:style-name="gr162" draw:text-style-name="P2" draw:layer="layout" svg:width="23.905cm" svg:height="0.7cm" svg:x="1.473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" draw:layer="layout" svg:width="23.771cm" svg:height="0.7cm" svg:x="1.607cm" svg:y="6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" draw:layer="layout" svg:width="23.688cm" svg:height="0.7cm" svg:x="1.4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9.702cm" svg:y="12.657cm">
          <draw:text-box>
            <text:p><text:span text:style-name="T1">&lt;&lt;uses&gt;&gt;</text:span></text:p>
          </draw:text-box>
        </draw:frame>
        <draw:custom-shape draw:style-name="gr165" draw:text-style-name="P3" draw:layer="layout" svg:width="25.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66" draw:text-style-name="P7" draw:layer="layout" svg:width="6.54cm" svg:height="1.153cm" svg:x="16.812cm" svg:y="8.7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usb_service.US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9" draw:layer="layout" svg:width="6.54cm" svg:height="1.075cm" svg:x="16.812cm" svg:y="9.864cm">
              <text:p text:style-name="P14"><text:span text:style-name="T3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9" draw:layer="layout" svg:width="6.54cm" svg:height="0.993cm" svg:x="16.812cm" svg:y="10.9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69" draw:text-style-name="P4" draw:layer="layout" svg:width="25.4cm" svg:height="0.952cm" svg:x="1cm" svg:y="1.1cm">
          <text:p text:style-name="P1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9" draw:id="id3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70" draw:text-style-name="P7" draw:layer="layout" svg:width="5.448cm" svg:height="1.153cm" svg:x="11.149cm" svg:y="13.6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&lt;&lt;singleton&gt;&gt;</text:span></text:p>
                <text:p text:style-name="P6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1" draw:text-style-name="P9" draw:layer="layout" svg:width="5.448cm" svg:height="0.692cm" svg:x="11.149cm" svg:y="14.758cm">
                <text:p text:style-name="P14"><text:span text:style-name="T3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2" draw:text-style-name="P9" draw:layer="layout" svg:width="5.448cm" svg:height="0.993cm" svg:x="11.149cm" svg:y="15.4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on_created(event)</text:span></text:p>
                <text:p text:style-name="P8"><text:span text:style-name="T3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73" draw:text-style-name="P7" draw:layer="layout" svg:width="6.718cm" svg:height="1.153cm" svg:x="1.5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9" draw:layer="layout" svg:width="6.718cm" svg:height="0.366cm" svg:x="1.5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9" draw:layer="layout" svg:width="6.718cm" svg:height="0.993cm" svg:x="1.5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on_created( event)</text:span></text:p>
              <text:p text:style-name="P8"><text:span text:style-name="T3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76" draw:text-style-name="P23" draw:layer="layout" svg:width="4.41cm" svg:height="1.627cm" svg:x="20.11cm" svg:y="14.5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0"><text:span text:style-name="T2">&lt;&lt;Library&gt;&gt;</text:span></text:p>
              <text:p text:style-name="P29"><text:span text:style-name="T2">watchdog.observers.</text:span></text:p>
              <text:p text:style-name="P29"><text:span text:style-name="T2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9" draw:layer="layout" svg:width="4.41cm" svg:height="0.599cm" svg:x="20.11cm" svg:y="16.165cm">
              <text:p text:style-name="P8"><text:span text:style-name="T3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9" draw:layer="layout" svg:width="4.41cm" svg:height="0.993cm" svg:x="20.11cm" svg:y="16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chedule()</text:span></text:p>
              <text:p text:style-name="P8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79" draw:text-style-name="P5" draw:layer="layout" svg:width="2.223cm" svg:height="0.862cm" svg:x="8.66cm" svg:y="16.648cm">
          <draw:text-box>
            <text:p><text:span text:style-name="T1">&lt;&lt;is a&gt;</text:span></text:p>
          </draw:text-box>
        </draw:frame>
        <draw:frame draw:style-name="gr5" draw:text-style-name="P5" draw:layer="layout" svg:width="3.81cm" svg:height="0.725cm" svg:x="19.137cm" svg:y="12.34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80" draw:text-style-name="P21" draw:layer="layout" svg:width="23.838cm" svg:height="0.679cm" svg:x="1.609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22" draw:layer="layout" svg:width="23.838cm" svg:height="2.101cm" svg:x="1.609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7" draw:id="id3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82" draw:text-style-name="P23" draw:layer="layout" svg:width="8.002cm" svg:height="0.679cm" svg:x="16.1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4" draw:layer="layout" svg:width="8.002cm" svg:height="0.679cm" svg:x="16.1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4" draw:text-style-name="P10" draw:layer="layout" draw:line-skew="0.697cm" svg:x1="18.631cm" svg:y1="8.712cm" svg:x2="19.329cm" svg:y2="5.867cm" draw:start-shape="id36" draw:start-glue-point="5" draw:end-shape="id37" draw:end-glue-point="5" svg:d="M18631 8712v-727h698v-2118" svg:viewBox="0 0 699 2846">
          <text:p/>
        </draw:connector>
        <draw:g draw:style-name="gr6" xml:id="id38" draw:id="id3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85" draw:text-style-name="P19" draw:layer="layout" svg:width="7.297cm" svg:height="1.153cm" svg:x="8.137cm" svg:y="8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9" draw:layer="layout" svg:width="7.297cm" svg:height="0.435cm" svg:x="8.137cm" svg:y="9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9" draw:layer="layout" svg:width="7.297cm" svg:height="0.993cm" svg:x="8.137cm" svg:y="10.3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8" draw:text-style-name="P10" draw:layer="layout" svg:x1="11.785cm" svg:y1="11.36cm" svg:x2="15.084cm" svg:y2="13.606cm" draw:start-shape="id38" draw:end-shape="id39" draw:end-glue-point="14" svg:d="M11785 11360v1122h3299v1124" svg:viewBox="0 0 3300 2247">
          <text:p/>
        </draw:connector>
        <draw:g draw:style-name="gr6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89" draw:text-style-name="P7" draw:layer="layout" svg:width="5.397cm" svg:height="1.153cm" svg:x="1.593cm" svg:y="11.9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0" draw:text-style-name="P9" draw:layer="layout" svg:width="5.397cm" svg:height="0.434cm" svg:x="1.593cm" svg:y="13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9" draw:layer="layout" svg:width="5.397cm" svg:height="0.993cm" svg:x="1.593cm" svg:y="13.4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networkmanager_add(</text:span></text:p>
              <text:p text:style-name="P8"><text:span text:style-name="T3"><text:s text:c="9"/></text:span><text:span text:style-name="T3"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2" draw:text-style-name="P10" draw:layer="layout" svg:x1="6.989cm" svg:y1="12.543cm" svg:x2="11.149cm" svg:y2="14.234cm" draw:start-shape="id40" draw:start-glue-point="13" draw:end-shape="id39" draw:end-glue-point="21" svg:d="M6989 12543h2080v1691h2080" svg:viewBox="0 0 4161 1692">
          <text:p/>
        </draw:connector>
        <draw:frame draw:style-name="gr5" draw:text-style-name="P5" draw:layer="layout" svg:width="3.81cm" svg:height="0.725cm" svg:x="19.137cm" svg:y="13.292cm">
          <draw:text-box>
            <text:p><text:span text:style-name="T1">&lt;&lt;schedules&gt;&gt;</text:span></text:p>
          </draw:text-box>
        </draw:frame>
        <draw:connector draw:style-name="gr193" draw:text-style-name="P10" draw:layer="layout" svg:x1="23.295cm" svg:y1="14.539cm" svg:x2="18.631cm" svg:y2="11.932cm" draw:start-shape="id41" draw:start-glue-point="14" draw:end-shape="id36" draw:end-glue-point="8" svg:d="M23295 14539v-1305h-4664v-1302" svg:viewBox="0 0 4665 2608">
          <text:p/>
        </draw:connector>
        <draw:connector draw:style-name="gr194" draw:text-style-name="P10" draw:layer="layout" svg:x1="16.596cm" svg:y1="15.899cm" svg:x2="20.111cm" svg:y2="15.174cm" draw:start-shape="id39" draw:start-glue-point="12" draw:end-shape="id41" draw:end-glue-point="6" svg:d="M16596 15899h1758v-725h1757" svg:viewBox="0 0 3516 726">
          <text:p/>
        </draw:connector>
        <draw:frame draw:style-name="gr5" draw:text-style-name="P5" draw:layer="layout" svg:width="3.085cm" svg:height="0.725cm" svg:x="17.232cm" svg:y="16.24cm">
          <draw:text-box>
            <text:p><text:span text:style-name="T1">&lt;&lt;uses&gt;&gt;</text:span></text:p>
          </draw:text-box>
        </draw:frame>
        <draw:connector draw:style-name="gr195" draw:text-style-name="P10" draw:layer="layout" svg:x1="11.15cm" svg:y1="15.899cm" svg:x2="8.259cm" svg:y2="16.458cm" draw:start-shape="id39" draw:start-glue-point="11" draw:end-shape="id42" draw:end-glue-point="13" svg:d="M11150 15899h-1445v559h-1446" svg:viewBox="0 0 2892 560">
          <text:p/>
        </draw:connector>
        <draw:frame draw:style-name="gr5" draw:text-style-name="P5" draw:layer="layout" svg:width="3.085cm" svg:height="0.725cm" svg:x="19.732cm" svg:y="7.577cm">
          <draw:text-box>
            <text:p><text:span text:style-name="T1">&lt;&lt;uses&gt;&gt;</text:span></text:p>
          </draw:text-box>
        </draw:frame>
      </draw:page>
      <draw:page draw:name="Volume" draw:style-name="dp1" draw:master-page-name="Default">
        <draw:custom-shape draw:style-name="gr196" draw:text-style-name="P2" draw:layer="layout" svg:width="23.669cm" svg:height="0.7cm" svg:x="1.461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" draw:layer="layout" svg:width="23.537cm" svg:height="0.7cm" svg:x="1.593cm" svg:y="6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" draw:layer="layout" svg:width="23.819cm" svg:height="0.7cm" svg:x="1.311cm" svg:y="17cm">
          <text:p text:style-name="P30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7.032cm">
          <draw:text-box>
            <text:p><text:span text:style-name="T1">&lt;&lt;uses&gt;&gt;</text:span></text:p>
          </draw:text-box>
        </draw:frame>
        <draw:custom-shape draw:style-name="gr199" draw:text-style-name="P3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0" draw:text-style-name="P7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control.Volume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32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1"><text:span text:style-name="T5">+ set_notify()</text:span></text:p>
              <text:p text:style-name="P31"><text:span text:style-name="T5">+ start()</text:span></text:p>
              <text:p text:style-name="P31"><text:span text:style-name="T5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3" draw:text-style-name="P4" draw:layer="layout" svg:width="24.765cm" svg:height="0.952cm" svg:x="1cm" svg:y="1.1cm">
          <text:p text:style-name="P1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3" draw:text-style-name="P7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i2c_service.I2C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9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9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06" draw:text-style-name="P10" draw:layer="layout" svg:x1="22.449cm" svg:y1="8.906cm" svg:x2="13.941cm" svg:y2="8.247cm" draw:start-shape="id43" draw:start-glue-point="14" draw:end-shape="id44" draw:end-glue-point="13" svg:d="M22449 8906v-659h-8508" svg:viewBox="0 0 8509 660">
          <text:p/>
        </draw:connector>
        <draw:frame draw:style-name="gr5" draw:text-style-name="P5" draw:layer="layout" svg:width="2.512cm" svg:height="0.725cm" svg:x="15.287cm" svg:y="7.467cm">
          <draw:text-box>
            <text:p><text:span text:style-name="T1">&lt;&lt;has&gt;&gt;</text:span></text:p>
          </draw:text-box>
        </draw:frame>
        <draw:frame draw:style-name="gr207" draw:text-style-name="P33" draw:layer="layout" svg:width="7.937cm" svg:height="1.673cm" svg:x="2.587cm" svg:y="18.145cm">
          <draw:text-box>
            <text:p><text:span text:style-name="T8">Waarom start(), stop(), set_notify(). Staat altijd op notify. Dus notify default aan. Gaat nooit gestopt worden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08" draw:text-style-name="P2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22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5" draw:id="id4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0" draw:text-style-name="P2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24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2" draw:text-style-name="P10" draw:layer="layout" draw:line-skew="0.457cm" svg:x1="9.115cm" svg:y1="7.612cm" svg:x2="7.552cm" svg:y2="5.566cm" draw:start-shape="id44" draw:start-glue-point="5" draw:end-shape="id45" draw:end-glue-point="4" svg:d="M9115 7612v-567h-1563v-1479" svg:viewBox="0 0 1564 2047">
          <text:p/>
        </draw:connector>
        <draw:g draw:style-name="gr6" xml:id="id46" draw:id="id4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13" draw:text-style-name="P19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volume_control.</text:span></text:p>
            <text:p text:style-name="P18"><text:span text:style-name="T2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9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5" draw:text-style-name="P9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6" draw:text-style-name="P10" draw:layer="layout" svg:x1="11.841cm" svg:y1="12.932cm" svg:x2="13.571cm" svg:y2="10.916cm" draw:start-shape="id46" draw:start-glue-point="0" draw:end-shape="id44" draw:end-glue-point="10" svg:d="M11841 12932v-1009h1730v-1007" svg:viewBox="0 0 1731 2017">
          <text:p/>
        </draw:connector>
        <draw:g draw:style-name="gr6" xml:id="id47" draw:id="id4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17" draw:text-style-name="P19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8" draw:text-style-name="P9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9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0" draw:text-style-name="P10" draw:layer="layout" svg:x1="5.288cm" svg:y1="11.412cm" svg:x2="7.257cm" svg:y2="10.372cm" draw:start-shape="id47" draw:start-glue-point="0" draw:end-shape="id44" draw:end-glue-point="11" svg:d="M5288 11412v-1040h1969" svg:viewBox="0 0 1970 1041">
          <text:p/>
        </draw:connector>
        <draw:custom-shape draw:style-name="gr221" draw:text-style-name="P12" xml:id="id48" draw:id="id48" draw:layer="layout" svg:width="8.89cm" svg:height="1.719cm" svg:x="16.24cm" svg:y="14.421cm">
          <text:p text:style-name="P11"><text:span text:style-name="T4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22" draw:text-style-name="P13" draw:layer="layout" draw:type="line" svg:x1="14.11cm" svg:y1="14.427cm" svg:x2="16.24cm" svg:y2="15.281cm" draw:start-shape="id46" draw:end-shape="id48" draw:end-glue-point="5" svg:d="M14110 14427l2130 854" svg:viewBox="0 0 2131 855">
          <text:p/>
        </draw:connector>
        <draw:g draw:style-name="gr6" xml:id="id49" draw:id="id4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23" draw:text-style-name="P7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ad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4" draw:text-style-name="P9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5" draw:text-style-name="P9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26" draw:text-style-name="P10" draw:layer="layout" svg:x1="15.358cm" svg:y1="18.188cm" svg:x2="13.941cm" svg:y2="10.372cm" draw:start-shape="id49" draw:start-glue-point="5" draw:end-shape="id44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27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" draw:layer="layout" svg:width="19.218cm" svg:height="0.7cm" svg:x="1.549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7.895cm">
          <draw:text-box>
            <text:p><text:span text:style-name="T1">&lt;&lt;uses&gt;&gt;</text:span></text:p>
          </draw:text-box>
        </draw:frame>
        <draw:custom-shape draw:style-name="gr230" draw:text-style-name="P3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31" draw:text-style-name="P7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error_service.py.Error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2" draw:text-style-name="P9" draw:layer="layout" svg:width="6.229cm" svg:height="0.746cm" svg:x="1.756cm" svg:y="10.064cm">
              <text:p text:style-name="P8"><text:span text:style-name="T3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9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- init()</text:span></text:p>
              <text:p text:style-name="P8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4" draw:text-style-name="P4" draw:layer="layout" svg:width="20.637cm" svg:height="0.952cm" svg:x="1cm" svg:y="1.1cm">
          <text:p text:style-name="P1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0" draw:id="id50">
          <draw:glue-point draw:id="4" svg:x="-4cm" svg:y="-5cm"/>
          <draw:custom-shape draw:style-name="gr235" draw:text-style-name="P19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6" draw:text-style-name="P9" draw:layer="layout" svg:width="5.715cm" svg:height="0.771cm" svg:x="11.132cm" svg:y="15.153cm">
            <text:p text:style-name="P8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9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8" draw:text-style-name="P10" draw:layer="layout" svg:x1="13.989cm" svg:y1="14cm" svg:x2="11.881cm" svg:y2="12.492cm" draw:start-shape="id50" draw:end-shape="id51" draw:end-glue-point="5" svg:d="M13989 14000v-754h-2108v-754" svg:viewBox="0 0 2109 1509">
          <text:p/>
        </draw:connector>
        <draw:frame draw:style-name="gr5" draw:text-style-name="P5" draw:layer="layout" svg:width="3.085cm" svg:height="0.725cm" svg:x="14.335cm" svg:y="12.975cm">
          <draw:text-box>
            <text:p><text:span text:style-name="T1">&lt;&lt;uses&gt;&gt;</text:span></text:p>
          </draw:text-box>
        </draw:frame>
        <draw:g draw:style-name="gr6" xml:id="id51" draw:id="id51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39" draw:text-style-name="P19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9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9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2" draw:text-style-name="P10" draw:layer="layout" svg:x1="10.712cm" svg:y1="11.105cm" svg:x2="7.984cm" svg:y2="9.547cm" draw:start-shape="id51" draw:end-shape="id52" draw:end-glue-point="13" svg:d="M10712 11105h-1364v-1558h-1364" svg:viewBox="0 0 2729 1559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3" draw:text-style-name="P2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22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3" draw:id="id5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5" draw:text-style-name="P2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24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7" draw:text-style-name="P10" draw:layer="layout" draw:line-skew="0.409cm" svg:x1="3.488cm" svg:y1="8.912cm" svg:x2="7.159cm" svg:y2="5.606cm" draw:start-shape="id52" draw:start-glue-point="5" draw:end-shape="id53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48" draw:text-style-name="P2" draw:layer="layout" svg:width="26.821cm" svg:height="0.7cm" svg:x="1.484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" draw:layer="layout" svg:width="26.346cm" svg:height="0.7cm" svg:x="1.637cm" svg:y="7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draw:layer="layout" svg:width="26.435cm" svg:height="0.679cm" svg:x="1.635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2" draw:layer="layout" svg:width="26.435cm" svg:height="3.049cm" svg:x="1.635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draw:layer="layout" svg:width="26.672cm" svg:height="0.7cm" svg:x="1.311cm" svg:y="18.5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8.212cm">
          <draw:text-box>
            <text:p><text:span text:style-name="T1">&lt;&lt;uses&gt;&gt;</text:span></text:p>
          </draw:text-box>
        </draw:frame>
        <draw:custom-shape draw:style-name="gr61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53" draw:text-style-name="P7" draw:layer="layout" svg:width="8.769cm" svg:height="1.153cm" svg:x="2.856cm" svg:y="8.9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</text:span></text:p>
              <text:p text:style-name="P6"><text:span text:style-name="T2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9" draw:layer="layout" svg:width="8.769cm" svg:height="0.985cm" svg:x="2.856cm" svg:y="10.14cm">
              <text:p text:style-name="P8"><text:span text:style-name="T3">- CommandMessage()</text:span></text:p>
              <text:p text:style-name="P8"><text:span text:style-name="T3">- Error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5" draw:text-style-name="P9" draw:layer="layout" svg:width="8.769cm" svg:height="2.963cm" svg:x="2.856cm" svg:y="11.0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ubscribe_commands() -&gt; Queue</text:span></text:p>
              <text:p text:style-name="P8"><text:span text:style-name="T3">+ subscribe_errors() -&gt; Queue</text:span></text:p>
              <text:p text:style-name="P8"><text:span text:style-name="T3">+ unsubscribe_commands(queue: Queue)</text:span></text:p>
              <text:p text:style-name="P8"><text:span text:style-name="T3">+ unsubscribe_errors(queue: Queue)</text:span></text:p>
              <text:p text:style-name="P8"><text:span text:style-name="T3">+ publish_command(message: CommandMessage)</text:span></text:p>
              <text:p text:style-name="P8"><text:span text:style-name="T3">+ publish_error(message: ErrorMessage)</text:span></text:p>
              <text:p text:style-name="P8"><text:span text:style-name="T3">+ safe_get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56" draw:text-style-name="P10" draw:layer="layout" svg:x1="9.189cm" svg:y1="8.989cm" svg:x2="10.015cm" svg:y2="5.45cm" draw:start-shape="id54" draw:start-glue-point="14" draw:end-shape="id55" draw:end-glue-point="5" svg:d="M9189 8989v-1771h826v-1768" svg:viewBox="0 0 827 3540">
          <text:p/>
        </draw:connector>
        <draw:custom-shape draw:style-name="gr65" draw:text-style-name="P4" draw:layer="layout" svg:width="27.7cm" svg:height="0.952cm" svg:x="1cm" svg:y="1.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57" draw:text-style-name="P7" draw:layer="layout" svg:width="4.762cm" svg:height="1.627cm" svg:x="13.547cm" svg:y="14.65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9" draw:layer="layout" svg:width="4.762cm" svg:height="1.494cm" svg:x="13.547cm" svg:y="16.279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9" draw:text-style-name="P9" draw:layer="layout" svg:width="4.762cm" svg:height="0.599cm" svg:x="13.547cm" svg:y="17.77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0" draw:text-style-name="P7" draw:layer="layout" svg:width="5.079cm" svg:height="1.627cm" svg:x="7.197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Error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9" draw:layer="layout" svg:width="5.079cm" svg:height="0.994cm" svg:x="7.197cm" svg:y="16.597cm">
              <text:p text:style-name="P8"><text:span text:style-name="T3">+ source: String</text:span></text:p>
              <text:p text:style-name="P8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2" draw:text-style-name="P9" draw:layer="layout" svg:width="5.079cm" svg:height="0.599cm" svg:x="7.197cm" svg:y="17.5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3" draw:text-style-name="P7" draw:layer="layout" svg:width="9.208cm" svg:height="1.153cm" svg:x="18.822cm" svg:y="8.39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PubSubManag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9" draw:layer="layout" svg:width="9.208cm" svg:height="1.892cm" svg:x="18.822cm" svg:y="9.552cm">
              <text:p text:style-name="P8"><text:span text:style-name="T3">- Topic.COMMAND: []</text:span></text:p>
              <text:p text:style-name="P8"><text:span text:style-name="T3">- Topic.ERROR: []</text:span></text:p>
              <text:p text:style-name="P8"><text:span text:style-name="T3">- queue: Queue()</text:span></text:p>
              <text:p text:style-name="P8"><text:span text:style-name="T3">- subscribers: dict[Topic, list[Queue]]</text:span></text:p>
              <text:p text:style-name="P8"><text:span text:style-name="T5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5" draw:text-style-name="P9" draw:layer="layout" svg:width="9.208cm" svg:height="1.781cm" svg:x="18.822cm" svg:y="11.4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ubscribe(topic: Topic) -&gt; Queue</text:span></text:p>
              <text:p text:style-name="P8"><text:span text:style-name="T3">+ unsubscripe(topic: Topic, queue:Queu)</text:span></text:p>
              <text:p text:style-name="P8"><text:span text:style-name="T3">+ publish(topic: Topic, </text:span></text:p>
              <text:p text:style-name="P8"><text:span text:style-name="T3"><text:s text:c="14"/></text:span><text:span text:style-name="T3">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6" draw:text-style-name="P7" draw:layer="layout" svg:width="5.398cm" svg:height="1.153cm" svg:x="1.382cm" svg:y="15.08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9" draw:layer="layout" svg:width="5.398cm" svg:height="0.994cm" svg:x="1.382cm" svg:y="16.234cm">
              <text:p text:style-name="P8"><text:span text:style-name="T3">+ COMMAND = "COMMAND"</text:span></text:p>
              <text:p text:style-name="P8"><text:span text:style-name="T3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8" draw:text-style-name="P9" draw:layer="layout" svg:width="5.398cm" svg:height="0.599cm" svg:x="1.382cm" svg:y="17.2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9" draw:text-style-name="P10" draw:layer="layout" svg:x1="26.664cm" svg:y1="14.951cm" svg:x2="25.472cm" svg:y2="13.225cm" draw:start-shape="id56" draw:start-glue-point="14" draw:end-shape="id57" draw:end-glue-point="9" svg:d="M26664 14951v-864h-1192v-862" svg:viewBox="0 0 1193 1727">
          <text:p/>
        </draw:connector>
        <draw:frame draw:style-name="gr5" draw:text-style-name="P5" draw:layer="layout" svg:width="2.54cm" svg:height="0.725cm" svg:x="12.112cm" svg:y="13.927cm">
          <draw:text-box>
            <text:p><text:span text:style-name="T1">&lt;&lt;has&gt;&gt;</text:span></text:p>
          </draw:text-box>
        </draw:frame>
        <draw:connector draw:style-name="gr270" draw:text-style-name="P10" draw:layer="layout" svg:x1="2.883cm" svg:y1="15.082cm" svg:x2="3.345cm" svg:y2="14.017cm" draw:start-shape="id58" draw:start-glue-point="5" draw:end-shape="id54" draw:end-glue-point="7" svg:d="M2883 15082v-534h462v-531" svg:viewBox="0 0 463 1066">
          <text:p/>
        </draw:connector>
        <draw:connector draw:style-name="gr271" draw:text-style-name="P10" draw:layer="layout" svg:x1="8.609cm" svg:y1="14.971cm" svg:x2="9.189cm" svg:y2="14.017cm" draw:start-shape="id59" draw:start-glue-point="5" draw:end-shape="id54" draw:end-glue-point="9" svg:d="M8609 14971v-478h580v-476" svg:viewBox="0 0 581 955">
          <text:p/>
        </draw:connector>
        <draw:connector draw:style-name="gr272" draw:text-style-name="P10" draw:layer="layout" svg:x1="14.871cm" svg:y1="14.653cm" svg:x2="11.624cm" svg:y2="13.473cm" draw:start-shape="id60" draw:start-glue-point="5" draw:end-shape="id54" draw:end-glue-point="12" svg:d="M14871 14653v-1180h-3247" svg:viewBox="0 0 3248 1181">
          <text:p/>
        </draw:connector>
        <draw:g draw:style-name="gr6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73" draw:text-style-name="P19" draw:layer="layout" svg:width="6.668cm" svg:height="1.153cm" svg:x="15.622cm" svg:y="4.25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ommand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9" draw:layer="layout" svg:width="6.668cm" svg:height="0.553cm" svg:x="15.622cm" svg:y="5.411cm">
            <text:p text:style-name="P8"><text:span text:style-name="T3">- cmd_queue: subscribe_command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5" draw:text-style-name="P9" draw:layer="layout" svg:width="6.668cm" svg:height="0.498cm" svg:x="15.622cm" svg:y="5.9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5" draw:id="id5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76" draw:text-style-name="P23" draw:layer="layout" svg:width="6.033cm" svg:height="0.679cm" svg:x="7.602cm" svg:y="4.0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24" draw:layer="layout" svg:width="6.033cm" svg:height="0.679cm" svg:x="7.602cm" svg:y="4.7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command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8" draw:text-style-name="P10" draw:layer="layout" svg:x1="15.622cm" svg:y1="5.36cm" svg:x2="13.635cm" svg:y2="4.728cm" draw:start-shape="id61" draw:start-glue-point="3" draw:end-shape="id55" draw:end-glue-point="14" svg:d="M15622 5360h-994v-632h-993" svg:viewBox="0 0 1988 633">
          <text:p/>
        </draw:connector>
        <draw:custom-shape draw:style-name="gr279" draw:text-style-name="P12" xml:id="id62" draw:id="id62" draw:layer="layout" svg:width="4.092cm" svg:height="2.572cm" svg:x="23.542cm" svg:y="4.143cm">
          <text:p text:style-name="P11"><text:span text:style-name="T4">The command_listener wait for a commands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80" draw:text-style-name="P13" draw:layer="layout" draw:type="line" svg:x1="22.29cm" svg:y1="5.129cm" svg:x2="23.542cm" svg:y2="5.429cm" draw:start-shape="id61" draw:start-glue-point="23" draw:end-shape="id62" draw:end-glue-point="5" svg:d="M22290 5129l1252 300" svg:viewBox="0 0 1253 301">
          <text:p/>
        </draw:connector>
        <draw:g draw:style-name="gr6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1" draw:text-style-name="P19" draw:layer="layout" svg:width="3.175cm" svg:height="1.153cm" svg:x="1.952cm" svg:y="4.4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2" draw:text-style-name="P9" draw:layer="layout" svg:width="3.175cm" svg:height="0.517cm" svg:x="1.952cm" svg:y="5.6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9" draw:layer="layout" svg:width="3.175cm" svg:height="0.465cm" svg:x="1.952cm" svg:y="6.1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4" draw:text-style-name="P10" draw:layer="layout" svg:x1="5.126cm" svg:y1="6.083cm" svg:x2="7.602cm" svg:y2="4.795cm" draw:start-shape="id63" draw:start-glue-point="12" draw:end-shape="id55" draw:end-glue-point="9" svg:d="M5126 6083h1238v-1288h1238" svg:viewBox="0 0 2477 1289">
          <text:p/>
        </draw:connector>
        <draw:g draw:style-name="gr6" xml:id="id56" draw:id="id5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85" draw:text-style-name="P7" draw:layer="layout" svg:width="4.762cm" svg:height="1.627cm" svg:x="23.225cm" svg:y="14.9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subscribers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4.762cm" svg:height="0.892cm" svg:x="23.225cm" svg:y="16.577cm">
              <text:p text:style-name="P8"><text:span text:style-name="T3">+ Topic: String</text:span></text:p>
              <text:p text:style-name="P8"><text:span text:style-name="T3">+ Queue: list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9" draw:layer="layout" svg:width="4.762cm" svg:height="0.358cm" svg:x="23.22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88" draw:text-style-name="P12" xml:id="id64" draw:id="id64" draw:layer="layout" svg:width="4.127cm" svg:height="2.54cm" svg:x="13.4cm" svg:y="8.855cm">
          <text:p text:style-name="P11"><text:span text:style-name="T4">The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89" draw:text-style-name="P13" draw:layer="layout" draw:type="line" svg:x1="13.4cm" svg:y1="10.125cm" svg:x2="11.624cm" svg:y2="9.623cm" draw:start-shape="id64" draw:start-glue-point="5" draw:end-shape="id54" draw:end-glue-point="13" svg:d="M13400 10125l-1776-502" svg:viewBox="0 0 1777 503">
          <text:p/>
        </draw:connector>
      </draw:page>
      <draw:page draw:name="Power Supply" draw:style-name="dp1" draw:master-page-name="Default">
        <draw:custom-shape draw:style-name="gr227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" draw:layer="layout" svg:width="19.218cm" svg:height="0.7cm" svg:x="1.549cm" svg:y="7.2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2" draw:layer="layout" svg:width="19.456cm" svg:height="0.7cm" svg:x="1.229cm" svg:y="15.28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8.212cm">
          <draw:text-box>
            <text:p><text:span text:style-name="T1">&lt;&lt;uses&gt;&gt;</text:span></text:p>
          </draw:text-box>
        </draw:frame>
        <draw:custom-shape draw:style-name="gr290" draw:text-style-name="P3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1" draw:text-style-name="P7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power_supply_control.PowerSupply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2" draw:text-style-name="P9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9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t_nom_voltage()</text:span></text:p>
              <text:p text:style-name="P8"><text:span text:style-name="T3">+ set_max_voltage()</text:span></text:p>
              <text:p text:style-name="P8"><text:span text:style-name="T3">+ set_standby_voltage()</text:span></text:p>
              <text:p text:style-name="P8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4" draw:text-style-name="P4" draw:layer="layout" svg:width="20.637cm" svg:height="0.952cm" svg:x="1cm" svg:y="1.1cm">
          <text:p text:style-name="P1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4" draw:text-style-name="P7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9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9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97" draw:text-style-name="P10" draw:layer="layout" svg:x1="14.261cm" svg:y1="11.428cm" svg:x2="10.747cm" svg:y2="10.657cm" draw:start-shape="id65" draw:start-glue-point="5" draw:end-shape="id66" draw:end-glue-point="1" svg:d="M14261 11428v-771h-3514" svg:viewBox="0 0 3515 772">
          <text:p/>
        </draw:connector>
        <draw:frame draw:style-name="gr5" draw:text-style-name="P5" draw:layer="layout" svg:width="2.512cm" svg:height="0.725cm" svg:x="12.43cm" svg:y="9.572cm">
          <draw:text-box>
            <text:p><text:span text:style-name="T1">&lt;&lt;has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98" draw:text-style-name="P2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22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67" draw:id="id6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0" draw:text-style-name="P2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24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2" draw:text-style-name="P10" draw:layer="layout" draw:line-skew="0.926cm" svg:x1="4.255cm" svg:y1="8.889cm" svg:x2="7.942cm" svg:y2="5.866cm" draw:start-shape="id66" draw:start-glue-point="5" draw:end-shape="id67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303" draw:text-style-name="P2" draw:layer="layout" svg:width="27.047cm" svg:height="0.7cm" svg:x="1.258cm" svg:y="2.0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2" draw:layer="layout" svg:width="26.989cm" svg:height="0.7cm" svg:x="1.316cm" svg:y="6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3" draw:id="id73">
          <draw:glue-point draw:id="4" svg:x="-0.787cm" svg:y="5.055cm"/>
          <draw:glue-point draw:id="5" svg:x="-5.063cm" svg:y="-3.065cm"/>
          <draw:glue-point draw:id="6" svg:x="-3.788cm" svg:y="5.05cm"/>
          <draw:custom-shape draw:style-name="gr305" draw:text-style-name="P7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led_control.</text:span></text:p>
            <text:p text:style-name="P6"><text:span text:style-name="T2">LEDControl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6" draw:text-style-name="P9" draw:layer="layout" svg:width="4.363cm" svg:height="0.671cm" svg:x="1.317cm" svg:y="9.312cm">
            <text:p text:style-name="P8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7" draw:text-style-name="P9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turn_on_led()</text:span></text:p>
            <text:p text:style-name="P8"><text:span text:style-name="T3">+ turn_off_led()</text:span></text:p>
            <text:p text:style-name="P8"><text:span text:style-name="T3">+ turn_off_all_leds()</text:span></text:p>
            <text:p text:style-name="P8"><text:span text:style-name="T3">+ turn_off_all_leds()</text:span></text:p>
            <text:p text:style-name="P8"><text:span text:style-name="T3">+ get_led_state()l</text:span></text:p>
            <text:p text:style-name="P8"><text:span text:style-name="T3">+ oneshot_on_led()</text:span></text:p>
            <text:p text:style-name="P8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8" draw:text-style-name="P34" draw:layer="layout" svg:width="27.204cm" svg:height="0.7cm" svg:x="1.101cm" svg:y="16.947cm">
          <text:p text:style-name="P30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3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2" draw:id="id7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0" draw:text-style-name="P7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1" draw:text-style-name="P9" draw:layer="layout" svg:width="4.602cm" svg:height="0.754cm" svg:x="7.185cm" svg:y="9.687cm">
              <text:p text:style-name="P8"><text:span text:style-name="T3">- stop_evt: Event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2" draw:text-style-name="P9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313" draw:text-style-name="P7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ing.</text:span></text:p>
              <text:p text:style-name="P6"><text:span text:style-name="T2">BackLighting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4" draw:text-style-name="P9" draw:layer="layout" svg:width="5.465cm" svg:height="1.06cm" svg:x="15.75cm" svg:y="9.647cm">
              <text:p text:style-name="P8"><text:span text:style-name="T3">- thread: backlighting_manager</text:span></text:p>
              <text:p text:style-name="P8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5" draw:text-style-name="P9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2.512cm" svg:height="0.725cm" svg:x="8.965cm" svg:y="7.35cm">
          <draw:text-box>
            <text:p><text:span text:style-name="T1">&lt;&lt;uses&gt;&gt;</text:span></text:p>
          </draw:text-box>
        </draw:frame>
        <draw:custom-shape draw:style-name="gr65" draw:text-style-name="P4" draw:layer="layout" svg:width="27.7cm" svg:height="0.952cm" svg:x="1cm" svg:y="1cm">
          <text:p text:style-name="P1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6" draw:text-style-name="P7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7" draw:text-style-name="P9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8" draw:text-style-name="P9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9" draw:text-style-name="P7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light_sensor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0" draw:text-style-name="P9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1" draw:text-style-name="P9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22" draw:text-style-name="P7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_da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3" draw:text-style-name="P9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4" draw:text-style-name="P9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1" draw:id="id7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25" draw:text-style-name="P19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ingleton&gt;&gt;</text:span></text:p>
            <text:p text:style-name="P18"><text:span text:style-name="T2">gpio_service.</text:span></text:p>
            <text:p text:style-name="P18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6" draw:text-style-name="P35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7" draw:text-style-name="P9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8" draw:text-style-name="P10" draw:layer="layout" draw:line-skew="-2.199cm" svg:x1="18.991cm" svg:y1="17.936cm" svg:x2="20.911cm" svg:y2="11.342cm" draw:start-shape="id68" draw:start-glue-point="4" draw:end-shape="id69" draw:end-glue-point="10" svg:d="M18991 17936v-5497h1920v-1097" svg:viewBox="0 0 1921 6595">
          <text:p/>
        </draw:connector>
        <draw:connector draw:style-name="gr329" draw:text-style-name="P10" draw:layer="layout" draw:line-skew="-2.581cm" svg:x1="17.899cm" svg:y1="17.97cm" svg:x2="19.696cm" svg:y2="11.342cm" draw:start-shape="id70" draw:start-glue-point="15" draw:end-shape="id69" draw:end-glue-point="9" svg:d="M17899 17970v-5896h1797v-732" svg:viewBox="0 0 1798 6629">
          <text:p/>
        </draw:connector>
        <draw:connector draw:style-name="gr330" draw:text-style-name="P10" draw:layer="layout" svg:x1="8.319cm" svg:y1="14.283cm" svg:x2="8.465cm" svg:y2="11.434cm" draw:start-shape="id71" draw:start-glue-point="14" draw:end-shape="id72" draw:end-glue-point="8" svg:d="M8319 14283v-1426h146v-1423" svg:viewBox="0 0 147 2850">
          <text:p/>
        </draw:connector>
        <draw:connector draw:style-name="gr331" draw:text-style-name="P10" draw:layer="layout" svg:x1="6.204cm" svg:y1="14.283cm" svg:x2="3.498cm" svg:y2="12.946cm" draw:start-shape="id71" draw:start-glue-point="4" draw:end-shape="id73" draw:end-glue-point="2" svg:d="M6204 14283v-670h-2706v-667" svg:viewBox="0 0 2707 1338">
          <text:p/>
        </draw:connector>
        <draw:connector draw:style-name="gr332" draw:text-style-name="P10" draw:layer="layout" svg:x1="21.91cm" svg:y1="13.161cm" svg:x2="21.214cm" svg:y2="10.798cm" draw:start-shape="id74" draw:start-glue-point="5" draw:end-shape="id69" draw:end-glue-point="12" svg:d="M21910 13161v-2363h-696" svg:viewBox="0 0 697 2364">
          <text:p/>
        </draw:connector>
        <draw:frame draw:style-name="gr5" draw:text-style-name="P5" draw:layer="layout" svg:width="2.512cm" svg:height="0.725cm" svg:x="19.415cm" svg:y="12.43cm">
          <draw:text-box>
            <text:p><text:span text:style-name="T1">&lt;&lt;has&gt;&gt;</text:span></text:p>
          </draw:text-box>
        </draw:frame>
        <draw:frame draw:style-name="gr5" draw:text-style-name="P5" draw:layer="layout" svg:width="2.512cm" svg:height="0.725cm" svg:x="5.762cm" svg:y="12.975cm">
          <draw:text-box>
            <text:p><text:span text:style-name="T1">&lt;&lt;has&gt;&gt;</text:span></text:p>
          </draw:text-box>
        </draw:frame>
        <draw:frame draw:style-name="gr333" draw:text-style-name="P33" draw:layer="layout" svg:width="6.35cm" svg:height="2.147cm" svg:x="1.635cm" svg:y="17.51cm">
          <draw:text-box>
            <text:p><text:span text:style-name="T8">Waarom backlighting thread met stop en off. Staat eigenlijk altijd aan! Wordt ook in de module gestart!</text:span></text:p>
          </draw:text-box>
        </draw:frame>
        <draw:g draw:style-name="gr6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4" draw:text-style-name="P7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thread&gt;&gt;</text:span></text:p>
              <text:p text:style-name="P6"><text:span text:style-name="T2">backlighting.</text:span></text:p>
              <text:p text:style-name="P6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9" draw:layer="layout" svg:width="4.965cm" svg:height="0.754cm" svg:x="23.322cm" svg:y="10.394cm">
              <text:p text:style-name="P8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9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37" draw:text-style-name="P10" draw:layer="layout" svg:x1="23.323cm" svg:y1="9.403cm" svg:x2="21.214cm" svg:y2="8.656cm" draw:start-shape="id75" draw:start-glue-point="6" draw:end-shape="id69" draw:end-glue-point="13" svg:d="M23323 9403h-1055v-747h-1054" svg:viewBox="0 0 2110 748">
          <text:p/>
        </draw:connector>
        <draw:connector draw:style-name="gr338" draw:text-style-name="P10" draw:layer="layout" svg:x1="25.577cm" svg:y1="13.161cm" svg:x2="26.907cm" svg:y2="11.747cm" draw:start-shape="id74" draw:start-glue-point="14" draw:end-shape="id75" draw:end-glue-point="9" svg:d="M25577 13161v-708h1330v-706" svg:viewBox="0 0 1331 1415">
          <text:p/>
        </draw:connector>
        <draw:frame draw:style-name="gr5" draw:text-style-name="P5" draw:layer="layout" svg:width="2.512cm" svg:height="0.725cm" svg:x="24.177cm" svg:y="11.795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21.955cm" svg:y="7.895cm">
          <draw:text-box>
            <text:p><text:span text:style-name="T1">&lt;&lt;consists of&gt;&gt;</text:span></text:p>
          </draw:text-box>
        </draw:frame>
        <draw:g draw:style-name="gr6" xml:id="id76" draw:id="id7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9" draw:text-style-name="P19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led_control.</text:span></text:p>
            <text:p text:style-name="P18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9" draw:layer="layout" svg:width="3.492cm" svg:height="0.517cm" svg:x="1.5cm" svg:y="15.813cm">
            <text:p text:style-name="P8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9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2" draw:text-style-name="P10" draw:layer="layout" svg:x1="2.471cm" svg:y1="14.187cm" svg:x2="1.846cm" svg:y2="12.946cm" draw:start-shape="id76" draw:start-glue-point="5" draw:end-shape="id73" draw:end-glue-point="6" svg:d="M2471 14187v-622h-625v-619" svg:viewBox="0 0 626 1242">
          <text:p/>
        </draw:connector>
        <draw:frame draw:style-name="gr5" draw:text-style-name="P5" draw:layer="layout" svg:width="3.81cm" svg:height="0.725cm" svg:x="1cm" svg:y="13.382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43" draw:text-style-name="P2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22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77" draw:id="id7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45" draw:text-style-name="P2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24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leds = LEDControl()</text:span></text:p>
            <text:p text:style-name="P15"><text:span text:style-name="T2">- backlighting = Backlighting()</text:span></text:p>
            <text:p text:style-name="P15"><text:span text:style-name="T2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7" draw:text-style-name="P10" draw:layer="layout" svg:x1="8.465cm" svg:y1="8.061cm" svg:x2="11.394cm" svg:y2="6.115cm" draw:start-shape="id72" draw:start-glue-point="5" draw:end-shape="id77" draw:end-glue-point="5" svg:d="M8465 8061v-974h2929v-972" svg:viewBox="0 0 2930 1947">
          <text:p/>
        </draw:connector>
        <draw:connector draw:style-name="gr348" draw:text-style-name="P10" draw:layer="layout" svg:x1="3.498cm" svg:y1="7.685cm" svg:x2="9.461cm" svg:y2="6.115cm" draw:end-shape="id77" draw:end-glue-point="4" svg:d="M3498 7685v-522h5963v-1048" svg:viewBox="0 0 5964 1571">
          <text:p/>
        </draw:connector>
        <draw:connector draw:style-name="gr349" draw:text-style-name="P10" draw:layer="layout" svg:x1="20.911cm" svg:y1="8.021cm" svg:x2="17.192cm" svg:y2="5.46cm" draw:start-shape="id69" draw:start-glue-point="15" draw:end-shape="id77" draw:end-glue-point="8" svg:d="M20911 8021v-2561h-3719" svg:viewBox="0 0 3720 2562">
          <text:p/>
        </draw:connector>
        <draw:g draw:style-name="gr6" xml:id="id78" draw:id="id7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50" draw:text-style-name="P19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9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2" draw:text-style-name="P9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3" draw:text-style-name="P10" draw:layer="layout" svg:x1="13.738cm" svg:y1="12.219cm" svg:x2="11.786cm" svg:y2="10.89cm" draw:start-shape="id78" draw:end-shape="id72" draw:end-glue-point="12" svg:d="M13738 12219v-1329h-1952" svg:viewBox="0 0 1953 1330">
          <text:p/>
        </draw:connector>
        <draw:frame draw:style-name="gr5" draw:text-style-name="P5" draw:layer="layout" svg:width="2.512cm" svg:height="0.725cm" svg:x="12.458cm" svg:y="10.207cm">
          <draw:text-box>
            <text:p><text:span text:style-name="T1">&lt;&lt;uses&gt;&gt;</text:span></text:p>
          </draw:text-box>
        </draw:frame>
        <draw:frame draw:style-name="gr5" draw:text-style-name="P5" draw:layer="layout" svg:width="2.512cm" svg:height="0.725cm" svg:x="18.462cm" svg:y="4.492cm">
          <draw:text-box>
            <text:p><text:span text:style-name="T1">&lt;&lt;uses&gt;&gt;</text:span></text:p>
          </draw:text-box>
        </draw:frame>
      </draw:page>
      <draw:page draw:name="Music Players" draw:style-name="dp1" draw:master-page-name="Default">
        <draw:custom-shape draw:style-name="gr354" draw:text-style-name="P2" draw:layer="layout" svg:width="25.039cm" svg:height="0.7cm" svg:x="1.6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2" draw:layer="layout" svg:width="25.091cm" svg:height="0.7cm" svg:x="1.6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56" draw:text-style-name="P2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22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8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3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9" draw:id="id7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360" draw:text-style-name="P7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monitor.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9" draw:layer="layout" svg:width="5.397cm" svg:height="0.545cm" svg:x="7.655cm" svg:y="10.295cm">
              <text:p text:style-name="P8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9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1" draw:id="id8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63" draw:text-style-name="P7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control.MPD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9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9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+ is_web_radio()</text:span></text:p>
              <text:p text:style-name="P8"><text:span text:style-name="T3">+ next()</text:span></text:p>
              <text:p text:style-name="P8"><text:span text:style-name="T3">+ play()</text:span></text:p>
              <text:p text:style-name="P8"><text:span text:style-name="T3">+ stop()</text:span></text:p>
              <text:p text:style-name="P8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2" draw:id="id8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366" draw:text-style-name="P7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spotify_connect.SpotifyConnec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7" draw:text-style-name="P9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8" draw:text-style-name="P9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play()</text:span></text:p>
              <text:p text:style-name="P8"><text:span text:style-name="T3">+ pause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69" draw:text-style-name="P10" draw:layer="layout" draw:line-skew="0.511cm" svg:x1="9.155cm" svg:y1="9.143cm" svg:x2="10.029cm" svg:y2="6.816cm" draw:start-shape="id79" draw:start-glue-point="5" draw:end-shape="id80" draw:end-glue-point="5" svg:d="M9155 9143v-654h874v-1673" svg:viewBox="0 0 875 2328">
          <text:p/>
        </draw:connector>
        <draw:connector draw:style-name="gr370" draw:text-style-name="P10" draw:layer="layout" draw:line-skew="0.218cm" svg:x1="1.841cm" svg:y1="9.094cm" svg:x2="8.429cm" svg:y2="6.816cm" draw:start-shape="id81" draw:start-glue-point="4" draw:end-shape="id80" draw:end-glue-point="4" svg:d="M1841 9094v-922h6588v-1356" svg:viewBox="0 0 6589 2279">
          <text:p/>
        </draw:connector>
        <draw:connector draw:style-name="gr371" draw:text-style-name="P10" draw:layer="layout" svg:x1="24.127cm" svg:y1="8.795cm" svg:x2="14.83cm" svg:y2="5.146cm" draw:start-shape="id82" draw:start-glue-point="14" draw:end-shape="id80" draw:end-glue-point="14" svg:d="M24127 8795v-3649h-9297" svg:viewBox="0 0 9298 3650">
          <text:p/>
        </draw:connector>
        <draw:custom-shape draw:style-name="gr372" draw:text-style-name="P4" draw:layer="layout" svg:width="25.995cm" svg:height="1.205cm" svg:x="1cm" svg:y="1.099cm">
          <text:p text:style-name="P1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725cm" svg:x="2.587cm" svg:y="8.302cm">
          <draw:text-box>
            <text:p><text:span text:style-name="T1">&lt;&lt;uses&gt;&gt;</text:span></text:p>
          </draw:text-box>
        </draw:frame>
        <draw:g draw:style-name="gr6" xml:id="id84" draw:id="id84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73" draw:text-style-name="P7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_service.MPDService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9" draw:layer="layout" svg:width="5.397cm" svg:height="0.669cm" svg:x="7.603cm" svg:y="15.201cm">
            <text:p text:style-name="P8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5" draw:text-style-name="P9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get_stats()</text:span></text:p>
            <text:p text:style-name="P8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3" draw:id="id83">
          <draw:custom-shape draw:style-name="gr376" draw:text-style-name="P7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.MPDClient</text:span></text:p>
            <text:p text:style-name="P6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9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9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idle()</text:span></text:p>
            <text:p text:style-name="P8"><text:span text:style-name="T3">+ update()</text:span></text:p>
            <text:p text:style-name="P8"><text:span text:style-name="T3">+ next()</text:span></text:p>
            <text:p text:style-name="P8"><text:span text:style-name="T3">+ play()</text:span></text:p>
            <text:p text:style-name="P8"><text:span text:style-name="T3">+ stop()</text:span></text:p>
            <text:p text:style-name="P8"><text:span text:style-name="T3">+ pause()</text:span></text:p>
            <text:p text:style-name="P8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9" draw:text-style-name="P10" draw:layer="layout" svg:x1="14.252cm" svg:y1="15.889cm" svg:x2="13cm" svg:y2="15.652cm" draw:start-shape="id83" draw:start-glue-point="3" draw:end-shape="id84" draw:end-glue-point="1" svg:d="M14252 15889h-627v-237h-625" svg:viewBox="0 0 1253 238">
          <text:p/>
        </draw:connector>
        <draw:frame draw:style-name="gr5" draw:text-style-name="P5" draw:layer="layout" svg:width="2.83cm" svg:height="0.725cm" svg:x="4.492cm" svg:y="13.61cm">
          <draw:text-box>
            <text:p><text:span text:style-name="T1">&lt;&lt;is A&gt;&gt;</text:span></text:p>
          </draw:text-box>
          <draw:glue-point draw:id="4" svg:x="0.512cm" svg:y="-0.606cm"/>
        </draw:frame>
        <draw:connector draw:style-name="gr380" draw:text-style-name="P10" draw:layer="layout" svg:x1="12.636cm" svg:y1="14.048cm" svg:x2="11.552cm" svg:y2="11.833cm" draw:start-shape="id84" draw:start-glue-point="6" draw:end-shape="id79" draw:end-glue-point="9" svg:d="M12636 14048v-1108h-1084v-1107" svg:viewBox="0 0 1085 2216">
          <text:p/>
        </draw:connector>
        <draw:connector draw:style-name="gr381" draw:text-style-name="P10" draw:layer="layout" svg:x1="7.603cm" svg:y1="15.652cm" svg:x2="6.637cm" svg:y2="13.489cm" draw:start-shape="id84" draw:start-glue-point="3" draw:end-shape="id81" draw:end-glue-point="10" svg:d="M7603 15652h-966v-2163" svg:viewBox="0 0 967 2164">
          <text:p/>
        </draw:connector>
        <draw:frame draw:style-name="gr5" draw:text-style-name="P5" draw:layer="layout" svg:width="2.222cm" svg:height="0.725cm" svg:x="9.89cm" svg:y="12.975cm">
          <draw:text-box>
            <text:p><text:span text:style-name="T1">&lt;&lt;is A&gt;&gt;</text:span></text:p>
          </draw:text-box>
          <draw:glue-point draw:id="4" svg:x="0.512cm" svg:y="-0.606cm"/>
        </draw:frame>
        <draw:frame draw:style-name="gr5" draw:text-style-name="P5" draw:layer="layout" svg:width="3.147cm" svg:height="0.725cm" svg:x="20.685cm" svg:y="7.985cm">
          <draw:text-box>
            <text:p><text:span text:style-name="T1">&lt;&lt;uses&gt;&gt;</text:span></text:p>
          </draw:text-box>
        </draw:frame>
        <draw:frame draw:style-name="gr5" draw:text-style-name="P5" draw:layer="layout" svg:width="2.54cm" svg:height="0.725cm" svg:x="9.89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10.525cm" svg:y="17.51cm">
          <draw:text-box>
            <text:p><text:span text:style-name="T1">&lt;&lt;consists of&gt;&gt;</text:span></text:p>
          </draw:text-box>
        </draw:frame>
        <draw:g draw:style-name="gr6" xml:id="id85" draw:id="id85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2" draw:text-style-name="P19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control.</text:span></text:p>
            <text:p text:style-name="P18"><text:span text:style-name="T2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9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4" draw:text-style-name="P9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5" draw:text-style-name="P10" draw:layer="layout" svg:x1="4.461cm" svg:y1="15.276cm" svg:x2="3.04cm" svg:y2="13.489cm" draw:start-shape="id85" draw:start-glue-point="8" draw:end-shape="id81" draw:end-glue-point="8" svg:d="M4461 15276v-894h-1421v-893" svg:viewBox="0 0 1422 1788">
          <text:p/>
        </draw:connector>
        <draw:g draw:style-name="gr6" xml:id="id86" draw:id="id8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6" draw:text-style-name="P19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monitor.</text:span></text:p>
            <text:p text:style-name="P18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7" draw:text-style-name="P9" draw:layer="layout" svg:width="3.235cm" svg:height="0.728cm" svg:x="14.335cm" svg:y="10.647cm">
            <text:p text:style-name="P8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8" draw:text-style-name="P9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9" draw:text-style-name="P10" draw:layer="layout" svg:x1="14.335cm" svg:y1="10.515cm" svg:x2="13.051cm" svg:y2="9.778cm" draw:start-shape="id86" draw:end-shape="id79" draw:end-glue-point="13" svg:d="M14335 10515h-642v-737h-642" svg:viewBox="0 0 1285 738">
          <text:p/>
        </draw:connector>
        <draw:g draw:style-name="gr6" xml:id="id80" draw:id="id8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0" draw:text-style-name="P2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1" draw:text-style-name="P24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mpd_monitor = MPDMonitor()</text:span></text:p>
            <text:p text:style-name="P15"><text:span text:style-name="T2">- mpd_control = MPDControl()</text:span></text:p>
            <text:p text:style-name="P15"><text:span text:style-name="T2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81cm" svg:height="0.725cm" svg:x="1.217cm" svg:y="14.462cm">
          <draw:text-box>
            <text:p><text:span text:style-name="T1">&lt;&lt;consists of&gt;&gt;</text:span></text:p>
          </draw:text-box>
        </draw:frame>
      </draw:page>
      <draw:page draw:name="Top Level" draw:style-name="dp1" draw:master-page-name="Default">
        <draw:custom-shape draw:style-name="gr392" draw:text-style-name="P2" draw:layer="layout" svg:width="22.062cm" svg:height="0.7cm" svg:x="0.8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2" draw:layer="layout" svg:width="21.972cm" svg:height="0.7cm" svg:x="0.9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94" draw:text-style-name="P2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5" draw:text-style-name="P22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6" draw:text-style-name="P2" draw:layer="layout" svg:width="21.872cm" svg:height="0.7cm" svg:x="1.02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3" draw:layer="layout" svg:width="28.592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2" draw:id="id9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398" draw:text-style-name="P7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mpd_monitor.</text:span></text:p>
              <text:p text:style-name="P6"><text:span text:style-name="T2">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9" draw:text-style-name="P9" draw:layer="layout" svg:width="3.187cm" svg:height="0.265cm" svg:x="0.988cm" svg:y="1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0" draw:text-style-name="P9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9" draw:id="id8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01" draw:text-style-name="P7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&gt;&gt;</text:span></text:p>
              <text:p text:style-name="P6"><text:span text:style-name="T2">mpd_control.</text:span></text:p>
              <text:p text:style-name="P6"><text:span text:style-name="T2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2" draw:text-style-name="P9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3" draw:text-style-name="P9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8" draw:id="id8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04" draw:text-style-name="P7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spotify_connect.</text:span></text:p>
              <text:p text:style-name="P6"><text:span text:style-name="T2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5" draw:text-style-name="P9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6" draw:text-style-name="P9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07" draw:text-style-name="P4" draw:layer="layout" svg:width="28.575cm" svg:height="1.205cm" svg:x="0.682cm" svg:y="1.099cm">
          <text:p text:style-name="P1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7cm" svg:height="0.725cm" svg:x="19.732cm" svg:y="23.452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3.066cm" svg:y="2.58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.94cm" svg:y="-4.644cm"/>
          <draw:glue-point draw:id="5" svg:x="4.311cm" svg:y="-5.137cm"/>
          <draw:glue-point draw:id="6" svg:x="3.601cm" svg:y="-5.137cm"/>
          <draw:g draw:style-name="gr6">
            <draw:custom-shape draw:style-name="gr408" draw:text-style-name="P7" draw:layer="layout" svg:width="4.513cm" svg:height="1.153cm" svg:x="24.427cm" svg:y="7.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oradio_logging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9" draw:text-style-name="P9" draw:layer="layout" svg:width="4.513cm" svg:height="2.827cm" svg:x="24.427cm" svg:y="8.333cm">
              <text:p text:style-name="P8"><text:span text:style-name="T3">+ oradio_log.debug()</text:span></text:p>
              <text:p text:style-name="P8"><text:span text:style-name="T3">+ oradio_log.warning()</text:span></text:p>
              <text:p text:style-name="P8"><text:span text:style-name="T3">+ oradio_log.info()</text:span></text:p>
              <text:p text:style-name="P8"><text:span text:style-name="T3">+ oradio_log.error()</text:span></text:p>
              <text:p text:style-name="P8"><text:span text:style-name="T3">+ oradio_log_critical()</text:span></text:p>
              <text:p text:style-name="P8"><text:span text:style-name="T3">+ oradio_log.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1" draw:id="id91">
          <draw:custom-shape draw:style-name="gr410" draw:text-style-name="P7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throttled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1" draw:text-style-name="P9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2" draw:text-style-name="P9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1.153cm" svg:y="-4.294cm"/>
          <draw:glue-point draw:id="5" svg:x="3.461cm" svg:y="-5.146cm"/>
          <draw:custom-shape draw:style-name="gr413" draw:text-style-name="P7" draw:layer="layout" svg:width="4.047cm" svg:height="1.153cm" svg:x="24.495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system_so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9" draw:layer="layout" svg:width="4.047cm" svg:height="0.47cm" svg:x="24.495cm" svg:y="12.94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0" draw:id="id9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415" draw:text-style-name="P7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remote_monitoring.</text:span></text:p>
              <text:p text:style-name="P6"><text:span text:style-name="T2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6" draw:text-style-name="P9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7" draw:text-style-name="P9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18" draw:text-style-name="P7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eb_service.</text:span></text:p>
              <text:p text:style-name="P6"><text:span text:style-name="T2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9" draw:text-style-name="P9" draw:layer="layout" svg:width="3.175cm" svg:height="0.264cm" svg:x="10.865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0" draw:text-style-name="P28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5" draw:id="id9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21" draw:text-style-name="P7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ifi_service.</text:span></text:p>
              <text:p text:style-name="P6"><text:span text:style-name="T2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2" draw:text-style-name="P9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3" draw:text-style-name="P28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24" draw:text-style-name="P7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usb_service.</text:span></text:p>
              <text:p text:style-name="P6"><text:span text:style-name="T2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5" draw:text-style-name="P9" draw:layer="layout" svg:width="3.175cm" svg:height="0.455cm" svg:x="19.515cm" svg:y="10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6" draw:text-style-name="P9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9" draw:id="id9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27" draw:text-style-name="P7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volume_control.</text:span></text:p>
              <text:p text:style-name="P6"><text:span text:style-name="T2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8" draw:text-style-name="P9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9" draw:text-style-name="P32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7" draw:id="id9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6">
            <draw:custom-shape draw:style-name="gr430" draw:text-style-name="P7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error_service.py.</text:span></text:p>
              <text:p text:style-name="P6"><text:span text:style-name="T2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1" draw:text-style-name="P9" draw:layer="layout" svg:width="3.81cm" svg:height="0.324cm" svg:x="18.462cm" svg:y="16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2" draw:text-style-name="P9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1.153cm" svg:y="-4.294cm"/>
          <draw:glue-point draw:id="5" svg:x="3.461cm" svg:y="-5.146cm"/>
          <draw:g draw:style-name="gr6">
            <draw:custom-shape draw:style-name="gr433" draw:text-style-name="P7" draw:layer="layout" svg:width="4.753cm" svg:height="1.153cm" svg:x="24.222cm" svg:y="14.33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messaging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4" draw:text-style-name="P9" draw:layer="layout" svg:width="4.753cm" svg:height="1.79cm" svg:x="24.222cm" svg:y="15.488cm">
              <text:p text:style-name="P8"><text:span text:style-name="T3">+ subssctibe_commands()</text:span></text:p>
              <text:p text:style-name="P8"><text:span text:style-name="T3">+ subscribe_errors()</text:span></text:p>
              <text:p text:style-name="P8"><text:span text:style-name="T3">+ publish_command()</text:span></text:p>
              <text:p text:style-name="P8"><text:span text:style-name="T3">+ publish_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3" draw:id="id9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5" draw:text-style-name="P7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power_supply_control.</text:span></text:p>
              <text:p text:style-name="P6"><text:span text:style-name="T2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6" draw:text-style-name="P9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7" draw:text-style-name="P9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0.787cm" svg:y="5.055cm"/>
          <draw:glue-point draw:id="5" svg:x="-5.063cm" svg:y="-3.065cm"/>
          <draw:glue-point draw:id="6" svg:x="-3.788cm" svg:y="5.05cm"/>
          <draw:custom-shape draw:style-name="gr438" draw:text-style-name="P7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class&gt;&gt;</text:span></text:p>
            <text:p text:style-name="P6"><text:span text:style-name="T2">led_control.</text:span></text:p>
            <text:p text:style-name="P6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9" draw:text-style-name="P9" draw:layer="layout" svg:width="3.071cm" svg:height="0.483cm" svg:x="11.081cm" svg:y="13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9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6" draw:id="id9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41" draw:text-style-name="P7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touch_buttons.</text:span></text:p>
              <text:p text:style-name="P6"><text:span text:style-name="T2">TouchButt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2" draw:text-style-name="P9" draw:layer="layout" svg:width="3.235cm" svg:height="0.433cm" svg:x="15.227cm" svg:y="13.5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3" draw:text-style-name="P9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4" draw:id="id9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444" draw:text-style-name="P7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backlighting.</text:span></text:p>
              <text:p text:style-name="P6"><text:span text:style-name="T2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5" draw:text-style-name="P9" draw:layer="layout" svg:width="3.243cm" svg:height="0.558cm" svg:x="13.014cm" svg:y="16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6" draw:text-style-name="P9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7" draw:id="id87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447" draw:text-style-name="P23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8" draw:text-style-name="P24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49">
          <draw:connector draw:style-name="gr450" draw:text-style-name="P36" draw:layer="layout" draw:type="line" svg:x1="4.811cm" svg:y1="6.168cm" svg:x2="4.798cm" svg:y2="16.137cm" draw:start-shape="id87" draw:start-glue-point="16" draw:end-shape="id88" draw:end-glue-point="15" svg:d="M4811 6168l-13 9969" svg:viewBox="0 0 14 9970">
            <text:p/>
          </draw:connector>
          <draw:connector draw:style-name="gr450" draw:text-style-name="P36" draw:layer="layout" draw:type="line" svg:x1="4.793cm" svg:y1="9.463cm" svg:x2="4.269cm" svg:y2="9.573cm" draw:end-shape="id89" draw:end-glue-point="13" svg:d="M4793 9463l-524 110" svg:viewBox="0 0 525 111">
            <text:p/>
          </draw:connector>
          <draw:connector draw:style-name="gr450" draw:text-style-name="P36" draw:layer="layout" draw:type="line" svg:x1="4.807cm" svg:y1="9.44cm" svg:x2="5.71cm" svg:y2="9.573cm" draw:end-shape="id90" draw:end-glue-point="6" svg:d="M4807 9440l903 133" svg:viewBox="0 0 904 134">
            <text:p/>
          </draw:connector>
          <draw:connector draw:style-name="gr450" draw:text-style-name="P36" draw:layer="layout" draw:type="line" svg:x1="4.762cm" svg:y1="12.918cm" svg:x2="5.762cm" svg:y2="12.829cm" draw:end-shape="id91" svg:d="M4762 12918l1000-89" svg:viewBox="0 0 1001 90">
            <text:p/>
          </draw:connector>
          <draw:connector draw:style-name="gr450" draw:text-style-name="P36" draw:layer="layout" draw:type="line" svg:x1="4.749cm" svg:y1="12.916cm" svg:x2="4.174cm" svg:y2="13.074cm" draw:end-shape="id92" draw:end-glue-point="13" svg:d="M4749 12916l-575 158" svg:viewBox="0 0 576 159">
            <text:p/>
          </draw:connector>
          <draw:connector draw:style-name="gr450" draw:text-style-name="P36" draw:layer="layout" draw:type="line" svg:x1="4.855cm" svg:y1="15.066cm" svg:x2="5.784cm" svg:y2="14.998cm" draw:end-shape="id93" draw:end-glue-point="6" svg:d="M4855 15066l929-68" svg:viewBox="0 0 930 69">
            <text:p/>
          </draw:connector>
        </draw:g>
        <draw:connector draw:style-name="gr450" draw:text-style-name="P36" draw:layer="layout" draw:type="line" svg:x1="14.651cm" svg:y1="6.168cm" svg:x2="14.635cm" svg:y2="14.97cm" draw:start-shape="id87" draw:start-glue-point="19" draw:end-shape="id94" draw:end-glue-point="0" svg:d="M14651 6168l-16 8802" svg:viewBox="0 0 17 8803">
          <text:p/>
        </draw:connector>
        <draw:connector draw:style-name="gr450" draw:text-style-name="P36" draw:layer="layout" draw:type="line" svg:x1="14.541cm" svg:y1="10.732cm" svg:x2="14.017cm" svg:y2="10.842cm" svg:d="M14541 10732l-524 110" svg:viewBox="0 0 525 111">
          <text:p/>
        </draw:connector>
        <draw:connector draw:style-name="gr450" draw:text-style-name="P36" draw:layer="layout" draw:type="line" svg:x1="14.692cm" svg:y1="10.179cm" svg:x2="15.248cm" svg:y2="10.226cm" draw:end-shape="id95" draw:end-glue-point="3" svg:d="M14692 10179l556 47" svg:viewBox="0 0 557 48">
          <text:p/>
        </draw:connector>
        <draw:connector draw:style-name="gr450" draw:text-style-name="P36" draw:layer="layout" draw:type="line" svg:x1="14.661cm" svg:y1="12.576cm" svg:x2="15.227cm" svg:y2="12.464cm" draw:end-shape="id96" draw:end-glue-point="21" svg:d="M14661 12576l566-112" svg:viewBox="0 0 567 113">
          <text:p/>
        </draw:connector>
        <draw:connector draw:style-name="gr450" draw:text-style-name="P36" draw:layer="layout" draw:type="line" svg:x1="14.723cm" svg:y1="13.914cm" svg:x2="14.077cm" svg:y2="13.858cm" svg:d="M14723 13914l-646-56" svg:viewBox="0 0 647 57">
          <text:p/>
        </draw:connector>
        <draw:connector draw:style-name="gr450" draw:text-style-name="P36" draw:layer="layout" draw:type="line" svg:x1="18.779cm" svg:y1="6.168cm" svg:x2="18.675cm" svg:y2="14.894cm" draw:start-shape="id87" draw:start-glue-point="7" draw:end-shape="id97" draw:end-glue-point="4" svg:d="M18779 6168l-104 8726" svg:viewBox="0 0 105 8727">
          <text:p/>
        </draw:connector>
        <draw:connector draw:style-name="gr450" draw:text-style-name="P36" draw:layer="layout" draw:type="line" svg:x1="18.769cm" svg:y1="9.525cm" svg:x2="19.516cm" svg:y2="9.578cm" draw:end-shape="id98" draw:end-glue-point="6" svg:d="M18769 9525l747 53" svg:viewBox="0 0 748 54">
          <text:p/>
        </draw:connector>
        <draw:connector draw:style-name="gr450" draw:text-style-name="P36" draw:layer="layout" draw:type="line" svg:x1="18.738cm" svg:y1="12.016cm" svg:x2="19.281cm" svg:y2="12.363cm" draw:end-shape="id99" draw:end-glue-point="6" svg:d="M18738 12016l543 347" svg:viewBox="0 0 544 34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22T17:04:03.159626376</dc:date>
    <meta:editing-duration>PT17H42M24S</meta:editing-duration>
    <meta:editing-cycles>133</meta:editing-cycles>
    <meta:print-date>2026-05-31T17:56:35.806719548</meta:print-date>
    <dc:creator>Henk</dc:creator>
    <meta:printed-by>PDF files: Henk</meta:printed-by>
    <meta:document-statistic meta:object-count="688"/>
  </office:meta>
</office:document-meta>
</file>