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cm" fo:min-width="22.46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45cm" fo:min-width="23.114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3.895cm" fo:padding-top="0.151cm" fo:padding-bottom="0.151cm" fo:padding-left="0.276cm" fo:padding-right="0.276cm" loext:decorative="false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3.895cm" fo:padding-top="0.151cm" fo:padding-bottom="0.151cm" fo:padding-left="0.276cm" fo:padding-right="0.276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6" style:family="graphic">
      <style:graphic-properties style:writing-mode="lr-tb" loext:decorative="false"/>
    </style:style>
    <style:style style:name="gr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2.472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45cm" fo:min-width="22.879cm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925cm" fo:min-width="4.62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2.82cm" fo:min-width="4.01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418cm" fo:min-width="7.385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" style:family="graphic" style:parent-style-name="standard">
      <style:graphic-properties draw:textarea-horizontal-align="justify" draw:textarea-vertical-align="middle" draw:auto-grow-height="false" fo:min-height="0.45cm" fo:min-width="20.327cm" style:writing-mode="lr-tb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45cm" fo:min-width="19.957cm" style:writing-mode="lr-tb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45cm" fo:min-width="20.21cm" style:writing-mode="lr-tb" loext:decorative="false"/>
      <style:paragraph-properties style:writing-mode="lr-tb"/>
    </style:style>
    <style:style style:name="gr2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6.108cm" fo:min-width="21.355cm" fo:padding-top="0.151cm" fo:padding-bottom="0.151cm" fo:padding-left="0.276cm" fo:padding-right="0.276cm" loext:decorative="false"/>
    </style:style>
    <style:style style:name="gr2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1.355cm" fo:padding-top="0.151cm" fo:padding-bottom="0.151cm" fo:padding-left="0.276cm" fo:padding-right="0.276cm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6.84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82cm" fo:min-width="7.16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828cm" fo:min-width="5.18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199cm" fo:min-width="6.116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2" style:family="graphic" style:parent-style-name="standard">
      <style:graphic-properties draw:textarea-horizontal-align="justify" draw:textarea-vertical-align="middle" draw:auto-grow-height="false" fo:min-height="0.45cm" fo:min-width="16.163cm" style:writing-mode="lr-tb" loext:decorative="false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0.45cm" fo:min-width="16.012cm" style:writing-mode="lr-tb" loext:decorative="false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0.45cm" fo:min-width="16.651cm" style:writing-mode="lr-tb" loext:decorative="false"/>
      <style:paragraph-properties style:writing-mode="lr-tb"/>
    </style:style>
    <style:style style:name="gr4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2.298cm" fo:min-width="17.863cm" fo:padding-top="0.151cm" fo:padding-bottom="0.151cm" fo:padding-left="0.276cm" fo:padding-right="0.276cm" loext:decorative="false"/>
    </style:style>
    <style:style style:name="gr46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17.863cm" fo:padding-top="0.151cm" fo:padding-bottom="0.151cm" fo:padding-left="0.276cm" fo:padding-right="0.276cm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45cm" fo:min-width="4.14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57cm" fo:min-width="3.59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8" style:family="graphic" style:parent-style-name="standard">
      <style:graphic-properties draw:textarea-horizontal-align="justify" draw:textarea-vertical-align="middle" draw:auto-grow-height="false" fo:min-height="0.45cm" fo:min-width="19.343cm" style:writing-mode="lr-tb" loext:decorative="false"/>
      <style:paragraph-properties style:writing-mode="lr-tb"/>
    </style:style>
    <style:style style:name="gr59" style:family="graphic" style:parent-style-name="standard">
      <style:graphic-properties draw:textarea-horizontal-align="justify" draw:textarea-vertical-align="middle" draw:auto-grow-height="false" fo:min-height="0.45cm" fo:min-width="19.216cm" style:writing-mode="lr-tb" loext:decorative="false"/>
      <style:paragraph-properties style:writing-mode="lr-tb"/>
    </style:style>
    <style:style style:name="gr60" style:family="graphic" style:parent-style-name="standard">
      <style:graphic-properties draw:textarea-horizontal-align="justify" draw:textarea-vertical-align="middle" draw:auto-grow-height="false" fo:min-height="0.45cm" fo:min-width="19.826cm" style:writing-mode="lr-tb" loext:decorative="false"/>
      <style:paragraph-properties style:writing-mode="lr-tb"/>
    </style:style>
    <style:style style:name="gr6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8.148cm" fo:padding-top="0.151cm" fo:padding-bottom="0.151cm" fo:padding-left="0.276cm" fo:padding-right="0.276cm" loext:decorative="false"/>
    </style:style>
    <style:style style:name="gr6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77cm" fo:min-width="6.73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8.148cm" fo:padding-top="0.151cm" fo:padding-bottom="0.151cm" fo:padding-left="0.276cm" fo:padding-right="0.276cm" style:writing-mode="lr-tb" loext:decorative="false"/>
      <style:paragraph-properties style:writing-mode="lr-tb"/>
    </style:style>
    <style:style style:name="gr6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74cm" fo:min-width="6.21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cm" fo:min-width="3.72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2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02cm" fo:min-width="4.39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54cm" fo:min-width="6.85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0.881cm" fo:min-width="6.751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0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14cm" fo:min-width="3.66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1" style:family="graphic" style:parent-style-name="standard">
      <style:graphic-properties draw:textarea-horizontal-align="justify" draw:textarea-vertical-align="middle" draw:auto-grow-height="false" fo:min-height="15.943cm" fo:min-width="0.411cm" style:writing-mode="lr-tb" loext:decorative="false"/>
      <style:paragraph-properties style:writing-mode="lr-tb"/>
    </style:style>
    <style:style style:name="gr92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3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4" style:family="graphic" style:parent-style-name="standard">
      <style:graphic-properties draw:stroke="none" draw:fill="none" fo:min-height="0.789cm" loext:decorative="false"/>
      <style:paragraph-properties style:writing-mode="lr-tb"/>
    </style:style>
    <style:style style:name="gr95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02cm" fo:min-width="5.8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9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0" style:family="graphic" style:parent-style-name="standard">
      <style:graphic-properties draw:textarea-horizontal-align="justify" draw:textarea-vertical-align="middle" draw:auto-grow-height="false" fo:min-height="0.45cm" fo:min-width="18.749cm" style:writing-mode="lr-tb" loext:decorative="false"/>
      <style:paragraph-properties style:writing-mode="lr-tb"/>
    </style:style>
    <style:style style:name="gr101" style:family="graphic" style:parent-style-name="standard">
      <style:graphic-properties draw:textarea-horizontal-align="justify" draw:textarea-vertical-align="middle" draw:auto-grow-height="false" fo:min-height="0.45cm" fo:min-width="18.637cm" style:writing-mode="lr-tb" loext:decorative="false"/>
      <style:paragraph-properties style:writing-mode="lr-tb"/>
    </style:style>
    <style:style style:name="gr102" style:family="graphic" style:parent-style-name="standard">
      <style:graphic-properties draw:textarea-horizontal-align="justify" draw:textarea-vertical-align="middle" draw:auto-grow-height="false" fo:min-height="0.45cm" fo:min-width="18.874cm" style:writing-mode="lr-tb" loext:decorative="false"/>
      <style:paragraph-properties style:writing-mode="lr-tb"/>
    </style:style>
    <style:style style:name="gr10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7.148cm" fo:padding-top="0.151cm" fo:padding-bottom="0.151cm" fo:padding-left="0.276cm" fo:padding-right="0.276cm" loext:decorative="false"/>
    </style:style>
    <style:style style:name="gr10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4cm" fo:min-width="6.53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7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7.148cm" fo:padding-top="0.151cm" fo:padding-bottom="0.151cm" fo:padding-left="0.276cm" fo:padding-right="0.276cm" style:writing-mode="lr-tb" loext:decorative="false"/>
      <style:paragraph-properties style:writing-mode="lr-tb"/>
    </style:style>
    <style:style style:name="gr10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64cm" fo:min-width="4.30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7cm" fo:min-width="5.14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5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75cm" fo:min-width="7.93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199cm" fo:min-width="6.116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1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2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02cm" fo:min-width="6.03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02cm" fo:min-width="5.8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02cm" fo:min-width="6.03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38" style:family="graphic" style:parent-style-name="standard">
      <style:graphic-properties draw:stroke="none" svg:stroke-color="#000000" draw:fill="none" draw:fill-color="#ffffff" draw:auto-grow-height="true" draw:auto-grow-width="false" fo:min-height="0.158cm" loext:decorative="false"/>
      <style:paragraph-properties style:writing-mode="lr-tb"/>
    </style:style>
    <style:style style:name="gr139" style:family="graphic" style:parent-style-name="standard">
      <style:graphic-properties draw:textarea-horizontal-align="justify" draw:textarea-vertical-align="middle" draw:auto-grow-height="false" fo:min-height="0.45cm" fo:min-width="20.641cm" style:writing-mode="lr-tb" loext:decorative="false"/>
      <style:paragraph-properties style:writing-mode="lr-tb"/>
    </style:style>
    <style:style style:name="gr140" style:family="graphic" style:parent-style-name="standard">
      <style:graphic-properties draw:textarea-horizontal-align="justify" draw:textarea-vertical-align="middle" draw:auto-grow-height="false" fo:min-height="0.45cm" fo:min-width="20.519cm" style:writing-mode="lr-tb" loext:decorative="false"/>
      <style:paragraph-properties style:writing-mode="lr-tb"/>
    </style:style>
    <style:style style:name="gr141" style:family="graphic" style:parent-style-name="standard">
      <style:graphic-properties draw:textarea-horizontal-align="justify" draw:textarea-vertical-align="middle" draw:auto-grow-height="false" fo:min-height="0.45cm" fo:min-width="20.779cm" style:writing-mode="lr-tb" loext:decorative="false"/>
      <style:paragraph-properties style:writing-mode="lr-tb"/>
    </style:style>
    <style:style style:name="gr14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7.388cm" fo:padding-top="0.151cm" fo:padding-bottom="0.151cm" fo:padding-left="0.276cm" fo:padding-right="0.276cm" loext:decorative="false"/>
    </style:style>
    <style:style style:name="gr1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22cm" fo:min-width="5.2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6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7.388cm" fo:padding-top="0.151cm" fo:padding-bottom="0.151cm" fo:padding-left="0.276cm" fo:padding-right="0.276cm" style:writing-mode="lr-tb" loext:decorative="false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14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9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7cm" fo:min-width="4.32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6.87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77cm" fo:min-width="6.6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39cm" fo:min-width="6.6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44cm" fo:min-width="6.6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604cm" fo:min-width="7.152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9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7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4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7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447cm" fo:min-width="6.03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02cm" fo:min-width="5.8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02cm" fo:min-width="6.03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4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5" style:family="graphic" style:parent-style-name="standard">
      <style:graphic-properties draw:stroke="none" svg:stroke-color="#000000" draw:fill="none" draw:fill-color="#ffffff" draw:auto-grow-height="true" draw:auto-grow-width="false" fo:min-height="1.338cm" loext:decorative="false"/>
      <style:paragraph-properties style:writing-mode="lr-tb"/>
    </style:style>
    <style:style style:name="gr18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8" style:family="graphic" style:parent-style-name="standard">
      <style:graphic-properties draw:textarea-horizontal-align="justify" draw:textarea-vertical-align="middle" draw:auto-grow-height="false" fo:min-height="0.45cm" fo:min-width="23.405cm" style:writing-mode="lr-tb" loext:decorative="false"/>
      <style:paragraph-properties style:writing-mode="lr-tb"/>
    </style:style>
    <style:style style:name="gr189" style:family="graphic" style:parent-style-name="standard">
      <style:graphic-properties draw:textarea-horizontal-align="justify" draw:textarea-vertical-align="middle" draw:auto-grow-height="false" fo:min-height="0.45cm" fo:min-width="23.271cm" style:writing-mode="lr-tb" loext:decorative="false"/>
      <style:paragraph-properties style:writing-mode="lr-tb"/>
    </style:style>
    <style:style style:name="gr190" style:family="graphic" style:parent-style-name="standard">
      <style:graphic-properties draw:textarea-horizontal-align="justify" draw:textarea-vertical-align="middle" draw:auto-grow-height="false" fo:min-height="0.45cm" fo:min-width="23.188cm" style:writing-mode="lr-tb" loext:decorative="false"/>
      <style:paragraph-properties style:writing-mode="lr-tb"/>
    </style:style>
    <style:style style:name="gr19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4.848cm" fo:padding-top="0.151cm" fo:padding-bottom="0.151cm" fo:padding-left="0.276cm" fo:padding-right="0.276cm" loext:decorative="false"/>
    </style:style>
    <style:style style:name="gr19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866cm" fo:min-width="6.08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4.848cm" fo:padding-top="0.151cm" fo:padding-bottom="0.151cm" fo:padding-left="0.276cm" fo:padding-right="0.276cm" style:writing-mode="lr-tb" loext:decorative="false"/>
      <style:paragraph-properties style:writing-mode="lr-tb"/>
    </style:style>
    <style:style style:name="gr19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83cm" fo:min-width="4.99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57cm" fo:min-width="6.26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9cm" fo:min-width="3.95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5" style:family="graphic" style:parent-style-name="standard">
      <style:graphic-properties draw:stroke="none" svg:stroke-color="#000000" draw:fill="none" draw:fill-color="#ffffff" draw:auto-grow-height="true" draw:auto-grow-width="false" fo:min-height="0.612cm" loext:decorative="false"/>
      <style:paragraph-properties style:writing-mode="lr-tb"/>
    </style:style>
    <style:style style:name="gr20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0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6.8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4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25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8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0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1" style:family="graphic" style:parent-style-name="standard" style:list-style-name="L2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2" style:family="graphic" style:parent-style-name="standard">
      <style:graphic-properties draw:textarea-horizontal-align="justify" draw:textarea-vertical-align="middle" draw:auto-grow-height="false" fo:min-height="0.45cm" fo:min-width="23.169cm" style:writing-mode="lr-tb" loext:decorative="false"/>
      <style:paragraph-properties style:writing-mode="lr-tb"/>
    </style:style>
    <style:style style:name="gr223" style:family="graphic" style:parent-style-name="standard">
      <style:graphic-properties draw:textarea-horizontal-align="justify" draw:textarea-vertical-align="middle" draw:auto-grow-height="false" fo:min-height="0.45cm" fo:min-width="23.037cm" style:writing-mode="lr-tb" loext:decorative="false"/>
      <style:paragraph-properties style:writing-mode="lr-tb"/>
    </style:style>
    <style:style style:name="gr224" style:family="graphic" style:parent-style-name="standard">
      <style:graphic-properties draw:textarea-horizontal-align="justify" draw:textarea-vertical-align="middle" draw:auto-grow-height="false" fo:min-height="0.45cm" fo:min-width="23.319cm" style:writing-mode="lr-tb" loext:decorative="false"/>
      <style:paragraph-properties style:writing-mode="lr-tb"/>
    </style:style>
    <style:style style:name="gr22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8.013cm" fo:min-width="24.213cm" fo:padding-top="0.151cm" fo:padding-bottom="0.151cm" fo:padding-left="0.276cm" fo:padding-right="0.276cm" loext:decorative="false"/>
    </style:style>
    <style:style style:name="gr2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6cm" fo:min-width="6.232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4.213cm" fo:padding-top="0.151cm" fo:padding-bottom="0.151cm" fo:padding-left="0.276cm" fo:padding-right="0.276cm" style:writing-mode="lr-tb" loext:decorative="false"/>
      <style:paragraph-properties style:writing-mode="lr-tb"/>
    </style:style>
    <style:style style:name="gr23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8.1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34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9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4.08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6.8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418cm" fo:min-width="8.339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9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44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54" style:family="graphic" style:parent-style-name="standard">
      <style:graphic-properties draw:textarea-horizontal-align="justify" draw:textarea-vertical-align="middle" draw:auto-grow-height="false" fo:min-height="0.45cm" fo:min-width="19.065cm" style:writing-mode="lr-tb" loext:decorative="false"/>
      <style:paragraph-properties style:writing-mode="lr-tb"/>
    </style:style>
    <style:style style:name="gr255" style:family="graphic" style:parent-style-name="standard">
      <style:graphic-properties draw:textarea-horizontal-align="justify" draw:textarea-vertical-align="middle" draw:auto-grow-height="false" fo:min-height="0.45cm" fo:min-width="18.718cm" style:writing-mode="lr-tb" loext:decorative="false"/>
      <style:paragraph-properties style:writing-mode="lr-tb"/>
    </style:style>
    <style:style style:name="gr256" style:family="graphic" style:parent-style-name="standard">
      <style:graphic-properties draw:textarea-horizontal-align="justify" draw:textarea-vertical-align="middle" draw:auto-grow-height="false" fo:min-height="0.45cm" fo:min-width="18.956cm" style:writing-mode="lr-tb" loext:decorative="false"/>
      <style:paragraph-properties style:writing-mode="lr-tb"/>
    </style:style>
    <style:style style:name="gr257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6.108cm" fo:min-width="20.085cm" fo:padding-top="0.151cm" fo:padding-bottom="0.151cm" fo:padding-left="0.276cm" fo:padding-right="0.276cm" loext:decorative="false"/>
    </style:style>
    <style:style style:name="gr25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37cm" fo:min-width="5.77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0.085cm" fo:padding-top="0.151cm" fo:padding-bottom="0.151cm" fo:padding-left="0.276cm" fo:padding-right="0.276cm" style:writing-mode="lr-tb" loext:decorative="false"/>
      <style:paragraph-properties style:writing-mode="lr-tb"/>
    </style:style>
    <style:style style:name="gr26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62cm" fo:min-width="5.26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5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6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308cm" fo:min-width="5.70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4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5" style:family="graphic" style:parent-style-name="standard">
      <style:graphic-properties draw:textarea-horizontal-align="justify" draw:textarea-vertical-align="middle" draw:auto-grow-height="false" fo:min-height="0.45cm" fo:min-width="28.075cm" style:writing-mode="lr-tb" loext:decorative="false"/>
      <style:paragraph-properties style:writing-mode="lr-tb"/>
    </style:style>
    <style:style style:name="gr2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8.331cm" fo:min-width="28.658cm" fo:padding-top="0.151cm" fo:padding-bottom="0.151cm" fo:padding-left="0.276cm" fo:padding-right="0.276cm" loext:decorative="false"/>
    </style:style>
    <style:style style:name="gr27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395cm" fo:min-width="6.46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2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8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8.658cm" fo:padding-top="0.151cm" fo:padding-bottom="0.151cm" fo:padding-left="0.276cm" fo:padding-right="0.276cm" style:writing-mode="lr-tb" loext:decorative="false"/>
      <style:paragraph-properties style:writing-mode="lr-tb"/>
    </style:style>
    <style:style style:name="gr28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285cm" fo:min-width="6.4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85cm" fo:min-width="5.2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2.056cm" fo:min-width="9.07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85cm" fo:min-width="4.94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9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9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9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0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44cm" fo:min-width="6.21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0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2.271cm" fo:min-width="4.607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7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0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08cm" fo:min-width="2.72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64cm" fo:min-width="6.53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2.239cm" fo:min-width="3.576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6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47cm" fo:min-width="7.80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697cm" fo:min-width="7.80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3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24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26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4.203cm" fo:min-width="20.085cm" fo:padding-top="0.151cm" fo:padding-bottom="0.151cm" fo:padding-left="0.276cm" fo:padding-right="0.276cm" loext:decorative="false"/>
    </style:style>
    <style:style style:name="gr32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95cm" fo:min-width="8.537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8.1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8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9" style:family="graphic" style:parent-style-name="standard">
      <style:graphic-properties draw:textarea-horizontal-align="justify" draw:textarea-vertical-align="middle" draw:auto-grow-height="false" fo:min-height="0.45cm" fo:min-width="26.547cm" style:writing-mode="lr-tb" loext:decorative="false"/>
      <style:paragraph-properties style:writing-mode="lr-tb"/>
    </style:style>
    <style:style style:name="gr340" style:family="graphic" style:parent-style-name="standard">
      <style:graphic-properties draw:textarea-horizontal-align="justify" draw:textarea-vertical-align="middle" draw:auto-grow-height="false" fo:min-height="0.45cm" fo:min-width="26.489cm" style:writing-mode="lr-tb" loext:decorative="false"/>
      <style:paragraph-properties style:writing-mode="lr-tb"/>
    </style:style>
    <style:style style:name="gr3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2cm" fo:min-width="3.90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4" style:family="graphic" style:parent-style-name="standard">
      <style:graphic-properties draw:textarea-horizontal-align="justify" draw:textarea-vertical-align="middle" draw:auto-grow-height="false" fo:min-height="0.45cm" fo:min-width="26.704cm" style:writing-mode="lr-tb" loext:decorative="false"/>
      <style:paragraph-properties style:writing-mode="lr-tb"/>
    </style:style>
    <style:style style:name="gr34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746cm" fo:min-width="27.148cm" fo:padding-top="0.151cm" fo:padding-bottom="0.151cm" fo:padding-left="0.276cm" fo:padding-right="0.276cm" loext:decorative="false"/>
    </style:style>
    <style:style style:name="gr34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45cm" fo:min-width="4.14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851cm" fo:min-width="5.01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69cm" fo:min-width="7.80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19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44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24cm" fo:min-width="2.72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6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6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6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6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69" style:family="graphic" style:parent-style-name="standard">
      <style:graphic-properties draw:stroke="none" svg:stroke-color="#000000" draw:fill="none" draw:fill-color="#ffffff" draw:auto-grow-height="true" draw:auto-grow-width="false" fo:min-height="1.897cm" loext:decorative="false"/>
      <style:paragraph-properties style:writing-mode="lr-tb"/>
    </style:style>
    <style:style style:name="gr37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45cm" fo:min-width="4.51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74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7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08cm" fo:min-width="3.03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7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3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4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5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6.8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9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90" style:family="graphic" style:parent-style-name="standard">
      <style:graphic-properties draw:textarea-horizontal-align="justify" draw:textarea-vertical-align="middle" draw:auto-grow-height="false" fo:min-height="0.45cm" fo:min-width="24.539cm" style:writing-mode="lr-tb" loext:decorative="false"/>
      <style:paragraph-properties style:writing-mode="lr-tb"/>
    </style:style>
    <style:style style:name="gr391" style:family="graphic" style:parent-style-name="standard">
      <style:graphic-properties draw:textarea-horizontal-align="justify" draw:textarea-vertical-align="middle" draw:auto-grow-height="false" fo:min-height="0.45cm" fo:min-width="24.591cm" style:writing-mode="lr-tb" loext:decorative="false"/>
      <style:paragraph-properties style:writing-mode="lr-tb"/>
    </style:style>
    <style:style style:name="gr39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4" style:family="graphic" style:parent-style-name="standard">
      <style:graphic-properties draw:textarea-horizontal-align="justify" draw:textarea-vertical-align="middle" draw:auto-grow-height="false" fo:min-height="0.45cm" fo:min-width="24.324cm" style:writing-mode="lr-tb" loext:decorative="false"/>
      <style:paragraph-properties style:writing-mode="lr-tb"/>
    </style:style>
    <style:style style:name="gr39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413cm" fo:min-width="25.443cm" fo:padding-top="0.151cm" fo:padding-bottom="0.151cm" fo:padding-left="0.276cm" fo:padding-right="0.276cm" loext:decorative="false"/>
    </style:style>
    <style:style style:name="gr39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36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5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6.09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5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0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0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0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903cm" fo:min-width="25.443cm" fo:padding-top="0.151cm" fo:padding-bottom="0.151cm" fo:padding-left="0.276cm" fo:padding-right="0.276cm" style:writing-mode="lr-tb" loext:decorative="false"/>
      <style:paragraph-properties style:writing-mode="lr-tb"/>
    </style:style>
    <style:style style:name="gr40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95cm" fo:min-width="3.37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16" style:family="graphic" style:parent-style-name="standard" style:list-style-name="L2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17" style:family="graphic" style:parent-style-name="standard" style:list-style-name="L2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4.08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2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19cm" fo:min-width="2.78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8" style:family="graphic" style:parent-style-name="standard">
      <style:graphic-properties draw:textarea-horizontal-align="justify" draw:textarea-vertical-align="middle" draw:auto-grow-height="false" fo:min-height="0.45cm" fo:min-width="21.562cm" style:writing-mode="lr-tb" loext:decorative="false"/>
      <style:paragraph-properties style:writing-mode="lr-tb"/>
    </style:style>
    <style:style style:name="gr429" style:family="graphic" style:parent-style-name="standard">
      <style:graphic-properties draw:textarea-horizontal-align="justify" draw:textarea-vertical-align="middle" draw:auto-grow-height="false" fo:min-height="0.45cm" fo:min-width="21.472cm" style:writing-mode="lr-tb" loext:decorative="false"/>
      <style:paragraph-properties style:writing-mode="lr-tb"/>
    </style:style>
    <style:style style:name="gr43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2" style:family="graphic" style:parent-style-name="standard">
      <style:graphic-properties draw:textarea-horizontal-align="justify" draw:textarea-vertical-align="middle" draw:auto-grow-height="false" fo:min-height="0.45cm" fo:min-width="21.372cm" style:writing-mode="lr-tb" loext:decorative="false"/>
      <style:paragraph-properties style:writing-mode="lr-tb"/>
    </style:style>
    <style:style style:name="gr43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413cm" fo:min-width="28.341cm" fo:padding-top="0.151cm" fo:padding-bottom="0.151cm" fo:padding-left="0.276cm" fo:padding-right="0.276cm" loext:decorative="false"/>
    </style:style>
    <style:style style:name="gr4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056cm" fo:min-width="2.73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5cm" fo:min-width="2.81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038cm" fo:min-width="3.35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903cm" fo:min-width="28.023cm" fo:padding-top="0.151cm" fo:padding-bottom="0.151cm" fo:padding-left="0.276cm" fo:padding-right="0.276cm" style:writing-mode="lr-tb" loext:decorative="false"/>
      <style:paragraph-properties style:writing-mode="lr-tb"/>
    </style:style>
    <style:style style:name="gr44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2.618cm" fo:min-width="4.05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3.9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61cm" fo:min-width="3.99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051cm" fo:min-width="3.94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055cm" fo:min-width="2.72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081cm" fo:min-width="2.4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46cm" fo:min-width="2.72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026cm" fo:min-width="3.132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15cm" fo:min-width="3.35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95cm" fo:min-width="4.50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74cm" fo:min-width="2.617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24cm" fo:min-width="2.78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49cm" fo:min-width="2.78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3" style:family="graphic">
      <style:graphic-properties loext:decorative="false"/>
    </style:style>
    <style:style style:name="gr484" style:family="graphic" style:parent-style-name="objectwithoutfill">
      <style:graphic-properties draw:stroke="dash" draw:stroke-dash="Long_20_Dash_20__28_Rounded_29_" svg:stroke-width="0.053cm" svg:stroke-color="#000000" draw:marker-start-width="0.279cm" draw:marker-end="Arrowheads_20_3" draw:marker-end-width="0.379cm" svg:stroke-linecap="round" draw:fill="none" draw:textarea-vertical-align="middle" fo:padding-top="0.151cm" fo:padding-bottom="0.151cm" fo:padding-left="0.276cm" fo:padding-right="0.276cm" loext:decorative="false"/>
    </style:style>
    <style:style style:name="gr48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305cm" fo:min-width="4.39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365cm" fo:min-width="4.30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9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9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9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362cm" fo:min-width="4.39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9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e99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fafafa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f6f9d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f6f9d4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none"/>
      <style:text-properties fo:font-weight="normal"/>
    </style:style>
    <style:style style:name="P26" style:family="paragraph">
      <loext:graphic-properties draw:fill="none" draw:fill-color="#ffffff"/>
      <style:text-properties fo:font-size="12pt" fo:font-weight="bold" style:font-size-asian="12pt" style:font-size-complex="12pt"/>
    </style:style>
    <style:style style:name="P27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zxx" fo:country="none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zxx" fo:country="none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text-properties fo:font-size="8pt" style:font-size-asian="8pt" style:font-size-complex="8pt"/>
    </style:style>
    <style:style style:name="P30" style:family="paragraph">
      <loext:graphic-properties draw:fill="none" draw:fill-color="#ffffff"/>
      <style:text-properties fo:font-size="8pt" style:font-size-asian="8pt" style:font-size-complex="8pt"/>
    </style:style>
    <style:style style:name="P3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text-align="start"/>
    </style:style>
    <style:style style:name="P33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fo:color="#c9211e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fo:color="#c9211e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none" draw:fill-color="#ffffff"/>
      <style:text-properties fo:color="#c9211e" loext:opacity="100%" fo:font-size="12pt" style:font-size-asian="12pt" style:font-size-complex="12pt"/>
    </style:style>
    <style:style style:name="P36" style:family="paragraph">
      <style:paragraph-properties fo:text-align="start" style:writing-mode="lr-tb"/>
    </style:style>
    <style:style style:name="P3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none"/>
      <style:paragraph-properties fo:text-align="center"/>
      <style:text-properties fo:font-weight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c9211e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Logging" draw:style-name="dp1" draw:master-page-name="Default">
        <draw:custom-shape draw:style-name="gr1" draw:text-style-name="P2" draw:layer="layout" svg:width="22.96cm" svg:height="0.7cm" svg:x="1.535cm" svg:y="2.27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3.614cm" svg:height="0.7cm" svg:x="1.516cm" svg:y="18.462cm">
          <text:p text:style-name="P1">HW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4.447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4.447cm" svg:height="0.952cm" svg:x="1cm" svg:y="1.1cm">
          <text:p text:style-name="P1">Class Diagram: Logging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5.217cm" svg:y="-2.492cm">
          <draw:text-box>
            <text:p><text:span text:style-name="T1">&lt;&lt;uses&gt;&gt;</text:span></text:p>
          </draw:text-box>
        </draw:frame>
        <draw:g draw:style-name="gr6" xml:id="id3" draw:id="id3">
          <draw:glue-point draw:id="4" svg:x="-3.94cm" svg:y="-4.644cm"/>
          <draw:glue-point draw:id="5" svg:x="4.311cm" svg:y="-5.137cm"/>
          <draw:glue-point draw:id="6" svg:x="3.601cm" svg:y="-5.137cm"/>
          <draw:glue-point draw:id="7" svg:x="5.002cm" svg:y="-4.324cm"/>
          <draw:custom-shape draw:style-name="gr7" draw:text-style-name="P7" draw:layer="layout" svg:width="5.397cm" svg:height="1.153cm" svg:x="2.292cm" svg:y="6.773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&lt;&lt;module&gt;&gt;</text:span></text:p>
            <text:p text:style-name="P6"><text:span text:style-name="T2">log_service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9" draw:layer="layout" svg:width="5.397cm" svg:height="2.681cm" svg:x="2.292cm" svg:y="7.926cm">
            <text:p text:style-name="P8"><text:span text:style-name="T3">+ oradio_log.debug()</text:span></text:p>
            <text:p text:style-name="P8"><text:span text:style-name="T3">+ oradio_log.warning()</text:span></text:p>
            <text:p text:style-name="P8"><text:span text:style-name="T3">+ oradio_log.info()</text:span></text:p>
            <text:p text:style-name="P8"><text:span text:style-name="T3">+ oradio_log.error()</text:span></text:p>
            <text:p text:style-name="P8"><text:span text:style-name="T3">+ oradio_log.critical()</text:span></text:p>
            <text:p text:style-name="P8"><text:span text:style-name="T3">+ oradio_log.exception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text-style-name="P2" draw:layer="layout" svg:width="23.379cm" svg:height="0.7cm" svg:x="1.433cm" svg:y="5.133cm">
          <text:p text:style-name="P1"><text:s text:c="3"/>Middle-ware Layer (global functions)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2" draw:id="id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g draw:style-name="gr6">
              <draw:g draw:style-name="gr6">
                <draw:custom-shape draw:style-name="gr10" draw:text-style-name="P7" draw:layer="layout" svg:width="5.08cm" svg:height="1.627cm" svg:x="11.265cm" svg:y="9.255cm">
                  <draw:glue-point draw:id="4" svg:x="-4.442cm" svg:y="-5cm"/>
                  <draw:glue-point draw:id="5" svg:x="-2.22cm" svg:y="-5cm"/>
                  <draw:glue-point draw:id="6" svg:x="2.223cm" svg:y="-5cm"/>
                  <draw:glue-point draw:id="7" svg:x="4.446cm" svg:y="-5cm"/>
                  <draw:glue-point draw:id="8" svg:x="0.001cm" svg:y="0.634cm" draw:align="top-left"/>
                  <draw:glue-point draw:id="9" svg:x="-0.001cm" svg:y="0.634cm" draw:align="top-right"/>
                  <text:p text:style-name="P6"><text:span text:style-name="T2">&lt;&lt;class&gt;&gt;</text:span></text:p>
                  <text:p text:style-name="P6"><text:span text:style-name="T2">log_service.</text:span></text:p>
                  <text:p text:style-name="P6"><text:span text:style-name="T2">SafeLogger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1" draw:text-style-name="P9" draw:layer="layout" svg:width="5.08cm" svg:height="1.134cm" svg:x="11.265cm" svg:y="10.882cm">
                  <text:p text:style-name="P8"><text:span text:style-name="T3">DEBUG, INFO, WARNING, ERROR, CRITICAL</text:span></text:p>
                  <text:p text:style-name="P8"><text:span text:style-name="T3"/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2" draw:text-style-name="P9" draw:layer="layout" svg:width="5.08cm" svg:height="3.357cm" svg:x="11.265cm" svg:y="12.016cm">
                  <draw:glue-point draw:id="4" svg:x="4.446cm" svg:y="5.295cm"/>
                  <draw:glue-point draw:id="5" svg:x="2.223cm" svg:y="5.295cm"/>
                  <draw:glue-point draw:id="6" svg:x="-2.22cm" svg:y="5.295cm"/>
                  <draw:glue-point draw:id="7" svg:x="-4.442cm" svg:y="5.295cm"/>
                  <draw:glue-point draw:id="8" svg:x="0.001cm" svg:y="-0.544cm" draw:align="bottom-left"/>
                  <draw:glue-point draw:id="9" svg:x="-0.001cm" svg:y="-0.544cm" draw:align="bottom-right"/>
                  <text:p text:style-name="P8"><text:span text:style-name="T3">+ trace(msg:string)</text:span></text:p>
                  <text:p text:style-name="P8"><text:span text:style-name="T3">+ debug(msg:string)</text:span></text:p>
                  <text:p text:style-name="P8"><text:span text:style-name="T3">+ info(msg:string)</text:span></text:p>
                  <text:p text:style-name="P8"><text:span text:style-name="T3">+ warning(msg:string)</text:span></text:p>
                  <text:p text:style-name="P8"><text:span text:style-name="T3">+ error(msg:string)</text:span></text:p>
                  <text:p text:style-name="P8"><text:span text:style-name="T3">+ critical(msg:string)</text:span></text:p>
                  <text:p text:style-name="P8"><text:span text:style-name="T3">+ exception(msg:string)</text:span></text:p>
                  <text:p text:style-name="P8"><text:span text:style-name="T3">- safe_log(level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g draw:style-name="gr6" xml:id="id1" draw:id="id1">
          <draw:glue-point draw:id="4" svg:x="-3.94cm" svg:y="-4.644cm"/>
          <draw:glue-point draw:id="5" svg:x="4.311cm" svg:y="-5.137cm"/>
          <draw:glue-point draw:id="6" svg:x="3.601cm" svg:y="-5.137cm"/>
          <draw:custom-shape draw:style-name="gr13" draw:text-style-name="P7" draw:layer="layout" svg:width="4.465cm" svg:height="1.153cm" svg:x="19.782cm" svg:y="11.79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&lt;&lt;python-library&gt;&gt;</text:span></text:p>
            <text:p text:style-name="P6"><text:span text:style-name="T2">logg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9" draw:layer="layout" svg:width="4.465cm" svg:height="3.029cm" svg:x="19.782cm" svg:y="12.948cm">
            <text:p text:style-name="P8"><text:span text:style-name="T3">+ trace(msg:string)</text:span></text:p>
            <text:p text:style-name="P8"><text:span text:style-name="T3">+ debug(msg:string)</text:span></text:p>
            <text:p text:style-name="P8"><text:span text:style-name="T3">+ info(msg:string)</text:span></text:p>
            <text:p text:style-name="P8"><text:span text:style-name="T3">+ warning(msg:string)</text:span></text:p>
            <text:p text:style-name="P8"><text:span text:style-name="T3">+ error(msg:string)</text:span></text:p>
            <text:p text:style-name="P8"><text:span text:style-name="T3">+ critical(msg:string)</text:span></text:p>
            <text:p text:style-name="P8"><text:span text:style-name="T3">+ exception(msg:string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5" draw:text-style-name="P10" draw:layer="layout" svg:x1="19.782cm" svg:y1="13.886cm" svg:x2="16.345cm" svg:y2="12.314cm" draw:start-shape="id1" draw:end-shape="id2" draw:end-glue-point="1" svg:d="M19782 13886h-1719v-1572h-1718" svg:viewBox="0 0 3438 1573">
          <text:p/>
        </draw:connector>
        <draw:frame draw:style-name="gr5" draw:text-style-name="P5" draw:layer="layout" svg:width="3.085cm" svg:height="0.725cm" svg:x="16.262cm" svg:y="14.335cm">
          <draw:text-box>
            <text:p><text:span text:style-name="T1">&lt;&lt;uses&gt;&gt;</text:span></text:p>
          </draw:text-box>
        </draw:frame>
        <draw:connector draw:style-name="gr16" draw:text-style-name="P10" draw:layer="layout" svg:x1="11.265cm" svg:y1="12.314cm" svg:x2="7.689cm" svg:y2="8.69cm" draw:start-shape="id2" draw:start-glue-point="3" draw:end-shape="id3" svg:d="M11265 12314h-1788v-3624h-1788" svg:viewBox="0 0 3577 3625">
          <text:p/>
        </draw:connector>
        <draw:frame draw:style-name="gr5" draw:text-style-name="P5" draw:layer="layout" svg:width="3.085cm" svg:height="0.725cm" svg:x="7.78cm" svg:y="12.747cm">
          <draw:text-box>
            <text:p><text:span text:style-name="T1">&lt;&lt;uses&gt;&gt;</text:span></text:p>
          </draw:text-box>
        </draw:frame>
        <draw:custom-shape draw:style-name="gr17" draw:text-style-name="P12" xml:id="id4" draw:id="id4" draw:layer="layout" svg:width="7.937cm" svg:height="1.719cm" svg:x="11.5cm" svg:y="6.715cm">
          <text:p text:style-name="P11"><text:span text:style-name="T4">The oradio_log public functions are global functions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18" draw:text-style-name="P13" draw:layer="layout" draw:type="line" svg:x1="11.5cm" svg:y1="7.575cm" svg:x2="7.689cm" svg:y2="7.033cm" draw:start-shape="id4" draw:start-glue-point="5" draw:end-shape="id3" draw:end-glue-point="7" svg:d="M11500 7575l-3811-542" svg:viewBox="0 0 3812 543">
          <text:p/>
        </draw:connector>
      </draw:page>
      <draw:page draw:name="Throttle" draw:style-name="dp1" draw:master-page-name="Default">
        <draw:custom-shape draw:style-name="gr19" draw:text-style-name="P2" draw:layer="layout" svg:width="20.827cm" svg:height="0.7cm" svg:x="1.445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20.457cm" svg:height="0.7cm" svg:x="1.564cm" svg:y="6.4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20.71cm" svg:height="0.7cm" svg:x="1.311cm" svg:y="17.1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7.122cm" svg:y="7.26cm">
          <draw:text-box>
            <text:p><text:span text:style-name="T1">&lt;&lt;uses&gt;&gt;</text:span></text:p>
          </draw:text-box>
        </draw:frame>
        <draw:custom-shape draw:style-name="gr22" draw:text-style-name="P3" draw:layer="layout" svg:width="21.907cm" svg:height="16.41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layer="layout" svg:width="21.907cm" svg:height="0.952cm" svg:x="1cm" svg:y="1.1cm">
          <text:p text:style-name="P1">Class Diagram: Throttle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6" draw:id="id6">
          <draw:custom-shape draw:style-name="gr24" draw:text-style-name="P7" draw:layer="layout" svg:width="7.302cm" svg:height="1.153cm" svg:x="2.37cm" svg:y="8.10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throttling_monitor.py</text:span></text:p>
            <text:p text:style-name="P6"><text:span text:style-name="T2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9" draw:layer="layout" svg:width="7.302cm" svg:height="0.761cm" svg:x="2.37cm" svg:y="9.2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9" draw:layer="layout" svg:width="7.302cm" svg:height="0.599cm" svg:x="2.37cm" svg:y="9.57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4"><text:span text:style-name="T3">+ throttled_monitor: RpiThrottlingMonitor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5" draw:id="id5">
          <draw:glue-point draw:id="4" svg:x="-5.035cm" svg:y="-2.72cm"/>
          <draw:glue-point draw:id="5" svg:x="-0.912cm" svg:y="-1.099cm"/>
          <draw:glue-point draw:id="6" svg:x="-0.496cm" svg:y="-1.099cm"/>
          <draw:glue-point draw:id="7" svg:x="5.035cm" svg:y="-4.011cm"/>
          <draw:custom-shape draw:style-name="gr27" draw:text-style-name="P17" draw:layer="layout" svg:width="7.62cm" svg:height="1.153cm" svg:x="4.58cm" svg:y="12.32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5"><text:span text:style-name="T2">throttled_monitor.RpiThrottlingMonitor</text:span></text:p>
            <text:p text:style-name="P16"><text:span text:style-name="T2">&lt;&lt;singleton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9" draw:layer="layout" svg:width="7.62cm" svg:height="0.591cm" svg:x="4.58cm" svg:y="13.474cm">
            <text:p text:style-name="P8"><text:span text:style-name="T3">- stop_event: Event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9" draw:layer="layout" svg:width="7.62cm" svg:height="2.569cm" svg:x="4.58cm" svg:y="14.06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- init()</text:span></text:p>
            <text:p text:style-name="P8"><text:span text:style-name="T3">+ start()</text:span></text:p>
            <text:p text:style-name="P8"><text:span text:style-name="T3">+ stop()</text:span></text:p>
            <text:p text:style-name="P8"><text:span text:style-name="T3">+ run()</text:span></text:p>
            <text:p text:style-name="P8"><text:span text:style-name="T3">+ force_throttled()</text:span></text:p>
            <text:p text:style-name="P8"><text:span text:style-name="T3">+ clear_throttle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0" draw:text-style-name="P10" draw:layer="layout" svg:x1="8.39cm" svg:y1="12.321cm" svg:x2="6.021cm" svg:y2="10.171cm" draw:start-shape="id5" draw:end-shape="id6" svg:d="M8390 12321v-1076h-2369v-1074" svg:viewBox="0 0 2370 2151">
          <text:p/>
        </draw:connector>
        <draw:frame draw:style-name="gr5" draw:text-style-name="P5" draw:layer="layout" svg:width="3.085cm" svg:height="0.725cm" svg:x="6.17cm" svg:y="10.525cm">
          <draw:text-box>
            <text:p><text:span text:style-name="T1">&lt;&lt;uses&gt;&gt;</text:span></text:p>
          </draw:text-box>
        </draw:frame>
        <draw:g draw:style-name="gr6" xml:id="id7" draw:id="id7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g draw:style-name="gr6">
            <draw:g draw:style-name="gr6">
              <draw:g draw:style-name="gr6">
                <draw:custom-shape draw:style-name="gr31" draw:text-style-name="P19" draw:layer="layout" svg:width="5.64cm" svg:height="1.153cm" svg:x="15.997cm" svg:y="13.501cm">
                  <draw:glue-point draw:id="4" svg:x="-4.442cm" svg:y="-5cm"/>
                  <draw:glue-point draw:id="5" svg:x="-2.22cm" svg:y="-5cm"/>
                  <draw:glue-point draw:id="6" svg:x="2.223cm" svg:y="-5cm"/>
                  <draw:glue-point draw:id="7" svg:x="4.446cm" svg:y="-5cm"/>
                  <draw:glue-point draw:id="8" svg:x="0.001cm" svg:y="0.634cm" draw:align="top-left"/>
                  <draw:glue-point draw:id="9" svg:x="-0.001cm" svg:y="0.634cm" draw:align="top-right"/>
                  <text:p text:style-name="P18"><text:span text:style-name="T2">&lt;&lt;thread&gt;&gt;</text:span></text:p>
                  <text:p text:style-name="P18"><text:span text:style-name="T2">rpi-throttling-monitor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2" draw:text-style-name="P9" draw:layer="layout" svg:width="5.64cm" svg:height="1.037cm" svg:x="15.997cm" svg:y="14.654cm">
                  <text:p text:style-name="P8"><text:span text:style-name="T3">+ stop_event: Event()</text:span></text:p>
                  <text:p text:style-name="P8"><text:span text:style-name="T3">- vcgencmd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3" draw:text-style-name="P9" draw:layer="layout" svg:width="5.64cm" svg:height="0.599cm" svg:x="15.997cm" svg:y="15.637cm">
                  <draw:glue-point draw:id="4" svg:x="4.446cm" svg:y="5.295cm"/>
                  <draw:glue-point draw:id="5" svg:x="2.223cm" svg:y="5.295cm"/>
                  <draw:glue-point draw:id="6" svg:x="-2.22cm" svg:y="5.295cm"/>
                  <draw:glue-point draw:id="7" svg:x="-4.442cm" svg:y="5.295cm"/>
                  <draw:glue-point draw:id="8" svg:x="0.001cm" svg:y="-0.544cm" draw:align="bottom-left"/>
                  <draw:glue-point draw:id="9" svg:x="-0.001cm" svg:y="-0.544cm" draw:align="bottom-right"/>
                  <text:p text:style-name="P8"><text:span text:style-name="T3">- get_throttle_value()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34" draw:text-style-name="P10" draw:layer="layout" svg:x1="15.997cm" svg:y1="14.868cm" svg:x2="12.2cm" svg:y2="14.477cm" draw:start-shape="id7" draw:end-shape="id5" draw:end-glue-point="1" svg:d="M15997 14868h-1898v-391h-1899" svg:viewBox="0 0 3798 392">
          <text:p/>
        </draw:connector>
        <draw:frame draw:style-name="gr5" draw:text-style-name="P5" draw:layer="layout" svg:width="3.81cm" svg:height="0.725cm" svg:x="12.43cm" svg:y="13.292cm">
          <draw:text-box>
            <text:p><text:span text:style-name="T1">&lt;&lt;consists of&gt;&gt;</text:span></text:p>
          </draw:text-box>
        </draw:frame>
        <draw:custom-shape draw:style-name="gr35" draw:text-style-name="P12" xml:id="id8" draw:id="id8" draw:layer="layout" svg:width="6.667cm" svg:height="1.5cm" svg:x="15.288cm" svg:y="11.265cm">
          <text:p text:style-name="P11"><text:span text:style-name="T4">The rpi-throttling-monitor thread check the throttle state in a loop 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36" draw:text-style-name="P13" draw:layer="layout" draw:type="line" svg:x1="12.2cm" svg:y1="12.748cm" svg:x2="15.288cm" svg:y2="12.015cm" draw:start-shape="id5" draw:start-glue-point="7" draw:end-shape="id8" draw:end-glue-point="5" svg:d="M12200 12748l3088-733" svg:viewBox="0 0 3089 734">
          <text:p/>
        </draw:connector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37" draw:text-style-name="P21" draw:layer="layout" svg:width="20.603cm" svg:height="0.679cm" svg:x="1.669cm" svg:y="3.287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20.603cm" svg:height="2.101cm" svg:x="1.669cm" svg:y="3.966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9" draw:id="id9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9" draw:text-style-name="P23" draw:layer="layout" svg:width="7.706cm" svg:height="0.679cm" svg:x="5.359cm" svg:y="4.307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4" draw:layer="layout" svg:width="7.706cm" svg:height="0.679cm" svg:x="5.359cm" svg:y="4.986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throttling_monito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1" draw:text-style-name="P10" draw:layer="layout" svg:x1="6.021cm" svg:y1="8.102cm" svg:x2="6.901cm" svg:y2="5.665cm" draw:start-shape="id6" draw:end-shape="id9" draw:end-glue-point="4" svg:d="M6021 8102v-1219h880v-1218" svg:viewBox="0 0 881 2438">
          <text:p/>
        </draw:connector>
      </draw:page>
      <draw:page draw:name="System Sound" draw:style-name="dp1" draw:master-page-name="Default">
        <draw:custom-shape draw:style-name="gr42" draw:text-style-name="P2" draw:layer="layout" svg:width="16.663cm" svg:height="0.7cm" svg:x="1.482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" draw:layer="layout" svg:width="16.512cm" svg:height="0.7cm" svg:x="1.633cm" svg:y="7.032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" draw:layer="layout" svg:width="17.151cm" svg:height="0.7cm" svg:x="1.311cm" svg:y="13.382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" draw:layer="layout" svg:width="18.415cm" svg:height="12.6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4" draw:layer="layout" svg:width="18.415cm" svg:height="0.952cm" svg:x="1cm" svg:y="1.1cm">
          <text:p text:style-name="P1">Class Diagram: System Sound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47" draw:text-style-name="P21" draw:layer="layout" svg:width="16.51cm" svg:height="0.679cm" svg:x="1.635cm" svg:y="3.284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2" draw:layer="layout" svg:width="16.51cm" svg:height="2.101cm" svg:x="1.635cm" svg:y="3.96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11" draw:id="id1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49" draw:text-style-name="P23" draw:layer="layout" svg:width="5.055cm" svg:height="0.679cm" svg:x="9.255cm" svg:y="4.304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24" draw:layer="layout" svg:width="5.055cm" svg:height="0.679cm" svg:x="9.255cm" svg:y="4.98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play_soun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12" draw:id="id1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51" draw:text-style-name="P7" draw:layer="layout" svg:width="4.602cm" svg:height="1.627cm" svg:x="4.653cm" svg:y="9.25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touch_buttons.</text:span></text:p>
              <text:p text:style-name="P6"><text:span text:style-name="T2">TouchButtons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" draw:text-style-name="P9" draw:layer="layout" svg:width="4.602cm" svg:height="0.754cm" svg:x="4.653cm" svg:y="10.882cm">
              <text:p text:style-name="P8"><text:span text:style-name="T3">- play_sound()</text:span></text:p>
              <text:p text:style-name="P8"><text:span text:style-name="T3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3" draw:text-style-name="P9" draw:layer="layout" svg:width="4.602cm" svg:height="0.599cm" svg:x="4.653cm" svg:y="11.636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10" draw:id="id10">
          <draw:glue-point draw:id="4" svg:x="1.153cm" svg:y="-4.294cm"/>
          <draw:glue-point draw:id="5" svg:x="3.461cm" svg:y="-5.146cm"/>
          <draw:custom-shape draw:style-name="gr54" draw:text-style-name="P7" draw:layer="layout" svg:width="4.047cm" svg:height="1.153cm" svg:x="13.145cm" svg:y="9.25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system_sounds.py</text:span></text:p>
            <text:p text:style-name="P6"><text:span text:style-name="T2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9" draw:layer="layout" svg:width="4.047cm" svg:height="1.266cm" svg:x="13.145cm" svg:y="10.408cm">
            <text:p text:style-name="P8"><text:span text:style-name="T3">+ play_soun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6" draw:text-style-name="P10" draw:layer="layout" svg:x1="15.168cm" svg:y1="9.255cm" svg:x2="13.298cm" svg:y2="5.662cm" draw:start-shape="id10" draw:end-shape="id11" draw:end-glue-point="7" svg:d="M15168 9255v-1797h-1870v-1796" svg:viewBox="0 0 1871 3594">
          <text:p/>
        </draw:connector>
        <draw:connector draw:style-name="gr57" draw:text-style-name="P10" draw:layer="layout" svg:x1="13.145cm" svg:y1="10.464cm" svg:x2="9.254cm" svg:y2="11.691cm" draw:start-shape="id10" draw:end-shape="id12" draw:end-glue-point="12" svg:d="M13145 10464h-1945v1227h-1946" svg:viewBox="0 0 3892 1228">
          <text:p/>
        </draw:connector>
      </draw:page>
      <draw:page draw:name="Remote monitoring" draw:style-name="dp1" draw:master-page-name="Default">
        <draw:custom-shape draw:style-name="gr58" draw:text-style-name="P2" draw:layer="layout" svg:width="19.843cm" svg:height="0.7cm" svg:x="0.977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" draw:layer="layout" svg:width="19.716cm" svg:height="0.7cm" svg:x="1.104cm" svg:y="6.4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" draw:layer="layout" svg:width="20.326cm" svg:height="0.7cm" svg:x="0.811cm" svg:y="18.8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" draw:layer="layout" svg:width="28.7cm" svg:height="17.948cm" svg:x="0.5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14" draw:id="id1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6">
            <draw:custom-shape draw:style-name="gr62" draw:text-style-name="P7" draw:layer="layout" svg:width="7.19cm" svg:height="1.153cm" svg:x="1.852cm" svg:y="8.129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remote_monitoring.RMService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3" draw:text-style-name="P9" draw:layer="layout" svg:width="7.19cm" svg:height="0.786cm" svg:x="1.852cm" svg:y="9.282cm">
              <text:p text:style-name="P8"><text:span text:style-name="T3">- queue: Queue&lt;message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4" draw:text-style-name="P9" draw:layer="layout" svg:width="7.19cm" svg:height="0.993cm" svg:x="1.852cm" svg:y="10.06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send_message()</text:span></text:p>
              <text:p text:style-name="P8"><text:span text:style-name="T3">+ clo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65" draw:text-style-name="P4" draw:layer="layout" svg:width="28.7cm" svg:height="0.952cm" svg:x="0.5cm" svg:y="1.1cm">
          <text:p text:style-name="P1">Class Diagram: Remote monitoring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1.135cm" svg:y="11.187cm">
          <draw:text-box>
            <text:p><text:span text:style-name="T1">&lt;&lt;uses&gt;&gt;</text:span></text:p>
          </draw:text-box>
        </draw:frame>
        <draw:g draw:style-name="gr6" xml:id="id13" draw:id="id1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6">
            <draw:custom-shape draw:style-name="gr66" draw:text-style-name="P7" draw:layer="layout" svg:width="6.668cm" svg:height="1.153cm" svg:x="1.452cm" svg:y="12.77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remote_monitoring.Heartbeat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7" draw:text-style-name="P9" draw:layer="layout" svg:width="6.668cm" svg:height="0.583cm" svg:x="1.452cm" svg:y="13.9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8" draw:text-style-name="P9" draw:layer="layout" svg:width="6.668cm" svg:height="1.387cm" svg:x="1.452cm" svg:y="14.51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start_heartbeat()</text:span></text:p>
              <text:p text:style-name="P8"><text:span text:style-name="T3">+ stop_heartbeat()</text:span></text:p>
              <text:p text:style-name="P8"><text:span text:style-name="T3">+ run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17" draw:id="id1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6">
            <draw:custom-shape draw:style-name="gr69" draw:text-style-name="P7" draw:layer="layout" svg:width="4.18cm" svg:height="1.153cm" svg:x="4.575cm" svg:y="16.13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BaseClass&gt;&gt;</text:span></text:p>
              <text:p text:style-name="P6"><text:span text:style-name="T2">Tim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0" draw:text-style-name="P9" draw:layer="layout" svg:width="4.18cm" svg:height="0.178cm" svg:x="4.575cm" svg:y="17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1" draw:text-style-name="P9" draw:layer="layout" svg:width="4.18cm" svg:height="0.993cm" svg:x="4.575cm" svg:y="17.46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start()</text:span></text:p>
              <text:p text:style-name="P8"><text:span text:style-name="T3">+ stop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72" draw:text-style-name="P10" draw:layer="layout" svg:x1="1.825cm" svg:y1="12.777cm" svg:x2="3.851cm" svg:y2="11.061cm" draw:start-shape="id13" draw:start-glue-point="4" draw:end-shape="id14" draw:end-glue-point="8" svg:d="M1825 12777v-859h2026v-857" svg:viewBox="0 0 2027 1717">
          <text:p/>
        </draw:connector>
        <draw:g draw:style-name="gr6" xml:id="id19" draw:id="id19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custom-shape draw:style-name="gr73" draw:text-style-name="P19" draw:layer="layout" svg:width="4.845cm" svg:height="1.153cm" svg:x="22.96cm" svg:y="6.90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static&gt;&gt;</text:span></text:p>
            <text:p text:style-name="P18"><text:span text:style-name="T2">messaging.Command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9" draw:layer="layout" svg:width="4.845cm" svg:height="0.711cm" svg:x="22.96cm" svg:y="8.0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9" draw:layer="layout" svg:width="4.845cm" svg:height="0.993cm" svg:x="22.96cm" svg:y="8.65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subscribe(sources: tuple[str,...] | None)::Queu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15" draw:id="id1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76" draw:text-style-name="P19" draw:layer="layout" svg:width="7.308cm" svg:height="1.153cm" svg:x="12.707cm" svg:y="12.10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thread&gt;&gt;</text:span></text:p>
            <text:p text:style-name="P18"><text:span text:style-name="T2">wifi_listen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9" draw:layer="layout" svg:width="7.308cm" svg:height="0.563cm" svg:x="12.707cm" svg:y="13.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9" draw:layer="layout" svg:width="7.308cm" svg:height="0.993cm" svg:x="12.707cm" svg:y="13.82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- onMessage(</text:span></text:p>
            <text:p text:style-name="P8"><text:span text:style-name="T3"><text:s text:c="8"/></text:span><text:span text:style-name="T3">command: CommandMessage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9" draw:text-style-name="P12" xml:id="id16" draw:id="id16" draw:layer="layout" svg:width="7.302cm" svg:height="1.182cm" svg:x="13.335cm" svg:y="9.96cm">
          <text:p text:style-name="P11"><text:span text:style-name="T4">The wifi_listener is waiting for a message in the assigned queue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80" draw:text-style-name="P13" draw:layer="layout" draw:type="line" svg:x1="14.739cm" svg:y1="12.108cm" svg:x2="13.926cm" svg:y2="11.142cm" draw:start-shape="id15" draw:start-glue-point="5" draw:end-shape="id16" draw:end-glue-point="6" svg:d="M14739 12108l-813-966" svg:viewBox="0 0 814 967">
          <text:p/>
        </draw:connector>
        <draw:connector draw:style-name="gr81" draw:text-style-name="P10" draw:layer="layout" svg:x1="12.708cm" svg:y1="12.743cm" svg:x2="8.643cm" svg:y2="11.061cm" draw:start-shape="id15" draw:start-glue-point="6" draw:end-shape="id14" draw:end-glue-point="10" svg:d="M12708 12743h-4065v-1682" svg:viewBox="0 0 4066 1683">
          <text:p/>
        </draw:connector>
        <draw:frame draw:style-name="gr5" draw:text-style-name="P5" draw:layer="layout" svg:width="3.81cm" svg:height="0.725cm" svg:x="8.755cm" svg:y="12.022cm">
          <draw:text-box>
            <text:p><text:span text:style-name="T1">&lt;&lt;consists of&gt;&gt;</text:span></text:p>
          </draw:text-box>
        </draw:frame>
        <draw:connector draw:style-name="gr82" draw:text-style-name="P10" draw:layer="layout" svg:x1="4.576cm" svg:y1="17.918cm" svg:x2="1.825cm" svg:y2="15.899cm" draw:start-shape="id17" draw:start-glue-point="11" draw:end-shape="id13" draw:end-glue-point="7" svg:d="M4576 17918h-2751v-2019" svg:viewBox="0 0 2752 2020">
          <text:p/>
        </draw:connector>
        <draw:frame draw:style-name="gr5" draw:text-style-name="P5" draw:layer="layout" svg:width="3.81cm" svg:height="0.725cm" svg:x="0.817cm" svg:y="17.827cm">
          <draw:text-box>
            <text:p><text:span text:style-name="T1">&lt;&lt;consists of&gt;&gt;</text:span></text:p>
          </draw:text-box>
        </draw:frame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83" draw:text-style-name="P21" draw:layer="layout" svg:width="19.69cm" svg:height="0.679cm" svg:x="1.13cm" svg:y="3.28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22" draw:layer="layout" svg:width="19.69cm" svg:height="2.101cm" svg:x="1.13cm" svg:y="3.965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18" draw:id="id18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85" draw:text-style-name="P23" draw:layer="layout" svg:width="7.467cm" svg:height="0.679cm" svg:x="6.58cm" svg:y="4.30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24" draw:layer="layout" svg:width="7.467cm" svg:height="0.679cm" svg:x="6.58cm" svg:y="4.985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remote_monitor: RM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5" draw:text-style-name="P5" draw:layer="layout" svg:width="3.085cm" svg:height="0.725cm" svg:x="4.082cm" svg:y="7.515cm">
          <draw:text-box>
            <text:p><text:span text:style-name="T1">&lt;&lt;uses&gt;&gt;</text:span></text:p>
          </draw:text-box>
        </draw:frame>
        <draw:connector draw:style-name="gr87" draw:text-style-name="P10" draw:layer="layout" svg:x1="7.045cm" svg:y1="8.13cm" svg:x2="8.073cm" svg:y2="5.664cm" draw:start-shape="id14" draw:start-glue-point="14" draw:end-shape="id18" draw:end-glue-point="4" svg:d="M7045 8130v-1234h1028v-1232" svg:viewBox="0 0 1029 2467">
          <text:p/>
        </draw:connector>
        <draw:g draw:style-name="gr6" xml:id="id20" draw:id="id2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88" draw:text-style-name="P19" draw:layer="layout" svg:width="4.122cm" svg:height="0.679cm" svg:x="10.9cm" svg:y="16.9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send_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9" draw:text-style-name="P9" draw:layer="layout" svg:width="4.122cm" svg:height="0.323cm" svg:x="10.9cm" svg:y="17.5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0" draw:text-style-name="P9" draw:layer="layout" svg:width="4.122cm" svg:height="0.57cm" svg:x="10.9cm" svg:y="17.92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1" draw:text-style-name="P2" draw:layer="layout" svg:width="0.911cm" svg:height="16.193cm" svg:x="21.231cm" svg:y="2.57cm">
          <text:p text:style-name="P1">GLOBALS&amp;UTIL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2" draw:text-style-name="P10" draw:layer="layout" svg:x1="22.96cm" svg:y1="8.276cm" svg:x2="9.042cm" svg:y2="9.595cm" draw:start-shape="id19" draw:end-shape="id14" draw:end-glue-point="1" svg:d="M22960 8276h-6959v1319h-6959" svg:viewBox="0 0 13919 1320">
          <text:p/>
        </draw:connector>
        <draw:connector draw:style-name="gr93" draw:text-style-name="P10" draw:layer="layout" svg:x1="10.901cm" svg:y1="17.556cm" svg:x2="8.12cm" svg:y2="14.337cm" draw:start-shape="id20" draw:start-glue-point="6" draw:end-shape="id13" draw:end-glue-point="1" svg:d="M10901 17556h-1391v-3219h-1390" svg:viewBox="0 0 2782 3220">
          <text:p/>
        </draw:connector>
        <draw:frame draw:style-name="gr94" draw:text-style-name="P25" draw:layer="layout" svg:width="4.445cm" svg:height="1.039cm" svg:x="9.707cm" svg:y="15.287cm">
          <draw:text-box>
            <text:p><text:span text:style-name="T3">onTimerExpired( </text:span></text:p>
            <text:p><text:span text:style-name="T3">msg_type: HEARTBEAT)</text:span></text:p>
          </draw:text-box>
        </draw:frame>
        <draw:frame draw:style-name="gr5" draw:text-style-name="P26" draw:layer="layout" svg:width="5.715cm" svg:height="0.725cm" svg:x="9.707cm" svg:y="8.847cm">
          <draw:text-box>
            <text:p><text:span text:style-name="T1">returns Queue&lt;message&gt;</text:span></text:p>
          </draw:text-box>
        </draw:frame>
        <draw:connector draw:style-name="gr95" draw:text-style-name="P10" draw:layer="layout" svg:x1="15.021cm" svg:y1="17.948cm" svg:x2="19.61cm" svg:y2="14.816cm" draw:start-shape="id20" draw:start-glue-point="12" draw:end-shape="id15" draw:end-glue-point="10" svg:d="M15021 17948h4589v-3132" svg:viewBox="0 0 4590 3133">
          <text:p/>
        </draw:connector>
        <draw:frame draw:style-name="gr94" draw:text-style-name="P25" draw:layer="layout" svg:width="4.445cm" svg:height="1.039cm" svg:x="15.245cm" svg:y="16.753cm">
          <draw:text-box>
            <text:p><text:span text:style-name="T3">onWIFI_CONNECTED( </text:span></text:p>
            <text:p><text:span text:style-name="T3">msg_type: SYS_INFO)</text:span></text:p>
          </draw:text-box>
        </draw:frame>
        <draw:g draw:style-name="gr6" xml:id="id21" draw:id="id21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glue-point draw:id="9" svg:x="-1.314cm" svg:y="-5.099cm"/>
          <draw:custom-shape draw:style-name="gr96" draw:text-style-name="P19" draw:layer="layout" svg:width="6.35cm" svg:height="1.153cm" svg:x="22.607cm" svg:y="14.36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module&gt;&gt;</text:span></text:p>
            <text:p text:style-name="P18"><text:span text:style-name="T2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9" draw:layer="layout" svg:width="6.35cm" svg:height="0.711cm" svg:x="22.607cm" svg:y="15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9" draw:layer="layout" svg:width="6.35cm" svg:height="0.993cm" svg:x="22.607cm" svg:y="16.12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safe_get(queue: Queue):: </text:span></text:p>
            <text:p text:style-name="P8"><text:span text:style-name="T3"><text:s text:c="2"/></text:span><text:span text:style-name="T3">CommandMessage | Error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99" draw:text-style-name="P10" draw:layer="layout" svg:x1="25.782cm" svg:y1="14.366cm" svg:x2="20.014cm" svg:y2="12.743cm" draw:start-shape="id21" draw:start-glue-point="0" draw:end-shape="id15" draw:end-glue-point="13" svg:d="M25782 14366v-1623h-5768" svg:viewBox="0 0 5769 1624">
          <text:p/>
        </draw:connector>
      </draw:page>
      <draw:page draw:name="Web service" draw:style-name="dp1" draw:master-page-name="Default">
        <draw:custom-shape draw:style-name="gr91" draw:text-style-name="P2" draw:layer="layout" svg:width="0.911cm" svg:height="16.193cm" svg:x="20.939cm" svg:y="2.805cm">
          <text:p text:style-name="P1">GLOBALS&amp;UTIL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2" draw:layer="layout" svg:width="19.249cm" svg:height="0.7cm" svg:x="1.436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2" draw:layer="layout" svg:width="19.137cm" svg:height="0.7cm" svg:x="1.548cm" svg:y="6.4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" draw:layer="layout" svg:width="19.374cm" svg:height="0.7cm" svg:x="1.311cm" svg:y="18.7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17.51cm" svg:y="9.255cm">
          <draw:text-box>
            <text:p><text:span text:style-name="T1">&lt;&lt;uses&gt;&gt;</text:span></text:p>
          </draw:text-box>
        </draw:frame>
        <draw:custom-shape draw:style-name="gr103" draw:text-style-name="P3" draw:layer="layout" svg:width="27.7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23" draw:id="id2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04" draw:text-style-name="P7" draw:layer="layout" svg:width="6.985cm" svg:height="1.627cm" svg:x="9.025cm" svg:y="8.16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web_service.</text:span></text:p>
              <text:p text:style-name="P6"><text:span text:style-name="T2">WebService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5" draw:text-style-name="P9" draw:layer="layout" svg:width="6.985cm" svg:height="0.949cm" svg:x="9.025cm" svg:y="9.795cm">
              <text:p text:style-name="P14"><text:span text:style-name="T3">- uvicorn_server: UvicornServ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6" draw:text-style-name="P28" draw:layer="layout" svg:width="6.985cm" svg:height="1.781cm" svg:x="9.025cm" svg:y="10.74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27"><text:span text:style-name="T3">+ init()</text:span></text:p>
              <text:p text:style-name="P27"><text:span text:style-name="T3">+ stop()</text:span></text:p>
              <text:p text:style-name="P27"><text:span text:style-name="T3">+ state()::[WEB_ACTIVE | WEB_IDLE ]</text:span></text:p>
              <text:p text:style-name="P27"><text:span text:style-name="T3">+ start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107" draw:text-style-name="P4" draw:layer="layout" svg:width="27.7cm" svg:height="0.952cm" svg:x="1cm" svg:y="1.1cm">
          <text:p text:style-name="P1">Class Diagram: Web Service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22" draw:id="id2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08" draw:text-style-name="P7" draw:layer="layout" svg:width="4.763cm" svg:height="1.627cm" svg:x="13.665cm" svg:y="14.10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web_server.</text:span></text:p>
              <text:p text:style-name="P6"><text:span text:style-name="T2">UvicornServer</text:span></text:p>
              <text:p text:style-name="P6"><text:span text:style-name="T2">&lt;&lt;Server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9" draw:text-style-name="P9" draw:layer="layout" svg:width="4.763cm" svg:height="0.473cm" svg:x="13.665cm" svg:y="15.7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0" draw:text-style-name="P9" draw:layer="layout" svg:width="4.763cm" svg:height="1.781cm" svg:x="13.665cm" svg:y="16.20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init(app:FastAPI)</text:span></text:p>
              <text:p text:style-name="P8"><text:span text:style-name="T3">+ run()</text:span></text:p>
              <text:p text:style-name="P8"><text:span text:style-name="T3">+ start()</text:span></text:p>
              <text:p text:style-name="P8"><text:span text:style-name="T3">+ stop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24" draw:id="id2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g draw:style-name="gr6">
              <draw:custom-shape draw:style-name="gr111" draw:text-style-name="P7" draw:layer="layout" svg:width="5.602cm" svg:height="1.627cm" svg:x="-3.967cm" svg:y="13.7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6"><text:span text:style-name="T2">fastapi_server.</text:span></text:p>
                <text:p text:style-name="P6"><text:span text:style-name="T2">api_ap</text:span></text:p>
                <text:p text:style-name="P6"><text:span text:style-name="T2">&lt;&lt;Framework&gt;&gt;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2" draw:text-style-name="P9" draw:layer="layout" svg:width="5.602cm" svg:height="0.676cm" svg:x="-3.967cm" svg:y="15.327cm">
                <text:p text:style-name="P8"><text:span text:style-name="T3">+ api_app: FastAPI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3" draw:text-style-name="P9" draw:layer="layout" svg:width="5.602cm" svg:height="2.175cm" svg:x="-3.967cm" svg:y="15.997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8"><text:span text:style-name="T3">+ @api_app.get()</text:span></text:p>
                <text:p text:style-name="P8"><text:span text:style-name="T3">+ @api_app.put()</text:span></text:p>
                <text:p text:style-name="P8"><text:span text:style-name="T3">+ @api_app.post()</text:span></text:p>
                <text:p text:style-name="P8"><text:span text:style-name="T3">+ @api_app.api_route()</text:span></text:p>
                <text:p text:style-name="P8"><text:span text:style-name="T3">+ @api_app.middleware(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frame draw:style-name="gr5" draw:text-style-name="P5" draw:layer="layout" svg:width="3.81cm" svg:height="0.725cm" svg:x="11.795cm" svg:y="13.065cm">
          <draw:text-box>
            <text:p><text:span text:style-name="T1">&lt;&lt;consists of&gt;&gt;</text:span></text:p>
          </draw:text-box>
        </draw:frame>
        <draw:connector draw:style-name="gr114" draw:text-style-name="P10" draw:layer="layout" svg:x1="17.104cm" svg:y1="14.106cm" svg:x2="15.622cm" svg:y2="12.525cm" draw:start-shape="id22" draw:start-glue-point="14" draw:end-shape="id23" draw:end-glue-point="10" svg:d="M17104 14106v-792h-1482v-789" svg:viewBox="0 0 1483 1582">
          <text:p/>
        </draw:connector>
        <draw:connector draw:style-name="gr115" draw:text-style-name="P10" draw:layer="layout" svg:x1="13.665cm" svg:y1="16.045cm" svg:x2="1.634cm" svg:y2="14.336cm" draw:start-shape="id22" draw:start-glue-point="3" draw:end-shape="id24" draw:end-glue-point="13" svg:d="M13665 16045h-6015v-1709h-6016" svg:viewBox="0 0 12032 1710">
          <text:p/>
        </draw:connector>
        <draw:frame draw:style-name="gr5" draw:text-style-name="P5" draw:layer="layout" svg:width="3.085cm" svg:height="0.725cm" svg:x="2.27cm" svg:y="8.302cm">
          <draw:text-box>
            <text:p><text:span text:style-name="T1">&lt;&lt;uses&gt;&gt;</text:span></text:p>
          </draw:text-box>
        </draw:frame>
        <draw:frame draw:style-name="gr5" draw:text-style-name="P5" draw:layer="layout" svg:width="3.085cm" svg:height="0.725cm" svg:x="1.725cm" svg:y="9.89cm">
          <draw:text-box>
            <text:p><text:span text:style-name="T1">&lt;&lt;uses&gt;&gt;</text:span></text:p>
          </draw:text-box>
        </draw:frame>
        <draw:g draw:style-name="gr6" xml:id="id25" draw:id="id2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116" draw:text-style-name="P19" draw:layer="layout" svg:width="8.39cm" svg:height="1.153cm" svg:x="4.097cm" svg:y="15.28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thread&gt;&gt;</text:span></text:p>
            <text:p text:style-name="P18"><text:span text:style-name="T2">cmd_moni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9" draw:layer="layout" svg:width="8.39cm" svg:height="0.784cm" svg:x="4.097cm" svg:y="16.44cm">
            <text:p text:style-name="P8"><text:span text:style-name="T3">- cmd_queue: Que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9" draw:layer="layout" svg:width="8.39cm" svg:height="0.599cm" svg:x="4.097cm" svg:y="17.22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- safe_get(cmd_queue) -&gt; Command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9" draw:text-style-name="P12" xml:id="id27" draw:id="id27" draw:layer="layout" svg:width="6.667cm" svg:height="1.5cm" svg:x="1cm" svg:y="11.565cm">
          <text:p text:style-name="P11"><text:span text:style-name="T4">The web_cmd_monitor thread waits for web topics and processes topic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120" draw:text-style-name="P10" draw:layer="layout" svg:x1="12.022cm" svg:y1="15.288cm" svg:x2="10.967cm" svg:y2="12.525cm" draw:start-shape="id25" draw:start-glue-point="15" draw:end-shape="id23" draw:end-glue-point="8" svg:d="M12022 15288v-1383h-1055v-1380" svg:viewBox="0 0 1056 2764">
          <text:p/>
        </draw:connector>
        <draw:frame draw:style-name="gr5" draw:text-style-name="P5" draw:layer="layout" svg:width="3.81cm" svg:height="0.725cm" svg:x="3.16cm" svg:y="14.335cm">
          <draw:text-box>
            <text:p><text:span text:style-name="T1">&lt;&lt;consists of&gt;&gt;</text:span></text:p>
          </draw:text-box>
        </draw:frame>
        <draw:connector draw:style-name="gr121" draw:text-style-name="P10" draw:layer="layout" svg:x1="22.055cm" svg:y1="8.514cm" svg:x2="16.009cm" svg:y2="8.804cm" draw:start-shape="id26" draw:end-shape="id23" draw:end-glue-point="13" svg:d="M22055 8514h-3023v290h-3023" svg:viewBox="0 0 6047 291">
          <text:p/>
        </draw:connector>
        <draw:connector draw:style-name="gr122" draw:text-style-name="P13" draw:layer="layout" draw:type="line" svg:x1="7.667cm" svg:y1="12.315cm" svg:x2="6.43cm" svg:y2="15.288cm" draw:start-shape="id27" draw:start-glue-point="7" draw:end-shape="id25" draw:end-glue-point="5" svg:d="M7667 12315l-1237 2973" svg:viewBox="0 0 1238 2974">
          <text:p/>
        </draw:connector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123" draw:text-style-name="P21" draw:layer="layout" svg:width="18.913cm" svg:height="0.679cm" svg:x="1.575cm" svg:y="3.28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22" draw:layer="layout" svg:width="18.913cm" svg:height="2.101cm" svg:x="1.575cm" svg:y="3.964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28" draw:id="id28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125" draw:text-style-name="P23" draw:layer="layout" svg:width="7.501cm" svg:height="0.679cm" svg:x="6.809cm" svg:y="4.30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24" draw:layer="layout" svg:width="7.501cm" svg:height="0.679cm" svg:x="6.809cm" svg:y="4.984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web_service: Web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27" draw:text-style-name="P10" draw:layer="layout" draw:line-skew="0.552cm" svg:x1="9.415cm" svg:y1="8.169cm" svg:x2="8.309cm" svg:y2="5.663cm" draw:start-shape="id23" draw:start-glue-point="4" draw:end-shape="id28" draw:end-glue-point="4" svg:d="M9415 8169v-702h-1106v-1804" svg:viewBox="0 0 1107 2507">
          <text:p/>
        </draw:connector>
        <draw:g draw:style-name="gr6" xml:id="id26" draw:id="id26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custom-shape draw:style-name="gr128" draw:text-style-name="P19" draw:layer="layout" svg:width="6.492cm" svg:height="1.153cm" svg:x="22.055cm" svg:y="7.13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static&gt;&gt;</text:span></text:p>
            <text:p text:style-name="P18"><text:span text:style-name="T2">messaging.C</text:span><text:span text:style-name="T2">ommand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9" draw:layer="layout" svg:width="6.492cm" svg:height="0.711cm" svg:x="22.055cm" svg:y="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9" draw:layer="layout" svg:width="6.492cm" svg:height="0.993cm" svg:x="22.055cm" svg:y="8.89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</text:span><text:span text:style-name="T3">publish(CommandMessa</text:span><text:span text:style-name="T3">ge(</text:span></text:p>
            <text:p text:style-name="P8"><text:span text:style-name="T3"><text:s text:c="17"/></text:span><text:span text:style-name="T3">WEB_SOURCE,message</text:span><text:span text:style-name="T3">)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glue-point draw:id="9" svg:x="-1.314cm" svg:y="-5.099cm"/>
          <draw:custom-shape draw:style-name="gr131" draw:text-style-name="P19" draw:layer="layout" svg:width="6.35cm" svg:height="1.153cm" svg:x="22.15cm" svg:y="14.50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module&gt;&gt;</text:span></text:p>
            <text:p text:style-name="P18"><text:span text:style-name="T2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2" draw:text-style-name="P9" draw:layer="layout" svg:width="6.35cm" svg:height="0.711cm" svg:x="22.15cm" svg:y="15.6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3" draw:text-style-name="P9" draw:layer="layout" svg:width="6.35cm" svg:height="0.993cm" svg:x="22.15cm" svg:y="16.25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safe_get(queue: Queue):: </text:span></text:p>
            <text:p text:style-name="P8"><text:span text:style-name="T3"><text:s text:c="2"/></text:span><text:span text:style-name="T3">CommandMessage | Error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29" draw:id="id29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custom-shape draw:style-name="gr134" draw:text-style-name="P19" draw:layer="layout" svg:width="6.492cm" svg:height="1.153cm" svg:x="22.055cm" svg:y="10.314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</text:span><text:span text:style-name="T2">&lt;</text:span><text:span text:style-name="T2">st</text:span><text:span text:style-name="T2">at</text:span><text:span text:style-name="T2">ic</text:span><text:span text:style-name="T2">&gt;</text:span><text:span text:style-name="T2">&gt;</text:span></text:p>
            <text:p text:style-name="P18"><text:span text:style-name="T2">m</text:span><text:span text:style-name="T2">e</text:span><text:span text:style-name="T2">s</text:span><text:span text:style-name="T2">s</text:span><text:span text:style-name="T2">a</text:span><text:span text:style-name="T2">gi</text:span><text:span text:style-name="T2">n</text:span><text:span text:style-name="T2">g.</text:span><text:span text:style-name="T2">E</text:span><text:span text:style-name="T2">rr</text:span><text:span text:style-name="T2">or</text:span><text:span text:style-name="T2">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5" draw:text-style-name="P9" draw:layer="layout" svg:width="6.492cm" svg:height="0.711cm" svg:x="22.055cm" svg:y="11.4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6" draw:text-style-name="P9" draw:layer="layout" svg:width="6.492cm" svg:height="0.993cm" svg:x="22.055cm" svg:y="12.07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publish(ErrorMessage(</text:span></text:p>
            <text:p text:style-name="P8"><text:span text:style-name="T3"><text:s text:c="8"/></text:span><text:span text:style-name="T3">WEB_SOURCE,message)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37" draw:text-style-name="P10" draw:layer="layout" draw:line-skew="-1.505cm" svg:x1="22.055cm" svg:y1="11.689cm" svg:x2="16.01cm" svg:y2="10.346cm" draw:start-shape="id29" draw:end-shape="id23" draw:end-glue-point="1" svg:d="M22055 11689h-4528v-1343h-1517" svg:viewBox="0 0 6046 1344">
          <text:p/>
        </draw:connector>
        <draw:frame draw:style-name="gr5" draw:text-style-name="P5" draw:layer="layout" svg:width="3.085cm" svg:height="0.725cm" svg:x="16.965cm" svg:y="7.985cm">
          <draw:text-box>
            <text:p><text:span text:style-name="T1">::state()</text:span></text:p>
          </draw:text-box>
        </draw:frame>
        <draw:frame draw:style-name="gr138" draw:text-style-name="P5" draw:layer="layout" svg:width="4.99cm" svg:height="0.725cm" svg:x="16.147cm" svg:y="11.795cm">
          <draw:text-box>
            <text:p><text:span text:style-name="T1">::WEB_ERROR_STOP</text:span></text:p>
          </draw:text-box>
        </draw:frame>
      </draw:page>
      <draw:page draw:name="WiFi" draw:style-name="dp1" draw:master-page-name="Default">
        <draw:custom-shape draw:style-name="gr139" draw:text-style-name="P2" draw:layer="layout" svg:width="21.141cm" svg:height="0.7cm" svg:x="1.449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2" draw:layer="layout" svg:width="21.019cm" svg:height="0.7cm" svg:x="1.571cm" svg:y="6.5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2" draw:layer="layout" svg:width="21.279cm" svg:height="0.7cm" svg:x="1.311cm" svg:y="18.7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3.857cm" svg:y="7.577cm">
          <draw:text-box>
            <text:p><text:span text:style-name="T1">&lt;&lt;uses&gt;&gt;</text:span></text:p>
          </draw:text-box>
        </draw:frame>
        <draw:custom-shape draw:style-name="gr142" draw:text-style-name="P3" draw:layer="layout" svg:width="27.94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33" draw:id="id3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43" draw:text-style-name="P7" draw:layer="layout" svg:width="5.654cm" svg:height="1.627cm" svg:x="12.348cm" svg:y="7.61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wifi_service.</text:span></text:p>
              <text:p text:style-name="P6"><text:span text:style-name="T2">WifiService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4" draw:text-style-name="P9" draw:layer="layout" svg:width="5.654cm" svg:height="0.531cm" svg:x="12.348cm" svg:y="9.2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5" draw:text-style-name="P28" draw:layer="layout" svg:width="5.654cm" svg:height="1.781cm" svg:x="12.348cm" svg:y="9.76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27"><text:span text:style-name="T3">+ init()</text:span></text:p>
              <text:p text:style-name="P27"><text:span text:style-name="T3">+ get_state()</text:span></text:p>
              <text:p text:style-name="P27"><text:span text:style-name="T3">+ wifi_connect()</text:span></text:p>
              <text:p text:style-name="P27"><text:span text:style-name="T3">+ wifi_disconnect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146" draw:text-style-name="P4" draw:layer="layout" svg:width="27.94cm" svg:height="0.952cm" svg:x="1cm" svg:y="1.1cm">
          <text:p text:style-name="P1">Class Diagram: WiFi Servic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7" draw:text-style-name="P5" draw:layer="layout" svg:width="3.81cm" svg:height="0.725cm" svg:x="3.54cm" svg:y="11.387cm">
          <draw:text-box>
            <text:p><text:span text:style-name="T1">&lt;&lt;consists of&gt;&gt;</text:span></text:p>
          </draw:text-box>
        </draw:frame>
        <draw:connector draw:style-name="gr148" draw:text-style-name="P10" draw:layer="layout" svg:x1="14.835cm" svg:y1="16.33cm" svg:x2="9.386cm" svg:y2="15.317cm" draw:end-shape="id30" draw:end-glue-point="9" svg:d="M14835 16330v-243h-5449v-770" svg:viewBox="0 0 5450 1014">
          <text:p/>
        </draw:connector>
        <draw:connector draw:style-name="gr149" draw:text-style-name="P10" draw:layer="layout" svg:x1="2.733cm" svg:y1="8.937cm" svg:x2="8.959cm" svg:y2="10.072cm" draw:start-shape="id31" draw:start-glue-point="0" svg:d="M2733 8937v-528h6226v1663" svg:viewBox="0 0 6227 1664">
          <text:p/>
        </draw:connector>
        <draw:g draw:style-name="gr6" xml:id="id32" draw:id="id3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50" draw:text-style-name="P7" draw:layer="layout" svg:width="4.775cm" svg:height="1.627cm" svg:x="13.74cm" svg:y="12.74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wifi_service.</text:span></text:p>
              <text:p text:style-name="P6"><text:span text:style-name="T2">WifiEventListener</text:span></text:p>
              <text:p text:style-name="P6"><text:span text:style-name="T2">&lt;&lt;singleton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1" draw:text-style-name="P9" draw:layer="layout" svg:width="4.775cm" svg:height="0.779cm" svg:x="13.74cm" svg:y="14.3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2" draw:text-style-name="P9" draw:layer="layout" svg:width="4.775cm" svg:height="0.599cm" svg:x="13.74cm" svg:y="15.14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5" draw:text-style-name="P5" draw:layer="layout" svg:width="3.085cm" svg:height="0.725cm" svg:x="-0.325cm" svg:y="13.41cm">
          <draw:text-box>
            <text:p><text:span text:style-name="T1">&lt;</text:span><text:span text:style-name="T1">&lt;</text:span><text:span text:style-name="T1">u</text:span><text:span text:style-name="T1">s</text:span><text:span text:style-name="T1">e</text:span><text:span text:style-name="T1">s</text:span><text:span text:style-name="T1">&gt;</text:span><text:span text:style-name="T1">&gt;</text:span></text:p>
          </draw:text-box>
        </draw:frame>
        <draw:frame draw:style-name="gr5" draw:text-style-name="P5" draw:layer="layout" svg:width="3.085cm" svg:height="0.725cm" svg:x="8.62cm" svg:y="7.577cm">
          <draw:text-box>
            <text:p><text:span text:style-name="T1">&lt;</text:span><text:span text:style-name="T1">&lt;</text:span><text:span text:style-name="T1">u</text:span><text:span text:style-name="T1">s</text:span><text:span text:style-name="T1">e</text:span><text:span text:style-name="T1">s</text:span><text:span text:style-name="T1">&gt;</text:span><text:span text:style-name="T1">&gt;</text:span></text:p>
          </draw:text-box>
        </draw:frame>
        <draw:g draw:style-name="gr6" xml:id="id31" draw:id="id31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custom-shape draw:style-name="gr153" draw:text-style-name="P19" draw:layer="layout" svg:width="7.327cm" svg:height="1.153cm" svg:x="-0.93cm" svg:y="8.93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module&gt;&gt;</text:span></text:p>
            <text:p text:style-name="P18"><text:span text:style-name="T2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4" draw:text-style-name="P9" draw:layer="layout" svg:width="7.327cm" svg:height="0.435cm" svg:x="-0.93cm" svg:y="10.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5" draw:text-style-name="P9" draw:layer="layout" svg:width="7.327cm" svg:height="0.993cm" svg:x="-0.93cm" svg:y="10.4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publish_command_message(</text:span></text:p>
            <text:p text:style-name="P8"><text:span text:style-name="T3"><text:s text:c="14"/></text:span><text:span text:style-name="T3">message: Command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56" draw:text-style-name="P7" draw:layer="layout" svg:width="7.072cm" svg:height="1.153cm" svg:x="2.007cm" svg:y="16.2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dbus.SystemBus</text:span></text:p>
              <text:p text:style-name="P6"><text:span text:style-name="T2">&lt;&lt;utility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7" draw:text-style-name="P9" draw:layer="layout" svg:width="7.072cm" svg:height="0.486cm" svg:x="2.007cm" svg:y="17.4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8" draw:text-style-name="P9" draw:layer="layout" svg:width="7.072cm" svg:height="0.373cm" svg:x="2.007cm" svg:y="17.91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59" draw:text-style-name="P7" draw:layer="layout" svg:width="7.072cm" svg:height="1.153cm" svg:x="9.627cm" svg:y="16.329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dbus.Interface</text:span></text:p>
              <text:p text:style-name="P6"><text:span text:style-name="T2">&lt;&lt;utility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0" draw:text-style-name="P9" draw:layer="layout" svg:width="7.072cm" svg:height="0.448cm" svg:x="9.627cm" svg:y="17.4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1" draw:text-style-name="P9" draw:layer="layout" svg:width="7.072cm" svg:height="0.345cm" svg:x="9.627cm" svg:y="17.93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30" draw:id="id3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62" draw:text-style-name="P7" draw:layer="layout" svg:width="7.072cm" svg:height="1.153cm" svg:x="4.278cm" svg:y="13.18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wifi_event_listener</text:span></text:p>
              <text:p text:style-name="P6"><text:span text:style-name="T2">&lt;&lt;Thread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3" draw:text-style-name="P9" draw:layer="layout" svg:width="7.072cm" svg:height="0.553cm" svg:x="4.278cm" svg:y="14.3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4" draw:text-style-name="P9" draw:layer="layout" svg:width="7.072cm" svg:height="0.425cm" svg:x="4.278cm" svg:y="14.89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65" draw:text-style-name="P10" draw:layer="layout" svg:x1="8.687cm" svg:y1="16.281cm" svg:x2="6.245cm" svg:y2="15.317cm" draw:end-shape="id30" draw:end-glue-point="8" svg:d="M8687 16281v-219h-2442v-745" svg:viewBox="0 0 2443 965">
          <text:p/>
        </draw:connector>
        <draw:connector draw:style-name="gr166" draw:text-style-name="P10" draw:layer="layout" svg:x1="11.35cm" svg:y1="13.918cm" svg:x2="13.741cm" svg:y2="13.378cm" draw:start-shape="id30" draw:start-glue-point="16" draw:end-shape="id32" draw:end-glue-point="6" svg:d="M11350 13918h1195v-540h1196" svg:viewBox="0 0 2392 541">
          <text:p/>
        </draw:connector>
        <draw:connector draw:style-name="gr167" draw:text-style-name="P10" draw:layer="layout" svg:x1="17.188cm" svg:y1="12.743cm" svg:x2="15.175cm" svg:y2="11.55cm" draw:start-shape="id32" draw:start-glue-point="14" draw:end-shape="id33" draw:end-glue-point="2" svg:d="M17188 12743v-598h-2013v-595" svg:viewBox="0 0 2014 1194">
          <text:p/>
        </draw:connector>
        <draw:custom-shape draw:style-name="gr168" draw:text-style-name="P12" xml:id="id34" draw:id="id34" draw:layer="layout" svg:width="7.703cm" svg:height="1.905cm" svg:x="20.685cm" svg:y="21.955cm">
          <text:p text:style-name="P11"><text:span text:style-name="T4">The wifi_event_listener thread subscribes to wifi_state_changed and process event and publish a related command topic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169" draw:text-style-name="P13" draw:layer="layout" draw:type="line" svg:x1="15.454cm" svg:y1="23.031cm" svg:x2="24.536cm" svg:y2="23.86cm" draw:end-shape="id34" draw:end-glue-point="2" svg:d="M15454 23031l9082 829" svg:viewBox="0 0 9083 830">
          <text:p/>
        </draw:connector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170" draw:text-style-name="P21" draw:layer="layout" svg:width="20.809cm" svg:height="0.679cm" svg:x="1.583cm" svg:y="3.284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1" draw:text-style-name="P22" draw:layer="layout" svg:width="20.809cm" svg:height="2.101cm" svg:x="1.583cm" svg:y="3.96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35" draw:id="id35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172" draw:text-style-name="P23" draw:layer="layout" svg:width="8.014cm" svg:height="0.679cm" svg:x="7.164cm" svg:y="4.304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3" draw:text-style-name="P24" draw:layer="layout" svg:width="8.014cm" svg:height="0.679cm" svg:x="7.164cm" svg:y="4.98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wifi_service: Wifi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74" draw:text-style-name="P10" draw:layer="layout" draw:line-skew="0.553cm" svg:x1="13.92cm" svg:y1="7.612cm" svg:x2="8.767cm" svg:y2="5.662cm" draw:start-shape="id33" draw:start-glue-point="5" draw:end-shape="id35" draw:end-glue-point="4" svg:d="M13920 7612v-423h-5153v-1527" svg:viewBox="0 0 5154 1951">
          <text:p/>
        </draw:connector>
        <draw:custom-shape draw:style-name="gr91" draw:text-style-name="P2" draw:layer="layout" svg:width="0.911cm" svg:height="16.193cm" svg:x="22.949cm" svg:y="2.904cm">
          <text:p text:style-name="P1">GLOBALS&amp;UTILS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36" draw:id="id36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custom-shape draw:style-name="gr175" draw:text-style-name="P19" draw:layer="layout" svg:width="6.492cm" svg:height="1.153cm" svg:x="24.353cm" svg:y="6.71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</text:span><text:span text:style-name="T2">&lt;</text:span><text:span text:style-name="T2">st</text:span><text:span text:style-name="T2">at</text:span><text:span text:style-name="T2">ic</text:span><text:span text:style-name="T2">&gt;</text:span><text:span text:style-name="T2">&gt;</text:span></text:p>
            <text:p text:style-name="P18"><text:span text:style-name="T2">m</text:span><text:span text:style-name="T2">e</text:span><text:span text:style-name="T2">s</text:span><text:span text:style-name="T2">s</text:span><text:span text:style-name="T2">a</text:span><text:span text:style-name="T2">gi</text:span><text:span text:style-name="T2">n</text:span><text:span text:style-name="T2">g.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6" draw:text-style-name="P9" draw:layer="layout" svg:width="6.492cm" svg:height="0.656cm" svg:x="24.353cm" svg:y="7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7" draw:text-style-name="P9" draw:layer="layout" svg:width="6.492cm" svg:height="0.993cm" svg:x="24.353cm" svg:y="8.42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publish(CommandMessage(</text:span></text:p>
            <text:p text:style-name="P8"><text:span text:style-name="T3"><text:s text:c="17"/></text:span><text:span text:style-name="T3">WEB_SOURCE,message)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glue-point draw:id="9" svg:x="-1.314cm" svg:y="-5.099cm"/>
          <draw:custom-shape draw:style-name="gr178" draw:text-style-name="P19" draw:layer="layout" svg:width="6.35cm" svg:height="1.153cm" svg:x="24.495cm" svg:y="14.33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module&gt;&gt;</text:span></text:p>
            <text:p text:style-name="P18"><text:span text:style-name="T2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9" draw:text-style-name="P9" draw:layer="layout" svg:width="6.35cm" svg:height="0.711cm" svg:x="24.495cm" svg:y="15.4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0" draw:text-style-name="P9" draw:layer="layout" svg:width="6.35cm" svg:height="0.993cm" svg:x="24.495cm" svg:y="16.09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safe_get(queue: Queue):: </text:span></text:p>
            <text:p text:style-name="P8"><text:span text:style-name="T3"><text:s text:c="2"/></text:span><text:span text:style-name="T3">CommandMessage | Error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37" draw:id="id37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glue-point draw:id="9" svg:x="-5cm" svg:y="-3.075cm"/>
          <draw:custom-shape draw:style-name="gr181" draw:text-style-name="P19" draw:layer="layout" svg:width="6.492cm" svg:height="1.153cm" svg:x="24.495cm" svg:y="9.99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static&gt;&gt;</text:span></text:p>
            <text:p text:style-name="P18"><text:span text:style-name="T2">messaging.Erro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2" draw:text-style-name="P9" draw:layer="layout" svg:width="6.492cm" svg:height="0.711cm" svg:x="24.495cm" svg:y="11.1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3" draw:text-style-name="P9" draw:layer="layout" svg:width="6.492cm" svg:height="0.993cm" svg:x="24.495cm" svg:y="11.75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publish(ErrorMessage(</text:span></text:p>
            <text:p text:style-name="P8"><text:span text:style-name="T3"><text:s text:c="8"/></text:span><text:span text:style-name="T3">WEB_SOURCE,message)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84" draw:text-style-name="P10" draw:layer="layout" svg:x1="24.353cm" svg:y1="8.067cm" svg:x2="18.001cm" svg:y2="8.247cm" draw:start-shape="id36" draw:end-shape="id33" draw:end-glue-point="13" svg:d="M24353 8067h-3175v180h-3177" svg:viewBox="0 0 6353 181">
          <text:p/>
        </draw:connector>
        <draw:frame draw:style-name="gr185" draw:text-style-name="P30" draw:layer="layout" svg:width="4.128cm" svg:height="1.588cm" svg:x="18.462cm" svg:y="8.302cm">
          <draw:text-box>
            <text:p text:style-name="P29"><text:span text:style-name="T5">::[ WIFI_ACCESS_POINT | </text:span></text:p>
            <text:p text:style-name="P29"><text:span text:style-name="T5">WIFI_CONNECTED |</text:span></text:p>
            <text:p text:style-name="P29"><text:span text:style-name="T5">WIFI_DISCONNECTED | </text:span></text:p>
            <text:p text:style-name="P29"><text:span text:style-name="T5">get_state() ]</text:span></text:p>
          </draw:text-box>
        </draw:frame>
        <draw:connector draw:style-name="gr186" draw:text-style-name="P10" draw:layer="layout" svg:x1="24.495cm" svg:y1="10.526cm" svg:x2="18.001cm" svg:y2="11.006cm" draw:start-shape="id37" draw:start-glue-point="9" draw:end-shape="id33" draw:end-glue-point="12" svg:d="M24495 10526h-3246v480h-3248" svg:viewBox="0 0 6495 481">
          <text:p/>
        </draw:connector>
        <draw:connector draw:style-name="gr187" draw:text-style-name="P10" draw:layer="layout" draw:line-skew="0.767cm" svg:x1="24.495cm" svg:y1="11.371cm" svg:x2="18.515cm" svg:y2="14.244cm" draw:start-shape="id37" draw:end-shape="id32" draw:end-glue-point="1" svg:d="M24495 11371h-2223v2873h-3757" svg:viewBox="0 0 5981 2874">
          <text:p/>
        </draw:connector>
      </draw:page>
      <draw:page draw:name="USB" draw:style-name="dp1" draw:master-page-name="Default">
        <draw:custom-shape draw:style-name="gr188" draw:text-style-name="P2" draw:layer="layout" svg:width="23.905cm" svg:height="0.7cm" svg:x="1.473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2" draw:layer="layout" svg:width="23.771cm" svg:height="0.7cm" svg:x="1.607cm" svg:y="6.6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2" draw:layer="layout" svg:width="23.688cm" svg:height="0.7cm" svg:x="1.411cm" svg:y="18.7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9.702cm" svg:y="12.657cm">
          <draw:text-box>
            <text:p><text:span text:style-name="T1">&lt;&lt;uses&gt;&gt;</text:span></text:p>
          </draw:text-box>
        </draw:frame>
        <draw:custom-shape draw:style-name="gr191" draw:text-style-name="P3" draw:layer="layout" svg:width="25.4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38" draw:id="id3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92" draw:text-style-name="P7" draw:layer="layout" svg:width="6.54cm" svg:height="1.153cm" svg:x="16.812cm" svg:y="8.71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usb_service.USBService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3" draw:text-style-name="P9" draw:layer="layout" svg:width="6.54cm" svg:height="1.075cm" svg:x="16.812cm" svg:y="9.864cm">
              <text:p text:style-name="P14"><text:span text:style-name="T3">- observer: Observer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9" draw:layer="layout" svg:width="6.54cm" svg:height="0.993cm" svg:x="16.812cm" svg:y="10.93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init()</text:span></text:p>
              <text:p text:style-name="P8"><text:span text:style-name="T3">+ get_stat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195" draw:text-style-name="P4" draw:layer="layout" svg:width="25.4cm" svg:height="0.952cm" svg:x="1cm" svg:y="1.1cm">
          <text:p text:style-name="P1">Class Diagram: USB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41" draw:id="id4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g draw:style-name="gr6">
              <draw:custom-shape draw:style-name="gr196" draw:text-style-name="P7" draw:layer="layout" svg:width="5.448cm" svg:height="1.153cm" svg:x="11.149cm" svg:y="13.605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6"><text:span text:style-name="T2">&lt;&lt;singleton&gt;&gt;</text:span></text:p>
                <text:p text:style-name="P6"><text:span text:style-name="T2">usb_service.USBObserv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7" draw:text-style-name="P9" draw:layer="layout" svg:width="5.448cm" svg:height="0.692cm" svg:x="11.149cm" svg:y="14.758cm">
                <text:p text:style-name="P14"><text:span text:style-name="T3">- observer: Observ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8" draw:text-style-name="P9" draw:layer="layout" svg:width="5.448cm" svg:height="0.993cm" svg:x="11.149cm" svg:y="15.45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8"><text:span text:style-name="T3">+ on_created(event)</text:span></text:p>
                <text:p text:style-name="P8"><text:span text:style-name="T3">+ on_deleted (event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draw:style-name="gr6" xml:id="id44" draw:id="id4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99" draw:text-style-name="P7" draw:layer="layout" svg:width="6.718cm" svg:height="1.153cm" svg:x="1.542cm" svg:y="15.82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BaseClass&gt;&gt;</text:span></text:p>
              <text:p text:style-name="P6"><text:span text:style-name="T2">FileSystemEventHandl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0" draw:text-style-name="P9" draw:layer="layout" svg:width="6.718cm" svg:height="0.366cm" svg:x="1.542cm" svg:y="16.9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9" draw:layer="layout" svg:width="6.718cm" svg:height="0.993cm" svg:x="1.542cm" svg:y="17.34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on_created( event)</text:span></text:p>
              <text:p text:style-name="P8"><text:span text:style-name="T3">+ on_deleted(eve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43" draw:id="id4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02" draw:text-style-name="P23" draw:layer="layout" svg:width="4.41cm" svg:height="1.627cm" svg:x="20.11cm" svg:y="14.53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20"><text:span text:style-name="T2">&lt;&lt;Library&gt;&gt;</text:span></text:p>
              <text:p text:style-name="P31"><text:span text:style-name="T2">watchdog.observers.</text:span></text:p>
              <text:p text:style-name="P31"><text:span text:style-name="T2">Observ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3" draw:text-style-name="P9" draw:layer="layout" svg:width="4.41cm" svg:height="0.599cm" svg:x="20.11cm" svg:y="16.165cm">
              <text:p text:style-name="P8"><text:span text:style-name="T3">- USBObserver: 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4" draw:text-style-name="P9" draw:layer="layout" svg:width="4.41cm" svg:height="0.993cm" svg:x="20.11cm" svg:y="16.76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schedule()</text:span></text:p>
              <text:p text:style-name="P8"><text:span text:style-name="T3">+ start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205" draw:text-style-name="P5" draw:layer="layout" svg:width="2.223cm" svg:height="0.862cm" svg:x="8.66cm" svg:y="16.648cm">
          <draw:text-box>
            <text:p><text:span text:style-name="T1">&lt;&lt;is a&gt;</text:span></text:p>
          </draw:text-box>
        </draw:frame>
        <draw:frame draw:style-name="gr5" draw:text-style-name="P5" draw:layer="layout" svg:width="3.81cm" svg:height="0.725cm" svg:x="19.137cm" svg:y="12.34cm">
          <draw:text-box>
            <text:p><text:span text:style-name="T1">&lt;&lt;consists of&gt;&gt;</text:span></text:p>
          </draw:text-box>
        </draw:frame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206" draw:text-style-name="P21" draw:layer="layout" svg:width="23.838cm" svg:height="0.679cm" svg:x="1.609cm" svg:y="3.459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7" draw:text-style-name="P22" draw:layer="layout" svg:width="23.838cm" svg:height="2.101cm" svg:x="1.609cm" svg:y="4.138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39" draw:id="id39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08" draw:text-style-name="P23" draw:layer="layout" svg:width="8.002cm" svg:height="0.679cm" svg:x="16.128cm" svg:y="4.509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9" draw:text-style-name="P24" draw:layer="layout" svg:width="8.002cm" svg:height="0.679cm" svg:x="16.128cm" svg:y="5.188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usb_service = USB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10" draw:text-style-name="P10" draw:layer="layout" draw:line-skew="0.697cm" svg:x1="18.631cm" svg:y1="8.712cm" svg:x2="19.329cm" svg:y2="5.867cm" draw:start-shape="id38" draw:start-glue-point="5" draw:end-shape="id39" draw:end-glue-point="5" svg:d="M18631 8712v-727h698v-2118" svg:viewBox="0 0 699 2846">
          <text:p/>
        </draw:connector>
        <draw:g draw:style-name="gr6" xml:id="id40" draw:id="id40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custom-shape draw:style-name="gr211" draw:text-style-name="P19" draw:layer="layout" svg:width="7.297cm" svg:height="1.153cm" svg:x="8.137cm" svg:y="8.844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module&gt;&gt;</text:span></text:p>
            <text:p text:style-name="P18"><text:span text:style-name="T2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2" draw:text-style-name="P9" draw:layer="layout" svg:width="7.297cm" svg:height="0.435cm" svg:x="8.137cm" svg:y="9.9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3" draw:text-style-name="P9" draw:layer="layout" svg:width="7.297cm" svg:height="0.993cm" svg:x="8.137cm" svg:y="10.36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publish_command_message(</text:span></text:p>
            <text:p text:style-name="P8"><text:span text:style-name="T3"><text:s text:c="17"/></text:span><text:span text:style-name="T3">message: Command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14" draw:text-style-name="P10" draw:layer="layout" svg:x1="11.785cm" svg:y1="11.36cm" svg:x2="15.084cm" svg:y2="13.606cm" draw:start-shape="id40" draw:end-shape="id41" draw:end-glue-point="14" svg:d="M11785 11360v1122h3299v1124" svg:viewBox="0 0 3300 2247">
          <text:p/>
        </draw:connector>
        <draw:g draw:style-name="gr6" xml:id="id42" draw:id="id4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15" draw:text-style-name="P7" draw:layer="layout" svg:width="5.397cm" svg:height="1.153cm" svg:x="1.593cm" svg:y="11.90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module&gt;&gt;</text:span></text:p>
              <text:p text:style-name="P6"><text:span text:style-name="T2">wifi_service.p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6" draw:text-style-name="P9" draw:layer="layout" svg:width="5.397cm" svg:height="0.434cm" svg:x="1.593cm" svg:y="13.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7" draw:text-style-name="P9" draw:layer="layout" svg:width="5.397cm" svg:height="0.993cm" svg:x="1.593cm" svg:y="13.49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networkmanager_add(</text:span></text:p>
              <text:p text:style-name="P8"><text:span text:style-name="T3"><text:s text:c="9"/></text:span><text:span text:style-name="T3">network:str, password:str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18" draw:text-style-name="P10" draw:layer="layout" svg:x1="6.989cm" svg:y1="12.543cm" svg:x2="11.149cm" svg:y2="14.234cm" draw:start-shape="id42" draw:start-glue-point="13" draw:end-shape="id41" draw:end-glue-point="21" svg:d="M6989 12543h2080v1691h2080" svg:viewBox="0 0 4161 1692">
          <text:p/>
        </draw:connector>
        <draw:frame draw:style-name="gr5" draw:text-style-name="P5" draw:layer="layout" svg:width="3.81cm" svg:height="0.725cm" svg:x="19.137cm" svg:y="13.292cm">
          <draw:text-box>
            <text:p><text:span text:style-name="T1">&lt;&lt;schedules&gt;&gt;</text:span></text:p>
          </draw:text-box>
        </draw:frame>
        <draw:connector draw:style-name="gr219" draw:text-style-name="P10" draw:layer="layout" svg:x1="23.295cm" svg:y1="14.539cm" svg:x2="18.631cm" svg:y2="11.932cm" draw:start-shape="id43" draw:start-glue-point="14" draw:end-shape="id38" draw:end-glue-point="8" svg:d="M23295 14539v-1305h-4664v-1302" svg:viewBox="0 0 4665 2608">
          <text:p/>
        </draw:connector>
        <draw:connector draw:style-name="gr220" draw:text-style-name="P10" draw:layer="layout" svg:x1="16.596cm" svg:y1="15.899cm" svg:x2="20.111cm" svg:y2="15.174cm" draw:start-shape="id41" draw:start-glue-point="12" draw:end-shape="id43" draw:end-glue-point="6" svg:d="M16596 15899h1758v-725h1757" svg:viewBox="0 0 3516 726">
          <text:p/>
        </draw:connector>
        <draw:frame draw:style-name="gr5" draw:text-style-name="P5" draw:layer="layout" svg:width="3.085cm" svg:height="0.725cm" svg:x="17.232cm" svg:y="16.24cm">
          <draw:text-box>
            <text:p><text:span text:style-name="T1">&lt;&lt;uses&gt;&gt;</text:span></text:p>
          </draw:text-box>
        </draw:frame>
        <draw:connector draw:style-name="gr221" draw:text-style-name="P10" draw:layer="layout" svg:x1="11.15cm" svg:y1="15.899cm" svg:x2="8.259cm" svg:y2="16.458cm" draw:start-shape="id41" draw:start-glue-point="11" draw:end-shape="id44" draw:end-glue-point="13" svg:d="M11150 15899h-1445v559h-1446" svg:viewBox="0 0 2892 560">
          <text:p/>
        </draw:connector>
        <draw:frame draw:style-name="gr5" draw:text-style-name="P5" draw:layer="layout" svg:width="3.085cm" svg:height="0.725cm" svg:x="19.732cm" svg:y="7.577cm">
          <draw:text-box>
            <text:p><text:span text:style-name="T1">&lt;&lt;uses&gt;&gt;</text:span></text:p>
          </draw:text-box>
        </draw:frame>
      </draw:page>
      <draw:page draw:name="Volume" draw:style-name="dp1" draw:master-page-name="Default">
        <draw:custom-shape draw:style-name="gr222" draw:text-style-name="P2" draw:layer="layout" svg:width="23.669cm" svg:height="0.7cm" svg:x="1.461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2" draw:layer="layout" svg:width="23.537cm" svg:height="0.7cm" svg:x="1.593cm" svg:y="6.3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4" draw:text-style-name="P2" draw:layer="layout" svg:width="23.819cm" svg:height="0.7cm" svg:x="1.311cm" svg:y="17cm">
          <text:p text:style-name="P32"><text:s text:c="27"/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4.9cm" svg:y="7.032cm">
          <draw:text-box>
            <text:p><text:span text:style-name="T1">&lt;&lt;uses&gt;&gt;</text:span></text:p>
          </draw:text-box>
        </draw:frame>
        <draw:custom-shape draw:style-name="gr225" draw:text-style-name="P3" draw:layer="layout" svg:width="24.765cm" svg:height="18.315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46" draw:id="id4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26" draw:text-style-name="P7" draw:layer="layout" svg:width="6.686cm" svg:height="1.153cm" svg:x="7.256cm" svg:y="7.61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volume_control.VolumeControl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7" draw:text-style-name="P9" draw:layer="layout" svg:width="6.686cm" svg:height="0.765cm" svg:x="7.256cm" svg:y="8.7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8" draw:text-style-name="P34" draw:layer="layout" svg:width="6.686cm" svg:height="1.387cm" svg:x="7.256cm" svg:y="9.52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33"><text:span text:style-name="T6">+ set_notify()</text:span></text:p>
              <text:p text:style-name="P33"><text:span text:style-name="T6">+ start()</text:span></text:p>
              <text:p text:style-name="P33"><text:span text:style-name="T6">+ stop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229" draw:text-style-name="P4" draw:layer="layout" svg:width="24.765cm" svg:height="0.952cm" svg:x="1cm" svg:y="1.1cm">
          <text:p text:style-name="P1">Class Diagram: Volume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45" draw:id="id4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30" draw:text-style-name="P7" draw:layer="layout" svg:width="8.572cm" svg:height="1.153cm" svg:x="16.258cm" svg:y="8.90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i2c_service.I2CService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1" draw:text-style-name="P9" draw:layer="layout" svg:width="8.572cm" svg:height="0.761cm" svg:x="16.258cm" svg:y="10.0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2" draw:text-style-name="P9" draw:layer="layout" svg:width="8.572cm" svg:height="1.781cm" svg:x="16.258cm" svg:y="10.81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read_byte(device: int, register: int)</text:span></text:p>
              <text:p text:style-name="P8"><text:span text:style-name="T3">+ write_byte(device: int, register: int)</text:span></text:p>
              <text:p text:style-name="P8"><text:span text:style-name="T7">+ </text:span><text:span text:style-name="T8">read_block</text:span><text:span text:style-name="T7">(device: int, register: int, length: int)</text:span></text:p>
              <text:p text:style-name="P8"><text:span text:style-name="T7">+ write</text:span><text:span text:style-name="T8">_block</text:span><text:span text:style-name="T7">(device: int, register: int, length: i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33" draw:text-style-name="P10" draw:layer="layout" svg:x1="22.449cm" svg:y1="8.906cm" svg:x2="13.941cm" svg:y2="8.247cm" draw:start-shape="id45" draw:start-glue-point="14" draw:end-shape="id46" draw:end-glue-point="13" svg:d="M22449 8906v-659h-8508" svg:viewBox="0 0 8509 660">
          <text:p/>
        </draw:connector>
        <draw:frame draw:style-name="gr5" draw:text-style-name="P5" draw:layer="layout" svg:width="2.512cm" svg:height="0.725cm" svg:x="15.287cm" svg:y="7.467cm">
          <draw:text-box>
            <text:p><text:span text:style-name="T1">&lt;&lt;has&gt;&gt;</text:span></text:p>
          </draw:text-box>
        </draw:frame>
        <draw:frame draw:style-name="gr234" draw:text-style-name="P35" draw:layer="layout" svg:width="7.937cm" svg:height="1.673cm" svg:x="2.587cm" svg:y="18.145cm">
          <draw:text-box>
            <text:p><text:span text:style-name="T9">Waarom start(), stop(), set_notify(). Staat altijd op notify. Dus notify default aan. Gaat nooit gestopt worden</text:span></text:p>
          </draw:text-box>
        </draw:frame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235" draw:text-style-name="P21" draw:layer="layout" svg:width="23.068cm" svg:height="0.679cm" svg:x="1.691cm" svg:y="3.28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6" draw:text-style-name="P22" draw:layer="layout" svg:width="23.068cm" svg:height="2.101cm" svg:x="1.691cm" svg:y="3.96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47" draw:id="id47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37" draw:text-style-name="P23" draw:layer="layout" svg:width="7.307cm" svg:height="0.679cm" svg:x="6.091cm" svg:y="4.20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8" draw:text-style-name="P24" draw:layer="layout" svg:width="7.307cm" svg:height="0.679cm" svg:x="6.091cm" svg:y="4.88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volume_control = VolumeControl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39" draw:text-style-name="P10" draw:layer="layout" draw:line-skew="0.457cm" svg:x1="9.115cm" svg:y1="7.612cm" svg:x2="7.552cm" svg:y2="5.566cm" draw:start-shape="id46" draw:start-glue-point="5" draw:end-shape="id47" draw:end-glue-point="4" svg:d="M9115 7612v-567h-1563v-1479" svg:viewBox="0 0 1564 2047">
          <text:p/>
        </draw:connector>
        <draw:g draw:style-name="gr6" xml:id="id48" draw:id="id48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custom-shape draw:style-name="gr240" draw:text-style-name="P19" draw:layer="layout" svg:width="4.538cm" svg:height="1.627cm" svg:x="9.572cm" svg:y="12.93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thread&gt;&gt;</text:span></text:p>
            <text:p text:style-name="P18"><text:span text:style-name="T2">volume_control.</text:span></text:p>
            <text:p text:style-name="P18"><text:span text:style-name="T2">volume_manag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1" draw:text-style-name="P9" draw:layer="layout" svg:width="4.538cm" svg:height="0.435cm" svg:x="9.572cm" svg:y="14.5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2" draw:text-style-name="P9" draw:layer="layout" svg:width="4.538cm" svg:height="0.993cm" svg:x="9.572cm" svg:y="14.92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43" draw:text-style-name="P10" draw:layer="layout" svg:x1="11.841cm" svg:y1="12.932cm" svg:x2="13.571cm" svg:y2="10.916cm" draw:start-shape="id48" draw:start-glue-point="0" draw:end-shape="id46" draw:end-glue-point="10" svg:d="M11841 12932v-1009h1730v-1007" svg:viewBox="0 0 1731 2017">
          <text:p/>
        </draw:connector>
        <draw:g draw:style-name="gr6" xml:id="id49" draw:id="id49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custom-shape draw:style-name="gr244" draw:text-style-name="P19" draw:layer="layout" svg:width="7.297cm" svg:height="1.153cm" svg:x="1.64cm" svg:y="11.41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module&gt;&gt;</text:span></text:p>
            <text:p text:style-name="P18"><text:span text:style-name="T2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5" draw:text-style-name="P9" draw:layer="layout" svg:width="7.297cm" svg:height="0.435cm" svg:x="1.64cm" svg:y="12.5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6" draw:text-style-name="P9" draw:layer="layout" svg:width="7.297cm" svg:height="0.993cm" svg:x="1.64cm" svg:y="12.93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publish_command_message(</text:span></text:p>
            <text:p text:style-name="P8"><text:span text:style-name="T3"><text:s text:c="17"/></text:span><text:span text:style-name="T3">message: Command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47" draw:text-style-name="P10" draw:layer="layout" svg:x1="5.288cm" svg:y1="11.412cm" svg:x2="7.257cm" svg:y2="10.372cm" draw:start-shape="id49" draw:start-glue-point="0" draw:end-shape="id46" draw:end-glue-point="11" svg:d="M5288 11412v-1040h1969" svg:viewBox="0 0 1970 1041">
          <text:p/>
        </draw:connector>
        <draw:custom-shape draw:style-name="gr248" draw:text-style-name="P12" xml:id="id50" draw:id="id50" draw:layer="layout" svg:width="8.89cm" svg:height="1.719cm" svg:x="16.24cm" svg:y="14.421cm">
          <text:p text:style-name="P11"><text:span text:style-name="T4">The volume_manager thread waits for volume (adc) changes, set new volume and publishes a volume changed message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249" draw:text-style-name="P13" draw:layer="layout" draw:type="line" svg:x1="14.11cm" svg:y1="14.427cm" svg:x2="16.24cm" svg:y2="15.281cm" draw:start-shape="id48" draw:end-shape="id50" draw:end-glue-point="5" svg:d="M14110 14427l2130 854" svg:viewBox="0 0 2131 855">
          <text:p/>
        </draw:connector>
        <draw:g draw:style-name="gr6" xml:id="id51" draw:id="id5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50" draw:text-style-name="P7" draw:layer="layout" svg:width="5.397cm" svg:height="1.153cm" svg:x="13.858cm" svg:y="18.18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volume_adc</text:span></text:p>
              <text:p text:style-name="P6"><text:span text:style-name="T2">&lt;&lt;device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1" draw:text-style-name="P9" draw:layer="layout" svg:width="5.397cm" svg:height="0.353cm" svg:x="13.858cm" svg:y="19.3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2" draw:text-style-name="P9" draw:layer="layout" svg:width="5.397cm" svg:height="0.373cm" svg:x="13.858cm" svg:y="19.69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53" draw:text-style-name="P10" draw:layer="layout" svg:x1="15.358cm" svg:y1="18.188cm" svg:x2="13.941cm" svg:y2="10.372cm" draw:start-shape="id51" draw:start-glue-point="5" draw:end-shape="id46" draw:end-glue-point="12" svg:d="M15358 18188v-7816h-1417" svg:viewBox="0 0 1418 7817">
          <text:p/>
        </draw:connector>
      </draw:page>
      <draw:page draw:name="Error service" draw:style-name="dp1" draw:master-page-name="Default">
        <draw:custom-shape draw:style-name="gr254" draw:text-style-name="P2" draw:layer="layout" svg:width="19.565cm" svg:height="0.7cm" svg:x="1.437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5" draw:text-style-name="P2" draw:layer="layout" svg:width="19.218cm" svg:height="0.7cm" svg:x="1.549cm" svg:y="6.4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6" draw:text-style-name="P2" draw:layer="layout" svg:width="19.456cm" svg:height="0.7cm" svg:x="1.311cm" svg:y="17.1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4.582cm" svg:y="7.895cm">
          <draw:text-box>
            <text:p><text:span text:style-name="T1">&lt;&lt;uses&gt;&gt;</text:span></text:p>
          </draw:text-box>
        </draw:frame>
        <draw:custom-shape draw:style-name="gr257" draw:text-style-name="P3" draw:layer="layout" svg:width="20.637cm" svg:height="16.41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54" draw:id="id5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58" draw:text-style-name="P7" draw:layer="layout" svg:width="6.229cm" svg:height="1.153cm" svg:x="1.756cm" svg:y="8.91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error_service.py.ErrorService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9" draw:text-style-name="P9" draw:layer="layout" svg:width="6.229cm" svg:height="0.746cm" svg:x="1.756cm" svg:y="10.064cm">
              <text:p text:style-name="P8"><text:span text:style-name="T3">- error_queue:subscriber_errors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0" draw:text-style-name="P9" draw:layer="layout" svg:width="6.229cm" svg:height="0.993cm" svg:x="1.756cm" svg:y="10.8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- init()</text:span></text:p>
              <text:p text:style-name="P8"><text:span text:style-name="T3">- error_handler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261" draw:text-style-name="P4" draw:layer="layout" svg:width="20.637cm" svg:height="0.952cm" svg:x="1cm" svg:y="1.1cm">
          <text:p text:style-name="P1">Class Diagram: Error service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52" draw:id="id52">
          <draw:glue-point draw:id="4" svg:x="-4cm" svg:y="-5cm"/>
          <draw:custom-shape draw:style-name="gr262" draw:text-style-name="P19" draw:layer="layout" svg:width="5.715cm" svg:height="1.153cm" svg:x="11.132cm" svg:y="14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module&gt;&gt;</text:span></text:p>
            <text:p text:style-name="P18"><text:span text:style-name="T2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3" draw:text-style-name="P9" draw:layer="layout" svg:width="5.715cm" svg:height="0.771cm" svg:x="11.132cm" svg:y="15.153cm">
            <text:p text:style-name="P8"><text:span text:style-name="T3">+ Error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4" draw:text-style-name="P9" draw:layer="layout" svg:width="5.715cm" svg:height="0.599cm" svg:x="11.132cm" svg:y="15.8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safe_get( error_queue: Queu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65" draw:text-style-name="P10" draw:layer="layout" svg:x1="13.989cm" svg:y1="14cm" svg:x2="11.881cm" svg:y2="12.492cm" draw:start-shape="id52" draw:end-shape="id53" draw:end-glue-point="5" svg:d="M13989 14000v-754h-2108v-754" svg:viewBox="0 0 2109 1509">
          <text:p/>
        </draw:connector>
        <draw:frame draw:style-name="gr5" draw:text-style-name="P5" draw:layer="layout" svg:width="3.085cm" svg:height="0.725cm" svg:x="14.335cm" svg:y="12.975cm">
          <draw:text-box>
            <text:p><text:span text:style-name="T1">&lt;&lt;uses&gt;&gt;</text:span></text:p>
          </draw:text-box>
        </draw:frame>
        <draw:g draw:style-name="gr6" xml:id="id53" draw:id="id53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custom-shape draw:style-name="gr266" draw:text-style-name="P19" draw:layer="layout" svg:width="6.163cm" svg:height="1.153cm" svg:x="10.712cm" svg:y="9.71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thread&gt;&gt;</text:span></text:p>
            <text:p text:style-name="P18"><text:span text:style-name="T2">error_service.error_handl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7" draw:text-style-name="P9" draw:layer="layout" svg:width="6.163cm" svg:height="0.517cm" svg:x="10.712cm" svg:y="10.8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8" draw:text-style-name="P9" draw:layer="layout" svg:width="6.163cm" svg:height="1.18cm" svg:x="10.712cm" svg:y="11.31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69" draw:text-style-name="P10" draw:layer="layout" svg:x1="10.712cm" svg:y1="11.105cm" svg:x2="7.984cm" svg:y2="9.547cm" draw:start-shape="id53" draw:end-shape="id54" draw:end-glue-point="13" svg:d="M10712 11105h-1364v-1558h-1364" svg:viewBox="0 0 2729 1559">
          <text:p/>
        </draw:connector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270" draw:text-style-name="P21" draw:layer="layout" svg:width="19.311cm" svg:height="0.679cm" svg:x="1.691cm" svg:y="3.287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1" draw:text-style-name="P22" draw:layer="layout" svg:width="19.311cm" svg:height="2.101cm" svg:x="1.691cm" svg:y="3.966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55" draw:id="id55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72" draw:text-style-name="P23" draw:layer="layout" svg:width="6.985cm" svg:height="0.679cm" svg:x="5.762cm" svg:y="4.24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3" draw:text-style-name="P24" draw:layer="layout" svg:width="6.985cm" svg:height="0.679cm" svg:x="5.762cm" svg:y="4.92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error_service = Error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74" draw:text-style-name="P10" draw:layer="layout" draw:line-skew="0.409cm" svg:x1="3.488cm" svg:y1="8.912cm" svg:x2="7.159cm" svg:y2="5.606cm" draw:start-shape="id54" draw:start-glue-point="5" draw:end-shape="id55" draw:end-glue-point="4" svg:d="M3488 8912v-1245h3671v-2061" svg:viewBox="0 0 3672 3307">
          <text:p/>
        </draw:connector>
      </draw:page>
      <draw:page draw:name="Messaging" draw:style-name="dp1" draw:master-page-name="Default">
        <draw:custom-shape draw:style-name="gr275" draw:text-style-name="P2" draw:layer="layout" svg:width="28.575cm" svg:height="0.7cm" svg:x="0.582cm" svg:y="2.2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2" draw:layer="layout" svg:width="28.575cm" svg:height="0.7cm" svg:x="0.582cm" svg:y="7.3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6" draw:text-style-name="P21" draw:layer="layout" svg:width="28.575cm" svg:height="0.679cm" svg:x="0.582cm" svg:y="3.078cm">
          <draw:glue-point draw:id="4" svg:x="0cm" svg:y="0.635cm" draw:align="top-left"/>
          <draw:glue-point draw:id="5" svg:x="-3cm" svg:y="-4.997cm"/>
          <draw:glue-point draw:id="6" svg:x="-1cm" svg:y="-4.997cm"/>
          <draw:glue-point draw:id="7" svg:x="1cm" svg:y="-4.997cm"/>
          <draw:glue-point draw:id="8" svg:x="3cm" svg:y="-4.997cm"/>
          <draw:glue-point draw:id="9" svg:x="0cm" svg:y="0.635cm" draw:align="top-right"/>
          <text:p text:style-name="P20"><text:span text:style-name="T2">oradio_control.py &lt;&lt;module&gt;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7" draw:text-style-name="P22" draw:layer="layout" svg:width="28.575cm" svg:height="3.049cm" svg:x="0.582cm" svg:y="3.757cm">
          <draw:glue-point draw:id="4" svg:x="-3cm" svg:y="5.002cm"/>
          <draw:glue-point draw:id="5" svg:x="-1cm" svg:y="5.002cm"/>
          <draw:glue-point draw:id="6" svg:x="1cm" svg:y="5.002cm"/>
          <draw:glue-point draw:id="7" svg:x="3cm" svg:y="5.002cm"/>
          <draw:glue-point draw:id="8" svg:x="0cm" svg:y="-0.653cm" draw:align="bottom-left"/>
          <draw:glue-point draw:id="9" svg:x="0cm" svg:y="-0.653cm" draw:align="bottom-right"/>
          <text:p text:style-name="P15"><text:span text:style-name="T2"/></text:p>
          <text:p text:style-name="P15"><text:span text:style-name="T2"/></text:p>
          <text:p text:style-name="P15"><text:span text:style-name="T2"/></text:p>
          <text:p text:style-name="P15"><text:span text:style-name="T2"/></text:p>
          <text:p text:style-name="P15"><text:span text:style-name="T2"/></text:p>
          <text:p text:style-name="P15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2" draw:layer="layout" svg:width="28.575cm" svg:height="0.7cm" svg:x="0.582cm" svg:y="19.7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19.405cm" svg:y="8.202cm">
          <draw:text-box>
            <text:p><text:span text:style-name="T1">&lt;&lt;uses&gt;&gt;</text:span></text:p>
          </draw:text-box>
        </draw:frame>
        <draw:custom-shape draw:style-name="gr278" draw:text-style-name="P3" draw:layer="layout" svg:width="29.21cm" svg:height="18.633cm" svg:x="0.265cm" svg:y="1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56" draw:id="id5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g draw:style-name="gr6">
              <draw:custom-shape draw:style-name="gr279" draw:text-style-name="P7" draw:layer="layout" svg:width="6.923cm" svg:height="1.153cm" svg:x="11.377cm" svg:y="8.531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6"><text:span text:style-name="T2">messaging</text:span></text:p>
                <text:p text:style-name="P6"><text:span text:style-name="T2">&lt;&lt;module&gt;&gt;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80" draw:text-style-name="P9" draw:layer="layout" svg:width="6.923cm" svg:height="1.604cm" svg:x="11.377cm" svg:y="9.684cm">
                <text:p text:style-name="P8"><text:span text:style-name="T3">- CommandMessage()</text:span></text:p>
                <text:p text:style-name="P8"><text:span text:style-name="T3">- ErrorMessage()</text:span></text:p>
                <text:p text:style-name="P8"><text:span text:style-name="T3">- pubsub: PubSubManager(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81" draw:text-style-name="P9" draw:layer="layout" svg:width="6.923cm" svg:height="0.993cm" svg:x="11.377cm" svg:y="11.172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8"><text:span text:style-name="T3">+ safe_get(queue: Queue):: </text:span></text:p>
                <text:p text:style-name="P8"><text:span text:style-name="T3"><text:s text:c="9"/></text:span><text:span text:style-name="T3">CommandMessage | ErrorMessag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282" draw:text-style-name="P10" draw:layer="layout" svg:x1="11.763cm" svg:y1="8.532cm" svg:x2="9.764cm" svg:y2="5.35cm" draw:start-shape="id56" draw:start-glue-point="4" draw:end-shape="id57" draw:end-glue-point="5" svg:d="M11763 8532v-1592h-1999v-1590" svg:viewBox="0 0 2000 3183">
          <text:p/>
        </draw:connector>
        <draw:custom-shape draw:style-name="gr283" draw:text-style-name="P4" draw:layer="layout" svg:width="29.21cm" svg:height="0.952cm" svg:x="0.265cm" svg:y="1cm">
          <text:p text:style-name="P1">Class Diagram: Messaging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64" draw:id="id6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84" draw:text-style-name="P7" draw:layer="layout" svg:width="6.95cm" svg:height="1.153cm" svg:x="0.652cm" svg:y="15.454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messaging.CommandMessage</text:span></text:p>
              <text:p text:style-name="P6"><text:span text:style-name="T2">&lt;&lt;data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5" draw:text-style-name="P9" draw:layer="layout" svg:width="6.95cm" svg:height="1.494cm" svg:x="0.652cm" svg:y="16.607cm">
              <text:p text:style-name="P8"><text:span text:style-name="T3">+ source: String</text:span></text:p>
              <text:p text:style-name="P8"><text:span text:style-name="T3">+ message: String</text:span></text:p>
              <text:p text:style-name="P8"><text:span text:style-name="T3">+ data: Any</text:span></text:p>
              <text:p text:style-name="P8"><text:span text:style-name="T3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6" draw:text-style-name="P9" draw:layer="layout" svg:width="6.95cm" svg:height="0.599cm" svg:x="0.652cm" svg:y="18.10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<text:s/></text:span><text:span text:style-name="T3">+ is_valid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62" draw:id="id6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87" draw:text-style-name="P7" draw:layer="layout" svg:width="5.714cm" svg:height="1.153cm" svg:x="15.596cm" svg:y="16.754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messaging.ErrorMessage</text:span></text:p>
              <text:p text:style-name="P6"><text:span text:style-name="T2">&lt;&lt;data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8" draw:text-style-name="P9" draw:layer="layout" svg:width="5.714cm" svg:height="0.994cm" svg:x="15.596cm" svg:y="17.907cm">
              <text:p text:style-name="P8"><text:span text:style-name="T3">+ source: String</text:span></text:p>
              <text:p text:style-name="P8"><text:span text:style-name="T3">+ message: Stri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9" draw:text-style-name="P9" draw:layer="layout" svg:width="5.714cm" svg:height="0.599cm" svg:x="15.596cm" svg:y="18.90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<text:s/></text:span><text:span text:style-name="T3">+ is_valid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59" draw:id="id5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90" draw:text-style-name="P7" draw:layer="layout" svg:width="9.525cm" svg:height="1.153cm" svg:x="19.54cm" svg:y="9.81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messaging.PubSubManager</text:span></text:p>
              <text:p text:style-name="P6"><text:span text:style-name="T2">&lt;&lt;singleton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1" draw:text-style-name="P9" draw:layer="layout" svg:width="9.525cm" svg:height="2.265cm" svg:x="19.54cm" svg:y="10.971cm">
              <text:p text:style-name="P8"><text:span text:style-name="T3">- Topic.COMMAND: []</text:span></text:p>
              <text:p text:style-name="P8"><text:span text:style-name="T3">- Topic.ERROR: []</text:span></text:p>
              <text:p text:style-name="P8"><text:span text:style-name="T3">- queue: Queue()</text:span></text:p>
              <text:p text:style-name="P8"><text:span text:style-name="T3">- subscribers: dict[Topic,</text:span></text:p>
              <text:p text:style-name="P8"><text:span text:style-name="T3"><text:s text:c="30"/></text:span><text:span text:style-name="T3">list[tuple[Queue, frozenset[str]]]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2" draw:text-style-name="P9" draw:layer="layout" svg:width="9.525cm" svg:height="1.781cm" svg:x="19.54cm" svg:y="13.236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subscribe(topic: Topic, sources: tuple[str,...]::Queue</text:span></text:p>
              <text:p text:style-name="P8"><text:span text:style-name="T3">+ unsubscripe(topic: Topic, queue:Queue)</text:span></text:p>
              <text:p text:style-name="P8"><text:span text:style-name="T3">+ publish(topic: Topic, </text:span></text:p>
              <text:p text:style-name="P8"><text:span text:style-name="T3"><text:s text:c="16"/></text:span><text:span text:style-name="T3">message: CommandMessage | ErrorMessage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60" draw:id="id6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93" draw:text-style-name="P7" draw:layer="layout" svg:width="5.398cm" svg:height="1.153cm" svg:x="8.019cm" svg:y="16.754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messaging.Topic</text:span></text:p>
              <text:p text:style-name="P6"><text:span text:style-name="T2">&lt;&lt;data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4" draw:text-style-name="P9" draw:layer="layout" svg:width="5.398cm" svg:height="0.994cm" svg:x="8.019cm" svg:y="17.907cm">
              <text:p text:style-name="P8"><text:span text:style-name="T3">+ COMMAND = "COMMAND"</text:span></text:p>
              <text:p text:style-name="P8"><text:span text:style-name="T3">+ ERROR = "ERROR"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5" draw:text-style-name="P9" draw:layer="layout" svg:width="5.398cm" svg:height="0.599cm" svg:x="8.019cm" svg:y="18.90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96" draw:text-style-name="P10" draw:layer="layout" svg:x1="27.189cm" svg:y1="16.686cm" svg:x2="26.419cm" svg:y2="15.017cm" draw:start-shape="id58" draw:start-glue-point="14" draw:end-shape="id59" draw:end-glue-point="9" svg:d="M27189 16686v-836h-770v-833" svg:viewBox="0 0 771 1670">
          <text:p/>
        </draw:connector>
        <draw:frame draw:style-name="gr5" draw:text-style-name="P5" draw:layer="layout" svg:width="2.54cm" svg:height="0.725cm" svg:x="4.075cm" svg:y="14.552cm">
          <draw:text-box>
            <text:p><text:span text:style-name="T1">&lt;&lt;has&gt;&gt;</text:span></text:p>
          </draw:text-box>
        </draw:frame>
        <draw:connector draw:style-name="gr297" draw:text-style-name="P10" draw:layer="layout" svg:x1="8.321cm" svg:y1="16.755cm" svg:x2="6.579cm" svg:y2="13.175cm" draw:start-shape="id60" draw:start-glue-point="4" draw:end-shape="id61" draw:end-glue-point="9" svg:d="M8321 16755v-1791h-1742v-1789" svg:viewBox="0 0 1743 3581">
          <text:p/>
        </draw:connector>
        <draw:connector draw:style-name="gr298" draw:text-style-name="P10" draw:layer="layout" svg:x1="17.185cm" svg:y1="16.755cm" svg:x2="17.704cm" svg:y2="15.893cm" draw:start-shape="id62" draw:start-glue-point="5" draw:end-shape="id63" draw:end-glue-point="10" svg:d="M17185 16755v-432h519v-430" svg:viewBox="0 0 520 863">
          <text:p/>
        </draw:connector>
        <draw:connector draw:style-name="gr299" draw:text-style-name="P10" draw:layer="layout" svg:x1="2.585cm" svg:y1="15.455cm" svg:x2="4.744cm" svg:y2="13.175cm" draw:start-shape="id64" draw:start-glue-point="5" draw:end-shape="id61" draw:end-glue-point="2" svg:d="M2585 15455v-1141h2159v-1139" svg:viewBox="0 0 2160 2281">
          <text:p/>
        </draw:connector>
        <draw:g draw:style-name="gr6" xml:id="id65" draw:id="id6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300" draw:text-style-name="P19" draw:layer="layout" svg:width="6.668cm" svg:height="0.679cm" svg:x="15.522cm" svg:y="4.63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thread&gt;&gt;subscription_listen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1" draw:text-style-name="P9" draw:layer="layout" svg:width="6.668cm" svg:height="0.553cm" svg:x="15.522cm" svg:y="5.311cm">
            <text:p text:style-name="P8"><text:span text:style-name="T3">- queue: Commands.subscrib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2" draw:text-style-name="P9" draw:layer="layout" svg:width="6.668cm" svg:height="0.498cm" svg:x="15.522cm" svg:y="5.86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57" draw:id="id57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03" draw:text-style-name="P23" draw:layer="layout" svg:width="6.285cm" svg:height="0.679cm" svg:x="7.25cm" svg:y="3.992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4" draw:text-style-name="P24" draw:layer="layout" svg:width="6.285cm" svg:height="0.679cm" svg:x="7.25cm" svg:y="4.67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subscription_listener: Threa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05" draw:text-style-name="P10" draw:layer="layout" svg:x1="15.522cm" svg:y1="5.497cm" svg:x2="13.535cm" svg:y2="4.628cm" draw:start-shape="id65" draw:start-glue-point="3" draw:end-shape="id57" draw:end-glue-point="14" svg:d="M15522 5497h-994v-869h-993" svg:viewBox="0 0 1988 870">
          <text:p/>
        </draw:connector>
        <draw:custom-shape draw:style-name="gr306" draw:text-style-name="P12" xml:id="id66" draw:id="id66" draw:layer="layout" svg:width="5.158cm" svg:height="2.572cm" svg:x="23.442cm" svg:y="4.043cm">
          <text:p text:style-name="P11"><text:span text:style-name="T4">The subscription_listener wait for a message in the assigned queue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307" draw:text-style-name="P13" draw:layer="layout" draw:type="line" svg:x1="22.189cm" svg:y1="5.818cm" svg:x2="23.442cm" svg:y2="5.329cm" draw:start-shape="id65" draw:start-glue-point="12" draw:end-shape="id66" draw:end-glue-point="5" svg:d="M22189 5818l1253-489" svg:viewBox="0 0 1254 490">
          <text:p/>
        </draw:connector>
        <draw:g draw:style-name="gr6" xml:id="id67" draw:id="id6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308" draw:text-style-name="P19" draw:layer="layout" svg:width="3.175cm" svg:height="1.153cm" svg:x="1.852cm" svg:y="4.39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class&gt;&gt;</text:span></text:p>
            <text:p text:style-name="P18"><text:span text:style-name="T2">StateMachi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9" draw:text-style-name="P9" draw:layer="layout" svg:width="3.175cm" svg:height="0.517cm" svg:x="1.852cm" svg:y="5.5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0" draw:text-style-name="P9" draw:layer="layout" svg:width="3.175cm" svg:height="0.465cm" svg:x="1.852cm" svg:y="6.06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11" draw:text-style-name="P10" draw:layer="layout" svg:x1="5.026cm" svg:y1="5.983cm" svg:x2="7.25cm" svg:y2="4.695cm" draw:start-shape="id67" draw:start-glue-point="12" draw:end-shape="id57" draw:end-glue-point="9" svg:d="M5026 5983h1112v-1288h1112" svg:viewBox="0 0 2225 1289">
          <text:p/>
        </draw:connector>
        <draw:g draw:style-name="gr6" xml:id="id58" draw:id="id5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12" draw:text-style-name="P7" draw:layer="layout" svg:width="6.985cm" svg:height="1.153cm" svg:x="22.145cm" svg:y="16.68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messaging.subscribers</text:span></text:p>
              <text:p text:style-name="P6"><text:span text:style-name="T2">&lt;&lt;data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3" draw:text-style-name="P9" draw:layer="layout" svg:width="6.985cm" svg:height="0.849cm" svg:x="22.145cm" svg:y="17.838cm">
              <text:p text:style-name="P8"><text:span text:style-name="T3">dict[Topic, list[tuple[Queue, frozenset[str]]]</text:span></text:p>
              <text:p text:style-name="P8"><text:span text:style-name="T3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4" draw:text-style-name="P9" draw:layer="layout" svg:width="6.985cm" svg:height="0.34cm" svg:x="22.145cm" svg:y="18.687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315" draw:text-style-name="P12" xml:id="id68" draw:id="id68" draw:layer="layout" svg:width="4.127cm" svg:height="2.54cm" svg:x="-17.414cm" svg:y="-0.587cm">
          <text:p text:style-name="P11"><text:span text:style-name="T4">The public functions are global functions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316" draw:text-style-name="P13" draw:layer="layout" draw:type="line" svg:x1="-17.414cm" svg:y1="0.683cm" svg:x2="-18.868cm" svg:y2="1.228cm" draw:start-shape="id68" draw:start-glue-point="5" svg:d="M-17414 683l-1454 545" svg:viewBox="0 0 1455 546">
          <text:p/>
        </draw:connector>
        <draw:g draw:style-name="gr6" xml:id="id61" draw:id="id6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g draw:style-name="gr6">
              <draw:custom-shape draw:style-name="gr317" draw:text-style-name="P7" draw:layer="layout" svg:width="8.255cm" svg:height="1.153cm" svg:x="0.617cm" svg:y="9.679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6"><text:span text:style-name="T2">messaging.Commands</text:span></text:p>
                <text:p text:style-name="P6"><text:span text:style-name="T2">&lt;&lt;static&gt;&gt;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8" draw:text-style-name="P9" draw:layer="layout" svg:width="8.255cm" svg:height="0.956cm" svg:x="0.617cm" svg:y="10.832cm">
                <text:p text:style-name="P8"><text:span text:style-name="T3">+ COMMAND = "COMMAND"</text:span></text:p>
                <text:p text:style-name="P8"><text:span text:style-name="T3">+ ERROR = "ERROR"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9" draw:text-style-name="P9" draw:layer="layout" svg:width="8.255cm" svg:height="1.387cm" svg:x="0.617cm" svg:y="11.788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8"><text:span text:style-name="T3">+ subscribe(sources: tuple[str,...] | None)::Queue</text:span></text:p>
                <text:p text:style-name="P8"><text:span text:style-name="T3">+ unsubscribe(queue:Queue)</text:span></text:p>
                <text:p text:style-name="P8"><text:span text:style-name="T3">+ publish(message:CommandMessage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draw:style-name="gr6" xml:id="id63" draw:id="id6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g draw:style-name="gr6">
              <draw:custom-shape draw:style-name="gr320" draw:text-style-name="P7" draw:layer="layout" svg:width="8.255cm" svg:height="1.153cm" svg:x="9.907cm" svg:y="12.447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6"><text:span text:style-name="T2">messaging.Errors</text:span></text:p>
                <text:p text:style-name="P6"><text:span text:style-name="T2">&lt;&lt;static&gt;&gt;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21" draw:text-style-name="P9" draw:layer="layout" svg:width="8.255cm" svg:height="0.906cm" svg:x="9.907cm" svg:y="13.6cm">
                <text:p text:style-name="P8"><text:span text:style-name="T3">+ COMMAND = "COMMAND"</text:span></text:p>
                <text:p text:style-name="P8"><text:span text:style-name="T3">+ ERROR = "ERROR"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22" draw:text-style-name="P9" draw:layer="layout" svg:width="8.255cm" svg:height="1.387cm" svg:x="9.907cm" svg:y="14.506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8"><text:span text:style-name="T3">+ subscribe(sources: tuple[str,...] | None)::Queue </text:span></text:p>
                <text:p text:style-name="P8"><text:span text:style-name="T3">+ unsubscribe(queue:Queue)</text:span></text:p>
                <text:p text:style-name="P8"><text:span text:style-name="T3">+ publish(message:ErrorMessage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323" draw:text-style-name="P10" draw:layer="layout" draw:line-skew="-0.453cm" svg:x1="22.188cm" svg:y1="9.819cm" svg:x2="18.3cm" svg:y2="10.348cm" draw:start-shape="id59" draw:start-glue-point="5" draw:end-shape="id56" draw:end-glue-point="1" svg:d="M22188 9819v-982h-3269v1511h-619" svg:viewBox="0 0 3889 1512">
          <text:p/>
        </draw:connector>
        <draw:frame draw:style-name="gr5" draw:text-style-name="P5" draw:layer="layout" svg:width="3.085cm" svg:height="0.725cm" svg:x="4.8cm" svg:y="8.202cm">
          <draw:text-box>
            <text:p><text:span text:style-name="T1">&lt;&lt;uses&gt;&gt;</text:span></text:p>
          </draw:text-box>
        </draw:frame>
        <draw:connector draw:style-name="gr324" draw:text-style-name="P10" draw:layer="layout" draw:line-skew="1.323cm" svg:x1="2.912cm" svg:y1="9.68cm" svg:x2="8.507cm" svg:y2="5.35cm" draw:start-shape="id61" draw:start-glue-point="5" draw:end-shape="id57" draw:end-glue-point="4" svg:d="M2912 9680v-843h5595v-3487" svg:viewBox="0 0 5596 4331">
          <text:p/>
        </draw:connector>
        <draw:connector draw:style-name="gr325" draw:text-style-name="P10" draw:layer="layout" svg:x1="11.917cm" svg:y1="16.755cm" svg:x2="14.034cm" svg:y2="15.893cm" draw:start-shape="id60" draw:start-glue-point="14" draw:end-shape="id63" draw:end-glue-point="2" svg:d="M11917 16755v-432h2117v-430" svg:viewBox="0 0 2118 863">
          <text:p/>
        </draw:connector>
      </draw:page>
      <draw:page draw:name="Power Supply" draw:style-name="dp1" draw:master-page-name="Default">
        <draw:custom-shape draw:style-name="gr254" draw:text-style-name="P2" draw:layer="layout" svg:width="19.565cm" svg:height="0.7cm" svg:x="1.437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5" draw:text-style-name="P2" draw:layer="layout" svg:width="19.218cm" svg:height="0.7cm" svg:x="1.549cm" svg:y="7.2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6" draw:text-style-name="P2" draw:layer="layout" svg:width="19.456cm" svg:height="0.7cm" svg:x="1.229cm" svg:y="15.287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4.9cm" svg:y="8.212cm">
          <draw:text-box>
            <text:p><text:span text:style-name="T1">&lt;&lt;uses&gt;&gt;</text:span></text:p>
          </draw:text-box>
        </draw:frame>
        <draw:custom-shape draw:style-name="gr326" draw:text-style-name="P3" draw:layer="layout" svg:width="20.637cm" svg:height="14.505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70" draw:id="id7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27" draw:text-style-name="P7" draw:layer="layout" svg:width="8.991cm" svg:height="1.153cm" svg:x="1.756cm" svg:y="8.88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power_supply_control.PowerSupplyService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8" draw:text-style-name="P9" draw:layer="layout" svg:width="8.991cm" svg:height="0.604cm" svg:x="1.756cm" svg:y="10.0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9" draw:text-style-name="P9" draw:layer="layout" svg:width="8.991cm" svg:height="1.781cm" svg:x="1.756cm" svg:y="10.64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set_nom_voltage()</text:span></text:p>
              <text:p text:style-name="P8"><text:span text:style-name="T3">+ set_max_voltage()</text:span></text:p>
              <text:p text:style-name="P8"><text:span text:style-name="T3">+ set_standby_voltage()</text:span></text:p>
              <text:p text:style-name="P8"><text:span text:style-name="T3">+ read_status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261" draw:text-style-name="P4" draw:layer="layout" svg:width="20.637cm" svg:height="0.952cm" svg:x="1cm" svg:y="1.1cm">
          <text:p text:style-name="P1">Class Diagram: Power Supply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69" draw:id="id6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30" draw:text-style-name="P7" draw:layer="layout" svg:width="8.572cm" svg:height="1.153cm" svg:x="11.877cm" svg:y="11.42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singleton&gt;&gt;</text:span></text:p>
              <text:p text:style-name="P6"><text:span text:style-name="T2">i2c_service.I2C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1" draw:text-style-name="P9" draw:layer="layout" svg:width="8.572cm" svg:height="0.761cm" svg:x="11.877cm" svg:y="12.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2" draw:text-style-name="P9" draw:layer="layout" svg:width="8.572cm" svg:height="1.781cm" svg:x="11.877cm" svg:y="13.34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read_byte(device: int, register: int)</text:span></text:p>
              <text:p text:style-name="P8"><text:span text:style-name="T3">+ write_byte(device: int, register: int)</text:span></text:p>
              <text:p text:style-name="P8"><text:span text:style-name="T7">+ </text:span><text:span text:style-name="T8">read_block</text:span><text:span text:style-name="T7">(device: int, register: int, length: int)</text:span></text:p>
              <text:p text:style-name="P8"><text:span text:style-name="T7">+ write</text:span><text:span text:style-name="T8">_block</text:span><text:span text:style-name="T7">(device: int, register: int, length: i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333" draw:text-style-name="P10" draw:layer="layout" svg:x1="14.261cm" svg:y1="11.428cm" svg:x2="10.747cm" svg:y2="10.657cm" draw:start-shape="id69" draw:start-glue-point="5" draw:end-shape="id70" draw:end-glue-point="1" svg:d="M14261 11428v-771h-3514" svg:viewBox="0 0 3515 772">
          <text:p/>
        </draw:connector>
        <draw:frame draw:style-name="gr5" draw:text-style-name="P5" draw:layer="layout" svg:width="2.512cm" svg:height="0.725cm" svg:x="12.43cm" svg:y="9.572cm">
          <draw:text-box>
            <text:p><text:span text:style-name="T1">&lt;&lt;has&gt;&gt;</text:span></text:p>
          </draw:text-box>
        </draw:frame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334" draw:text-style-name="P21" draw:layer="layout" svg:width="19.05cm" svg:height="0.679cm" svg:x="1.635cm" svg:y="3.25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5" draw:text-style-name="P22" draw:layer="layout" svg:width="19.05cm" svg:height="3.049cm" svg:x="1.635cm" svg:y="3.93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71" draw:id="id7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36" draw:text-style-name="P23" draw:layer="layout" svg:width="9.975cm" svg:height="0.679cm" svg:x="5.947cm" svg:y="4.50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7" draw:text-style-name="P24" draw:layer="layout" svg:width="9.975cm" svg:height="0.679cm" svg:x="5.947cm" svg:y="5.18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power_supply_service = PowerSupply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38" draw:text-style-name="P10" draw:layer="layout" draw:line-skew="0.926cm" svg:x1="4.255cm" svg:y1="8.889cm" svg:x2="7.942cm" svg:y2="5.866cm" draw:start-shape="id70" draw:start-glue-point="5" draw:end-shape="id71" draw:end-glue-point="4" svg:d="M4255 8889v-587h3687v-2436" svg:viewBox="0 0 3688 3024">
          <text:p/>
        </draw:connector>
      </draw:page>
      <draw:page draw:name="Frontpanel service" draw:style-name="dp1" draw:master-page-name="Default">
        <draw:custom-shape draw:style-name="gr339" draw:text-style-name="P2" draw:layer="layout" svg:width="27.047cm" svg:height="0.7cm" svg:x="1.258cm" svg:y="2.0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0" draw:text-style-name="P2" draw:layer="layout" svg:width="26.989cm" svg:height="0.7cm" svg:x="1.316cm" svg:y="6.7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77" draw:id="id77">
          <draw:glue-point draw:id="4" svg:x="-0.787cm" svg:y="5.055cm"/>
          <draw:glue-point draw:id="5" svg:x="-5.063cm" svg:y="-3.065cm"/>
          <draw:glue-point draw:id="6" svg:x="-3.788cm" svg:y="5.05cm"/>
          <draw:custom-shape draw:style-name="gr341" draw:text-style-name="P7" draw:layer="layout" svg:width="4.363cm" svg:height="1.627cm" svg:x="1.317cm" svg:y="7.68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led_control.</text:span></text:p>
            <text:p text:style-name="P6"><text:span text:style-name="T2">LEDControl</text:span></text:p>
            <text:p text:style-name="P6"><text:span text:style-name="T2">&lt;&lt;class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2" draw:text-style-name="P9" draw:layer="layout" svg:width="4.363cm" svg:height="0.671cm" svg:x="1.317cm" svg:y="9.312cm">
            <text:p text:style-name="P8"><text:span text:style-name="T3">- stop_evt: Event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3" draw:text-style-name="P9" draw:layer="layout" svg:width="4.363cm" svg:height="2.963cm" svg:x="1.317cm" svg:y="9.98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turn_on_led()</text:span></text:p>
            <text:p text:style-name="P8"><text:span text:style-name="T3">+ turn_off_led()</text:span></text:p>
            <text:p text:style-name="P8"><text:span text:style-name="T3">+ turn_off_all_leds()</text:span></text:p>
            <text:p text:style-name="P8"><text:span text:style-name="T3">+ turn_off_all_leds()</text:span></text:p>
            <text:p text:style-name="P8"><text:span text:style-name="T3">+ get_led_state()l</text:span></text:p>
            <text:p text:style-name="P8"><text:span text:style-name="T3">+ oneshot_on_led()</text:span></text:p>
            <text:p text:style-name="P8"><text:span text:style-name="T3">+ control_blinking_led( 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44" draw:text-style-name="P36" draw:layer="layout" svg:width="27.204cm" svg:height="0.7cm" svg:x="1.101cm" svg:y="16.947cm">
          <text:p text:style-name="P32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5" draw:text-style-name="P3" draw:layer="layout" svg:width="27.7cm" svg:height="18.048cm" svg:x="1cm" svg:y="1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76" draw:id="id7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46" draw:text-style-name="P7" draw:layer="layout" svg:width="4.602cm" svg:height="1.627cm" svg:x="7.185cm" svg:y="8.0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touch_buttons.</text:span></text:p>
              <text:p text:style-name="P6"><text:span text:style-name="T2">TouchButtons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7" draw:text-style-name="P9" draw:layer="layout" svg:width="4.602cm" svg:height="0.754cm" svg:x="7.185cm" svg:y="9.687cm">
              <text:p text:style-name="P8"><text:span text:style-name="T3">- stop_evt: Event()</text:span></text:p>
              <text:p text:style-name="P8"><text:span text:style-name="T3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8" draw:text-style-name="P9" draw:layer="layout" svg:width="4.602cm" svg:height="0.993cm" svg:x="7.185cm" svg:y="10.44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init()</text:span></text:p>
              <text:p text:style-name="P8"><text:span text:style-name="T3">- button_event_callback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73" draw:id="id7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3.665cm" svg:y="5.097cm"/>
          <draw:g draw:style-name="gr6">
            <draw:custom-shape draw:style-name="gr349" draw:text-style-name="P7" draw:layer="layout" svg:width="5.465cm" svg:height="1.627cm" svg:x="15.75cm" svg:y="8.0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backlighting.</text:span></text:p>
              <text:p text:style-name="P6"><text:span text:style-name="T2">BackLighting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0" draw:text-style-name="P9" draw:layer="layout" svg:width="5.465cm" svg:height="1.06cm" svg:x="15.75cm" svg:y="9.647cm">
              <text:p text:style-name="P8"><text:span text:style-name="T3">- thread: backlighting_manager</text:span></text:p>
              <text:p text:style-name="P8"><text:span text:style-name="T3">- runnning: Event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1" draw:text-style-name="P9" draw:layer="layout" svg:width="5.465cm" svg:height="0.635cm" svg:x="15.75cm" svg:y="10.707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5" draw:text-style-name="P5" draw:layer="layout" svg:width="2.512cm" svg:height="0.725cm" svg:x="8.965cm" svg:y="7.35cm">
          <draw:text-box>
            <text:p><text:span text:style-name="T1">&lt;&lt;uses&gt;&gt;</text:span></text:p>
          </draw:text-box>
        </draw:frame>
        <draw:custom-shape draw:style-name="gr107" draw:text-style-name="P4" draw:layer="layout" svg:width="27.7cm" svg:height="0.952cm" svg:x="1cm" svg:y="1cm">
          <text:p text:style-name="P1">Class Diagram: Front-panel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78" draw:id="id7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52" draw:text-style-name="P7" draw:layer="layout" svg:width="8.255cm" svg:height="1.153cm" svg:x="19.615cm" svg:y="13.1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singleton&gt;&gt;</text:span></text:p>
              <text:p text:style-name="P6"><text:span text:style-name="T2">i2c_service.I2C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3" draw:text-style-name="P9" draw:layer="layout" svg:width="8.255cm" svg:height="0.578cm" svg:x="19.615cm" svg:y="14.3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4" draw:text-style-name="P9" draw:layer="layout" svg:width="8.255cm" svg:height="1.781cm" svg:x="19.615cm" svg:y="14.89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read_byte(device: int, register: int)</text:span></text:p>
              <text:p text:style-name="P8"><text:span text:style-name="T3">+ write_byte(device: int, register: int)</text:span></text:p>
              <text:p text:style-name="P8"><text:span text:style-name="T7">+ </text:span><text:span text:style-name="T8">read_block</text:span><text:span text:style-name="T7">(device: int, register: int, length: int)</text:span></text:p>
              <text:p text:style-name="P8"><text:span text:style-name="T7">+ write</text:span><text:span text:style-name="T8">_block</text:span><text:span text:style-name="T7">(device: int, register: int, length: i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74" draw:id="id7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55" draw:text-style-name="P7" draw:layer="layout" svg:width="5.397cm" svg:height="1.153cm" svg:x="12.802cm" svg:y="17.969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light_sensor</text:span></text:p>
              <text:p text:style-name="P6"><text:span text:style-name="T2">&lt;&lt;device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6" draw:text-style-name="P9" draw:layer="layout" svg:width="5.397cm" svg:height="0.328cm" svg:x="12.802cm" svg:y="19.1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7" draw:text-style-name="P9" draw:layer="layout" svg:width="5.397cm" svg:height="0.347cm" svg:x="12.802cm" svg:y="19.4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72" draw:id="id7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58" draw:text-style-name="P7" draw:layer="layout" svg:width="5.397cm" svg:height="1.153cm" svg:x="18.69cm" svg:y="17.93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backlight_dac</text:span></text:p>
              <text:p text:style-name="P6"><text:span text:style-name="T2">&lt;&lt;device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9" draw:text-style-name="P9" draw:layer="layout" svg:width="5.397cm" svg:height="0.353cm" svg:x="18.69cm" svg:y="19.0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0" draw:text-style-name="P9" draw:layer="layout" svg:width="5.397cm" svg:height="0.373cm" svg:x="18.69cm" svg:y="19.44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75" draw:id="id7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361" draw:text-style-name="P19" draw:layer="layout" svg:width="3.175cm" svg:height="1.627cm" svg:x="6.027cm" svg:y="14.28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singleton&gt;&gt;</text:span></text:p>
            <text:p text:style-name="P18"><text:span text:style-name="T2">gpio_service.</text:span></text:p>
            <text:p text:style-name="P18"><text:span text:style-name="T2">GPIO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2" draw:text-style-name="P37" draw:layer="layout" svg:width="3.175cm" svg:height="0.433cm" svg:x="6.027cm" svg:y="15.9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3" draw:text-style-name="P9" draw:layer="layout" svg:width="3.175cm" svg:height="0.39cm" svg:x="6.027cm" svg:y="16.34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64" draw:text-style-name="P10" draw:layer="layout" draw:line-skew="-2.199cm" svg:x1="18.991cm" svg:y1="17.936cm" svg:x2="20.911cm" svg:y2="11.342cm" draw:start-shape="id72" draw:start-glue-point="4" draw:end-shape="id73" draw:end-glue-point="10" svg:d="M18991 17936v-5497h1920v-1097" svg:viewBox="0 0 1921 6595">
          <text:p/>
        </draw:connector>
        <draw:connector draw:style-name="gr365" draw:text-style-name="P10" draw:layer="layout" draw:line-skew="-2.581cm" svg:x1="17.899cm" svg:y1="17.97cm" svg:x2="19.696cm" svg:y2="11.342cm" draw:start-shape="id74" draw:start-glue-point="15" draw:end-shape="id73" draw:end-glue-point="9" svg:d="M17899 17970v-5896h1797v-732" svg:viewBox="0 0 1798 6629">
          <text:p/>
        </draw:connector>
        <draw:connector draw:style-name="gr366" draw:text-style-name="P10" draw:layer="layout" svg:x1="8.319cm" svg:y1="14.283cm" svg:x2="8.465cm" svg:y2="11.434cm" draw:start-shape="id75" draw:start-glue-point="14" draw:end-shape="id76" draw:end-glue-point="8" svg:d="M8319 14283v-1426h146v-1423" svg:viewBox="0 0 147 2850">
          <text:p/>
        </draw:connector>
        <draw:connector draw:style-name="gr367" draw:text-style-name="P10" draw:layer="layout" svg:x1="6.204cm" svg:y1="14.283cm" svg:x2="3.498cm" svg:y2="12.946cm" draw:start-shape="id75" draw:start-glue-point="4" draw:end-shape="id77" draw:end-glue-point="2" svg:d="M6204 14283v-670h-2706v-667" svg:viewBox="0 0 2707 1338">
          <text:p/>
        </draw:connector>
        <draw:connector draw:style-name="gr368" draw:text-style-name="P10" draw:layer="layout" svg:x1="21.91cm" svg:y1="13.161cm" svg:x2="21.214cm" svg:y2="10.798cm" draw:start-shape="id78" draw:start-glue-point="5" draw:end-shape="id73" draw:end-glue-point="12" svg:d="M21910 13161v-2363h-696" svg:viewBox="0 0 697 2364">
          <text:p/>
        </draw:connector>
        <draw:frame draw:style-name="gr5" draw:text-style-name="P5" draw:layer="layout" svg:width="2.512cm" svg:height="0.725cm" svg:x="19.415cm" svg:y="12.43cm">
          <draw:text-box>
            <text:p><text:span text:style-name="T1">&lt;&lt;has&gt;&gt;</text:span></text:p>
          </draw:text-box>
        </draw:frame>
        <draw:frame draw:style-name="gr5" draw:text-style-name="P5" draw:layer="layout" svg:width="2.512cm" svg:height="0.725cm" svg:x="5.762cm" svg:y="12.975cm">
          <draw:text-box>
            <text:p><text:span text:style-name="T1">&lt;&lt;has&gt;&gt;</text:span></text:p>
          </draw:text-box>
        </draw:frame>
        <draw:frame draw:style-name="gr369" draw:text-style-name="P35" draw:layer="layout" svg:width="6.35cm" svg:height="2.147cm" svg:x="1.635cm" svg:y="17.51cm">
          <draw:text-box>
            <text:p><text:span text:style-name="T9">Waarom backlighting thread met stop en off. Staat eigenlijk altijd aan! Wordt ook in de module gestart!</text:span></text:p>
          </draw:text-box>
        </draw:frame>
        <draw:g draw:style-name="gr6" xml:id="id79" draw:id="id7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70" draw:text-style-name="P7" draw:layer="layout" svg:width="4.965cm" svg:height="1.627cm" svg:x="23.322cm" svg:y="8.76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thread&gt;&gt;</text:span></text:p>
              <text:p text:style-name="P6"><text:span text:style-name="T2">backlighting.</text:span></text:p>
              <text:p text:style-name="P6"><text:span text:style-name="T2">backlighting_manag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1" draw:text-style-name="P9" draw:layer="layout" svg:width="4.965cm" svg:height="0.754cm" svg:x="23.322cm" svg:y="10.394cm">
              <text:p text:style-name="P8"><text:span text:style-name="T3">+ running: Event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2" draw:text-style-name="P9" draw:layer="layout" svg:width="4.965cm" svg:height="0.599cm" svg:x="23.322cm" svg:y="11.14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373" draw:text-style-name="P10" draw:layer="layout" svg:x1="23.323cm" svg:y1="9.403cm" svg:x2="21.214cm" svg:y2="8.656cm" draw:start-shape="id79" draw:start-glue-point="6" draw:end-shape="id73" draw:end-glue-point="13" svg:d="M23323 9403h-1055v-747h-1054" svg:viewBox="0 0 2110 748">
          <text:p/>
        </draw:connector>
        <draw:connector draw:style-name="gr374" draw:text-style-name="P10" draw:layer="layout" svg:x1="25.577cm" svg:y1="13.161cm" svg:x2="26.907cm" svg:y2="11.747cm" draw:start-shape="id78" draw:start-glue-point="14" draw:end-shape="id79" draw:end-glue-point="9" svg:d="M25577 13161v-708h1330v-706" svg:viewBox="0 0 1331 1415">
          <text:p/>
        </draw:connector>
        <draw:frame draw:style-name="gr5" draw:text-style-name="P5" draw:layer="layout" svg:width="2.512cm" svg:height="0.725cm" svg:x="24.177cm" svg:y="11.795cm">
          <draw:text-box>
            <text:p><text:span text:style-name="T1">&lt;&lt;uses&gt;&gt;</text:span></text:p>
          </draw:text-box>
        </draw:frame>
        <draw:frame draw:style-name="gr5" draw:text-style-name="P5" draw:layer="layout" svg:width="3.81cm" svg:height="0.725cm" svg:x="21.955cm" svg:y="7.895cm">
          <draw:text-box>
            <text:p><text:span text:style-name="T1">&lt;&lt;consists of&gt;&gt;</text:span></text:p>
          </draw:text-box>
        </draw:frame>
        <draw:g draw:style-name="gr6" xml:id="id80" draw:id="id8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375" draw:text-style-name="P19" draw:layer="layout" svg:width="3.492cm" svg:height="1.627cm" svg:x="1.5cm" svg:y="14.18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thread&gt;&gt;</text:span></text:p>
            <text:p text:style-name="P18"><text:span text:style-name="T2">led_control.</text:span></text:p>
            <text:p text:style-name="P18"><text:span text:style-name="T2">blin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6" draw:text-style-name="P9" draw:layer="layout" svg:width="3.492cm" svg:height="0.517cm" svg:x="1.5cm" svg:y="15.813cm">
            <text:p text:style-name="P8"><text:span text:style-name="T3">+ stop_evt: Event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7" draw:text-style-name="P9" draw:layer="layout" svg:width="3.492cm" svg:height="0.465cm" svg:x="1.5cm" svg:y="16.3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78" draw:text-style-name="P10" draw:layer="layout" svg:x1="2.471cm" svg:y1="14.187cm" svg:x2="1.846cm" svg:y2="12.946cm" draw:start-shape="id80" draw:start-glue-point="5" draw:end-shape="id77" draw:end-glue-point="6" svg:d="M2471 14187v-622h-625v-619" svg:viewBox="0 0 626 1242">
          <text:p/>
        </draw:connector>
        <draw:frame draw:style-name="gr5" draw:text-style-name="P5" draw:layer="layout" svg:width="3.81cm" svg:height="0.725cm" svg:x="1cm" svg:y="13.382cm">
          <draw:text-box>
            <text:p><text:span text:style-name="T1">&lt;&lt;consists of&gt;&gt;</text:span></text:p>
          </draw:text-box>
        </draw:frame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379" draw:text-style-name="P21" draw:layer="layout" svg:width="26.035cm" svg:height="0.679cm" svg:x="1.635cm" svg:y="2.859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0" draw:text-style-name="P22" draw:layer="layout" svg:width="26.035cm" svg:height="3.049cm" svg:x="1.635cm" svg:y="3.538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81" draw:id="id8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81" draw:text-style-name="P23" draw:layer="layout" svg:width="9.664cm" svg:height="0.679cm" svg:x="7.528cm" svg:y="3.809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2" draw:text-style-name="P24" draw:layer="layout" svg:width="9.664cm" svg:height="1.627cm" svg:x="7.528cm" svg:y="4.488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leds = LEDControl()</text:span></text:p>
            <text:p text:style-name="P15"><text:span text:style-name="T2">- backlighting = Backlighting()</text:span></text:p>
            <text:p text:style-name="P15"><text:span text:style-name="T2">- touch_butons = TouchButtons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83" draw:text-style-name="P10" draw:layer="layout" svg:x1="8.465cm" svg:y1="8.061cm" svg:x2="11.394cm" svg:y2="6.115cm" draw:start-shape="id76" draw:start-glue-point="5" draw:end-shape="id81" draw:end-glue-point="5" svg:d="M8465 8061v-974h2929v-972" svg:viewBox="0 0 2930 1947">
          <text:p/>
        </draw:connector>
        <draw:connector draw:style-name="gr384" draw:text-style-name="P10" draw:layer="layout" svg:x1="3.498cm" svg:y1="7.685cm" svg:x2="9.461cm" svg:y2="6.115cm" draw:end-shape="id81" draw:end-glue-point="4" svg:d="M3498 7685v-522h5963v-1048" svg:viewBox="0 0 5964 1571">
          <text:p/>
        </draw:connector>
        <draw:connector draw:style-name="gr385" draw:text-style-name="P10" draw:layer="layout" svg:x1="20.911cm" svg:y1="8.021cm" svg:x2="17.192cm" svg:y2="5.46cm" draw:start-shape="id73" draw:start-glue-point="15" draw:end-shape="id81" draw:end-glue-point="8" svg:d="M20911 8021v-2561h-3719" svg:viewBox="0 0 3720 2562">
          <text:p/>
        </draw:connector>
        <draw:g draw:style-name="gr6" xml:id="id82" draw:id="id82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custom-shape draw:style-name="gr386" draw:text-style-name="P19" draw:layer="layout" svg:width="7.297cm" svg:height="1.153cm" svg:x="10.09cm" svg:y="12.21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module&gt;&gt;</text:span></text:p>
            <text:p text:style-name="P18"><text:span text:style-name="T2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7" draw:text-style-name="P9" draw:layer="layout" svg:width="7.297cm" svg:height="0.435cm" svg:x="10.09cm" svg:y="13.3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8" draw:text-style-name="P9" draw:layer="layout" svg:width="7.297cm" svg:height="0.993cm" svg:x="10.09cm" svg:y="13.74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publish_command_message(</text:span></text:p>
            <text:p text:style-name="P8"><text:span text:style-name="T3"><text:s text:c="17"/></text:span><text:span text:style-name="T3">message: Command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89" draw:text-style-name="P10" draw:layer="layout" svg:x1="13.738cm" svg:y1="12.219cm" svg:x2="11.786cm" svg:y2="10.89cm" draw:start-shape="id82" draw:end-shape="id76" draw:end-glue-point="12" svg:d="M13738 12219v-1329h-1952" svg:viewBox="0 0 1953 1330">
          <text:p/>
        </draw:connector>
        <draw:frame draw:style-name="gr5" draw:text-style-name="P5" draw:layer="layout" svg:width="2.512cm" svg:height="0.725cm" svg:x="12.458cm" svg:y="10.207cm">
          <draw:text-box>
            <text:p><text:span text:style-name="T1">&lt;&lt;uses&gt;&gt;</text:span></text:p>
          </draw:text-box>
        </draw:frame>
        <draw:frame draw:style-name="gr5" draw:text-style-name="P5" draw:layer="layout" svg:width="2.512cm" svg:height="0.725cm" svg:x="18.462cm" svg:y="4.492cm">
          <draw:text-box>
            <text:p><text:span text:style-name="T1">&lt;&lt;uses&gt;&gt;</text:span></text:p>
          </draw:text-box>
        </draw:frame>
      </draw:page>
      <draw:page draw:name="Music Players" draw:style-name="dp1" draw:master-page-name="Default">
        <draw:custom-shape draw:style-name="gr390" draw:text-style-name="P2" draw:layer="layout" svg:width="25.039cm" svg:height="0.7cm" svg:x="1.635cm" svg:y="2.5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1" draw:text-style-name="P2" draw:layer="layout" svg:width="25.091cm" svg:height="0.7cm" svg:x="1.635cm" svg:y="7.3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392" draw:text-style-name="P21" draw:layer="layout" svg:width="24.873cm" svg:height="0.679cm" svg:x="1.635cm" svg:y="3.4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3" draw:text-style-name="P22" draw:layer="layout" svg:width="24.873cm" svg:height="3.049cm" svg:x="1.635cm" svg:y="4.139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94" draw:text-style-name="P2" draw:layer="layout" svg:width="24.824cm" svg:height="0.7cm" svg:x="1.85cm" svg:y="18.98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5" draw:text-style-name="P3" draw:layer="layout" svg:width="25.995cm" svg:height="17.715cm" svg:x="1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83" draw:id="id8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1.958cm" svg:y="0.382cm"/>
          <draw:glue-point draw:id="24" svg:x="1.369cm" svg:y="0.382cm"/>
          <draw:glue-point draw:id="25" svg:x="2.545cm" svg:y="0.382cm"/>
          <draw:g draw:style-name="gr6">
            <draw:custom-shape draw:style-name="gr396" draw:text-style-name="P7" draw:layer="layout" svg:width="5.397cm" svg:height="1.153cm" svg:x="7.655cm" svg:y="9.14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mpd_monitor.MPDMonitor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7" draw:text-style-name="P9" draw:layer="layout" svg:width="5.397cm" svg:height="0.545cm" svg:x="7.655cm" svg:y="10.295cm">
              <text:p text:style-name="P8"><text:span text:style-name="T3">- running: Eve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8" draw:text-style-name="P9" draw:layer="layout" svg:width="5.397cm" svg:height="0.993cm" svg:x="7.655cm" svg:y="10.8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init(class: MPDService)</text:span></text:p>
              <text:p text:style-name="P8"><text:span text:style-name="T3">- listen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85" draw:id="id8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99" draw:text-style-name="P7" draw:layer="layout" svg:width="5.397cm" svg:height="1.153cm" svg:x="1.54cm" svg:y="9.09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mpd_control.MPDControl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0" draw:text-style-name="P9" draw:layer="layout" svg:width="5.397cm" svg:height="0.674cm" svg:x="1.54cm" svg:y="10.2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1" draw:text-style-name="P9" draw:layer="layout" svg:width="5.397cm" svg:height="2.569cm" svg:x="1.54cm" svg:y="10.9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init(class: MPDService)</text:span></text:p>
              <text:p text:style-name="P8"><text:span text:style-name="T3">+ is_web_radio()</text:span></text:p>
              <text:p text:style-name="P8"><text:span text:style-name="T3">+ next()</text:span></text:p>
              <text:p text:style-name="P8"><text:span text:style-name="T3">+ play()</text:span></text:p>
              <text:p text:style-name="P8"><text:span text:style-name="T3">+ stop()</text:span></text:p>
              <text:p text:style-name="P8"><text:span text:style-name="T3">+ pau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86" draw:id="id8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0.009cm" svg:y="-4.346cm"/>
          <draw:glue-point draw:id="24" svg:x="3.714cm" svg:y="-5.101cm"/>
          <draw:g draw:style-name="gr6">
            <draw:custom-shape draw:style-name="gr402" draw:text-style-name="P7" draw:layer="layout" svg:width="6.552cm" svg:height="1.153cm" svg:x="19.395cm" svg:y="8.794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spotify_connect.SpotifyConnect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3" draw:text-style-name="P9" draw:layer="layout" svg:width="6.552cm" svg:height="0.761cm" svg:x="19.395cm" svg:y="9.94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4" draw:text-style-name="P9" draw:layer="layout" svg:width="6.552cm" svg:height="1.387cm" svg:x="19.395cm" svg:y="10.70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play()</text:span></text:p>
              <text:p text:style-name="P8"><text:span text:style-name="T3">+ pause()</text:span></text:p>
              <text:p text:style-name="P8"><text:span text:style-name="T3">+ get_stat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405" draw:text-style-name="P10" draw:layer="layout" draw:line-skew="0.511cm" svg:x1="9.155cm" svg:y1="9.143cm" svg:x2="10.029cm" svg:y2="6.816cm" draw:start-shape="id83" draw:start-glue-point="5" draw:end-shape="id84" draw:end-glue-point="5" svg:d="M9155 9143v-654h874v-1673" svg:viewBox="0 0 875 2328">
          <text:p/>
        </draw:connector>
        <draw:connector draw:style-name="gr406" draw:text-style-name="P10" draw:layer="layout" draw:line-skew="0.218cm" svg:x1="1.841cm" svg:y1="9.094cm" svg:x2="8.429cm" svg:y2="6.816cm" draw:start-shape="id85" draw:start-glue-point="4" draw:end-shape="id84" draw:end-glue-point="4" svg:d="M1841 9094v-922h6588v-1356" svg:viewBox="0 0 6589 2279">
          <text:p/>
        </draw:connector>
        <draw:connector draw:style-name="gr407" draw:text-style-name="P10" draw:layer="layout" svg:x1="24.127cm" svg:y1="8.795cm" svg:x2="14.83cm" svg:y2="5.146cm" draw:start-shape="id86" draw:start-glue-point="14" draw:end-shape="id84" draw:end-glue-point="14" svg:d="M24127 8795v-3649h-9297" svg:viewBox="0 0 9298 3650">
          <text:p/>
        </draw:connector>
        <draw:custom-shape draw:style-name="gr408" draw:text-style-name="P4" draw:layer="layout" svg:width="25.995cm" svg:height="1.205cm" svg:x="1cm" svg:y="1.099cm">
          <text:p text:style-name="P1">Class Diagram: Music Player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2.54cm" svg:height="0.725cm" svg:x="2.587cm" svg:y="8.302cm">
          <draw:text-box>
            <text:p><text:span text:style-name="T1">&lt;&lt;uses&gt;&gt;</text:span></text:p>
          </draw:text-box>
        </draw:frame>
        <draw:g draw:style-name="gr6" xml:id="id88" draw:id="id88">
          <draw:glue-point draw:id="4" svg:x="4.917cm" svg:y="-2.025cm"/>
          <draw:glue-point draw:id="5" svg:x="3.74cm" svg:y="-5.09cm"/>
          <draw:glue-point draw:id="6" svg:x="4.328cm" svg:y="-5.09cm"/>
          <draw:glue-point draw:id="7" svg:x="-5.013cm" svg:y="-2.679cm"/>
          <draw:custom-shape draw:style-name="gr409" draw:text-style-name="P7" draw:layer="layout" svg:width="5.397cm" svg:height="1.153cm" svg:x="7.603cm" svg:y="14.048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mpd_service.MPDService</text:span></text:p>
            <text:p text:style-name="P6"><text:span text:style-name="T2">&lt;&lt;class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0" draw:text-style-name="P9" draw:layer="layout" svg:width="5.397cm" svg:height="0.669cm" svg:x="7.603cm" svg:y="15.201cm">
            <text:p text:style-name="P8"><text:span text:style-name="T3">- client: MPDCli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1" draw:text-style-name="P9" draw:layer="layout" svg:width="5.397cm" svg:height="1.387cm" svg:x="7.603cm" svg:y="15.8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init()</text:span></text:p>
            <text:p text:style-name="P8"><text:span text:style-name="T3">+ get_stats()</text:span></text:p>
            <text:p text:style-name="P8"><text:span text:style-name="T3">- 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87" draw:id="id87">
          <draw:custom-shape draw:style-name="gr412" draw:text-style-name="P7" draw:layer="layout" svg:width="3.829cm" svg:height="1.153cm" svg:x="14.252cm" svg:y="13.38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mpd.MPDClient</text:span></text:p>
            <text:p text:style-name="P6"><text:span text:style-name="T2">&lt;&lt;library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3" draw:text-style-name="P9" draw:layer="layout" svg:width="3.829cm" svg:height="0.504cm" svg:x="14.252cm" svg:y="14.5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4" draw:text-style-name="P9" draw:layer="layout" svg:width="3.829cm" svg:height="3.357cm" svg:x="14.252cm" svg:y="15.03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init()</text:span></text:p>
            <text:p text:style-name="P8"><text:span text:style-name="T3">+ idle()</text:span></text:p>
            <text:p text:style-name="P8"><text:span text:style-name="T3">+ update()</text:span></text:p>
            <text:p text:style-name="P8"><text:span text:style-name="T3">+ next()</text:span></text:p>
            <text:p text:style-name="P8"><text:span text:style-name="T3">+ play()</text:span></text:p>
            <text:p text:style-name="P8"><text:span text:style-name="T3">+ stop()</text:span></text:p>
            <text:p text:style-name="P8"><text:span text:style-name="T3">+ pause()</text:span></text:p>
            <text:p text:style-name="P8"><text:span text:style-name="T3">+ status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15" draw:text-style-name="P10" draw:layer="layout" svg:x1="14.252cm" svg:y1="15.889cm" svg:x2="13cm" svg:y2="15.652cm" draw:start-shape="id87" draw:start-glue-point="3" draw:end-shape="id88" draw:end-glue-point="1" svg:d="M14252 15889h-627v-237h-625" svg:viewBox="0 0 1253 238">
          <text:p/>
        </draw:connector>
        <draw:frame draw:style-name="gr5" draw:text-style-name="P5" draw:layer="layout" svg:width="2.83cm" svg:height="0.725cm" svg:x="4.492cm" svg:y="13.61cm">
          <draw:text-box>
            <text:p><text:span text:style-name="T1">&lt;&lt;is A&gt;&gt;</text:span></text:p>
          </draw:text-box>
          <draw:glue-point draw:id="4" svg:x="0.512cm" svg:y="-0.606cm"/>
        </draw:frame>
        <draw:connector draw:style-name="gr416" draw:text-style-name="P10" draw:layer="layout" svg:x1="12.636cm" svg:y1="14.048cm" svg:x2="11.552cm" svg:y2="11.833cm" draw:start-shape="id88" draw:start-glue-point="6" draw:end-shape="id83" draw:end-glue-point="9" svg:d="M12636 14048v-1108h-1084v-1107" svg:viewBox="0 0 1085 2216">
          <text:p/>
        </draw:connector>
        <draw:connector draw:style-name="gr417" draw:text-style-name="P10" draw:layer="layout" svg:x1="7.603cm" svg:y1="15.652cm" svg:x2="6.637cm" svg:y2="13.489cm" draw:start-shape="id88" draw:start-glue-point="3" draw:end-shape="id85" draw:end-glue-point="10" svg:d="M7603 15652h-966v-2163" svg:viewBox="0 0 967 2164">
          <text:p/>
        </draw:connector>
        <draw:frame draw:style-name="gr5" draw:text-style-name="P5" draw:layer="layout" svg:width="2.222cm" svg:height="0.725cm" svg:x="9.89cm" svg:y="12.975cm">
          <draw:text-box>
            <text:p><text:span text:style-name="T1">&lt;&lt;is A&gt;&gt;</text:span></text:p>
          </draw:text-box>
          <draw:glue-point draw:id="4" svg:x="0.512cm" svg:y="-0.606cm"/>
        </draw:frame>
        <draw:frame draw:style-name="gr5" draw:text-style-name="P5" draw:layer="layout" svg:width="3.147cm" svg:height="0.725cm" svg:x="20.685cm" svg:y="7.985cm">
          <draw:text-box>
            <text:p><text:span text:style-name="T1">&lt;&lt;uses&gt;&gt;</text:span></text:p>
          </draw:text-box>
        </draw:frame>
        <draw:frame draw:style-name="gr5" draw:text-style-name="P5" draw:layer="layout" svg:width="2.54cm" svg:height="0.725cm" svg:x="9.89cm" svg:y="8.302cm">
          <draw:text-box>
            <text:p><text:span text:style-name="T1">&lt;&lt;uses&gt;&gt;</text:span></text:p>
          </draw:text-box>
        </draw:frame>
        <draw:frame draw:style-name="gr5" draw:text-style-name="P5" draw:layer="layout" svg:width="3.81cm" svg:height="0.725cm" svg:x="10.525cm" svg:y="17.51cm">
          <draw:text-box>
            <text:p><text:span text:style-name="T1">&lt;&lt;consists of&gt;&gt;</text:span></text:p>
          </draw:text-box>
        </draw:frame>
        <draw:g draw:style-name="gr6" xml:id="id89" draw:id="id89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custom-shape draw:style-name="gr418" draw:text-style-name="P19" draw:layer="layout" svg:width="4.538cm" svg:height="2.101cm" svg:x="1.543cm" svg:y="15.27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thread&gt;&gt;</text:span></text:p>
            <text:p text:style-name="P18"><text:span text:style-name="T2">mpd_control.</text:span></text:p>
            <text:p text:style-name="P18"><text:span text:style-name="T2">remove_song_when_finish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9" draw:text-style-name="P9" draw:layer="layout" svg:width="4.538cm" svg:height="0.435cm" svg:x="1.543cm" svg:y="17.3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0" draw:text-style-name="P9" draw:layer="layout" svg:width="4.538cm" svg:height="0.993cm" svg:x="1.543cm" svg:y="17.74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21" draw:text-style-name="P10" draw:layer="layout" svg:x1="4.461cm" svg:y1="15.276cm" svg:x2="3.04cm" svg:y2="13.489cm" draw:start-shape="id89" draw:start-glue-point="8" draw:end-shape="id85" draw:end-glue-point="8" svg:d="M4461 15276v-894h-1421v-893" svg:viewBox="0 0 1422 1788">
          <text:p/>
        </draw:connector>
        <draw:g draw:style-name="gr6" xml:id="id90" draw:id="id90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custom-shape draw:style-name="gr422" draw:text-style-name="P19" draw:layer="layout" svg:width="3.235cm" svg:height="1.627cm" svg:x="14.335cm" svg:y="9.0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thread&gt;&gt;</text:span></text:p>
            <text:p text:style-name="P18"><text:span text:style-name="T2">mpd_monitor.</text:span></text:p>
            <text:p text:style-name="P18"><text:span text:style-name="T2">liste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3" draw:text-style-name="P9" draw:layer="layout" svg:width="3.235cm" svg:height="0.728cm" svg:x="14.335cm" svg:y="10.647cm">
            <text:p text:style-name="P8"><text:span text:style-name="T3">+ running: Ev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4" draw:text-style-name="P9" draw:layer="layout" svg:width="3.235cm" svg:height="0.635cm" svg:x="14.335cm" svg:y="11.37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25" draw:text-style-name="P10" draw:layer="layout" svg:x1="14.335cm" svg:y1="10.515cm" svg:x2="13.051cm" svg:y2="9.778cm" draw:start-shape="id90" draw:end-shape="id83" draw:end-glue-point="13" svg:d="M14335 10515h-642v-737h-642" svg:viewBox="0 0 1285 738">
          <text:p/>
        </draw:connector>
        <draw:g draw:style-name="gr6" xml:id="id84" draw:id="id84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426" draw:text-style-name="P23" draw:layer="layout" svg:width="8.002cm" svg:height="0.679cm" svg:x="6.828cm" svg:y="4.51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7" draw:text-style-name="P24" draw:layer="layout" svg:width="8.002cm" svg:height="1.627cm" svg:x="6.828cm" svg:y="5.189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mpd_monitor = MPDMonitor()</text:span></text:p>
            <text:p text:style-name="P15"><text:span text:style-name="T2">- mpd_control = MPDControl()</text:span></text:p>
            <text:p text:style-name="P15"><text:span text:style-name="T2">- spotify_connect = SpotifyConnect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5" draw:text-style-name="P5" draw:layer="layout" svg:width="3.81cm" svg:height="0.725cm" svg:x="1.217cm" svg:y="14.462cm">
          <draw:text-box>
            <text:p><text:span text:style-name="T1">&lt;&lt;consists of&gt;&gt;</text:span></text:p>
          </draw:text-box>
        </draw:frame>
      </draw:page>
      <draw:page draw:name="Top Level" draw:style-name="dp1" draw:master-page-name="Default">
        <draw:custom-shape draw:style-name="gr428" draw:text-style-name="P2" draw:layer="layout" svg:width="22.062cm" svg:height="0.7cm" svg:x="0.835cm" svg:y="2.5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9" draw:text-style-name="P2" draw:layer="layout" svg:width="21.972cm" svg:height="0.7cm" svg:x="0.935cm" svg:y="7.3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430" draw:text-style-name="P21" draw:layer="layout" svg:width="21.915cm" svg:height="0.679cm" svg:x="0.935cm" svg:y="3.4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1" draw:text-style-name="P22" draw:layer="layout" svg:width="21.915cm" svg:height="3.049cm" svg:x="0.935cm" svg:y="4.139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32" draw:text-style-name="P2" draw:layer="layout" svg:width="21.872cm" svg:height="0.7cm" svg:x="1.025cm" svg:y="18.98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3" draw:text-style-name="P3" draw:layer="layout" svg:width="28.893cm" svg:height="17.715cm" svg:x="0.682cm" svg:y="2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96" draw:id="id9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1.958cm" svg:y="0.382cm"/>
          <draw:glue-point draw:id="24" svg:x="1.369cm" svg:y="0.382cm"/>
          <draw:glue-point draw:id="25" svg:x="2.545cm" svg:y="0.382cm"/>
          <draw:g draw:style-name="gr6">
            <draw:custom-shape draw:style-name="gr434" draw:text-style-name="P7" draw:layer="layout" svg:width="3.187cm" svg:height="2.101cm" svg:x="0.988cm" svg:y="12.43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mpd_monitor.</text:span></text:p>
              <text:p text:style-name="P6"><text:span text:style-name="T2">MPDMonitor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35" draw:text-style-name="P9" draw:layer="layout" svg:width="3.187cm" svg:height="0.265cm" svg:x="0.988cm" svg:y="1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36" draw:text-style-name="P9" draw:layer="layout" svg:width="3.187cm" svg:height="0.483cm" svg:x="0.988cm" svg:y="14.80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93" draw:id="id9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437" draw:text-style-name="P7" draw:layer="layout" svg:width="3.27cm" svg:height="1.627cm" svg:x="1cm" svg:y="8.93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&gt;&gt;</text:span></text:p>
              <text:p text:style-name="P6"><text:span text:style-name="T2">mpd_control.</text:span></text:p>
              <text:p text:style-name="P6"><text:span text:style-name="T2">MPDContro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38" draw:text-style-name="P9" draw:layer="layout" svg:width="3.27cm" svg:height="0.674cm" svg:x="1cm" svg:y="10.5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39" draw:text-style-name="P9" draw:layer="layout" svg:width="3.27cm" svg:height="0.599cm" svg:x="1cm" svg:y="11.23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92" draw:id="id9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0.009cm" svg:y="-4.346cm"/>
          <draw:glue-point draw:id="24" svg:x="3.714cm" svg:y="-5.101cm"/>
          <draw:g draw:style-name="gr6">
            <draw:custom-shape draw:style-name="gr440" draw:text-style-name="P7" draw:layer="layout" svg:width="3.81cm" svg:height="1.627cm" svg:x="1.2cm" svg:y="16.13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spotify_connect.</text:span></text:p>
              <text:p text:style-name="P6"><text:span text:style-name="T2">SpotifyConnec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1" draw:text-style-name="P9" draw:layer="layout" svg:width="3.81cm" svg:height="0.247cm" svg:x="1.2cm" svg:y="17.7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2" draw:text-style-name="P9" draw:layer="layout" svg:width="3.81cm" svg:height="0.451cm" svg:x="1.2cm" svg:y="18.01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443" draw:text-style-name="P4" draw:layer="layout" svg:width="28.575cm" svg:height="1.205cm" svg:x="0.682cm" svg:y="1.099cm">
          <text:p text:style-name="P1">Class Diagram: Top level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147cm" svg:height="0.725cm" svg:x="19.732cm" svg:y="23.452cm">
          <draw:text-box>
            <text:p><text:span text:style-name="T1">&lt;&lt;uses&gt;&gt;</text:span></text:p>
          </draw:text-box>
        </draw:frame>
        <draw:custom-shape draw:style-name="gr91" draw:text-style-name="P2" draw:layer="layout" svg:width="0.911cm" svg:height="16.193cm" svg:x="23.066cm" svg:y="2.587cm">
          <text:p text:style-name="P1">GLOBALS&amp;UTILS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>
          <draw:glue-point draw:id="4" svg:x="-3.94cm" svg:y="-4.644cm"/>
          <draw:glue-point draw:id="5" svg:x="4.311cm" svg:y="-5.137cm"/>
          <draw:glue-point draw:id="6" svg:x="3.601cm" svg:y="-5.137cm"/>
          <draw:g draw:style-name="gr6">
            <draw:custom-shape draw:style-name="gr444" draw:text-style-name="P7" draw:layer="layout" svg:width="4.513cm" svg:height="1.153cm" svg:x="24.387cm" svg:y="2.87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module&gt;&gt;</text:span></text:p>
              <text:p text:style-name="P6"><text:span text:style-name="T2">log_servicep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5" draw:text-style-name="P9" draw:layer="layout" svg:width="4.513cm" svg:height="2.827cm" svg:x="24.387cm" svg:y="4.028cm">
              <text:p text:style-name="P8"><text:span text:style-name="T3">+ oradio_log.debug()</text:span></text:p>
              <text:p text:style-name="P8"><text:span text:style-name="T3">+ oradio_log.warning()</text:span></text:p>
              <text:p text:style-name="P8"><text:span text:style-name="T3">+ oradio_log.info()</text:span></text:p>
              <text:p text:style-name="P8"><text:span text:style-name="T3">+ oradio_log.error()</text:span></text:p>
              <text:p text:style-name="P8"><text:span text:style-name="T3">+ oradio_log_critical()</text:span></text:p>
              <text:p text:style-name="P8"><text:span text:style-name="T3">+ oradio_log.exception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95" draw:id="id95">
          <draw:custom-shape draw:style-name="gr446" draw:text-style-name="P7" draw:layer="layout" svg:width="4.444cm" svg:height="1.153cm" svg:x="5.762cm" svg:y="11.79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&lt;&lt;module&gt;&gt;</text:span></text:p>
            <text:p text:style-name="P6"><text:span text:style-name="T2">throttling_monitor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7" draw:text-style-name="P9" draw:layer="layout" svg:width="4.444cm" svg:height="0.761cm" svg:x="5.762cm" svg:y="12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8" draw:text-style-name="P9" draw:layer="layout" svg:width="4.444cm" svg:height="0.599cm" svg:x="5.762cm" svg:y="13.26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>
          <draw:glue-point draw:id="4" svg:x="1.153cm" svg:y="-4.294cm"/>
          <draw:glue-point draw:id="5" svg:x="3.461cm" svg:y="-5.146cm"/>
          <draw:custom-shape draw:style-name="gr449" draw:text-style-name="P7" draw:layer="layout" svg:width="4.445cm" svg:height="1.153cm" svg:x="24.395cm" svg:y="7.29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&lt;&lt;module&gt;&gt;</text:span></text:p>
            <text:p text:style-name="P6"><text:span text:style-name="T2">system_sounds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0" draw:text-style-name="P9" draw:layer="layout" svg:width="4.445cm" svg:height="0.47cm" svg:x="24.395cm" svg:y="8.448cm">
            <text:p text:style-name="P8"><text:span text:style-name="T3">+ play_soun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94" draw:id="id9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6">
            <draw:custom-shape draw:style-name="gr451" draw:text-style-name="P7" draw:layer="layout" svg:width="4.398cm" svg:height="1.627cm" svg:x="5.709cm" svg:y="8.93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remote_monitoring.</text:span></text:p>
              <text:p text:style-name="P6"><text:span text:style-name="T2">RM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2" draw:text-style-name="P9" draw:layer="layout" svg:width="4.398cm" svg:height="0.26cm" svg:x="5.709cm" svg:y="10.5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3" draw:text-style-name="P9" draw:layer="layout" svg:width="4.398cm" svg:height="0.45cm" svg:x="5.709cm" svg:y="10.82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454" draw:text-style-name="P7" draw:layer="layout" svg:width="3.175cm" svg:height="1.627cm" svg:x="10.865cm" svg:y="8.93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web_service.</text:span></text:p>
              <text:p text:style-name="P6"><text:span text:style-name="T2">Web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5" draw:text-style-name="P9" draw:layer="layout" svg:width="3.175cm" svg:height="0.264cm" svg:x="10.865cm" svg:y="10.5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6" draw:text-style-name="P28" draw:layer="layout" svg:width="3.175cm" svg:height="0.605cm" svg:x="10.865cm" svg:y="10.82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99" draw:id="id9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457" draw:text-style-name="P7" draw:layer="layout" svg:width="2.897cm" svg:height="1.627cm" svg:x="15.248cm" svg:y="8.93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wifi_service.</text:span></text:p>
              <text:p text:style-name="P6"><text:span text:style-name="T2">Wifi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8" draw:text-style-name="P9" draw:layer="layout" svg:width="2.897cm" svg:height="0.29cm" svg:x="15.248cm" svg:y="10.5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9" draw:text-style-name="P28" draw:layer="layout" svg:width="2.897cm" svg:height="0.662cm" svg:x="15.248cm" svg:y="10.85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102" draw:id="id10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460" draw:text-style-name="P7" draw:layer="layout" svg:width="3.175cm" svg:height="1.627cm" svg:x="19.515cm" svg:y="8.94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usb_service.</text:span></text:p>
              <text:p text:style-name="P6"><text:span text:style-name="T2">USB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61" draw:text-style-name="P9" draw:layer="layout" svg:width="3.175cm" svg:height="0.455cm" svg:x="19.515cm" svg:y="10.5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62" draw:text-style-name="P9" draw:layer="layout" svg:width="3.175cm" svg:height="0.253cm" svg:x="19.515cm" svg:y="11.02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103" draw:id="id10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463" draw:text-style-name="P7" draw:layer="layout" svg:width="3.586cm" svg:height="1.627cm" svg:x="19.28cm" svg:y="11.72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volume_control.</text:span></text:p>
              <text:p text:style-name="P6"><text:span text:style-name="T2">VolumeContro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64" draw:text-style-name="P9" draw:layer="layout" svg:width="3.586cm" svg:height="0.235cm" svg:x="19.28cm" svg:y="13.3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65" draw:text-style-name="P34" draw:layer="layout" svg:width="3.586cm" svg:height="0.428cm" svg:x="19.28cm" svg:y="13.58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101" draw:id="id10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3.858cm" svg:y="1.985cm"/>
          <draw:g draw:style-name="gr6">
            <draw:custom-shape draw:style-name="gr466" draw:text-style-name="P7" draw:layer="layout" svg:width="3.81cm" svg:height="1.627cm" svg:x="18.462cm" svg:y="14.89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error_service.py.</text:span></text:p>
              <text:p text:style-name="P6"><text:span text:style-name="T2">Error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67" draw:text-style-name="P9" draw:layer="layout" svg:width="3.81cm" svg:height="0.324cm" svg:x="18.462cm" svg:y="16.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68" draw:text-style-name="P9" draw:layer="layout" svg:width="3.81cm" svg:height="0.431cm" svg:x="18.462cm" svg:y="16.84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97" draw:id="id9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469" draw:text-style-name="P7" draw:layer="layout" svg:width="4.959cm" svg:height="1.627cm" svg:x="5.783cm" svg:y="14.36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power_supply_control.</text:span></text:p>
              <text:p text:style-name="P6"><text:span text:style-name="T2">PowerSupply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70" draw:text-style-name="P9" draw:layer="layout" svg:width="4.959cm" svg:height="0.604cm" svg:x="5.783cm" svg:y="15.9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71" draw:text-style-name="P9" draw:layer="layout" svg:width="4.959cm" svg:height="0.599cm" svg:x="5.783cm" svg:y="16.593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>
          <draw:glue-point draw:id="4" svg:x="-0.787cm" svg:y="5.055cm"/>
          <draw:glue-point draw:id="5" svg:x="-5.063cm" svg:y="-3.065cm"/>
          <draw:glue-point draw:id="6" svg:x="-3.788cm" svg:y="5.05cm"/>
          <draw:custom-shape draw:style-name="gr472" draw:text-style-name="P7" draw:layer="layout" svg:width="3.071cm" svg:height="1.627cm" svg:x="11.081cm" svg:y="11.79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&lt;&lt;class&gt;&gt;</text:span></text:p>
            <text:p text:style-name="P6"><text:span text:style-name="T2">led_control.</text:span></text:p>
            <text:p text:style-name="P6"><text:span text:style-name="T2">LEDContr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3" draw:text-style-name="P9" draw:layer="layout" svg:width="3.071cm" svg:height="0.483cm" svg:x="11.081cm" svg:y="13.4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4" draw:text-style-name="P9" draw:layer="layout" svg:width="3.071cm" svg:height="0.431cm" svg:x="11.081cm" svg:y="13.90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100" draw:id="id10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475" draw:text-style-name="P7" draw:layer="layout" svg:width="3.235cm" svg:height="1.627cm" svg:x="15.227cm" svg:y="11.93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touch_buttons.</text:span></text:p>
              <text:p text:style-name="P6"><text:span text:style-name="T2">TouchButton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76" draw:text-style-name="P9" draw:layer="layout" svg:width="3.235cm" svg:height="0.433cm" svg:x="15.227cm" svg:y="13.5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77" draw:text-style-name="P9" draw:layer="layout" svg:width="3.235cm" svg:height="0.344cm" svg:x="15.227cm" svg:y="13.99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98" draw:id="id9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3.665cm" svg:y="5.097cm"/>
          <draw:g draw:style-name="gr6">
            <draw:custom-shape draw:style-name="gr478" draw:text-style-name="P7" draw:layer="layout" svg:width="3.243cm" svg:height="1.627cm" svg:x="13.014cm" svg:y="14.9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backlighting.</text:span></text:p>
              <text:p text:style-name="P6"><text:span text:style-name="T2">BackLighti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79" draw:text-style-name="P9" draw:layer="layout" svg:width="3.243cm" svg:height="0.558cm" svg:x="13.014cm" svg:y="16.5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80" draw:text-style-name="P9" draw:layer="layout" svg:width="3.243cm" svg:height="0.335cm" svg:x="13.014cm" svg:y="17.15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91" draw:id="id91">
          <draw:glue-point draw:id="4" svg:x="-3cm" svg:y="5cm"/>
          <draw:glue-point draw:id="5" svg:x="-0.833cm" svg:y="5.191cm"/>
          <draw:glue-point draw:id="6" svg:x="1.5cm" svg:y="5.191cm"/>
          <draw:glue-point draw:id="7" svg:x="3.5cm" svg:y="5.19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3.833cm" svg:y="5.191cm"/>
          <draw:glue-point draw:id="17" svg:x="-3.833cm" svg:y="5.191cm"/>
          <draw:glue-point draw:id="18" svg:x="-3.833cm" svg:y="5.191cm"/>
          <draw:glue-point draw:id="19" svg:x="1.333cm" svg:y="5.191cm"/>
          <draw:glue-point draw:id="20" svg:x="3.5cm" svg:y="5.191cm"/>
          <draw:custom-shape draw:style-name="gr481" draw:text-style-name="P23" draw:layer="layout" svg:width="19.05cm" svg:height="0.679cm" svg:x="2.587cm" svg:y="4.81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2" draw:text-style-name="P24" draw:layer="layout" svg:width="19.05cm" svg:height="0.679cm" svg:x="2.587cm" svg:y="5.489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483">
          <draw:connector draw:style-name="gr484" draw:text-style-name="P38" draw:layer="layout" draw:type="line" svg:x1="4.811cm" svg:y1="6.168cm" svg:x2="4.798cm" svg:y2="16.137cm" draw:start-shape="id91" draw:start-glue-point="16" draw:end-shape="id92" draw:end-glue-point="15" svg:d="M4811 6168l-13 9969" svg:viewBox="0 0 14 9970">
            <text:p/>
          </draw:connector>
          <draw:connector draw:style-name="gr484" draw:text-style-name="P38" draw:layer="layout" draw:type="line" svg:x1="4.793cm" svg:y1="9.463cm" svg:x2="4.269cm" svg:y2="9.573cm" draw:end-shape="id93" draw:end-glue-point="13" svg:d="M4793 9463l-524 110" svg:viewBox="0 0 525 111">
            <text:p/>
          </draw:connector>
          <draw:connector draw:style-name="gr484" draw:text-style-name="P38" draw:layer="layout" draw:type="line" svg:x1="4.807cm" svg:y1="9.44cm" svg:x2="5.71cm" svg:y2="9.573cm" draw:end-shape="id94" draw:end-glue-point="6" svg:d="M4807 9440l903 133" svg:viewBox="0 0 904 134">
            <text:p/>
          </draw:connector>
          <draw:connector draw:style-name="gr484" draw:text-style-name="P38" draw:layer="layout" draw:type="line" svg:x1="4.762cm" svg:y1="12.918cm" svg:x2="5.762cm" svg:y2="12.829cm" draw:end-shape="id95" svg:d="M4762 12918l1000-89" svg:viewBox="0 0 1001 90">
            <text:p/>
          </draw:connector>
          <draw:connector draw:style-name="gr484" draw:text-style-name="P38" draw:layer="layout" draw:type="line" svg:x1="4.749cm" svg:y1="12.916cm" svg:x2="4.174cm" svg:y2="13.074cm" draw:end-shape="id96" draw:end-glue-point="13" svg:d="M4749 12916l-575 158" svg:viewBox="0 0 576 159">
            <text:p/>
          </draw:connector>
          <draw:connector draw:style-name="gr484" draw:text-style-name="P38" draw:layer="layout" draw:type="line" svg:x1="4.855cm" svg:y1="15.066cm" svg:x2="5.784cm" svg:y2="14.998cm" draw:end-shape="id97" draw:end-glue-point="6" svg:d="M4855 15066l929-68" svg:viewBox="0 0 930 69">
            <text:p/>
          </draw:connector>
        </draw:g>
        <draw:connector draw:style-name="gr484" draw:text-style-name="P38" draw:layer="layout" draw:type="line" svg:x1="14.651cm" svg:y1="6.168cm" svg:x2="14.635cm" svg:y2="14.97cm" draw:start-shape="id91" draw:start-glue-point="19" draw:end-shape="id98" draw:end-glue-point="0" svg:d="M14651 6168l-16 8802" svg:viewBox="0 0 17 8803">
          <text:p/>
        </draw:connector>
        <draw:connector draw:style-name="gr484" draw:text-style-name="P38" draw:layer="layout" draw:type="line" svg:x1="14.541cm" svg:y1="10.732cm" svg:x2="14.017cm" svg:y2="10.842cm" svg:d="M14541 10732l-524 110" svg:viewBox="0 0 525 111">
          <text:p/>
        </draw:connector>
        <draw:connector draw:style-name="gr484" draw:text-style-name="P38" draw:layer="layout" draw:type="line" svg:x1="14.692cm" svg:y1="10.179cm" svg:x2="15.248cm" svg:y2="10.226cm" draw:end-shape="id99" draw:end-glue-point="3" svg:d="M14692 10179l556 47" svg:viewBox="0 0 557 48">
          <text:p/>
        </draw:connector>
        <draw:connector draw:style-name="gr484" draw:text-style-name="P38" draw:layer="layout" draw:type="line" svg:x1="14.661cm" svg:y1="12.576cm" svg:x2="15.227cm" svg:y2="12.464cm" draw:end-shape="id100" draw:end-glue-point="21" svg:d="M14661 12576l566-112" svg:viewBox="0 0 567 113">
          <text:p/>
        </draw:connector>
        <draw:connector draw:style-name="gr484" draw:text-style-name="P38" draw:layer="layout" draw:type="line" svg:x1="14.723cm" svg:y1="13.914cm" svg:x2="14.077cm" svg:y2="13.858cm" svg:d="M14723 13914l-646-56" svg:viewBox="0 0 647 57">
          <text:p/>
        </draw:connector>
        <draw:connector draw:style-name="gr484" draw:text-style-name="P38" draw:layer="layout" draw:type="line" svg:x1="18.779cm" svg:y1="6.168cm" svg:x2="18.675cm" svg:y2="14.894cm" draw:start-shape="id91" draw:start-glue-point="7" draw:end-shape="id101" draw:end-glue-point="4" svg:d="M18779 6168l-104 8726" svg:viewBox="0 0 105 8727">
          <text:p/>
        </draw:connector>
        <draw:connector draw:style-name="gr484" draw:text-style-name="P38" draw:layer="layout" draw:type="line" svg:x1="18.769cm" svg:y1="9.525cm" svg:x2="19.516cm" svg:y2="9.578cm" draw:end-shape="id102" draw:end-glue-point="6" svg:d="M18769 9525l747 53" svg:viewBox="0 0 748 54">
          <text:p/>
        </draw:connector>
        <draw:connector draw:style-name="gr484" draw:text-style-name="P38" draw:layer="layout" draw:type="line" svg:x1="18.738cm" svg:y1="12.016cm" svg:x2="19.281cm" svg:y2="12.363cm" draw:end-shape="id103" draw:end-glue-point="6" svg:d="M18738 12016l543 347" svg:viewBox="0 0 544 348">
          <text:p/>
        </draw:connector>
        <draw:g draw:style-name="gr6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custom-shape draw:style-name="gr485" draw:text-style-name="P19" draw:layer="layout" svg:width="4.845cm" svg:height="1.153cm" svg:x="24.412cm" svg:y="12.32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static&gt;&gt;</text:span></text:p>
            <text:p text:style-name="P18"><text:span text:style-name="T2">messaging.Command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6" draw:text-style-name="P9" draw:layer="layout" svg:width="4.845cm" svg:height="0.514cm" svg:x="24.412cm" svg:y="13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7" draw:text-style-name="P9" draw:layer="layout" svg:width="4.845cm" svg:height="0.993cm" svg:x="24.412cm" svg:y="13.91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subscribe(sources: tuple[str,...] | None)::Queu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glue-point draw:id="9" svg:x="-1.314cm" svg:y="-5.099cm"/>
          <draw:custom-shape draw:style-name="gr488" draw:text-style-name="P19" draw:layer="layout" svg:width="4.763cm" svg:height="1.153cm" svg:x="24.347cm" svg:y="15.483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module&gt;&gt;</text:span></text:p>
            <text:p text:style-name="P18"><text:span text:style-name="T2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9" draw:text-style-name="P9" draw:layer="layout" svg:width="4.763cm" svg:height="0.574cm" svg:x="24.347cm" svg:y="16.6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0" draw:text-style-name="P9" draw:layer="layout" svg:width="4.763cm" svg:height="1.387cm" svg:x="24.347cm" svg:y="17.12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safe_get(queue: Queue):: </text:span></text:p>
            <text:p text:style-name="P8"><text:span text:style-name="T3"><text:s text:c="2"/></text:span><text:span text:style-name="T3">CommandMessage |</text:span></text:p>
            <text:p text:style-name="P8"><text:span text:style-name="T3"><text:s text:c="2"/></text:span><text:span text:style-name="T3">Error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custom-shape draw:style-name="gr491" draw:text-style-name="P19" draw:layer="layout" svg:width="4.845cm" svg:height="1.153cm" svg:x="24.412cm" svg:y="9.24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static&gt;&gt;</text:span></text:p>
            <text:p text:style-name="P18"><text:span text:style-name="T2">messaging.Erro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2" draw:text-style-name="P9" draw:layer="layout" svg:width="4.845cm" svg:height="0.571cm" svg:x="24.412cm" svg:y="10.3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3" draw:text-style-name="P9" draw:layer="layout" svg:width="4.845cm" svg:height="0.993cm" svg:x="24.412cm" svg:y="10.87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subscribe(sources: tuple[str,...] | None)::Queu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20" svg:d="M0 20l10-20 10 20z"/>
    <draw:marker draw:name="Navigation" svg:viewBox="0 0 786 1228" svg:d="M151 1228l-76-25-75-25 318-952 76-226 75 226 317 952-76 25-75 25-162-486v462h-80-79v-464z"/>
    <draw:marker draw:name="Square_20_45" draw:display-name="Square 45" svg:viewBox="0 0 1131 1131" svg:d="M0 564l564 567 567-567-567-564z"/>
    <draw:marker draw:name="Square_20_45_20_unfilled" draw:display-name="Square 45 unfilled" svg:viewBox="0 0 3000 3000" svg:d="M1500 3000l-1500-1500 1500-1500 1500 1500zM1500 2715l-1215-1215 1215-1215 1215 1215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3T16:23:47.322558208</meta:creation-date>
    <meta:generator>LibreOffice/24.2.7.2$Linux_X86_64 LibreOffice_project/420$Build-2</meta:generator>
    <dc:date>2026-06-24T18:01:35.610953226</dc:date>
    <meta:editing-duration>PT18H26M49S</meta:editing-duration>
    <meta:editing-cycles>140</meta:editing-cycles>
    <meta:print-date>2026-05-31T17:56:35.806719548</meta:print-date>
    <dc:creator>Henk</dc:creator>
    <meta:printed-by>PDF files: Henk</meta:printed-by>
    <meta:document-statistic meta:object-count="747"/>
  </office:meta>
</office:document-meta>
</file>