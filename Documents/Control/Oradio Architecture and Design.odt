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D0000030B87AECB35.jpg" manifest:media-type="image/jpeg"/>
  <manifest:file-entry manifest:full-path="Pictures/10000000000004630000031A3657996F.jpg" manifest:media-type="image/jpeg"/>
  <manifest:file-entry manifest:full-path="Pictures/10000000000002F00000042C553EA593.jpg" manifest:media-type="image/jpeg"/>
  <manifest:file-entry manifest:full-path="Pictures/100000000000031A0000046386CA6A18.jpg" manifest:media-type="image/jpeg"/>
  <manifest:file-entry manifest:full-path="Pictures/10000000000004630000031AECAA9034.jpg" manifest:media-type="image/jpeg"/>
  <manifest:file-entry manifest:full-path="Pictures/100000000000033E00000296E9FA0584.jpg" manifest:media-type="image/jpeg"/>
  <manifest:file-entry manifest:full-path="Pictures/10000000000004630000031AB58075B7.jpg" manifest:media-type="image/jpeg"/>
  <manifest:file-entry manifest:full-path="Pictures/10000000000004630000031ABE1FC146.jpg" manifest:media-type="image/jpeg"/>
  <manifest:file-entry manifest:full-path="Pictures/10000000000003FE000002123A1A8A8A.jpg" manifest:media-type="image/jpeg"/>
  <manifest:file-entry manifest:full-path="Pictures/10000000000004630000031A99FF82D0.jpg" manifest:media-type="image/jpeg"/>
  <manifest:file-entry manifest:full-path="Pictures/10000001000001F400000148DBB0C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51.29mm" table:align="right"/>
    </style:style>
    <style:style style:name="Table2.A" style:family="table-column">
      <style:table-column-properties style:column-width="26.93mm"/>
    </style:style>
    <style:style style:name="Table2.B" style:family="table-column">
      <style:table-column-properties style:column-width="124.35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Standard">
      <style:text-properties officeooo:paragraph-rsid="0019ce16"/>
    </style:style>
    <style:style style:name="P12" style:family="paragraph" style:parent-style-name="Text_20_body">
      <style:text-properties officeooo:rsid="001a2bcc" officeooo:paragraph-rsid="001a2bcc"/>
    </style:style>
    <style:style style:name="P13" style:family="paragraph" style:parent-style-name="Text_20_body">
      <style:text-properties officeooo:paragraph-rsid="001d94d5"/>
    </style:style>
    <style:style style:name="P14" style:family="paragraph" style:parent-style-name="Text_20_body">
      <style:paragraph-properties fo:break-before="page"/>
      <style:text-properties officeooo:paragraph-rsid="001d94d5"/>
    </style:style>
    <style:style style:name="P15" style:family="paragraph" style:parent-style-name="Contents_20_1">
      <style:paragraph-properties>
        <style:tab-stops>
          <style:tab-stop style:position="169.99mm" style:type="right" style:leader-style="dotted" style:leader-text="."/>
        </style:tab-stops>
      </style:paragraph-properties>
    </style:style>
    <style:style style:name="P16" style:family="paragraph" style:parent-style-name="Contents_20_2">
      <style:paragraph-properties>
        <style:tab-stops>
          <style:tab-stop style:position="164.99mm" style:type="right" style:leader-style="dotted" style:leader-text="."/>
        </style:tab-stops>
      </style:paragraph-properties>
    </style:style>
    <style:style style:name="P17" style:family="paragraph" style:parent-style-name="Text_20_body">
      <style:text-properties officeooo:rsid="001e0fed" officeooo:paragraph-rsid="001e0fed"/>
    </style:style>
    <style:style style:name="P18" style:family="paragraph" style:parent-style-name="Text_20_body">
      <style:text-properties officeooo:rsid="00230afb" officeooo:paragraph-rsid="00230afb"/>
    </style:style>
    <style:style style:name="P19" style:family="paragraph" style:parent-style-name="Text_20_body">
      <style:text-properties officeooo:rsid="00230afb" officeooo:paragraph-rsid="00262f68"/>
    </style:style>
    <style:style style:name="P20" style:family="paragraph" style:parent-style-name="Text_20_body">
      <style:text-properties officeooo:paragraph-rsid="00215455"/>
    </style:style>
    <style:style style:name="P21" style:family="paragraph" style:parent-style-name="Standard">
      <style:text-properties officeooo:rsid="00298340" officeooo:paragraph-rsid="00298340"/>
    </style:style>
    <style:style style:name="P22" style:family="paragraph" style:parent-style-name="Text_20_body">
      <style:text-properties officeooo:rsid="001bc545" officeooo:paragraph-rsid="001bc545"/>
    </style:style>
    <style:style style:name="P23" style:family="paragraph" style:parent-style-name="Text_20_body">
      <style:text-properties officeooo:rsid="001c13ba" officeooo:paragraph-rsid="001c13ba"/>
    </style:style>
    <style:style style:name="P24" style:family="paragraph" style:parent-style-name="Text_20_body">
      <style:text-properties officeooo:paragraph-rsid="00230afb"/>
    </style:style>
    <style:style style:name="P25" style:family="paragraph" style:parent-style-name="Text_20_body">
      <style:text-properties officeooo:paragraph-rsid="0024fd79"/>
    </style:style>
    <style:style style:name="P26" style:family="paragraph" style:parent-style-name="Text_20_body">
      <style:text-properties officeooo:rsid="0027c5d5" officeooo:paragraph-rsid="0027c5d5"/>
    </style:style>
    <style:style style:name="P27" style:family="paragraph" style:parent-style-name="Text_20_body">
      <style:text-properties officeooo:rsid="00296dd1" officeooo:paragraph-rsid="00296dd1"/>
    </style:style>
    <style:style style:name="P28" style:family="paragraph" style:parent-style-name="Table_20_Contents">
      <style:text-properties officeooo:rsid="0031da80" officeooo:paragraph-rsid="0031da80"/>
    </style:style>
    <style:style style:name="P29" style:family="paragraph" style:parent-style-name="Table_20_Contents">
      <style:text-properties officeooo:paragraph-rsid="0031da80"/>
    </style:style>
    <style:style style:name="P30" style:family="paragraph" style:parent-style-name="Text_20_body">
      <style:text-properties officeooo:paragraph-rsid="001b9abe"/>
    </style:style>
    <style:style style:name="P31" style:family="paragraph" style:parent-style-name="Text_20_body">
      <style:text-properties officeooo:rsid="002b84f8" officeooo:paragraph-rsid="002b84f8"/>
    </style:style>
    <style:style style:name="P32" style:family="paragraph" style:parent-style-name="Text_20_body">
      <style:text-properties officeooo:rsid="002e5196" officeooo:paragraph-rsid="00302d68"/>
    </style:style>
    <style:style style:name="P33" style:family="paragraph" style:parent-style-name="Text_20_body" style:master-page-name="">
      <loext:graphic-properties draw:fill="none"/>
      <style:paragraph-properties fo:margin-left="13.76mm" fo:margin-right="0mm" fo:margin-top="0mm" fo:margin-bottom="2.47mm" style:contextual-spacing="false" fo:line-height="115%" fo:text-indent="0mm" style:auto-text-indent="false" style:page-number="auto" fo:background-color="transparent"/>
      <style:text-properties officeooo:rsid="003259fa" officeooo:paragraph-rsid="0031da80"/>
    </style:style>
    <style:style style:name="P34"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35" style:family="paragraph" style:parent-style-name="Heading_20_1">
      <style:paragraph-properties fo:break-before="page"/>
    </style:style>
    <style:style style:name="P36" style:family="paragraph" style:parent-style-name="Heading_20_1" style:list-style-name="">
      <style:text-properties officeooo:rsid="00182ac6" officeooo:paragraph-rsid="00182ac6"/>
    </style:style>
    <style:style style:name="P37" style:family="paragraph" style:parent-style-name="Heading_20_1">
      <style:paragraph-properties fo:break-before="page"/>
      <style:text-properties officeooo:rsid="00182ac6" officeooo:paragraph-rsid="00182ac6"/>
    </style:style>
    <style:style style:name="P38" style:family="paragraph" style:parent-style-name="Heading_20_1">
      <style:paragraph-properties fo:break-before="page"/>
      <style:text-properties officeooo:rsid="001b9abe" officeooo:paragraph-rsid="001b9abe"/>
    </style:style>
    <style:style style:name="P39" style:family="paragraph" style:parent-style-name="Heading_20_1">
      <style:paragraph-properties fo:break-before="page"/>
      <style:text-properties officeooo:rsid="001e0fed" officeooo:paragraph-rsid="001e0fed"/>
    </style:style>
    <style:style style:name="P40" style:family="paragraph" style:parent-style-name="Heading_20_2">
      <style:text-properties officeooo:rsid="0014a285" officeooo:paragraph-rsid="0014a285"/>
    </style:style>
    <style:style style:name="P41" style:family="paragraph" style:parent-style-name="Heading_20_2">
      <style:text-properties officeooo:rsid="0015ecfc" officeooo:paragraph-rsid="0015ecfc"/>
    </style:style>
    <style:style style:name="P42" style:family="paragraph" style:parent-style-name="Heading_20_2">
      <style:text-properties officeooo:rsid="001b9abe" officeooo:paragraph-rsid="001b9abe"/>
    </style:style>
    <style:style style:name="P43" style:family="paragraph" style:parent-style-name="Heading_20_2">
      <style:text-properties officeooo:rsid="001e0fed" officeooo:paragraph-rsid="001e0fed"/>
    </style:style>
    <style:style style:name="P44" style:family="paragraph" style:parent-style-name="Heading_20_2">
      <style:text-properties officeooo:rsid="0019ce16" officeooo:paragraph-rsid="0019ce16"/>
    </style:style>
    <style:style style:name="P45" style:family="paragraph" style:parent-style-name="Heading_20_2">
      <style:text-properties officeooo:rsid="001d94d5" officeooo:paragraph-rsid="001d94d5"/>
    </style:style>
    <style:style style:name="P46" style:family="paragraph" style:parent-style-name="Heading_20_2">
      <style:text-properties officeooo:rsid="00215455" officeooo:paragraph-rsid="00215455"/>
    </style:style>
    <style:style style:name="P47" style:family="paragraph" style:parent-style-name="Heading_20_2">
      <style:paragraph-properties fo:break-before="page"/>
      <style:text-properties officeooo:rsid="00215455" officeooo:paragraph-rsid="00215455"/>
    </style:style>
    <style:style style:name="P48" style:family="paragraph" style:parent-style-name="Heading_20_2">
      <style:text-properties officeooo:rsid="0024fd79" officeooo:paragraph-rsid="0024fd79"/>
    </style:style>
    <style:style style:name="P49" style:family="paragraph" style:parent-style-name="Heading_20_2">
      <style:paragraph-properties fo:break-before="page"/>
      <style:text-properties officeooo:rsid="0024fd79" officeooo:paragraph-rsid="0024fd79"/>
    </style:style>
    <style:style style:name="P50" style:family="paragraph" style:parent-style-name="Heading_20_2" style:list-style-name=""/>
    <style:style style:name="P51" style:family="paragraph" style:parent-style-name="Heading_20_2" style:list-style-name="">
      <style:text-properties officeooo:paragraph-rsid="00215455"/>
    </style:style>
    <style:style style:name="P52" style:family="paragraph" style:parent-style-name="Heading_20_2">
      <style:paragraph-properties fo:break-before="page"/>
      <style:text-properties officeooo:paragraph-rsid="00215455"/>
    </style:style>
    <style:style style:name="P53" style:family="paragraph" style:parent-style-name="Heading_20_2" style:list-style-name="">
      <style:text-properties officeooo:rsid="00230afb" officeooo:paragraph-rsid="00230afb"/>
    </style:style>
    <style:style style:name="P54" style:family="paragraph" style:parent-style-name="Heading_20_2">
      <style:paragraph-properties fo:break-before="page"/>
      <style:text-properties officeooo:rsid="00230afb" officeooo:paragraph-rsid="00230afb"/>
    </style:style>
    <style:style style:name="P55" style:family="paragraph" style:parent-style-name="Standard" style:list-style-name="L3">
      <style:text-properties officeooo:rsid="0015ecfc" officeooo:paragraph-rsid="0015ecfc"/>
    </style:style>
    <style:style style:name="P56" style:family="paragraph" style:parent-style-name="Standard" style:list-style-name="L3">
      <style:text-properties officeooo:rsid="0017212d" officeooo:paragraph-rsid="0017212d"/>
    </style:style>
    <style:style style:name="P57" style:family="paragraph" style:parent-style-name="Standard" style:list-style-name="L14">
      <style:text-properties officeooo:paragraph-rsid="0019ce16"/>
    </style:style>
    <style:style style:name="P58" style:family="paragraph" style:parent-style-name="Standard" style:list-style-name="L14">
      <style:text-properties officeooo:rsid="0023488a" officeooo:paragraph-rsid="0019ce16"/>
    </style:style>
    <style:style style:name="P59" style:family="paragraph" style:parent-style-name="Standard" style:list-style-name="L14">
      <style:text-properties officeooo:rsid="0019ce16" officeooo:paragraph-rsid="0019ce16"/>
    </style:style>
    <style:style style:name="P60" style:family="paragraph" style:parent-style-name="Text_20_body" style:list-style-name="L1">
      <style:text-properties officeooo:rsid="0015ecfc" officeooo:paragraph-rsid="0015ecfc"/>
    </style:style>
    <style:style style:name="P61" style:family="paragraph" style:parent-style-name="Text_20_body" style:list-style-name="L2">
      <style:text-properties officeooo:rsid="0015ecfc" officeooo:paragraph-rsid="0015ecfc"/>
    </style:style>
    <style:style style:name="P62" style:family="paragraph" style:parent-style-name="Text_20_body" style:list-style-name="L4">
      <style:text-properties officeooo:rsid="0015ecfc" officeooo:paragraph-rsid="0015ecfc"/>
    </style:style>
    <style:style style:name="P63" style:family="paragraph" style:parent-style-name="Text_20_body" style:list-style-name="L2">
      <style:text-properties officeooo:rsid="0017212d" officeooo:paragraph-rsid="0017212d"/>
    </style:style>
    <style:style style:name="P64" style:family="paragraph" style:parent-style-name="Text_20_body" style:list-style-name="L5">
      <style:text-properties officeooo:paragraph-rsid="001b9abe"/>
    </style:style>
    <style:style style:name="P65" style:family="paragraph" style:parent-style-name="Text_20_body" style:list-style-name="L5">
      <style:text-properties officeooo:rsid="001b9abe" officeooo:paragraph-rsid="001b9abe"/>
    </style:style>
    <style:style style:name="P66" style:family="paragraph" style:parent-style-name="Text_20_body" style:list-style-name="L5">
      <style:text-properties officeooo:rsid="001bb325" officeooo:paragraph-rsid="001bb325"/>
    </style:style>
    <style:style style:name="P67" style:family="paragraph" style:parent-style-name="Text_20_body" style:list-style-name="L6">
      <style:text-properties officeooo:paragraph-rsid="001bb325"/>
    </style:style>
    <style:style style:name="P68" style:family="paragraph" style:parent-style-name="Text_20_body" style:list-style-name="L6">
      <style:text-properties officeooo:rsid="001bc545" officeooo:paragraph-rsid="001bc545"/>
    </style:style>
    <style:style style:name="P69" style:family="paragraph" style:parent-style-name="Text_20_body" style:list-style-name="L9">
      <style:text-properties officeooo:rsid="001bc545" officeooo:paragraph-rsid="00213708"/>
    </style:style>
    <style:style style:name="P70" style:family="paragraph" style:parent-style-name="Text_20_body" style:list-style-name="L7">
      <loext:graphic-properties draw:fill="none"/>
      <style:paragraph-properties fo:margin-top="0mm" fo:margin-bottom="2.47mm" style:contextual-spacing="false" fo:line-height="115%" fo:background-color="transparent"/>
      <style:text-properties officeooo:rsid="003259fa" officeooo:paragraph-rsid="003259fa"/>
    </style:style>
    <style:style style:name="P71"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72" style:family="paragraph" style:parent-style-name="Text_20_body" style:list-style-name="L8">
      <style:text-properties officeooo:paragraph-rsid="0031da80"/>
    </style:style>
    <style:style style:name="P73" style:family="paragraph" style:parent-style-name="Text_20_body" style:list-style-name="L8">
      <style:text-properties officeooo:rsid="002e5196" officeooo:paragraph-rsid="00302d68"/>
    </style:style>
    <style:style style:name="P74" style:family="paragraph" style:parent-style-name="Text_20_body" style:list-style-name="L9">
      <style:text-properties officeooo:paragraph-rsid="00213708"/>
    </style:style>
    <style:style style:name="P75" style:family="paragraph" style:parent-style-name="Text_20_body" style:list-style-name="L9">
      <style:text-properties officeooo:rsid="001fbf41" officeooo:paragraph-rsid="001fbf41"/>
    </style:style>
    <style:style style:name="P76" style:family="paragraph" style:parent-style-name="Text_20_body" style:list-style-name="L10">
      <style:text-properties officeooo:rsid="001fbf41" officeooo:paragraph-rsid="001fbf41"/>
    </style:style>
    <style:style style:name="P77" style:family="paragraph" style:parent-style-name="Text_20_body" style:list-style-name="L11">
      <style:text-properties officeooo:rsid="001fbf41" officeooo:paragraph-rsid="001fbf41"/>
    </style:style>
    <style:style style:name="P78" style:family="paragraph" style:parent-style-name="Text_20_body" style:list-style-name="L12">
      <style:text-properties officeooo:rsid="001fbf41" officeooo:paragraph-rsid="001fbf41"/>
    </style:style>
    <style:style style:name="P79" style:family="paragraph" style:parent-style-name="Text_20_body" style:list-style-name="L13">
      <style:text-properties officeooo:rsid="001fbf41" officeooo:paragraph-rsid="001fbf41"/>
    </style:style>
    <style:style style:name="P80" style:family="paragraph" style:parent-style-name="Text_20_body" style:list-style-name="L9">
      <style:text-properties officeooo:rsid="001e0fed" officeooo:paragraph-rsid="001e0fed"/>
    </style:style>
    <style:style style:name="P81" style:family="paragraph" style:parent-style-name="Text_20_body" style:list-style-name="L9">
      <style:text-properties officeooo:rsid="001c13ba" officeooo:paragraph-rsid="00213708"/>
    </style:style>
    <style:style style:name="P82" style:family="paragraph" style:parent-style-name="Text_20_body" style:list-style-name="L15">
      <style:text-properties officeooo:rsid="001a2bcc" officeooo:paragraph-rsid="001a2bcc"/>
    </style:style>
    <style:style style:name="P83" style:family="paragraph" style:parent-style-name="Text_20_body">
      <style:text-properties officeooo:rsid="001a2bcc" officeooo:paragraph-rsid="001a2bcc"/>
    </style:style>
    <style:style style:name="P84" style:family="paragraph" style:parent-style-name="Text_20_body" style:list-style-name="L16">
      <style:text-properties officeooo:rsid="0027c5d5" officeooo:paragraph-rsid="0027c5d5"/>
    </style:style>
    <style:style style:name="P85" style:family="paragraph" style:parent-style-name="Text_20_body" style:list-style-name="L17">
      <style:text-properties officeooo:rsid="0027c5d5" officeooo:paragraph-rsid="0027c5d5"/>
    </style:style>
    <style:style style:name="P86" style:family="paragraph" style:parent-style-name="Text_20_body" style:list-style-name="L19">
      <loext:graphic-properties draw:fill="none"/>
      <style:paragraph-properties fo:margin-left="11.99mm" fo:margin-right="0mm" fo:margin-top="0mm" fo:margin-bottom="2.47mm" style:contextual-spacing="false" fo:line-height="115%" fo:text-indent="0mm" style:auto-text-indent="false" fo:background-color="transparent"/>
      <style:text-properties officeooo:paragraph-rsid="003450f7"/>
    </style:style>
    <style:style style:name="P87" style:family="paragraph" style:parent-style-name="Text_20_body" style:list-style-name="L7">
      <loext:graphic-properties draw:fill="none"/>
      <style:paragraph-properties fo:margin-top="0mm" fo:margin-bottom="2.47mm" style:contextual-spacing="false" fo:line-height="115%" fo:background-color="transparent"/>
      <style:text-properties officeooo:rsid="003450f7" officeooo:paragraph-rsid="003450f7"/>
    </style:style>
    <style:style style:name="P88" style:family="paragraph" style:parent-style-name="Text_20_body">
      <loext:graphic-properties draw:fill="none"/>
      <style:paragraph-properties fo:margin-left="11.99mm" fo:margin-right="0mm" fo:margin-top="0mm" fo:margin-bottom="2.47mm" style:contextual-spacing="false" fo:line-height="115%" fo:text-indent="0mm" style:auto-text-indent="false" fo:background-color="transparent"/>
      <style:text-properties officeooo:rsid="003450f7" officeooo:paragraph-rsid="003450f7"/>
    </style:style>
    <style:style style:name="P89" style:family="paragraph" style:parent-style-name="Text_20_body" style:master-page-name="">
      <loext:graphic-properties draw:fill="none"/>
      <style:paragraph-properties fo:margin-left="13mm" fo:margin-right="0mm" fo:margin-top="0mm" fo:margin-bottom="2.47mm" style:contextual-spacing="false" fo:line-height="115%" fo:text-indent="0mm" style:auto-text-indent="false" style:page-number="auto" fo:background-color="transparent"/>
      <style:text-properties officeooo:rsid="0034f09d" officeooo:paragraph-rsid="0034f09d"/>
    </style:style>
    <style:style style:name="P90" style:family="paragraph" style:parent-style-name="Text_20_body" style:master-page-name="">
      <loext:graphic-properties draw:fill="none"/>
      <style:paragraph-properties fo:margin-left="13mm" fo:margin-right="0mm" fo:margin-top="0mm" fo:margin-bottom="2.47mm" style:contextual-spacing="false" fo:line-height="115%" fo:text-indent="0mm" style:auto-text-indent="false" style:page-number="auto" fo:background-color="transparent"/>
      <style:text-properties officeooo:rsid="0034f09d" officeooo:paragraph-rsid="0034f09d"/>
    </style:style>
    <style:style style:name="P91" style:family="paragraph" style:parent-style-name="Text_20_body">
      <style:text-properties officeooo:rsid="001a2bcc" officeooo:paragraph-rsid="001a2bcc" fo:background-color="#ffff00"/>
    </style:style>
    <style:style style:name="P92" style:family="paragraph" style:parent-style-name="Text_20_body">
      <style:text-properties officeooo:paragraph-rsid="00262f68"/>
    </style:style>
    <style:style style:name="P93" style:family="paragraph">
      <style:text-properties fo:color="#000000" loext:opacity="100%"/>
    </style:style>
    <style:style style:name="P94" style:family="paragraph">
      <style:paragraph-properties style:text-autospace="none"/>
      <style:text-properties fo:color="#000000" loext:opacity="100%" style:font-name="Monospace" fo:font-size="10pt" style:font-name-asian="Monospace" style:font-size-asian="10pt" style:font-name-complex="Monospace" style:font-size-complex="10pt"/>
    </style:style>
    <style:style style:name="P95" style:family="paragraph">
      <style:paragraph-properties style:text-autospace="none"/>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P96" style:family="paragraph">
      <loext:graphic-properties draw:fill="none" draw:fill-color="#ffffff"/>
      <style:text-properties fo:color="#000000" loext:opacity="100%"/>
    </style:style>
    <style:style style:name="P97" style:family="paragraph">
      <style:paragraph-properties fo:text-align="start"/>
    </style:style>
    <style:style style:name="P98"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fo:font-weight="bold" officeooo:rsid="0031da80" style:font-weight-asian="bold" style:font-weight-complex="bold"/>
    </style:style>
    <style:style style:name="T10" style:family="text">
      <style:text-properties officeooo:rsid="0023488a"/>
    </style:style>
    <style:style style:name="T11" style:family="text">
      <style:text-properties officeooo:rsid="002cdcb6"/>
    </style:style>
    <style:style style:name="T12" style:family="text">
      <style:text-properties officeooo:rsid="0023832c"/>
    </style:style>
    <style:style style:name="T13" style:family="text">
      <style:text-properties officeooo:rsid="001b9abe"/>
    </style:style>
    <style:style style:name="T14" style:family="text">
      <style:text-properties officeooo:rsid="001bb325"/>
    </style:style>
    <style:style style:name="T15" style:family="text">
      <style:text-properties officeooo:rsid="001bc545"/>
    </style:style>
    <style:style style:name="T16" style:family="text">
      <style:text-properties officeooo:rsid="001c13ba"/>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T24" style:family="text">
      <style:text-properties officeooo:rsid="002cae60"/>
    </style:style>
    <style:style style:name="T25" style:family="text">
      <style:text-properties officeooo:rsid="002dfc19"/>
    </style:style>
    <style:style style:name="T26" style:family="text">
      <style:text-properties officeooo:rsid="002e477e"/>
    </style:style>
    <style:style style:name="T27" style:family="text">
      <style:text-properties officeooo:rsid="002e5196"/>
    </style:style>
    <style:style style:name="T28" style:family="text">
      <style:text-properties officeooo:rsid="00302d68"/>
    </style:style>
    <style:style style:name="T29" style:family="text">
      <style:text-properties officeooo:rsid="0031da80"/>
    </style:style>
    <style:style style:name="T30" style:family="text">
      <style:text-properties officeooo:rsid="0033fac4"/>
    </style:style>
    <style:style style:name="T31" style:family="text">
      <style:text-properties officeooo:rsid="003450f7"/>
    </style:style>
    <style:style style:name="T32" style:family="text">
      <style:text-properties officeooo:rsid="0034f09d"/>
    </style:style>
    <style:style style:name="T33"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34" style:family="text">
      <style:text-properties fo:color="#000000" loext:opacity="100%"/>
    </style:style>
    <style:style style:name="T35" style:family="text">
      <style:text-properties fo:color="#000000" loext:opacity="100%" style:font-name="Monospace" fo:font-size="10pt" fo:font-weight="bold" style:font-name-asian="Monospace" style:font-size-asian="10pt" style:font-weight-asian="bold" style:font-name-complex="Monospace" style:font-size-complex="10pt" style:font-weight-complex="bold"/>
    </style:style>
    <style:style style:name="T36" style:family="text">
      <style:text-properties fo:color="#000000" loext:opacity="100%" style:font-name="Monospace"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37" style:family="text">
      <style:text-properties fo:color="#000000" loext:opacity="1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8" style:family="text">
      <style:text-properties style:font-name="Liberation Mono1" fo:font-size="10pt" style:font-name-asian="Liberation Mono1" style:font-size-asian="10pt" style:font-name-complex="Liberation Mono1" style:font-size-complex="10pt"/>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91mm" fo:text-indent="-6.35mm" fo:margin-left="70.91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26mm" fo:text-indent="-6.35mm" fo:margin-left="77.26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61mm" fo:text-indent="-6.35mm" fo:margin-left="83.61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style:style style:name="gr1" style:family="graphic">
      <style:graphic-properties draw:stroke="solid" svg:stroke-width="0.35mm" svg:stroke-color="#000000" draw:marker-start-width="4.06mm" draw:marker-end-width="4.06mm" draw:fill="none" draw:fill-color="#ffffff" fo:min-height="86.32mm" fo:padding-top="-0.09mm" fo:padding-bottom="-0.09mm" fo:padding-left="-0.09mm" fo:padding-right="-0.09mm"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solid" svg:stroke-width="0.35mm" svg:stroke-color="#000000" draw:marker-start-width="4.06mm" draw:marker-end-width="4.06mm" draw:fill="none" draw:fill-color="#ffffff" fo:min-height="63.73mm" fo:padding-top="0.18mm" fo:padding-bottom="0.18mm" fo:padding-left="0.18mm" fo:padding-right="0.18mm" loext:decorative="false" style:run-through="foreground" style:wrap="none" style:vertical-pos="from-top" style:vertical-rel="paragraph"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1826_1246683851" text:style-name="Index_20_Link" text:visited-style-name="Index_20_Link">1 Architectural view model<text:tab/>2</text:a></text:p>
          <text:p text:style-name="P16"><text:a xlink:type="simple" xlink:href="#__RefHeading___Toc1828_1246683851" text:style-name="Index_20_Link" text:visited-style-name="Index_20_Link">1.1 The logical view<text:tab/>2</text:a></text:p>
          <text:p text:style-name="P16"><text:a xlink:type="simple" xlink:href="#__RefHeading___Toc1830_1246683851" text:style-name="Index_20_Link" text:visited-style-name="Index_20_Link">1.2 The Physical view<text:tab/>2</text:a></text:p>
          <text:p text:style-name="P16"><text:a xlink:type="simple" xlink:href="#__RefHeading___Toc1832_1246683851" text:style-name="Index_20_Link" text:visited-style-name="Index_20_Link">1.3 The Development view<text:tab/>3</text:a></text:p>
          <text:p text:style-name="P16"><text:a xlink:type="simple" xlink:href="#__RefHeading___Toc1834_1246683851" text:style-name="Index_20_Link" text:visited-style-name="Index_20_Link">1.4 The Process view<text:tab/>3</text:a></text:p>
          <text:p text:style-name="P16"><text:a xlink:type="simple" xlink:href="#__RefHeading___Toc1836_1246683851" text:style-name="Index_20_Link" text:visited-style-name="Index_20_Link">1.5 The Scenarios (or use case view)<text:tab/>3</text:a></text:p>
          <text:p text:style-name="P15"><text:a xlink:type="simple" xlink:href="#__RefHeading___Toc481_4128384672" text:style-name="Index_20_Link" text:visited-style-name="Index_20_Link">2 Architectural guidelines<text:tab/>4</text:a></text:p>
          <text:p text:style-name="P16"><text:a xlink:type="simple" xlink:href="#__RefHeading___Toc483_4128384672" text:style-name="Index_20_Link" text:visited-style-name="Index_20_Link">2.1 Loosely coupled architecture<text:tab/>4</text:a></text:p>
          <text:p text:style-name="P16"><text:a xlink:type="simple" xlink:href="#__RefHeading___Toc485_4128384672" text:style-name="Index_20_Link" text:visited-style-name="Index_20_Link">2.2 Asynchronous component communication<text:tab/>4</text:a></text:p>
          <text:p text:style-name="P15"><text:a xlink:type="simple" xlink:href="#__RefHeading___Toc487_4128384672" text:style-name="Index_20_Link" text:visited-style-name="Index_20_Link">3 The Deployment view<text:tab/>5</text:a></text:p>
          <text:p text:style-name="P16"><text:a xlink:type="simple" xlink:href="#__RefHeading___Toc489_4128384672" text:style-name="Index_20_Link" text:visited-style-name="Index_20_Link">3.1 Software artifacts<text:tab/>5</text:a></text:p>
          <text:p text:style-name="P16"><text:a xlink:type="simple" xlink:href="#__RefHeading___Toc491_4128384672" text:style-name="Index_20_Link" text:visited-style-name="Index_20_Link">3.2 Target environment<text:tab/>5</text:a></text:p>
          <text:p text:style-name="P16"><text:a xlink:type="simple" xlink:href="#__RefHeading___Toc493_4128384672" text:style-name="Index_20_Link" text:visited-style-name="Index_20_Link">3.3 Software installation<text:tab/>5</text:a></text:p>
          <text:p text:style-name="P16"><text:a xlink:type="simple" xlink:href="#__RefHeading___Toc495_4128384672" text:style-name="Index_20_Link" text:visited-style-name="Index_20_Link">3.4 Runtime<text:tab/>5</text:a></text:p>
          <text:p text:style-name="P16"><text:a xlink:type="simple" xlink:href="#__RefHeading___Toc497_4128384672" text:style-name="Index_20_Link" text:visited-style-name="Index_20_Link">3.5 Configuration<text:tab/>6</text:a></text:p>
          <text:p text:style-name="P16"><text:a xlink:type="simple" xlink:href="#__RefHeading___Toc499_4128384672" text:style-name="Index_20_Link" text:visited-style-name="Index_20_Link">3.6 System services<text:tab/>6</text:a></text:p>
          <text:p text:style-name="P15"><text:a xlink:type="simple" xlink:href="#__RefHeading___Toc1838_1246683851" text:style-name="Index_20_Link" text:visited-style-name="Index_20_Link">4 The Logical view: Class diagrams<text:tab/>7</text:a></text:p>
          <text:p text:style-name="P16"><text:a xlink:type="simple" xlink:href="#__RefHeading___Toc501_4128384672" text:style-name="Index_20_Link" text:visited-style-name="Index_20_Link">4.1 The top level diagram<text:tab/>7</text:a></text:p>
          <text:p text:style-name="P16"><text:a xlink:type="simple" xlink:href="#__RefHeading___Toc503_4128384672" text:style-name="Index_20_Link" text:visited-style-name="Index_20_Link">4.2 Messaging<text:tab/>8</text:a></text:p>
          <text:p text:style-name="P16"><text:a xlink:type="simple" xlink:href="#__RefHeading___Toc505_4128384672" text:style-name="Index_20_Link" text:visited-style-name="Index_20_Link">4.3 Remote Monitoring Service<text:tab/>10</text:a></text:p>
          <text:p text:style-name="P15"><text:a xlink:type="simple" xlink:href="#__RefHeading___Toc1840_1246683851" text:style-name="Index_20_Link" text:visited-style-name="Index_20_Link">5 The Logical view: State diagrams<text:tab/>11</text:a></text:p>
          <text:p text:style-name="P16"><text:a xlink:type="simple" xlink:href="#__RefHeading___Toc507_4128384672" text:style-name="Index_20_Link" text:visited-style-name="Index_20_Link">5.1 Maincontrol state<text:tab/>11</text:a></text:p>
          <text:p text:style-name="P16"><text:a xlink:type="simple" xlink:href="#__RefHeading___Toc509_4128384672" text:style-name="Index_20_Link" text:visited-style-name="Index_20_Link">5.2 Oradio Control States<text:tab/>12</text:a></text:p>
          <text:p text:style-name="P15"><text:a xlink:type="simple" xlink:href="#__RefHeading___Toc1842_1246683851" text:style-name="Index_20_Link" text:visited-style-name="Index_20_Link">6 The Physical view: Component diagrams<text:tab/>13</text:a></text:p>
          <text:p text:style-name="P16"><text:a xlink:type="simple" xlink:href="#__RefHeading___Toc511_4128384672" text:style-name="Index_20_Link" text:visited-style-name="Index_20_Link">6.1 OS Service<text:tab/>13</text:a></text:p>
          <text:p text:style-name="P16"><text:a xlink:type="simple" xlink:href="#__RefHeading___Toc513_4128384672" text:style-name="Index_20_Link" text:visited-style-name="Index_20_Link">6.2 Messaging (Commands)<text:tab/>14</text:a></text:p>
          <text:p text:style-name="P16"><text:a xlink:type="simple" xlink:href="#__RefHeading___Toc515_4128384672" text:style-name="Index_20_Link" text:visited-style-name="Index_20_Link">6.3 Music Players<text:tab/>15</text:a></text:p>
          <text:p text:style-name="P16"><text:a xlink:type="simple" xlink:href="#__RefHeading___Toc517_4128384672" text:style-name="Index_20_Link" text:visited-style-name="Index_20_Link">6.4 GPIO components<text:tab/>16</text:a></text:p>
          <text:p text:style-name="P15"><text:a xlink:type="simple" xlink:href="#__RefHeading___Toc1844_1246683851" text:style-name="Index_20_Link" text:visited-style-name="Index_20_Link">7 <text:s/>The Process view: Sequence diagrams<text:tab/>17</text:a></text:p>
          <text:p text:style-name="P16"><text:a xlink:type="simple" xlink:href="#__RefHeading___Toc519_4128384672" text:style-name="Index_20_Link" text:visited-style-name="Index_20_Link">7.1 Messaging<text:tab/>17</text:a></text:p>
          <text:p text:style-name="P15"><text:a xlink:type="simple" xlink:href="#__RefHeading___Toc1846_1246683851" text:style-name="Index_20_Link" text:visited-style-name="Index_20_Link">8 The scenario view: use case diagrams<text:tab/>18</text:a></text:p>
        </text:index-body>
      </text:table-of-content>
      <text:p text:style-name="Standard"/>
      <text:p text:style-name="Standard"/>
      <text:p text:style-name="Standard"/>
      <text:h text:style-name="P35"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21"><draw:frame draw:style-name="fr3" draw:name="Image1" text:anchor-type="char" svg:x="2.38mm" svg:y="-1.85mm" svg:width="132.29mm" svg:height="86.78mm" draw:z-index="0"><draw:image xlink:href="Pictures/10000001000001F400000148DBB0C7BA.png" xlink:type="simple" xlink:show="embed" xlink:actuate="onLoad" draw:mime-type="image/png"/></draw:frame>llibre</text:p>
      <text:h text:style-name="P40"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60">Class diagrams</text:p>
        </text:list-item>
        <text:list-item>
          <text:p text:style-name="P60">Component diagram</text:p>
        </text:list-item>
      </text:list>
      <text:h text:style-name="P40"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61">Class diagrams</text:p>
        </text:list-item>
        <text:list-item>
          <text:p text:style-name="P61">State diagrams</text:p>
        </text:list-item>
        <text:list-item>
          <text:p text:style-name="P63">Component diagrams</text:p>
        </text:list-item>
      </text:list>
      <text:h text:style-name="P40"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40"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55">Sequence diagrams, </text:p>
        </text:list-item>
        <text:list-item>
          <text:p text:style-name="P55">Activity diagrams</text:p>
        </text:list-item>
        <text:list-item>
          <text:p text:style-name="P56">State diagrams</text:p>
        </text:list-item>
      </text:list>
      <text:h text:style-name="P41"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62">Use Case diagram</text:p>
        </text:list-item>
      </text:list>
      <text:p text:style-name="P5"/>
      <text:h text:style-name="P36" text:outline-level="1"/>
      <text:h text:style-name="P38"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65">Changes made to one component have minimal impact on others, which enhances the overall resilience of the system</text:p>
        </text:list-item>
        <text:list-item>
          <text:p text:style-name="P64">Each component has little or no knowledge of the internal workings of other components.</text:p>
        </text:list-item>
        <text:list-item>
          <text:p text:style-name="P64">Systems can scale more easily as components can be modified or replaced independently.</text:p>
        </text:list-item>
        <text:list-item>
          <text:p text:style-name="P66">Each component can be developed, deployed, tested and maintained independently</text:p>
        </text:list-item>
      </text:list>
      <text:h text:style-name="P42" text:outline-level="2"><text:bookmark-start text:name="__RefHeading___Toc485_4128384672"/>Asynchronous component communication<text:bookmark-end text:name="__RefHeading___Toc485_4128384672"/></text:h>
      <text:p text:style-name="P30">A loosely coupled architecture using a queue allows different components of a system to communicate asynchronously, meaning they can operate independently without being directly connected. </text:p>
      <text:p text:style-name="P31">The component communication uses the publish/subscriber model, in which a communication queue will be assigned to each of the subscribers. When a new message is published, the related message Topic will be distributed to the assigned subscribers queue.</text:p>
      <text:p text:style-name="P9">Key characteristics:</text:p>
      <text:list text:style-name="L6">
        <text:list-item>
          <text:p text:style-name="P67"><text:span text:style-name="T15">Independence:</text:span> Producers and consumers don’t need to know about each other. They only interact with the queue, reducing direct dependencies.</text:p>
        </text:list-item>
        <text:list-item>
          <text:p text:style-name="P67"><text:span text:style-name="T14">Failure isolation: </text:span>If one component fails, the queue allows other components to continue functioning. This isolation minimizes the impact of failures on the overall system.</text:p>
        </text:list-item>
        <text:list-item>
          <text:p text:style-name="P67">Asynchronous Communication: Components can communicate without waiting for each other to respond, which reduces downtime and improves responsiveness.</text:p>
        </text:list-item>
        <text:list-item>
          <text:p text:style-name="P68">Buffering: They act as buffers that store messages until the receiving service is ready to process them. This helps manage varying loads and prevents service overload</text:p>
        </text:list-item>
      </text:list>
      <text:p text:style-name="P22"/>
      <text:p text:style-name="P23"/>
      <text:h text:style-name="P39" text:outline-level="1"><text:bookmark-start text:name="__RefHeading___Toc487_4128384672"/>The Deployment view<text:bookmark-end text:name="__RefHeading___Toc487_4128384672"/></text:h>
      <text:h text:style-name="P43" text:outline-level="2"><text:bookmark-start text:name="__RefHeading___Toc489_4128384672"/>Software <text:span text:style-name="T17">artifacts</text:span><text:bookmark-end text:name="__RefHeading___Toc489_4128384672"/></text:h>
      <text:h text:style-name="Heading_20_3" text:outline-level="3">Folder structur<text:span text:style-name="T32">e</text:span></text:h>
      <text:p text:style-name="P89">Tbd</text:p>
      <text:h text:style-name="Heading_20_3" text:outline-level="3">Github</text:h>
      <text:p text:style-name="P88">GitHub is a cloud-based platform for hosting and managing code that allows developers to collaborate on projects using version control. It is primarily used for storing code, tracking changes, and facilitating teamwork on software development projects. In this project github will be used for:</text:p>
      <text:list text:style-name="L19">
        <text:list-item>
          <text:p text:style-name="P86"><text:span text:style-name="T31">Version Control: to track changes in code over time. </text:span></text:p>
        </text:list-item>
        <text:list-item>
          <text:p text:style-name="P86">Repositories: to store code, <text:span text:style-name="T31">enabling</text:span> shar<text:span text:style-name="T31">ing of code</text:span> and collaborat<text:span text:style-name="T31">ion</text:span></text:p>
        </text:list-item>
        <text:list-item>
          <text:p text:style-name="P86">Pull Requests: <text:span text:style-name="T31">method to </text:span>propose changes to a project, allowing for code review and discussion before integration.</text:p>
        </text:list-item>
        <text:list-item>
          <text:p text:style-name="P86"><text:span text:style-name="T31">Issue tracking: </text:span>to track bugs and feature requests, <text:span text:style-name="T31">to </text:span>manage the <text:span text:style-name="T31">projects</text:span> workflow.</text:p>
        </text:list-item>
      </text:list>
      <text:h text:style-name="Heading_20_3" text:outline-level="3">Music sources</text:h>
      <text:p text:style-name="P89">tbd</text:p>
      <text:h text:style-name="Heading_20_3" text:outline-level="3">Self-documenting python code. </text:h>
      <text:p text:style-name="P34">Module headers should <text:span text:style-name="T30">have following Google style docstring formatting</text:span></text:p>
      <text:list text:style-name="L7">
        <text:list-item>
          <text:p text:style-name="P87"><draw:frame text:anchor-type="paragraph" draw:z-index="9" draw:name="Text Frame 2" draw:style-name="gr1" draw:text-style-name="P96" svg:width="149.53mm" svg:height="86.16mm" svg:x="13.18mm" svg:y="-0.04mm"><draw:text-box><text:p text:style-name="P93"><text:span text:style-name="T33">"""</text:span></text:p><text:p text:style-name="P94"><text:span text:style-name="T34"/></text:p><text:p text:style-name="P95"><text:span text:style-name="T34"><text:s text:c="2"/></text:span><text:span text:style-name="T34">#### <text:s text:c="2"/>##### <text:s text:c="4"/>## <text:s text:c="3"/>##### <text:s text:c="5"/># <text:s text:c="4"/>####</text:span></text:p><text:p text:style-name="P95"><text:span text:style-name="T34"><text:s/></text:span><text:span text:style-name="T34"># <text:s text:c="3"/># <text:s/># <text:s text:c="3"/># <text:s text:c="2"/># <text:s/># <text:s text:c="2"/># <text:s text:c="3"/># <text:s text:c="4"/># <text:s text:c="3"/># <text:s text:c="3"/>#</text:span></text:p><text:p text:style-name="P95"><text:span text:style-name="T34"><text:s/></text:span><text:span text:style-name="T34"># <text:s text:c="3"/># <text:s/># <text:s text:c="3"/># <text:s/># <text:s text:c="3"/># <text:s/># <text:s text:c="3"/># <text:s text:c="4"/># <text:s text:c="3"/># <text:s text:c="3"/>#</text:span></text:p><text:p text:style-name="P95"><text:span text:style-name="T34"><text:s/></text:span><text:span text:style-name="T34"># <text:s text:c="3"/># <text:s/>##### <text:s text:c="2"/>###### <text:s/># <text:s text:c="3"/># <text:s text:c="4"/># <text:s text:c="3"/># <text:s text:c="3"/>#</text:span></text:p><text:p text:style-name="P95"><text:span text:style-name="T34"><text:s/></text:span><text:span text:style-name="T34"># <text:s text:c="3"/># <text:s/># <text:s text:c="2"/># <text:s text:c="2"/># <text:s text:c="3"/># <text:s/># <text:s text:c="3"/># <text:s text:c="4"/># <text:s text:c="3"/># <text:s text:c="3"/>#</text:span></text:p><text:p text:style-name="P95"><text:span text:style-name="T34"><text:s text:c="2"/></text:span><text:span text:style-name="T34">#### <text:s text:c="2"/># <text:s text:c="3"/># <text:s/># <text:s text:c="3"/># <text:s/>##### <text:s text:c="5"/># <text:s text:c="4"/>####</text:span></text:p><text:p text:style-name="P94"><text:span text:style-name="T34"/></text:p><text:p text:style-name="P94"><text:span text:style-name="T34"/></text:p><text:p text:style-name="P95"><text:span text:style-name="T34">Created on May 28, 2026</text:span></text:p><text:p text:style-name="P94"><text:span text:style-name="T35">@author:</text:span><text:span text:style-name="T33"> <text:s text:c="7"/></text:span><text:span text:style-name="T36">Henk</text:span><text:span text:style-name="T33"> </text:span><text:span text:style-name="T36">Stevens</text:span><text:span text:style-name="T33"> &amp; </text:span><text:span text:style-name="T36">Olaf</text:span><text:span text:style-name="T33"> </text:span><text:span text:style-name="T36">Mastenbroek</text:span><text:span text:style-name="T33"> &amp; </text:span><text:span text:style-name="T36">Onno</text:span><text:span text:style-name="T33"> </text:span><text:span text:style-name="T36">Janssen</text:span></text:p><text:p text:style-name="P94"><text:span text:style-name="T35">@copyright:</text:span><text:span text:style-name="T33"> <text:s text:c="4"/>Copyright, </text:span><text:span text:style-name="T36">Oradio</text:span><text:span text:style-name="T33"> </text:span><text:span text:style-name="T36">Stichting</text:span></text:p><text:p text:style-name="P94"><text:span text:style-name="T35">@license:</text:span><text:span text:style-name="T33"> <text:s text:c="6"/>GNU General Public License (GPL)</text:span></text:p><text:p text:style-name="P94"><text:span text:style-name="T35">@organization:</text:span><text:span text:style-name="T33"> <text:s/></text:span><text:span text:style-name="T36">Oradio</text:span><text:span text:style-name="T33"> </text:span><text:span text:style-name="T36">Stichting</text:span></text:p><text:p text:style-name="P94"><text:span text:style-name="T35">@version:</text:span><text:span text:style-name="T33"> <text:s text:c="6"/>1</text:span></text:p><text:p text:style-name="P94"><text:span text:style-name="T35">@email:</text:span><text:span text:style-name="T33"> <text:s text:c="8"/></text:span><text:span text:style-name="T36">oradioinfo@stichtingoradio.nl</text:span></text:p><text:p text:style-name="P94"><text:span text:style-name="T35">@status:</text:span><text:span text:style-name="T33"> <text:s text:c="7"/>Development</text:span></text:p><text:p text:style-name="P94"><text:span text:style-name="T35">@summary:</text:span><text:span text:style-name="T33"> <text:s text:c="6"/>One line summary of the module</text:span></text:p><text:p text:style-name="P94"><text:span text:style-name="T37">@description:</text:span><text:span text:style-name="T33"> <text:s text:c="2"/>Detailed description of module</text:span></text:p><text:p text:style-name="P95"><text:span text:style-name="T34">"""</text:span></text:p></draw:text-box></draw:frame>@author: the author(s)</text:p>
        </text:list-item>
        <text:list-item>
          <text:p text:style-name="P70"><text:soft-page-break/><text:span text:style-name="T31">@copywright, @license, @organization, @version, @email, @status: open-source related information.</text:span></text:p>
        </text:list-item>
        <text:list-item>
          <text:p text:style-name="P70"><text:span text:style-name="T31">@s</text:span>ummary: one-line summary of module</text:p>
        </text:list-item>
        <text:list-item>
          <text:p text:style-name="P70"><text:span text:style-name="T31">@</text:span>description: <text:span text:style-name="T31">detailed description of modules</text:span></text:p>
        </text:list-item>
      </text:list>
      <text:list text:style-name="L8">
        <text:list-header>
          <text:p text:style-name="P73">For each class, method or function there should be Google <text:span text:style-name="T28">style</text:span> <text:span text:style-name="T28">documentation strings (</text:span>docstring<text:span text:style-name="T28">)</text:span> , with <text:span text:style-name="T28">following format:</text:span></text:p>
        </text:list-header>
      </text:list>
      <text:p text:style-name="P32"><draw:frame text:anchor-type="char" draw:z-index="8" draw:name="Text Frame 1" draw:style-name="gr2" draw:text-style-name="P98" svg:width="142.23mm" svg:height="64.44mm" svg:x="34.38mm" svg:y="0.81mm"><draw:text-box><text:p text:style-name="P97"><text:span text:style-name="T38">def example_function(param1, param2): <text:s text:c="3"/></text:span></text:p><text:p text:style-name="P97"><text:span text:style-name="T38"><text:s text:c="4"/></text:span><text:span text:style-name="T38">"""Summary line.</text:span></text:p><text:p text:style-name="P97"><text:span text:style-name="T38"/></text:p><text:p text:style-name="P97"><text:span text:style-name="T38"><text:s text:c="4"/></text:span><text:span text:style-name="T38">Detailed description of the function's purpose and behavior.</text:span></text:p><text:p text:style-name="P97"><text:span text:style-name="T38"/></text:p><text:p text:style-name="P97"><text:span text:style-name="T38"><text:s text:c="4"/></text:span><text:span text:style-name="T38">Args:</text:span></text:p><text:p text:style-name="P97"><text:span text:style-name="T38"><text:s text:c="8"/></text:span><text:span text:style-name="T38">param1 (int): Description of the first parameter.</text:span></text:p><text:p text:style-name="P97"><text:span text:style-name="T38"><text:s text:c="8"/></text:span><text:span text:style-name="T38">param2 (str): Description of the second parameter.</text:span></text:p><text:p text:style-name="P97"><text:span text:style-name="T38"/></text:p><text:p text:style-name="P97"><text:span text:style-name="T38"><text:s text:c="4"/></text:span><text:span text:style-name="T38">Returns: <text:s text:c="7"/>bool: True if successful, False otherwise.</text:span></text:p><text:p text:style-name="P97"><text:span text:style-name="T38"/></text:p><text:p text:style-name="P97"><text:span text:style-name="T38"><text:s text:c="4"/></text:span><text:span text:style-name="T38">Raises: <text:s text:c="7"/>ValueError: If param1 is negative.</text:span></text:p><text:p text:style-name="P97"><text:span text:style-name="T38"><text:s text:c="4"/></text:span><text:span text:style-name="T38">Examples:</text:span></text:p><text:p text:style-name="P97"><text:span text:style-name="T38"><text:s text:c="8"/></text:span><text:span text:style-name="T38">&gt;&gt;&gt; example_function(1, 'test')</text:span></text:p><text:p text:style-name="P97"><text:span text:style-name="T38"><text:s text:c="8"/></text:span><text:span text:style-name="T38">True</text:span></text:p><text:p text:style-name="P97"><text:span text:style-name="T38"><text:s text:c="4"/></text:span><text:span text:style-name="T38">"""</text:span></text:p></draw:text-box></draw:frame></text:p>
      <text:list text:continue-numbering="true" text:style-name="L8">
        <text:list-item>
          <text:list>
            <text:list-item>
              <text:p text:style-name="P72"><text:span text:style-name="T9">Summary line</text:span><text:span text:style-name="T27">: </text:span>A brief description of the module, class, or function, limited to one line.</text:p>
            </text:list-item>
            <text:list-item>
              <text:p text:style-name="P72"><text:span text:style-name="T6">Detailed Description:</text:span> This section provides a more comprehensive explanation of the code's purpose and usag<text:span text:style-name="T29">e. </text:span></text:p>
            </text:list-item>
            <text:list-item>
              <text:p text:style-name="P72"><text:span text:style-name="T9">Se</text:span><text:span text:style-name="T6">ctions</text:span>:</text:p>
            </text:list-item>
          </text:list>
        </text:list-item>
      </text:list>
      <table:table table:name="Table2" table:style-name="Table2">
        <table:table-column table:style-name="Table2.A"/>
        <table:table-column table:style-name="Table2.B"/>
        <table:table-row>
          <table:table-cell table:style-name="Table2.A1" office:value-type="string">
            <text:p text:style-name="P28">Section</text:p>
          </table:table-cell>
          <table:table-cell table:style-name="Table2.B1" office:value-type="string">
            <text:p text:style-name="P28">Description</text:p>
          </table:table-cell>
        </table:table-row>
        <table:table-row>
          <table:table-cell table:style-name="Table2.A2" office:value-type="string">
            <text:p text:style-name="P28">Args</text:p>
          </table:table-cell>
          <table:table-cell table:style-name="Table2.B2" office:value-type="string">
            <text:p text:style-name="P29">Lists the parameters accepted by the function, including their types.</text:p>
          </table:table-cell>
        </table:table-row>
        <table:table-row>
          <table:table-cell table:style-name="Table2.A2" office:value-type="string">
            <text:p text:style-name="P28">Returns</text:p>
          </table:table-cell>
          <table:table-cell table:style-name="Table2.B2" office:value-type="string">
            <text:p text:style-name="P29">Describes the return value and its type.</text:p>
          </table:table-cell>
        </table:table-row>
        <table:table-row>
          <table:table-cell table:style-name="Table2.A2" office:value-type="string">
            <text:p text:style-name="P28">Raises</text:p>
          </table:table-cell>
          <table:table-cell table:style-name="Table2.B2" office:value-type="string">
            <text:p text:style-name="Table_20_Contents">Lists exceptions that the function may raise, along with conditions.</text:p>
          </table:table-cell>
        </table:table-row>
        <table:table-row>
          <table:table-cell table:style-name="Table2.A2" office:value-type="string">
            <text:p text:style-name="P28">Examples</text:p>
          </table:table-cell>
          <table:table-cell table:style-name="Table2.B2" office:value-type="string">
            <text:p text:style-name="Table_20_Contents">Provides usage examples to illustrate how to use the function or class.</text:p>
          </table:table-cell>
        </table:table-row>
      </table:table>
      <text:p text:style-name="P33"/>
      <text:p text:style-name="P34"/>
      <text:h text:style-name="P43" text:outline-level="2"><text:bookmark-start text:name="__RefHeading___Toc491_4128384672"/>Target environment<text:bookmark-end text:name="__RefHeading___Toc491_4128384672"/></text:h>
      <text:list text:style-name="L9">
        <text:list-item>
          <text:p text:style-name="P69">The RaspberryPi-3<text:span text:style-name="T25">A+</text:span> <text:span text:style-name="T18">headless </text:span>module will be used as central control unit, providing hardware for:</text:p>
          <text:list>
            <text:list-item>
              <text:p text:style-name="P69">Connectivity: WiFi, Bluetooth, Ethernet, USB</text:p>
            </text:list-item>
            <text:list-item>
              <text:p text:style-name="P69">Input/Output pinning <text:span text:style-name="T16">(GPIO)</text:span>: for user interface, as buttons and led indications</text:p>
            </text:list-item>
            <text:list-item>
              <text:p text:style-name="P74"><text:span text:style-name="T16">RaspiOS: </text:span>Raspberry Pi OS <text:span text:style-name="T16">(open-source) </text:span>is a Unix-like operating system developed for the Raspberry Pi line of single-board computers. Based on Debian, a Linux distribution, <text:soft-page-break/>it is maintained by Raspberry Pi Holdings and optimized for the Pi's hardware, with low memory requirements and support for both 32-bit and 64-bit architectures. </text:p>
            </text:list-item>
            <text:list-item>
              <text:p text:style-name="P75">Extension interface at GPIO for Audio Playback (DigiAmp), touch buttons, volume knob and led drivers.</text:p>
            </text:list-item>
          </text:list>
        </text:list-item>
        <text:list-item>
          <text:p text:style-name="P80">Raspberry Pi OS: latest version, after being tested by developers</text:p>
        </text:list-item>
        <text:list-item>
          <text:p text:style-name="P81">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17"/>
      <text:h text:style-name="P43" text:outline-level="2"><text:bookmark-start text:name="__RefHeading___Toc493_4128384672"/>Software installation<text:bookmark-end text:name="__RefHeading___Toc493_4128384672"/></text:h>
      <text:list text:style-name="L10">
        <text:list-item>
          <text:p text:style-name="P76">Development: Install script</text:p>
        </text:list-item>
        <text:list-item>
          <text:p text:style-name="P76">production: Image copy</text:p>
        </text:list-item>
      </text:list>
      <text:h text:style-name="P43" text:outline-level="2"><text:bookmark-start text:name="__RefHeading___Toc495_4128384672"/>Runtime <text:bookmark-end text:name="__RefHeading___Toc495_4128384672"/></text:h>
      <text:list text:style-name="L11">
        <text:list-item>
          <text:p text:style-name="P77">runs on boot</text:p>
        </text:list-item>
        <text:list-item>
          <text:p text:style-name="P77">logging</text:p>
        </text:list-item>
        <text:list-item>
          <text:p text:style-name="P77">handling errors</text:p>
        </text:list-item>
      </text:list>
      <text:h text:style-name="P43" text:outline-level="2"><text:bookmark-start text:name="__RefHeading___Toc497_4128384672"/>Configuration<text:bookmark-end text:name="__RefHeading___Toc497_4128384672"/></text:h>
      <text:list text:style-name="L12">
        <text:list-item>
          <text:p text:style-name="P78">Configuration items: </text:p>
          <text:list>
            <text:list-item>
              <text:p text:style-name="P78">config.txt, </text:p>
            </text:list-item>
            <text:list-item>
              <text:p text:style-name="P78">asound.conf, </text:p>
            </text:list-item>
            <text:list-item>
              <text:p text:style-name="P78">mpd.conf,</text:p>
            </text:list-item>
            <text:list-item>
              <text:p text:style-name="P78">logrotate.conf</text:p>
            </text:list-item>
          </text:list>
        </text:list-item>
        <text:list-item>
          <text:p text:style-name="P78">??</text:p>
        </text:list-item>
      </text:list>
      <text:h text:style-name="P43" text:outline-level="2"><text:bookmark-start text:name="__RefHeading___Toc499_4128384672"/>System services<text:bookmark-end text:name="__RefHeading___Toc499_4128384672"/></text:h>
      <text:list text:style-name="L13">
        <text:list-item>
          <text:p text:style-name="P79">systemd services:</text:p>
          <text:list>
            <text:list-item>
              <text:p text:style-name="P79">librespot.service</text:p>
            </text:list-item>
            <text:list-item>
              <text:p text:style-name="P79">mpd.service</text:p>
            </text:list-item>
            <text:list-item>
              <text:p text:style-name="P79">oradio.service</text:p>
            </text:list-item>
            <text:list-item>
              <text:p text:style-name="P79">usb_low_idle_power_service: <text:span text:style-name="T26">( still needed??)</text:span></text:p>
            </text:list-item>
          </text:list>
        </text:list-item>
        <text:list-item>
          <text:p text:style-name="P79">Dynamic device management: Udev rules for USB devices</text:p>
        </text:list-item>
        <text:list-item>
          <text:p text:style-name="P79"/>
        </text:list-item>
      </text:list>
      <text:h text:style-name="P37" text:outline-level="1"><text:bookmark-start text:name="__RefHeading___Toc1838_1246683851"/>The Logical view: Class diagrams<text:bookmark-end text:name="__RefHeading___Toc1838_1246683851"/></text:h>
      <text:p text:style-name="P11"><text:span text:style-name="T10">The </text:span><text:span text:style-name="T11">Oradio3 </text:span><text:span text:style-name="T10">software layering typically consists of three main layers: </text:span></text:p>
      <text:list text:style-name="L14">
        <text:list-item>
          <text:p text:style-name="P57"><text:span text:style-name="T10">the </text:span><text:span text:style-name="T7">hardware </text:span><text:span text:style-name="T8">abstraction </text:span><text:span text:style-name="T7">layer </text:span><text:span text:style-name="T12">(HAL)</text:span><text:span text:style-name="T10">, which includes the physical components.</text:span></text:p>
        </text:list-item>
        <text:list-item>
          <text:p text:style-name="P57"><text:span text:style-name="T10">the </text:span><text:span text:style-name="T7">middle-ware layer</text:span><text:span text:style-name="T10">, which facilitates communication and </text:span><text:span text:style-name="T12">d</text:span><text:span text:style-name="T10">ata management between the hardware and applications. </text:span><text:span text:style-name="T12">The OS services is considered to be part of this layer</text:span></text:p>
        </text:list-item>
        <text:list-item>
          <text:p text:style-name="P58">the <text:span text:style-name="T6">application layer</text:span>, where the actual software applications run and perform specific tasks.</text:p>
        </text:list-item>
        <text:list-item>
          <text:p text:style-name="P59">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44" text:outline-level="2"><text:bookmark-start text:name="__RefHeading___Toc501_4128384672"/>The top level diagram<text:bookmark-end text:name="__RefHeading___Toc501_4128384672"/></text:h>
      <text:p text:style-name="P12">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2"><draw:frame draw:style-name="fr3" draw:name="Image2" text:anchor-type="char" svg:x="0.69mm" svg:y="-2.17mm" svg:width="170mm" svg:height="120.19mm" draw:z-index="10"><draw:image xlink:href="Pictures/10000000000004630000031A99FF82D0.jpg" xlink:type="simple" xlink:show="embed" xlink:actuate="onLoad" draw:mime-type="image/jpeg"/></draw:frame></text:p>
      <text:p text:style-name="P12">Most of the classes (stereotype &lt;&lt;class&gt;&gt;) will be instantiated during <text:span text:style-name="T21">initialization phase of </text:span>execution. </text:p>
      <text:p text:style-name="P91">The throttled_monitor is <text:span text:style-name="T24">globally </text:span>instantiated, a monitoring thread will be started, to check the condition of the raspberrypi. </text:p>
      <text:p text:style-name="P12">The global methods or functions are represented in the GLOBAL&amp;UTILS layer, as these functions are public, being:</text:p>
      <text:list text:style-name="L15">
        <text:list-item>
          <text:p text:style-name="P82">oradio_log.<text:span text:style-name="T13">xx</text:span>()</text:p>
        </text:list-item>
        <text:list-item>
          <text:p text:style-name="P82"><text:soft-page-break/>play_sound()</text:p>
        </text:list-item>
        <text:list-item>
          <text:p text:style-name="P82">subscribe<text:span text:style-name="T13">_commands(), subscribe_errors(), publish_command(),publish_error()</text:span></text:p>
        </text:list-item>
      </text:list>
      <text:h text:style-name="P45" text:outline-level="2"><text:bookmark-start text:name="__RefHeading___Toc503_4128384672"/>Messaging<text:bookmark-end text:name="__RefHeading___Toc503_4128384672"/></text:h>
      <text:p text:style-name="P13"><draw:frame draw:style-name="fr2" draw:name="Image3" text:anchor-type="char" svg:width="170mm" svg:height="120.19mm" draw:z-index="11"><draw:image xlink:href="Pictures/10000000000004630000031AB58075B7.jpg" xlink:type="simple" xlink:show="embed" xlink:actuate="onLoad" draw:mime-type="image/jpeg"/></draw:frame></text:p>
      <text:p text:style-name="P92"><text:span text:style-name="T21">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span></text:p>
      <text:p text:style-name="P26">The module has a public API to subscribe to a <text:s/>certain Topic or publish a <text:s/>message to a Topic. The defined Topics are:</text:p>
      <text:list text:style-name="L16">
        <text:list-item>
          <text:p text:style-name="P84">COMMAND: representing a command</text:p>
        </text:list-item>
        <text:list-item>
          <text:p text:style-name="P84">ERROR: representing an error code</text:p>
        </text:list-item>
      </text:list>
      <text:p text:style-name="P26">The public API provides following methods:</text:p>
      <text:list text:style-name="L17">
        <text:list-item>
          <text:p text:style-name="P85">subscribe_commands(): subscribe to Message Topic, returning a message queue to monitor for new commands</text:p>
        </text:list-item>
        <text:list-item>
          <text:p text:style-name="P85">publish_command(message: CommandMessage): <text:s/>publish a command to COMMAND Topic</text:p>
        </text:list-item>
        <text:list-item>
          <text:p text:style-name="P85"><text:soft-page-break/>subscribe_errors(): subscribe to Error Topic, returning a message queue to monitor for new errors </text:p>
        </text:list-item>
        <text:list-item>
          <text:p text:style-name="P85">publish_error(message: ErrorMessage): publish a command to ERROR Topic</text:p>
        </text:list-item>
      </text:list>
      <text:p text:style-name="P19"/>
      <text:p text:style-name="P14"/>
      <text:h text:style-name="P45" text:outline-level="2"><text:bookmark-start text:name="__RefHeading___Toc505_4128384672"/>Remote Monitoring Service<text:bookmark-end text:name="__RefHeading___Toc505_4128384672"/></text:h>
      <text:p text:style-name="P13"><draw:frame draw:style-name="fr1" draw:name="Image4" text:anchor-type="char" svg:width="170mm" svg:height="120.19mm" draw:z-index="12"><draw:image xlink:href="Pictures/10000000000004630000031AECAA9034.jpg" xlink:type="simple" xlink:show="embed" xlink:actuate="onLoad" draw:mime-type="image/jpeg"/></draw:frame></text:p>
      <text:p text:style-name="P26">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h text:style-name="P37" text:outline-level="1"><text:bookmark-start text:name="__RefHeading___Toc1840_1246683851"/>The Logical view: State diagrams<text:bookmark-end text:name="__RefHeading___Toc1840_1246683851"/></text:h>
      <text:p text:style-name="P7"/>
      <text:h text:style-name="P46" text:outline-level="2"><text:bookmark-start text:name="__RefHeading___Toc507_4128384672"/>Maincontrol state<text:bookmark-end text:name="__RefHeading___Toc507_4128384672"/></text:h>
      <text:p text:style-name="P24"><draw:frame draw:style-name="fr3" draw:name="Image7" text:anchor-type="char" svg:x="5.72mm" svg:y="1.01mm" svg:width="145.63mm" svg:height="205.95mm" draw:z-index="3"><draw:image xlink:href="Pictures/100000000000031A0000046386CA6A18.jpg" xlink:type="simple" xlink:show="embed" xlink:actuate="onLoad" draw:mime-type="image/jpeg"/></draw:frame><text:span text:style-name="T20">Description: <text:s/>xxxxxx</text:span><text:line-break/></text:p>
      <text:h text:style-name="P47" text:outline-level="2"><text:bookmark-start text:name="__RefHeading___Toc509_4128384672"/>Oradio Control States<text:bookmark-end text:name="__RefHeading___Toc509_4128384672"/></text:h>
      <text:p text:style-name="P18"><draw:frame draw:style-name="fr4" draw:name="Image8" text:anchor-type="char" svg:width="164.8mm" svg:height="234.05mm" draw:z-index="4"><draw:image xlink:href="Pictures/10000000000002F00000042C553EA593.jpg" xlink:type="simple" xlink:show="embed" xlink:actuate="onLoad" draw:mime-type="image/jpeg"/></draw:frame>Description:xxx</text:p>
      <text:h text:style-name="P37" text:outline-level="1"><text:bookmark-start text:name="__RefHeading___Toc1842_1246683851"/>The Physical view: Component diagrams<text:bookmark-end text:name="__RefHeading___Toc1842_1246683851"/></text:h>
      <text:p text:style-name="P7"/>
      <text:h text:style-name="P48" text:outline-level="2"><text:bookmark-start text:name="__RefHeading___Toc511_4128384672"/>OS Service<text:bookmark-end text:name="__RefHeading___Toc511_4128384672"/></text:h>
      <text:p text:style-name="P25"/>
      <text:p text:style-name="P25"><draw:frame draw:style-name="fr1" draw:name="Image11" text:anchor-type="char" svg:width="170mm" svg:height="88.16mm" draw:z-index="7"><draw:image xlink:href="Pictures/10000000000003FE000002123A1A8A8A.jpg" xlink:type="simple" xlink:show="embed" xlink:actuate="onLoad" draw:mime-type="image/jpeg"/></draw:frame></text:p>
      <text:h text:style-name="P51" text:outline-level="2"/>
      <text:h text:style-name="P52" text:outline-level="2"><text:bookmark-start text:name="__RefHeading___Toc513_4128384672"/><draw:frame draw:style-name="fr3" draw:name="Image6" text:anchor-type="char" svg:x="2.82mm" svg:y="17.94mm" svg:width="170.83mm" svg:height="120.77mm" draw:z-index="2"><draw:image xlink:href="Pictures/10000000000004630000031A3657996F.jpg" xlink:type="simple" xlink:show="embed" xlink:actuate="onLoad" draw:mime-type="image/jpeg"/></draw:frame><text:span text:style-name="T19">Messaging (Commands)</text:span><text:bookmark-end text:name="__RefHeading___Toc513_4128384672"/></text:h>
      <text:p text:style-name="P20"/>
      <text:p text:style-name="P27">The messaging component interfaces to subscribers are queues. Each subscribers gets an assigned Command queue upon the provided API:subscribe_commands(). The Command queue can be monitored by the subscriber to check for new commands.</text:p>
      <text:p text:style-name="P27">Commands can be published by publishers with the API:publish_commands(). The messaging component will distribute the published commands to all subscribers via their assigned queues.</text:p>
      <text:p text:style-name="P20"/>
      <text:h text:style-name="P53" text:outline-level="2"/>
      <text:h text:style-name="P54" text:outline-level="2"><text:bookmark-start text:name="__RefHeading___Toc515_4128384672"/>Music Players<text:bookmark-end text:name="__RefHeading___Toc515_4128384672"/></text:h>
      <text:p text:style-name="P24"/>
      <text:p text:style-name="P20"><draw:frame draw:style-name="fr3" draw:name="Image9" text:anchor-type="char" svg:x="0mm" svg:y="-0.48mm" svg:width="170mm" svg:height="120.19mm" draw:z-index="5"><draw:image xlink:href="Pictures/10000000000004630000031ABE1FC146.jpg" xlink:type="simple" xlink:show="embed" xlink:actuate="onLoad" draw:mime-type="image/jpeg"/></draw:frame></text:p>
      <text:h text:style-name="P50" text:outline-level="2"/>
      <text:h text:style-name="P49" text:outline-level="2"><text:bookmark-start text:name="__RefHeading___Toc517_4128384672"/>GPIO components<text:bookmark-end text:name="__RefHeading___Toc517_4128384672"/></text:h>
      <text:p text:style-name="P25"/>
      <text:p text:style-name="P25"><draw:frame draw:style-name="fr1" draw:name="Image10" text:anchor-type="char" svg:width="170mm" svg:height="135.59mm" draw:z-index="6"><draw:image xlink:href="Pictures/100000000000033E00000296E9FA0584.jpg" xlink:type="simple" xlink:show="embed" xlink:actuate="onLoad" draw:mime-type="image/jpeg"/></draw:frame></text:p>
      <text:h text:style-name="P35" text:outline-level="1"><text:bookmark-start text:name="__RefHeading___Toc1844_1246683851"/><text:s/><text:span text:style-name="T5">The Process view: Sequence diagrams</text:span><text:bookmark-end text:name="__RefHeading___Toc1844_1246683851"/></text:h>
      <text:p text:style-name="Text_20_body"/>
      <text:h text:style-name="P45" text:outline-level="2"><text:bookmark-start text:name="__RefHeading___Toc519_4128384672"/>Messaging <text:bookmark-end text:name="__RefHeading___Toc519_4128384672"/></text:h>
      <text:p text:style-name="P13"><draw:frame draw:style-name="fr2" draw:name="Image5" text:anchor-type="char" svg:width="170mm" svg:height="123.88mm" draw:z-index="1"><draw:image xlink:href="Pictures/100000000000042D0000030B87AECB35.jpg" xlink:type="simple" xlink:show="embed" xlink:actuate="onLoad" draw:mime-type="image/jpeg"/></draw:frame></text:p>
      <text:h text:style-name="P37" text:outline-level="1"><text:bookmark-start text:name="__RefHeading___Toc1846_1246683851"/>The scenario view: use case diagrams<text:bookmark-end text:name="__RefHeading___Toc1846_1246683851"/></text:h>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23T17:59:59.528076505</dc:date>
    <dc:creator>Henk</dc:creator>
    <meta:editing-duration>PT2H9M2S</meta:editing-duration>
    <meta:editing-cycles>19</meta:editing-cycles>
    <meta:document-statistic meta:table-count="1" meta:image-count="11" meta:object-count="0" meta:page-count="19" meta:paragraph-count="178" meta:word-count="1761" meta:character-count="11713" meta:non-whitespace-character-count="10203"/>
  </office:meta>
</office:document-meta>
</file>