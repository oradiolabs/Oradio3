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E00000296E9FA0584.jpg" manifest:media-type="image/jpeg"/>
  <manifest:file-entry manifest:full-path="Pictures/10000000000004630000031A3657996F.jpg" manifest:media-type="image/jpeg"/>
  <manifest:file-entry manifest:full-path="Pictures/100000000000031A0000046386CA6A18.jpg" manifest:media-type="image/jpeg"/>
  <manifest:file-entry manifest:full-path="Pictures/100000000000042D0000030B87AECB35.jpg" manifest:media-type="image/jpeg"/>
  <manifest:file-entry manifest:full-path="Pictures/1000000000000419000002CC5EEDE1C7.jpg" manifest:media-type="image/jpeg"/>
  <manifest:file-entry manifest:full-path="Pictures/10000000000002F00000042C553EA593.jpg" manifest:media-type="image/jpeg"/>
  <manifest:file-entry manifest:full-path="Pictures/1000000000000419000002CC49372789.jpg" manifest:media-type="image/jpeg"/>
  <manifest:file-entry manifest:full-path="Pictures/100000000000043B000002CC8FDBDCFC.jpg" manifest:media-type="image/jpeg"/>
  <manifest:file-entry manifest:full-path="Pictures/10000000000004630000031ABE1FC146.jpg" manifest:media-type="image/jpeg"/>
  <manifest:file-entry manifest:full-path="Pictures/10000000000003FE000002123A1A8A8A.jpg" manifest:media-type="image/jpeg"/>
  <manifest:file-entry manifest:full-path="Pictures/10000001000001F400000148DBB0C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Text_20_body">
      <style:text-properties officeooo:paragraph-rsid="001b9abe"/>
    </style:style>
    <style:style style:name="P12" style:family="paragraph" style:parent-style-name="Standard">
      <style:text-properties officeooo:paragraph-rsid="0019ce16"/>
    </style:style>
    <style:style style:name="P13" style:family="paragraph" style:parent-style-name="Text_20_body">
      <style:text-properties officeooo:rsid="001a2bcc" officeooo:paragraph-rsid="001a2bcc"/>
    </style:style>
    <style:style style:name="P14" style:family="paragraph" style:parent-style-name="Text_20_body">
      <style:text-properties officeooo:paragraph-rsid="001d94d5"/>
    </style:style>
    <style:style style:name="P15" style:family="paragraph" style:parent-style-name="Text_20_body">
      <style:paragraph-properties fo:break-before="page"/>
      <style:text-properties officeooo:paragraph-rsid="001d94d5"/>
    </style:style>
    <style:style style:name="P16" style:family="paragraph" style:parent-style-name="Contents_20_1">
      <style:paragraph-properties>
        <style:tab-stops>
          <style:tab-stop style:position="169.99mm" style:type="right" style:leader-style="dotted" style:leader-text="."/>
        </style:tab-stops>
      </style:paragraph-properties>
    </style:style>
    <style:style style:name="P17" style:family="paragraph" style:parent-style-name="Contents_20_2">
      <style:paragraph-properties>
        <style:tab-stops>
          <style:tab-stop style:position="164.99mm" style:type="right" style:leader-style="dotted" style:leader-text="."/>
        </style:tab-stops>
      </style:paragraph-properties>
    </style:style>
    <style:style style:name="P18" style:family="paragraph" style:parent-style-name="Heading_20_1" style:list-style-name="">
      <style:text-properties officeooo:rsid="00182ac6" officeooo:paragraph-rsid="00182ac6"/>
    </style:style>
    <style:style style:name="P19" style:family="paragraph" style:parent-style-name="Heading_20_1">
      <style:paragraph-properties fo:break-before="page"/>
      <style:text-properties officeooo:rsid="00182ac6" officeooo:paragraph-rsid="00182ac6"/>
    </style:style>
    <style:style style:name="P20" style:family="paragraph" style:parent-style-name="Heading_20_1">
      <style:paragraph-properties fo:break-before="page"/>
      <style:text-properties officeooo:rsid="001b9abe" officeooo:paragraph-rsid="001b9ab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e0fed" officeooo:paragraph-rsid="001e0fed"/>
    </style:style>
    <style:style style:name="P23" style:family="paragraph" style:parent-style-name="Heading_20_2">
      <style:text-properties officeooo:rsid="0014a285" officeooo:paragraph-rsid="0014a285"/>
    </style:style>
    <style:style style:name="P24" style:family="paragraph" style:parent-style-name="Heading_20_2">
      <style:text-properties officeooo:rsid="0015ecfc" officeooo:paragraph-rsid="0015ecfc"/>
    </style:style>
    <style:style style:name="P25" style:family="paragraph" style:parent-style-name="Heading_20_2">
      <style:text-properties officeooo:rsid="001b9abe" officeooo:paragraph-rsid="001b9abe"/>
    </style:style>
    <style:style style:name="P26" style:family="paragraph" style:parent-style-name="Heading_20_2">
      <style:text-properties officeooo:rsid="0019ce16" officeooo:paragraph-rsid="0019ce16"/>
    </style:style>
    <style:style style:name="P27" style:family="paragraph" style:parent-style-name="Heading_20_2">
      <style:text-properties officeooo:rsid="001d94d5" officeooo:paragraph-rsid="001d94d5"/>
    </style:style>
    <style:style style:name="P28" style:family="paragraph" style:parent-style-name="Heading_20_2">
      <style:text-properties officeooo:rsid="001e0fed" officeooo:paragraph-rsid="001e0fed"/>
    </style:style>
    <style:style style:name="P29" style:family="paragraph" style:parent-style-name="Heading_20_2">
      <style:text-properties officeooo:rsid="00215455" officeooo:paragraph-rsid="00215455"/>
    </style:style>
    <style:style style:name="P30" style:family="paragraph" style:parent-style-name="Heading_20_2">
      <style:paragraph-properties fo:break-before="page"/>
      <style:text-properties officeooo:rsid="00215455" officeooo:paragraph-rsid="00215455"/>
    </style:style>
    <style:style style:name="P31" style:family="paragraph" style:parent-style-name="Heading_20_2">
      <style:paragraph-properties fo:break-before="page"/>
      <style:text-properties officeooo:rsid="00230afb" officeooo:paragraph-rsid="00230afb"/>
    </style:style>
    <style:style style:name="P32" style:family="paragraph" style:parent-style-name="Heading_20_2" style:list-style-name="">
      <style:text-properties officeooo:rsid="00230afb" officeooo:paragraph-rsid="00230afb"/>
    </style:style>
    <style:style style:name="P33" style:family="paragraph" style:parent-style-name="Heading_20_2" style:list-style-name=""/>
    <style:style style:name="P34" style:family="paragraph" style:parent-style-name="Heading_20_2" style:list-style-name="">
      <style:text-properties officeooo:paragraph-rsid="00215455"/>
    </style:style>
    <style:style style:name="P35" style:family="paragraph" style:parent-style-name="Heading_20_2">
      <style:paragraph-properties fo:break-before="page"/>
      <style:text-properties officeooo:rsid="0024fd79" officeooo:paragraph-rsid="0024fd79"/>
    </style:style>
    <style:style style:name="P36" style:family="paragraph" style:parent-style-name="Heading_20_2">
      <style:text-properties officeooo:rsid="0024fd79" officeooo:paragraph-rsid="0024fd79"/>
    </style:style>
    <style:style style:name="P37" style:family="paragraph" style:parent-style-name="Heading_20_2">
      <style:paragraph-properties fo:break-before="page"/>
      <style:text-properties officeooo:paragraph-rsid="00215455"/>
    </style:style>
    <style:style style:name="P38" style:family="paragraph" style:parent-style-name="Standard" style:list-style-name="L3">
      <style:text-properties officeooo:rsid="0015ecfc" officeooo:paragraph-rsid="0015ecfc"/>
    </style:style>
    <style:style style:name="P39" style:family="paragraph" style:parent-style-name="Standard" style:list-style-name="L3">
      <style:text-properties officeooo:rsid="0017212d" officeooo:paragraph-rsid="0017212d"/>
    </style:style>
    <style:style style:name="P40" style:family="paragraph" style:parent-style-name="Standard" style:list-style-name="L9">
      <style:text-properties officeooo:paragraph-rsid="0019ce16"/>
    </style:style>
    <style:style style:name="P41" style:family="paragraph" style:parent-style-name="Standard" style:list-style-name="L9">
      <style:text-properties officeooo:rsid="0023488a" officeooo:paragraph-rsid="0019ce16"/>
    </style:style>
    <style:style style:name="P42" style:family="paragraph" style:parent-style-name="Standard" style:list-style-name="L9">
      <style:text-properties officeooo:rsid="0019ce16" officeooo:paragraph-rsid="0019ce16"/>
    </style:style>
    <style:style style:name="P43" style:family="paragraph" style:parent-style-name="Standard">
      <style:text-properties officeooo:rsid="00298340" officeooo:paragraph-rsid="00298340"/>
    </style:style>
    <style:style style:name="P44" style:family="paragraph" style:parent-style-name="Text_20_body" style:list-style-name="L1">
      <style:text-properties officeooo:rsid="0015ecfc" officeooo:paragraph-rsid="0015ecfc"/>
    </style:style>
    <style:style style:name="P45" style:family="paragraph" style:parent-style-name="Text_20_body" style:list-style-name="L2">
      <style:text-properties officeooo:rsid="0015ecfc" officeooo:paragraph-rsid="0015ecfc"/>
    </style:style>
    <style:style style:name="P46" style:family="paragraph" style:parent-style-name="Text_20_body" style:list-style-name="L4">
      <style:text-properties officeooo:rsid="0015ecfc" officeooo:paragraph-rsid="0015ecfc"/>
    </style:style>
    <style:style style:name="P47" style:family="paragraph" style:parent-style-name="Text_20_body" style:list-style-name="L2">
      <style:text-properties officeooo:rsid="0017212d" officeooo:paragraph-rsid="0017212d"/>
    </style:style>
    <style:style style:name="P48" style:family="paragraph" style:parent-style-name="Text_20_body" style:list-style-name="L5">
      <style:text-properties officeooo:paragraph-rsid="001b9abe"/>
    </style:style>
    <style:style style:name="P49" style:family="paragraph" style:parent-style-name="Text_20_body" style:list-style-name="L5">
      <style:text-properties officeooo:rsid="001b9abe" officeooo:paragraph-rsid="001b9abe"/>
    </style:style>
    <style:style style:name="P50" style:family="paragraph" style:parent-style-name="Text_20_body" style:list-style-name="L5">
      <style:text-properties officeooo:rsid="001bb325" officeooo:paragraph-rsid="001bb325"/>
    </style:style>
    <style:style style:name="P51" style:family="paragraph" style:parent-style-name="Text_20_body" style:list-style-name="L6">
      <style:text-properties officeooo:paragraph-rsid="001bb325"/>
    </style:style>
    <style:style style:name="P52" style:family="paragraph" style:parent-style-name="Text_20_body" style:list-style-name="L6">
      <style:text-properties officeooo:paragraph-rsid="001bc545"/>
    </style:style>
    <style:style style:name="P53" style:family="paragraph" style:parent-style-name="Text_20_body">
      <style:text-properties officeooo:rsid="001bc545" officeooo:paragraph-rsid="001bc545"/>
    </style:style>
    <style:style style:name="P54" style:family="paragraph" style:parent-style-name="Text_20_body" style:list-style-name="L12">
      <style:text-properties officeooo:rsid="001bc545" officeooo:paragraph-rsid="00213708"/>
    </style:style>
    <style:style style:name="P55" style:family="paragraph" style:parent-style-name="Text_20_body">
      <style:text-properties officeooo:rsid="001c13ba" officeooo:paragraph-rsid="001c13ba"/>
    </style:style>
    <style:style style:name="P56" style:family="paragraph" style:parent-style-name="Text_20_body" style:list-style-name="L12">
      <style:text-properties officeooo:rsid="001c13ba" officeooo:paragraph-rsid="00213708"/>
    </style:style>
    <style:style style:name="P57" style:family="paragraph" style:parent-style-name="Text_20_body" style:list-style-name="L10">
      <style:text-properties officeooo:rsid="001a2bcc" officeooo:paragraph-rsid="001a2bcc"/>
    </style:style>
    <style:style style:name="P58" style:family="paragraph" style:parent-style-name="Text_20_body">
      <style:text-properties officeooo:rsid="001e0fed" officeooo:paragraph-rsid="001e0fed"/>
    </style:style>
    <style:style style:name="P59" style:family="paragraph" style:parent-style-name="Text_20_body" style:list-style-name="L11">
      <style:text-properties officeooo:rsid="001e0fed" officeooo:paragraph-rsid="001e0fed"/>
    </style:style>
    <style:style style:name="P60" style:family="paragraph" style:parent-style-name="Text_20_body" style:list-style-name="L12">
      <style:text-properties officeooo:rsid="001e0fed" officeooo:paragraph-rsid="001e0fed"/>
    </style:style>
    <style:style style:name="P61" style:family="paragraph" style:parent-style-name="Text_20_body">
      <style:text-properties officeooo:paragraph-rsid="001e0fed"/>
    </style:style>
    <style:style style:name="P62" style:family="paragraph" style:parent-style-name="Text_20_body" style:list-style-name="L11">
      <style:text-properties officeooo:paragraph-rsid="001e0fed"/>
    </style:style>
    <style:style style:name="P63" style:family="paragraph" style:parent-style-name="Text_20_body" style:list-style-name="L12">
      <style:text-properties officeooo:paragraph-rsid="00213708"/>
    </style:style>
    <style:style style:name="P64" style:family="paragraph" style:parent-style-name="Text_20_body" style:list-style-name="L12">
      <style:text-properties officeooo:rsid="001fbf41" officeooo:paragraph-rsid="001fbf41"/>
    </style:style>
    <style:style style:name="P65" style:family="paragraph" style:parent-style-name="Text_20_body" style:list-style-name="L13">
      <style:text-properties officeooo:rsid="001fbf41" officeooo:paragraph-rsid="001fbf41"/>
    </style:style>
    <style:style style:name="P66" style:family="paragraph" style:parent-style-name="Text_20_body" style:list-style-name="L15">
      <style:text-properties officeooo:rsid="001fbf41" officeooo:paragraph-rsid="001fbf41"/>
    </style:style>
    <style:style style:name="P67" style:family="paragraph" style:parent-style-name="Text_20_body" style:list-style-name="L14">
      <style:text-properties officeooo:rsid="001fbf41" officeooo:paragraph-rsid="001fbf41"/>
    </style:style>
    <style:style style:name="P68" style:family="paragraph" style:parent-style-name="Text_20_body" style:list-style-name="L16">
      <style:text-properties officeooo:rsid="001fbf41" officeooo:paragraph-rsid="001fbf41"/>
    </style:style>
    <style:style style:name="P69" style:family="paragraph" style:parent-style-name="Text_20_body">
      <style:text-properties officeooo:paragraph-rsid="00215455"/>
    </style:style>
    <style:style style:name="P70" style:family="paragraph" style:parent-style-name="Text_20_body">
      <style:text-properties officeooo:rsid="00230afb" officeooo:paragraph-rsid="00230afb"/>
    </style:style>
    <style:style style:name="P71" style:family="paragraph" style:parent-style-name="Text_20_body">
      <style:text-properties officeooo:rsid="00230afb" officeooo:paragraph-rsid="00262f68"/>
    </style:style>
    <style:style style:name="P72" style:family="paragraph" style:parent-style-name="Text_20_body">
      <style:text-properties officeooo:paragraph-rsid="001d94d5"/>
    </style:style>
    <style:style style:name="P73" style:family="paragraph" style:parent-style-name="Text_20_body">
      <style:text-properties officeooo:paragraph-rsid="00230afb"/>
    </style:style>
    <style:style style:name="P74" style:family="paragraph" style:parent-style-name="Text_20_body">
      <style:text-properties officeooo:paragraph-rsid="0024fd79"/>
    </style:style>
    <style:style style:name="P75" style:family="paragraph" style:parent-style-name="Text_20_body">
      <style:text-properties officeooo:rsid="00262f68" officeooo:paragraph-rsid="00262f68"/>
    </style:style>
    <style:style style:name="P76" style:family="paragraph" style:parent-style-name="Text_20_body">
      <style:text-properties officeooo:rsid="0027c5d5" officeooo:paragraph-rsid="0027c5d5"/>
    </style:style>
    <style:style style:name="P77" style:family="paragraph" style:parent-style-name="Text_20_body" style:list-style-name="L17">
      <style:text-properties officeooo:rsid="0027c5d5" officeooo:paragraph-rsid="0027c5d5"/>
    </style:style>
    <style:style style:name="P78" style:family="paragraph" style:parent-style-name="Text_20_body" style:list-style-name="L18">
      <style:text-properties officeooo:rsid="0027c5d5" officeooo:paragraph-rsid="0027c5d5"/>
    </style:style>
    <style:style style:name="P79" style:family="paragraph" style:parent-style-name="Text_20_body">
      <style:text-properties officeooo:rsid="00296dd1" officeooo:paragraph-rsid="00296dd1"/>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officeooo:rsid="0023488a"/>
    </style:style>
    <style:style style:name="T10" style:family="text">
      <style:text-properties officeooo:rsid="002cdcb6"/>
    </style:style>
    <style:style style:name="T11" style:family="text">
      <style:text-properties officeooo:rsid="0023832c"/>
    </style:style>
    <style:style style:name="T12" style:family="text">
      <style:text-properties officeooo:rsid="001b9abe"/>
    </style:style>
    <style:style style:name="T13" style:family="text">
      <style:text-properties officeooo:rsid="001bb325"/>
    </style:style>
    <style:style style:name="T14" style:family="text">
      <style:text-properties officeooo:rsid="001bc545"/>
    </style:style>
    <style:style style:name="T15" style:family="text">
      <style:text-properties officeooo:rsid="001c13ba"/>
    </style:style>
    <style:style style:name="T16" style:family="text">
      <style:text-properties officeooo:rsid="001e0fed"/>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6"><text:a xlink:type="simple" xlink:href="#__RefHeading___Toc1826_1246683851" text:style-name="Index_20_Link" text:visited-style-name="Index_20_Link">1 Architectural view model<text:tab/>2</text:a></text:p>
          <text:p text:style-name="P17"><text:a xlink:type="simple" xlink:href="#__RefHeading___Toc1828_1246683851" text:style-name="Index_20_Link" text:visited-style-name="Index_20_Link">1.1 The logical view<text:tab/>2</text:a></text:p>
          <text:p text:style-name="P17"><text:a xlink:type="simple" xlink:href="#__RefHeading___Toc1830_1246683851" text:style-name="Index_20_Link" text:visited-style-name="Index_20_Link">1.2 The Physical view<text:tab/>2</text:a></text:p>
          <text:p text:style-name="P17"><text:a xlink:type="simple" xlink:href="#__RefHeading___Toc1832_1246683851" text:style-name="Index_20_Link" text:visited-style-name="Index_20_Link">1.3 The Development view<text:tab/>3</text:a></text:p>
          <text:p text:style-name="P17"><text:a xlink:type="simple" xlink:href="#__RefHeading___Toc1834_1246683851" text:style-name="Index_20_Link" text:visited-style-name="Index_20_Link">1.4 The Process view<text:tab/>3</text:a></text:p>
          <text:p text:style-name="P17"><text:a xlink:type="simple" xlink:href="#__RefHeading___Toc1836_1246683851" text:style-name="Index_20_Link" text:visited-style-name="Index_20_Link">1.5 The Scenarios (or use case view)<text:tab/>3</text:a></text:p>
          <text:p text:style-name="P16"><text:a xlink:type="simple" xlink:href="#__RefHeading___Toc481_4128384672" text:style-name="Index_20_Link" text:visited-style-name="Index_20_Link">2 Architectural guidelines<text:tab/>4</text:a></text:p>
          <text:p text:style-name="P17"><text:a xlink:type="simple" xlink:href="#__RefHeading___Toc483_4128384672" text:style-name="Index_20_Link" text:visited-style-name="Index_20_Link">2.1 Loosely coupled architecture<text:tab/>4</text:a></text:p>
          <text:p text:style-name="P17"><text:a xlink:type="simple" xlink:href="#__RefHeading___Toc485_4128384672" text:style-name="Index_20_Link" text:visited-style-name="Index_20_Link">2.2 Asynchronous component communication<text:tab/>4</text:a></text:p>
          <text:p text:style-name="P16"><text:a xlink:type="simple" xlink:href="#__RefHeading___Toc487_4128384672" text:style-name="Index_20_Link" text:visited-style-name="Index_20_Link">3 The Deployment view<text:tab/>5</text:a></text:p>
          <text:p text:style-name="P17"><text:a xlink:type="simple" xlink:href="#__RefHeading___Toc489_4128384672" text:style-name="Index_20_Link" text:visited-style-name="Index_20_Link">3.1 Software artifacts<text:tab/>5</text:a></text:p>
          <text:p text:style-name="P17"><text:a xlink:type="simple" xlink:href="#__RefHeading___Toc491_4128384672" text:style-name="Index_20_Link" text:visited-style-name="Index_20_Link">3.2 Target environment<text:tab/>5</text:a></text:p>
          <text:p text:style-name="P17"><text:a xlink:type="simple" xlink:href="#__RefHeading___Toc493_4128384672" text:style-name="Index_20_Link" text:visited-style-name="Index_20_Link">3.3 Software installation<text:tab/>5</text:a></text:p>
          <text:p text:style-name="P17"><text:a xlink:type="simple" xlink:href="#__RefHeading___Toc495_4128384672" text:style-name="Index_20_Link" text:visited-style-name="Index_20_Link">3.4 Runtime<text:tab/>5</text:a></text:p>
          <text:p text:style-name="P17"><text:a xlink:type="simple" xlink:href="#__RefHeading___Toc497_4128384672" text:style-name="Index_20_Link" text:visited-style-name="Index_20_Link">3.5 Configuration<text:tab/>6</text:a></text:p>
          <text:p text:style-name="P17"><text:a xlink:type="simple" xlink:href="#__RefHeading___Toc499_4128384672" text:style-name="Index_20_Link" text:visited-style-name="Index_20_Link">3.6 System services<text:tab/>6</text:a></text:p>
          <text:p text:style-name="P16"><text:a xlink:type="simple" xlink:href="#__RefHeading___Toc1838_1246683851" text:style-name="Index_20_Link" text:visited-style-name="Index_20_Link">4 The Logical view: Class diagrams<text:tab/>7</text:a></text:p>
          <text:p text:style-name="P17"><text:a xlink:type="simple" xlink:href="#__RefHeading___Toc501_4128384672" text:style-name="Index_20_Link" text:visited-style-name="Index_20_Link">4.1 The top level diagram<text:tab/>7</text:a></text:p>
          <text:p text:style-name="P17"><text:a xlink:type="simple" xlink:href="#__RefHeading___Toc503_4128384672" text:style-name="Index_20_Link" text:visited-style-name="Index_20_Link">4.2 Messaging<text:tab/>8</text:a></text:p>
          <text:p text:style-name="P17"><text:a xlink:type="simple" xlink:href="#__RefHeading___Toc505_4128384672" text:style-name="Index_20_Link" text:visited-style-name="Index_20_Link">4.3 Remote Monitoring Service<text:tab/>10</text:a></text:p>
          <text:p text:style-name="P16"><text:a xlink:type="simple" xlink:href="#__RefHeading___Toc1840_1246683851" text:style-name="Index_20_Link" text:visited-style-name="Index_20_Link">5 The Logical view: State diagrams<text:tab/>11</text:a></text:p>
          <text:p text:style-name="P17"><text:a xlink:type="simple" xlink:href="#__RefHeading___Toc507_4128384672" text:style-name="Index_20_Link" text:visited-style-name="Index_20_Link">5.1 Maincontrol state<text:tab/>11</text:a></text:p>
          <text:p text:style-name="P17"><text:a xlink:type="simple" xlink:href="#__RefHeading___Toc509_4128384672" text:style-name="Index_20_Link" text:visited-style-name="Index_20_Link">5.2 Oradio Control States<text:tab/>12</text:a></text:p>
          <text:p text:style-name="P16"><text:a xlink:type="simple" xlink:href="#__RefHeading___Toc1842_1246683851" text:style-name="Index_20_Link" text:visited-style-name="Index_20_Link">6 The Physical view: Component diagrams<text:tab/>13</text:a></text:p>
          <text:p text:style-name="P17"><text:a xlink:type="simple" xlink:href="#__RefHeading___Toc511_4128384672" text:style-name="Index_20_Link" text:visited-style-name="Index_20_Link">6.1 OS Service<text:tab/>13</text:a></text:p>
          <text:p text:style-name="P17"><text:a xlink:type="simple" xlink:href="#__RefHeading___Toc513_4128384672" text:style-name="Index_20_Link" text:visited-style-name="Index_20_Link">6.2 Messaging (Commands)<text:tab/>14</text:a></text:p>
          <text:p text:style-name="P17"><text:a xlink:type="simple" xlink:href="#__RefHeading___Toc515_4128384672" text:style-name="Index_20_Link" text:visited-style-name="Index_20_Link">6.3 Music Players<text:tab/>15</text:a></text:p>
          <text:p text:style-name="P17"><text:a xlink:type="simple" xlink:href="#__RefHeading___Toc517_4128384672" text:style-name="Index_20_Link" text:visited-style-name="Index_20_Link">6.4 GPIO components<text:tab/>16</text:a></text:p>
          <text:p text:style-name="P16"><text:a xlink:type="simple" xlink:href="#__RefHeading___Toc1844_1246683851" text:style-name="Index_20_Link" text:visited-style-name="Index_20_Link">7 <text:s/>The Process view: Sequence diagrams<text:tab/>17</text:a></text:p>
          <text:p text:style-name="P17"><text:a xlink:type="simple" xlink:href="#__RefHeading___Toc519_4128384672" text:style-name="Index_20_Link" text:visited-style-name="Index_20_Link">7.1 Messaging<text:tab/>17</text:a></text:p>
          <text:p text:style-name="P16"><text:a xlink:type="simple" xlink:href="#__RefHeading___Toc1846_1246683851" text:style-name="Index_20_Link" text:visited-style-name="Index_20_Link">8 The scenario view: use case diagrams<text:tab/>18</text:a></text:p>
        </text:index-body>
      </text:table-of-content>
      <text:p text:style-name="Standard"/>
      <text:p text:style-name="Standard"/>
      <text:p text:style-name="Standard"/>
      <text:h text:style-name="P21"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43"><draw:frame draw:style-name="fr2" draw:name="Image1" text:anchor-type="char" svg:x="2.38mm" svg:y="-1.85mm" svg:width="132.29mm" svg:height="86.78mm" draw:z-index="0"><draw:image xlink:href="Pictures/10000001000001F400000148DBB0C7BA.png" xlink:type="simple" xlink:show="embed" xlink:actuate="onLoad" draw:mime-type="image/png"/></draw:frame>llibre</text:p>
      <text:h text:style-name="P23"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44">Class diagrams</text:p>
        </text:list-item>
        <text:list-item>
          <text:p text:style-name="P44">Component diagram</text:p>
        </text:list-item>
      </text:list>
      <text:h text:style-name="P23"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45">Class diagrams</text:p>
        </text:list-item>
        <text:list-item>
          <text:p text:style-name="P45">State diagrams</text:p>
        </text:list-item>
        <text:list-item>
          <text:p text:style-name="P47">Component diagrams</text:p>
        </text:list-item>
      </text:list>
      <text:h text:style-name="P23"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23"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38">Sequence diagrams, </text:p>
        </text:list-item>
        <text:list-item>
          <text:p text:style-name="P38">Activity diagrams</text:p>
        </text:list-item>
        <text:list-item>
          <text:p text:style-name="P39">State diagrams</text:p>
        </text:list-item>
      </text:list>
      <text:h text:style-name="P24"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46">Use Case diagram</text:p>
        </text:list-item>
      </text:list>
      <text:p text:style-name="P5"/>
      <text:h text:style-name="P18" text:outline-level="1"/>
      <text:h text:style-name="P20"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49">Changes made to one component have minimal impact on others, which enhances the overall resilience of the system</text:p>
        </text:list-item>
        <text:list-item>
          <text:p text:style-name="P48">Each component has little or no knowledge of the internal workings of other components.</text:p>
        </text:list-item>
        <text:list-item>
          <text:p text:style-name="P48">Systems can scale more easily as components can be modified or replaced independently.</text:p>
        </text:list-item>
        <text:list-item>
          <text:p text:style-name="P50">Each component can be developed, deployed, tested and maintained independently</text:p>
        </text:list-item>
      </text:list>
      <text:h text:style-name="P25" text:outline-level="2"><text:bookmark-start text:name="__RefHeading___Toc485_4128384672"/>Asynchronous component communication<text:bookmark-end text:name="__RefHeading___Toc485_4128384672"/></text:h>
      <text:p text:style-name="P11">A loosely coupled architecture using a queue allows different components of a system to communicate asynchronously, meaning they can operate independently without being directly connected. </text:p>
      <text:p text:style-name="P9">Key characteristics:</text:p>
      <text:list text:style-name="L6">
        <text:list-item>
          <text:p text:style-name="P51"><text:span text:style-name="T14">Independence:</text:span> Producers and consumers don’t need to know about each other. They only interact with the queue, reducing direct dependencies.</text:p>
        </text:list-item>
        <text:list-item>
          <text:p text:style-name="P51"><text:span text:style-name="T13">Failure isolation: </text:span>If one component fails, the queue allows other components to continue functioning. This isolation minimizes the impact of failures on the overall system.</text:p>
        </text:list-item>
        <text:list-item>
          <text:p text:style-name="P51">Asynchronous Communication: Components can communicate without waiting for each other to respond, which reduces downtime and improves responsiveness.</text:p>
        </text:list-item>
        <text:list-item>
          <text:p text:style-name="P52"><text:span text:style-name="T14">Buffering: They act as buffers that store messages until the receiving service is ready to process them. This helps manage varying loads and prevents service overload</text:span></text:p>
        </text:list-item>
      </text:list>
      <text:p text:style-name="P53"/>
      <text:p text:style-name="P55"/>
      <text:h text:style-name="P22" text:outline-level="1"><text:bookmark-start text:name="__RefHeading___Toc487_4128384672"/>The Deployment view<text:bookmark-end text:name="__RefHeading___Toc487_4128384672"/></text:h>
      <text:h text:style-name="P28" text:outline-level="2"><text:bookmark-start text:name="__RefHeading___Toc489_4128384672"/>Software <text:span text:style-name="T17">artifacts</text:span><text:bookmark-end text:name="__RefHeading___Toc489_4128384672"/></text:h>
      <text:list text:style-name="L11">
        <text:list-item>
          <text:p text:style-name="P62"><text:span text:style-name="T16">Folder structure</text:span></text:p>
        </text:list-item>
        <text:list-item>
          <text:p text:style-name="P59">Github</text:p>
        </text:list-item>
        <text:list-item>
          <text:p text:style-name="P59">Music sources</text:p>
        </text:list-item>
        <text:list-item>
          <text:p text:style-name="P59"/>
        </text:list-item>
      </text:list>
      <text:p text:style-name="P61"/>
      <text:h text:style-name="P28" text:outline-level="2"><text:bookmark-start text:name="__RefHeading___Toc491_4128384672"/>Target environment<text:bookmark-end text:name="__RefHeading___Toc491_4128384672"/></text:h>
      <text:list text:style-name="L12">
        <text:list-item>
          <text:p text:style-name="P54">The RaspberryPi-3B <text:span text:style-name="T18">headless </text:span>module will be used as central control unit, providing hardware for:</text:p>
          <text:list>
            <text:list-item>
              <text:p text:style-name="P54">Connectivity: WiFi, Bluetooth, Ethernet, USB</text:p>
            </text:list-item>
            <text:list-item>
              <text:p text:style-name="P54">Input/Output pinning <text:span text:style-name="T15">(GPIO)</text:span>: for user interface, as buttons and led indications</text:p>
            </text:list-item>
            <text:list-item>
              <text:p text:style-name="P63"><text:span text:style-name="T15">RaspiOS: </text:span>Raspberry Pi OS <text:span text:style-name="T15">(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item>
              <text:p text:style-name="P64">Extension interface at GPIO for Audio Playback (DigiAmp), touch buttons, volume knob and led drivers.</text:p>
            </text:list-item>
          </text:list>
        </text:list-item>
        <text:list-item>
          <text:p text:style-name="P60">Raspberry Pi OS: latest version, after being tested by developers</text:p>
        </text:list-item>
        <text:list-item>
          <text:p text:style-name="P56">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58"/>
      <text:h text:style-name="P28" text:outline-level="2"><text:bookmark-start text:name="__RefHeading___Toc493_4128384672"/>Software installation<text:bookmark-end text:name="__RefHeading___Toc493_4128384672"/></text:h>
      <text:list text:style-name="L13">
        <text:list-item>
          <text:p text:style-name="P65">Development: Install script</text:p>
        </text:list-item>
        <text:list-item>
          <text:p text:style-name="P65">production: Image copy</text:p>
        </text:list-item>
      </text:list>
      <text:h text:style-name="P28" text:outline-level="2"><text:bookmark-start text:name="__RefHeading___Toc495_4128384672"/>Runtime <text:bookmark-end text:name="__RefHeading___Toc495_4128384672"/></text:h>
      <text:list text:style-name="L14">
        <text:list-item>
          <text:p text:style-name="P67">runs on boot</text:p>
        </text:list-item>
        <text:list-item>
          <text:p text:style-name="P67">logging</text:p>
        </text:list-item>
        <text:list-item>
          <text:p text:style-name="P67">handling errors</text:p>
        </text:list-item>
      </text:list>
      <text:h text:style-name="P28" text:outline-level="2"><text:bookmark-start text:name="__RefHeading___Toc497_4128384672"/><text:soft-page-break/>Configuration<text:bookmark-end text:name="__RefHeading___Toc497_4128384672"/></text:h>
      <text:list text:style-name="L15">
        <text:list-item>
          <text:p text:style-name="P66">Configuration items: </text:p>
          <text:list>
            <text:list-item>
              <text:p text:style-name="P66">config.txt, </text:p>
            </text:list-item>
            <text:list-item>
              <text:p text:style-name="P66">asound.conf, </text:p>
            </text:list-item>
            <text:list-item>
              <text:p text:style-name="P66">mpd.conf,</text:p>
            </text:list-item>
            <text:list-item>
              <text:p text:style-name="P66">logrotate.conf</text:p>
            </text:list-item>
          </text:list>
        </text:list-item>
        <text:list-item>
          <text:p text:style-name="P66">??</text:p>
        </text:list-item>
      </text:list>
      <text:h text:style-name="P28" text:outline-level="2"><text:bookmark-start text:name="__RefHeading___Toc499_4128384672"/>System services<text:bookmark-end text:name="__RefHeading___Toc499_4128384672"/></text:h>
      <text:list text:style-name="L16">
        <text:list-item>
          <text:p text:style-name="P68">systemd services:</text:p>
          <text:list>
            <text:list-item>
              <text:p text:style-name="P68">librespot.service</text:p>
            </text:list-item>
            <text:list-item>
              <text:p text:style-name="P68">mpd.service</text:p>
            </text:list-item>
            <text:list-item>
              <text:p text:style-name="P68">oradio.service</text:p>
            </text:list-item>
            <text:list-item>
              <text:p text:style-name="P68">usb_low_idle_power_service</text:p>
            </text:list-item>
          </text:list>
        </text:list-item>
        <text:list-item>
          <text:p text:style-name="P68">Dynamic device management: Udev rules for USB devices</text:p>
        </text:list-item>
        <text:list-item>
          <text:p text:style-name="P68"/>
        </text:list-item>
      </text:list>
      <text:h text:style-name="P19" text:outline-level="1"><text:bookmark-start text:name="__RefHeading___Toc1838_1246683851"/>The Logical view: Class diagrams<text:bookmark-end text:name="__RefHeading___Toc1838_1246683851"/></text:h>
      <text:p text:style-name="P12"><text:span text:style-name="T9">The </text:span><text:span text:style-name="T10">Oradio3 </text:span><text:span text:style-name="T9">software layering typically consists of three main layers: </text:span></text:p>
      <text:list text:style-name="L9">
        <text:list-item>
          <text:p text:style-name="P40"><text:span text:style-name="T9">the </text:span><text:span text:style-name="T7">hardware </text:span><text:span text:style-name="T8">abstraction </text:span><text:span text:style-name="T7">layer </text:span><text:span text:style-name="T11">(HAL)</text:span><text:span text:style-name="T9">, which includes the physical components.</text:span></text:p>
        </text:list-item>
        <text:list-item>
          <text:p text:style-name="P40"><text:span text:style-name="T9">the </text:span><text:span text:style-name="T7">middle-ware layer</text:span><text:span text:style-name="T9">, which facilitates communication and </text:span><text:span text:style-name="T11">d</text:span><text:span text:style-name="T9">ata management between the hardware and applications. </text:span><text:span text:style-name="T11">The OS services is considered to be part of this layer</text:span></text:p>
        </text:list-item>
        <text:list-item>
          <text:p text:style-name="P41">the <text:span text:style-name="T6">application layer</text:span>, where the actual software applications run and perform specific tasks.</text:p>
        </text:list-item>
        <text:list-item>
          <text:p text:style-name="P42">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26" text:outline-level="2"><text:bookmark-start text:name="__RefHeading___Toc501_4128384672"/>The top level diagram<text:bookmark-end text:name="__RefHeading___Toc501_4128384672"/></text:h>
      <text:p text:style-name="P13">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3"><draw:frame draw:style-name="fr2" draw:name="Image2" text:anchor-type="char" svg:x="1.18mm" svg:y="-0.32mm" svg:width="170mm" svg:height="112.38mm" draw:z-index="1"><draw:image xlink:href="Pictures/100000000000043B000002CC8FDBDCFC.jpg" xlink:type="simple" xlink:show="embed" xlink:actuate="onLoad" draw:mime-type="image/jpeg"/></draw:frame>Most of the classes (stereotype &lt;&lt;class&gt;&gt;) will be instantiated during <text:span text:style-name="T21">initialization phase of </text:span>execution. </text:p>
      <text:p text:style-name="P13">The throttled_monitor is not instantiated, but a monitoring thread will be started, to check the condition of the raspberrypi. </text:p>
      <text:p text:style-name="P13">The global methods or functions are represented in the GLOBAL&amp;UTILS layer, as these functions are public, being:</text:p>
      <text:list text:style-name="L10">
        <text:list-item>
          <text:p text:style-name="P57">oradio_log.<text:span text:style-name="T12">xx</text:span>()</text:p>
        </text:list-item>
        <text:list-item>
          <text:p text:style-name="P57">play_sound()</text:p>
        </text:list-item>
        <text:list-item>
          <text:p text:style-name="P57"><text:soft-page-break/>subscribe<text:span text:style-name="T12">_commands(), subscribe_errors(), publish_command(),publish_error()</text:span></text:p>
        </text:list-item>
      </text:list>
      <text:h text:style-name="P27" text:outline-level="2"><text:bookmark-start text:name="__RefHeading___Toc503_4128384672"/>Messaging<text:bookmark-end text:name="__RefHeading___Toc503_4128384672"/></text:h>
      <text:p text:style-name="P14"/>
      <text:p text:style-name="P14"><draw:frame draw:style-name="fr2" draw:name="Image3" text:anchor-type="char" svg:x="0mm" svg:y="-2.4mm" svg:width="170mm" svg:height="116.03mm" draw:z-index="2"><draw:image xlink:href="Pictures/1000000000000419000002CC49372789.jpg" xlink:type="simple" xlink:show="embed" xlink:actuate="onLoad" draw:mime-type="image/jpeg"/></draw:frame></text:p>
      <text:p text:style-name="P75">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p>
      <text:p text:style-name="P76">The module has a public API to subscribe to a <text:s/>certain Topic or publish a <text:s/>message to a Topic. The defined Topics are:</text:p>
      <text:list text:style-name="L17">
        <text:list-item>
          <text:p text:style-name="P77">COMMAND: representing a command</text:p>
        </text:list-item>
        <text:list-item>
          <text:p text:style-name="P77">ERROR: representing an error code</text:p>
        </text:list-item>
      </text:list>
      <text:p text:style-name="P76">The public API provides following methods:</text:p>
      <text:list text:style-name="L18">
        <text:list-item>
          <text:p text:style-name="P78">subscribe_commands(): subscribe to Message Topic, returning a message queue to monitor for new commands</text:p>
        </text:list-item>
        <text:list-item>
          <text:p text:style-name="P78">publish_command(message: CommandMessage): <text:s/>publish a command to COMMAND Topic</text:p>
        </text:list-item>
        <text:list-item>
          <text:p text:style-name="P78">subscribe_errors(): subscribe to Error Topic, returning a message queue to monitor for new errors </text:p>
        </text:list-item>
        <text:list-item>
          <text:p text:style-name="P78"><text:soft-page-break/>publish_error(message: ErrorMessage): publish a command to ERROR Topic</text:p>
        </text:list-item>
      </text:list>
      <text:p text:style-name="P71"/>
      <text:p text:style-name="P15"/>
      <text:h text:style-name="P27" text:outline-level="2"><text:bookmark-start text:name="__RefHeading___Toc505_4128384672"/>Remote Monitoring Service<text:bookmark-end text:name="__RefHeading___Toc505_4128384672"/></text:h>
      <text:p text:style-name="P14"><draw:frame draw:style-name="fr2" draw:name="Image4" text:anchor-type="char" svg:x="-3.81mm" svg:y="2.77mm" svg:width="175.7mm" svg:height="119.91mm" draw:z-index="3"><draw:image xlink:href="Pictures/1000000000000419000002CC5EEDE1C7.jpg" xlink:type="simple" xlink:show="embed" xlink:actuate="onLoad" draw:mime-type="image/jpeg"/></draw:frame></text:p>
      <text:p text:style-name="P76">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h text:style-name="P19" text:outline-level="1"><text:bookmark-start text:name="__RefHeading___Toc1840_1246683851"/>The Logical view: State diagrams<text:bookmark-end text:name="__RefHeading___Toc1840_1246683851"/></text:h>
      <text:p text:style-name="P7"/>
      <text:h text:style-name="P29" text:outline-level="2"><text:bookmark-start text:name="__RefHeading___Toc507_4128384672"/>Maincontrol state<text:bookmark-end text:name="__RefHeading___Toc507_4128384672"/></text:h>
      <text:p text:style-name="P73"><draw:frame draw:style-name="fr2" draw:name="Image7" text:anchor-type="char" svg:x="5.72mm" svg:y="1.01mm" svg:width="145.63mm" svg:height="205.95mm" draw:z-index="6"><draw:image xlink:href="Pictures/100000000000031A0000046386CA6A18.jpg" xlink:type="simple" xlink:show="embed" xlink:actuate="onLoad" draw:mime-type="image/jpeg"/></draw:frame><text:span text:style-name="T20">Description: <text:s/>xxxxxx</text:span><text:line-break/></text:p>
      <text:h text:style-name="P30" text:outline-level="2"><text:bookmark-start text:name="__RefHeading___Toc509_4128384672"/>Oradio Control States<text:bookmark-end text:name="__RefHeading___Toc509_4128384672"/></text:h>
      <text:p text:style-name="P70"><draw:frame draw:style-name="fr3" draw:name="Image8" text:anchor-type="char" svg:width="164.8mm" svg:height="234.05mm" draw:z-index="7"><draw:image xlink:href="Pictures/10000000000002F00000042C553EA593.jpg" xlink:type="simple" xlink:show="embed" xlink:actuate="onLoad" draw:mime-type="image/jpeg"/></draw:frame>Description:xxx</text:p>
      <text:h text:style-name="P19" text:outline-level="1"><text:bookmark-start text:name="__RefHeading___Toc1842_1246683851"/>The Physical view: Component diagrams<text:bookmark-end text:name="__RefHeading___Toc1842_1246683851"/></text:h>
      <text:p text:style-name="P7"/>
      <text:h text:style-name="P36" text:outline-level="2"><text:bookmark-start text:name="__RefHeading___Toc511_4128384672"/>OS Service<text:bookmark-end text:name="__RefHeading___Toc511_4128384672"/></text:h>
      <text:p text:style-name="P74"/>
      <text:p text:style-name="P74"><draw:frame draw:style-name="fr1" draw:name="Image11" text:anchor-type="char" svg:width="170mm" svg:height="88.16mm" draw:z-index="10"><draw:image xlink:href="Pictures/10000000000003FE000002123A1A8A8A.jpg" xlink:type="simple" xlink:show="embed" xlink:actuate="onLoad" draw:mime-type="image/jpeg"/></draw:frame></text:p>
      <text:h text:style-name="P34" text:outline-level="2"/>
      <text:h text:style-name="P37" text:outline-level="2"><text:bookmark-start text:name="__RefHeading___Toc513_4128384672"/><draw:frame draw:style-name="fr2" draw:name="Image6" text:anchor-type="char" svg:x="2.82mm" svg:y="17.94mm" svg:width="170.83mm" svg:height="120.77mm" draw:z-index="5"><draw:image xlink:href="Pictures/10000000000004630000031A3657996F.jpg" xlink:type="simple" xlink:show="embed" xlink:actuate="onLoad" draw:mime-type="image/jpeg"/></draw:frame><text:span text:style-name="T19">Messaging (Commands)</text:span><text:bookmark-end text:name="__RefHeading___Toc513_4128384672"/></text:h>
      <text:p text:style-name="P69"/>
      <text:p text:style-name="P79">The messaging component interfaces to subscribers are queues. Each subscribers gets an assigned Command queue upon the provided API:subscribe_commands(). The Command queue can be monitored by the subscriber to check for new commands.</text:p>
      <text:p text:style-name="P79">Commands can be published by publishers with the API:publish_commands(). The messaging component will distribute the published commands to all subscribers via their assigned queues.</text:p>
      <text:p text:style-name="P69"/>
      <text:h text:style-name="P32" text:outline-level="2"/>
      <text:h text:style-name="P31" text:outline-level="2"><text:bookmark-start text:name="__RefHeading___Toc515_4128384672"/>Music Players<text:bookmark-end text:name="__RefHeading___Toc515_4128384672"/></text:h>
      <text:p text:style-name="P73"/>
      <text:p text:style-name="P69"><draw:frame draw:style-name="fr2" draw:name="Image9" text:anchor-type="char" svg:x="0mm" svg:y="-0.48mm" svg:width="170mm" svg:height="120.19mm" draw:z-index="8"><draw:image xlink:href="Pictures/10000000000004630000031ABE1FC146.jpg" xlink:type="simple" xlink:show="embed" xlink:actuate="onLoad" draw:mime-type="image/jpeg"/></draw:frame></text:p>
      <text:h text:style-name="P33" text:outline-level="2"/>
      <text:h text:style-name="P35" text:outline-level="2"><text:bookmark-start text:name="__RefHeading___Toc517_4128384672"/>GPIO components<text:bookmark-end text:name="__RefHeading___Toc517_4128384672"/></text:h>
      <text:p text:style-name="P74"/>
      <text:p text:style-name="P74"><draw:frame draw:style-name="fr1" draw:name="Image10" text:anchor-type="char" svg:width="170mm" svg:height="135.59mm" draw:z-index="9"><draw:image xlink:href="Pictures/100000000000033E00000296E9FA0584.jpg" xlink:type="simple" xlink:show="embed" xlink:actuate="onLoad" draw:mime-type="image/jpeg"/></draw:frame></text:p>
      <text:h text:style-name="P21" text:outline-level="1"><text:bookmark-start text:name="__RefHeading___Toc1844_1246683851"/><text:s/><text:span text:style-name="T5">The Process view: Sequence diagrams</text:span><text:bookmark-end text:name="__RefHeading___Toc1844_1246683851"/></text:h>
      <text:p text:style-name="Text_20_body"/>
      <text:h text:style-name="P27" text:outline-level="2"><text:bookmark-start text:name="__RefHeading___Toc519_4128384672"/>Messaging <text:bookmark-end text:name="__RefHeading___Toc519_4128384672"/></text:h>
      <text:p text:style-name="P14"><draw:frame draw:style-name="fr4" draw:name="Image5" text:anchor-type="char" svg:width="170mm" svg:height="123.88mm" draw:z-index="4"><draw:image xlink:href="Pictures/100000000000042D0000030B87AECB35.jpg" xlink:type="simple" xlink:show="embed" xlink:actuate="onLoad" draw:mime-type="image/jpeg"/></draw:frame></text:p>
      <text:h text:style-name="P19" text:outline-level="1"><text:bookmark-start text:name="__RefHeading___Toc1846_1246683851"/>The scenario view: use case diagrams<text:bookmark-end text:name="__RefHeading___Toc1846_12466838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21T17:46:19.954847883</dc:date>
    <dc:creator>Henk</dc:creator>
    <meta:editing-duration>PT59M12S</meta:editing-duration>
    <meta:editing-cycles>12</meta:editing-cycles>
    <meta:document-statistic meta:table-count="0" meta:image-count="11" meta:object-count="0" meta:page-count="18" meta:paragraph-count="151" meta:word-count="1486" meta:character-count="9870" meta:non-whitespace-character-count="8598"/>
  </office:meta>
</office:document-meta>
</file>