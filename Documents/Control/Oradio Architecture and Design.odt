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D0000030B87AECB35.jpg" manifest:media-type="image/jpeg"/>
  <manifest:file-entry manifest:full-path="Pictures/10000000000004630000031ABE1FC146.jpg" manifest:media-type="image/jpeg"/>
  <manifest:file-entry manifest:full-path="Pictures/10000001000001F400000148DBB0C7BA.png" manifest:media-type="image/png"/>
  <manifest:file-entry manifest:full-path="Pictures/100000000000033E00000296E9FA0584.jpg" manifest:media-type="image/jpeg"/>
  <manifest:file-entry manifest:full-path="Pictures/10000000000004630000031A99FF82D0.jpg" manifest:media-type="image/jpeg"/>
  <manifest:file-entry manifest:full-path="Pictures/10000000000002D200000300F1A16A84.jpg" manifest:media-type="image/jpeg"/>
  <manifest:file-entry manifest:full-path="Pictures/10000000000003FE000002123A1A8A8A.jpg" manifest:media-type="image/jpeg"/>
  <manifest:file-entry manifest:full-path="Pictures/10000001000000F1000000FAEBF78A04.png" manifest:media-type="image/png"/>
  <manifest:file-entry manifest:full-path="Pictures/10000000000004630000031A3657996F.jpg" manifest:media-type="image/jpeg"/>
  <manifest:file-entry manifest:full-path="Pictures/10000000000004630000031AECAA9034.jpg" manifest:media-type="image/jpeg"/>
  <manifest:file-entry manifest:full-path="Pictures/100000000000043A000002CC1D614B29.jpg" manifest:media-type="image/jpeg"/>
  <manifest:file-entry manifest:full-path="Pictures/1000000000000416000002CC1B4D20F6.jpg" manifest:media-type="image/jpeg"/>
  <manifest:file-entry manifest:full-path="Pictures/10000000000004630000031AB58075B7.jpg" manifest:media-type="image/jpeg"/>
  <manifest:file-entry manifest:full-path="Pictures/100000000000031A00000463529AE498.jpg" manifest:media-type="image/jpeg"/>
  <manifest:file-entry manifest:full-path="Pictures/10000000000002E8000004202B1AD6F6.jpg" manifest:media-type="image/jpeg"/>
  <manifest:file-entry manifest:full-path="Pictures/100000000000031A00000463795CB94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office:font-face-decls>
  <office:automatic-styles>
    <style:style style:name="Table2" style:family="table">
      <style:table-properties style:width="151.29mm" table:align="right"/>
    </style:style>
    <style:style style:name="Table2.A" style:family="table-column">
      <style:table-column-properties style:column-width="26.93mm"/>
    </style:style>
    <style:style style:name="Table2.B" style:family="table-column">
      <style:table-column-properties style:column-width="124.35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P1" style:family="paragraph" style:parent-style-name="Standard">
      <style:text-properties officeooo:rsid="0015ecfc" officeooo:paragraph-rsid="0015ecfc"/>
    </style:style>
    <style:style style:name="P2" style:family="paragraph" style:parent-style-name="Text_20_body">
      <style:text-properties officeooo:rsid="0015ecfc" officeooo:paragraph-rsid="0015ecfc"/>
    </style:style>
    <style:style style:name="P3" style:family="paragraph" style:parent-style-name="Text_20_body">
      <style:text-properties officeooo:paragraph-rsid="0014a285"/>
    </style:style>
    <style:style style:name="P4" style:family="paragraph" style:parent-style-name="Text_20_body">
      <style:text-properties officeooo:rsid="00131a8e" officeooo:paragraph-rsid="00131a8e"/>
    </style:style>
    <style:style style:name="P5" style:family="paragraph" style:parent-style-name="Text_20_body">
      <style:text-properties officeooo:paragraph-rsid="0015ecfc"/>
    </style:style>
    <style:style style:name="P6" style:family="paragraph" style:parent-style-name="Standard">
      <style:text-properties officeooo:paragraph-rsid="0017212d"/>
    </style:style>
    <style:style style:name="P7" style:family="paragraph" style:parent-style-name="Text_20_body">
      <style:text-properties officeooo:paragraph-rsid="00182ac6"/>
    </style:style>
    <style:style style:name="P8" style:family="paragraph" style:parent-style-name="Text_20_body">
      <style:text-properties officeooo:rsid="001b9abe" officeooo:paragraph-rsid="001b9abe"/>
    </style:style>
    <style:style style:name="P9" style:family="paragraph" style:parent-style-name="Text_20_body">
      <style:text-properties officeooo:rsid="001b9abe" officeooo:paragraph-rsid="001bb325"/>
    </style:style>
    <style:style style:name="P10" style:family="paragraph" style:parent-style-name="Standard">
      <style:text-properties officeooo:rsid="0019ce16" officeooo:paragraph-rsid="0019ce16"/>
    </style:style>
    <style:style style:name="P11" style:family="paragraph" style:parent-style-name="Standard">
      <style:text-properties officeooo:paragraph-rsid="0019ce16"/>
    </style:style>
    <style:style style:name="P12" style:family="paragraph" style:parent-style-name="Text_20_body">
      <style:text-properties officeooo:rsid="001a2bcc" officeooo:paragraph-rsid="001a2bcc"/>
    </style:style>
    <style:style style:name="P13" style:family="paragraph" style:parent-style-name="Text_20_body">
      <style:text-properties officeooo:paragraph-rsid="001d94d5"/>
    </style:style>
    <style:style style:name="P14" style:family="paragraph" style:parent-style-name="Text_20_body">
      <style:paragraph-properties fo:break-before="page"/>
      <style:text-properties officeooo:paragraph-rsid="001d94d5"/>
    </style:style>
    <style:style style:name="P15" style:family="paragraph" style:parent-style-name="Contents_20_1">
      <style:paragraph-properties>
        <style:tab-stops>
          <style:tab-stop style:position="169.99mm" style:type="right" style:leader-style="dotted" style:leader-text="."/>
        </style:tab-stops>
      </style:paragraph-properties>
    </style:style>
    <style:style style:name="P16" style:family="paragraph" style:parent-style-name="Contents_20_2">
      <style:paragraph-properties>
        <style:tab-stops>
          <style:tab-stop style:position="164.99mm" style:type="right" style:leader-style="dotted" style:leader-text="."/>
        </style:tab-stops>
      </style:paragraph-properties>
    </style:style>
    <style:style style:name="P17" style:family="paragraph" style:parent-style-name="Text_20_body">
      <style:text-properties officeooo:rsid="001e0fed" officeooo:paragraph-rsid="001e0fed"/>
    </style:style>
    <style:style style:name="P18" style:family="paragraph" style:parent-style-name="Text_20_body">
      <style:text-properties officeooo:rsid="00230afb" officeooo:paragraph-rsid="00262f68"/>
    </style:style>
    <style:style style:name="P19" style:family="paragraph" style:parent-style-name="Text_20_body">
      <style:text-properties officeooo:paragraph-rsid="00215455"/>
    </style:style>
    <style:style style:name="P20" style:family="paragraph" style:parent-style-name="Standard">
      <style:text-properties officeooo:rsid="00298340" officeooo:paragraph-rsid="00298340"/>
    </style:style>
    <style:style style:name="P21" style:family="paragraph" style:parent-style-name="Text_20_body">
      <style:text-properties officeooo:rsid="001bc545" officeooo:paragraph-rsid="001bc545"/>
    </style:style>
    <style:style style:name="P22" style:family="paragraph" style:parent-style-name="Text_20_body">
      <style:text-properties officeooo:rsid="001c13ba" officeooo:paragraph-rsid="001c13ba"/>
    </style:style>
    <style:style style:name="P23" style:family="paragraph" style:parent-style-name="Text_20_body">
      <style:text-properties officeooo:paragraph-rsid="00230afb"/>
    </style:style>
    <style:style style:name="P24" style:family="paragraph" style:parent-style-name="Text_20_body">
      <style:text-properties officeooo:paragraph-rsid="0024fd79"/>
    </style:style>
    <style:style style:name="P25" style:family="paragraph" style:parent-style-name="Text_20_body">
      <style:text-properties officeooo:rsid="0027c5d5" officeooo:paragraph-rsid="0027c5d5"/>
    </style:style>
    <style:style style:name="P26" style:family="paragraph" style:parent-style-name="Text_20_body">
      <style:text-properties officeooo:rsid="00296dd1" officeooo:paragraph-rsid="00296dd1"/>
    </style:style>
    <style:style style:name="P27" style:family="paragraph" style:parent-style-name="Table_20_Contents">
      <style:text-properties officeooo:rsid="0031da80" officeooo:paragraph-rsid="0031da80"/>
    </style:style>
    <style:style style:name="P28" style:family="paragraph" style:parent-style-name="Table_20_Contents">
      <style:text-properties officeooo:paragraph-rsid="0031da80"/>
    </style:style>
    <style:style style:name="P29" style:family="paragraph" style:parent-style-name="Text_20_body">
      <style:text-properties officeooo:paragraph-rsid="001b9abe"/>
    </style:style>
    <style:style style:name="P30" style:family="paragraph" style:parent-style-name="Text_20_body">
      <style:text-properties officeooo:rsid="002b84f8" officeooo:paragraph-rsid="002b84f8"/>
    </style:style>
    <style:style style:name="P31" style:family="paragraph" style:parent-style-name="Text_20_body">
      <style:text-properties officeooo:rsid="002e5196" officeooo:paragraph-rsid="00302d68"/>
    </style:style>
    <style:style style:name="P32" style:family="paragraph" style:parent-style-name="Text_20_body" style:master-page-name="">
      <loext:graphic-properties draw:fill="none"/>
      <style:paragraph-properties fo:margin-left="13.76mm" fo:margin-right="0mm" fo:margin-top="0mm" fo:margin-bottom="2.47mm" style:contextual-spacing="false" fo:line-height="115%" fo:text-indent="0mm" style:auto-text-indent="false" style:page-number="auto" fo:background-color="transparent"/>
      <style:text-properties officeooo:rsid="003259fa" officeooo:paragraph-rsid="0031da80"/>
    </style:style>
    <style:style style:name="P33" style:family="paragraph" style:parent-style-name="Text_20_body">
      <loext:graphic-properties draw:fill="none"/>
      <style:paragraph-properties fo:margin-left="13.76mm" fo:margin-right="0mm" fo:margin-top="0mm" fo:margin-bottom="2.47mm" style:contextual-spacing="false" fo:line-height="115%" fo:text-indent="0mm" style:auto-text-indent="false" fo:background-color="transparent"/>
      <style:text-properties officeooo:rsid="003259fa" officeooo:paragraph-rsid="003259fa"/>
    </style:style>
    <style:style style:name="P34" style:family="paragraph" style:parent-style-name="Text_20_body" style:master-page-name="">
      <loext:graphic-properties draw:fill="none"/>
      <style:paragraph-properties fo:margin-left="0.49mm" fo:margin-right="0mm" fo:margin-top="0mm" fo:margin-bottom="2.47mm" style:contextual-spacing="false" fo:line-height="115%" fo:text-indent="0mm" style:auto-text-indent="false" style:page-number="auto" fo:background-color="transparent"/>
      <style:text-properties officeooo:rsid="003259fa" officeooo:paragraph-rsid="003b834e"/>
    </style:style>
    <style:style style:name="P35" style:family="paragraph" style:parent-style-name="Text_20_body">
      <style:text-properties officeooo:rsid="001a2bcc" officeooo:paragraph-rsid="001a2bcc" fo:background-color="#ffff00"/>
    </style:style>
    <style:style style:name="P36" style:family="paragraph" style:parent-style-name="Text_20_body" style:master-page-name="">
      <loext:graphic-properties draw:fill="none"/>
      <style:paragraph-properties fo:margin-left="19.24mm" fo:margin-right="0mm" fo:margin-top="0mm" fo:margin-bottom="2.47mm" style:contextual-spacing="false" fo:line-height="115%" fo:text-indent="0mm" style:auto-text-indent="false" style:page-number="auto" fo:background-color="transparent"/>
      <style:text-properties officeooo:rsid="00395e88" officeooo:paragraph-rsid="00395e88"/>
    </style:style>
    <style:style style:name="P37" style:family="paragraph" style:parent-style-name="Text_20_body" style:master-page-name="">
      <loext:graphic-properties draw:fill="none"/>
      <style:paragraph-properties fo:margin-left="19.51mm" fo:margin-right="0mm" fo:margin-top="0mm" fo:margin-bottom="2.47mm" style:contextual-spacing="false" fo:line-height="115%" fo:text-indent="0mm" style:auto-text-indent="false" style:page-number="auto" fo:background-color="transparent"/>
      <style:text-properties officeooo:rsid="0039607e" officeooo:paragraph-rsid="0039607e"/>
    </style:style>
    <style:style style:name="P38" style:family="paragraph" style:parent-style-name="Text_20_body">
      <style:text-properties officeooo:rsid="00262f68" officeooo:paragraph-rsid="00262f68"/>
    </style:style>
    <style:style style:name="P39" style:family="paragraph" style:parent-style-name="Contents_20_3">
      <style:paragraph-properties>
        <style:tab-stops>
          <style:tab-stop style:position="159.98mm" style:type="right" style:leader-style="dotted" style:leader-text="."/>
        </style:tab-stops>
      </style:paragraph-properties>
    </style:style>
    <style:style style:name="P40" style:family="paragraph" style:parent-style-name="Text_20_body" style:master-page-name="">
      <loext:graphic-properties draw:fill="none"/>
      <style:paragraph-properties fo:margin-left="0.49mm" fo:margin-right="0mm" fo:margin-top="0mm" fo:margin-bottom="2.47mm" style:contextual-spacing="false" fo:line-height="115%" fo:text-indent="0mm" style:auto-text-indent="false" style:page-number="auto" fo:background-color="transparent"/>
      <style:text-properties officeooo:rsid="003450f7" officeooo:paragraph-rsid="003b834e"/>
    </style:style>
    <style:style style:name="P41" style:family="paragraph" style:parent-style-name="Text_20_body">
      <style:text-properties officeooo:paragraph-rsid="003b834e"/>
    </style:style>
    <style:style style:name="P42" style:family="paragraph" style:parent-style-name="Heading_20_1">
      <style:paragraph-properties fo:break-before="page"/>
    </style:style>
    <style:style style:name="P43" style:family="paragraph" style:parent-style-name="Heading_20_1" style:list-style-name="">
      <style:text-properties officeooo:rsid="00182ac6" officeooo:paragraph-rsid="00182ac6"/>
    </style:style>
    <style:style style:name="P44" style:family="paragraph" style:parent-style-name="Heading_20_1">
      <style:paragraph-properties fo:break-before="page"/>
      <style:text-properties officeooo:rsid="00182ac6" officeooo:paragraph-rsid="00182ac6"/>
    </style:style>
    <style:style style:name="P45" style:family="paragraph" style:parent-style-name="Heading_20_1">
      <style:paragraph-properties fo:break-before="page"/>
      <style:text-properties officeooo:rsid="001b9abe" officeooo:paragraph-rsid="001b9abe"/>
    </style:style>
    <style:style style:name="P46" style:family="paragraph" style:parent-style-name="Heading_20_1">
      <style:paragraph-properties fo:break-before="page"/>
      <style:text-properties officeooo:rsid="001e0fed" officeooo:paragraph-rsid="001e0fed"/>
    </style:style>
    <style:style style:name="P47" style:family="paragraph" style:parent-style-name="Heading_20_2">
      <style:text-properties officeooo:rsid="0014a285" officeooo:paragraph-rsid="0014a285"/>
    </style:style>
    <style:style style:name="P48" style:family="paragraph" style:parent-style-name="Heading_20_2">
      <style:text-properties officeooo:rsid="0015ecfc" officeooo:paragraph-rsid="0015ecfc"/>
    </style:style>
    <style:style style:name="P49" style:family="paragraph" style:parent-style-name="Heading_20_2">
      <style:text-properties officeooo:rsid="001b9abe" officeooo:paragraph-rsid="001b9abe"/>
    </style:style>
    <style:style style:name="P50" style:family="paragraph" style:parent-style-name="Heading_20_2">
      <style:text-properties officeooo:rsid="001e0fed" officeooo:paragraph-rsid="001e0fed"/>
    </style:style>
    <style:style style:name="P51" style:family="paragraph" style:parent-style-name="Heading_20_2">
      <style:text-properties officeooo:rsid="0019ce16" officeooo:paragraph-rsid="0019ce16"/>
    </style:style>
    <style:style style:name="P52" style:family="paragraph" style:parent-style-name="Heading_20_2">
      <style:text-properties officeooo:rsid="001d94d5" officeooo:paragraph-rsid="001d94d5"/>
    </style:style>
    <style:style style:name="P53" style:family="paragraph" style:parent-style-name="Heading_20_2">
      <style:text-properties officeooo:rsid="003b834e" officeooo:paragraph-rsid="003b834e"/>
    </style:style>
    <style:style style:name="P54" style:family="paragraph" style:parent-style-name="Heading_20_2">
      <style:paragraph-properties fo:break-before="page"/>
      <style:text-properties officeooo:rsid="00215455" officeooo:paragraph-rsid="00215455"/>
    </style:style>
    <style:style style:name="P55" style:family="paragraph" style:parent-style-name="Heading_20_2">
      <style:text-properties officeooo:rsid="0024fd79" officeooo:paragraph-rsid="0024fd79"/>
    </style:style>
    <style:style style:name="P56" style:family="paragraph" style:parent-style-name="Heading_20_2">
      <style:paragraph-properties fo:break-before="page"/>
      <style:text-properties officeooo:rsid="0024fd79" officeooo:paragraph-rsid="0024fd79"/>
    </style:style>
    <style:style style:name="P57" style:family="paragraph" style:parent-style-name="Heading_20_2" style:list-style-name=""/>
    <style:style style:name="P58" style:family="paragraph" style:parent-style-name="Heading_20_2" style:list-style-name="">
      <style:text-properties officeooo:paragraph-rsid="00215455"/>
    </style:style>
    <style:style style:name="P59" style:family="paragraph" style:parent-style-name="Heading_20_2">
      <style:paragraph-properties fo:break-before="page"/>
      <style:text-properties officeooo:paragraph-rsid="00215455"/>
    </style:style>
    <style:style style:name="P60" style:family="paragraph" style:parent-style-name="Heading_20_2">
      <style:text-properties officeooo:paragraph-rsid="00215455"/>
    </style:style>
    <style:style style:name="P61" style:family="paragraph" style:parent-style-name="Heading_20_2" style:list-style-name="">
      <style:text-properties officeooo:rsid="00230afb" officeooo:paragraph-rsid="00230afb"/>
    </style:style>
    <style:style style:name="P62" style:family="paragraph" style:parent-style-name="Heading_20_2">
      <style:paragraph-properties fo:break-before="page"/>
      <style:text-properties officeooo:rsid="00230afb" officeooo:paragraph-rsid="00230afb"/>
    </style:style>
    <style:style style:name="P63" style:family="paragraph" style:parent-style-name="Heading_20_2">
      <style:text-properties officeooo:rsid="003d0d0c" officeooo:paragraph-rsid="003d0d0c"/>
    </style:style>
    <style:style style:name="P64" style:family="paragraph" style:parent-style-name="Heading_20_2">
      <style:text-properties officeooo:rsid="0040179c" officeooo:paragraph-rsid="0040179c"/>
    </style:style>
    <style:style style:name="P65" style:family="paragraph" style:parent-style-name="Heading_20_3">
      <style:text-properties officeooo:rsid="00395e88" officeooo:paragraph-rsid="00395e88"/>
    </style:style>
    <style:style style:name="P66" style:family="paragraph" style:parent-style-name="Heading_20_3">
      <style:text-properties officeooo:rsid="0039607e" officeooo:paragraph-rsid="0039607e"/>
    </style:style>
    <style:style style:name="P67" style:family="paragraph" style:parent-style-name="Standard" style:list-style-name="L3">
      <style:text-properties officeooo:rsid="0015ecfc" officeooo:paragraph-rsid="0015ecfc"/>
    </style:style>
    <style:style style:name="P68" style:family="paragraph" style:parent-style-name="Standard" style:list-style-name="L3">
      <style:text-properties officeooo:rsid="0017212d" officeooo:paragraph-rsid="0017212d"/>
    </style:style>
    <style:style style:name="P69" style:family="paragraph" style:parent-style-name="Standard" style:list-style-name="L17">
      <style:text-properties officeooo:paragraph-rsid="0019ce16"/>
    </style:style>
    <style:style style:name="P70" style:family="paragraph" style:parent-style-name="Standard" style:list-style-name="L17">
      <style:text-properties officeooo:rsid="0023488a" officeooo:paragraph-rsid="0019ce16"/>
    </style:style>
    <style:style style:name="P71" style:family="paragraph" style:parent-style-name="Standard" style:list-style-name="L17">
      <style:text-properties officeooo:rsid="0019ce16" officeooo:paragraph-rsid="0019ce16"/>
    </style:style>
    <style:style style:name="P72" style:family="paragraph" style:parent-style-name="Text_20_body" style:list-style-name="L1">
      <style:text-properties officeooo:rsid="0015ecfc" officeooo:paragraph-rsid="0015ecfc"/>
    </style:style>
    <style:style style:name="P73" style:family="paragraph" style:parent-style-name="Text_20_body" style:list-style-name="L2">
      <style:text-properties officeooo:rsid="0015ecfc" officeooo:paragraph-rsid="0015ecfc"/>
    </style:style>
    <style:style style:name="P74" style:family="paragraph" style:parent-style-name="Text_20_body" style:list-style-name="L4">
      <style:text-properties officeooo:rsid="0015ecfc" officeooo:paragraph-rsid="0015ecfc"/>
    </style:style>
    <style:style style:name="P75" style:family="paragraph" style:parent-style-name="Text_20_body" style:list-style-name="L2">
      <style:text-properties officeooo:rsid="0017212d" officeooo:paragraph-rsid="0017212d"/>
    </style:style>
    <style:style style:name="P76" style:family="paragraph" style:parent-style-name="Text_20_body" style:list-style-name="L5">
      <style:text-properties officeooo:paragraph-rsid="001b9abe"/>
    </style:style>
    <style:style style:name="P77" style:family="paragraph" style:parent-style-name="Text_20_body" style:list-style-name="L5">
      <style:text-properties officeooo:rsid="001b9abe" officeooo:paragraph-rsid="001b9abe"/>
    </style:style>
    <style:style style:name="P78" style:family="paragraph" style:parent-style-name="Text_20_body" style:list-style-name="L5">
      <style:text-properties officeooo:rsid="001bb325" officeooo:paragraph-rsid="001bb325"/>
    </style:style>
    <style:style style:name="P79" style:family="paragraph" style:parent-style-name="Text_20_body" style:list-style-name="L6">
      <style:text-properties officeooo:paragraph-rsid="001bb325"/>
    </style:style>
    <style:style style:name="P80" style:family="paragraph" style:parent-style-name="Text_20_body" style:list-style-name="L6">
      <style:text-properties officeooo:rsid="001bc545" officeooo:paragraph-rsid="001bc545"/>
    </style:style>
    <style:style style:name="P81" style:family="paragraph" style:parent-style-name="Text_20_body" style:list-style-name="L12">
      <style:text-properties officeooo:rsid="001bc545" officeooo:paragraph-rsid="00213708"/>
    </style:style>
    <style:style style:name="P82" style:family="paragraph" style:parent-style-name="Text_20_body" style:master-page-name="">
      <loext:graphic-properties draw:fill="none"/>
      <style:paragraph-properties fo:margin-left="0.25mm" fo:margin-right="0mm" fo:margin-top="0mm" fo:margin-bottom="2.47mm" style:contextual-spacing="false" fo:line-height="115%" fo:text-indent="0mm" style:auto-text-indent="false" style:page-number="auto" fo:background-color="transparent"/>
      <style:text-properties officeooo:rsid="00377ef6" officeooo:paragraph-rsid="003b834e"/>
    </style:style>
    <style:style style:name="P83" style:family="paragraph" style:parent-style-name="Text_20_body" style:list-style-name="L7">
      <loext:graphic-properties draw:fill="none"/>
      <style:paragraph-properties fo:margin-top="0mm" fo:margin-bottom="2.47mm" style:contextual-spacing="false" fo:line-height="115%" fo:background-color="transparent"/>
      <style:text-properties officeooo:rsid="00377ef6" officeooo:paragraph-rsid="003b834e"/>
    </style:style>
    <style:style style:name="P84" style:family="paragraph" style:parent-style-name="Text_20_body" style:list-style-name="L7">
      <loext:graphic-properties draw:fill="none"/>
      <style:paragraph-properties fo:margin-top="0mm" fo:margin-bottom="2.47mm" style:contextual-spacing="false" fo:line-height="115%" fo:background-color="transparent"/>
      <style:text-properties officeooo:paragraph-rsid="003b834e"/>
    </style:style>
    <style:style style:name="P85" style:family="paragraph" style:parent-style-name="Text_20_body" style:list-style-name="L8">
      <loext:graphic-properties draw:fill="none"/>
      <style:paragraph-properties fo:margin-top="0mm" fo:margin-bottom="2.47mm" style:contextual-spacing="false" fo:line-height="115%" fo:background-color="transparent"/>
      <style:text-properties officeooo:paragraph-rsid="003b834e"/>
    </style:style>
    <style:style style:name="P86" style:family="paragraph" style:parent-style-name="Text_20_body" style:list-style-name="L9">
      <loext:graphic-properties draw:fill="none"/>
      <style:paragraph-properties fo:margin-top="0mm" fo:margin-bottom="2.47mm" style:contextual-spacing="false" fo:line-height="115%" fo:background-color="transparent"/>
      <style:text-properties officeooo:paragraph-rsid="003b834e"/>
    </style:style>
    <style:style style:name="P87" style:family="paragraph" style:parent-style-name="Text_20_body" style:list-style-name="L10">
      <loext:graphic-properties draw:fill="none"/>
      <style:paragraph-properties fo:margin-top="0mm" fo:margin-bottom="2.47mm" style:contextual-spacing="false" fo:line-height="115%" fo:background-color="transparent"/>
      <style:text-properties officeooo:paragraph-rsid="003b834e"/>
    </style:style>
    <style:style style:name="P88" style:family="paragraph" style:parent-style-name="Text_20_body" style:list-style-name="L7">
      <loext:graphic-properties draw:fill="none"/>
      <style:paragraph-properties fo:margin-top="0mm" fo:margin-bottom="2.47mm" style:contextual-spacing="false" fo:line-height="115%" fo:background-color="transparent"/>
      <style:text-properties officeooo:rsid="00384d55" officeooo:paragraph-rsid="003b834e"/>
    </style:style>
    <style:style style:name="P89" style:family="paragraph" style:parent-style-name="Text_20_body" style:master-page-name="">
      <loext:graphic-properties draw:fill="none"/>
      <style:paragraph-properties fo:margin-left="-0.25mm" fo:margin-right="0mm" fo:margin-top="0mm" fo:margin-bottom="2.47mm" style:contextual-spacing="false" fo:line-height="115%" fo:text-indent="0mm" style:auto-text-indent="false" style:page-number="auto" fo:background-color="transparent"/>
      <style:text-properties officeooo:rsid="00395e88" officeooo:paragraph-rsid="003b834e"/>
    </style:style>
    <style:style style:name="P90" style:family="paragraph" style:parent-style-name="Text_20_body" style:list-style-name="L9">
      <loext:graphic-properties draw:fill="none"/>
      <style:paragraph-properties fo:margin-top="0mm" fo:margin-bottom="2.47mm" style:contextual-spacing="false" fo:line-height="115%" fo:background-color="transparent"/>
      <style:text-properties officeooo:rsid="00395e88" officeooo:paragraph-rsid="003b834e"/>
    </style:style>
    <style:style style:name="P91" style:family="paragraph" style:parent-style-name="Text_20_body" style:list-style-name="L13">
      <loext:graphic-properties draw:fill="none"/>
      <style:paragraph-properties fo:margin-top="0mm" fo:margin-bottom="2.47mm" style:contextual-spacing="false" fo:line-height="115%" fo:background-color="transparent"/>
      <style:text-properties officeooo:rsid="00395e88" officeooo:paragraph-rsid="00395e88"/>
    </style:style>
    <style:style style:name="P92" style:family="paragraph" style:parent-style-name="Text_20_body" style:list-style-name="L10">
      <loext:graphic-properties draw:fill="none"/>
      <style:paragraph-properties fo:margin-top="0mm" fo:margin-bottom="2.47mm" style:contextual-spacing="false" fo:line-height="115%" fo:background-color="transparent"/>
      <style:text-properties officeooo:rsid="003450f7" officeooo:paragraph-rsid="003b834e"/>
    </style:style>
    <style:style style:name="P93" style:family="paragraph" style:parent-style-name="Text_20_body" style:list-style-name="L11">
      <style:text-properties officeooo:paragraph-rsid="0031da80"/>
    </style:style>
    <style:style style:name="P94" style:family="paragraph" style:parent-style-name="Text_20_body" style:list-style-name="L12">
      <style:text-properties officeooo:paragraph-rsid="00213708"/>
    </style:style>
    <style:style style:name="P95" style:family="paragraph" style:parent-style-name="Text_20_body" style:list-style-name="L12">
      <style:text-properties officeooo:rsid="001fbf41" officeooo:paragraph-rsid="001fbf41"/>
    </style:style>
    <style:style style:name="P96" style:family="paragraph" style:parent-style-name="Text_20_body" style:list-style-name="L14">
      <style:text-properties officeooo:rsid="001fbf41" officeooo:paragraph-rsid="001fbf41"/>
    </style:style>
    <style:style style:name="P97" style:family="paragraph" style:parent-style-name="Text_20_body" style:list-style-name="L15">
      <style:text-properties officeooo:rsid="001fbf41" officeooo:paragraph-rsid="001fbf41"/>
    </style:style>
    <style:style style:name="P98" style:family="paragraph" style:parent-style-name="Text_20_body" style:list-style-name="L16">
      <style:text-properties officeooo:rsid="001fbf41" officeooo:paragraph-rsid="001fbf41"/>
    </style:style>
    <style:style style:name="P99" style:family="paragraph" style:parent-style-name="Text_20_body" style:list-style-name="L12">
      <style:text-properties officeooo:rsid="001e0fed" officeooo:paragraph-rsid="001e0fed"/>
    </style:style>
    <style:style style:name="P100" style:family="paragraph" style:parent-style-name="Text_20_body" style:list-style-name="L12">
      <style:text-properties officeooo:rsid="001c13ba" officeooo:paragraph-rsid="00213708"/>
    </style:style>
    <style:style style:name="P101" style:family="paragraph" style:parent-style-name="Text_20_body" style:list-style-name="L13">
      <loext:graphic-properties draw:fill="none"/>
      <style:paragraph-properties fo:margin-top="0mm" fo:margin-bottom="2.47mm" style:contextual-spacing="false" fo:line-height="115%" fo:background-color="transparent"/>
      <style:text-properties officeooo:rsid="0039607e" officeooo:paragraph-rsid="0039607e"/>
    </style:style>
    <style:style style:name="P102" style:family="paragraph" style:parent-style-name="Text_20_body" style:list-style-name="L18">
      <style:text-properties officeooo:rsid="001a2bcc" officeooo:paragraph-rsid="001a2bcc"/>
    </style:style>
    <style:style style:name="P103" style:family="paragraph" style:parent-style-name="Text_20_body" style:list-style-name="L19">
      <style:text-properties officeooo:rsid="0027c5d5" officeooo:paragraph-rsid="0027c5d5"/>
    </style:style>
    <style:style style:name="P104" style:family="paragraph" style:parent-style-name="Text_20_body" style:list-style-name="L20">
      <style:text-properties officeooo:rsid="0027c5d5" officeooo:paragraph-rsid="0027c5d5"/>
    </style:style>
    <style:style style:name="P105" style:family="paragraph" style:parent-style-name="Text_20_body">
      <style:text-properties officeooo:rsid="00230afb" officeooo:paragraph-rsid="00230afb"/>
    </style:style>
    <style:style style:name="P106" style:family="paragraph" style:parent-style-name="Text_20_body">
      <style:text-properties officeooo:rsid="003d0d0c" officeooo:paragraph-rsid="003d0d0c"/>
    </style:style>
    <style:style style:name="P107" style:family="paragraph" style:parent-style-name="Text_20_body" style:list-style-name="L21">
      <style:text-properties officeooo:rsid="003d0d0c" officeooo:paragraph-rsid="003d0d0c"/>
    </style:style>
    <style:style style:name="P108" style:family="paragraph" style:parent-style-name="Text_20_body">
      <style:text-properties officeooo:rsid="003d0d0c" officeooo:paragraph-rsid="0040aa95"/>
    </style:style>
    <style:style style:name="P109" style:family="paragraph" style:parent-style-name="Text_20_body">
      <style:text-properties officeooo:paragraph-rsid="003d0d0c"/>
    </style:style>
    <style:style style:name="P110" style:family="paragraph" style:parent-style-name="Text_20_body">
      <style:text-properties officeooo:paragraph-rsid="00230afb"/>
    </style:style>
    <style:style style:name="P111" style:family="paragraph" style:parent-style-name="Text_20_body">
      <style:text-properties officeooo:paragraph-rsid="0040179c"/>
    </style:style>
    <style:style style:name="P112" style:family="paragraph" style:parent-style-name="Text_20_body">
      <style:text-properties officeooo:rsid="0040aa95" officeooo:paragraph-rsid="0040aa95"/>
    </style:style>
    <style:style style:name="P113" style:family="paragraph">
      <style:paragraph-properties style:text-autospace="none"/>
    </style:style>
    <style:style style:name="P114" style:family="paragraph">
      <loext:graphic-properties draw:fill="none" draw:fill-color="#ffffff"/>
      <style:text-properties fo:color="#000000" loext:opacity="100%"/>
    </style:style>
    <style:style style:name="P115" style:family="paragraph">
      <style:paragraph-properties fo:text-align="start"/>
    </style:style>
    <style:style style:name="P116" style:family="paragraph">
      <loext:graphic-properties draw:fill="none" draw:fill-color="#ffffff"/>
      <style:paragraph-properties fo:text-align="start"/>
      <style:text-properties style:font-name="Liberation Mono1" fo:font-size="10pt" style:font-name-asian="Liberation Mono1" style:font-size-asian="10pt" style:font-name-complex="Liberation Mono1" style:font-size-complex="10pt"/>
    </style:style>
    <style:style style:name="T1" style:family="text">
      <style:text-properties officeooo:rsid="00131a8e"/>
    </style:style>
    <style:style style:name="T2" style:family="text">
      <style:text-properties officeooo:rsid="0014a285"/>
    </style:style>
    <style:style style:name="T3" style:family="text">
      <style:text-properties officeooo:rsid="0015ecfc"/>
    </style:style>
    <style:style style:name="T4" style:family="text">
      <style:text-properties officeooo:rsid="0017212d"/>
    </style:style>
    <style:style style:name="T5" style:family="text">
      <style:text-properties officeooo:rsid="00182ac6"/>
    </style:style>
    <style:style style:name="T6" style:family="text">
      <style:text-properties fo:font-weight="bold" style:font-weight-asian="bold" style:font-weight-complex="bold"/>
    </style:style>
    <style:style style:name="T7" style:family="text">
      <style:text-properties fo:font-weight="bold" officeooo:rsid="0023488a" style:font-weight-asian="bold" style:font-weight-complex="bold"/>
    </style:style>
    <style:style style:name="T8" style:family="text">
      <style:text-properties fo:font-weight="bold" officeooo:rsid="002cdcb6" style:font-weight-asian="bold" style:font-weight-complex="bold"/>
    </style:style>
    <style:style style:name="T9" style:family="text">
      <style:text-properties fo:font-weight="bold" officeooo:rsid="0031da80" style:font-weight-asian="bold" style:font-weight-complex="bold"/>
    </style:style>
    <style:style style:name="T10" style:family="text">
      <style:text-properties officeooo:rsid="0023488a"/>
    </style:style>
    <style:style style:name="T11" style:family="text">
      <style:text-properties officeooo:rsid="002cdcb6"/>
    </style:style>
    <style:style style:name="T12" style:family="text">
      <style:text-properties officeooo:rsid="0023832c"/>
    </style:style>
    <style:style style:name="T13" style:family="text">
      <style:text-properties officeooo:rsid="001b9abe"/>
    </style:style>
    <style:style style:name="T14" style:family="text">
      <style:text-properties officeooo:rsid="001bb325"/>
    </style:style>
    <style:style style:name="T15" style:family="text">
      <style:text-properties officeooo:rsid="001bc545"/>
    </style:style>
    <style:style style:name="T16" style:family="text">
      <style:text-properties officeooo:rsid="001c13ba"/>
    </style:style>
    <style:style style:name="T17" style:family="text">
      <style:text-properties officeooo:rsid="001fbf41"/>
    </style:style>
    <style:style style:name="T18" style:family="text">
      <style:text-properties officeooo:rsid="00213708"/>
    </style:style>
    <style:style style:name="T19" style:family="text">
      <style:text-properties officeooo:rsid="00215455"/>
    </style:style>
    <style:style style:name="T20" style:family="text">
      <style:text-properties officeooo:rsid="00230afb"/>
    </style:style>
    <style:style style:name="T21" style:family="text">
      <style:text-properties officeooo:rsid="00262f68"/>
    </style:style>
    <style:style style:name="T22" style:family="text">
      <style:text-properties officeooo:rsid="0027ec9f"/>
    </style:style>
    <style:style style:name="T23" style:family="text">
      <style:text-properties officeooo:rsid="0028b113"/>
    </style:style>
    <style:style style:name="T24" style:family="text">
      <style:text-properties officeooo:rsid="002cae60"/>
    </style:style>
    <style:style style:name="T25" style:family="text">
      <style:text-properties officeooo:rsid="002dfc19"/>
    </style:style>
    <style:style style:name="T26" style:family="text">
      <style:text-properties officeooo:rsid="002e477e"/>
    </style:style>
    <style:style style:name="T27" style:family="text">
      <style:text-properties officeooo:rsid="002e5196"/>
    </style:style>
    <style:style style:name="T28" style:family="text">
      <style:text-properties officeooo:rsid="00302d68"/>
    </style:style>
    <style:style style:name="T29" style:family="text">
      <style:text-properties officeooo:rsid="0031da80"/>
    </style:style>
    <style:style style:name="T30" style:family="text">
      <style:text-properties officeooo:rsid="0033fac4"/>
    </style:style>
    <style:style style:name="T31" style:family="text">
      <style:text-properties officeooo:rsid="003450f7"/>
    </style:style>
    <style:style style:name="T32" style:family="text">
      <style:text-properties officeooo:rsid="0034f09d"/>
    </style:style>
    <style:style style:name="T33" style:family="text">
      <style:text-properties officeooo:rsid="00377ef6"/>
    </style:style>
    <style:style style:name="T34" style:family="text">
      <style:text-properties officeooo:rsid="00384d55"/>
    </style:style>
    <style:style style:name="T35" style:family="text">
      <style:text-properties officeooo:rsid="00395e88"/>
    </style:style>
    <style:style style:name="T36" style:family="text">
      <style:text-properties officeooo:rsid="003259fa"/>
    </style:style>
    <style:style style:name="T37" style:family="text">
      <style:text-properties officeooo:rsid="003ea4bc"/>
    </style:style>
    <style:style style:name="T38" style:family="text">
      <style:text-properties fo:font-variant="normal" fo:text-transform="none" style:font-name="gg mono" fo:font-size="10.5pt" fo:letter-spacing="normal" fo:font-style="normal" fo:font-weight="normal"/>
    </style:style>
    <style:style style:name="T39" style:family="text">
      <style:text-properties fo:color="#000000" loext:opacity="100%" style:font-name="Monospace" fo:font-size="10pt" fo:font-style="italic" style:font-name-asian="Monospace" style:font-size-asian="10pt" style:font-style-asian="italic" style:font-name-complex="Monospace" style:font-size-complex="10pt" style:font-style-complex="italic"/>
    </style:style>
    <style:style style:name="T40" style:family="text">
      <style:text-properties fo:color="#000000" loext:opacity="100%" style:font-name="Monospace" fo:font-size="10pt" style:font-name-asian="Monospace" style:font-size-asian="10pt" style:font-name-complex="Monospace" style:font-size-complex="10pt"/>
    </style:style>
    <style:style style:name="T41" style:family="text">
      <style:text-properties fo:color="#000000" loext:opacity="100%" style:font-name="Monospace" fo:font-size="10pt" fo:font-weight="bold" style:font-name-asian="Monospace" style:font-size-asian="10pt" style:font-weight-asian="bold" style:font-name-complex="Monospace" style:font-size-complex="10pt" style:font-weight-complex="bold"/>
    </style:style>
    <style:style style:name="T42" style:family="text">
      <style:text-properties fo:color="#000000" loext:opacity="100%" style:font-name="Monospace" fo:font-size="10pt" fo:font-style="italic" style:text-underline-style="solid" style:text-underline-width="auto" style:text-underline-color="font-color" style:font-name-asian="Monospace" style:font-size-asian="10pt" style:font-style-asian="italic" style:font-name-complex="Monospace" style:font-size-complex="10pt" style:font-style-complex="italic"/>
    </style:style>
    <style:style style:name="T43" style:family="text">
      <style:text-properties fo:color="#000000" loext:opacity="1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44" style:family="text">
      <style:text-properties style:font-name="Liberation Mono1" fo:font-size="10pt" style:font-name-asian="Liberation Mono1" style:font-size-asian="10pt" style:font-name-complex="Liberation Mono1" style:font-size-complex="10pt"/>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95mm" fo:text-indent="-6.35mm" fo:margin-left="12.9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3mm" fo:text-indent="-6.35mm" fo:margin-left="19.3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65mm" fo:text-indent="-6.35mm" fo:margin-left="25.6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mm" fo:text-indent="-6.35mm" fo:margin-left="32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35mm" fo:text-indent="-6.35mm" fo:margin-left="38.3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7mm" fo:text-indent="-6.35mm" fo:margin-left="44.7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05mm" fo:text-indent="-6.35mm" fo:margin-left="51.0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4mm" fo:text-indent="-6.35mm" fo:margin-left="57.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75mm" fo:text-indent="-6.35mm" fo:margin-left="63.7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1mm" fo:text-indent="-6.35mm" fo:margin-left="70.1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19mm" fo:text-indent="-6.35mm" fo:margin-left="13.1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54mm" fo:text-indent="-6.35mm" fo:margin-left="19.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89mm" fo:text-indent="-6.35mm" fo:margin-left="25.8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24mm" fo:text-indent="-6.35mm" fo:margin-left="32.2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59mm" fo:text-indent="-6.35mm" fo:margin-left="38.5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94mm" fo:text-indent="-6.35mm" fo:margin-left="44.9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29mm" fo:text-indent="-6.35mm" fo:margin-left="51.2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64mm" fo:text-indent="-6.35mm" fo:margin-left="57.6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99mm" fo:text-indent="-6.35mm" fo:margin-left="63.9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34mm" fo:text-indent="-6.35mm" fo:margin-left="70.34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45mm" fo:text-indent="-6.35mm" fo:margin-left="12.4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mm" fo:text-indent="-6.35mm" fo:margin-left="18.8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15mm" fo:text-indent="-6.35mm" fo:margin-left="25.1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mm" fo:text-indent="-6.35mm" fo:margin-left="31.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85mm" fo:text-indent="-6.35mm" fo:margin-left="37.8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mm" fo:text-indent="-6.35mm" fo:margin-left="44.2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55mm" fo:text-indent="-6.35mm" fo:margin-left="50.5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mm" fo:text-indent="-6.35mm" fo:margin-left="56.9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25mm" fo:text-indent="-6.35mm" fo:margin-left="63.2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mm" fo:text-indent="-6.35mm" fo:margin-left="69.6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19mm" fo:text-indent="-6.35mm" fo:margin-left="13.1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54mm" fo:text-indent="-6.35mm" fo:margin-left="19.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89mm" fo:text-indent="-6.35mm" fo:margin-left="25.8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24mm" fo:text-indent="-6.35mm" fo:margin-left="32.2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59mm" fo:text-indent="-6.35mm" fo:margin-left="38.5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94mm" fo:text-indent="-6.35mm" fo:margin-left="44.9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29mm" fo:text-indent="-6.35mm" fo:margin-left="51.2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64mm" fo:text-indent="-6.35mm" fo:margin-left="57.6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99mm" fo:text-indent="-6.35mm" fo:margin-left="63.9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34mm" fo:text-indent="-6.35mm" fo:margin-left="70.34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94mm" fo:text-indent="-6.35mm" fo:margin-left="31.94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29mm" fo:text-indent="-6.35mm" fo:margin-left="38.29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64mm" fo:text-indent="-6.35mm" fo:margin-left="44.6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99mm" fo:text-indent="-6.35mm" fo:margin-left="50.99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34mm" fo:text-indent="-6.35mm" fo:margin-left="57.34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69mm" fo:text-indent="-6.35mm" fo:margin-left="63.69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04mm" fo:text-indent="-6.35mm" fo:margin-left="70.04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39mm" fo:text-indent="-6.35mm" fo:margin-left="76.39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74mm" fo:text-indent="-6.35mm" fo:margin-left="82.74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09mm" fo:text-indent="-6.35mm" fo:margin-left="89.09m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width="0.35mm" svg:stroke-color="#000000" draw:marker-start-width="4.06mm" draw:marker-end-width="4.06mm" draw:fill="none" draw:fill-color="#ffffff" fo:min-height="86.32mm" fo:padding-top="-0.09mm" fo:padding-bottom="-0.09mm" fo:padding-left="-0.09mm" fo:padding-right="-0.09m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35mm" svg:stroke-color="#000000" draw:marker-start-width="4.06mm" draw:marker-end-width="4.06mm" draw:fill="none" draw:fill-color="#ffffff" fo:min-height="64.08mm" fo:padding-top="0.18mm" fo:padding-bottom="0.18mm" fo:padding-left="0.18mm" fo:padding-right="0.18mm" loext:decorative="false" style:run-through="foreground" style:wrap="none" style:vertical-pos="from-top" style:vertical-rel="paragraph"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5"><text:a xlink:type="simple" xlink:href="#__RefHeading___Toc1826_1246683851" text:style-name="Index_20_Link" text:visited-style-name="Index_20_Link">1 Architectural view model<text:tab/>2</text:a></text:p>
          <text:p text:style-name="P16"><text:a xlink:type="simple" xlink:href="#__RefHeading___Toc1828_1246683851" text:style-name="Index_20_Link" text:visited-style-name="Index_20_Link">1.1 The logical view<text:tab/>2</text:a></text:p>
          <text:p text:style-name="P16"><text:a xlink:type="simple" xlink:href="#__RefHeading___Toc1830_1246683851" text:style-name="Index_20_Link" text:visited-style-name="Index_20_Link">1.2 The Physical view<text:tab/>2</text:a></text:p>
          <text:p text:style-name="P16"><text:a xlink:type="simple" xlink:href="#__RefHeading___Toc1832_1246683851" text:style-name="Index_20_Link" text:visited-style-name="Index_20_Link">1.3 The Development view<text:tab/>3</text:a></text:p>
          <text:p text:style-name="P16"><text:a xlink:type="simple" xlink:href="#__RefHeading___Toc1834_1246683851" text:style-name="Index_20_Link" text:visited-style-name="Index_20_Link">1.4 The Process view<text:tab/>3</text:a></text:p>
          <text:p text:style-name="P16"><text:a xlink:type="simple" xlink:href="#__RefHeading___Toc1836_1246683851" text:style-name="Index_20_Link" text:visited-style-name="Index_20_Link">1.5 The Scenarios (or use case view)<text:tab/>3</text:a></text:p>
          <text:p text:style-name="P15"><text:a xlink:type="simple" xlink:href="#__RefHeading___Toc481_4128384672" text:style-name="Index_20_Link" text:visited-style-name="Index_20_Link">2 Architectural guidelines<text:tab/>4</text:a></text:p>
          <text:p text:style-name="P16"><text:a xlink:type="simple" xlink:href="#__RefHeading___Toc483_4128384672" text:style-name="Index_20_Link" text:visited-style-name="Index_20_Link">2.1 Loosely coupled architecture<text:tab/>4</text:a></text:p>
          <text:p text:style-name="P16"><text:a xlink:type="simple" xlink:href="#__RefHeading___Toc485_4128384672" text:style-name="Index_20_Link" text:visited-style-name="Index_20_Link">2.2 Asynchronous component communication<text:tab/>4</text:a></text:p>
          <text:p text:style-name="P15"><text:a xlink:type="simple" xlink:href="#__RefHeading___Toc487_4128384672" text:style-name="Index_20_Link" text:visited-style-name="Index_20_Link">3 The Deployment view<text:tab/>5</text:a></text:p>
          <text:p text:style-name="P16"><text:a xlink:type="simple" xlink:href="#__RefHeading___Toc489_4128384672" text:style-name="Index_20_Link" text:visited-style-name="Index_20_Link">3.1 Software artifacts<text:tab/>5</text:a></text:p>
          <text:p text:style-name="P39"><text:a xlink:type="simple" xlink:href="#__RefHeading___Toc1110_3150971425" text:style-name="Index_20_Link" text:visited-style-name="Index_20_Link">3.1.1 Folder structure<text:tab/>5</text:a></text:p>
          <text:p text:style-name="P39"><text:a xlink:type="simple" xlink:href="#__RefHeading___Toc1112_3150971425" text:style-name="Index_20_Link" text:visited-style-name="Index_20_Link">3.1.2 Github<text:tab/>5</text:a></text:p>
          <text:p text:style-name="P39"><text:a xlink:type="simple" xlink:href="#__RefHeading___Toc1114_3150971425" text:style-name="Index_20_Link" text:visited-style-name="Index_20_Link">3.1.3 Music sources<text:tab/>6</text:a></text:p>
          <text:p text:style-name="P39"><text:a xlink:type="simple" xlink:href="#__RefHeading___Toc1116_3150971425" text:style-name="Index_20_Link" text:visited-style-name="Index_20_Link">3.1.4 Self-documenting python code.<text:tab/>6</text:a></text:p>
          <text:p text:style-name="P16"><text:a xlink:type="simple" xlink:href="#__RefHeading___Toc491_4128384672" text:style-name="Index_20_Link" text:visited-style-name="Index_20_Link">3.2 Target environment<text:tab/>7</text:a></text:p>
          <text:p text:style-name="P16"><text:a xlink:type="simple" xlink:href="#__RefHeading___Toc493_4128384672" text:style-name="Index_20_Link" text:visited-style-name="Index_20_Link">3.3 Software installation<text:tab/>8</text:a></text:p>
          <text:p text:style-name="P39"><text:a xlink:type="simple" xlink:href="#__RefHeading___Toc1118_3150971425" text:style-name="Index_20_Link" text:visited-style-name="Index_20_Link">3.3.1 Development: install script<text:tab/>8</text:a></text:p>
          <text:p text:style-name="P39"><text:a xlink:type="simple" xlink:href="#__RefHeading___Toc1120_3150971425" text:style-name="Index_20_Link" text:visited-style-name="Index_20_Link">3.3.2 Production<text:tab/>8</text:a></text:p>
          <text:p text:style-name="P16"><text:a xlink:type="simple" xlink:href="#__RefHeading___Toc495_4128384672" text:style-name="Index_20_Link" text:visited-style-name="Index_20_Link">3.4 Runtime<text:tab/>8</text:a></text:p>
          <text:p text:style-name="P16"><text:a xlink:type="simple" xlink:href="#__RefHeading___Toc497_4128384672" text:style-name="Index_20_Link" text:visited-style-name="Index_20_Link">3.5 Configuration<text:tab/>8</text:a></text:p>
          <text:p text:style-name="P16"><text:a xlink:type="simple" xlink:href="#__RefHeading___Toc499_4128384672" text:style-name="Index_20_Link" text:visited-style-name="Index_20_Link">3.6 System services<text:tab/>8</text:a></text:p>
          <text:p text:style-name="P15"><text:a xlink:type="simple" xlink:href="#__RefHeading___Toc1838_1246683851" text:style-name="Index_20_Link" text:visited-style-name="Index_20_Link">4 The Logical view: Class diagrams<text:tab/>10</text:a></text:p>
          <text:p text:style-name="P16"><text:a xlink:type="simple" xlink:href="#__RefHeading___Toc501_4128384672" text:style-name="Index_20_Link" text:visited-style-name="Index_20_Link">4.1 The top level diagram<text:tab/>10</text:a></text:p>
          <text:p text:style-name="P16"><text:a xlink:type="simple" xlink:href="#__RefHeading___Toc503_4128384672" text:style-name="Index_20_Link" text:visited-style-name="Index_20_Link">4.2 Messaging<text:tab/>11</text:a></text:p>
          <text:p text:style-name="P16"><text:a xlink:type="simple" xlink:href="#__RefHeading___Toc505_4128384672" text:style-name="Index_20_Link" text:visited-style-name="Index_20_Link">4.3 Remote Monitoring Service<text:tab/>13</text:a></text:p>
          <text:p text:style-name="P16"><text:a xlink:type="simple" xlink:href="#__RefHeading___Toc1122_3150971425" text:style-name="Index_20_Link" text:visited-style-name="Index_20_Link">4.4 USB Service<text:tab/>14</text:a></text:p>
          <text:p text:style-name="P16"><text:a xlink:type="simple" xlink:href="#__RefHeading___Toc1124_3150971425" text:style-name="Index_20_Link" text:visited-style-name="Index_20_Link">4.5 Wifi Service<text:tab/>15</text:a></text:p>
          <text:p text:style-name="P15"><text:a xlink:type="simple" xlink:href="#__RefHeading___Toc1840_1246683851" text:style-name="Index_20_Link" text:visited-style-name="Index_20_Link">5 The Logical view: State diagrams<text:tab/>16</text:a></text:p>
          <text:p text:style-name="P16"><text:a xlink:type="simple" xlink:href="#__RefHeading___Toc507_4128384672" text:style-name="Index_20_Link" text:visited-style-name="Index_20_Link">5.1 Maincontrol state<text:tab/>16</text:a></text:p>
          <text:p text:style-name="P16"><text:a xlink:type="simple" xlink:href="#__RefHeading___Toc509_4128384672" text:style-name="Index_20_Link" text:visited-style-name="Index_20_Link">5.2 Oradio Control States<text:tab/>17</text:a></text:p>
          <text:p text:style-name="P15"><text:a xlink:type="simple" xlink:href="#__RefHeading___Toc1842_1246683851" text:style-name="Index_20_Link" text:visited-style-name="Index_20_Link">6 The Physical view: Component diagrams<text:tab/>18</text:a></text:p>
          <text:p text:style-name="P16"><text:a xlink:type="simple" xlink:href="#__RefHeading___Toc511_4128384672" text:style-name="Index_20_Link" text:visited-style-name="Index_20_Link">6.1 OS Service<text:tab/>18</text:a></text:p>
          <text:p text:style-name="P16"><text:a xlink:type="simple" xlink:href="#__RefHeading___Toc513_4128384672" text:style-name="Index_20_Link" text:visited-style-name="Index_20_Link">6.2 Messaging (Commands)<text:tab/>19</text:a></text:p>
          <text:p text:style-name="P16"><text:a xlink:type="simple" xlink:href="#__RefHeading___Toc515_4128384672" text:style-name="Index_20_Link" text:visited-style-name="Index_20_Link">6.3 Music Players<text:tab/>20</text:a></text:p>
          <text:p text:style-name="P16"><text:a xlink:type="simple" xlink:href="#__RefHeading___Toc517_4128384672" text:style-name="Index_20_Link" text:visited-style-name="Index_20_Link">6.4 GPIO components<text:tab/>21</text:a></text:p>
          <text:p text:style-name="P15"><text:a xlink:type="simple" xlink:href="#__RefHeading___Toc1844_1246683851" text:style-name="Index_20_Link" text:visited-style-name="Index_20_Link">7 <text:s/>The Process view: Sequence diagrams<text:tab/>22</text:a></text:p>
          <text:p text:style-name="P16"><text:a xlink:type="simple" xlink:href="#__RefHeading___Toc519_4128384672" text:style-name="Index_20_Link" text:visited-style-name="Index_20_Link">7.1 Messaging<text:tab/>22</text:a></text:p>
          <text:p text:style-name="P15"><text:a xlink:type="simple" xlink:href="#__RefHeading___Toc1846_1246683851" text:style-name="Index_20_Link" text:visited-style-name="Index_20_Link">8 The scenario view: use case diagrams<text:tab/>23</text:a></text:p>
        </text:index-body>
      </text:table-of-content>
      <text:p text:style-name="Standard"/>
      <text:p text:style-name="Standard"/>
      <text:p text:style-name="Standard"/>
      <text:h text:style-name="P42" text:outline-level="1"><text:bookmark-start text:name="__RefHeading___Toc1826_1246683851"/>Architectural view <text:span text:style-name="T1">model</text:span><text:bookmark-end text:name="__RefHeading___Toc1826_1246683851"/></text:h>
      <text:p text:style-name="P4">The architecture 4+1 views are used to describing the software systems based on different viewpoints, to discover if the architecture fulfills the needs of the different stakeholders. The views will be <text:span text:style-name="T2">presented using the Unified Modeling Language (UML) tool</text:span></text:p>
      <text:p text:style-name="P20"><draw:frame draw:style-name="fr5" draw:name="Image1" text:anchor-type="char" svg:x="2.38mm" svg:y="-1.85mm" svg:width="132.29mm" svg:height="86.78mm" draw:z-index="0"><draw:image xlink:href="Pictures/10000001000001F400000148DBB0C7BA.png" xlink:type="simple" xlink:show="embed" xlink:actuate="onLoad" draw:mime-type="image/png"/></draw:frame>llibre</text:p>
      <text:h text:style-name="P47" text:outline-level="2"><text:bookmark-start text:name="__RefHeading___Toc1828_1246683851"/>The logical view<text:bookmark-end text:name="__RefHeading___Toc1828_1246683851"/></text:h>
      <text:p text:style-name="P3">The Logical View, often referred to as the “Class Diagram”. <text:s/>It focuses on the static structure of the system. This view deals with the essential components of the system, such as classes, objects, relationships, and their attributes. Class diagrams visually represent the classes and their associations in the system, to understand how various components interact with one another. This view provides insights into the overall design and organization of the system’s functionality.</text:p>
      <text:p text:style-name="P2">Related UML diagrams: </text:p>
      <text:list text:style-name="L1">
        <text:list-item>
          <text:p text:style-name="P72">Class diagrams</text:p>
        </text:list-item>
        <text:list-item>
          <text:p text:style-name="P72">Component diagram</text:p>
        </text:list-item>
      </text:list>
      <text:h text:style-name="P47" text:outline-level="2"><text:bookmark-start text:name="__RefHeading___Toc1830_1246683851"/>The Physical view<text:bookmark-end text:name="__RefHeading___Toc1830_1246683851"/></text:h>
      <text:p text:style-name="P3"><text:span text:style-name="T2">It concerns the topology of the software components on the physical infrastructure as well as the physical connections between components. </text:span>It includes details about servers, nodes, and their interconnections, <text:span text:style-name="T4">including defining the communication protocols</text:span> This view ensures that the system architecture aligns with the physical constraints and requirements.</text:p>
      <text:p text:style-name="P2">Related UML diagrams:</text:p>
      <text:list text:style-name="L2">
        <text:list-item>
          <text:p text:style-name="P73">Class diagrams</text:p>
        </text:list-item>
        <text:list-item>
          <text:p text:style-name="P73">State diagrams</text:p>
        </text:list-item>
        <text:list-item>
          <text:p text:style-name="P75">Component diagrams</text:p>
        </text:list-item>
      </text:list>
      <text:h text:style-name="P47" text:outline-level="2"><text:bookmark-start text:name="__RefHeading___Toc1832_1246683851"/><text:soft-page-break/>The De<text:span text:style-name="T4">velopment</text:span> view<text:bookmark-end text:name="__RefHeading___Toc1832_1246683851"/></text:h>
      <text:p text:style-name="P3"><text:span text:style-name="T2">The system from the perspective of the programmers (or the implementation view) and is concerned with software managemen</text:span><text:span text:style-name="T4">t. It map</text:span>s <text:span text:style-name="T4">the </text:span>logical design to physical code organization, clarifies module boundaries, dependencies, and re-usability.</text:p>
      <text:h text:style-name="P47" text:outline-level="2"><text:bookmark-start text:name="__RefHeading___Toc1834_1246683851"/>The Process view<text:bookmark-end text:name="__RefHeading___Toc1834_1246683851"/></text:h>
      <text:p text:style-name="P6"><text:span text:style-name="T2">The dynamic aspects of the system, </text:span>explains the system processes and how they communicate. <text:span text:style-name="T1">Models  </text:span><text:span text:style-name="T4">the dynamic behavior</text:span><text:span text:style-name="T1">, execution flow, threading, synchronization, performance, and fault tolerance.</text:span></text:p>
      <text:p text:style-name="P1">Related UML diagrams:</text:p>
      <text:list text:style-name="L3">
        <text:list-item>
          <text:p text:style-name="P67">Sequence diagrams, </text:p>
        </text:list-item>
        <text:list-item>
          <text:p text:style-name="P67">Activity diagrams</text:p>
        </text:list-item>
        <text:list-item>
          <text:p text:style-name="P68">State diagrams</text:p>
        </text:list-item>
      </text:list>
      <text:h text:style-name="P48" text:outline-level="2"><text:bookmark-start text:name="__RefHeading___Toc1836_1246683851"/>The Scenarios (or use case view)<text:bookmark-end text:name="__RefHeading___Toc1836_1246683851"/></text:h>
      <text:p text:style-name="P5"><text:span text:style-name="T4">It captures what the system does from an end-user perspective. </text:span>The description of an architecture is illustrated using a small set of <text:span text:style-name="T3">use case</text:span>, or scenarios, which become a fifth view. The scenarios describe sequences of interactions between objects and between processes. They are used to identify architectural elements and to illustrate and validate the architecture design. </text:p>
      <text:p text:style-name="P2">Related UML diagrams:</text:p>
      <text:list text:style-name="L4">
        <text:list-item>
          <text:p text:style-name="P74">Use Case diagram</text:p>
        </text:list-item>
      </text:list>
      <text:p text:style-name="P5"/>
      <text:h text:style-name="P43" text:outline-level="1"/>
      <text:h text:style-name="P45" text:outline-level="1"><text:bookmark-start text:name="__RefHeading___Toc481_4128384672"/>Architectural guidelines<text:bookmark-end text:name="__RefHeading___Toc481_4128384672"/></text:h>
      <text:h text:style-name="Heading_20_2" text:outline-level="2"><text:bookmark-start text:name="__RefHeading___Toc483_4128384672"/>Loosely coupled architecture<text:bookmark-end text:name="__RefHeading___Toc483_4128384672"/></text:h>
      <text:p text:style-name="P8">The architecture should follow the guidelines for loosely coupled architecture. A loosely coupled architecture is a design principle in which system components are weakly associated. This means that each component can operate independently, allowing for greater flexibility in system design and maintenance. </text:p>
      <text:p text:style-name="P8">Key characteristics:</text:p>
      <text:list text:style-name="L5">
        <text:list-item>
          <text:p text:style-name="P77">Changes made to one component have minimal impact on others, which enhances the overall resilience of the system</text:p>
        </text:list-item>
        <text:list-item>
          <text:p text:style-name="P76">Each component has little or no knowledge of the internal workings of other components.</text:p>
        </text:list-item>
        <text:list-item>
          <text:p text:style-name="P76">Systems can scale more easily as components can be modified or replaced independently.</text:p>
        </text:list-item>
        <text:list-item>
          <text:p text:style-name="P78">Each component can be developed, deployed, tested and maintained independently</text:p>
        </text:list-item>
      </text:list>
      <text:h text:style-name="P49" text:outline-level="2"><text:bookmark-start text:name="__RefHeading___Toc485_4128384672"/>Asynchronous component communication<text:bookmark-end text:name="__RefHeading___Toc485_4128384672"/></text:h>
      <text:p text:style-name="P29">A loosely coupled architecture using a queue allows different components of a system to communicate asynchronously, meaning they can operate independently without being directly connected. </text:p>
      <text:p text:style-name="P30">The component communication uses the publish/subscriber model, in which a communication queue will be assigned to each of the subscribers. When a new message is published, the related message Topic will be distributed to the assigned subscribers queue.</text:p>
      <text:p text:style-name="P9">Key characteristics:</text:p>
      <text:list text:style-name="L6">
        <text:list-item>
          <text:p text:style-name="P79"><text:span text:style-name="T15">Independence:</text:span> Producers and consumers don’t need to know about each other. They only interact with the queue, reducing direct dependencies.</text:p>
        </text:list-item>
        <text:list-item>
          <text:p text:style-name="P79"><text:span text:style-name="T14">Failure isolation: </text:span>If one component fails, the queue allows other components to continue functioning. This isolation minimizes the impact of failures on the overall system.</text:p>
        </text:list-item>
        <text:list-item>
          <text:p text:style-name="P79">Asynchronous Communication: Components can communicate without waiting for each other to respond, which reduces downtime and improves responsiveness.</text:p>
        </text:list-item>
        <text:list-item>
          <text:p text:style-name="P80">Buffering: They act as buffers that store messages until the receiving service is ready to process them. This helps manage varying loads and prevents service overload</text:p>
        </text:list-item>
      </text:list>
      <text:p text:style-name="P21"/>
      <text:p text:style-name="P22"/>
      <text:h text:style-name="P46" text:outline-level="1"><text:bookmark-start text:name="__RefHeading___Toc487_4128384672"/>The Deployment view<text:bookmark-end text:name="__RefHeading___Toc487_4128384672"/></text:h>
      <text:h text:style-name="P50" text:outline-level="2"><text:bookmark-start text:name="__RefHeading___Toc489_4128384672"/>Software <text:span text:style-name="T17">artifacts</text:span><text:bookmark-end text:name="__RefHeading___Toc489_4128384672"/></text:h>
      <text:h text:style-name="Heading_20_3" text:outline-level="3"><text:bookmark-start text:name="__RefHeading___Toc1110_3150971425"/>Folder structur<text:span text:style-name="T32">e</text:span><text:bookmark-end text:name="__RefHeading___Toc1110_3150971425"/></text:h>
      <text:p text:style-name="Text_20_body"><draw:frame draw:style-name="fr5" draw:name="Image12" text:anchor-type="char" svg:x="1.66mm" svg:y="1.39mm" svg:width="63.76mm" svg:height="66.15mm" draw:z-index="11"><draw:image xlink:href="Pictures/10000001000000F1000000FAEBF78A04.png" xlink:type="simple" xlink:show="embed" xlink:actuate="onLoad" draw:mime-type="image/png"/></draw:frame></text:p>
      <text:p text:style-name="P82">The folder structure of the Oradio project :</text:p>
      <text:list text:style-name="L7">
        <text:list-item>
          <text:p text:style-name="P83">Documents: for design documentation</text:p>
        </text:list-item>
        <text:list-item>
          <text:p text:style-name="P83">install_resources: resources related to configuration files, system service file, shell scripts required for installation of Oradio project.</text:p>
        </text:list-item>
        <text:list-item>
          <text:p text:style-name="P83">Main: the python modules</text:p>
        </text:list-item>
        <text:list-item>
          <text:p text:style-name="P83">module_test: module test python programs</text:p>
        </text:list-item>
        <text:list-item>
          <text:p text:style-name="P83">system_sounds: sound files (wav) for system related sound (e.g. click.wav for touch button click sound)</text:p>
        </text:list-item>
        <text:list-item>
          <text:p text:style-name="P83">tools: shell scripts</text:p>
        </text:list-item>
        <text:list-item>
          <text:p text:style-name="P83">webapp: resources required for the web-interface.</text:p>
        </text:list-item>
        <text:list-item>
          <text:p text:style-name="P84"><text:span text:style-name="T33">LICENSE: The </text:span><text:span text:style-name="T34">GNU general public license, which is </text:span>is required to include to inform users of their rights and obligations regarding the software. This ensures proper attribution and compliance with the terms of the license.</text:p>
        </text:list-item>
        <text:list-item>
          <text:p text:style-name="P88">oradio_install.sh: install script to install a fresh Oradio project from scratch</text:p>
        </text:list-item>
        <text:list-item>
          <text:p text:style-name="P88">README.md: install instructions</text:p>
        </text:list-item>
      </text:list>
      <text:h text:style-name="Heading_20_3" text:outline-level="3"><text:bookmark-start text:name="__RefHeading___Toc1112_3150971425"/>Github<text:bookmark-end text:name="__RefHeading___Toc1112_3150971425"/></text:h>
      <text:p text:style-name="P40">GitHub is a cloud-based platform for hosting and managing code that allows developers to collaborate on projects using version control. It is primarily used for storing code, tracking changes, and facilitating teamwork on software development projects. In this project github will be used for:</text:p>
      <text:list text:style-name="L8">
        <text:list-item>
          <text:p text:style-name="P85"><text:soft-page-break/><text:span text:style-name="T31">Version Control: to track changes in code over time.</text:span></text:p>
        </text:list-item>
        <text:list-item>
          <text:p text:style-name="P85">Repositories: to store code, <text:span text:style-name="T31">enabling</text:span> shar<text:span text:style-name="T31">ing of code</text:span> and collaborat<text:span text:style-name="T31">ion</text:span></text:p>
        </text:list-item>
        <text:list-item>
          <text:p text:style-name="P85">Pull Requests: <text:span text:style-name="T31">method to </text:span>propose changes to a project, allowing for code review and discussion before integration.</text:p>
        </text:list-item>
        <text:list-item>
          <text:p text:style-name="P85"><text:span text:style-name="T31">Issue tracking: </text:span>to track bugs and feature requests, <text:span text:style-name="T31">to </text:span>manage the <text:span text:style-name="T31">projects</text:span> workflow.</text:p>
        </text:list-item>
      </text:list>
      <text:h text:style-name="Heading_20_3" text:outline-level="3"><text:bookmark-start text:name="__RefHeading___Toc1114_3150971425"/>Music sources<text:bookmark-end text:name="__RefHeading___Toc1114_3150971425"/></text:h>
      <text:p text:style-name="Text_20_body"/>
      <text:p text:style-name="P89">The Oradio is a music player that can play music from different sources:</text:p>
      <text:list text:style-name="L9">
        <text:list-item>
          <text:p text:style-name="P86"><text:span text:style-name="T35">Music that is provided </text:span><text:span text:style-name="T34">on </text:span><text:span text:style-name="T35">the </text:span><text:span text:style-name="T34">USB memory device.</text:span></text:p>
        </text:list-item>
        <text:list-item>
          <text:p text:style-name="P90">A music stream from a web-radio</text:p>
        </text:list-item>
        <text:list-item>
          <text:p text:style-name="P90">A music stream from Spotify player application</text:p>
        </text:list-item>
      </text:list>
      <text:h text:style-name="Heading_20_3" text:outline-level="3"><text:bookmark-start text:name="__RefHeading___Toc1116_3150971425"/>Self-documenting python code. <text:bookmark-end text:name="__RefHeading___Toc1116_3150971425"/></text:h>
      <text:p text:style-name="Text_20_body"/>
      <text:p text:style-name="P34">Module headers should <text:span text:style-name="T30">have following Google style docstring formatting:</text:span></text:p>
      <text:list text:style-name="L10">
        <text:list-item>
          <text:p text:style-name="P92"><draw:frame text:anchor-type="paragraph" draw:z-index="7" draw:name="Text Frame 2" draw:style-name="gr1" draw:text-style-name="P114" svg:width="149.53mm" svg:height="86.16mm" svg:x="-3.42mm" svg:y="0.04mm"><draw:text-box><text:p><text:span text:style-name="T39">"""</text:span></text:p><text:p text:style-name="P113"><text:span text:style-name="T40"/></text:p><text:p text:style-name="P113"><text:span text:style-name="T39"><text:s text:c="2"/></text:span><text:span text:style-name="T39">#### <text:s text:c="2"/>##### <text:s text:c="4"/>## <text:s text:c="3"/>##### <text:s text:c="5"/># <text:s text:c="4"/>####</text:span></text:p><text:p text:style-name="P113"><text:span text:style-name="T39"><text:s/></text:span><text:span text:style-name="T39"># <text:s text:c="3"/># <text:s/># <text:s text:c="3"/># <text:s text:c="2"/># <text:s/># <text:s text:c="2"/># <text:s text:c="3"/># <text:s text:c="4"/># <text:s text:c="3"/># <text:s text:c="3"/>#</text:span></text:p><text:p text:style-name="P113"><text:span text:style-name="T39"><text:s/></text:span><text:span text:style-name="T39"># <text:s text:c="3"/># <text:s/># <text:s text:c="3"/># <text:s/># <text:s text:c="3"/># <text:s/># <text:s text:c="3"/># <text:s text:c="4"/># <text:s text:c="3"/># <text:s text:c="3"/>#</text:span></text:p><text:p text:style-name="P113"><text:span text:style-name="T39"><text:s/></text:span><text:span text:style-name="T39"># <text:s text:c="3"/># <text:s/>##### <text:s text:c="2"/>###### <text:s/># <text:s text:c="3"/># <text:s text:c="4"/># <text:s text:c="3"/># <text:s text:c="3"/>#</text:span></text:p><text:p text:style-name="P113"><text:span text:style-name="T39"><text:s/></text:span><text:span text:style-name="T39"># <text:s text:c="3"/># <text:s/># <text:s text:c="2"/># <text:s text:c="2"/># <text:s text:c="3"/># <text:s/># <text:s text:c="3"/># <text:s text:c="4"/># <text:s text:c="3"/># <text:s text:c="3"/>#</text:span></text:p><text:p text:style-name="P113"><text:span text:style-name="T39"><text:s text:c="2"/></text:span><text:span text:style-name="T39">#### <text:s text:c="2"/># <text:s text:c="3"/># <text:s/># <text:s text:c="3"/># <text:s/>##### <text:s text:c="5"/># <text:s text:c="4"/>####</text:span></text:p><text:p text:style-name="P113"><text:span text:style-name="T40"/></text:p><text:p text:style-name="P113"><text:span text:style-name="T40"/></text:p><text:p text:style-name="P113"><text:span text:style-name="T39">Created on May 28, 2026</text:span></text:p><text:p text:style-name="P113"><text:span text:style-name="T41">@author:</text:span><text:span text:style-name="T39"> <text:s text:c="7"/></text:span><text:span text:style-name="T42">Henk</text:span><text:span text:style-name="T39"> </text:span><text:span text:style-name="T42">Stevens</text:span><text:span text:style-name="T39"> &amp; </text:span><text:span text:style-name="T42">Olaf</text:span><text:span text:style-name="T39"> </text:span><text:span text:style-name="T42">Mastenbroek</text:span><text:span text:style-name="T39"> &amp; </text:span><text:span text:style-name="T42">Onno</text:span><text:span text:style-name="T39"> </text:span><text:span text:style-name="T42">Janssen</text:span></text:p><text:p text:style-name="P113"><text:span text:style-name="T41">@copyright:</text:span><text:span text:style-name="T39"> <text:s text:c="4"/>Copyright, </text:span><text:span text:style-name="T42">Oradio</text:span><text:span text:style-name="T39"> </text:span><text:span text:style-name="T42">Stichting</text:span></text:p><text:p text:style-name="P113"><text:span text:style-name="T41">@license:</text:span><text:span text:style-name="T39"> <text:s text:c="6"/>GNU General Public License (GPL)</text:span></text:p><text:p text:style-name="P113"><text:span text:style-name="T41">@organization:</text:span><text:span text:style-name="T39"> <text:s/></text:span><text:span text:style-name="T42">Oradio</text:span><text:span text:style-name="T39"> </text:span><text:span text:style-name="T42">Stichting</text:span></text:p><text:p text:style-name="P113"><text:span text:style-name="T41">@version:</text:span><text:span text:style-name="T39"> <text:s text:c="6"/>1</text:span></text:p><text:p text:style-name="P113"><text:span text:style-name="T41">@email:</text:span><text:span text:style-name="T39"> <text:s text:c="8"/></text:span><text:span text:style-name="T42">oradioinfo@stichtingoradio.nl</text:span></text:p><text:p text:style-name="P113"><text:span text:style-name="T41">@status:</text:span><text:span text:style-name="T39"> <text:s text:c="7"/>Development</text:span></text:p><text:p text:style-name="P113"><text:span text:style-name="T41">@summary:</text:span><text:span text:style-name="T39"> <text:s text:c="6"/>One line summary of the module</text:span></text:p><text:p text:style-name="P113"><text:span text:style-name="T43">@description:</text:span><text:span text:style-name="T39"> <text:s text:c="2"/>Detailed description of module</text:span></text:p><text:p text:style-name="P113"><text:span text:style-name="T39">"""</text:span></text:p></draw:text-box></draw:frame>@author: the author(s)</text:p>
        </text:list-item>
        <text:list-item>
          <text:p text:style-name="P92">@copywright, @license, @organization, @version, @email, @status: open-source related information.</text:p>
        </text:list-item>
        <text:list-item>
          <text:p text:style-name="P87"><text:span text:style-name="T31">@s</text:span><text:span text:style-name="T36">ummary: one-line summary of module</text:span></text:p>
        </text:list-item>
        <text:list-item>
          <text:p text:style-name="P87"><text:span text:style-name="T31">@</text:span><text:span text:style-name="T36">description: </text:span><text:span text:style-name="T31">detailed description of modules</text:span></text:p>
        </text:list-item>
        <text:list-item>
          <text:p text:style-name="P87"><text:span text:style-name="T27">For each class, method or function there should be Google </text:span><text:span text:style-name="T28">style</text:span><text:span text:style-name="T27"> </text:span><text:span text:style-name="T28">documentation strings (</text:span><text:span text:style-name="T27">docstring</text:span><text:span text:style-name="T28">)</text:span><text:span text:style-name="T27"> , with </text:span><text:span text:style-name="T28">following format:</text:span></text:p>
        </text:list-item>
      </text:list>
      <text:p text:style-name="P31"><draw:frame text:anchor-type="char" draw:z-index="6" draw:name="Text Frame 1" draw:style-name="gr2" draw:text-style-name="P116" svg:width="142.23mm" svg:height="64.44mm" svg:x="34.38mm" svg:y="0.81mm"><draw:text-box><text:p text:style-name="P115"><text:span text:style-name="T44">def example_function(param1, param2): <text:s text:c="3"/></text:span></text:p><text:p text:style-name="P115"><text:span text:style-name="T44"><text:s text:c="4"/></text:span><text:span text:style-name="T44">"""Summary line.</text:span></text:p><text:p text:style-name="P115"><text:span text:style-name="T44"/></text:p><text:p text:style-name="P115"><text:span text:style-name="T44"><text:s text:c="4"/></text:span><text:span text:style-name="T44">Detailed description of the function's purpose and behavior.</text:span></text:p><text:p text:style-name="P115"><text:span text:style-name="T44"/></text:p><text:p text:style-name="P115"><text:span text:style-name="T44"><text:s text:c="4"/></text:span><text:span text:style-name="T44">Args:</text:span></text:p><text:p text:style-name="P115"><text:span text:style-name="T44"><text:s text:c="8"/></text:span><text:span text:style-name="T44">param1 (int): Description of the first parameter.</text:span></text:p><text:p text:style-name="P115"><text:span text:style-name="T44"><text:s text:c="8"/></text:span><text:span text:style-name="T44">param2 (str): Description of the second parameter.</text:span></text:p><text:p text:style-name="P115"><text:span text:style-name="T44"/></text:p><text:p text:style-name="P115"><text:span text:style-name="T44"><text:s text:c="4"/></text:span><text:span text:style-name="T44">Returns: <text:s text:c="7"/>bool: True if successful, False otherwise.</text:span></text:p><text:p text:style-name="P115"><text:span text:style-name="T44"/></text:p><text:p text:style-name="P115"><text:span text:style-name="T44"><text:s text:c="4"/></text:span><text:span text:style-name="T44">Raises: <text:s text:c="7"/>ValueError: If param1 is negative.</text:span></text:p><text:p text:style-name="P115"><text:span text:style-name="T44"><text:s text:c="4"/></text:span><text:span text:style-name="T44">Examples:</text:span></text:p><text:p text:style-name="P115"><text:span text:style-name="T44"><text:s text:c="8"/></text:span><text:span text:style-name="T44">&gt;&gt;&gt; example_function(1, 'test')</text:span></text:p><text:p text:style-name="P115"><text:span text:style-name="T44"><text:s text:c="8"/></text:span><text:span text:style-name="T44">True</text:span></text:p><text:p text:style-name="P115"><text:span text:style-name="T44"><text:s text:c="4"/></text:span><text:span text:style-name="T44">"""</text:span></text:p></draw:text-box></draw:frame><text:soft-page-break/></text:p>
      <text:list text:style-name="L11">
        <text:list-item>
          <text:list>
            <text:list-item>
              <text:p text:style-name="P93"><text:span text:style-name="T9">Summary line</text:span><text:span text:style-name="T27">: </text:span>A brief description of the module, class, or function, limited to one line.</text:p>
            </text:list-item>
            <text:list-item>
              <text:p text:style-name="P93"><text:span text:style-name="T6">Detailed Description:</text:span> This section provides a more comprehensive explanation of the code's purpose and usag<text:span text:style-name="T29">e. </text:span></text:p>
            </text:list-item>
            <text:list-item>
              <text:p text:style-name="P93"><text:span text:style-name="T9">Se</text:span><text:span text:style-name="T6">ctions</text:span>:</text:p>
            </text:list-item>
          </text:list>
        </text:list-item>
      </text:list>
      <table:table table:name="Table2" table:style-name="Table2">
        <table:table-column table:style-name="Table2.A"/>
        <table:table-column table:style-name="Table2.B"/>
        <table:table-row>
          <table:table-cell table:style-name="Table2.A1" office:value-type="string">
            <text:p text:style-name="P27">Section</text:p>
          </table:table-cell>
          <table:table-cell table:style-name="Table2.B1" office:value-type="string">
            <text:p text:style-name="P27">Description</text:p>
          </table:table-cell>
        </table:table-row>
        <table:table-row>
          <table:table-cell table:style-name="Table2.A2" office:value-type="string">
            <text:p text:style-name="P27">Args</text:p>
          </table:table-cell>
          <table:table-cell table:style-name="Table2.B2" office:value-type="string">
            <text:p text:style-name="P28">Lists the parameters accepted by the function, including their types.</text:p>
          </table:table-cell>
        </table:table-row>
        <table:table-row>
          <table:table-cell table:style-name="Table2.A2" office:value-type="string">
            <text:p text:style-name="P27">Returns</text:p>
          </table:table-cell>
          <table:table-cell table:style-name="Table2.B2" office:value-type="string">
            <text:p text:style-name="P28">Describes the return value and its type.</text:p>
          </table:table-cell>
        </table:table-row>
        <table:table-row>
          <table:table-cell table:style-name="Table2.A2" office:value-type="string">
            <text:p text:style-name="P27">Raises</text:p>
          </table:table-cell>
          <table:table-cell table:style-name="Table2.B2" office:value-type="string">
            <text:p text:style-name="Table_20_Contents">Lists exceptions that the function may raise, along with conditions.</text:p>
          </table:table-cell>
        </table:table-row>
        <table:table-row>
          <table:table-cell table:style-name="Table2.A2" office:value-type="string">
            <text:p text:style-name="P27">Examples</text:p>
          </table:table-cell>
          <table:table-cell table:style-name="Table2.B2" office:value-type="string">
            <text:p text:style-name="Table_20_Contents">Provides usage examples to illustrate how to use the function or class.</text:p>
          </table:table-cell>
        </table:table-row>
      </table:table>
      <text:p text:style-name="P32"/>
      <text:p text:style-name="P33"/>
      <text:h text:style-name="P50" text:outline-level="2"><text:bookmark-start text:name="__RefHeading___Toc491_4128384672"/>Target environment<text:bookmark-end text:name="__RefHeading___Toc491_4128384672"/></text:h>
      <text:list text:style-name="L12">
        <text:list-item>
          <text:p text:style-name="P81">The RaspberryPi-3<text:span text:style-name="T25">A+</text:span> <text:span text:style-name="T18">headless </text:span>module will be used as central control unit, providing hardware for:</text:p>
          <text:list>
            <text:list-item>
              <text:p text:style-name="P81">Connectivity: WiFi, Bluetooth, Ethernet, USB</text:p>
            </text:list-item>
            <text:list-item>
              <text:p text:style-name="P81">Input/Output pinning <text:span text:style-name="T16">(GPIO)</text:span>: for user interface, as buttons and led indications</text:p>
            </text:list-item>
            <text:list-item>
              <text:p text:style-name="P94"><text:span text:style-name="T16">RaspiOS: </text:span>Raspberry Pi OS <text:span text:style-name="T16">(open-source) </text:span>is a Unix-like operating system developed for the Raspberry Pi line of single-board computers. Based on Debian, a Linux distribution, it is maintained by Raspberry Pi Holdings and optimized for the Pi's hardware, with low memory requirements and support for both 32-bit and 64-bit architectures. </text:p>
            </text:list-item>
            <text:list-item>
              <text:p text:style-name="P95">Extension interface at GPIO for Audio Playback (DigiAmp), touch buttons, volume knob and led drivers.</text:p>
            </text:list-item>
          </text:list>
        </text:list-item>
        <text:list-item>
          <text:p text:style-name="P99">Raspberry Pi OS: latest version, after being tested by developers</text:p>
        </text:list-item>
        <text:list-item>
          <text:p text:style-name="P100"><text:soft-page-break/>Python is the programming environment, <text:span text:style-name="T18">which</text:span> has a wide range of libraries specifically designed for hardware interaction, created by other developers, eliminating to write everything from scratch. Comes preinstalled on <text:span text:style-name="T18">the </text:span>Raspi-OS</text:p>
        </text:list-item>
      </text:list>
      <text:p text:style-name="P17"/>
      <text:h text:style-name="P50" text:outline-level="2"><text:bookmark-start text:name="__RefHeading___Toc493_4128384672"/>Software installation<text:bookmark-end text:name="__RefHeading___Toc493_4128384672"/></text:h>
      <text:h text:style-name="P65" text:outline-level="3"><text:bookmark-start text:name="__RefHeading___Toc1118_3150971425"/>Development: install script<text:bookmark-end text:name="__RefHeading___Toc1118_3150971425"/></text:h>
      <text:p text:style-name="P36">The install shell script will install and configure the environment for the Oradio:</text:p>
      <text:list text:style-name="L13">
        <text:list-item>
          <text:p text:style-name="P91">logging: create logging folders</text:p>
        </text:list-item>
        <text:list-item>
          <text:p text:style-name="P101">services: install services, using the service templates in install_resources folder. Enable and start these services.</text:p>
        </text:list-item>
        <text:list-item>
          <text:p text:style-name="P101">Linux packages: install required Linux packages</text:p>
        </text:list-item>
        <text:list-item>
          <text:p text:style-name="P101">Python packages: install required Python packages</text:p>
        </text:list-item>
        <text:list-item>
          <text:p text:style-name="P101">Configuration: adapt configuration files </text:p>
        </text:list-item>
      </text:list>
      <text:h text:style-name="P66" text:outline-level="3"><text:bookmark-start text:name="__RefHeading___Toc1120_3150971425"/>Production<text:bookmark-end text:name="__RefHeading___Toc1120_3150971425"/></text:h>
      <text:p text:style-name="P37">For production an image is created from a released software version. The “scrum-master” is responsible for handing over an image for production.</text:p>
      <text:h text:style-name="P50" text:outline-level="2"><text:bookmark-start text:name="__RefHeading___Toc495_4128384672"/>Runtime <text:bookmark-end text:name="__RefHeading___Toc495_4128384672"/></text:h>
      <text:list text:style-name="L14">
        <text:list-item>
          <text:p text:style-name="P96">runs on boot</text:p>
        </text:list-item>
        <text:list-item>
          <text:p text:style-name="P96">logging</text:p>
        </text:list-item>
        <text:list-item>
          <text:p text:style-name="P96">handling errors</text:p>
        </text:list-item>
      </text:list>
      <text:h text:style-name="P50" text:outline-level="2"><text:bookmark-start text:name="__RefHeading___Toc497_4128384672"/>Configuration<text:bookmark-end text:name="__RefHeading___Toc497_4128384672"/></text:h>
      <text:list text:style-name="L15">
        <text:list-item>
          <text:p text:style-name="P97">Configuration items: </text:p>
          <text:list>
            <text:list-item>
              <text:p text:style-name="P97">config.txt, </text:p>
            </text:list-item>
            <text:list-item>
              <text:p text:style-name="P97">asound.conf, </text:p>
            </text:list-item>
            <text:list-item>
              <text:p text:style-name="P97">mpd.conf,</text:p>
            </text:list-item>
            <text:list-item>
              <text:p text:style-name="P97">logrotate.conf</text:p>
            </text:list-item>
          </text:list>
        </text:list-item>
        <text:list-item>
          <text:p text:style-name="P97">??</text:p>
        </text:list-item>
      </text:list>
      <text:h text:style-name="P50" text:outline-level="2"><text:bookmark-start text:name="__RefHeading___Toc499_4128384672"/>System services<text:bookmark-end text:name="__RefHeading___Toc499_4128384672"/></text:h>
      <text:list text:style-name="L16">
        <text:list-item>
          <text:p text:style-name="P98">systemd services:</text:p>
          <text:list>
            <text:list-item>
              <text:p text:style-name="P98">librespot.service</text:p>
            </text:list-item>
            <text:list-item>
              <text:p text:style-name="P98"><text:soft-page-break/>mpd.service</text:p>
            </text:list-item>
            <text:list-item>
              <text:p text:style-name="P98">oradio.service</text:p>
            </text:list-item>
            <text:list-item>
              <text:p text:style-name="P98">usb_low_idle_power_service: <text:span text:style-name="T26">( still needed??)</text:span></text:p>
            </text:list-item>
          </text:list>
        </text:list-item>
        <text:list-item>
          <text:p text:style-name="P98">Dynamic device management: Udev rules for USB devices</text:p>
        </text:list-item>
        <text:list-item>
          <text:p text:style-name="P98"/>
        </text:list-item>
      </text:list>
      <text:h text:style-name="P44" text:outline-level="1"><text:bookmark-start text:name="__RefHeading___Toc1838_1246683851"/>The Logical view: Class diagrams<text:bookmark-end text:name="__RefHeading___Toc1838_1246683851"/></text:h>
      <text:p text:style-name="P11"><text:span text:style-name="T10">The </text:span><text:span text:style-name="T11">Oradio3 </text:span><text:span text:style-name="T10">software layering typically consists of three main layers: </text:span></text:p>
      <text:list text:style-name="L17">
        <text:list-item>
          <text:p text:style-name="P69"><text:span text:style-name="T10">the </text:span><text:span text:style-name="T7">hardware </text:span><text:span text:style-name="T8">abstraction </text:span><text:span text:style-name="T7">layer </text:span><text:span text:style-name="T12">(HAL)</text:span><text:span text:style-name="T10">, which includes the physical components.</text:span></text:p>
        </text:list-item>
        <text:list-item>
          <text:p text:style-name="P69"><text:span text:style-name="T10">the </text:span><text:span text:style-name="T7">middle-ware layer</text:span><text:span text:style-name="T10">, which facilitates communication and </text:span><text:span text:style-name="T12">d</text:span><text:span text:style-name="T10">ata management between the hardware and applications. </text:span><text:span text:style-name="T12">The OS services is considered to be part of this layer</text:span></text:p>
        </text:list-item>
        <text:list-item>
          <text:p text:style-name="P70">the <text:span text:style-name="T6">application layer</text:span>, where the actual software applications run and perform specific tasks.</text:p>
        </text:list-item>
        <text:list-item>
          <text:p text:style-name="P71">the <text:span text:style-name="T6">globals&amp;utils layer</text:span>, which provide global and public functions </text:p>
        </text:list-item>
      </text:list>
      <text:p text:style-name="P10"/>
      <text:p text:style-name="P10">The diagrams are organized from a top-level view and for each python module the class design.</text:p>
      <text:h text:style-name="P51" text:outline-level="2"><text:bookmark-start text:name="__RefHeading___Toc501_4128384672"/>The top level diagram<text:bookmark-end text:name="__RefHeading___Toc501_4128384672"/></text:h>
      <text:p text:style-name="P12">There is one application running, <text:span text:style-name="T21">being the</text:span> <text:span text:style-name="T21">python module </text:span>oradio_control.py, which will initialize and create all instances necessary for the operation. The execute() function indicates that oradio_control.py is executed and running.</text:p>
      <text:p text:style-name="P12"><draw:frame draw:style-name="fr5" draw:name="Image2" text:anchor-type="char" svg:x="0.69mm" svg:y="-2.17mm" svg:width="170mm" svg:height="120.19mm" draw:z-index="8"><draw:image xlink:href="Pictures/10000000000004630000031A99FF82D0.jpg" xlink:type="simple" xlink:show="embed" xlink:actuate="onLoad" draw:mime-type="image/jpeg"/></draw:frame></text:p>
      <text:p text:style-name="P12">Most of the classes (stereotype &lt;&lt;class&gt;&gt;) will be instantiated during <text:span text:style-name="T21">initialization phase of </text:span>execution. </text:p>
      <text:p text:style-name="P35">The throttled_monitor is <text:span text:style-name="T24">globally </text:span>instantiated, a monitoring thread will be started, to check the condition of the raspberrypi. </text:p>
      <text:p text:style-name="P12">The global methods or functions are represented in the GLOBAL&amp;UTILS layer, as these functions are public, being:</text:p>
      <text:list text:style-name="L18">
        <text:list-item>
          <text:p text:style-name="P102">oradio_log.<text:span text:style-name="T13">xx</text:span>()</text:p>
        </text:list-item>
        <text:list-item>
          <text:p text:style-name="P102"><text:soft-page-break/>play_sound()</text:p>
        </text:list-item>
        <text:list-item>
          <text:p text:style-name="P102">subscribe<text:span text:style-name="T13">_commands(), subscribe_errors(), publish_command(),publish_error()</text:span></text:p>
        </text:list-item>
      </text:list>
      <text:h text:style-name="P52" text:outline-level="2"><text:bookmark-start text:name="__RefHeading___Toc503_4128384672"/>Messaging<text:bookmark-end text:name="__RefHeading___Toc503_4128384672"/></text:h>
      <text:p text:style-name="P13"><draw:frame draw:style-name="fr4" draw:name="Image3" text:anchor-type="char" svg:width="170mm" svg:height="120.19mm" draw:z-index="9"><draw:image xlink:href="Pictures/10000000000004630000031AB58075B7.jpg" xlink:type="simple" xlink:show="embed" xlink:actuate="onLoad" draw:mime-type="image/jpeg"/></draw:frame></text:p>
      <text:p text:style-name="P38">The messaging.py module provides services for the publish-subscribe model as inter-module communication. It is a messaging pattern where publishers send messages to a topic without knowing who the subscribers are, while subscribers express interest in specific topics to receive those messages. This model allows for asynchronous communication and decouples the components, enhancing scalability and flexibility in distributed systems.</text:p>
      <text:p text:style-name="P25">The module has a public API to subscribe to a <text:s/>certain Topic or publish a <text:s/>message to a Topic. The defined Topics are:</text:p>
      <text:list text:style-name="L19">
        <text:list-item>
          <text:p text:style-name="P103">COMMAND: representing a command</text:p>
        </text:list-item>
        <text:list-item>
          <text:p text:style-name="P103">ERROR: representing an error code</text:p>
        </text:list-item>
      </text:list>
      <text:p text:style-name="P25">The public API provides following methods:</text:p>
      <text:list text:style-name="L20">
        <text:list-item>
          <text:p text:style-name="P104">subscribe_commands(): subscribe to Message Topic, returning a message queue to monitor for new commands</text:p>
        </text:list-item>
        <text:list-item>
          <text:p text:style-name="P104">publish_command(message: CommandMessage): <text:s/>publish a command to COMMAND Topic</text:p>
        </text:list-item>
        <text:list-item>
          <text:p text:style-name="P104"><text:soft-page-break/>subscribe_errors(): subscribe to Error Topic, returning a message queue to monitor for new errors </text:p>
        </text:list-item>
        <text:list-item>
          <text:p text:style-name="P104">publish_error(message: ErrorMessage): publish a command to ERROR Topic</text:p>
        </text:list-item>
      </text:list>
      <text:p text:style-name="P18"/>
      <text:p text:style-name="P14"/>
      <text:h text:style-name="P52" text:outline-level="2"><text:bookmark-start text:name="__RefHeading___Toc505_4128384672"/>Remote Monitoring Service<text:bookmark-end text:name="__RefHeading___Toc505_4128384672"/></text:h>
      <text:p text:style-name="P13"><draw:frame draw:style-name="fr1" draw:name="Image4" text:anchor-type="char" svg:width="170mm" svg:height="120.19mm" draw:z-index="10"><draw:image xlink:href="Pictures/10000000000004630000031AECAA9034.jpg" xlink:type="simple" xlink:show="embed" xlink:actuate="onLoad" draw:mime-type="image/jpeg"/></draw:frame></text:p>
      <text:p text:style-name="P25">The Remote Monitoring Service <text:span text:style-name="T22">maintains a connection with a Remote Server via Wifi. The class RMService() will be instantiated during initialization of oradio_control.py. The RMService class is depending on whether there is a WiFi connection available. So it initiates a thread &lt;wifi_listener&gt; that will listen to WiFi related commands, </text:span><text:span text:style-name="T23">submitting a</text:span><text:span text:style-name="T22"> </text:span><text:span text:style-name="T23">subscribe_commands(), which ret</text:span><text:span text:style-name="T22">urns </text:span><text:span text:style-name="T23">a mess</text:span><text:span text:style-name="T22">age Queue. When WiFi is available is will send a SYS_INFO message to the server. A regular HEARTBEAT message is send to server as a keep-alive </text:span><text:span text:style-name="T23">indication for the server</text:span></text:p>
      <text:p text:style-name="P25"/>
      <text:h text:style-name="P53" text:outline-level="2"><text:bookmark-start text:name="__RefHeading___Toc1122_3150971425"/><text:soft-page-break/>USB Service<text:bookmark-end text:name="__RefHeading___Toc1122_3150971425"/></text:h>
      <text:p text:style-name="P41"><draw:frame draw:style-name="fr6" draw:name="Image14" text:anchor-type="char" svg:width="170mm" svg:height="116.36mm" draw:z-index="13"><draw:image xlink:href="Pictures/1000000000000416000002CC1B4D20F6.jpg" xlink:type="simple" xlink:show="embed" xlink:actuate="onLoad" draw:mime-type="image/jpeg"/></draw:frame></text:p>
      <text:h text:style-name="P53" text:outline-level="2"><text:bookmark-start text:name="__RefHeading___Toc1124_3150971425"/><text:soft-page-break/>Wifi Service<text:bookmark-end text:name="__RefHeading___Toc1124_3150971425"/></text:h>
      <text:p text:style-name="P41"><draw:frame draw:style-name="fr6" draw:name="Image13" text:anchor-type="char" svg:width="170mm" svg:height="112.48mm" draw:z-index="12"><draw:image xlink:href="Pictures/100000000000043A000002CC1D614B29.jpg" xlink:type="simple" xlink:show="embed" xlink:actuate="onLoad" draw:mime-type="image/jpeg"/></draw:frame></text:p>
      <text:h text:style-name="P44" text:outline-level="1"><text:bookmark-start text:name="__RefHeading___Toc1840_1246683851"/>The Logical view: State diagrams<text:bookmark-end text:name="__RefHeading___Toc1840_1246683851"/></text:h>
      <text:h text:style-name="P60" text:outline-level="2"><text:bookmark-start text:name="__RefHeading___Toc507_4128384672"/><text:span text:style-name="T19">Maincontrol state</text:span><text:bookmark-end text:name="__RefHeading___Toc507_4128384672"/></text:h>
      <text:p text:style-name="P23"><draw:frame draw:style-name="fr2" draw:name="Image7" text:anchor-type="char" svg:x="9.24mm" svg:y="3.4mm" svg:width="144.9mm" svg:height="204.95mm" draw:z-index="16"><draw:image xlink:href="Pictures/100000000000031A00000463529AE498.jpg" xlink:type="simple" xlink:show="embed" xlink:actuate="onLoad" draw:mime-type="image/jpeg"/></draw:frame></text:p>
      <text:p text:style-name="P23"><text:span text:style-name="T20">Description: <text:s/>xxxxxx</text:span><text:line-break/></text:p>
      <text:h text:style-name="P54" text:outline-level="2"><text:bookmark-start text:name="__RefHeading___Toc509_4128384672"/>Oradio Control States<text:bookmark-end text:name="__RefHeading___Toc509_4128384672"/></text:h>
      <text:p text:style-name="P105"><draw:frame draw:style-name="fr3" draw:name="Image8" text:anchor-type="char" svg:width="154.46mm" svg:height="219.23mm" draw:z-index="15"><draw:image xlink:href="Pictures/10000000000002E8000004202B1AD6F6.jpg" xlink:type="simple" xlink:show="embed" xlink:actuate="onLoad" draw:mime-type="image/jpeg"/></draw:frame></text:p>
      <text:p text:style-name="P105">Description:xxx</text:p>
      <text:h text:style-name="P64" text:outline-level="2"><text:soft-page-break/>Access Point state control</text:h>
      <text:p text:style-name="P111"><draw:frame draw:style-name="fr1" draw:name="Image16" text:anchor-type="char" svg:width="170mm" svg:height="180.83mm" draw:z-index="17"><draw:image xlink:href="Pictures/10000000000002D200000300F1A16A84.jpg" xlink:type="simple" xlink:show="embed" xlink:actuate="onLoad" draw:mime-type="image/jpeg"/></draw:frame></text:p>
      <text:h text:style-name="P63" text:outline-level="2"><text:soft-page-break/>PluginManager State control</text:h>
      <text:p text:style-name="P109"><draw:frame draw:style-name="fr2" draw:name="Image15" text:anchor-type="char" svg:x="8.89mm" svg:y="3.49mm" svg:width="152.22mm" svg:height="215.3mm" draw:z-index="14"><draw:image xlink:href="Pictures/100000000000031A00000463795CB94F.jpg" xlink:type="simple" xlink:show="embed" xlink:actuate="onLoad" draw:mime-type="image/jpeg"/></draw:frame></text:p>
      <text:p text:style-name="P108">The plugins manager is responsible for controlling the plugins. The plugins are used to dynamical extend the functionality of the standard Oradio. </text:p>
      <text:p text:style-name="P108">The standard Oradio is supporting:</text:p>
      <text:list text:style-name="L21">
        <text:list-item>
          <text:p text:style-name="P107"><text:soft-page-break/>Touch button handling</text:p>
        </text:list-item>
        <text:list-item>
          <text:p text:style-name="P107">Led indications</text:p>
        </text:list-item>
        <text:list-item>
          <text:p text:style-name="P107">System sound for announcements</text:p>
        </text:list-item>
        <text:list-item>
          <text:p text:style-name="P107">Default music player: MPD</text:p>
        </text:list-item>
        <text:list-item>
          <text:p text:style-name="P107">Internet access via WiFi</text:p>
        </text:list-item>
        <text:list-item>
          <text:p text:style-name="P107">Web-interface to configure the Oradio</text:p>
        </text:list-item>
      </text:list>
      <text:p text:style-name="P106">As an example the Oradio could be extended with a Spotify service. This service will be offered as plugin. The plugins manager will start/run a plugin <text:span text:style-name="T37">dynamically</text:span> when it is enabled, as a Thread. So it <text:span text:style-name="T37">each plugin runs in its own execution context. If a plugins has a fault the PluginsManager gets an exception, so the Thread can be removed.</text:span></text:p>
      <text:p text:style-name="P112">The plugin framework provides an abstract base class <text:s/>for initialization, execution and cleanup of the plugin.<text:span text:style-name="T38"/></text:p>
      <text:p text:style-name="P109"/>
      <text:p text:style-name="P109"/>
      <text:h text:style-name="P44" text:outline-level="1"><text:bookmark-start text:name="__RefHeading___Toc1842_1246683851"/>The Physical view: Component diagrams<text:bookmark-end text:name="__RefHeading___Toc1842_1246683851"/></text:h>
      <text:p text:style-name="P7"/>
      <text:h text:style-name="P55" text:outline-level="2"><text:bookmark-start text:name="__RefHeading___Toc511_4128384672"/>OS Service<text:bookmark-end text:name="__RefHeading___Toc511_4128384672"/></text:h>
      <text:p text:style-name="P24"/>
      <text:p text:style-name="P24"><draw:frame draw:style-name="fr1" draw:name="Image11" text:anchor-type="char" svg:width="170mm" svg:height="88.16mm" draw:z-index="5"><draw:image xlink:href="Pictures/10000000000003FE000002123A1A8A8A.jpg" xlink:type="simple" xlink:show="embed" xlink:actuate="onLoad" draw:mime-type="image/jpeg"/></draw:frame></text:p>
      <text:h text:style-name="P58" text:outline-level="2"/>
      <text:h text:style-name="P59" text:outline-level="2"><text:bookmark-start text:name="__RefHeading___Toc513_4128384672"/><draw:frame draw:style-name="fr5" draw:name="Image6" text:anchor-type="char" svg:x="2.82mm" svg:y="17.94mm" svg:width="170.83mm" svg:height="120.77mm" draw:z-index="2"><draw:image xlink:href="Pictures/10000000000004630000031A3657996F.jpg" xlink:type="simple" xlink:show="embed" xlink:actuate="onLoad" draw:mime-type="image/jpeg"/></draw:frame><text:span text:style-name="T19">Messaging (Commands)</text:span><text:bookmark-end text:name="__RefHeading___Toc513_4128384672"/></text:h>
      <text:p text:style-name="P19"/>
      <text:p text:style-name="P26">The messaging component interfaces to subscribers are queues. Each subscribers gets an assigned Command queue upon the provided API:subscribe_commands(). The Command queue can be monitored by the subscriber to check for new commands.</text:p>
      <text:p text:style-name="P26">Commands can be published by publishers with the API:publish_commands(). The messaging component will distribute the published commands to all subscribers via their assigned queues.</text:p>
      <text:p text:style-name="P19"/>
      <text:h text:style-name="P61" text:outline-level="2"/>
      <text:h text:style-name="P62" text:outline-level="2"><text:bookmark-start text:name="__RefHeading___Toc515_4128384672"/>Music Players<text:bookmark-end text:name="__RefHeading___Toc515_4128384672"/></text:h>
      <text:p text:style-name="P23"/>
      <text:p text:style-name="P19"><draw:frame draw:style-name="fr5" draw:name="Image9" text:anchor-type="char" svg:x="0mm" svg:y="-0.48mm" svg:width="170mm" svg:height="120.19mm" draw:z-index="3"><draw:image xlink:href="Pictures/10000000000004630000031ABE1FC146.jpg" xlink:type="simple" xlink:show="embed" xlink:actuate="onLoad" draw:mime-type="image/jpeg"/></draw:frame></text:p>
      <text:h text:style-name="P57" text:outline-level="2"/>
      <text:h text:style-name="P56" text:outline-level="2"><text:bookmark-start text:name="__RefHeading___Toc517_4128384672"/>GPIO components<text:bookmark-end text:name="__RefHeading___Toc517_4128384672"/></text:h>
      <text:p text:style-name="P24"/>
      <text:p text:style-name="P24"><draw:frame draw:style-name="fr1" draw:name="Image10" text:anchor-type="char" svg:width="170mm" svg:height="135.59mm" draw:z-index="4"><draw:image xlink:href="Pictures/100000000000033E00000296E9FA0584.jpg" xlink:type="simple" xlink:show="embed" xlink:actuate="onLoad" draw:mime-type="image/jpeg"/></draw:frame></text:p>
      <text:h text:style-name="P42" text:outline-level="1"><text:bookmark-start text:name="__RefHeading___Toc1844_1246683851"/><text:s/><text:span text:style-name="T5">The Process view: Sequence diagrams</text:span><text:bookmark-end text:name="__RefHeading___Toc1844_1246683851"/></text:h>
      <text:p text:style-name="Text_20_body"/>
      <text:h text:style-name="P52" text:outline-level="2"><text:bookmark-start text:name="__RefHeading___Toc519_4128384672"/>Messaging <text:bookmark-end text:name="__RefHeading___Toc519_4128384672"/></text:h>
      <text:p text:style-name="P13"><draw:frame draw:style-name="fr4" draw:name="Image5" text:anchor-type="char" svg:width="170mm" svg:height="123.88mm" draw:z-index="1"><draw:image xlink:href="Pictures/100000000000042D0000030B87AECB35.jpg" xlink:type="simple" xlink:show="embed" xlink:actuate="onLoad" draw:mime-type="image/jpeg"/></draw:frame></text:p>
      <text:h text:style-name="P44" text:outline-level="1"><text:bookmark-start text:name="__RefHeading___Toc1846_1246683851"/>The scenario view: use case diagrams<text:bookmark-end text:name="__RefHeading___Toc1846_1246683851"/></text:h>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mm" fo:text-indent="-6.35mm" fo:margin-left="12.7m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mm" fo:text-indent="-6.35mm" fo:margin-left="19.05m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mm" fo:text-indent="-6.35mm" fo:margin-left="25.4m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mm" fo:text-indent="-6.35mm" fo:margin-left="31.75m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mm" fo:text-indent="-6.35mm" fo:margin-left="38.1m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mm" fo:text-indent="-6.35mm" fo:margin-left="44.45m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mm" fo:text-indent="-6.35mm" fo:margin-left="50.8m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mm" fo:text-indent="-6.35mm" fo:margin-left="57.15m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mm" fo:text-indent="-6.35mm" fo:margin-left="63.5m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mm" fo:text-indent="-6.35mm" fo:margin-left="69.85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nk</meta:initial-creator>
    <meta:creation-date>2026-06-18T16:28:21.982308112</meta:creation-date>
    <meta:generator>LibreOffice/24.2.7.2$Linux_X86_64 LibreOffice_project/420$Build-2</meta:generator>
    <dc:date>2026-07-13T17:31:06.793716935</dc:date>
    <dc:creator>Henk</dc:creator>
    <meta:editing-duration>PT2H56M14S</meta:editing-duration>
    <meta:editing-cycles>24</meta:editing-cycles>
    <meta:document-statistic meta:table-count="1" meta:image-count="16" meta:object-count="0" meta:page-count="26" meta:paragraph-count="220" meta:word-count="2170" meta:character-count="14285" meta:non-whitespace-character-count="12434"/>
  </office:meta>
</office:document-meta>
</file>