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2.60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9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3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5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66" style:family="graphic" style:parent-style-name="standard">
      <style:graphic-properties draw:stroke="none" draw:fill="none" fo:min-height="1.817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0.485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47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1.10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49cm" loext:decorative="false"/>
      <style:paragraph-properties style:writing-mode="lr-tb"/>
    </style:style>
    <style:style style:name="gr7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73" style:family="graphic" style:parent-style-name="standard">
      <style:graphic-properties draw:stroke="none" draw:fill="none" fo:min-height="2.29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76" style:family="graphic" style:parent-style-name="standard">
      <style:graphic-properties draw:fill-color="#ffff00" draw:opacity="50%" draw:textarea-horizontal-align="justify" draw:textarea-vertical-align="middle" draw:auto-grow-height="false" fo:min-height="0.633cm" fo:min-width="1.852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1.84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2.211cm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3.867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1.337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1.11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1.285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0.955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1.067cm" loext:decorative="false"/>
      <style:paragraph-properties style:writing-mode="lr-tb"/>
    </style:style>
    <style:style style:name="gr89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0.638cm" loext:decorative="false"/>
      <style:paragraph-properties style:writing-mode="lr-tb"/>
    </style:style>
    <style:style style:name="gr94" style:family="graphic" style:parent-style-name="standard">
      <style:graphic-properties draw:fill-color="#ffff00" draw:opacity="50%" draw:textarea-horizontal-align="justify" draw:textarea-vertical-align="middle" draw:auto-grow-height="false" fo:min-height="0.633cm" fo:min-width="1.265cm" fo:wrap-option="wrap" style:writing-mode="lr-tb" loext:decorative="false"/>
      <style:paragraph-properties style:writing-mode="lr-tb"/>
    </style:style>
    <style:style style:name="gr95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96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97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5cm" fo:min-width="16.9cm" style:writing-mode="lr-tb" loext:decorative="false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45cm" fo:min-width="9.15cm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04cm" fo:min-width="4.82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2.759cm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0.427cm" fo:min-width="5.909cm" style:writing-mode="lr-tb" loext:decorative="false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5.6cm" fo:min-width="0cm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398cm" fo:min-width="18.448cm" fo:padding-top="0.151cm" fo:padding-bottom="0.151cm" fo:padding-left="0.276cm" fo:padding-right="0.276cm" loext:decorative="false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3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left" fo:text-indent="0cm"/>
      <style:text-properties fo:font-size="12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left" fo:text-indent="0cm" style:writing-mode="lr-tb"/>
      <style:text-properties fo:font-size="12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12pt" fo:font-weight="bold"/>
    </style:style>
    <style:style style:name="P2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/>
      <style:paragraph-properties fo:text-align="left"/>
      <style:text-properties fo:font-size="12pt" style:font-size-asian="12pt" style:font-size-complex="12pt"/>
    </style:style>
    <style:style style:name="P25" style:family="paragraph">
      <loext:graphic-properties draw:fill="none"/>
      <style:text-properties fo:font-size="10pt"/>
    </style:style>
    <style:style style:name="P26" style:family="paragraph">
      <loext:graphic-properties draw:fill="none" draw:fill-color="#ffffff"/>
      <style:text-properties fo:font-size="10pt" style:font-size-asian="12pt" style:font-size-complex="12pt"/>
    </style:style>
    <style:style style:name="P27" style:family="paragraph">
      <style:paragraph-properties fo:text-align="center"/>
      <style:text-properties fo:font-size="14pt" fo:font-style="italic" style:font-size-asian="14pt" style:font-size-complex="14pt"/>
    </style:style>
    <style:style style:name="P28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 draw:fill-color="#ffffff"/>
      <style:text-properties fo:font-size="10pt"/>
    </style:style>
    <style:style style:name="P31" style:family="paragraph">
      <loext:graphic-properties draw:fill="none" draw:fill-color="#ffffff"/>
      <style:text-properties fo:font-size="10pt" style:font-size-asian="10pt" style:font-size-complex="10pt"/>
    </style:style>
    <style:style style:name="P32" style:family="paragraph">
      <loext:graphic-properties draw:fill="none" draw:fill-color="#ffffff"/>
      <style:text-properties fo:color="#c9211e" loext:opacity="100%" fo:font-size="10pt" style:font-size-asian="10pt" style:font-size-complex="10pt"/>
    </style:style>
    <style:style style:name="P33" style:family="paragraph">
      <loext:graphic-properties draw:fill="none" draw:fill-color="#ffffff"/>
      <style:text-properties fo:color="#c9211e" loext:opacity="100%" fo:font-size="10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/>
      <style:text-properties fo:font-size="8pt" style:font-size-asian="8pt" style:font-size-complex="8pt"/>
    </style:style>
    <style:style style:name="P36" style:family="paragraph">
      <loext:graphic-properties draw:fill-color="#ffff00" draw:opacity="50%"/>
      <style:paragraph-properties fo:text-align="center" style:writing-mode="lr-tb"/>
      <style:text-properties fo:font-size="8pt" style:font-size-asian="8pt" style:font-size-complex="8pt"/>
    </style:style>
    <style:style style:name="P37" style:family="paragraph">
      <loext:graphic-properties draw:fill="none"/>
      <style:text-properties fo:font-size="12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="none" draw:fill-color="#ffffff"/>
      <style:text-properties fo:font-size="8pt" style:font-size-asian="10pt" style:font-size-complex="10pt"/>
    </style:style>
    <style:style style:name="P41" style:family="paragraph">
      <loext:graphic-properties draw:fill="none" draw:fill-color="#ffffff"/>
      <style:text-properties fo:color="#000000" loext:opacity="100%" fo:font-size="8pt"/>
    </style:style>
    <style:style style:name="P42" style:family="paragraph">
      <style:text-properties fo:font-size="10pt" style:font-size-asian="12pt" style:font-size-complex="12pt"/>
    </style:style>
    <style:style style:name="P43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P44" style:family="paragraph">
      <style:paragraph-properties fo:text-align="center" style:writing-mode="lr-tb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lef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8pt"/>
    </style:style>
    <style:style style:name="T11" style:family="text">
      <style:text-properties style:font-name="Liberation Mono" fo:font-size="10pt" style:font-size-asian="18pt" style:font-size-complex="18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Liberation Mono" fo:font-size="16pt" style:font-size-asian="10pt" style:font-size-complex="10pt"/>
    </style:style>
    <style:style style:name="T17" style:family="text">
      <style:text-properties fo:font-size="12pt" fo:font-weight="bold"/>
    </style:style>
    <style:style style:name="T18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0pt" style:font-size-asian="12pt" style:font-size-complex="12pt"/>
    </style:style>
    <style:style style:name="T20" style:family="text">
      <style:text-properties fo:font-size="14pt" fo:font-style="italic" style:font-size-asian="14pt" style:font-size-complex="14pt"/>
    </style:style>
    <style:style style:name="T21" style:family="text">
      <style:text-properties fo:font-size="10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loext:opacity="100%" fo:font-size="10pt" style:font-size-asian="10pt" style:font-size-complex="10pt"/>
    </style:style>
    <style:style style:name="T24" style:family="text">
      <style:text-properties fo:color="#c9211e" loext:opacity="100%" fo:font-size="10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8pt" style:font-size-asian="10pt" style:font-size-complex="10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fo:font-size="8pt" style:font-size-asian="10pt" style:font-size-complex="10pt"/>
    </style:style>
    <style:style style:name="T34" style:family="text">
      <style:text-properties fo:color="#000000" loext:opacity="100%" fo:font-size="8pt"/>
    </style:style>
    <style:style style:name="T35" style:family="text">
      <style:text-properties style:font-size-asian="12pt" style:font-size-complex="12pt"/>
    </style:style>
    <style:style style:name="T36" style:family="text">
      <style:text-properties style:font-name="Liberation Mono" fo:font-size="8pt" style:font-size-asian="8pt" style:font-size-complex="8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machin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e Pseudo 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State</text:span></text:p>
            <text:p><text:span text:style-name="T4">Entry action</text:span><text:span text:style-name="T5">s: are executed when entering a state.</text:span></text:p>
            <text:p><text:span text:style-name="T4">Do actions</text:span><text:span text:style-name="T5">: are performed while in that state</text:span></text:p>
            <text:p><text:span text:style-name="T4">Exit actions</text:span><text:span text:style-name="T5">: are executed when leaving a 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me</text:span></text:p>
              <text:p><text:span text:style-name="T8"/></text:p>
              <text:p><text:span text:style-name="T3">entry</text:span><text:span text:style-name="T6"> /action</text:span></text:p>
              <text:p><text:span text:style-name="T3">do</text:span><text:span text:style-name="T6"> /action</text:span></text:p>
              <text:p><text:span text:style-name="T3">exit</text:span><text:span text:style-name="T6"> 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e 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2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29" draw:text-style-name="P13" draw:layer="layout" svg:width="1.387cm" svg:height="0.887cm" svg:x="16.723cm" svg:y="14.465cm">
            <draw:text-box>
              <text:p><text:span text:style-name="T10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2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29" draw:text-style-name="P13" draw:layer="layout" svg:width="1.387cm" svg:height="0.887cm" svg:x="12.583cm" svg:y="14.465cm">
            <draw:text-box>
              <text:p><text:span text:style-name="T10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4" draw:layer="layout" svg:width="8.31cm" svg:height="1cm" svg:x="11.405cm" svg:y="19.71cm">
          <draw:text-box>
            <text:p text:style-name="P10"><text:span text:style-name="T11">Composite 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2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9" draw:text-style-name="P13" draw:layer="layout" svg:width="1.387cm" svg:height="0.887cm" svg:x="16.135cm" svg:y="21.167cm">
          <draw:text-box>
            <text:p><text:span text:style-name="T10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2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9" draw:text-style-name="P13" draw:layer="layout" svg:width="1.387cm" svg:height="0.887cm" svg:x="12.935cm" svg:y="21.227cm">
          <draw:text-box>
            <text:p><text:span text:style-name="T10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5" draw:layer="layout" svg:width="9.525cm" svg:height="1.905cm" svg:x="11.16cm" svg:y="1.317cm">
          <draw:text-box>
            <text:p text:style-name="P4"><text:span text:style-name="T12">Fork</text:span><text:span text:style-name="T13">: a pseudo-state that splits an incoming transition into two or more outgoing transitions, allowing for concurrent paths. It is used to represent the beginning of parallel processes within a state machine.</text:span></text:p>
          </draw:text-box>
        </draw:frame>
        <draw:frame draw:style-name="gr36" draw:text-style-name="P15" draw:layer="layout" svg:width="8.89cm" svg:height="2.221cm" svg:x="11.11cm" svg:y="3.54cm">
          <draw:text-box>
            <text:p text:style-name="P4"><text:span text:style-name="T12">Join</text:span><text:span text:style-name="T13">: a state used to combine multiple incoming transitions into a single outgoing transition, effectively synchronizing concurrent activities. It allows the system to wait for all incoming transitions to complete before proceeding to the next 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2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9" draw:text-style-name="P13" draw:layer="layout" svg:width="1.387cm" svg:height="0.887cm" svg:x="13.135cm" svg:y="23.468cm">
          <draw:text-box>
            <text:p><text:span text:style-name="T10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2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9" draw:text-style-name="P13" draw:layer="layout" svg:width="1.387cm" svg:height="0.887cm" svg:x="16.135cm" svg:y="23.469cm">
          <draw:text-box>
            <text:p><text:span text:style-name="T10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5" draw:layer="layout" svg:width="8.255cm" svg:height="1.827cm" svg:x="11.442cm" svg:y="25.472cm">
          <draw:text-box>
            <text:p text:style-name="P4"><text:span text:style-name="T12">Concurrent regions:</text:span><text:span text:style-name="T13"> represent separate areas of concern within a state, allowing for independent state transitions in each region, simultaneously</text:span></text:p>
          </draw:text-box>
        </draw:frame>
        <draw:frame draw:style-name="gr42" draw:text-style-name="P9" draw:layer="layout" svg:width="8.255cm" svg:height="2.093cm" svg:x="4.175cm" svg:y="9.067cm">
          <draw:text-box>
            <text:p><text:span text:style-name="T14">event:</text:span><text:span text:style-name="T7"> trigger that causes the transition.</text:span></text:p>
            <text:p><text:span text:style-name="T14">/action</text:span><text:span text:style-name="T7">: An operation executed in response to an accepted event </text:span></text:p>
          </draw:text-box>
        </draw:frame>
        <draw:frame draw:style-name="gr36" draw:text-style-name="P15" draw:layer="layout" svg:width="6.667cm" svg:height="2.221cm" svg:x="13.365cm" svg:y="9.563cm">
          <draw:text-box>
            <text:p text:style-name="P4"><text:span text:style-name="T12">Composite state</text:span><text:span text:style-name="T13">: A state that has substructure and internal behavior. It can contain one or more regions, which can contain one or more states. The state diagrams are executed in parallel </text:span></text:p>
          </draw:text-box>
        </draw:frame>
        <draw:custom-shape draw:style-name="gr43" draw:text-style-name="P16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 draw:handle-position-x="$0" draw:handle-position-y="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range-x-minimum="0" draw:handle-range-x-maximum="10800" draw:handle-position="$0 10800" draw:handle-position-x="$0" draw:handle-position-y="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7" draw:layer="layout" svg:width="4.762cm" svg:height="0.806cm" svg:x="1.17cm" svg:y="19.097cm">
          <draw:text-box>
            <text:p><text:span text:style-name="T15">Package</text:span></text:p>
          </draw:text-box>
        </draw:frame>
      </draw:page>
      <draw:page draw:name="OradioMain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8" draw:layer="layout" svg:width="8.514cm" svg:height="2.945cm" svg:x="0.959cm" svg:y="1.018cm">
              <draw:text-box>
                <text:p text:style-name="P4"><text:span text:style-name="T16">OradioMai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5.08cm" svg:height="1.905cm" svg:x="14.335cm" svg:y="1.317cm">
          <text:p text:style-name="P19"><text:span text:style-name="T7">1-Power-ON</text:span></text:p>
          <text:p text:style-name="P19"><text:span text:style-name="T7">2-Raspi-BOOT</text:span></text:p>
          <text:p text:style-name="P19"><text:span text:style-name="T7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1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2" xml:id="id18" draw:id="id18" draw:layer="layout" svg:width="3.175cm" svg:height="0.725cm" svg:x="6.297cm" svg:y="2.91cm">
          <draw:text-box>
            <text:p><text:span text:style-name="T17">ColdStartup</text:span></text:p>
          </draw:text-box>
        </draw:frame>
        <draw:rect draw:style-name="gr24" draw:text-style-name="P2" xml:id="id22" draw:id="id22" draw:layer="layout" svg:width="4.829cm" svg:height="2.223cm" svg:x="13.001cm" svg:y="18.09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2" draw:layer="layout" svg:width="3.175cm" svg:height="0.725cm" svg:x="13.9cm" svg:y="18.092cm">
          <draw:text-box>
            <text:p><text:span text:style-name="T17">Standby</text:span></text:p>
          </draw:text-box>
        </draw:frame>
        <draw:g draw:style-name="gr4">
          <draw:frame draw:style-name="gr23" draw:text-style-name="P23" draw:layer="layout" svg:width="19.04cm" svg:height="1.072cm" svg:x="1.06cm" svg:y="5.797cm">
            <draw:text-box>
              <text:p text:style-name="P10"><text:span text:style-name="T18">MainControl</text:span></text:p>
            </draw:text-box>
          </draw:frame>
          <draw:rect draw:style-name="gr24" draw:text-style-name="P24" draw:layer="layout" svg:width="19.04cm" svg:height="22.417cm" svg:x="1cm" svg:y="5.888cm" draw:corner-radius="0.5cm">
            <text:p/>
          </draw:rect>
          <draw:line draw:style-name="gr52" draw:text-style-name="P2" draw:layer="layout" svg:x1="1.004cm" svg:y1="6.732cm" svg:x2="20.031cm" svg:y2="6.723cm">
            <text:p/>
          </draw:line>
        </draw:g>
        <draw:rect draw:style-name="gr24" draw:text-style-name="P2" xml:id="id16" draw:id="id16" draw:layer="layout" svg:width="7.285cm" svg:height="3.425cm" svg:x="2.305cm" svg:y="9.1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5" draw:layer="layout" svg:width="7.302cm" svg:height="2.855cm" svg:x="2.37cm" svg:y="9.95cm">
          <draw:text-box>
            <text:p><text:span text:style-name="T3">Entry</text:span><text:span text:style-name="T19"> /checkMsgQueue()</text:span></text:p>
            <text:p><text:span text:style-name="T3">Do</text:span><text:span text:style-name="T19"> [queue.not_empty]/ processMsg()</text:span></text:p>
            <text:p><text:span text:style-name="T3">Exit</text:span><text:span text:style-name="T19"> </text:span></text:p>
            <text:p><text:span text:style-name="T19"><text:s text:c="3"/>on msgProcessed raise nextMessage</text:span></text:p>
            <text:p><text:span text:style-name="T19"><text:s text:c="3"/>on queueException raise criticalError</text:span></text:p>
            <text:p><text:span text:style-name="T19"/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2" draw:layer="layout" svg:width="3.81cm" svg:height="0.952cm" svg:x="3.14cm" svg:y="9.14cm">
          <draw:text-box>
            <text:p><text:span text:style-name="T17">CheckingQueue</text:span></text:p>
          </draw:text-box>
        </draw:frame>
        <draw:connector draw:style-name="gr55" draw:text-style-name="P2" draw:layer="layout" draw:line-skew="0.651cm -8.456cm -0.837cm" svg:x1="4.041cm" svg:y1="12.565cm" svg:x2="3.691cm" svg:y2="9.14cm" draw:start-shape="id16" draw:start-glue-point="6" draw:end-shape="id16" draw:end-glue-point="9" svg:d="M4041 12565v1152h-2406v-5915h2056v1338" svg:viewBox="0 0 2407 5916">
          <text:p/>
        </draw:connector>
        <draw:frame draw:style-name="gr56" draw:text-style-name="P26" draw:layer="layout" svg:width="3.175cm" svg:height="0.953cm" svg:x="1.617cm" svg:y="13.034cm">
          <draw:text-box>
            <text:p><text:span text:style-name="T19">nextMessage</text:span></text:p>
          </draw:text-box>
        </draw:frame>
        <draw:g draw:style-name="gr4">
          <draw:frame draw:style-name="gr23" draw:text-style-name="P23" draw:layer="layout" svg:width="8.815cm" svg:height="1.276cm" svg:x="10.677cm" svg:y="7.736cm">
            <draw:text-box>
              <text:p text:style-name="P10"><text:span text:style-name="T18">OradioContro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338cm" svg:x="11.18cm" svg:y="22.6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2" draw:layer="layout" svg:width="3.175cm" svg:height="0.725cm" svg:x="12.035cm" svg:y="22.662cm">
          <draw:text-box>
            <text:p><text:span text:style-name="T17">MpdPlaying</text:span></text:p>
          </draw:text-box>
        </draw:frame>
        <draw:rect draw:style-name="gr24" draw:text-style-name="P2" xml:id="id24" draw:id="id24" draw:layer="layout" svg:width="4.829cm" svg:height="2.175cm" svg:x="13.482cm" svg:y="25.2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2" draw:layer="layout" svg:width="3.81cm" svg:height="0.952cm" svg:x="14.2cm" svg:y="25.23cm">
          <draw:text-box>
            <text:p><text:span text:style-name="T17">SpotifyPlaying</text:span></text:p>
          </draw:text-box>
        </draw:frame>
        <draw:connector draw:style-name="gr58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59" draw:text-style-name="P28" draw:layer="layout" svg:width="7.62cm" svg:height="2.223cm" svg:x="1.952cm" svg:y="25.847cm">
          <text:p text:style-name="P27"><text:span text:style-name="T20">The CheckingQueue state and OradioControl composite state are concurrent region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3.377cm" svg:y="11.0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2" draw:layer="layout" svg:width="3.876cm" svg:height="0.725cm" svg:x="14.269cm" svg:y="11.06cm">
          <draw:text-box>
            <text:p><text:span text:style-name="T17">OradioCreation</text:span></text:p>
          </draw:text-box>
        </draw:frame>
        <draw:line draw:style-name="gr60" draw:text-style-name="P2" draw:layer="layout" svg:x1="10.207cm" svg:y1="6.715cm" svg:x2="10.207cm" svg:y2="28.305cm">
          <text:p/>
        </draw:line>
        <draw:connector draw:style-name="gr61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8" draw:text-style-name="P2" draw:layer="layout" svg:x1="14.068cm" svg:y1="17.022cm" svg:x2="16.907cm" svg:y2="18.092cm" draw:start-shape="id21" draw:start-glue-point="5" draw:end-shape="id22" draw:end-glue-point="7" svg:d="M14068 17022v535h2839v535" svg:viewBox="0 0 2840 1071">
          <text:p/>
        </draw:connector>
        <draw:connector draw:style-name="gr58" draw:text-style-name="P2" draw:layer="layout" svg:x1="14.152cm" svg:y1="20.315cm" svg:x2="13.594cm" svg:y2="22.622cm" draw:start-shape="id22" draw:start-glue-point="6" draw:end-shape="id23" draw:end-glue-point="0" svg:d="M14152 20315v1154h-558v1153" svg:viewBox="0 0 559 2308">
          <text:p/>
        </draw:connector>
        <draw:connector draw:style-name="gr58" draw:text-style-name="P2" draw:layer="layout" svg:x1="17.007cm" svg:y1="20.315cm" svg:x2="17.388cm" svg:y2="25.26cm" draw:start-shape="id22" draw:start-glue-point="4" draw:end-shape="id24" draw:end-glue-point="7" svg:d="M17007 20315v2473h381v2472" svg:viewBox="0 0 382 4946">
          <text:p/>
        </draw:connector>
        <draw:connector draw:style-name="gr58" draw:text-style-name="P2" draw:layer="layout" svg:x1="16.009cm" svg:y1="24.39cm" svg:x2="15.821cm" svg:y2="20.315cm" draw:start-shape="id23" draw:start-glue-point="8" draw:end-shape="id22" draw:end-glue-point="10" svg:d="M16009 24390h501v-2921h-689v-1154" svg:viewBox="0 0 690 4076">
          <text:p/>
        </draw:connector>
        <draw:connector draw:style-name="gr58" draw:text-style-name="P2" draw:layer="layout" svg:x1="18.311cm" svg:y1="26.905cm" svg:x2="17.83cm" svg:y2="19.773cm" draw:start-shape="id24" draw:start-glue-point="8" draw:end-shape="id22" draw:end-glue-point="8" svg:d="M18311 26905h501v-7132h-982" svg:viewBox="0 0 983 7133">
          <text:p/>
        </draw:connector>
        <draw:frame draw:style-name="gr62" draw:text-style-name="P9" draw:layer="layout" svg:width="4.445cm" svg:height="1.487cm" svg:x="10.525cm" svg:y="3.54cm">
          <draw:text-box>
            <text:p><text:span text:style-name="T7">StartDone</text:span></text:p>
            <text:p><text:span text:style-name="T7">/startOradioControl</text:span></text:p>
          </draw:text-box>
        </draw:frame>
        <draw:custom-shape draw:style-name="gr25" draw:text-style-name="P1" xml:id="id25" draw:id="id25" draw:layer="layout" svg:width="0.4cm" svg:height="0.4cm" svg:x="18.286cm" svg:y="8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18.486cm" svg:y1="9.158cm" svg:x2="18cm" svg:y2="11.075cm" draw:start-shape="id25" draw:start-glue-point="8" draw:end-shape="id26" draw:end-glue-point="7" svg:d="M18486 9158v959h-486v958" svg:viewBox="0 0 487 1918">
          <text:p/>
        </draw:connector>
        <draw:frame draw:style-name="gr51" draw:text-style-name="P9" draw:layer="layout" svg:width="1.588cm" svg:height="0.725cm" svg:x="18.127cm" svg:y="16.24cm">
          <draw:text-box>
            <text:p><text:span text:style-name="T7">Error</text:span></text:p>
          </draw:text-box>
        </draw:frame>
        <draw:rect draw:style-name="gr24" draw:text-style-name="P2" xml:id="id21" draw:id="id21" draw:layer="layout" svg:width="4.04cm" svg:height="2.54cm" svg:x="11.247cm" svg:y="14.4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4" draw:text-style-name="P21" draw:layer="layout" svg:width="3.8cm" svg:height="1.673cm" svg:x="11.355cm" svg:y="15.15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1" draw:text-style-name="P22" draw:layer="layout" svg:width="3.175cm" svg:height="0.725cm" svg:x="11.982cm" svg:y="14.61cm">
          <draw:text-box>
            <text:p><text:span text:style-name="T17">MpdCreation</text:span></text:p>
          </draw:text-box>
        </draw:frame>
        <draw:frame draw:style-name="gr64" draw:text-style-name="P21" draw:layer="layout" svg:width="3.8cm" svg:height="1.673cm" svg:x="13.075cm" svg:y="18.5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4" draw:text-style-name="P21" draw:layer="layout" svg:width="3.8cm" svg:height="1.673cm" svg:x="11.387cm" svg:y="23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4" draw:text-style-name="P21" draw:layer="layout" svg:width="3.8cm" svg:height="1.673cm" svg:x="13.61cm" svg:y="25.8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8" draw:text-style-name="P2" draw:layer="layout" svg:x1="17.367cm" svg:y1="13.312cm" svg:x2="14.515cm" svg:y2="14.482cm" draw:start-shape="id26" draw:start-glue-point="5" draw:end-shape="id21" draw:end-glue-point="7" svg:d="M17367 13312v585h-2852v585" svg:viewBox="0 0 2853 1171">
          <text:p/>
        </draw:connector>
        <draw:frame draw:style-name="gr64" draw:text-style-name="P21" draw:layer="layout" svg:width="3.8cm" svg:height="1.673cm" svg:x="13.727cm" svg:y="11.60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7.785cm" svg:y1="7.432cm" svg:x2="8.198cm" svg:y2="9.14cm" draw:start-shape="id27" draw:start-glue-point="8" draw:end-shape="id16" draw:end-glue-point="7" svg:d="M7785 7432v855h413v853" svg:viewBox="0 0 414 1709">
          <text:p/>
        </draw:connector>
        <draw:g draw:style-name="gr1" xml:id="id29" draw:id="id29">
          <draw:custom-shape draw:style-name="gr65" draw:text-style-name="P29" draw:layer="layout" svg:width="0.717cm" svg:height="0.718cm" svg:x="19.1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59cm" svg:y1="15.608cm" svg:x2="19.82cm" svg:y2="16.17cm">
              <text:p/>
            </draw:line>
            <draw:line draw:style-name="gr57" draw:text-style-name="P2" draw:layer="layout" svg:x1="19.814cm" svg:y1="15.588cm" svg:x2="19.23cm" svg:y2="16.171cm">
              <text:p/>
            </draw:line>
          </draw:g>
        </draw:g>
        <draw:g draw:style-name="gr1" xml:id="id28" draw:id="id28">
          <draw:custom-shape draw:style-name="gr65" draw:text-style-name="P29" draw:layer="layout" svg:width="0.717cm" svg:height="0.718cm" svg:x="9.155cm" svg:y="13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285cm" svg:x2="9.795cm" svg:y2="13.847cm">
              <text:p/>
            </draw:line>
            <draw:line draw:style-name="gr57" draw:text-style-name="P2" draw:layer="layout" svg:x1="9.789cm" svg:y1="13.265cm" svg:x2="9.205cm" svg:y2="13.848cm">
              <text:p/>
            </draw:line>
          </draw:g>
        </draw:g>
        <draw:frame draw:style-name="gr51" draw:text-style-name="P9" draw:layer="layout" svg:width="1.588cm" svg:height="0.725cm" svg:x="7.984cm" svg:y="13.61cm">
          <draw:text-box>
            <text:p><text:span text:style-name="T7">Error</text:span></text:p>
          </draw:text-box>
        </draw:frame>
        <draw:connector draw:style-name="gr63" draw:text-style-name="P2" draw:layer="layout" svg:x1="8.349cm" svg:y1="12.565cm" svg:x2="9.155cm" svg:y2="13.558cm" draw:start-shape="id16" draw:start-glue-point="4" draw:end-shape="id28" draw:end-glue-point="3" svg:d="M8349 12565v993h806" svg:viewBox="0 0 807 994">
          <text:p/>
        </draw:connector>
        <draw:frame draw:style-name="gr66" draw:text-style-name="P21" draw:layer="layout" svg:width="6.668cm" svg:height="2.067cm" svg:x="10.842cm" svg:y="8.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 </text:span><text:span text:style-name="T13">on usbAbsent raise criticalError</text:span></text:p>
          </draw:text-box>
        </draw:frame>
        <draw:frame draw:style-name="gr29" draw:text-style-name="P13" draw:layer="layout" svg:width="2.222cm" svg:height="0.887cm" svg:x="16.34cm" svg:y="14.835cm">
          <draw:text-box>
            <text:p><text:span text:style-name="T10">criticalError</text:span></text:p>
            <text:p><text:span text:style-name="T10">/goto_error()</text:span></text:p>
          </draw:text-box>
        </draw:frame>
        <draw:connector draw:style-name="gr58" draw:text-style-name="P2" draw:layer="layout" draw:line-skew="0.695cm" svg:x1="16.881cm" svg:y1="14.631cm" svg:x2="19.18cm" svg:y2="15.881cm" draw:end-shape="id29" draw:end-glue-point="3" svg:d="M16881 14631h1582v1250h717" svg:viewBox="0 0 2300 1251">
          <text:p/>
        </draw:connector>
        <draw:frame draw:style-name="gr29" draw:text-style-name="P13" draw:layer="layout" svg:width="2.222cm" svg:height="0.887cm" svg:x="6.08cm" svg:y="12.948cm">
          <draw:text-box>
            <text:p><text:span text:style-name="T10">criticalError</text:span></text:p>
            <text:p><text:span text:style-name="T10">/goto_error()</text:span></text:p>
          </draw:text-box>
        </draw:frame>
        <draw:connector draw:style-name="gr63" draw:text-style-name="P2" draw:layer="layout" svg:x1="6.643cm" svg:y1="23.673cm" svg:x2="6.547cm" svg:y2="24.572cm" draw:start-shape="id30" draw:start-glue-point="7" draw:end-shape="id31" draw:end-glue-point="1" svg:d="M6643 23673h526v899h-622" svg:viewBox="0 0 623 900">
          <text:p/>
        </draw:connector>
        <draw:connector draw:style-name="gr63" draw:text-style-name="P2" draw:layer="layout" svg:x1="6.043cm" svg:y1="23.673cm" svg:x2="5.947cm" svg:y2="24.572cm" draw:start-shape="id30" draw:start-glue-point="5" draw:end-shape="id31" draw:end-glue-point="3" svg:d="M6043 23673h-597v899h501" svg:viewBox="0 0 598 900">
          <text:p/>
        </draw:connector>
        <draw:g draw:style-name="gr39" xml:id="id31" draw:id="id31">
          <draw:custom-shape draw:style-name="gr26" draw:text-style-name="P1" draw:layer="layout" svg:width="0.4cm" svg:height="0.4cm" svg:x="6.047cm" svg:y="24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5.947cm" svg:y="24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3" draw:text-style-name="P2" draw:layer="layout" svg:x1="6.591cm" svg:y1="18.998cm" svg:x2="7.096cm" svg:y2="20.056cm" draw:start-shape="id32" draw:start-glue-point="12" draw:end-shape="id33" draw:end-glue-point="7" svg:d="M6591 18998v538h505v520" svg:viewBox="0 0 506 1059">
          <text:p/>
        </draw:connector>
        <draw:connector draw:style-name="gr63" draw:text-style-name="P2" draw:layer="layout" svg:x1="6.578cm" svg:y1="22.361cm" svg:x2="6.343cm" svg:y2="23.373cm" draw:start-shape="id33" draw:start-glue-point="5" draw:end-shape="id30" draw:end-glue-point="4" svg:d="M6578 22361v494h-235v518" svg:viewBox="0 0 236 1013">
          <text:p/>
        </draw:connector>
        <draw:rect draw:style-name="gr24" draw:text-style-name="P2" xml:id="id32" draw:id="id32" draw:layer="layout" svg:width="4.763cm" svg:height="2.209cm" svg:x="3.71cm" svg:y="16.80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2" draw:layer="layout" svg:width="4.311cm" svg:height="0.735cm" svg:x="4.156cm" svg:y="16.775cm">
          <draw:text-box>
            <text:p><text:span text:style-name="T17">ActivateOradioAp</text:span></text:p>
          </draw:text-box>
        </draw:frame>
        <draw:frame draw:style-name="gr64" draw:text-style-name="P21" draw:layer="layout" svg:width="2.816cm" svg:height="1.673cm" svg:x="3.752cm" svg:y="17.377cm">
          <draw:text-box>
            <text:p><text:span text:style-name="T3">Entry</text:span><text:span text:style-name="T6"> </text:span></text:p>
            <text:p><text:span text:style-name="T3">Do</text:span></text:p>
            <text:p><text:span text:style-name="T3">Exit</text:span><text:span text:style-name="T6"> </text:span><text:span text:style-name="T13">/</text:span></text:p>
          </draw:text-box>
        </draw:frame>
        <draw:rect draw:style-name="gr24" draw:text-style-name="P2" xml:id="id33" draw:id="id33" draw:layer="layout" svg:width="4.681cm" svg:height="2.305cm" svg:x="3.31cm" svg:y="20.05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2" draw:layer="layout" svg:width="3.876cm" svg:height="0.725cm" svg:x="3.98cm" svg:y="20.048cm">
          <draw:text-box>
            <text:p><text:span text:style-name="T17">OradioApActive</text:span></text:p>
          </draw:text-box>
        </draw:frame>
        <draw:frame draw:style-name="gr64" draw:text-style-name="P21" draw:layer="layout" svg:width="2.381cm" svg:height="1.673cm" svg:x="3.634cm" svg:y="20.656cm">
          <draw:text-box>
            <text:p><text:span text:style-name="T3">Entry</text:span><text:span text:style-name="T6"> </text:span><text:span text:style-name="T13">/</text:span></text:p>
            <text:p><text:span text:style-name="T3">Do</text:span></text:p>
            <text:p><text:span text:style-name="T3">Exit</text:span><text:span text:style-name="T6"> </text:span></text:p>
          </draw:text-box>
        </draw:frame>
        <draw:custom-shape draw:style-name="gr13" draw:text-style-name="P2" xml:id="id30" draw:id="id30" draw:layer="layout" svg:width="0.6cm" svg:height="0.6cm" svg:x="6.043cm" svg:y="23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34" draw:id="id34" draw:layer="layout" svg:width="0.4cm" svg:height="0.4cm" svg:x="8.486cm" svg:y="15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8.486cm" svg:y1="16.133cm" svg:x2="7.149cm" svg:y2="16.807cm" draw:start-shape="id34" draw:start-glue-point="6" draw:end-shape="id32" draw:end-glue-point="9" svg:d="M8486 16133h-1337v674" svg:viewBox="0 0 1338 675">
          <text:p/>
        </draw:connector>
        <draw:g draw:style-name="gr4">
          <draw:frame draw:style-name="gr23" draw:text-style-name="P23" draw:layer="layout" svg:width="7.869cm" svg:height="0.639cm" svg:x="1.635cm" svg:y="15.086cm">
            <draw:text-box>
              <text:p text:style-name="P10"><text:span text:style-name="T18">OradioAccessPoint</text:span></text:p>
            </draw:text-box>
          </draw:frame>
          <draw:rect draw:style-name="gr24" draw:text-style-name="P2" draw:layer="layout" svg:width="7.869cm" svg:height="10.16cm" svg:x="1.703cm" svg:y="15.052cm" draw:corner-radius="0.5cm">
            <draw:glue-point draw:id="4" svg:x="-3.688cm" svg:y="-5.004cm"/>
            <text:p/>
          </draw:rect>
          <draw:line draw:style-name="gr57" draw:text-style-name="P2" draw:layer="layout" svg:x1="1.705cm" svg:y1="15.755cm" svg:x2="9.57cm" svg:y2="15.751cm">
            <text:p/>
          </draw:line>
        </draw:g>
        <draw:frame draw:style-name="gr64" draw:text-style-name="P21" draw:layer="layout" svg:width="1.935cm" svg:height="1.673cm" svg:x="1.922cm" svg:y="15.92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line draw:style-name="gr60" draw:text-style-name="P2" draw:layer="layout" svg:x1="1cm" svg:y1="14.435cm" svg:x2="10.207cm" svg:y2="14.435cm">
          <text:p/>
        </draw:line>
        <draw:line draw:style-name="gr60" draw:text-style-name="P2" draw:layer="layout" svg:x1="1.001cm" svg:y1="25.535cm" svg:x2="10.208cm" svg:y2="25.535cm">
          <text:p/>
        </draw:line>
        <draw:g draw:style-name="gr1">
          <draw:custom-shape draw:style-name="gr65" draw:text-style-name="P29" draw:layer="layout" svg:width="0.717cm" svg:height="0.718cm" svg:x="9.237cm" svg:y="19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16cm" svg:y1="19.418cm" svg:x2="9.877cm" svg:y2="19.98cm">
              <text:p/>
            </draw:line>
            <draw:line draw:style-name="gr57" draw:text-style-name="P2" draw:layer="layout" svg:x1="9.871cm" svg:y1="19.398cm" svg:x2="9.287cm" svg:y2="19.981cm">
              <text:p/>
            </draw:line>
          </draw:g>
        </draw:g>
        <draw:frame draw:style-name="gr51" draw:text-style-name="P9" draw:layer="layout" svg:width="1.588cm" svg:height="0.725cm" svg:x="8.219cm" svg:y="19.96cm">
          <draw:text-box>
            <text:p><text:span text:style-name="T7">Error</text:span></text:p>
          </draw:text-box>
        </draw:frame>
      </draw:page>
      <draw:page draw:name="AccessPoint" draw:style-name="dp1" draw:master-page-name="Default">
        <draw:g draw:style-name="gr4">
          <draw:frame draw:style-name="gr23" draw:text-style-name="P23" draw:layer="layout" svg:width="19.04cm" svg:height="0.968cm" svg:x="1.06cm" svg:y="1.597cm">
            <draw:text-box>
              <text:p text:style-name="P10"><text:span text:style-name="T18">OradioAccessPoint</text:span></text:p>
            </draw:text-box>
          </draw:frame>
          <draw:rect draw:style-name="gr24" draw:text-style-name="P24" draw:layer="layout" svg:width="19.04cm" svg:height="20.241cm" svg:x="1cm" svg:y="1.679cm" draw:corner-radius="0.5cm">
            <text:p/>
          </draw:rect>
          <draw:line draw:style-name="gr52" draw:text-style-name="P2" draw:layer="layout" svg:x1="1.004cm" svg:y1="2.441cm" svg:x2="20.031cm" svg:y2="2.433cm">
            <text:p/>
          </draw:line>
        </draw:g>
        <draw:frame draw:style-name="gr68" draw:text-style-name="P30" draw:layer="layout" svg:width="5.715cm" svg:height="0.722cm" svg:x="12.43cm" svg:y="19.375cm">
          <draw:text-box>
            <text:p><text:span text:style-name="T21">/playSound(SOUND_NO_WIFI)</text:span></text:p>
          </draw:text-box>
        </draw:frame>
        <draw:connector draw:style-name="gr63" draw:text-style-name="P2" draw:layer="layout" svg:x1="4.057cm" svg:y1="3.587cm" svg:x2="8.822cm" svg:y2="5.105cm" draw:start-shape="id35" draw:start-glue-point="8" draw:end-shape="id36" draw:end-glue-point="10" svg:d="M4057 3587v760h4765v758" svg:viewBox="0 0 4766 1519">
          <text:p/>
        </draw:connector>
        <draw:connector draw:style-name="gr63" draw:text-style-name="P2" draw:layer="layout" draw:line-skew="1.618cm" svg:x1="10.141cm" svg:y1="18.271cm" svg:x2="10.145cm" svg:y2="20.37cm" draw:start-shape="id37" draw:start-glue-point="7" draw:end-shape="id38" draw:end-glue-point="1" svg:d="M10141 18271h2144v2099h-2140" svg:viewBox="0 0 2145 2100">
          <text:p/>
        </draw:connector>
        <draw:connector draw:style-name="gr63" draw:text-style-name="P2" draw:layer="layout" draw:line-skew="-2.3cm" svg:x1="9.541cm" svg:y1="18.271cm" svg:x2="9.545cm" svg:y2="20.37cm" draw:start-shape="id37" draw:start-glue-point="5" draw:end-shape="id38" draw:end-glue-point="3" svg:d="M9541 18271h-2825v2099h2829" svg:viewBox="0 0 2830 2100">
          <text:p/>
        </draw:connector>
        <draw:frame draw:style-name="gr54" draw:text-style-name="P30" draw:layer="layout" svg:width="5.446cm" svg:height="0.952cm" svg:x="1.586cm" svg:y="19.38cm">
          <draw:text-box>
            <text:p><text:span text:style-name="T21">/playSound(SOUND_WIFI)</text:span></text:p>
          </draw:text-box>
        </draw:frame>
        <draw:g draw:style-name="gr39" xml:id="id38" draw:id="id38">
          <draw:custom-shape draw:style-name="gr26" draw:text-style-name="P1" draw:layer="layout" svg:width="0.4cm" svg:height="0.4cm" svg:x="9.645cm" svg:y="20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9.545cm" svg:y="20.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3" draw:layer="layout" svg:width="3.493cm" svg:height="1.357cm" svg:x="5.762cm" svg:y="3.1cm">
          <draw:text-box>
            <text:p><text:span text:style-name="T13">LongPressPlay</text:span></text:p>
            <text:p><text:span text:style-name="T10">/startOradioAP()</text:span></text:p>
          </draw:text-box>
        </draw:frame>
        <draw:connector draw:style-name="gr63" draw:text-style-name="P2" draw:layer="layout" draw:line-skew="0.505cm" svg:x1="11.175cm" svg:y1="9.817cm" svg:x2="13.39cm" svg:y2="12.654cm" draw:start-shape="id36" draw:start-glue-point="12" draw:end-shape="id39" draw:end-glue-point="7" svg:d="M11175 9817v1943h2215v894" svg:viewBox="0 0 2216 2838">
          <text:p/>
        </draw:connector>
        <draw:g draw:style-name="gr1" xml:id="id40" draw:id="id40">
          <draw:custom-shape draw:style-name="gr65" draw:text-style-name="P29" draw:layer="layout" svg:width="0.717cm" svg:height="0.718cm" svg:x="19.015cm" svg:y="10.0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094cm" svg:y1="10.175cm" svg:x2="19.655cm" svg:y2="10.737cm">
              <text:p/>
            </draw:line>
            <draw:line draw:style-name="gr57" draw:text-style-name="P2" draw:layer="layout" svg:x1="19.649cm" svg:y1="10.155cm" svg:x2="19.065cm" svg:y2="10.738cm">
              <text:p/>
            </draw:line>
          </draw:g>
        </draw:g>
        <draw:connector draw:style-name="gr63" draw:text-style-name="P2" draw:layer="layout" svg:x1="12.473cm" svg:y1="15.252cm" svg:x2="9.841cm" svg:y2="17.971cm" draw:start-shape="id39" draw:start-glue-point="5" draw:end-shape="id37" draw:end-glue-point="4" svg:d="M12473 15252v1348h-2632v1371" svg:viewBox="0 0 2633 2720">
          <text:p/>
        </draw:connector>
        <draw:frame draw:style-name="gr70" draw:text-style-name="P31" draw:layer="layout" svg:width="2.97cm" svg:height="1.433cm" svg:x="11.365cm" svg:y="10.209cm">
          <draw:text-box>
            <text:p><text:span text:style-name="T13">ApActive,</text:span></text:p>
            <text:p><text:span text:style-name="T13">ButtonStop</text:span></text:p>
            <text:p><text:span text:style-name="T13">/ - </text:span></text:p>
          </draw:text-box>
        </draw:frame>
        <draw:rect draw:style-name="gr24" draw:text-style-name="P2" xml:id="id36" draw:id="id36" draw:layer="layout" svg:width="7.195cm" svg:height="4.75cm" svg:x="6.822cm" svg:y="5.10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2" draw:layer="layout" svg:width="4.311cm" svg:height="0.735cm" svg:x="8.302cm" svg:y="5.24cm">
          <draw:text-box>
            <text:p><text:span text:style-name="T17">ActivateOradioAp</text:span></text:p>
          </draw:text-box>
        </draw:frame>
        <draw:frame draw:style-name="gr71" draw:text-style-name="P21" draw:layer="layout" svg:width="6.35cm" svg:height="3.753cm" svg:x="7.25cm" svg:y="5.775cm">
          <draw:text-box>
            <text:p><text:span text:style-name="T3">Entry</text:span><text:span text:style-name="T6"> </text:span></text:p>
            <text:p><text:span text:style-name="T6"><text:s text:c="3"/></text:span><text:span text:style-name="T13">/startLedPlayFlashing();</text:span></text:p>
            <text:p><text:span text:style-name="T13"><text:s text:c="4"/>playSound(</text:span><text:span text:style-name="T22">SOUND_AP_START</text:span><text:span text:style-name="T13">)</text:span></text:p>
            <text:p><text:span text:style-name="T3">Do</text:span><text:span text:style-name="T6"> </text:span><text:span text:style-name="T13">/WaitForWiFiMessage()</text:span></text:p>
            <text:p><text:span text:style-name="T3">Exit</text:span><text:span text:style-name="T6"> </text:span><text:span text:style-name="T13">/</text:span></text:p>
            <text:p><text:span text:style-name="T13"><text:s text:c="2"/>upon WiFiAp raise ApActive</text:span></text:p>
            <text:p><text:span text:style-name="T13"><text:s text:c="2"/>upon WiFiApFail raise ApFail</text:span></text:p>
            <text:p><text:span text:style-name="T13"><text:s text:c="2"/>upon WaitTimeOut raise criticalError</text:span></text:p>
          </draw:text-box>
        </draw:frame>
        <draw:frame draw:style-name="gr51" draw:text-style-name="P9" draw:layer="layout" svg:width="1.588cm" svg:height="0.725cm" svg:x="18.145cm" svg:y="10.807cm">
          <draw:text-box>
            <text:p><text:span text:style-name="T7">Error</text:span></text:p>
          </draw:text-box>
        </draw:frame>
        <draw:connector draw:style-name="gr72" draw:text-style-name="P2" draw:layer="layout" draw:type="curve" draw:line-skew="0.054cm -1.197cm" svg:x1="7.617cm" svg:y1="15.252cm" svg:x2="6.696cm" svg:y2="13.57cm" draw:start-shape="id39" draw:start-glue-point="11" draw:end-shape="id39" draw:end-glue-point="13" svg:d="M7617 15252c0 832-1310 693-2177 65s-1291-1747 1256-1747" svg:viewBox="0 0 2850 2263">
          <text:p/>
        </draw:connector>
        <draw:rect draw:style-name="gr24" draw:text-style-name="P2" xml:id="id39" draw:id="id39" draw:layer="layout" svg:width="8.274cm" svg:height="2.598cm" svg:x="6.696cm" svg:y="12.65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2" draw:layer="layout" svg:width="3.876cm" svg:height="0.725cm" svg:x="8.285cm" svg:y="12.83cm">
          <draw:text-box>
            <text:p><text:span text:style-name="T17">OradioApActive</text:span></text:p>
          </draw:text-box>
        </draw:frame>
        <draw:frame draw:style-name="gr73" draw:text-style-name="P21" draw:layer="layout" svg:width="8.373cm" svg:height="2.541cm" svg:x="7.032cm" svg:y="12.965cm">
          <draw:text-box>
            <text:p><text:span text:style-name="T3">Entry</text:span><text:span text:style-name="T6"> </text:span><text:span text:style-name="T13">/</text:span></text:p>
            <text:p><text:span text:style-name="T3">Do</text:span><text:span text:style-name="T6"> </text:span><text:span text:style-name="T13">/WaitForWifiMessage()</text:span></text:p>
            <text:p><text:span text:style-name="T3">Exit</text:span><text:span text:style-name="T6"> </text:span></text:p>
            <text:p><text:span text:style-name="T6"><text:s text:c="3"/></text:span><text:span text:style-name="T13">upon WifiMessage raise OradioApStopped</text:span></text:p>
          </draw:text-box>
        </draw:frame>
        <draw:connector draw:style-name="gr63" draw:text-style-name="P2" draw:layer="layout" svg:x1="14.017cm" svg:y1="8.698cm" svg:x2="19.373cm" svg:y2="10.089cm" draw:start-shape="id36" draw:start-glue-point="8" draw:end-shape="id40" draw:end-glue-point="0" svg:d="M14017 8698h5356v1391" svg:viewBox="0 0 5357 1392">
          <text:p/>
        </draw:connector>
        <draw:frame draw:style-name="gr74" draw:text-style-name="P32" draw:layer="layout" svg:width="3.175cm" svg:height="1.039cm" svg:x="15.287cm" svg:y="7.632cm">
          <draw:text-box>
            <text:p><text:span text:style-name="T23">criticalError</text:span></text:p>
            <text:p><text:span text:style-name="T23">/gotoError</text:span></text:p>
          </draw:text-box>
        </draw:frame>
        <draw:connector draw:style-name="gr63" draw:text-style-name="P2" draw:layer="layout" svg:x1="6.822cm" svg:y1="7.48cm" svg:x2="2.552cm" svg:y2="7.072cm" draw:start-shape="id36" draw:start-glue-point="3" draw:end-shape="id41" draw:end-glue-point="1" svg:d="M6822 7480h-2134v-408h-2136" svg:viewBox="0 0 4271 409">
          <text:p/>
        </draw:connector>
        <draw:frame draw:style-name="gr70" draw:text-style-name="P30" draw:layer="layout" svg:width="3.675cm" svg:height="1.433cm" svg:x="1.77cm" svg:y="13.825cm">
          <draw:text-box>
            <text:p><text:span text:style-name="T21">LongPressPlay</text:span></text:p>
            <text:p><text:span text:style-name="T21">[OradioApActive]</text:span></text:p>
            <text:p><text:span text:style-name="T21">/ --</text:span></text:p>
          </draw:text-box>
        </draw:frame>
        <draw:g draw:style-name="gr39" xml:id="id41" draw:id="id41">
          <draw:custom-shape draw:style-name="gr26" draw:text-style-name="P1" draw:layer="layout" svg:width="0.4cm" svg:height="0.4cm" svg:x="2.052cm" svg:y="6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.952cm" svg:y="6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0" draw:text-style-name="P33" draw:layer="layout" svg:width="6.35cm" svg:height="1.433cm" svg:x="1cm" svg:y="7.787cm">
          <draw:text-box>
            <text:p><text:span text:style-name="T24">ApFail</text:span></text:p>
            <text:p><text:span text:style-name="T24">/playSound(SOUND_AP_STOP)</text:span></text:p>
            <text:p><text:span text:style-name="T24"><text:s/>stopLedPlayFlashing()</text:span></text:p>
          </draw:text-box>
        </draw:frame>
        <draw:custom-shape draw:style-name="gr13" draw:text-style-name="P2" xml:id="id37" draw:id="id37" draw:layer="layout" svg:width="0.6cm" svg:height="0.6cm" svg:x="9.541cm" svg:y="17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0" draw:text-style-name="P31" draw:layer="layout" svg:width="5.08cm" svg:height="1.433cm" svg:x="12.747cm" svg:y="15.57cm">
          <draw:text-box>
            <text:p><text:span text:style-name="T13">ButtonStop,</text:span></text:p>
            <text:p><text:span text:style-name="T13">OradioApStopped</text:span></text:p>
            <text:p text:style-name="P34"><text:span text:style-name="T13">/stopLedPlayFlashing()</text:span></text:p>
          </draw:text-box>
        </draw:frame>
        <draw:frame draw:style-name="gr75" draw:text-style-name="P31" draw:layer="layout" svg:width="3.493cm" svg:height="0.645cm" svg:x="6.162cm" svg:y="17.475cm">
          <draw:text-box>
            <text:p><text:span text:style-name="T13">[isWifiConnected]</text:span></text:p>
          </draw:text-box>
        </draw:frame>
        <draw:frame draw:style-name="gr75" draw:text-style-name="P31" draw:layer="layout" svg:width="2.222cm" svg:height="0.645cm" svg:x="9.89cm" svg:y="17.582cm">
          <draw:text-box>
            <text:p><text:span text:style-name="T13">[else]</text:span></text:p>
          </draw:text-box>
        </draw:frame>
        <draw:custom-shape draw:style-name="gr25" draw:text-style-name="P1" xml:id="id35" draw:id="id35" draw:layer="layout" svg:width="0.4cm" svg:height="0.4cm" svg:x="3.857cm" svg:y="3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2.54cm" svg:height="0.953cm" svg:x="16.875cm" svg:y="6.362cm">
          <text:p text:style-name="P35"><text:span text:style-name="T25">Timeout nodig?</text:span></text:p>
          <draw:enhanced-geometry svg:viewBox="0 0 21600 21600" draw:text-areas="800 800 20800 20800" draw:type="round-rectangular-callout" draw:modifiers="-6443.44746162928 33305.6603773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6" draw:text-style-name="P36" draw:layer="layout" svg:width="2.54cm" svg:height="0.953cm" svg:x="15.922cm" svg:y="12.712cm">
          <text:p text:style-name="P35"><text:span text:style-name="T25">Is er een timeout nodig?</text:span></text:p>
          <draw:enhanced-geometry svg:viewBox="0 0 21600 21600" draw:text-areas="800 800 20800 20800" draw:type="round-rectangular-callout" draw:modifiers="-6443.44746162928 33305.6603773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6" draw:text-style-name="P36" draw:layer="layout" svg:width="2.54cm" svg:height="0.953cm" svg:x="3.54cm" svg:y="9.855cm">
          <text:p text:style-name="P35"><text:span text:style-name="T25">ApFail en Timeout: beide critical</text:span></text:p>
          <draw:enhanced-geometry svg:viewBox="0 0 21600 21600" draw:text-areas="800 800 20800 20800" draw:type="round-rectangular-callout" draw:modifiers="26700.3541912633 -51781.132075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</draw:page>
      <draw:page draw:name="OradioControl" draw:style-name="dp1" draw:master-page-name="Default">
        <draw:rect draw:style-name="gr24" draw:text-style-name="P2" xml:id="id43" draw:id="id43" draw:layer="layout" svg:width="10.16cm" svg:height="2.54cm" svg:x="4.175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draw:glue-point draw:id="13" svg:x="-4.119cm" svg:y="5.003cm"/>
          <text:p/>
        </draw:rect>
        <draw:frame draw:style-name="gr77" draw:text-style-name="P37" draw:layer="layout" svg:width="9.842cm" svg:height="2.09cm" svg:x="4.71cm" svg:y="14.367cm">
          <draw:text-box>
            <text:p><text:span text:style-name="T3">Entry</text:span><text:span text:style-name="T25"> /playSound(SOUND_STOP); setLed(LED_STOP); stopPlayers()</text:span></text:p>
            <text:p><text:span text:style-name="T3">do</text:span><text:span text:style-name="T6"> </text:span><text:span text:style-name="T25">/ waitForButtonPressed()</text:span></text:p>
            <text:p><text:span text:style-name="T3">exit</text:span></text:p>
          </draw:text-box>
          <draw:glue-point draw:id="4" svg:x="5cm" svg:y="-4.997cm"/>
          <draw:glue-point draw:id="5" svg:x="5cm" svg:y="-4.997cm"/>
        </draw:frame>
        <draw:frame draw:style-name="gr51" draw:text-style-name="P22" draw:layer="layout" svg:width="3.175cm" svg:height="0.725cm" svg:x="6.715cm" svg:y="13.927cm">
          <draw:text-box>
            <text:p><text:span text:style-name="T17">Standby</text:span></text:p>
          </draw:text-box>
        </draw:frame>
        <draw:g draw:style-name="gr4">
          <draw:frame draw:style-name="gr23" draw:text-style-name="P23" draw:layer="layout" svg:width="19.154cm" svg:height="1.774cm" svg:x="0.682cm" svg:y="1.096cm">
            <draw:text-box>
              <text:p text:style-name="P10"><text:span text:style-name="T18">OradioControl</text:span></text:p>
            </draw:text-box>
          </draw:frame>
          <draw:rect draw:style-name="gr24" draw:text-style-name="P2" draw:layer="layout" svg:width="19.154cm" svg:height="28.257cm" svg:x="0.846cm" svg:y="1cm" draw:corner-radius="0.5cm">
            <draw:glue-point draw:id="4" svg:x="-3.688cm" svg:y="-5.004cm"/>
            <text:p/>
          </draw:rect>
          <draw:line draw:style-name="gr10" draw:text-style-name="P2" draw:layer="layout" svg:x1="0.851cm" svg:y1="2.027cm" svg:x2="19.993cm" svg:y2="2.017cm">
            <text:p/>
          </draw:line>
        </draw:g>
        <draw:rect draw:style-name="gr24" draw:text-style-name="P2" xml:id="id44" draw:id="id44" draw:layer="layout" svg:width="5.059cm" svg:height="2.54cm" svg:x="10.681cm" svg:y="21.7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draw:glue-point draw:id="11" svg:x="5.003cm" svg:y="-1.633cm"/>
          <draw:glue-point draw:id="12" svg:x="5.003cm" svg:y="-2.881cm"/>
          <draw:glue-point draw:id="13" svg:x="-1.097cm" svg:y="4.874cm"/>
          <draw:glue-point draw:id="14" svg:x="0.873cm" svg:y="4.874cm"/>
          <draw:glue-point draw:id="15" svg:x="4.162cm" svg:y="4.874cm"/>
          <draw:glue-point draw:id="16" svg:x="-5cm" svg:y="-2.625cm"/>
          <draw:glue-point draw:id="17" svg:x="-3.425cm" svg:y="4.874cm"/>
          <draw:glue-point draw:id="18" svg:x="1.595cm" svg:y="-5.003cm"/>
          <text:p/>
        </draw:rect>
        <draw:frame draw:style-name="gr78" draw:text-style-name="P21" draw:layer="layout" svg:width="4.545cm" svg:height="1.991cm" svg:x="10.742cm" svg:y="22.2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 text:style-name="P34"><text:span text:style-name="T26">exit</text:span><text:span text:style-name="T27"> /</text:span><text:span text:style-name="T25">on usbAbsent </text:span></text:p>
            <text:p text:style-name="P34"><text:span text:style-name="T25"><text:s text:c="15"/>raise criticalError</text:span></text:p>
          </draw:text-box>
        </draw:frame>
        <draw:frame draw:style-name="gr54" draw:text-style-name="P22" draw:layer="layout" svg:width="3.175cm" svg:height="0.952cm" svg:x="11.795cm" svg:y="21.755cm">
          <draw:text-box>
            <text:p><text:span text:style-name="T17">MpdPlaying</text:span></text:p>
          </draw:text-box>
        </draw:frame>
        <draw:rect draw:style-name="gr24" draw:text-style-name="P2" xml:id="id46" draw:id="id46" draw:layer="layout" svg:width="6.668cm" svg:height="2.54cm" svg:x="2.587cm" svg:y="23.9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draw:glue-point draw:id="11" svg:x="-5.001cm" svg:y="-2.755cm"/>
          <draw:glue-point draw:id="12" svg:x="-5.001cm" svg:y="2.244cm"/>
          <draw:glue-point draw:id="13" svg:x="5.002cm" svg:y="-2.755cm"/>
          <draw:glue-point draw:id="14" svg:x="1.574cm" svg:y="-5.003cm"/>
          <text:p/>
        </draw:rect>
        <draw:frame draw:style-name="gr79" draw:text-style-name="P38" draw:layer="layout" svg:width="6.433cm" svg:height="2.461cm" svg:x="2.822cm" svg:y="24.252cm">
          <draw:text-box>
            <text:p text:style-name="P34"><text:span text:style-name="T26">entry</text:span><text:span text:style-name="T27"> </text:span><text:span text:style-name="T28">/</text:span><text:span text:style-name="T25">playSound(SOUND_SPOTIFY);</text:span></text:p>
            <text:p text:style-name="P34"><text:span text:style-name="T25">setLed(LED_PLAY)</text:span></text:p>
            <text:p><text:span text:style-name="T3">do</text:span><text:span text:style-name="T6"> /</text:span></text:p>
            <text:p text:style-name="P34"><text:span text:style-name="T26">exit</text:span><text:span text:style-name="T27"> / </text:span><text:span text:style-name="T25">on usbAbsent raise criticalError</text:span></text:p>
            <text:p text:style-name="P34"><text:span text:style-name="T25">if not isSpotifyConnected raise ButtonStop</text:span></text:p>
          </draw:text-box>
        </draw:frame>
        <draw:frame draw:style-name="gr54" draw:text-style-name="P22" draw:layer="layout" svg:width="3.523cm" svg:height="0.952cm" svg:x="3.222cm" svg:y="23.86cm">
          <draw:text-box>
            <text:p><text:span text:style-name="T17">SpotifyPlaying</text:span></text:p>
          </draw:text-box>
        </draw:frame>
        <draw:rect draw:style-name="gr24" draw:text-style-name="P2" xml:id="id48" draw:id="id48" draw:layer="layout" svg:width="10.16cm" svg:height="4.226cm" svg:x="3.54cm" svg:y="3.4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80" draw:text-style-name="P21" draw:layer="layout" svg:width="8.137cm" svg:height="4.117cm" svg:x="4.123cm" svg:y="3.785cm">
          <draw:text-box>
            <text:p><text:span text:style-name="T3">Entry</text:span><text:span text:style-name="T6"> / </text:span><text:span text:style-name="T13">setLed(LED_STOP)</text:span></text:p>
            <text:p text:style-name="P39"><text:span text:style-name="T3">Do</text:span><text:span text:style-name="T6"> /</text:span></text:p>
            <text:p text:style-name="P39"><text:span text:style-name="T25">shared_q = new Queue(); Create new instances for:</text:span></text:p>
            <text:p text:style-name="P39"><text:span text:style-name="T25">USBService(shared_q); SpotifyConnect(shared_q); </text:span></text:p>
            <text:p text:style-name="P39"><text:span text:style-name="T25">Backlighting(); MPDMonitor(); MPDControl();</text:span></text:p>
            <text:p text:style-name="P39"><text:span text:style-name="T25">PowerSupplyService(); LEDControl(); RMService(); </text:span></text:p>
            <text:p text:style-name="P39"><text:span text:style-name="T25">TouchButtons(shared_q); VolumeControl(shared_q);</text:span></text:p>
            <text:p text:style-name="P39"><text:span text:style-name="T25">WebService(shared_q)</text:span></text:p>
            <text:p><text:span text:style-name="T3">exit</text:span><text:span text:style-name="T6"> </text:span><text:span text:style-name="T25">/if creationFailed then raise criticalError </text:span></text:p>
            <text:p><text:span text:style-name="T25"><text:tab/></text:span><text:span text:style-name="T25">else raise creationDone</text:span></text:p>
          </draw:text-box>
        </draw:frame>
        <draw:frame draw:style-name="gr51" draw:text-style-name="P22" draw:layer="layout" svg:width="3.876cm" svg:height="0.725cm" svg:x="6.632cm" svg:y="3.367cm">
          <draw:text-box>
            <text:p><text:span text:style-name="T17">OradioCreation</text:span></text:p>
          </draw:text-box>
        </draw:frame>
        <draw:connector draw:style-name="gr58" draw:text-style-name="P2" draw:layer="layout" svg:x1="10.127cm" svg:y1="12.512cm" svg:x2="9.255cm" svg:y2="13.825cm" draw:start-shape="id42" draw:start-glue-point="5" draw:end-shape="id43" draw:end-glue-point="0" svg:d="M10127 12512v657h-872v656" svg:viewBox="0 0 873 1314">
          <text:p/>
        </draw:connector>
        <draw:connector draw:style-name="gr58" draw:text-style-name="P2" draw:layer="layout" svg:x1="13.21cm" svg:y1="21.722cm" svg:x2="12.605cm" svg:y2="16.365cm" draw:start-shape="id44" draw:start-glue-point="0" draw:end-shape="id43" draw:end-glue-point="4" svg:d="M13210 21722v-2678h-605v-2679" svg:viewBox="0 0 606 5358">
          <text:p/>
        </draw:connector>
        <draw:connector draw:style-name="gr58" draw:text-style-name="P2" draw:layer="layout" svg:x1="8.341cm" svg:y1="18.27cm" svg:x2="4.914cm" svg:y2="23.96cm" draw:start-shape="id45" draw:start-glue-point="5" draw:end-shape="id46" draw:end-glue-point="10" svg:d="M8341 18270h-3427v5690" svg:viewBox="0 0 3428 5691">
          <text:p/>
        </draw:connector>
        <draw:connector draw:style-name="gr58" draw:text-style-name="P2" draw:layer="layout" svg:x1="8.941cm" svg:y1="18.27cm" svg:x2="11.93cm" svg:y2="21.722cm" draw:start-shape="id45" draw:start-glue-point="7" draw:end-shape="id44" draw:end-glue-point="10" svg:d="M8941 18270h2989v3452" svg:viewBox="0 0 2990 3453">
          <text:p/>
        </draw:connector>
        <draw:connector draw:style-name="gr58" draw:text-style-name="P2" draw:layer="layout" draw:line-skew="0cm -1.087cm" svg:x1="4.037cm" svg:y1="23.96cm" svg:x2="4.175cm" svg:y2="15.095cm" draw:start-shape="id46" draw:start-glue-point="9" draw:end-shape="id43" draw:end-glue-point="3" svg:d="M4037 23960v-3797h-1450v-5068h1588" svg:viewBox="0 0 1589 8866">
          <text:p/>
        </draw:connector>
        <draw:custom-shape draw:style-name="gr25" draw:text-style-name="P1" xml:id="id47" draw:id="id47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draw:line-skew="-0.295cm" svg:x1="13.212cm" svg:y1="2.657cm" svg:x2="8.62cm" svg:y2="3.441cm" draw:start-shape="id47" draw:start-glue-point="8" draw:end-shape="id48" draw:end-glue-point="0" svg:d="M13212 2657v98h-4592v686" svg:viewBox="0 0 4593 785">
          <text:p/>
        </draw:connector>
        <draw:rect draw:style-name="gr24" draw:text-style-name="P2" xml:id="id42" draw:id="id42" draw:layer="layout" svg:width="8.525cm" svg:height="2.857cm" svg:x="4.175cm" svg:y="9.65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81" draw:text-style-name="P21" draw:layer="layout" svg:width="7.303cm" svg:height="1.673cm" svg:x="4.627cm" svg:y="9.89cm">
          <draw:text-box>
            <text:p><text:span text:style-name="T3">Entry</text:span><text:span text:style-name="T6"> /</text:span></text:p>
            <text:p><text:span text:style-name="T3">Do</text:span><text:span text:style-name="T6"> </text:span><text:span text:style-name="T13">/ </text:span><text:span text:style-name="T25">waitForUsbMessage()</text:span></text:p>
            <text:p><text:span text:style-name="T26">Exit</text:span><text:span text:style-name="T27"> </text:span></text:p>
          </draw:text-box>
        </draw:frame>
        <draw:frame draw:style-name="gr82" draw:text-style-name="P22" draw:layer="layout" svg:width="3.175cm" svg:height="1.36cm" svg:x="6.985cm" svg:y="9.655cm">
          <draw:text-box>
            <text:p><text:span text:style-name="T17">MpdCreation</text:span></text:p>
          </draw:text-box>
        </draw:frame>
        <draw:connector draw:style-name="gr58" draw:text-style-name="P2" draw:layer="layout" svg:x1="10.634cm" svg:y1="7.667cm" svg:x2="11.072cm" svg:y2="9.655cm" draw:start-shape="id48" draw:start-glue-point="5" draw:end-shape="id42" draw:end-glue-point="7" svg:d="M10634 7667v994h438v994" svg:viewBox="0 0 439 1989">
          <text:p/>
        </draw:connector>
        <draw:frame draw:style-name="gr54" draw:text-style-name="P13" draw:layer="layout" svg:width="3.492cm" svg:height="0.952cm" svg:x="7.28cm" svg:y="8.485cm">
          <draw:text-box>
            <text:p><text:span text:style-name="T10">creationDone</text:span></text:p>
            <text:p><text:span text:style-name="T10">/startMpdC</text:span><text:span text:style-name="T29">reation</text:span><text:span text:style-name="T10">()</text:span></text:p>
          </draw:text-box>
        </draw:frame>
        <draw:frame draw:style-name="gr46" draw:text-style-name="P17" draw:layer="layout" svg:width="1.822cm" svg:height="0.806cm" svg:x="16.958cm" svg:y="11.477cm">
          <draw:text-box>
            <text:p><text:span text:style-name="T15">Error</text:span></text:p>
          </draw:text-box>
        </draw:frame>
        <draw:connector draw:style-name="gr58" draw:text-style-name="P2" draw:layer="layout" svg:x1="13.7cm" svg:y1="6.638cm" svg:x2="18.773cm" svg:y2="12.112cm" draw:start-shape="id48" draw:start-glue-point="8" draw:end-shape="id49" draw:end-glue-point="0" svg:d="M13700 6638h5073v5474" svg:viewBox="0 0 5074 5475">
          <text:p/>
        </draw:connector>
        <draw:connector draw:style-name="gr58" draw:text-style-name="P2" draw:layer="layout" svg:x1="12.7cm" svg:y1="11.816cm" svg:x2="18.415cm" svg:y2="12.471cm" draw:start-shape="id42" draw:start-glue-point="8" draw:end-shape="id49" svg:d="M12700 11816h2845v655h2870" svg:viewBox="0 0 5716 656">
          <text:p/>
        </draw:connector>
        <draw:frame draw:style-name="gr29" draw:text-style-name="P13" draw:layer="layout" svg:width="3.175cm" svg:height="0.887cm" svg:x="10.215cm" svg:y="12.601cm">
          <draw:text-box>
            <text:p><text:span text:style-name="T10">mpdCreationDone</text:span></text:p>
            <text:p><text:span text:style-name="T10">/goto_standby()</text:span></text:p>
          </draw:text-box>
        </draw:frame>
        <draw:connector draw:style-name="gr58" draw:text-style-name="P2" draw:layer="layout" svg:x1="14.335cm" svg:y1="14.653cm" svg:x2="18.773cm" svg:y2="12.83cm" draw:start-shape="id43" draw:start-glue-point="11" draw:end-shape="id49" draw:end-glue-point="2" svg:d="M14335 14653h4438v-1823" svg:viewBox="0 0 4439 1824">
          <text:p/>
        </draw:connector>
        <draw:connector draw:style-name="gr58" draw:text-style-name="P2" draw:layer="layout" draw:line-skew="0.612cm" svg:x1="15.74cm" svg:y1="23.643cm" svg:x2="19.572cm" svg:y2="25.231cm" draw:start-shape="id44" draw:start-glue-point="8" draw:end-shape="id50" draw:end-glue-point="2" svg:d="M15740 23643h2336v2114h1496v-526" svg:viewBox="0 0 3833 2115">
          <text:p/>
        </draw:connector>
        <draw:connector draw:style-name="gr58" draw:text-style-name="P2" draw:layer="layout" draw:line-skew="1.939cm" svg:x1="4.176cm" svg:y1="26.5cm" svg:x2="19.572cm" svg:y2="25.231cm" draw:start-shape="id46" draw:start-glue-point="6" draw:end-shape="id50" draw:end-glue-point="2" svg:d="M4176 26500v2440h15396v-3709" svg:viewBox="0 0 15397 3710">
          <text:p/>
        </draw:connector>
        <draw:frame draw:style-name="gr83" draw:text-style-name="P13" draw:layer="layout" svg:width="4.763cm" svg:height="2.223cm" svg:x="15.47cm" svg:y="16.24cm">
          <draw:text-box>
            <text:p><text:span text:style-name="T10">ButtonPreset1,</text:span></text:p>
            <text:p><text:span text:style-name="T10">ButtonPreset2,</text:span></text:p>
            <text:p><text:span text:style-name="T10">ButtonPreset3,</text:span></text:p>
            <text:p><text:span text:style-name="T30">/playSound(</text:span><text:span text:style-name="T10">SOUND_PRESETx)</text:span></text:p>
            <text:p><text:span text:style-name="T10">/setLed(LED_PLAY)</text:span></text:p>
            <text:p><text:span text:style-name="T10">/startMpdPlayback()</text:span></text:p>
          </draw:text-box>
        </draw:frame>
        <draw:frame draw:style-name="gr84" draw:text-style-name="P13" draw:layer="layout" svg:width="4.445cm" svg:height="1.27cm" svg:x="4.71cm" svg:y="18.68cm">
          <draw:text-box>
            <text:p><text:span text:style-name="T10">/playSound(</text:span><text:span text:style-name="T31">SOUND_SPOTIFY</text:span><text:span text:style-name="T10">)</text:span></text:p>
            <text:p><text:span text:style-name="T10">/setLed(LED_PLAY)</text:span></text:p>
            <text:p><text:span text:style-name="T10">/startSpotifyPlayback()</text:span></text:p>
          </draw:text-box>
        </draw:frame>
        <draw:frame draw:style-name="gr85" draw:text-style-name="P13" draw:layer="layout" svg:width="3.81cm" svg:height="1.548cm" svg:x="8.22cm" svg:y="19.567cm">
          <draw:text-box>
            <text:p><text:span text:style-name="T10">/playSound(</text:span><text:span text:style-name="T31">SOUND_PLAY</text:span><text:span text:style-name="T10">)</text:span></text:p>
            <text:p><text:span text:style-name="T10">/setLed(LED_PLAY)</text:span></text:p>
            <text:p><text:span text:style-name="T10">/startMpdPlayback()</text:span></text:p>
          </draw:text-box>
        </draw:frame>
        <draw:frame draw:style-name="gr84" draw:text-style-name="P13" draw:layer="layout" svg:width="3.175cm" svg:height="1.27cm" svg:x="1.317cm" svg:y="20.367cm">
          <draw:text-box>
            <text:p><text:span text:style-name="T10">ButtonStop</text:span></text:p>
            <text:p><text:span text:style-name="T10">/gotoStandby()</text:span></text:p>
            <text:p><text:span text:style-name="T10">/posponeVolEvents</text:span></text:p>
          </draw:text-box>
        </draw:frame>
        <draw:frame draw:style-name="gr86" draw:text-style-name="P40" draw:layer="layout" svg:width="4.445cm" svg:height="1.587cm" svg:x="14.652cm" svg:y="19.098cm">
          <draw:text-box>
            <text:p><text:span text:style-name="T29">VolumeChanged</text:span></text:p>
            <text:p><text:span text:style-name="T29">/playSound(SOUND_PLAY)</text:span></text:p>
            <text:p><text:span text:style-name="T29">/setLed(LED_PLAY</text:span></text:p>
            <text:p><text:span text:style-name="T29">/startMpdPlayback()</text:span></text:p>
          </draw:text-box>
        </draw:frame>
        <draw:frame draw:style-name="gr87" draw:text-style-name="P13" draw:layer="layout" svg:width="3.175cm" svg:height="1.205cm" svg:x="12.472cm" svg:y="17.522cm">
          <draw:text-box>
            <text:p><text:span text:style-name="T10">ButtonStop</text:span></text:p>
            <text:p><text:span text:style-name="T10">/gotoStandby()</text:span></text:p>
            <text:p><text:span text:style-name="T10">/postponeVolEvents</text:span></text:p>
          </draw:text-box>
        </draw:frame>
        <draw:frame draw:style-name="gr54" draw:text-style-name="P17" draw:layer="layout" svg:width="1.822cm" svg:height="0.952cm" svg:x="18.745cm" svg:y="23.86cm">
          <draw:text-box>
            <text:p><text:span text:style-name="T15">Error</text:span></text:p>
          </draw:text-box>
        </draw:frame>
        <draw:g draw:style-name="gr1" xml:id="id49" draw:id="id49">
          <draw:custom-shape draw:style-name="gr65" draw:text-style-name="P29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50" draw:id="id50">
          <draw:custom-shape draw:style-name="gr65" draw:text-style-name="P29" draw:layer="layout" svg:width="0.717cm" svg:height="0.718cm" svg:x="19.2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93cm" svg:y1="24.599cm" svg:x2="19.854cm" svg:y2="25.161cm">
              <text:p/>
            </draw:line>
            <draw:line draw:style-name="gr57" draw:text-style-name="P2" draw:layer="layout" svg:x1="19.848cm" svg:y1="24.579cm" svg:x2="19.264cm" svg:y2="25.162cm">
              <text:p/>
            </draw:line>
          </draw:g>
        </draw:g>
        <draw:frame draw:style-name="gr88" draw:text-style-name="P13" draw:layer="layout" svg:width="3.357cm" svg:height="1.317cm" svg:x="12.883cm" svg:y="10.36cm">
          <draw:text-box>
            <text:p><text:span text:style-name="T10">timeOut, </text:span></text:p>
            <text:p><text:span text:style-name="T10">criticalError,</text:span></text:p>
            <text:p><text:span text:style-name="T10">/goto_error()</text:span></text:p>
          </draw:text-box>
        </draw:frame>
        <draw:frame draw:style-name="gr29" draw:text-style-name="P13" draw:layer="layout" svg:width="2.222cm" svg:height="0.887cm" svg:x="16.24cm" svg:y="5.833cm">
          <draw:text-box>
            <text:p><text:span text:style-name="T10">criticalError</text:span></text:p>
            <text:p><text:span text:style-name="T10">/gotoError()</text:span></text:p>
          </draw:text-box>
        </draw:frame>
        <draw:frame draw:style-name="gr29" draw:text-style-name="P13" draw:layer="layout" svg:width="3.175cm" svg:height="0.887cm" svg:x="15.287cm" svg:y="13.765cm">
          <draw:text-box>
            <text:p><text:span text:style-name="T10">criticalError</text:span></text:p>
            <text:p><text:span text:style-name="T10">/gotoError()</text:span></text:p>
          </draw:text-box>
        </draw:frame>
        <draw:frame draw:style-name="gr29" draw:text-style-name="P13" draw:layer="layout" svg:width="2.54cm" svg:height="0.887cm" svg:x="16.105cm" svg:y="23.595cm">
          <draw:text-box>
            <text:p><text:span text:style-name="T10">criticalError</text:span></text:p>
            <text:p><text:span text:style-name="T10">/goto_error()</text:span></text:p>
          </draw:text-box>
        </draw:frame>
        <draw:frame draw:style-name="gr56" draw:text-style-name="P13" draw:layer="layout" svg:width="2.54cm" svg:height="0.953cm" svg:x="4.075cm" svg:y="27.987cm">
          <draw:text-box>
            <text:p><text:span text:style-name="T10">criticalError</text:span></text:p>
            <text:p><text:span text:style-name="T10">/goto_error()</text:span></text:p>
          </draw:text-box>
        </draw:frame>
        <draw:connector draw:style-name="gr89" draw:text-style-name="P2" draw:layer="layout" draw:type="curve" draw:line-skew="-0.15cm" svg:x1="2.587cm" svg:y1="24.531cm" svg:x2="2.587cm" svg:y2="25.799cm" draw:start-shape="id46" draw:start-glue-point="11" draw:end-shape="id46" draw:end-glue-point="12" svg:d="M2587 24531c-976 0-976 1268 0 1268" svg:viewBox="0 0 733 1269">
          <text:p/>
        </draw:connector>
        <draw:frame draw:style-name="gr54" draw:text-style-name="P13" draw:layer="layout" svg:width="2.541cm" svg:height="0.952cm" svg:x="0.681cm" svg:y="25.765cm">
          <draw:text-box>
            <text:p><text:span text:style-name="T10">ButtonPlay</text:span></text:p>
            <text:p><text:span text:style-name="T10">/playSound()</text:span></text:p>
          </draw:text-box>
        </draw:frame>
        <draw:connector draw:style-name="gr58" draw:text-style-name="P2" draw:layer="layout" draw:line-skew="-0.554cm" svg:x1="9.255cm" svg:y1="24.531cm" svg:x2="10.681cm" svg:y2="22.326cm" draw:start-shape="id46" draw:start-glue-point="13" draw:end-shape="id44" draw:end-glue-point="16" svg:d="M9255 24531h159v-2205h1267" svg:viewBox="0 0 1427 2206">
          <text:p/>
        </draw:connector>
        <draw:frame draw:style-name="gr90" draw:text-style-name="P13" draw:layer="layout" svg:width="4.645cm" svg:height="2.222cm" svg:x="5.845cm" svg:y="20.82cm">
          <draw:text-box>
            <text:p><text:span text:style-name="T10">ButtonPreset1,</text:span></text:p>
            <text:p><text:span text:style-name="T10">ButtonPreset2,</text:span></text:p>
            <text:p><text:span text:style-name="T10">ButtonPreset3,</text:span></text:p>
            <text:p><text:span text:style-name="T10">/playSound(SOUND_PRESETx)</text:span></text:p>
            <text:p><text:span text:style-name="T10">/setLed(LED_PRESETx)</text:span></text:p>
            <text:p><text:span text:style-name="T10">/startMpdPlayback()</text:span></text:p>
          </draw:text-box>
        </draw:frame>
        <draw:connector draw:style-name="gr58" draw:text-style-name="P2" draw:layer="layout" svg:x1="10.64cm" svg:y1="27.17cm" svg:x2="5.921cm" svg:y2="26.5cm" draw:start-shape="id51" draw:start-glue-point="5" draw:end-shape="id46" draw:end-glue-point="2" svg:d="M10640 27170h-4719v-670" svg:viewBox="0 0 4720 671">
          <text:p/>
        </draw:connector>
        <draw:frame draw:style-name="gr91" draw:text-style-name="P13" draw:layer="layout" svg:width="4.763cm" svg:height="0.635cm" svg:x="5.444cm" svg:y="27.135cm">
          <draw:text-box>
            <text:p><text:span text:style-name="T10">/startSpotifyPlayback()</text:span></text:p>
          </draw:text-box>
        </draw:frame>
        <draw:connector draw:style-name="gr89" draw:text-style-name="P2" draw:layer="layout" draw:type="curve" svg:x1="15.74cm" svg:y1="22.992cm" svg:x2="15.74cm" svg:y2="22.261cm" draw:start-shape="id44" draw:start-glue-point="1" draw:end-shape="id44" draw:end-glue-point="12" svg:d="M15740 22992c751 0 751-731 0-731" svg:viewBox="0 0 564 732">
          <text:p/>
        </draw:connector>
        <draw:frame draw:style-name="gr92" draw:text-style-name="P13" draw:layer="layout" svg:width="4.232cm" svg:height="1.841cm" svg:x="16.105cm" svg:y="21.472cm">
          <draw:text-box>
            <text:p><text:span text:style-name="T10">ButtonPreset1,</text:span></text:p>
            <text:p><text:span text:style-name="T10">ButtonPreset2,</text:span></text:p>
            <text:p><text:span text:style-name="T10">ButtonPreset3,</text:span></text:p>
            <text:p><text:span text:style-name="T10">/playSound(SOUND_NEXT)</text:span></text:p>
            <text:p><text:span text:style-name="T10">/nextSong()</text:span></text:p>
          </draw:text-box>
        </draw:frame>
        <draw:custom-shape draw:style-name="gr13" draw:text-style-name="P2" xml:id="id51" draw:id="id51" draw:layer="layout" svg:width="0.6cm" svg:height="0.6cm" svg:x="10.64cm" svg:y="26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10.703cm" svg:y1="23.649cm" svg:x2="10.94cm" svg:y2="26.87cm" draw:start-shape="id44" draw:start-glue-point="9" draw:end-shape="id51" draw:end-glue-point="4" svg:d="M10703 23649h-523v1905h760v1316" svg:viewBox="0 0 761 3222">
          <text:p/>
        </draw:connector>
        <draw:connector draw:style-name="gr58" draw:text-style-name="P2" draw:layer="layout" draw:line-skew="-0.946cm" svg:x1="11.24cm" svg:y1="27.17cm" svg:x2="14.241cm" svg:y2="27.97cm" draw:start-shape="id51" draw:start-glue-point="7" draw:end-shape="id52" draw:end-glue-point="5" svg:d="M11240 27170h555v800h2446" svg:viewBox="0 0 3002 801">
          <text:p/>
        </draw:connector>
        <draw:frame draw:style-name="gr93" draw:text-style-name="P41" draw:layer="layout" svg:width="4.127cm" svg:height="0.888cm" svg:x="15.505cm" svg:y="26.564cm">
          <draw:text-box>
            <text:p><text:span text:style-name="T32">/playSound(</text:span><text:span text:style-name="T33">SOUND_NEXT</text:span><text:span text:style-name="T34">)</text:span></text:p>
            <text:p text:style-name="P34"><text:span text:style-name="T34">/nextSong()</text:span></text:p>
          </draw:text-box>
        </draw:frame>
        <draw:custom-shape draw:style-name="gr13" draw:text-style-name="P2" xml:id="id45" draw:id="id45" draw:layer="layout" svg:width="0.6cm" svg:height="0.6cm" svg:x="8.341cm" svg:y="17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7.827cm" svg:y1="16.365cm" svg:x2="8.641cm" svg:y2="17.97cm" draw:start-shape="id43" draw:start-glue-point="12" draw:end-shape="id45" draw:end-glue-point="4" svg:d="M7827 16365v790h814v815" svg:viewBox="0 0 815 1606">
          <text:p/>
        </draw:connector>
        <draw:frame draw:style-name="gr75" draw:text-style-name="P13" draw:layer="layout" svg:width="2.251cm" svg:height="0.645cm" svg:x="5.734cm" svg:y="16.566cm">
          <draw:text-box>
            <text:p><text:span text:style-name="T10">ButtonPlay</text:span></text:p>
          </draw:text-box>
        </draw:frame>
        <draw:frame draw:style-name="gr75" draw:text-style-name="P31" draw:layer="layout" svg:width="3.81cm" svg:height="0.645cm" svg:x="5.092cm" svg:y="17.71cm">
          <draw:text-box>
            <text:p><text:span text:style-name="T13">[</text:span><text:span text:style-name="T25">isSpotifyConnected</text:span><text:span text:style-name="T13">]</text:span></text:p>
          </draw:text-box>
        </draw:frame>
        <draw:frame draw:style-name="gr75" draw:text-style-name="P13" draw:layer="layout" svg:width="1.588cm" svg:height="0.645cm" svg:x="8.937cm" svg:y="17.71cm">
          <draw:text-box>
            <text:p><text:span text:style-name="T10">[else]</text:span></text:p>
          </draw:text-box>
        </draw:frame>
        <draw:connector draw:style-name="gr58" draw:text-style-name="P2" draw:layer="layout" draw:line-skew="0.769cm 0.053cm" svg:x1="14.335cm" svg:y1="15.746cm" svg:x2="14.773cm" svg:y2="21.722cm" draw:start-shape="id43" draw:start-glue-point="8" draw:end-shape="id44" draw:end-glue-point="7" svg:d="M14335 15746h1270v3351h-832v2625" svg:viewBox="0 0 1271 5977">
          <text:p/>
        </draw:connector>
        <draw:frame draw:style-name="gr75" draw:text-style-name="P13" draw:layer="layout" svg:width="2.222cm" svg:height="0.645cm" svg:x="9.255cm" svg:y="25.437cm">
          <draw:text-box>
            <text:p><text:span text:style-name="T10">ButtonPlay</text:span></text:p>
          </draw:text-box>
        </draw:frame>
        <draw:frame draw:style-name="gr91" draw:text-style-name="P40" draw:layer="layout" svg:width="3.175cm" svg:height="0.635cm" svg:x="7.785cm" svg:y="26.617cm">
          <draw:text-box>
            <text:p><text:span text:style-name="T29">[isSpotifyConnected]</text:span></text:p>
          </draw:text-box>
        </draw:frame>
        <draw:frame draw:style-name="gr75" draw:text-style-name="P13" draw:layer="layout" svg:width="1.271cm" svg:height="0.645cm" svg:x="10.999cm" svg:y="26.7cm">
          <draw:text-box>
            <text:p><text:span text:style-name="T10">[else]</text:span></text:p>
          </draw:text-box>
        </draw:frame>
        <draw:custom-shape draw:style-name="gr13" draw:text-style-name="P2" xml:id="id52" draw:id="id52" draw:layer="layout" svg:width="0.6cm" svg:height="0.6cm" svg:x="14.241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14.541cm" svg:y1="27.67cm" svg:x2="11.478cm" svg:y2="24.229cm" draw:start-shape="id52" draw:start-glue-point="4" draw:end-shape="id44" draw:end-glue-point="17" svg:d="M14541 27670v-1716h-3063v-1725" svg:viewBox="0 0 3064 3442">
          <text:p/>
        </draw:connector>
        <draw:connector draw:style-name="gr58" draw:text-style-name="P2" draw:layer="layout" draw:line-skew="0.238cm" svg:x1="14.841cm" svg:y1="27.97cm" svg:x2="15.315cm" svg:y2="24.229cm" draw:start-shape="id52" draw:start-glue-point="7" draw:end-shape="id44" draw:end-glue-point="15" svg:d="M14841 27970h764v-2016h-290v-1725" svg:viewBox="0 0 765 3742">
          <text:p/>
        </draw:connector>
        <draw:frame draw:style-name="gr91" draw:text-style-name="P13" draw:layer="layout" svg:width="1.905cm" svg:height="0.635cm" svg:x="12.347cm" svg:y="27.987cm">
          <draw:text-box>
            <text:p><text:span text:style-name="T10">[isPlayOn]</text:span></text:p>
          </draw:text-box>
        </draw:frame>
        <draw:frame draw:style-name="gr56" draw:text-style-name="P41" draw:layer="layout" svg:width="4.127cm" svg:height="0.953cm" svg:x="11.395cm" svg:y="25.047cm">
          <draw:text-box>
            <text:p><text:span text:style-name="T32">/playSound(</text:span><text:span text:style-name="T33">SOUND_PLAY</text:span><text:span text:style-name="T34">)</text:span></text:p>
            <text:p text:style-name="P34"><text:span text:style-name="T34">/setLed(LED_PLAY)</text:span></text:p>
          </draw:text-box>
        </draw:frame>
        <draw:frame draw:style-name="gr75" draw:text-style-name="P13" draw:layer="layout" svg:width="1.27cm" svg:height="0.645cm" svg:x="13.565cm" svg:y="27.125cm">
          <draw:text-box>
            <text:p><text:span text:style-name="T10">[else]</text:span></text:p>
          </draw:text-box>
        </draw:frame>
        <draw:custom-shape draw:style-name="gr94" draw:text-style-name="P36" draw:layer="layout" svg:width="1.905cm" svg:height="0.953cm" svg:x="18.145cm" svg:y="18.145cm">
          <text:p text:style-name="P35"><text:span text:style-name="T25">Ook Spotify afspelen?</text:span></text:p>
          <draw:enhanced-geometry svg:viewBox="0 0 21600 21600" draw:text-areas="800 800 20800 20800" draw:type="round-rectangular-callout" draw:modifiers="-22721.9307450157 24520.7547169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91" draw:text-style-name="P26" draw:layer="controls" svg:width="2.858cm" svg:height="0.645cm" svg:x="13.382cm" svg:y="9.562cm">
          <draw:text-box>
            <text:p text:style-name="P42"><text:span text:style-name="T35">usbAbsent</text:span></text:p>
          </draw:text-box>
        </draw:frame>
        <draw:frame draw:style-name="gr91" draw:text-style-name="P26" draw:layer="controls" svg:width="2.858cm" svg:height="0.645cm" svg:x="6.079cm" svg:y="12.747cm">
          <draw:text-box>
            <text:p text:style-name="P42"><text:span text:style-name="T35">usbPresent</text:span></text:p>
          </draw:text-box>
        </draw:frame>
        <draw:frame draw:style-name="gr91" draw:text-style-name="P26" draw:layer="controls" svg:width="2.858cm" svg:height="0.645cm" svg:x="14.335cm" svg:y="13.372cm">
          <draw:text-box>
            <text:p text:style-name="P42"><text:span text:style-name="T35">usbAbsent</text:span></text:p>
          </draw:text-box>
        </draw:frame>
      </draw:page>
      <draw:page draw:name="page5" draw:style-name="dp1" draw:master-page-name="Default">
        <draw:connector draw:style-name="gr95" draw:text-style-name="P2" draw:layer="layout" svg:x1="8.067cm" svg:y1="11.833cm" svg:x2="14.017cm" svg:y2="5.923cm" draw:start-shape="id53" draw:start-glue-point="1" draw:end-shape="id54" draw:end-glue-point="6" svg:d="M8067 11833h2987v-5910h2963" svg:viewBox="0 0 5951 5911">
          <text:p/>
        </draw:connector>
        <draw:g draw:style-name="gr4">
          <draw:frame draw:style-name="gr23" draw:text-style-name="P23" draw:layer="layout" svg:width="7.555cm" svg:height="1.694cm" svg:x="1.001cm" svg:y="1.093cm">
            <draw:text-box>
              <text:p text:style-name="P10"><text:span text:style-name="T18">OradioContr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54" draw:id="id54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 draw:handle-position-x="$0" draw:handle-position-y="10800"/>
          </draw:enhanced-geometry>
        </draw:custom-shape>
        <draw:g draw:style-name="gr1">
          <draw:g draw:style-name="gr1">
            <draw:custom-shape draw:style-name="gr96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97" draw:text-style-name="P43" draw:layer="layout" svg:width="2.858cm" svg:height="1.026cm" svg:x="13.314cm" svg:y="4.582cm">
            <draw:text-box>
              <text:p text:style-name="P4"><text:span text:style-name="T36">VolumeControl</text:span></text:p>
            </draw:text-box>
          </draw:frame>
        </draw:g>
        <draw:g draw:style-name="gr1" xml:id="id53" draw:id="id53">
          <draw:custom-shape draw:style-name="gr65" draw:text-style-name="P29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55" draw:id="id55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 draw:handle-position-x="$0" draw:handle-position-y="10800"/>
          </draw:enhanced-geometry>
        </draw:custom-shape>
        <draw:g draw:style-name="gr1">
          <draw:g draw:style-name="gr1">
            <draw:custom-shape draw:style-name="gr96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97" draw:text-style-name="P43" draw:layer="layout" svg:width="2.858cm" svg:height="1.026cm" svg:x="13.315cm" svg:y="7.182cm">
            <draw:text-box>
              <text:p text:style-name="P4"><text:span text:style-name="T36">UsbService</text:span></text:p>
            </draw:text-box>
          </draw:frame>
        </draw:g>
        <draw:connector draw:style-name="gr95" draw:text-style-name="P2" draw:layer="layout" svg:x1="8.067cm" svg:y1="11.833cm" svg:x2="14.018cm" svg:y2="8.522cm" draw:start-shape="id53" draw:end-shape="id55" draw:end-glue-point="3" svg:d="M8067 11833h2987v-3311h2964" svg:viewBox="0 0 5952 3312">
          <text:p/>
        </draw:connector>
        <draw:custom-shape draw:style-name="gr44" draw:text-style-name="P1" xml:id="id56" draw:id="id56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 draw:handle-position-x="$0" draw:handle-position-y="10800"/>
          </draw:enhanced-geometry>
        </draw:custom-shape>
        <draw:g draw:style-name="gr1">
          <draw:custom-shape draw:style-name="gr96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97" draw:text-style-name="P43" draw:layer="layout" svg:width="3.261cm" svg:height="1.026cm" svg:x="13.296cm" svg:y="9.762cm">
          <draw:text-box>
            <text:p text:style-name="P4"><text:span text:style-name="T36">SpotifyConnect</text:span></text:p>
          </draw:text-box>
        </draw:frame>
        <draw:connector draw:style-name="gr95" draw:text-style-name="P2" draw:layer="layout" svg:x1="8.067cm" svg:y1="11.833cm" svg:x2="13.999cm" svg:y2="11.103cm" draw:start-shape="id53" draw:end-shape="id56" draw:end-glue-point="6" svg:d="M8067 11833h2978v-730h2954" svg:viewBox="0 0 5933 731">
          <text:p/>
        </draw:connector>
        <draw:custom-shape draw:style-name="gr44" draw:text-style-name="P1" xml:id="id57" draw:id="id57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 draw:handle-position-x="$0" draw:handle-position-y="10800"/>
          </draw:enhanced-geometry>
        </draw:custom-shape>
        <draw:g draw:style-name="gr1">
          <draw:custom-shape draw:style-name="gr96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97" draw:text-style-name="P43" draw:layer="layout" svg:width="3.261cm" svg:height="1.026cm" svg:x="13.314cm" svg:y="12.278cm">
          <draw:text-box>
            <text:p text:style-name="P4"><text:span text:style-name="T36">WifiService</text:span></text:p>
          </draw:text-box>
        </draw:frame>
        <draw:connector draw:style-name="gr95" draw:text-style-name="P2" draw:layer="layout" svg:x1="8.067cm" svg:y1="11.833cm" svg:x2="14.017cm" svg:y2="13.619cm" draw:start-shape="id53" draw:start-glue-point="1" draw:end-shape="id57" draw:end-glue-point="6" svg:d="M8067 11833h2987v1786h2963" svg:viewBox="0 0 5951 1787">
          <text:p/>
        </draw:connector>
        <draw:custom-shape draw:style-name="gr44" draw:text-style-name="P1" xml:id="id58" draw:id="id58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 draw:handle-position-x="$0" draw:handle-position-y="10800"/>
          </draw:enhanced-geometry>
        </draw:custom-shape>
        <draw:g draw:style-name="gr1">
          <draw:custom-shape draw:style-name="gr96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97" draw:text-style-name="P43" draw:layer="layout" svg:width="3.261cm" svg:height="1.026cm" svg:x="13.314cm" svg:y="14.818cm">
          <draw:text-box>
            <text:p text:style-name="P4"><text:span text:style-name="T36">PowerControl</text:span></text:p>
          </draw:text-box>
        </draw:frame>
        <draw:connector draw:style-name="gr95" draw:text-style-name="P2" draw:layer="layout" svg:x1="8.067cm" svg:y1="11.833cm" svg:x2="14.017cm" svg:y2="16.159cm" draw:start-shape="id53" draw:end-shape="id58" draw:end-glue-point="6" svg:d="M8067 11833h2987v4326h2963" svg:viewBox="0 0 5951 4327">
          <text:p/>
        </draw:connector>
        <draw:custom-shape draw:style-name="gr44" draw:text-style-name="P1" xml:id="id59" draw:id="id59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 draw:handle-position-x="$0" draw:handle-position-y="10800"/>
          </draw:enhanced-geometry>
        </draw:custom-shape>
        <draw:g draw:style-name="gr1">
          <draw:custom-shape draw:style-name="gr96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97" draw:text-style-name="P43" draw:layer="layout" svg:width="3.261cm" svg:height="1.026cm" svg:x="13.314cm" svg:y="17.599cm">
          <draw:text-box>
            <text:p text:style-name="P4"><text:span text:style-name="T36">Errorhandler</text:span></text:p>
          </draw:text-box>
        </draw:frame>
        <draw:connector draw:style-name="gr95" draw:text-style-name="P2" draw:layer="layout" svg:x1="8.067cm" svg:y1="11.833cm" svg:x2="14.017cm" svg:y2="18.94cm" draw:start-shape="id53" draw:end-shape="id59" draw:end-glue-point="6" svg:d="M8067 11833h2987v7107h2963" svg:viewBox="0 0 5951 7108">
          <text:p/>
        </draw:connector>
        <draw:custom-shape draw:style-name="gr44" draw:text-style-name="P1" xml:id="id60" draw:id="id60" draw:layer="layout" svg:width="0.635cm" svg:height="0.635cm" svg:x="14.018cm" svg:y="21.4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 draw:handle-position-x="$0" draw:handle-position-y="10800"/>
          </draw:enhanced-geometry>
        </draw:custom-shape>
        <draw:g draw:style-name="gr1">
          <draw:custom-shape draw:style-name="gr96" draw:text-style-name="P2" draw:layer="layout" svg:width="6.092cm" svg:height="2.297cm" svg:x="13.324cm" svg:y="20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2cm" svg:y1="20.393cm" svg:x2="16.152cm" svg:y2="20.663cm">
            <text:p/>
          </draw:line>
          <draw:line draw:style-name="gr10" draw:text-style-name="P2" draw:layer="layout" svg:x1="13.303cm" svg:y1="20.969cm" svg:x2="15.836cm" svg:y2="20.971cm">
            <text:p/>
          </draw:line>
          <draw:line draw:style-name="gr10" draw:text-style-name="P2" draw:layer="layout" svg:x1="16.15cm" svg:y1="20.663cm" svg:x2="15.836cm" svg:y2="20.972cm">
            <text:p/>
          </draw:line>
        </draw:g>
        <draw:frame draw:style-name="gr97" draw:text-style-name="P43" draw:layer="layout" svg:width="3.261cm" svg:height="1.026cm" svg:x="13.315cm" svg:y="20.399cm">
          <draw:text-box>
            <text:p text:style-name="P4"><text:span text:style-name="T36">RemoteMonitoring</text:span></text:p>
          </draw:text-box>
        </draw:frame>
        <draw:connector draw:style-name="gr95" draw:text-style-name="P2" draw:layer="layout" svg:x1="8.067cm" svg:y1="11.833cm" svg:x2="14.018cm" svg:y2="21.74cm" draw:start-shape="id53" draw:start-glue-point="1" draw:end-shape="id60" draw:end-glue-point="6" svg:d="M8067 11833h2987v9907h2964" svg:viewBox="0 0 5952 9908">
          <text:p/>
        </draw:connector>
      </draw:page>
      <draw:page draw:name="page6" draw:style-name="dp1" draw:master-page-name="Default">
        <draw:custom-shape draw:style-name="gr98" draw:text-style-name="P44" draw:layer="layout" svg:width="17.4cm" svg:height="0.7cm" svg:x="1.9cm" svg:y="1.55cm">
          <text:p text:style-name="P3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4" draw:layer="layout" svg:width="9.65cm" svg:height="0.7cm" svg:x="1.85cm" svg:y="5.25cm">
          <text:p text:style-name="P3"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00" draw:text-style-name="P46" draw:layer="layout" svg:width="5.282cm" svg:height="1.153cm" svg:x="1.75cm" svg:y="10.146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45"><text:span text:style-name="T37">led_control.LEDControl</text:span></text:p>
                <text:p text:style-name="P45"><text:span text:style-name="T37">&lt;&lt;class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1" draw:text-style-name="P47" draw:layer="layout" svg:width="5.282cm" svg:height="0.813cm" svg:x="1.75cm" svg:y="11.2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2" draw:text-style-name="P47" draw:layer="layout" svg:width="5.282cm" svg:height="3.175cm" svg:x="1.75cm" svg:y="12.112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03" draw:text-style-name="P21" draw:layer="layout" svg:width="4.445cm" svg:height="3.009cm" svg:x="1.87cm" svg:y="12.267cm">
                <draw:text-box>
                  <text:p><text:span text:style-name="T38">+ turn_on_led()</text:span></text:p>
                  <text:p><text:span text:style-name="T38">+ turn_off_led()</text:span></text:p>
                  <text:p><text:span text:style-name="T38">+ turn_off_all_leds()</text:span></text:p>
                  <text:p><text:span text:style-name="T38">+ turn_off_all_leds()</text:span></text:p>
                  <text:p><text:span text:style-name="T38">+ get_led_state()l</text:span></text:p>
                  <text:p><text:span text:style-name="T38">+ oneshot_on_led()</text:span></text:p>
                  <text:p><text:span text:style-name="T38">+ control_blinking_led( )</text:span></text:p>
                </draw:text-box>
              </draw:frame>
            </draw:g>
          </draw:g>
        </draw:g>
        <draw:g draw:style-name="gr1" xml:id="id61" draw:id="id6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04" draw:text-style-name="P49" draw:layer="layout" svg:width="6cm" svg:height="1.153cm" svg:x="2.15cm" svg:y="2.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8"><text:span text:style-name="T37">oradio_control.py</text:span></text:p>
            <text:p text:style-name="P48"><text:span text:style-name="T37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51" draw:layer="layout" svg:width="6cm" svg:height="0.679cm" svg:x="2.15cm" svg:y="3.7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0"><text:span text:style-name="T37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8" draw:text-style-name="P44" draw:layer="layout" svg:width="17.4cm" svg:height="0.7cm" svg:x="1.85cm" svg:y="26.8cm">
          <text:p text:style-name="P3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6" draw:text-style-name="P52" draw:layer="layout" draw:line-skew="0.722cm" svg:x1="3.35cm" svg:y1="4.432cm" svg:x2="2.045cm" svg:y2="10.147cm" draw:start-shape="id61" draw:start-glue-point="4" draw:end-shape="id62" draw:end-glue-point="4" svg:d="M3350 4432v3578h-1305v2137" svg:viewBox="0 0 1306 5716">
          <text:p/>
        </draw:connector>
        <draw:frame draw:style-name="gr107" draw:text-style-name="P8" draw:layer="layout" svg:width="2.75cm" svg:height="0.75cm" svg:x="3.25cm" svg:y="6.75cm">
          <draw:text-box>
            <text:p><text:span text:style-name="T6">&lt;&lt;uses&gt;&gt;</text:span></text:p>
          </draw:text-box>
        </draw:frame>
        <draw:g draw:style-name="gr1">
          <draw:custom-shape draw:style-name="gr108" draw:text-style-name="P44" draw:layer="layout" svg:width="6.409cm" svg:height="0.677cm" svg:x="22.241cm" svg:y="9.65cm">
            <text:p text:style-name="P3">Python lay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3" draw:layer="layout" svg:width="0.379cm" svg:height="5.85cm" svg:x="21.9cm" svg:y="9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10" draw:text-style-name="P49" draw:layer="layout" svg:width="4.25cm" svg:height="1.153cm" svg:x="23.2cm" svg:y="11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8"><text:span text:style-name="T37">«thread»</text:span></text:p>
            <text:p text:style-name="P48"><text:span text:style-name="T37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51" draw:layer="layout" svg:width="4.25cm" svg:height="1.387cm" svg:x="23.2cm" svg:y="12.61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0"><text:span text:style-name="T38">Threading.Thread</text:span></text:p>
            <text:p text:style-name="P50"><text:span text:style-name="T38">Threading.Timer</text:span></text:p>
            <text:p text:style-name="P50"><text:span text:style-name="T38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2" draw:text-style-name="P2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13" draw:text-style-name="P46" draw:layer="layout" svg:width="5.917cm" svg:height="1.153cm" svg:x="3.02cm" svg:y="15.9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touch_buttons.TouchButtons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47" draw:layer="layout" svg:width="5.917cm" svg:height="0.761cm" svg:x="3.02cm" svg:y="17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47" draw:layer="layout" svg:width="5.917cm" svg:height="0.803cm" svg:x="3.02cm" svg:y="17.8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16" draw:text-style-name="P46" draw:layer="layout" svg:width="5.917cm" svg:height="1.153cm" svg:x="2.413cm" svg:y="19.41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backlighting.BackLighting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7" draw:layer="layout" svg:width="5.917cm" svg:height="0.761cm" svg:x="2.413cm" svg:y="20.5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47" draw:layer="layout" svg:width="5.917cm" svg:height="0.803cm" svg:x="2.413cm" svg:y="21.3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19" draw:text-style-name="P46" draw:layer="layout" svg:width="5.917cm" svg:height="1.153cm" svg:x="9.89cm" svg:y="21.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mpd_monitor.MPDMonitor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0" draw:text-style-name="P47" draw:layer="layout" svg:width="5.917cm" svg:height="0.761cm" svg:x="9.89cm" svg:y="22.4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1" draw:text-style-name="P47" draw:layer="layout" svg:width="5.917cm" svg:height="0.803cm" svg:x="9.89cm" svg:y="23.2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22" draw:text-style-name="P46" draw:layer="layout" svg:width="5.917cm" svg:height="1.153cm" svg:x="2.905cm" svg:y="22.7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mpd_control.MPDControl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47" draw:layer="layout" svg:width="5.917cm" svg:height="0.761cm" svg:x="2.905cm" svg:y="2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47" draw:layer="layout" svg:width="5.917cm" svg:height="0.803cm" svg:x="2.905cm" svg:y="24.6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25" draw:text-style-name="P46" draw:layer="layout" svg:width="8.775cm" svg:height="1.153cm" svg:x="10.005cm" svg:y="15.9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power_supply_control.PowerSupplyService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47" draw:layer="layout" svg:width="8.775cm" svg:height="0.761cm" svg:x="10.005cm" svg:y="17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47" draw:layer="layout" svg:width="8.775cm" svg:height="0.803cm" svg:x="10.005cm" svg:y="17.8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28" draw:text-style-name="P46" draw:layer="layout" svg:width="6.552cm" svg:height="1.153cm" svg:x="8.418cm" svg:y="10.0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remote_monitoring.RMService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47" draw:layer="layout" svg:width="6.552cm" svg:height="0.761cm" svg:x="8.418cm" svg:y="11.1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47" draw:layer="layout" svg:width="6.552cm" svg:height="0.803cm" svg:x="8.418cm" svg:y="11.9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1" draw:text-style-name="P46" draw:layer="layout" svg:width="6.552cm" svg:height="1.153cm" svg:x="10.842cm" svg:y="6.8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spotify_connect.SpotifyConnect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2" draw:text-style-name="P47" draw:layer="layout" svg:width="6.552cm" svg:height="0.761cm" svg:x="10.842cm" svg:y="8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47" draw:layer="layout" svg:width="6.552cm" svg:height="0.803cm" svg:x="10.842cm" svg:y="8.7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4" draw:text-style-name="P46" draw:layer="layout" svg:width="5.715cm" svg:height="1.153cm" svg:x="12.43cm" svg:y="3.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usb_service.USBService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5" draw:text-style-name="P47" draw:layer="layout" svg:width="5.715cm" svg:height="0.761cm" svg:x="12.43cm" svg:y="4.6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6" draw:text-style-name="P47" draw:layer="layout" svg:width="5.715cm" svg:height="0.803cm" svg:x="12.43cm" svg:y="5.4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7" draw:text-style-name="P46" draw:layer="layout" svg:width="5.715cm" svg:height="1.153cm" svg:x="13.7cm" svg:y="12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web_service.WebService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47" draw:layer="layout" svg:width="5.715cm" svg:height="0.761cm" svg:x="13.7cm" svg:y="14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9" draw:text-style-name="P47" draw:layer="layout" svg:width="5.715cm" svg:height="0.803cm" svg:x="13.7cm" svg:y="14.80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custom-shape draw:style-name="gr140" draw:text-style-name="P46" draw:layer="layout" svg:width="5.917cm" svg:height="1.153cm" svg:x="9.337cm" svg:y="18.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5"><text:span text:style-name="T37">system_sounds.py</text:span></text:p>
            <text:p text:style-name="P45"><text:span text:style-name="T37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47" draw:layer="layout" svg:width="5.917cm" svg:height="0.761cm" svg:x="9.337cm" svg:y="19.933cm">
            <text:p text:style-name="P53"><text:span text:style-name="T38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142" draw:text-style-name="P46" draw:layer="layout" svg:width="5.917cm" svg:height="1.153cm" svg:x="12.545cm" svg:y="24.4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5"><text:span text:style-name="T37">oradio_logging.py</text:span></text:p>
            <text:p text:style-name="P45"><text:span text:style-name="T37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47" draw:layer="layout" svg:width="5.917cm" svg:height="0.761cm" svg:x="12.545cm" svg:y="25.639cm">
            <text:p text:style-name="P53"><text:span text:style-name="T38">+ oradio_lo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3T16:23:47.322558208</meta:creation-date>
    <meta:generator>LibreOffice/26.2.4.2$Windows_X86_64 LibreOffice_project/0229ac93fcf0d7cbc6376066c6f35021cef002dc</meta:generator>
    <dc:date>2026-07-10T08:04:34.704626200</dc:date>
    <meta:editing-duration>P4DT20H4M32S</meta:editing-duration>
    <meta:editing-cycles>59</meta:editing-cycles>
    <meta:print-date>2026-04-03T16:45:26.431431754</meta:print-date>
    <meta:document-statistic meta:object-count="474"/>
  </office:meta>
</office:document-meta>
</file>