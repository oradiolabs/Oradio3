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20000001C857C101E6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in-height="2.5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6.25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margin-top="0.42cm" fo:margin-bottom="0.35cm" fo:text-align="left"/>
      <style:text-properties fo:font-size="10pt" style:font-size-asian="10pt" style:font-size-complex="10pt"/>
    </style:style>
    <style:style style:name="P3" style:family="paragraph">
      <loext:graphic-properties draw:fill="none" draw:fill-color="#ffffff"/>
      <style:paragraph-properties fo:margin-top="0.42cm" fo:margin-bottom="0.35cm" fo:text-align="left"/>
      <style:text-properties fo:font-size="10pt" style:font-size-asian="10pt" style:font-size-complex="10pt"/>
    </style:style>
    <style:style style:name="P4" style:family="paragraph">
      <style:text-properties fo:font-size="12pt"/>
    </style:style>
    <style:style style:name="P5" style:family="paragraph">
      <loext:graphic-properties draw:fill="none" draw:fill-color="#ffffff"/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6.932cm" svg:height="9.651cm" svg:x="2cm" svg:y="1.849cm">
          <draw:image xlink:href="Pictures/1000000100000320000001C857C101E6.png" xlink:type="simple" xlink:show="embed" xlink:actuate="onLoad" draw:mime-type="image/png">
            <text:p/>
          </draw:image>
        </draw:frame>
        <draw:frame draw:style-name="gr2" draw:text-style-name="P3" draw:layer="layout" svg:width="16.75cm" svg:height="3.061cm" svg:x="2.5cm" svg:y="15.25cm">
          <draw:text-box>
            <text:p text:style-name="P2">The core system declares extension points that plugins can hook into. These extension points, these hooks, often represent the core system life cycle.</text:p>
            <text:p text:style-name="P2">And so, each plugin registers itself to the core, passing some information such name, communication protocol, input/output data handlers, data format, and hooks into these extension points.</text:p>
            <text:p text:style-name="P2"/>
          </draw:text-box>
        </draw:frame>
        <draw:frame draw:style-name="gr3" draw:text-style-name="P5" draw:layer="layout" svg:width="15cm" svg:height="8.783cm" svg:x="3cm" svg:y="19.5cm">
          <draw:text-box>
            <text:p text:style-name="P4">Core system interface</text:p>
            <text:p text:style-name="P4">e.g. Spotify plugin requirements:</text:p>
            <text:p text:style-name="P4">* enabled via ON-button and active Spotify and active plugin</text:p>
            <text:p text:style-name="P4">* interface to alsasound (alsa-plugin-dev</text:p>
            <text:p text:style-name="P4">* interface to volume (app controlled volume)</text:p>
            <text:p text:style-name="P4">* interface to led’s</text:p>
            <text:p text:style-name="P4">* interface to buttons</text:p>
            <text:p text:style-name="P4">* interface to playlist (spotify specific)</text:p>
            <text:p text:style-name="P4">e.g Bluetooth Speaker</text:p>
            <text:p text:style-name="P4">* enabled via ON-button and active BT-speaker, and BT-plugin</text:p>
            <text:p text:style-name="P4">* interface to alsasound (alsa-plugin-dev)</text:p>
            <text:p text:style-name="P4">* interface to volume (app controlled volume)</text:p>
            <text:p text:style-name="P4">* interface to led’s</text:p>
            <text:p text:style-name="P4">* interface to buttons</text:p>
            <text:p text:style-name="P4">e.g. presence-sensor</text:p>
            <text:p text:style-name="P4"/>
            <text:p text:style-name="P4"/>
            <text:p text:style-name="P4"/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6-07-06T17:04:51.756160200</meta:creation-date>
    <dc:date>2026-07-06T17:57:43.472936000</dc:date>
    <meta:editing-duration>PT21M27S</meta:editing-duration>
    <meta:editing-cycles>2</meta:editing-cycles>
    <meta:generator>LibreOffice/26.2.4.2$Windows_X86_64 LibreOffice_project/0229ac93fcf0d7cbc6376066c6f35021cef002dc</meta:generator>
    <meta:document-statistic meta:object-count="3"/>
  </office:meta>
</office:document-meta>
</file>