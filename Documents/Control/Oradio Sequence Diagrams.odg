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e8f2a1" loext:fill-use-slide-background="false" draw:textarea-horizontal-align="justify" draw:textarea-vertical-align="middle" draw:auto-grow-height="false" fo:min-height="0.591cm" fo:min-width="3.606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fill-color="#e8f2a1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78cm" fo:min-width="0.014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591cm" fo:min-width="3.258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3.925cm" fo:min-width="0.014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91cm" fo:min-width="17.2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861cm" fo:min-width="7.37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e8f2a1" loext:fill-use-slide-background="false" draw:textarea-horizontal-align="justify" draw:textarea-vertical-align="middle" draw:auto-grow-height="false" fo:min-height="1.442cm" fo:min-width="0.014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e8f2a1" loext:fill-use-slide-background="false" draw:textarea-horizontal-align="justify" draw:textarea-vertical-align="middle" draw:auto-grow-height="false" fo:min-height="2.374cm" fo:min-width="0.014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134cm" fo:min-width="0.014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778cm" fo:min-width="0.014cm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43cm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484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604cm" fo:min-width="3.513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687cm" fo:min-width="0.014cm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ffdbb6" loext:fill-use-slide-background="false" draw:textarea-horizontal-align="justify" draw:textarea-vertical-align="middle" draw:auto-grow-height="false" fo:min-height="0.591cm" fo:min-width="3.287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dbb6" loext:fill-use-slide-background="false" draw:textarea-horizontal-align="justify" draw:textarea-vertical-align="middle" draw:auto-grow-height="false" fo:min-height="1.603cm" fo:min-width="0.014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273cm" loext:decorative="false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856cm" fo:min-width="0.014cm" fo:padding-top="0.151cm" fo:padding-bottom="0.151cm" fo:padding-left="0.276cm" fo:padding-right="0.276cm" loext:decorative="false"/>
    </style:style>
    <style:style style:name="gr27" style:family="graphic" style:parent-style-name="objectwithoutfill">
      <style:graphic-properties svg:stroke-width="0.053cm" svg:stroke-color="#000000" draw:marker-start="Circle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391cm" fo:min-width="2.987cm" fo:padding-top="0.151cm" fo:padding-bottom="0.151cm" fo:padding-left="0.276cm" fo:padding-right="0.276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Dash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656cm" fo:min-width="3.241cm" fo:padding-top="0.151cm" fo:padding-bottom="0.151cm" fo:padding-left="0.276cm" fo:padding-right="0.2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33" style:family="graphic">
      <style:graphic-properties style:writing-mode="lr-tb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2.871cm" fo:min-width="8.954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2.503cm" fo:min-width="0.014cm" fo:padding-top="0.151cm" fo:padding-bottom="0.151cm" fo:padding-left="0.276cm" fo:padding-right="0.276cm" loext:decorative="false"/>
    </style:style>
    <style:style style:name="gr37" style:family="graphic" style:parent-style-name="objectwithoutfill">
      <style:graphic-properties draw:stroke="dash" draw:stroke-dash="Dash_20__28_Rounded_29_" svg:stroke-width="0.053cm" svg:stroke-color="#000000" draw:marker-start-width="0.279cm" draw:marker-end="Arrowheads_20_5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38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 loext:decorative="false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3.171cm" fo:min-width="9.904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1.996cm" fo:min-width="5.034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68cm" fo:min-width="0.014cm" fo:padding-top="0.151cm" fo:padding-bottom="0.151cm" fo:padding-left="0.276cm" fo:padding-right="0.276cm" loext:decorative="false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768cm" fo:min-width="0.014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185cm" fo:min-width="0.014cm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b4c7dc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solid" draw:fill-color="#e8f2a1" loext:fill-use-slide-background="false" draw:textarea-horizontal-align="justify" draw:textarea-vertical-align="middle" draw:auto-grow-height="false" fo:min-height="0.591cm" fo:min-width="4.523cm" fo:padding-top="0.151cm" fo:padding-bottom="0.151cm" fo:padding-left="0.276cm" fo:padding-right="0.276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2.873cm" fo:min-width="0.014cm" fo:padding-top="0.151cm" fo:padding-bottom="0.151cm" fo:padding-left="0.276cm" fo:padding-right="0.276cm" loext:decorative="false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solid" draw:fill-color="#d4ea6b" loext:fill-use-slide-background="false" draw:textarea-horizontal-align="justify" draw:textarea-vertical-align="middle" draw:auto-grow-height="false" fo:min-height="6.341cm" fo:min-width="0.014cm" fo:padding-top="0.151cm" fo:padding-bottom="0.151cm" fo:padding-left="0.276cm" fo:padding-right="0.276cm" loext:decorative="false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484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604cm" fo:min-width="4.21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904cm" fo:min-width="0.014cm" fo:padding-top="0.151cm" fo:padding-bottom="0.151cm" fo:padding-left="0.276cm" fo:padding-right="0.276cm" loext:decorative="false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238cm" fo:min-width="0.014cm" fo:padding-top="0.151cm" fo:padding-bottom="0.151cm" fo:padding-left="0.276cm" fo:padding-right="0.276cm" loext:decorative="false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solid" draw:fill-color="#d4ea6b" loext:fill-use-slide-background="false" draw:textarea-horizontal-align="justify" draw:textarea-vertical-align="middle" draw:auto-grow-height="false" fo:min-height="0.656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2.701cm" fo:min-width="8.865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2.556cm" fo:min-width="0.014cm" fo:padding-top="0.151cm" fo:padding-bottom="0.151cm" fo:padding-left="0.276cm" fo:padding-right="0.276cm" loext:decorative="false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368cm" fo:min-width="1.906cm" fo:padding-top="0.151cm" fo:padding-bottom="0.151cm" fo:padding-left="0.276cm" fo:padding-right="0.276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solid" draw:fill-color="#d4ea6b" draw:textarea-horizontal-align="justify" draw:textarea-vertical-align="top" draw:auto-grow-height="false" fo:min-height="4.379cm" fo:min-width="5.459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solid" draw:fill-color="#d4ea6b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5ce" loext:fill-use-slide-background="false" draw:auto-grow-height="true" draw:auto-grow-width="false" fo:min-height="0.475cm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solid" draw:fill-color="#d4ea6b" draw:textarea-horizontal-align="justify" draw:textarea-vertical-align="top" draw:auto-grow-height="false" fo:min-height="3.013cm" fo:min-width="3.964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solid" draw:fill-color="#d4ea6b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solid" draw:fill-color="#d4ea6b" loext:fill-use-slide-background="false" draw:textarea-horizontal-align="justify" draw:textarea-vertical-align="middle" draw:auto-grow-height="false" fo:min-height="1.151cm" fo:min-width="0.014cm" fo:padding-top="0.151cm" fo:padding-bottom="0.151cm" fo:padding-left="0.276cm" fo:padding-right="0.276cm" loext:decorative="false"/>
    </style:style>
    <style:style style:name="gr70" style:family="graphic" style:parent-style-name="objectwithoutfill">
      <style:graphic-properties svg:stroke-width="0.053cm" svg:stroke-color="#000000" draw:marker-start-width="0.279cm" draw:marker-end="Arrowheads_20_3" draw:marker-end-width="0.379cm" draw:fill="solid" draw:fill-color="#fff5ce" draw:textarea-vertical-align="middle" fo:padding-top="0.151cm" fo:padding-bottom="0.151cm" fo:padding-left="0.276cm" fo:padding-right="0.276cm" loext:decorative="false"/>
    </style:style>
    <style:style style:name="gr71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65cm" fo:min-width="0.014cm" fo:padding-top="0.151cm" fo:padding-bottom="0.151cm" fo:padding-left="0.276cm" fo:padding-right="0.276cm" loext:decorative="false"/>
    </style:style>
    <style:style style:name="gr72" style:family="graphic" style:parent-style-name="standard">
      <style:graphic-properties draw:stroke="none" svg:stroke-color="#000000" draw:fill="none" draw:fill-color="#fff5ce" loext:fill-use-slide-background="false" draw:textarea-horizontal-align="left" draw:auto-grow-height="true" draw:auto-grow-width="true" fo:min-height="0.789cm" fo:min-width="1.424cm" loext:decorative="false"/>
      <style:paragraph-properties style:writing-mode="lr-tb"/>
    </style:style>
    <style:style style:name="gr73" style:family="graphic" style:parent-style-name="standard">
      <style:graphic-properties svg:stroke-width="0.053cm" svg:stroke-color="#000000" draw:marker-start-width="0.279cm" draw:marker-end-width="0.279cm" draw:fill="solid" draw:fill-color="#d4ea6b" loext:fill-use-slide-background="false" draw:textarea-horizontal-align="justify" draw:textarea-vertical-align="middle" draw:auto-grow-height="false" fo:min-height="0.516cm" fo:min-width="0.014cm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solid" draw:fill-color="#e8f2a1"/>
      <style:paragraph-properties fo:text-align="center" style:writing-mode="lr-tb"/>
      <style:text-properties fo:font-size="14pt"/>
    </style:style>
    <style:style style:name="P4" style:family="paragraph">
      <loext:graphic-properties draw:fill="solid" draw:fill-color="#e8f2a1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paragraph-properties fo:text-align="center" style:writing-mode="lr-tb"/>
      <style:text-properties fo:font-size="14pt"/>
    </style:style>
    <style:style style:name="P10" style:family="paragraph">
      <loext:graphic-properties draw:fill="none"/>
      <style:paragraph-properties fo:text-align="center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text-align="center" style:writing-mode="lr-tb"/>
      <style:text-properties fo:font-size="14pt"/>
    </style:style>
    <style:style style:name="P15" style:family="paragraph">
      <loext:graphic-properties draw:fill="solid" draw:fill-color="#ffdbb6"/>
      <style:paragraph-properties fo:text-align="center"/>
    </style:style>
    <style:style style:name="P16" style:family="paragraph">
      <loext:graphic-properties draw:fill="none" draw:fill-color="#ffffff"/>
      <style:text-properties fo:font-size="8pt" style:font-size-asian="10pt" style:font-size-complex="10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0pt" style:font-size-asian="12pt" style:font-size-complex="12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10pt" style:font-size-asian="12pt" style:font-size-complex="1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solid" draw:fill-color="#b4c7dc"/>
    </style:style>
    <style:style style:name="P25" style:family="paragraph">
      <loext:graphic-properties draw:fill="solid" draw:fill-color="#d4ea6b"/>
      <style:paragraph-properties fo:text-align="center"/>
    </style:style>
    <style:style style:name="P26" style:family="paragraph">
      <loext:graphic-properties draw:fill="solid" draw:fill-color="#d4ea6b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5ce"/>
      <style:text-properties fo:font-size="10pt" style:font-size-asian="12pt" style:font-size-complex="12pt"/>
    </style:style>
    <style:style style:name="P30" style:family="paragraph">
      <loext:graphic-properties draw:fill="solid" draw:fill-color="#fff5ce"/>
      <style:paragraph-properties fo:text-align="center"/>
      <style:text-properties fo:font-size="14pt"/>
    </style:style>
    <style:style style:name="P31" style:family="paragraph">
      <loext:graphic-properties draw:fill="none" draw:fill-color="#fff5ce"/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8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fo:font-size="10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eue_at_messaging" draw:style-name="dp1" draw:master-page-name="Default">
        <draw:connector draw:style-name="gr1" draw:text-style-name="P1" draw:layer="layout" draw:type="line" svg:x1="10.841cm" svg:y1="3.623cm" svg:x2="10.707cm" svg:y2="11.695cm" draw:start-shape="id1" draw:start-glue-point="5" draw:end-shape="id2" draw:end-glue-point="0" svg:d="M10841 3623l-134 8072" svg:viewBox="0 0 135 8073">
          <text:p/>
        </draw:connector>
        <draw:custom-shape draw:style-name="gr2" draw:text-style-name="P3" xml:id="id3" draw:id="id3" draw:layer="layout" svg:width="4.158cm" svg:height="0.893cm" svg:x="1.287cm" svg:y="1.367cm">
          <draw:glue-point draw:id="4" svg:x="-2.954cm" svg:y="5.117cm"/>
          <text:p text:style-name="P2"><text:span text:style-name="T1">Remote Servi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.138cm" svg:y1="2.26cm" svg:x2="2.029cm" svg:y2="20.681cm" draw:start-shape="id3" draw:start-glue-point="4" svg:d="M2138 2260l-109 18421" svg:viewBox="0 0 110 18422">
          <text:p/>
        </draw:connector>
        <draw:custom-shape draw:style-name="gr4" draw:text-style-name="P5" xml:id="id16" draw:id="id16" draw:layer="layout" svg:width="0.566cm" svg:height="1.082cm" svg:x="10.449cm" svg:y="5.803cm">
          <draw:glue-point draw:id="4" svg:x="-5.433cm" svg:y="-3.946cm"/>
          <draw:glue-point draw:id="5" svg:x="-5.433cm" svg:y="2.929cm"/>
          <draw:glue-point draw:id="6" svg:x="5.417cm" svg:y="-3.087cm"/>
          <draw:glue-point draw:id="7" svg:x="5.477cm" svg:y="-1.375cm"/>
          <draw:glue-point draw:id="8" svg:x="5.477cm" svg:y="2.8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81cm" svg:height="0.893cm" svg:x="7.785cm" svg:y="2.73cm">
          <draw:glue-point draw:id="4" svg:x="-3.039cm" svg:y="5.296cm"/>
          <draw:glue-point draw:id="5" svg:x="3.023cm" svg:y="5.296cm"/>
          <text:p text:style-name="P6"><text:span text:style-name="T2">PubSubManag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.365cm" svg:y1="5.501cm" svg:x2="6.397cm" svg:y2="5.542cm" draw:start-shape="id4" draw:start-glue-point="4" draw:end-shape="id5" draw:end-glue-point="4" svg:d="M2365 5501l4032 41" svg:viewBox="0 0 4033 42">
          <text:p/>
        </draw:connector>
        <draw:frame draw:style-name="gr7" draw:text-style-name="P8" draw:layer="layout" svg:width="4.186cm" svg:height="1.039cm" svg:x="2.47cm" svg:y="4.388cm">
          <draw:text-box>
            <text:p><text:span text:style-name="T3">subscribe_commands(</text:span></text:p>
            <text:p><text:span text:style-name="T3">wifi_listener)</text:span></text:p>
          </draw:text-box>
        </draw:frame>
        <draw:custom-shape draw:style-name="gr8" draw:text-style-name="P5" xml:id="id2" draw:id="id2" draw:layer="layout" svg:width="0.566cm" svg:height="4.227cm" svg:x="10.424cm" svg:y="11.695cm">
          <draw:glue-point draw:id="4" svg:x="-5.433cm" svg:y="-3.946cm"/>
          <draw:glue-point draw:id="5" svg:x="-5.433cm" svg:y="2.929cm"/>
          <draw:glue-point draw:id="6" svg:x="5.007cm" svg:y="-3.573cm"/>
          <draw:glue-point draw:id="7" svg:x="3.233cm" svg:y="-4.439cm"/>
          <draw:glue-point draw:id="8" svg:x="5.477cm" svg:y="-4.439cm"/>
          <draw:glue-point draw:id="9" svg:x="-5.477cm" svg:y="-1.636cm"/>
          <draw:glue-point draw:id="10" svg:x="5.477cm" svg:y="-1.636cm"/>
          <draw:glue-point draw:id="11" svg:x="5.477cm" svg:y="0.777cm"/>
          <draw:glue-point draw:id="12" svg:x="5.477cm" svg:y="1.984cm"/>
          <draw:glue-point draw:id="13" svg:x="5.477cm" svg:y="3.49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23" draw:id="id23" draw:layer="layout" svg:width="17.78cm" svg:height="0.893cm" svg:x="6.062cm" svg:y="1.417cm">
          <draw:glue-point draw:id="4" svg:x="-2.749cm" svg:y="5.01cm"/>
          <draw:glue-point draw:id="5" svg:x="3cm" svg:y="5.01cm"/>
          <draw:glue-point draw:id="6" svg:x="-4.256cm" svg:y="5.296cm"/>
          <draw:glue-point draw:id="7" svg:x="-2.136cm" svg:y="5.296cm"/>
          <draw:glue-point draw:id="8" svg:x="-1.297cm" svg:y="5.296cm"/>
          <draw:glue-point draw:id="9" svg:x="-4.655cm" svg:y="5.296cm"/>
          <draw:glue-point draw:id="10" svg:x="4.831cm" svg:y="5.296cm"/>
          <text:p text:style-name="P2"><text:span text:style-name="T1">&lt;&lt;module&gt; Messag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708cm" svg:y1="3.857cm" svg:x2="16.705cm" svg:y2="13.747cm" draw:start-shape="id6" draw:end-shape="id7" draw:end-glue-point="0" svg:d="M16708 3857l-3 9890" svg:viewBox="0 0 4 9891">
          <text:p/>
        </draw:connector>
        <draw:custom-shape draw:style-name="gr10" draw:text-style-name="P7" xml:id="id6" draw:id="id6" draw:layer="layout" svg:width="7.922cm" svg:height="1.163cm" svg:x="12.747cm" svg:y="2.694cm">
          <text:p text:style-name="P6"><text:span text:style-name="T2">_subscribers</text:span></text:p>
          <text:p text:style-name="P6"><text:span text:style-name="T2">dict[Topic,list[Queue]]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5" draw:id="id25" draw:layer="layout" svg:width="0.566cm" svg:height="1.744cm" svg:x="1.739cm" svg:y="18.462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4" draw:id="id4" draw:layer="layout" svg:width="0.566cm" svg:height="2.676cm" svg:x="1.799cm" svg:y="4.834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9" draw:id="id9" draw:layer="layout" svg:width="0.566cm" svg:height="1.436cm" svg:x="16.414cm" svg:y="4.561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8" draw:id="id8" draw:layer="layout" svg:width="0.566cm" svg:height="1.08cm" svg:x="10.506cm" svg:y="4.082cm">
          <draw:glue-point draw:id="4" svg:x="5.417cm" svg:y="-2.509cm"/>
          <draw:glue-point draw:id="5" svg:x="-4.992cm" svg:y="-3.887cm"/>
          <draw:glue-point draw:id="6" svg:x="4.611cm" svg:y="1.138cm"/>
          <draw:glue-point draw:id="7" svg:x="5.477cm" svg:y="4.074cm"/>
          <draw:glue-point draw:id="8" svg:x="5.477cm" svg:y="1.13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957cm" svg:height="0.645cm" svg:x="8.568cm" svg:y="4.165cm">
          <draw:text-box>
            <text:p><text:span text:style-name="T3">init()</text:span></text:p>
          </draw:text-box>
        </draw:frame>
        <draw:connector draw:style-name="gr6" draw:text-style-name="P10" draw:layer="layout" draw:type="line" svg:x1="11.072cm" svg:y1="4.744cm" svg:x2="16.414cm" svg:y2="4.713cm" draw:start-shape="id8" draw:start-glue-point="8" draw:end-shape="id9" draw:end-glue-point="4" svg:d="M11072 4744l5342-31" svg:viewBox="0 0 5343 32">
          <text:p/>
        </draw:connector>
        <draw:frame draw:style-name="gr16" draw:text-style-name="P8" draw:layer="layout" svg:width="4.527cm" svg:height="0.68cm" svg:x="11.795cm" svg:y="4.81cm">
          <draw:text-box>
            <text:p><text:span text:style-name="T3">create empty dictionary</text:span></text:p>
          </draw:text-box>
        </draw:frame>
        <draw:custom-shape draw:style-name="gr17" draw:text-style-name="P12" xml:id="id10" draw:id="id10" draw:layer="layout" svg:width="3.175cm" svg:height="1.785cm" svg:x="18.462cm" svg:y="4.427cm">
          <text:p text:style-name="P11"><text:span text:style-name="T4">_subscribers=</text:span></text:p>
          <text:p text:style-name="P11"><text:span text:style-name="T4">{</text:span></text:p>
          <text:p text:style-name="P11"><text:span text:style-name="T4">Topic.COMMAND: []</text:span></text:p>
          <text:p text:style-name="P11"><text:span text:style-name="T4">Topic.ERROR: []</text:span></text:p>
          <text:p text:style-name="P11"><text:span text:style-name="T4">}</text:span><text:span text:style-name="T5">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8" draw:text-style-name="P13" draw:layer="layout" draw:type="line" svg:x1="16.98cm" svg:y1="5.701cm" svg:x2="18.462cm" svg:y2="5.32cm" draw:start-shape="id9" draw:start-glue-point="7" draw:end-shape="id10" draw:end-glue-point="5" svg:d="M16980 5701l1482-381" svg:viewBox="0 0 1483 382">
          <text:p/>
        </draw:connector>
        <draw:custom-shape draw:style-name="gr19" draw:text-style-name="P12" xml:id="id12" draw:id="id12" draw:layer="layout" svg:width="4.065cm" svg:height="1.905cm" svg:x="18.46cm" svg:y="6.867cm">
          <text:p text:style-name="P11"><text:span text:style-name="T4">_subscribers=</text:span></text:p>
          <text:p text:style-name="P11"><text:span text:style-name="T4">{</text:span></text:p>
          <text:p text:style-name="P11"><text:span text:style-name="T4">Topic.COMMAND: [queue]</text:span></text:p>
          <text:p text:style-name="P11"><text:span text:style-name="T4">Topic.ERROR: []</text:span></text:p>
          <text:p text:style-name="P11"><text:span text:style-name="T4">}</text:span><text:span text:style-name="T5">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0" draw:text-style-name="P13" draw:layer="layout" draw:type="line" svg:x1="17.04cm" svg:y1="9.25cm" svg:x2="18.46cm" svg:y2="7.82cm" draw:start-shape="id11" draw:start-glue-point="6" draw:end-shape="id12" draw:end-glue-point="5" svg:d="M17040 9250l1420-1430" svg:viewBox="0 0 1421 1431">
          <text:p/>
        </draw:connector>
        <draw:custom-shape draw:style-name="gr21" draw:text-style-name="P5" xml:id="id11" draw:id="id11" draw:layer="layout" svg:width="0.566cm" svg:height="1.989cm" svg:x="16.474cm" svg:y="8.966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draw:line-skew="0.812cm" svg:x1="17.04cm" svg:y1="9.25cm" svg:x2="17.04cm" svg:y2="10.545cm" draw:start-shape="id11" draw:start-glue-point="6" draw:end-shape="id11" draw:end-glue-point="7" svg:d="M17040 9250h1339v1295h-1339" svg:viewBox="0 0 1340 1296">
          <text:p/>
        </draw:connector>
        <draw:frame draw:style-name="gr15" draw:text-style-name="P8" draw:layer="layout" svg:width="3.175cm" svg:height="0.645cm" svg:x="11.795cm" svg:y="8.62cm">
          <draw:text-box>
            <text:p><text:span text:style-name="T3">add subscriber</text:span></text:p>
          </draw:text-box>
        </draw:frame>
        <draw:custom-shape draw:style-name="gr23" draw:text-style-name="P14" xml:id="id13" draw:id="id13" draw:layer="layout" svg:width="3.839cm" svg:height="0.893cm" svg:x="24.413cm" svg:y="1.377cm">
          <draw:glue-point draw:id="4" svg:x="-2.297cm" svg:y="5.005cm"/>
          <draw:glue-point draw:id="5" svg:x="3.745cm" svg:y="5.005cm"/>
          <text:p text:style-name="P2"><text:span text:style-name="T1">Wifi Servi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7.769cm" svg:y1="2.269cm" svg:x2="27.765cm" svg:y2="10.242cm" draw:start-shape="id13" draw:start-glue-point="5" draw:end-shape="id14" draw:end-glue-point="0" svg:d="M27769 2269l-4 7973" svg:viewBox="0 0 5 7974">
          <text:p/>
        </draw:connector>
        <draw:custom-shape draw:style-name="gr24" draw:text-style-name="P15" xml:id="id14" draw:id="id14" draw:layer="layout" svg:width="0.566cm" svg:height="1.905cm" svg:x="27.482cm" svg:y="10.242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6" draw:layer="layout" svg:width="3.81cm" svg:height="1.523cm" svg:x="23.742cm" svg:y="9.451cm">
          <draw:text-box>
            <text:p><text:span text:style-name="T6">publish_command(</text:span></text:p>
            <text:p><text:span text:style-name="T6">CommandMessage(</text:span></text:p>
            <text:p><text:span text:style-name="T6">WIFI_SOURCE, </text:span></text:p>
            <text:p><text:span text:style-name="T6">WIFI_ACCESS_POINT))</text:span></text:p>
          </draw:text-box>
          <draw:glue-point draw:id="4" svg:x="4.566cm" svg:y="5.004cm"/>
          <draw:glue-point draw:id="5" svg:x="5cm" svg:y="5.004cm"/>
          <draw:glue-point draw:id="6" svg:x="4.566cm" svg:y="5.004cm"/>
        </draw:frame>
        <draw:frame draw:style-name="gr7" draw:text-style-name="P17" draw:layer="layout" svg:width="4.128cm" svg:height="1.039cm" svg:x="24.812cm" svg:y="12.661cm">
          <draw:text-box>
            <text:p><text:span text:style-name="T7">WifiEventListener()</text:span><text:span text:style-name="T8">→</text:span><text:span text:style-name="T7"> NM_CONNECTED</text:span></text:p>
          </draw:text-box>
          <draw:glue-point draw:id="4" svg:x="1.153cm" svg:y="-4.995cm"/>
          <draw:glue-point draw:id="5" svg:x="1.921cm" svg:y="-4.995cm"/>
        </draw:frame>
        <draw:custom-shape draw:style-name="gr26" draw:text-style-name="P5" xml:id="id7" draw:id="id7" draw:layer="layout" svg:width="0.566cm" svg:height="1.158cm" svg:x="16.422cm" svg:y="13.747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4.762cm" svg:height="0.645cm" svg:x="11.078cm" svg:y="14.007cm">
          <draw:text-box>
            <text:p><text:span text:style-name="T7">queue= _subscribers[topic]</text:span></text:p>
          </draw:text-box>
        </draw:frame>
        <draw:connector draw:style-name="gr27" draw:text-style-name="P1" draw:layer="layout" svg:x1="23.294cm" svg:y1="11.639cm" svg:x2="10.99cm" svg:y2="11.932cm" draw:start-shape="id15" draw:start-glue-point="3" draw:end-shape="id2" draw:end-glue-point="8" svg:d="M23294 11639h-6152v293h-6152" svg:viewBox="0 0 12305 294">
          <text:p/>
        </draw:connector>
        <draw:frame draw:style-name="gr28" draw:text-style-name="P17" draw:layer="layout" svg:width="5.397cm" svg:height="1.27cm" svg:x="17.51cm" svg:y="11.795cm">
          <draw:text-box>
            <text:p><text:span text:style-name="T7">publish(topic:Topic, </text:span><text:span text:style-name="T7">message:CommandMessage)</text:span></text:p>
          </draw:text-box>
        </draw:frame>
        <draw:custom-shape draw:style-name="gr29" draw:text-style-name="P7" xml:id="id17" draw:id="id17" draw:layer="layout" svg:width="3.539cm" svg:height="0.693cm" svg:x="12.742cm" svg:y="7.72cm">
          <draw:glue-point draw:id="4" svg:x="2.992cm" svg:y="5.382cm"/>
          <draw:glue-point draw:id="5" svg:x="3.888cm" svg:y="3.665cm"/>
          <text:p text:style-name="P6"><text:span text:style-name="T2">queue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6.963cm" svg:y1="5.634cm" svg:x2="10.449cm" svg:y2="5.918cm" draw:start-shape="id5" draw:start-glue-point="6" draw:end-shape="id16" draw:end-glue-point="4" svg:d="M6963 5634h1743v284h1743" svg:viewBox="0 0 3487 285">
          <text:p/>
        </draw:connector>
        <draw:connector draw:style-name="gr30" draw:text-style-name="P1" draw:layer="layout" draw:type="line" svg:x1="15.569cm" svg:y1="8.413cm" svg:x2="15.535cm" svg:y2="17.41cm" draw:start-shape="id17" draw:start-glue-point="4" draw:end-shape="id18" draw:end-glue-point="0" svg:d="M15569 8413l-34 8997" svg:viewBox="0 0 35 8998">
          <text:p/>
        </draw:connector>
        <draw:connector draw:style-name="gr6" draw:text-style-name="P10" draw:layer="layout" draw:type="line" svg:x1="16.422cm" svg:y1="14.613cm" svg:x2="10.99cm" svg:y2="14.646cm" draw:start-shape="id7" draw:start-glue-point="8" draw:end-shape="id2" draw:end-glue-point="12" svg:d="M16422 14613l-5432 33" svg:viewBox="0 0 5433 34">
          <text:p/>
        </draw:connector>
        <draw:connector draw:style-name="gr6" draw:text-style-name="P10" draw:layer="layout" draw:type="line" svg:x1="10.99cm" svg:y1="15.286cm" svg:x2="15.269cm" svg:y2="15.334cm" draw:start-shape="id2" draw:start-glue-point="13" draw:end-shape="id19" draw:end-glue-point="4" svg:d="M10990 15286l4279 48" svg:viewBox="0 0 4280 49">
          <text:p/>
        </draw:connector>
        <draw:frame draw:style-name="gr15" draw:text-style-name="P17" draw:layer="layout" svg:width="3.81cm" svg:height="0.645cm" svg:x="11.16cm" svg:y="15.287cm">
          <draw:text-box>
            <text:p><text:span text:style-name="T7">queue.put(message)</text:span></text:p>
          </draw:text-box>
        </draw:frame>
        <draw:custom-shape draw:style-name="gr31" draw:text-style-name="P19" xml:id="id21" draw:id="id21" draw:layer="layout" svg:width="3.793cm" svg:height="0.958cm" svg:x="6.397cm" svg:y="10.519cm">
          <draw:glue-point draw:id="4" svg:x="-3.21cm" svg:y="5cm"/>
          <text:p text:style-name="P18"><text:span text:style-name="T9">&lt;&lt;Thread&gt;&gt;</text:span></text:p>
          <text:p text:style-name="P18"><text:span text:style-name="T9">subscription_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svg:x1="10.467cm" svg:y1="9.625cm" svg:x2="8.293cm" svg:y2="10.519cm" draw:start-shape="id20" draw:start-glue-point="5" draw:end-shape="id21" draw:end-glue-point="0" svg:d="M10467 9625h-2174v894" svg:viewBox="0 0 2175 895">
          <text:p/>
        </draw:connector>
        <draw:frame draw:style-name="gr32" draw:text-style-name="P8" draw:layer="layout" svg:width="3.492cm" svg:height="1.433cm" svg:x="7.132cm" svg:y="5.98cm">
          <draw:text-box>
            <text:p><text:span text:style-name="T3">subscribe(</text:span></text:p>
            <text:p><text:span text:style-name="T3">Topic.COMMAND,</text:span></text:p>
            <text:p><text:span text:style-name="T3">wifi_listener)</text:span></text:p>
          </draw:text-box>
        </draw:frame>
        <draw:g draw:style-name="gr33">
          <draw:custom-shape draw:style-name="gr34" draw:text-style-name="P20" draw:layer="layout" svg:width="9.508cm" svg:height="3.175cm" svg:x="8.219cm" svg:y="13.065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2" draw:layer="layout" svg:width="1.556cm" svg:height="0.779cm" svg:x="8.202cm" svg:y="13.065cm">
            <text:p text:style-name="P21"><text:span text:style-name="T10">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ustom-shape draw:style-name="gr36" draw:text-style-name="P5" xml:id="id20" draw:id="id20" draw:layer="layout" svg:width="0.566cm" svg:height="2.805cm" svg:x="10.467cm" svg:y="7.402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5.477cm" svg:y="-2.5cm"/>
          <draw:glue-point draw:id="9" svg:x="5.477cm" svg:y="1.25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11.033cm" svg:y1="8.103cm" svg:x2="12.742cm" svg:y2="8.066cm" draw:start-shape="id20" draw:start-glue-point="8" draw:end-shape="id17" draw:end-glue-point="3" svg:d="M11033 8103l1709-37" svg:viewBox="0 0 1710 38">
          <text:p/>
        </draw:connector>
        <draw:connector draw:style-name="gr6" draw:text-style-name="P10" draw:layer="layout" draw:type="line" svg:x1="11.033cm" svg:y1="9.154cm" svg:x2="16.474cm" svg:y2="9.176cm" draw:start-shape="id20" draw:start-glue-point="9" draw:end-shape="id11" draw:end-glue-point="4" svg:d="M11033 9154l5441 22" svg:viewBox="0 0 5442 23">
          <text:p/>
        </draw:connector>
        <draw:frame draw:style-name="gr15" draw:text-style-name="P17" draw:layer="layout" svg:width="2.858cm" svg:height="0.645cm" svg:x="12.112cm" svg:y="7.022cm">
          <draw:text-box>
            <text:p><text:span text:style-name="T7">create queue</text:span></text:p>
          </draw:text-box>
        </draw:frame>
        <draw:connector draw:style-name="gr30" draw:text-style-name="P1" draw:layer="layout" draw:type="line" svg:x1="7.076cm" svg:y1="11.477cm" svg:x2="7.085cm" svg:y2="16.767cm" draw:start-shape="id21" draw:start-glue-point="4" draw:end-shape="id22" draw:end-glue-point="5" svg:d="M7076 11477l9 5290" svg:viewBox="0 0 10 5291">
          <text:p/>
        </draw:connector>
        <draw:connector draw:style-name="gr37" draw:text-style-name="P1" draw:layer="layout" svg:x1="15.569cm" svg:y1="8.413cm" svg:x2="10.19cm" svg:y2="10.998cm" draw:start-shape="id17" draw:start-glue-point="4" draw:end-shape="id21" draw:end-glue-point="1" svg:d="M15569 8413v2585h-5379" svg:viewBox="0 0 5380 2586">
          <text:p/>
        </draw:connector>
        <draw:connector draw:style-name="gr1" draw:text-style-name="P1" draw:layer="layout" draw:type="line" svg:x1="6.676cm" svg:y1="2.31cm" svg:x2="6.68cm" svg:y2="5.427cm" draw:start-shape="id23" draw:start-glue-point="9" draw:end-shape="id5" draw:end-glue-point="0" svg:d="M6676 2310l4 3117" svg:viewBox="0 0 5 3118">
          <text:p/>
        </draw:connector>
        <draw:connector draw:style-name="gr38" draw:text-style-name="P1" draw:layer="layout" svg:x1="7.385cm" svg:y1="2.31cm" svg:x2="10.507cm" svg:y2="4.203cm" draw:start-shape="id23" draw:start-glue-point="6" draw:end-shape="id8" draw:end-glue-point="5" svg:d="M7385 2310v1893h3122" svg:viewBox="0 0 3123 1894">
          <text:p/>
        </draw:connector>
        <draw:custom-shape draw:style-name="gr4" draw:text-style-name="P5" xml:id="id5" draw:id="id5" draw:layer="layout" svg:width="0.566cm" svg:height="1.082cm" svg:x="6.397cm" svg:y="5.427cm">
          <draw:glue-point draw:id="4" svg:x="-5.433cm" svg:y="-3.946cm"/>
          <draw:glue-point draw:id="5" svg:x="-5.433cm" svg:y="2.929cm"/>
          <draw:glue-point draw:id="6" svg:x="5.417cm" svg:y="-3.087cm"/>
          <draw:glue-point draw:id="7" svg:x="5.477cm" svg:y="-1.375cm"/>
          <draw:glue-point draw:id="8" svg:x="5.477cm" svg:y="2.8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3" xml:id="id22" draw:id="id22">
          <draw:glue-point draw:id="4" svg:x="-3.063cm" svg:y="-5.11cm"/>
          <draw:glue-point draw:id="5" svg:x="-4.248cm" svg:y="-5cm"/>
          <draw:custom-shape draw:style-name="gr39" draw:text-style-name="P20" draw:layer="layout" svg:width="10.458cm" svg:height="3.475cm" svg:x="6.317cm" svg:y="16.767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2" draw:layer="layout" svg:width="1.556cm" svg:height="0.779cm" svg:x="6.297cm" svg:y="16.767cm">
            <text:p text:style-name="P21"><text:span text:style-name="T10">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41" draw:text-style-name="P23" draw:layer="layout" svg:width="4.127cm" svg:height="0.725cm" svg:x="7.85cm" svg:y="16.875cm">
          <draw:text-box>
            <text:p><text:span text:style-name="T2">[wait for message]</text:span></text:p>
          </draw:text-box>
        </draw:frame>
        <draw:frame draw:style-name="gr41" draw:text-style-name="P23" draw:layer="layout" svg:width="4.445cm" svg:height="0.725cm" svg:x="11.16cm" svg:y="13.292cm">
          <draw:text-box>
            <text:p><text:span text:style-name="T2">[get subscribers]</text:span></text:p>
          </draw:text-box>
        </draw:frame>
        <draw:g draw:style-name="gr33">
          <draw:custom-shape draw:style-name="gr42" draw:text-style-name="P20" draw:layer="layout" svg:width="5.588cm" svg:height="2.3cm" svg:x="8.912cm" svg:y="17.7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1.201cm" svg:height="0.779cm" svg:x="8.902cm" svg:y="17.7cm">
            <text:p text:style-name="P21"><text:span text:style-name="T10">al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ustom-shape draw:style-name="gr44" draw:text-style-name="P5" xml:id="id19" draw:id="id19" draw:layer="layout" svg:width="0.566cm" svg:height="0.77cm" svg:x="15.269cm" svg:y="15.252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xml:id="id18" draw:id="id18" draw:layer="layout" svg:width="0.566cm" svg:height="2.07cm" svg:x="15.252cm" svg:y="17.41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23" draw:layer="layout" svg:width="4.445cm" svg:height="0.725cm" svg:x="10.337cm" svg:y="17.555cm">
          <draw:text-box>
            <text:p><text:span text:style-name="T2">[message available]</text:span></text:p>
          </draw:text-box>
        </draw:frame>
        <draw:custom-shape draw:style-name="gr46" draw:text-style-name="P5" xml:id="id24" draw:id="id24" draw:layer="layout" svg:width="0.566cm" svg:height="1.487cm" svg:x="11.607cm" svg:y="18.245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draw:glue-point draw:id="9" svg:x="-5cm" svg:y="-0.653cm"/>
          <draw:glue-point draw:id="10" svg:x="-5cm" svg:y="-3.14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15.252cm" svg:y1="18.445cm" svg:x2="12.173cm" svg:y2="18.457cm" draw:start-shape="id18" draw:start-glue-point="3" draw:end-shape="id24" draw:end-glue-point="6" svg:d="M15252 18445l-3079 12" svg:viewBox="0 0 3080 13">
          <text:p/>
        </draw:connector>
        <draw:connector draw:style-name="gr6" draw:text-style-name="P10" draw:layer="layout" draw:type="line" svg:x1="11.607cm" svg:y1="18.891cm" svg:x2="2.305cm" svg:y2="18.897cm" draw:start-shape="id24" draw:start-glue-point="9" draw:end-shape="id25" draw:end-glue-point="4" svg:d="M11607 18891l-9302 6" svg:viewBox="0 0 9303 7">
          <text:p/>
        </draw:connector>
        <draw:frame draw:style-name="gr7" draw:text-style-name="P17" draw:layer="layout" svg:width="4.127cm" svg:height="1.039cm" svg:x="2.27cm" svg:y="17.741cm">
          <draw:text-box>
            <text:p><text:span text:style-name="T7">&lt;&lt;callback&gt;&gt;</text:span></text:p>
            <text:p><text:span text:style-name="T7">wifi_listener(message)</text:span></text:p>
          </draw:text-box>
        </draw:frame>
        <draw:frame draw:style-name="gr7" draw:text-style-name="P17" draw:layer="layout" svg:width="4.127cm" svg:height="1.039cm" svg:x="5.445cm" svg:y="8.733cm">
          <draw:text-box>
            <text:p><text:span text:style-name="T7">(queue: Queue, callback: wifi_listener)</text:span></text:p>
          </draw:text-box>
        </draw:frame>
        <draw:frame draw:style-name="gr47" draw:text-style-name="P17" draw:layer="layout" svg:width="1.924cm" svg:height="1.039cm" svg:x="-0.072cm" svg:y="18.78cm">
          <draw:text-box>
            <text:p><text:span text:style-name="T7">process</text:span></text:p>
            <text:p><text:span text:style-name="T7">message</text:span></text:p>
          </draw:text-box>
        </draw:frame>
        <draw:connector draw:style-name="gr1" draw:text-style-name="P1" draw:layer="layout" draw:type="line" svg:x1="23.541cm" svg:y1="2.31cm" svg:x2="23.577cm" svg:y2="11.06cm" draw:start-shape="id23" draw:start-glue-point="10" draw:end-shape="id15" draw:end-glue-point="0" svg:d="M23541 2310l36 8750" svg:viewBox="0 0 37 8751">
          <text:p/>
        </draw:connector>
        <draw:custom-shape draw:style-name="gr26" draw:text-style-name="P5" xml:id="id15" draw:id="id15" draw:layer="layout" svg:width="0.566cm" svg:height="1.158cm" svg:x="23.294cm" svg:y="11.06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27.482cm" svg:y1="11.194cm" svg:x2="23.86cm" svg:y2="11.226cm" draw:start-shape="id14" draw:start-glue-point="3" draw:end-shape="id15" draw:end-glue-point="6" svg:d="M27482 11194l-3622 32" svg:viewBox="0 0 3623 33">
          <text:p/>
        </draw:connector>
        <draw:connector draw:style-name="gr38" draw:text-style-name="P1" draw:layer="layout" svg:x1="28.575cm" svg:y1="13.714cm" svg:x2="28.048cm" svg:y2="10.717cm" draw:end-shape="id14" draw:end-glue-point="4" svg:d="M28575 13714v-2997h-527" svg:viewBox="0 0 528 2998">
          <text:p/>
        </draw:connector>
        <draw:connector draw:style-name="gr22" draw:text-style-name="P1" draw:layer="layout" svg:x1="11.015cm" svg:y1="6.655cm" svg:x2="11.033cm" svg:y2="7.802cm" draw:start-shape="id16" draw:start-glue-point="8" draw:end-shape="id20" draw:end-glue-point="6" svg:d="M11015 6655h545v1147h-527" svg:viewBox="0 0 546 1148">
          <text:p/>
        </draw:connector>
        <draw:frame draw:style-name="gr48" draw:text-style-name="P24" draw:layer="layout" svg:width="16.797cm" svg:height="1cm" svg:x="6.745cm" svg:y="0cm">
          <draw:text-box>
            <text:p>Messaging: Callback based message to subscriber</text:p>
          </draw:text-box>
        </draw:frame>
        <draw:frame draw:style-name="gr49" draw:text-style-name="P17" draw:layer="layout" svg:width="2.223cm" svg:height="1.039cm" svg:x="12.429cm" svg:y="18.462cm">
          <draw:text-box>
            <text:p><text:span text:style-name="T7">message=safe_get()</text:span></text:p>
          </draw:text-box>
        </draw:frame>
      </draw:page>
      <draw:page draw:name="Queue_at_subscriber" draw:style-name="dp1" draw:master-page-name="Default">
        <draw:connector draw:style-name="gr1" draw:text-style-name="P1" draw:layer="layout" draw:type="line" svg:x1="10.841cm" svg:y1="3.623cm" svg:x2="10.707cm" svg:y2="11.477cm" draw:start-shape="id26" draw:start-glue-point="5" draw:end-shape="id27" draw:end-glue-point="0" svg:d="M10841 3623l-134 7854" svg:viewBox="0 0 135 7855">
          <text:p/>
        </draw:connector>
        <draw:custom-shape draw:style-name="gr50" draw:text-style-name="P3" xml:id="id28" draw:id="id28" draw:layer="layout" svg:width="5.075cm" svg:height="0.893cm" svg:x="0.687cm" svg:y="1.367cm">
          <draw:glue-point draw:id="4" svg:x="-2.954cm" svg:y="5.117cm"/>
          <text:p text:style-name="P2"><text:span text:style-name="T1">Remote Servi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.725cm" svg:y1="2.26cm" svg:x2="1.698cm" svg:y2="20.594cm" draw:start-shape="id28" draw:start-glue-point="4" svg:d="M1725 2260l-27 18334" svg:viewBox="0 0 28 18335">
          <text:p/>
        </draw:connector>
        <draw:custom-shape draw:style-name="gr4" draw:text-style-name="P5" xml:id="id41" draw:id="id41" draw:layer="layout" svg:width="0.566cm" svg:height="1.082cm" svg:x="10.449cm" svg:y="6.003cm">
          <draw:glue-point draw:id="4" svg:x="-5.433cm" svg:y="-3.946cm"/>
          <draw:glue-point draw:id="5" svg:x="-5.433cm" svg:y="2.929cm"/>
          <draw:glue-point draw:id="6" svg:x="5.417cm" svg:y="-3.087cm"/>
          <draw:glue-point draw:id="7" svg:x="5.477cm" svg:y="-1.375cm"/>
          <draw:glue-point draw:id="8" svg:x="5.477cm" svg:y="2.8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6" draw:id="id26" draw:layer="layout" svg:width="3.81cm" svg:height="0.893cm" svg:x="7.785cm" svg:y="2.73cm">
          <draw:glue-point draw:id="4" svg:x="-3.039cm" svg:y="5.296cm"/>
          <draw:glue-point draw:id="5" svg:x="3.023cm" svg:y="5.296cm"/>
          <text:p text:style-name="P6"><text:span text:style-name="T2">PubSubManag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.865cm" svg:y1="5.62cm" svg:x2="6.397cm" svg:y2="5.642cm" draw:start-shape="id29" draw:start-glue-point="5" draw:end-shape="id30" draw:end-glue-point="4" svg:d="M1865 5620l4532 22" svg:viewBox="0 0 4533 23">
          <text:p/>
        </draw:connector>
        <draw:frame draw:style-name="gr15" draw:text-style-name="P8" draw:layer="layout" svg:width="4.186cm" svg:height="0.645cm" svg:x="2.27cm" svg:y="3.94cm">
          <draw:text-box>
            <text:p><text:span text:style-name="T3">subscribe_commands()</text:span></text:p>
          </draw:text-box>
          <draw:glue-point draw:id="4" svg:x="2.107cm" svg:y="-4.995cm"/>
        </draw:frame>
        <draw:custom-shape draw:style-name="gr51" draw:text-style-name="P5" xml:id="id27" draw:id="id27" draw:layer="layout" svg:width="0.566cm" svg:height="3.175cm" svg:x="10.424cm" svg:y="11.477cm">
          <draw:glue-point draw:id="4" svg:x="-5.433cm" svg:y="-3.946cm"/>
          <draw:glue-point draw:id="5" svg:x="-5.433cm" svg:y="2.929cm"/>
          <draw:glue-point draw:id="6" svg:x="5.007cm" svg:y="-3.573cm"/>
          <draw:glue-point draw:id="7" svg:x="3.233cm" svg:y="-4.439cm"/>
          <draw:glue-point draw:id="8" svg:x="5.477cm" svg:y="-4.439cm"/>
          <draw:glue-point draw:id="9" svg:x="-5.477cm" svg:y="-1.636cm"/>
          <draw:glue-point draw:id="10" svg:x="5.477cm" svg:y="-1.636cm"/>
          <draw:glue-point draw:id="11" svg:x="5.477cm" svg:y="0.777cm"/>
          <draw:glue-point draw:id="12" svg:x="5.477cm" svg:y="1.984cm"/>
          <draw:glue-point draw:id="13" svg:x="5.477cm" svg:y="3.498cm"/>
          <draw:glue-point draw:id="14" svg:x="-5.477cm" svg:y="3.6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" draw:id="id43" draw:layer="layout" svg:width="17.78cm" svg:height="0.893cm" svg:x="6.062cm" svg:y="1.417cm">
          <draw:glue-point draw:id="4" svg:x="-2.749cm" svg:y="5.01cm"/>
          <draw:glue-point draw:id="5" svg:x="3cm" svg:y="5.01cm"/>
          <draw:glue-point draw:id="6" svg:x="-4.256cm" svg:y="5.296cm"/>
          <draw:glue-point draw:id="7" svg:x="-2.136cm" svg:y="5.296cm"/>
          <draw:glue-point draw:id="8" svg:x="-1.297cm" svg:y="5.296cm"/>
          <draw:glue-point draw:id="9" svg:x="-4.655cm" svg:y="5.296cm"/>
          <draw:glue-point draw:id="10" svg:x="4.831cm" svg:y="5.296cm"/>
          <text:p text:style-name="P2"><text:span text:style-name="T1">&lt;&lt;module&gt; Messag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708cm" svg:y1="3.857cm" svg:x2="16.705cm" svg:y2="12.547cm" draw:start-shape="id31" draw:end-shape="id32" draw:end-glue-point="0" svg:d="M16708 3857l-3 8690" svg:viewBox="0 0 4 8691">
          <text:p/>
        </draw:connector>
        <draw:custom-shape draw:style-name="gr10" draw:text-style-name="P7" xml:id="id31" draw:id="id31" draw:layer="layout" svg:width="7.922cm" svg:height="1.163cm" svg:x="12.747cm" svg:y="2.694cm">
          <text:p text:style-name="P6"><text:span text:style-name="T2">_subscribers</text:span></text:p>
          <text:p text:style-name="P6"><text:span text:style-name="T2">dict[Topic,list[Queue]]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29" draw:id="id29" draw:layer="layout" svg:width="0.566cm" svg:height="6.643cm" svg:x="1.299cm" svg:y="4.734cm">
          <draw:glue-point draw:id="4" svg:x="5.417cm" svg:y="-2.509cm"/>
          <draw:glue-point draw:id="5" svg:x="5.477cm" svg:y="-3.666cm"/>
          <draw:glue-point draw:id="6" svg:x="5.477cm" svg:y="4.088cm"/>
          <draw:glue-point draw:id="7" svg:x="5.477cm" svg:y="2.762cm"/>
          <draw:glue-point draw:id="8" svg:x="5.477cm" svg:y="3.23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34" draw:id="id34" draw:layer="layout" svg:width="0.566cm" svg:height="1.436cm" svg:x="16.414cm" svg:y="4.561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33" draw:id="id33" draw:layer="layout" svg:width="0.566cm" svg:height="1.08cm" svg:x="10.506cm" svg:y="4.082cm">
          <draw:glue-point draw:id="4" svg:x="5.417cm" svg:y="-2.509cm"/>
          <draw:glue-point draw:id="5" svg:x="-4.992cm" svg:y="-3.887cm"/>
          <draw:glue-point draw:id="6" svg:x="4.611cm" svg:y="1.138cm"/>
          <draw:glue-point draw:id="7" svg:x="5.477cm" svg:y="4.074cm"/>
          <draw:glue-point draw:id="8" svg:x="5.477cm" svg:y="1.13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957cm" svg:height="0.645cm" svg:x="8.568cm" svg:y="4.165cm">
          <draw:text-box>
            <text:p><text:span text:style-name="T3">init()</text:span></text:p>
          </draw:text-box>
        </draw:frame>
        <draw:connector draw:style-name="gr6" draw:text-style-name="P10" draw:layer="layout" draw:type="line" svg:x1="11.072cm" svg:y1="4.744cm" svg:x2="16.414cm" svg:y2="4.713cm" draw:start-shape="id33" draw:start-glue-point="8" draw:end-shape="id34" draw:end-glue-point="4" svg:d="M11072 4744l5342-31" svg:viewBox="0 0 5343 32">
          <text:p/>
        </draw:connector>
        <draw:frame draw:style-name="gr16" draw:text-style-name="P8" draw:layer="layout" svg:width="4.527cm" svg:height="0.68cm" svg:x="11.795cm" svg:y="4.81cm">
          <draw:text-box>
            <text:p><text:span text:style-name="T3">create empty dictionary</text:span></text:p>
          </draw:text-box>
        </draw:frame>
        <draw:custom-shape draw:style-name="gr53" draw:text-style-name="P12" xml:id="id35" draw:id="id35" draw:layer="layout" svg:width="3.175cm" svg:height="1.785cm" svg:x="18.462cm" svg:y="4.427cm">
          <text:p text:style-name="P11"><text:span text:style-name="T4">_subscribers=</text:span></text:p>
          <text:p text:style-name="P11"><text:span text:style-name="T4">{</text:span></text:p>
          <text:p text:style-name="P11"><text:span text:style-name="T4">Topic.COMMAND: []</text:span></text:p>
          <text:p text:style-name="P11"><text:span text:style-name="T4">Topic.ERROR: []</text:span></text:p>
          <text:p text:style-name="P11"><text:span text:style-name="T4">}</text:span><text:span text:style-name="T5">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54" draw:text-style-name="P13" draw:layer="layout" draw:type="line" svg:x1="16.98cm" svg:y1="5.701cm" svg:x2="18.462cm" svg:y2="5.32cm" draw:start-shape="id34" draw:start-glue-point="7" draw:end-shape="id35" draw:end-glue-point="5" svg:d="M16980 5701l1482-381" svg:viewBox="0 0 1483 382">
          <text:p/>
        </draw:connector>
        <draw:custom-shape draw:style-name="gr55" draw:text-style-name="P12" xml:id="id37" draw:id="id37" draw:layer="layout" svg:width="4.765cm" svg:height="1.905cm" svg:x="18.46cm" svg:y="6.867cm">
          <text:p text:style-name="P11"><text:span text:style-name="T4">_subscribers=</text:span></text:p>
          <text:p text:style-name="P11"><text:span text:style-name="T4">{</text:span></text:p>
          <text:p text:style-name="P11"><text:span text:style-name="T4">Topic.COMMAND: [queue]</text:span></text:p>
          <text:p text:style-name="P11"><text:span text:style-name="T4">Topic.ERROR: []</text:span></text:p>
          <text:p text:style-name="P11"><text:span text:style-name="T4">}</text:span><text:span text:style-name="T5">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56" draw:text-style-name="P13" draw:layer="layout" draw:type="line" svg:x1="17.04cm" svg:y1="8.639cm" svg:x2="18.46cm" svg:y2="7.82cm" draw:start-shape="id36" draw:start-glue-point="6" draw:end-shape="id37" draw:end-glue-point="5" svg:d="M17040 8639l1420-819" svg:viewBox="0 0 1421 820">
          <text:p/>
        </draw:connector>
        <draw:custom-shape draw:style-name="gr57" draw:text-style-name="P5" xml:id="id36" draw:id="id36" draw:layer="layout" svg:width="0.566cm" svg:height="1.206cm" svg:x="16.474cm" svg:y="8.466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draw:line-skew="0.26cm" svg:x1="17.04cm" svg:y1="8.639cm" svg:x2="17.04cm" svg:y2="9.424cm" draw:start-shape="id36" draw:start-glue-point="6" draw:end-shape="id36" draw:end-glue-point="7" svg:d="M17040 8639h787v785h-787" svg:viewBox="0 0 788 786">
          <text:p/>
        </draw:connector>
        <draw:frame draw:style-name="gr15" draw:text-style-name="P8" draw:layer="layout" svg:width="4.127cm" svg:height="0.645cm" svg:x="11.16cm" svg:y="8.61cm">
          <draw:text-box>
            <text:p><text:span text:style-name="T3">add subscriber (queue)</text:span></text:p>
          </draw:text-box>
        </draw:frame>
        <draw:custom-shape draw:style-name="gr23" draw:text-style-name="P14" xml:id="id38" draw:id="id38" draw:layer="layout" svg:width="3.839cm" svg:height="0.893cm" svg:x="24.313cm" svg:y="1.377cm">
          <draw:glue-point draw:id="4" svg:x="-2.297cm" svg:y="5.005cm"/>
          <draw:glue-point draw:id="5" svg:x="3.745cm" svg:y="5.005cm"/>
          <text:p text:style-name="P2"><text:span text:style-name="T1">Wifi Servi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7.669cm" svg:y1="2.269cm" svg:x2="27.765cm" svg:y2="10.042cm" draw:start-shape="id38" draw:start-glue-point="5" draw:end-shape="id39" draw:end-glue-point="0" svg:d="M27669 2269l96 7773" svg:viewBox="0 0 97 7774">
          <text:p/>
        </draw:connector>
        <draw:custom-shape draw:style-name="gr24" draw:text-style-name="P15" xml:id="id39" draw:id="id39" draw:layer="layout" svg:width="0.566cm" svg:height="1.905cm" svg:x="27.482cm" svg:y="10.042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6" draw:layer="layout" svg:width="3.81cm" svg:height="1.523cm" svg:x="23.742cm" svg:y="9.451cm">
          <draw:text-box>
            <text:p><text:span text:style-name="T6">publish_command(</text:span></text:p>
            <text:p><text:span text:style-name="T6">CommandMessage(</text:span></text:p>
            <text:p><text:span text:style-name="T6">WIFI_SOURCE, </text:span></text:p>
            <text:p><text:span text:style-name="T6">WIFI_ACCESS_POINT))</text:span></text:p>
          </draw:text-box>
          <draw:glue-point draw:id="4" svg:x="4.566cm" svg:y="5.004cm"/>
          <draw:glue-point draw:id="5" svg:x="5cm" svg:y="5.004cm"/>
          <draw:glue-point draw:id="6" svg:x="4.566cm" svg:y="5.004cm"/>
        </draw:frame>
        <draw:frame draw:style-name="gr7" draw:text-style-name="P17" draw:layer="layout" svg:width="4.128cm" svg:height="1.039cm" svg:x="24.812cm" svg:y="12.661cm">
          <draw:text-box>
            <text:p><text:span text:style-name="T7">WifiEventListener()</text:span><text:span text:style-name="T8">→</text:span><text:span text:style-name="T7"> NM_CONNECTED</text:span></text:p>
          </draw:text-box>
          <draw:glue-point draw:id="4" svg:x="1.153cm" svg:y="-4.995cm"/>
          <draw:glue-point draw:id="5" svg:x="1.921cm" svg:y="-4.995cm"/>
        </draw:frame>
        <draw:custom-shape draw:style-name="gr58" draw:text-style-name="P5" xml:id="id32" draw:id="id32" draw:layer="layout" svg:width="0.566cm" svg:height="1.54cm" svg:x="16.422cm" svg:y="12.547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4.762cm" svg:height="1.039cm" svg:x="11.478cm" svg:y="12.6cm">
          <draw:text-box>
            <text:p><text:span text:style-name="T7">wifi_listener= _subscribers[topic]</text:span></text:p>
          </draw:text-box>
        </draw:frame>
        <draw:connector draw:style-name="gr27" draw:text-style-name="P1" draw:layer="layout" draw:line-skew="-3.442cm" svg:x1="23.294cm" svg:y1="11.439cm" svg:x2="10.99cm" svg:y2="11.655cm" draw:start-shape="id40" draw:start-glue-point="3" draw:end-shape="id27" draw:end-glue-point="8" svg:d="M23294 11439h-9594v216h-2710" svg:viewBox="0 0 12305 217">
          <text:p/>
        </draw:connector>
        <draw:frame draw:style-name="gr28" draw:text-style-name="P17" draw:layer="layout" svg:width="5.397cm" svg:height="1.27cm" svg:x="17.51cm" svg:y="10.425cm">
          <draw:text-box>
            <text:p><text:span text:style-name="T7">publish(topic:Topic, message:CommandMessage)</text:span></text:p>
          </draw:text-box>
        </draw:frame>
        <draw:connector draw:style-name="gr27" draw:text-style-name="P1" draw:layer="layout" svg:x1="6.963cm" svg:y1="6.379cm" svg:x2="10.449cm" svg:y2="6.118cm" draw:start-shape="id30" draw:start-glue-point="8" draw:end-shape="id41" draw:end-glue-point="4" svg:d="M6963 6379h1743v-261h1743" svg:viewBox="0 0 3487 262">
          <text:p/>
        </draw:connector>
        <draw:connector draw:style-name="gr6" draw:text-style-name="P10" draw:layer="layout" draw:type="line" svg:x1="16.422cm" svg:y1="13.699cm" svg:x2="10.99cm" svg:y2="13.693cm" draw:start-shape="id32" draw:start-glue-point="8" draw:end-shape="id27" draw:end-glue-point="12" svg:d="M16422 13699l-5432-6" svg:viewBox="0 0 5433 7">
          <text:p/>
        </draw:connector>
        <draw:custom-shape draw:style-name="gr59" draw:text-style-name="P26" xml:id="id46" draw:id="id46" draw:layer="layout" svg:width="3.175cm" svg:height="0.958cm" svg:x="2.27cm" svg:y="11.442cm">
          <draw:glue-point draw:id="4" svg:x="-3.21cm" svg:y="5cm"/>
          <text:p text:style-name="P6"><text:span text:style-name="T2">&lt;&lt;Thread&gt;&gt;</text:span></text:p>
          <text:p text:style-name="P6"><text:span text:style-name="T2">wifi_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8" draw:layer="layout" svg:width="3.492cm" svg:height="1.433cm" svg:x="7.032cm" svg:y="6.397cm">
          <draw:text-box>
            <text:p><text:span text:style-name="T3">subscribe(</text:span></text:p>
            <text:p><text:span text:style-name="T3">Topic.COMMAND,</text:span></text:p>
            <text:p><text:span text:style-name="T3">wifi_listener)</text:span></text:p>
          </draw:text-box>
        </draw:frame>
        <draw:g draw:style-name="gr33">
          <draw:custom-shape draw:style-name="gr60" draw:text-style-name="P20" draw:layer="layout" svg:width="9.419cm" svg:height="3.005cm" svg:x="8.408cm" svg:y="11.965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2" draw:layer="layout" svg:width="1.556cm" svg:height="0.779cm" svg:x="8.392cm" svg:y="11.965cm">
            <text:p text:style-name="P21"><text:span text:style-name="T10">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ustom-shape draw:style-name="gr62" draw:text-style-name="P5" xml:id="id42" draw:id="id42" draw:layer="layout" svg:width="0.566cm" svg:height="2.858cm" svg:x="10.407cm" svg:y="7.867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5.477cm" svg:y="-2.5cm"/>
          <draw:glue-point draw:id="9" svg:x="5.477cm" svg:y="1.25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10.973cm" svg:y1="8.582cm" svg:x2="16.474cm" svg:y2="8.594cm" draw:start-shape="id42" draw:start-glue-point="8" draw:end-shape="id36" draw:end-glue-point="4" svg:d="M10973 8582l5501 12" svg:viewBox="0 0 5502 13">
          <text:p/>
        </draw:connector>
        <draw:connector draw:style-name="gr1" draw:text-style-name="P1" draw:layer="layout" draw:type="line" svg:x1="6.676cm" svg:y1="2.31cm" svg:x2="6.68cm" svg:y2="5.527cm" draw:start-shape="id43" draw:start-glue-point="9" draw:end-shape="id30" draw:end-glue-point="0" svg:d="M6676 2310l4 3217" svg:viewBox="0 0 5 3218">
          <text:p/>
        </draw:connector>
        <draw:connector draw:style-name="gr38" draw:text-style-name="P1" draw:layer="layout" svg:x1="7.385cm" svg:y1="2.31cm" svg:x2="10.507cm" svg:y2="4.203cm" draw:start-shape="id43" draw:start-glue-point="6" draw:end-shape="id33" draw:end-glue-point="5" svg:d="M7385 2310v1893h3122" svg:viewBox="0 0 3123 1894">
          <text:p/>
        </draw:connector>
        <draw:custom-shape draw:style-name="gr4" draw:text-style-name="P5" xml:id="id30" draw:id="id30" draw:layer="layout" svg:width="0.566cm" svg:height="1.082cm" svg:x="6.397cm" svg:y="5.527cm">
          <draw:glue-point draw:id="4" svg:x="-5.433cm" svg:y="-3.946cm"/>
          <draw:glue-point draw:id="5" svg:x="-5.433cm" svg:y="2.929cm"/>
          <draw:glue-point draw:id="6" svg:x="5.417cm" svg:y="-3.087cm"/>
          <draw:glue-point draw:id="7" svg:x="5.477cm" svg:y="-1.375cm"/>
          <draw:glue-point draw:id="8" svg:x="5.477cm" svg:y="2.8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23" draw:layer="layout" svg:width="4.445cm" svg:height="0.725cm" svg:x="11.16cm" svg:y="11.892cm">
          <draw:text-box>
            <text:p><text:span text:style-name="T2">[get subscribers]</text:span></text:p>
          </draw:text-box>
        </draw:frame>
        <draw:connector draw:style-name="gr6" draw:text-style-name="P10" draw:layer="layout" draw:type="line" svg:x1="10.424cm" svg:y1="14.23cm" svg:x2="7.867cm" svg:y2="14.254cm" draw:start-shape="id27" draw:start-glue-point="14" draw:end-shape="id44" draw:end-glue-point="6" svg:d="M10424 14230l-2557 24" svg:viewBox="0 0 2558 25">
          <text:p/>
        </draw:connector>
        <draw:connector draw:style-name="gr1" draw:text-style-name="P1" draw:layer="layout" draw:type="line" svg:x1="23.541cm" svg:y1="2.31cm" svg:x2="23.577cm" svg:y2="10.86cm" draw:start-shape="id43" draw:start-glue-point="10" draw:end-shape="id40" draw:end-glue-point="0" svg:d="M23541 2310l36 8550" svg:viewBox="0 0 37 8551">
          <text:p/>
        </draw:connector>
        <draw:custom-shape draw:style-name="gr26" draw:text-style-name="P5" xml:id="id40" draw:id="id40" draw:layer="layout" svg:width="0.566cm" svg:height="1.158cm" svg:x="23.294cm" svg:y="10.86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27.482cm" svg:y1="10.994cm" svg:x2="23.86cm" svg:y2="11.026cm" draw:start-shape="id39" draw:start-glue-point="3" draw:end-shape="id40" draw:end-glue-point="6" svg:d="M27482 10994l-3622 32" svg:viewBox="0 0 3623 33">
          <text:p/>
        </draw:connector>
        <draw:connector draw:style-name="gr38" draw:text-style-name="P1" draw:layer="layout" svg:x1="28.575cm" svg:y1="13.714cm" svg:x2="28.048cm" svg:y2="10.517cm" draw:end-shape="id39" draw:end-glue-point="4" svg:d="M28575 13714v-3197h-527" svg:viewBox="0 0 528 3198">
          <text:p/>
        </draw:connector>
        <draw:custom-shape draw:style-name="gr63" draw:text-style-name="P7" xml:id="id45" draw:id="id45" draw:layer="layout" svg:width="2.458cm" svg:height="0.67cm" svg:x="6.397cm" svg:y="8.902cm">
          <draw:glue-point draw:id="4" svg:x="-3.21cm" svg:y="5cm"/>
          <text:p text:style-name="P6"><text:span text:style-name="T2">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svg:x1="11.015cm" svg:y1="6.855cm" svg:x2="10.973cm" svg:y2="8.275cm" draw:start-shape="id41" draw:start-glue-point="8" draw:end-shape="id42" draw:end-glue-point="6" svg:d="M11015 6855h527v1420h-569" svg:viewBox="0 0 570 1421">
          <text:p/>
        </draw:connector>
        <draw:connector draw:style-name="gr22" draw:text-style-name="P1" draw:layer="layout" svg:x1="10.407cm" svg:y1="8.169cm" svg:x2="7.626cm" svg:y2="8.902cm" draw:start-shape="id42" draw:start-glue-point="4" draw:end-shape="id45" draw:end-glue-point="0" svg:d="M10407 8169h-2781v733" svg:viewBox="0 0 2782 734">
          <text:p/>
        </draw:connector>
        <draw:connector draw:style-name="gr6" draw:text-style-name="P1" draw:layer="layout" draw:type="line" svg:x1="10.407cm" svg:y1="10.133cm" svg:x2="1.865cm" svg:y2="10.206cm" draw:start-shape="id42" draw:start-glue-point="5" draw:end-shape="id29" draw:end-glue-point="8" svg:d="M10407 10133l-8542 73" svg:viewBox="0 0 8543 74">
          <text:p/>
        </draw:connector>
        <draw:frame draw:style-name="gr15" draw:text-style-name="P17" draw:layer="layout" svg:width="2.858cm" svg:height="0.645cm" svg:x="7.65cm" svg:y="7.985cm">
          <draw:text-box>
            <text:p><text:span text:style-name="T7">create queue</text:span></text:p>
          </draw:text-box>
        </draw:frame>
        <draw:frame draw:style-name="gr15" draw:text-style-name="P17" draw:layer="layout" svg:width="1.906cm" svg:height="0.645cm" svg:x="2.27cm" svg:y="9.562cm">
          <draw:text-box>
            <text:p><text:span text:style-name="T7">queue</text:span></text:p>
          </draw:text-box>
        </draw:frame>
        <draw:connector draw:style-name="gr38" draw:text-style-name="P1" draw:layer="layout" svg:x1="1.865cm" svg:y1="10.77cm" svg:x2="3.857cm" svg:y2="11.442cm" draw:start-shape="id29" draw:start-glue-point="6" draw:end-shape="id46" draw:end-glue-point="0" svg:d="M1865 10770h1992v672" svg:viewBox="0 0 1993 673">
          <text:p/>
        </draw:connector>
        <draw:frame draw:style-name="gr15" draw:text-style-name="P17" draw:layer="layout" svg:width="1.906cm" svg:height="0.645cm" svg:x="3.856cm" svg:y="10.832cm">
          <draw:text-box>
            <text:p><text:span text:style-name="T7">(queue)</text:span></text:p>
          </draw:text-box>
        </draw:frame>
        <draw:g draw:style-name="gr33" xml:id="id47" draw:id="id47">
          <draw:glue-point draw:id="4" svg:x="-1.362cm" svg:y="-5cm"/>
          <draw:glue-point draw:id="5" svg:x="-2.483cm" svg:y="-5.069cm"/>
          <draw:custom-shape draw:style-name="gr64" draw:text-style-name="P27" draw:layer="layout" svg:width="6.013cm" svg:height="4.683cm" svg:x="2.289cm" svg:y="15.417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8" draw:layer="layout" svg:width="1.556cm" svg:height="0.779cm" svg:x="2.279cm" svg:y="15.417cm">
            <text:p text:style-name="P21"><text:span text:style-name="T10">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onnector draw:style-name="gr30" draw:text-style-name="P1" draw:layer="layout" draw:type="line" svg:x1="3.857cm" svg:y1="12.4cm" svg:x2="3.795cm" svg:y2="15.417cm" draw:start-shape="id46" draw:start-glue-point="2" draw:end-shape="id47" draw:end-glue-point="5" svg:d="M3857 12400l-62 3017" svg:viewBox="0 0 63 3018">
          <text:p/>
        </draw:connector>
        <draw:frame draw:style-name="gr66" draw:text-style-name="P29" draw:layer="layout" svg:width="3.493cm" svg:height="0.725cm" svg:x="3.639cm" svg:y="15.35cm">
          <draw:text-box>
            <text:p><text:span text:style-name="T9">[wait for message]</text:span></text:p>
          </draw:text-box>
        </draw:frame>
        <draw:g draw:style-name="gr33">
          <draw:custom-shape draw:style-name="gr67" draw:text-style-name="P27" draw:layer="layout" svg:width="4.518cm" svg:height="3.317cm" svg:x="2.514cm" svg:y="16.515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8" draw:layer="layout" svg:width="1.201cm" svg:height="0.779cm" svg:x="2.505cm" svg:y="16.515cm">
            <text:p text:style-name="P21"><text:span text:style-name="T10">al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66" draw:text-style-name="P29" draw:layer="layout" svg:width="3.644cm" svg:height="0.725cm" svg:x="3.557cm" svg:y="16.502cm">
          <draw:text-box>
            <text:p><text:span text:style-name="T9">[message available]</text:span></text:p>
          </draw:text-box>
        </draw:frame>
        <draw:custom-shape draw:style-name="gr46" draw:text-style-name="P5" xml:id="id48" draw:id="id48" draw:layer="layout" svg:width="0.566cm" svg:height="1.487cm" svg:x="7.419cm" svg:y="17.393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draw:glue-point draw:id="9" svg:x="-5cm" svg:y="-0.653cm"/>
          <draw:glue-point draw:id="10" svg:x="-5cm" svg:y="-3.14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1" draw:layer="layout" draw:type="line" svg:x1="7.626cm" svg:y1="9.572cm" svg:x2="7.702cm" svg:y2="17.393cm" draw:start-shape="id45" draw:start-glue-point="2" draw:end-shape="id48" draw:end-glue-point="0" svg:d="M7626 9572l76 7821" svg:viewBox="0 0 77 7822">
          <text:p/>
        </draw:connector>
        <draw:custom-shape draw:style-name="gr69" draw:text-style-name="P25" xml:id="id49" draw:id="id49" draw:layer="layout" svg:width="0.566cm" svg:height="1.453cm" svg:x="4.096cm" svg:y="17.227cm">
          <draw:glue-point draw:id="4" svg:x="5.417cm" svg:y="-2.509cm"/>
          <draw:glue-point draw:id="5" svg:x="5cm" svg:y="2.5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30" draw:layer="layout" draw:type="line" svg:x1="7.419cm" svg:y1="18.039cm" svg:x2="4.662cm" svg:y2="17.953cm" draw:start-shape="id48" draw:start-glue-point="9" draw:end-shape="id49" draw:end-glue-point="1" svg:d="M7419 18039l-2757-86" svg:viewBox="0 0 2758 87">
          <text:p/>
        </draw:connector>
        <draw:custom-shape draw:style-name="gr71" draw:text-style-name="P5" xml:id="id44" draw:id="id44" draw:layer="layout" svg:width="0.566cm" svg:height="0.952cm" svg:x="7.301cm" svg:y="14.118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draw:glue-point draw:id="9" svg:x="-5cm" svg:y="-0.653cm"/>
          <draw:glue-point draw:id="10" svg:x="-5cm" svg:y="-3.14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31" draw:layer="layout" svg:width="1.924cm" svg:height="1.039cm" svg:x="5.127cm" svg:y="18.78cm">
          <draw:text-box>
            <text:p><text:span text:style-name="T7">process</text:span></text:p>
            <text:p><text:span text:style-name="T7">message</text:span></text:p>
          </draw:text-box>
        </draw:frame>
        <draw:frame draw:style-name="gr48" draw:text-style-name="P24" draw:layer="layout" svg:width="14.287cm" svg:height="1cm" svg:x="6.746cm" svg:y="0cm">
          <draw:text-box>
            <text:p>Messaging: Queue based message subscription</text:p>
          </draw:text-box>
        </draw:frame>
        <draw:frame draw:style-name="gr49" draw:text-style-name="P17" draw:layer="layout" svg:width="2.223cm" svg:height="1.039cm" svg:x="4.944cm" svg:y="17.006cm">
          <draw:text-box>
            <text:p><text:span text:style-name="T7">message=safe_get()</text:span></text:p>
          </draw:text-box>
        </draw:frame>
        <draw:custom-shape draw:style-name="gr73" draw:text-style-name="P25" xml:id="id50" draw:id="id50" draw:layer="layout" svg:width="0.566cm" svg:height="0.818cm" svg:x="4.075cm" svg:y="18.914cm">
          <draw:glue-point draw:id="4" svg:x="5.417cm" svg:y="-2.509cm"/>
          <draw:glue-point draw:id="5" svg:x="5cm" svg:y="2.5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xml:id="id51" draw:id="id51" draw:layer="layout" draw:type="line" svg:x1="4.358cm" svg:y1="18.914cm" svg:x2="4.358cm" svg:y2="18.914cm" draw:start-shape="id50" draw:start-glue-point="0" draw:end-shape="id50" draw:end-glue-point="0" svg:d="M4358 18914z" svg:viewBox="0 0 1 1">
          <text:p/>
        </draw:connector>
        <draw:connector draw:style-name="gr22" draw:text-style-name="P1" draw:layer="layout" svg:x1="4.662cm" svg:y1="18.316cm" svg:x2="4.641cm" svg:y2="19.118cm" draw:start-shape="id49" draw:start-glue-point="5" draw:end-shape="id50" draw:end-glue-point="4" svg:d="M4662 18316h527v802h-548" svg:viewBox="0 0 549 803">
          <text:p/>
        </draw:connector>
        <draw:connector draw:style-name="gr1" draw:text-style-name="P1" draw:layer="layout" draw:type="line" svg:x1="4.379cm" svg:y1="18.68cm" svg:x2="4.358cm" svg:y2="18.914cm" draw:start-shape="id49" draw:start-glue-point="2" draw:end-shape="id51" draw:end-glue-point="0" svg:d="M4379 18680l-21 234" svg:viewBox="0 0 22 23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k</meta:initial-creator>
    <meta:creation-date>2026-06-10T16:33:51.730017677</meta:creation-date>
    <dc:date>2026-06-19T17:25:53.287723099</dc:date>
    <dc:creator>Henk</dc:creator>
    <meta:editing-duration>PT41M39S</meta:editing-duration>
    <meta:editing-cycles>10</meta:editing-cycles>
    <meta:generator>LibreOffice/24.2.7.2$Linux_X86_64 LibreOffice_project/420$Build-2</meta:generator>
    <meta:print-date>2026-06-18T17:50:38.088677289</meta:print-date>
    <meta:printed-by>PDF files: Henk</meta:printed-by>
    <meta:document-statistic meta:object-count="159"/>
  </office:meta>
</office:document-meta>
</file>