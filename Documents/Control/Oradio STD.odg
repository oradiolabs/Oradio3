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1.26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737cm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0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2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67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fo:min-height="2.211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3.867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2.37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1.1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1.28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1.06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0.632cm" loext:decorative="false"/>
      <style:paragraph-properties style:writing-mode="lr-tb"/>
    </style:style>
    <style:style style:name="gr8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87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88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89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style:paragraph-properties fo:text-align="center"/>
      <style:text-properties fo:font-size="14pt" fo:font-style="italic" style:font-size-asian="14pt" style:font-size-complex="14pt"/>
    </style:style>
    <style:style style:name="P29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/>
      <style:text-properties fo:font-size="12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ffffff"/>
      <style:text-properties fo:font-size="8pt" style:font-size-asian="10pt" style:font-size-complex="10pt"/>
    </style:style>
    <style:style style:name="P36" style:family="paragraph">
      <loext:graphic-properties draw:fill="none" draw:fill-color="#ffffff"/>
      <style:text-properties fo:color="#000000" loext:opacity="100%" fo:font-size="8pt"/>
    </style:style>
    <style:style style:name="P37" style:family="paragraph">
      <loext:graphic-properties draw:fill="none" draw:fill-color="#ffffff"/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fo:font-weight="bold" style:font-size-asian="12pt" style:font-weight-asian="bold" style:font-size-complex="12pt" style:font-weight-complex="bold"/>
    </style:style>
    <style:style style:name="T21" style:family="text">
      <style:text-properties fo:font-size="10pt" style:font-size-asian="12pt" style:font-size-complex="12pt"/>
    </style:style>
    <style:style style:name="T22" style:family="text">
      <style:text-properties fo:font-size="14pt" fo:font-style="italic" style:font-size-asian="14pt" style:font-size-complex="14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8pt" style:font-size-asian="10pt" style:font-size-complex="10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fo:font-size="8pt" style:font-size-asian="10pt" style:font-size-complex="10pt"/>
    </style:style>
    <style:style style:name="T32" style:family="text">
      <style:text-properties fo:color="#000000" loext:opacity="100%" fo:font-size="8pt"/>
    </style:style>
    <style:style style:name="T33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Pseudo 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State</text:span></text:p>
            <text:p><text:span text:style-name="T4">Entry action</text:span><text:span text:style-name="T5">s: are executed when entering a state.</text:span></text:p>
            <text:p><text:span text:style-name="T4">Do actions</text:span><text:span text:style-name="T5">: are performed while in that state</text:span></text:p>
            <text:p><text:span text:style-name="T4">Exit actions</text:span><text:span text:style-name="T5">: are executed when leaving 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e</text:span></text:p>
              <text:p><text:span text:style-name="T8"/></text:p>
              <text:p><text:span text:style-name="T3">entry</text:span><text:span text:style-name="T6"> /action</text:span></text:p>
              <text:p><text:span text:style-name="T3">do</text:span><text:span text:style-name="T6"> /action</text:span></text:p>
              <text:p><text:span text:style-name="T3">exit</text:span><text:span text:style-name="T6"> 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e 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pseudo-state that splits an incoming transition into two or more outgoing transitions, allowing for concurrent paths. It is used to represent the beginning of parallel processes within a state 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state used to combine multiple incoming transitions into a single outgoing transition, effectively synchronizing concurrent activities. It allows the system to wait for all incoming transitions to complete before proceeding to the next 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ncurrent regions:</text:span><text:span text:style-name="T14"> represent separate areas of concern within a state, allowing for independent state transitions in each region, simultaneous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5">event:</text:span><text:span text:style-name="T7"> trigger that causes the transition.</text:span></text:p>
            <text:p><text:span text:style-name="T15">/action</text:span><text:span text:style-name="T7">: An operation executed in response to an accepted ev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mposite state</text:span><text:span text:style-name="T14">: A state that has substructure and internal behavior. It can contain one or more regions, which can contain one or more states. The state diagrams are executed in par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ckage</text:span></text:p>
          </draw:text-box>
        </draw:frame>
      </draw:page>
      <draw:page draw:name="page2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radioMai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BOOT</text:span></text:p>
          <text:p text:style-name="P20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tartup</text:span></text:p>
          </draw:text-box>
        </draw:frame>
        <draw:rect draw:style-name="gr24" draw:text-style-name="P2" xml:id="id22" draw:id="id22" draw:layer="layout" svg:width="4.829cm" svg:height="2.54cm" svg:x="13.001cm" svg:y="17.0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7.1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04cm" svg:height="1.072cm" svg:x="1.06cm" svg:y="5.797cm">
            <draw:text-box>
              <text:p text:style-name="P10"><text:span text:style-name="T19">MainControl</text:span></text:p>
            </draw:text-box>
          </draw:frame>
          <draw:rect draw:style-name="gr24" draw:text-style-name="P25" draw:layer="layout" svg:width="19.04cm" svg:height="22.417cm" svg:x="1cm" svg:y="5.888cm" draw:corner-radius="0.5cm">
            <text:p/>
          </draw:rect>
          <draw:line draw:style-name="gr52" draw:text-style-name="P2" draw:layer="layout" svg:x1="1.004cm" svg:y1="6.732cm" svg:x2="20.031cm" svg:y2="6.723cm">
            <text:p/>
          </draw:line>
        </draw:g>
        <draw:rect draw:style-name="gr24" draw:text-style-name="P2" xml:id="id16" draw:id="id16" draw:layer="layout" svg:width="7.285cm" svg:height="2.54cm" svg:x="2.305cm" svg:y="9.6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6.35cm" svg:height="1.512cm" svg:x="2.805cm" svg:y="10.333cm">
          <draw:text-box>
            <text:p><text:span text:style-name="T20">Entry</text:span><text:span text:style-name="T21"> /checkMsgQueue()</text:span></text:p>
            <text:p><text:span text:style-name="T20">Do</text:span><text:span text:style-name="T21"> [queue.not_empty]/ processMsg()</text:span></text:p>
            <text:p><text:span text:style-name="T20">Exit</text:span><text:span text:style-name="T21"> [queue.emtpy/ loopback()</text:span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64cm">
          <draw:text-box>
            <text:p><text:span text:style-name="T18">CheckingQueue</text:span></text:p>
          </draw:text-box>
        </draw:frame>
        <draw:connector draw:style-name="gr55" draw:text-style-name="P2" draw:layer="layout" draw:line-skew="0.651cm -8.239cm -0.837cm" svg:x1="4.041cm" svg:y1="12.18cm" svg:x2="3.691cm" svg:y2="9.64cm" draw:start-shape="id16" draw:start-glue-point="6" draw:end-shape="id16" draw:end-glue-point="9" svg:d="M4041 12180v1152h-2189v-5030h1839v1338" svg:viewBox="0 0 2190 5031">
          <text:p/>
        </draw:connector>
        <draw:frame draw:style-name="gr56" draw:text-style-name="P27" draw:layer="layout" svg:width="3.175cm" svg:height="0.953cm" svg:x="1.635cm" svg:y="7.667cm">
          <draw:text-box>
            <text:p><text:span text:style-name="T21">queueEmpty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54cm" svg:x="11.18cm" svg:y="21.5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1.662cm">
          <draw:text-box>
            <text:p><text:span text:style-name="T18">MpdPlaying</text:span></text:p>
          </draw:text-box>
        </draw:frame>
        <draw:rect draw:style-name="gr24" draw:text-style-name="P2" xml:id="id24" draw:id="id24" draw:layer="layout" svg:width="4.829cm" svg:height="2.54cm" svg:x="13.482cm" svg:y="24.8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4.93cm">
          <draw:text-box>
            <text:p><text:span text:style-name="T18">SpotifyPlaying</text:span></text:p>
          </draw:text-box>
        </draw:frame>
        <draw:frame draw:style-name="gr58" draw:text-style-name="P14" draw:layer="layout" svg:width="4.728cm" svg:height="0.987cm" svg:x="5.762cm" svg:y="22.89cm">
          <draw:text-box>
            <text:p><text:span text:style-name="T11">[not wifiConnected]</text:span></text:p>
            <text:p><text:span text:style-name="T11">/playSound(SOUND_NO_WIFI)</text:span></text:p>
          </draw:text-box>
        </draw:frame>
        <draw:connector draw:style-name="gr59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60" draw:text-style-name="P29" draw:layer="layout" svg:width="7.62cm" svg:height="2.223cm" svg:x="1.952cm" svg:y="25.447cm">
          <text:p text:style-name="P28"><text:span text:style-name="T22">Th</text:span><text:span text:style-name="T22">e </text:span><text:span text:style-name="T22">Ch</text:span><text:span text:style-name="T22">eck</text:span><text:span text:style-name="T22">ing</text:span><text:span text:style-name="T22">Qu</text:span><text:span text:style-name="T22">eu</text:span><text:span text:style-name="T22">e </text:span><text:span text:style-name="T22">sta</text:span><text:span text:style-name="T22">te </text:span><text:span text:style-name="T22">an</text:span><text:span text:style-name="T22">d </text:span><text:span text:style-name="T22">Or</text:span><text:span text:style-name="T22">adi</text:span><text:span text:style-name="T22">oC</text:span><text:span text:style-name="T22">ont</text:span><text:span text:style-name="T22">rol </text:span><text:span text:style-name="T22">co</text:span><text:span text:style-name="T22">mp</text:span><text:span text:style-name="T22">osit</text:span><text:span text:style-name="T22">e </text:span><text:span text:style-name="T22">sta</text:span><text:span text:style-name="T22">te </text:span><text:span text:style-name="T22">are </text:span><text:span text:style-name="T22">co</text:span><text:span text:style-name="T22">nc</text:span><text:span text:style-name="T22">urr</text:span><text:span text:style-name="T22">ent </text:span><text:span text:style-name="T22">reg</text:span><text:span text:style-name="T22">ion</text:span><text:span text:style-name="T22">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1.477cm" svg:y="9.8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2.43cm" svg:y="9.89cm">
          <draw:text-box>
            <text:p><text:span text:style-name="T18">OradioCreation</text:span></text:p>
          </draw:text-box>
        </draw:frame>
        <draw:line draw:style-name="gr61" draw:text-style-name="P2" draw:layer="layout" svg:x1="10.207cm" svg:y1="6.715cm" svg:x2="10.207cm" svg:y2="28.305cm">
          <text:p/>
        </draw:line>
        <draw:connector draw:style-name="gr62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9" draw:text-style-name="P2" draw:layer="layout" svg:x1="16.287cm" svg:y1="15.922cm" svg:x2="16.907cm" svg:y2="17.025cm" draw:start-shape="id21" draw:start-glue-point="5" draw:end-shape="id22" draw:end-glue-point="7" svg:d="M16287 15922v552h620v551" svg:viewBox="0 0 621 1104">
          <text:p/>
        </draw:connector>
        <draw:connector draw:style-name="gr59" draw:text-style-name="P2" draw:layer="layout" svg:x1="14.152cm" svg:y1="19.565cm" svg:x2="13.594cm" svg:y2="21.522cm" draw:start-shape="id22" draw:start-glue-point="6" draw:end-shape="id23" draw:end-glue-point="0" svg:d="M14152 19565v979h-558v978" svg:viewBox="0 0 559 1958">
          <text:p/>
        </draw:connector>
        <draw:connector draw:style-name="gr59" draw:text-style-name="P2" draw:layer="layout" svg:x1="17.007cm" svg:y1="19.565cm" svg:x2="17.388cm" svg:y2="24.86cm" draw:start-shape="id22" draw:start-glue-point="4" draw:end-shape="id24" draw:end-glue-point="7" svg:d="M17007 19565v2648h381v2647" svg:viewBox="0 0 382 5296">
          <text:p/>
        </draw:connector>
        <draw:connector draw:style-name="gr59" draw:text-style-name="P2" draw:layer="layout" svg:x1="16.009cm" svg:y1="23.443cm" svg:x2="15.821cm" svg:y2="19.565cm" draw:start-shape="id23" draw:start-glue-point="8" draw:end-shape="id22" draw:end-glue-point="10" svg:d="M16009 23443h501v-2899h-689v-979" svg:viewBox="0 0 690 3879">
          <text:p/>
        </draw:connector>
        <draw:connector draw:style-name="gr59" draw:text-style-name="P2" draw:layer="layout" svg:x1="18.311cm" svg:y1="26.781cm" svg:x2="17.83cm" svg:y2="18.946cm" draw:start-shape="id24" draw:start-glue-point="8" draw:end-shape="id22" draw:end-glue-point="8" svg:d="M18311 26781h501v-7835h-982" svg:viewBox="0 0 983 7836">
          <text:p/>
        </draw:connector>
        <draw:frame draw:style-name="gr63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startOradioControl</text:span></text:p>
          </draw:text-box>
        </draw:frame>
        <draw:custom-shape draw:style-name="gr25" draw:text-style-name="P1" xml:id="id25" draw:id="id25" draw:layer="layout" svg:width="0.4cm" svg:height="0.4cm" svg:x="17.186cm" svg:y="8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17.186cm" svg:y1="9.158cm" svg:x2="14.334cm" svg:y2="9.875cm" draw:start-shape="id25" draw:start-glue-point="6" draw:end-shape="id26" draw:end-glue-point="0" svg:d="M17186 9158h-2852v717" svg:viewBox="0 0 2853 718">
          <text:p/>
        </draw:connector>
        <draw:frame draw:style-name="gr51" draw:text-style-name="P9" draw:layer="layout" svg:width="1.588cm" svg:height="0.725cm" svg:x="17.8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5.07cm" svg:height="2.54cm" svg:x="12.747cm" svg:y="13.3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5" draw:text-style-name="P22" draw:layer="layout" svg:width="3.8cm" svg:height="1.673cm" svg:x="12.855cm" svg:y="14.0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175cm" svg:height="0.725cm" svg:x="13.482cm" svg:y="13.51cm">
          <draw:text-box>
            <text:p><text:span text:style-name="T18">MpdCreation</text:span></text:p>
          </draw:text-box>
        </draw:frame>
        <draw:frame draw:style-name="gr65" draw:text-style-name="P22" draw:layer="layout" svg:width="3.8cm" svg:height="1.673cm" svg:x="13.075cm" svg:y="17.6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1.387cm" svg:y="22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3.61cm" svg:y="25.4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9" draw:text-style-name="P2" draw:layer="layout" svg:x1="15.467cm" svg:y1="12.112cm" svg:x2="16.849cm" svg:y2="13.382cm" draw:start-shape="id26" draw:start-glue-point="5" draw:end-shape="id21" draw:end-glue-point="7" svg:d="M15467 12112v635h1382v635" svg:viewBox="0 0 1383 1271">
          <text:p/>
        </draw:connector>
        <draw:frame draw:style-name="gr65" draw:text-style-name="P22" draw:layer="layout" svg:width="3.8cm" svg:height="1.673cm" svg:x="11.712cm" svg:y="10.42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1" draw:text-style-name="P2" draw:layer="layout" svg:x1="1.418cm" svg:y1="15.875cm" svg:x2="10.207cm" svg:y2="15.875cm">
          <text:p/>
        </draw:line>
        <draw:rect draw:style-name="gr24" draw:text-style-name="P2" xml:id="id28" draw:id="id28" draw:layer="layout" svg:width="6.067cm" svg:height="3.07cm" svg:x="1.635cm" svg:y="18.56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51" draw:text-style-name="P23" draw:layer="layout" svg:width="3.876cm" svg:height="0.725cm" svg:x="2.874cm" svg:y="18.712cm">
          <draw:text-box>
            <text:p><text:span text:style-name="T18">OradioApActive</text:span></text:p>
          </draw:text-box>
        </draw:frame>
        <draw:frame draw:style-name="gr66" draw:text-style-name="P22" draw:layer="layout" svg:width="6.35cm" svg:height="2.147cm" svg:x="1.552cm" svg:y="19.273cm">
          <draw:text-box>
            <text:p><text:span text:style-name="T3">Entry</text:span><text:span text:style-name="T6"> </text:span><text:span text:style-name="T14">/checkOradioAPactive();</text:span></text:p>
            <text:p><text:span text:style-name="T14"><text:tab/></text:span><text:span text:style-name="T14">start_ledPlay_flashing()</text:span></text:p>
            <text:p><text:span text:style-name="T3">Do</text:span><text:span text:style-name="T6"> </text:span><text:span text:style-name="T14">/WaitForWifiMessage()</text:span></text:p>
            <text:p><text:span text:style-name="T3">Exit</text:span><text:span text:style-name="T6"> </text:span><text:span text:style-name="T14">/stop_ledPlay_flashing()</text:span></text:p>
          </draw:text-box>
        </draw:frame>
        <draw:custom-shape draw:style-name="gr25" draw:text-style-name="P1" draw:layer="layout" svg:width="0.4cm" svg:height="0.4cm" svg:x="17.187cm" svg:y="8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7.785cm" svg:y1="7.432cm" svg:x2="8.198cm" svg:y2="9.64cm" draw:start-shape="id27" draw:start-glue-point="8" draw:end-shape="id16" draw:end-glue-point="7" svg:d="M7785 7432v1105h413v1103" svg:viewBox="0 0 414 2209">
          <text:p/>
        </draw:connector>
        <draw:g draw:style-name="gr1">
          <draw:custom-shape draw:style-name="gr67" draw:text-style-name="P30" draw:layer="layout" svg:width="0.717cm" svg:height="0.718cm" svg:x="18.7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859cm" svg:y1="15.608cm" svg:x2="19.42cm" svg:y2="16.17cm">
              <text:p/>
            </draw:line>
            <draw:line draw:style-name="gr57" draw:text-style-name="P2" draw:layer="layout" svg:x1="19.414cm" svg:y1="15.588cm" svg:x2="18.83cm" svg:y2="16.171cm">
              <text:p/>
            </draw:line>
          </draw:g>
        </draw:g>
        <draw:g draw:style-name="gr1" xml:id="id30" draw:id="id30">
          <draw:custom-shape draw:style-name="gr67" draw:text-style-name="P30" draw:layer="layout" svg:width="0.717cm" svg:height="0.718cm" svg:x="9.155cm" svg:y="13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785cm" svg:x2="9.795cm" svg:y2="14.347cm">
              <text:p/>
            </draw:line>
            <draw:line draw:style-name="gr57" draw:text-style-name="P2" draw:layer="layout" svg:x1="9.789cm" svg:y1="13.765cm" svg:x2="9.205cm" svg:y2="14.348cm">
              <text:p/>
            </draw:line>
          </draw:g>
        </draw:g>
        <draw:frame draw:style-name="gr51" draw:text-style-name="P9" draw:layer="layout" svg:width="1.588cm" svg:height="0.725cm" svg:x="8.619cm" svg:y="14.652cm">
          <draw:text-box>
            <text:p><text:span text:style-name="T7">Error</text:span></text:p>
          </draw:text-box>
        </draw:frame>
        <draw:connector draw:style-name="gr64" draw:text-style-name="P2" draw:layer="layout" svg:x1="7.056cm" svg:y1="16.248cm" svg:x2="4.668cm" svg:y2="18.567cm" draw:end-shape="id28" draw:end-glue-point="0" svg:d="M7056 16248v909h-2388v1410" svg:viewBox="0 0 2389 2320">
          <text:p/>
        </draw:connector>
        <draw:connector draw:style-name="gr64" draw:text-style-name="P2" draw:layer="layout" svg:x1="6.668cm" svg:y1="21.637cm" svg:x2="5.245cm" svg:y2="22.97cm" draw:start-shape="id28" draw:start-glue-point="4" draw:end-shape="id29" draw:end-glue-point="1" svg:d="M6668 21637v1333h-1423" svg:viewBox="0 0 1424 1334">
          <text:p/>
        </draw:connector>
        <draw:connector draw:style-name="gr64" draw:text-style-name="P2" draw:layer="layout" svg:x1="3.081cm" svg:y1="21.637cm" svg:x2="4.645cm" svg:y2="22.97cm" draw:start-shape="id28" draw:start-glue-point="6" draw:end-shape="id29" draw:end-glue-point="3" svg:d="M3081 21637v1333h1564" svg:viewBox="0 0 1565 1334">
          <text:p/>
        </draw:connector>
        <draw:frame draw:style-name="gr68" draw:text-style-name="P14" draw:layer="layout" svg:width="4.493cm" svg:height="1.039cm" svg:x="0.782cm" svg:y="22.69cm">
          <draw:text-box>
            <text:p><text:span text:style-name="T11">[wifiConnected]</text:span></text:p>
            <text:p><text:span text:style-name="T11">/playSound(SOUND_WIFI)</text:span></text:p>
          </draw:text-box>
        </draw:frame>
        <draw:g draw:style-name="gr39" xml:id="id29" draw:id="id29">
          <draw:custom-shape draw:style-name="gr26" draw:text-style-name="P1" draw:layer="layout" svg:width="0.4cm" svg:height="0.4cm" svg:x="4.745cm" svg:y="22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4.645cm" svg:y="22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14" draw:layer="layout" svg:width="3.493cm" svg:height="1.039cm" svg:x="4.005cm" svg:y="16.14cm">
          <draw:text-box>
            <text:p><text:span text:style-name="T11">LongPressPlay</text:span></text:p>
            <text:p><text:span text:style-name="T11">/startOradioAP</text:span></text:p>
          </draw:text-box>
        </draw:frame>
        <draw:line draw:style-name="gr61" draw:text-style-name="P2" draw:layer="layout" svg:x1="1.419cm" svg:y1="25.075cm" svg:x2="10.208cm" svg:y2="25.075cm">
          <text:p/>
        </draw:line>
        <draw:connector draw:style-name="gr64" draw:text-style-name="P2" draw:layer="layout" svg:x1="8.349cm" svg:y1="12.18cm" svg:x2="9.155cm" svg:y2="14.058cm" draw:start-shape="id16" draw:start-glue-point="4" draw:end-shape="id30" draw:end-glue-point="3" svg:d="M8349 12180v1878h806" svg:viewBox="0 0 807 1879">
          <text:p/>
        </draw:connector>
        <draw:connector draw:style-name="gr64" draw:text-style-name="P2" draw:layer="layout" svg:x1="7.702cm" svg:y1="20.102cm" svg:x2="9.613cm" svg:y2="21.955cm" draw:start-shape="id28" draw:start-glue-point="1" draw:end-shape="id31" draw:end-glue-point="0" svg:d="M7702 20102h1911v1853" svg:viewBox="0 0 1912 1854">
          <text:p/>
        </draw:connector>
        <draw:frame draw:style-name="gr69" draw:text-style-name="P14" draw:layer="layout" svg:width="3.175cm" svg:height="1.587cm" svg:x="7.75cm" svg:y="18.563cm">
          <draw:text-box>
            <text:p><text:span text:style-name="T11">timeOut</text:span></text:p>
            <text:p><text:span text:style-name="T11">/playSound()</text:span></text:p>
            <text:p><text:span text:style-name="T11">/gotoError()</text:span></text:p>
          </draw:text-box>
        </draw:frame>
        <draw:g draw:style-name="gr1" xml:id="id31" draw:id="id31">
          <draw:custom-shape draw:style-name="gr67" draw:text-style-name="P30" draw:layer="layout" svg:width="0.717cm" svg:height="0.718cm" svg:x="9.255cm" svg:y="21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34cm" svg:y1="22.041cm" svg:x2="9.895cm" svg:y2="22.603cm">
              <text:p/>
            </draw:line>
            <draw:line draw:style-name="gr57" draw:text-style-name="P2" draw:layer="layout" svg:x1="9.889cm" svg:y1="22.021cm" svg:x2="9.305cm" svg:y2="22.604cm">
              <text:p/>
            </draw:line>
          </draw:g>
        </draw:g>
      </draw:page>
      <draw:page draw:name="page3" draw:style-name="dp1" draw:master-page-name="Default">
        <draw:rect draw:style-name="gr24" draw:text-style-name="P2" xml:id="id33" draw:id="id33" draw:layer="layout" svg:width="10.16cm" svg:height="2.54cm" svg:x="4.175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draw:glue-point draw:id="13" svg:x="-4.119cm" svg:y="5.003cm"/>
          <text:p/>
        </draw:rect>
        <draw:frame draw:style-name="gr70" draw:text-style-name="P31" draw:layer="layout" svg:width="9.842cm" svg:height="2.09cm" svg:x="4.71cm" svg:y="14.367cm">
          <draw:text-box>
            <text:p><text:span text:style-name="T3">Entry</text:span><text:span text:style-name="T23"> </text:span><text:span text:style-name="T23">/playSound(</text:span><text:span text:style-name="T23">SOUND_ST</text:span><text:span text:style-name="T23">OP); </text:span><text:span text:style-name="T23">setLed(LED_</text:span><text:span text:style-name="T23">STOP); </text:span><text:span text:style-name="T23">stopPlayers()</text:span></text:p>
            <text:p><text:span text:style-name="T3">do</text:span><text:span text:style-name="T6"> </text:span><text:span text:style-name="T23">/ </text:span><text:span text:style-name="T23">waitForButto</text:span><text:span text:style-name="T23">nPressed()</text:span></text:p>
            <text:p><text:span text:style-name="T3">exit</text:span><text:span text:style-name="T6"> / </text:span><text:span text:style-name="T23">on </text:span><text:span text:style-name="T23">usbAbsent </text:span><text:span text:style-name="T23">raise </text:span><text:span text:style-name="T23">criticalError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6.715cm" svg:y="13.927cm">
          <draw:text-box>
            <text:p><text:span text:style-name="T18">Sta</text:span><text:span text:style-name="T18">ndb</text:span><text:span text:style-name="T18">y</text:span></text:p>
          </draw:text-box>
        </draw:frame>
        <draw:g draw:style-name="gr4">
          <draw:frame draw:style-name="gr23" draw:text-style-name="P24" draw:layer="layout" svg:width="19.154cm" svg:height="1.774cm" svg:x="0.682cm" svg:y="1.09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19.154cm" svg:height="28.257cm" svg:x="0.846cm" svg:y="1cm" draw:corner-radius="0.5cm">
            <draw:glue-point draw:id="4" svg:x="-3.688cm" svg:y="-5.004cm"/>
            <text:p/>
          </draw:rect>
          <draw:line draw:style-name="gr10" draw:text-style-name="P2" draw:layer="layout" svg:x1="0.851cm" svg:y1="2.027cm" svg:x2="19.993cm" svg:y2="2.017cm">
            <text:p/>
          </draw:line>
        </draw:g>
        <draw:rect draw:style-name="gr24" draw:text-style-name="P2" xml:id="id34" draw:id="id34" draw:layer="layout" svg:width="5.059cm" svg:height="2.54cm" svg:x="10.681cm" svg:y="21.7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draw:glue-point draw:id="13" svg:x="-1.097cm" svg:y="4.874cm"/>
          <draw:glue-point draw:id="14" svg:x="0.873cm" svg:y="4.874cm"/>
          <draw:glue-point draw:id="15" svg:x="4.162cm" svg:y="4.874cm"/>
          <draw:glue-point draw:id="16" svg:x="-5cm" svg:y="-2.625cm"/>
          <draw:glue-point draw:id="17" svg:x="-3.425cm" svg:y="4.874cm"/>
          <draw:glue-point draw:id="18" svg:x="1.595cm" svg:y="-5.003cm"/>
          <text:p/>
        </draw:rect>
        <draw:frame draw:style-name="gr71" draw:text-style-name="P22" draw:layer="layout" svg:width="4.545cm" svg:height="1.991cm" svg:x="10.742cm" svg:y="22.29cm">
          <draw:text-box>
            <text:p><text:span text:style-name="T3">ent</text:span><text:span text:style-name="T3">ry</text:span><text:span text:style-name="T6"> /</text:span></text:p>
            <text:p><text:span text:style-name="T3">do</text:span><text:span text:style-name="T6"> /</text:span></text:p>
            <text:p text:style-name="P32"><text:span text:style-name="T24">exit</text:span><text:span text:style-name="T25"> </text:span><text:span text:style-name="T25">/</text:span><text:span text:style-name="T23">on </text:span><text:span text:style-name="T23">usbA</text:span><text:span text:style-name="T23">bsent </text:span></text:p>
            <text:p text:style-name="P32"><text:span text:style-name="T23"><text:s text:c="10"/></text:span><text:span text:style-name="T23"><text:s text:c="5"/></text:span><text:span text:style-name="T23">raise </text:span><text:span text:style-name="T23">critica</text:span><text:span text:style-name="T23">lError</text:span></text:p>
          </draw:text-box>
        </draw:frame>
        <draw:frame draw:style-name="gr54" draw:text-style-name="P23" draw:layer="layout" svg:width="3.175cm" svg:height="0.952cm" svg:x="11.795cm" svg:y="21.755cm">
          <draw:text-box>
            <text:p><text:span text:style-name="T18">MpdPl</text:span><text:span text:style-name="T18">aying</text:span></text:p>
          </draw:text-box>
        </draw:frame>
        <draw:rect draw:style-name="gr24" draw:text-style-name="P2" xml:id="id36" draw:id="id36" draw:layer="layout" svg:width="6.668cm" svg:height="2.54cm" svg:x="2.587cm" svg:y="23.9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draw:glue-point draw:id="14" svg:x="1.574cm" svg:y="-5.003cm"/>
          <text:p/>
        </draw:rect>
        <draw:frame draw:style-name="gr72" draw:text-style-name="P33" draw:layer="layout" svg:width="6.433cm" svg:height="2.461cm" svg:x="2.822cm" svg:y="24.252cm">
          <draw:text-box>
            <text:p text:style-name="P32"><text:span text:style-name="T24">entry</text:span><text:span text:style-name="T25"> </text:span><text:span text:style-name="T26">/</text:span><text:span text:style-name="T23">playSound(SOUND_SP</text:span><text:span text:style-name="T23">OTIFY);</text:span></text:p>
            <text:p text:style-name="P32"><text:span text:style-name="T23">setLed(LED_PLAY)</text:span></text:p>
            <text:p><text:span text:style-name="T3">do</text:span><text:span text:style-name="T6"> /</text:span></text:p>
            <text:p text:style-name="P32"><text:span text:style-name="T24">exit</text:span><text:span text:style-name="T25"> / </text:span><text:span text:style-name="T23">on usbAbsent </text:span><text:span text:style-name="T23">raise criticalError</text:span></text:p>
            <text:p text:style-name="P32"><text:span text:style-name="T23">if not isSpotifyConnected </text:span><text:span text:style-name="T23">raise ButtonStop</text:span></text:p>
          </draw:text-box>
        </draw:frame>
        <draw:frame draw:style-name="gr54" draw:text-style-name="P23" draw:layer="layout" svg:width="3.523cm" svg:height="0.952cm" svg:x="3.222cm" svg:y="23.86cm">
          <draw:text-box>
            <text:p><text:span text:style-name="T18">SpotifyPlaying</text:span></text:p>
          </draw:text-box>
        </draw:frame>
        <draw:rect draw:style-name="gr24" draw:text-style-name="P2" xml:id="id38" draw:id="id38" draw:layer="layout" svg:width="10.16cm" svg:height="4.226cm" svg:x="3.54cm" svg:y="3.4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73" draw:text-style-name="P22" draw:layer="layout" svg:width="8.137cm" svg:height="4.117cm" svg:x="4.123cm" svg:y="3.785cm">
          <draw:text-box>
            <text:p><text:span text:style-name="T3">Entry</text:span><text:span text:style-name="T6"> / </text:span><text:span text:style-name="T14">setLed(LED_STOP)</text:span></text:p>
            <text:p text:style-name="P34"><text:span text:style-name="T3">Do</text:span><text:span text:style-name="T6"> /</text:span></text:p>
            <text:p text:style-name="P34"><text:span text:style-name="T23">shared_q = new Queue(); Create new instances for:</text:span></text:p>
            <text:p text:style-name="P34"><text:span text:style-name="T23">USBService(shared_q); SpotifyConnect(shared_q); </text:span></text:p>
            <text:p text:style-name="P34"><text:span text:style-name="T23">Backlighting(); MPDMonitor(); MPDControl();</text:span></text:p>
            <text:p text:style-name="P34"><text:span text:style-name="T23">PowerSupplyService(); LEDControl(); RMService(); </text:span></text:p>
            <text:p text:style-name="P34"><text:span text:style-name="T23">TouchButtons(shared_q); VolumeControl(shared_q);</text:span></text:p>
            <text:p text:style-name="P34"><text:span text:style-name="T23">WebService(shared_q)</text:span></text:p>
            <text:p><text:span text:style-name="T3">exit</text:span><text:span text:style-name="T6"> </text:span><text:span text:style-name="T23">/if creationFailed then raise criticalError </text:span></text:p>
            <text:p><text:span text:style-name="T23"><text:tab/></text:span><text:span text:style-name="T23">else raise creationDone</text:span></text:p>
          </draw:text-box>
        </draw:frame>
        <draw:frame draw:style-name="gr51" draw:text-style-name="P23" draw:layer="layout" svg:width="3.876cm" svg:height="0.725cm" svg:x="6.632cm" svg:y="3.367cm">
          <draw:text-box>
            <text:p><text:span text:style-name="T18">OradioCreation</text:span></text:p>
          </draw:text-box>
        </draw:frame>
        <draw:connector draw:style-name="gr59" draw:text-style-name="P2" draw:layer="layout" svg:x1="10.127cm" svg:y1="12.512cm" svg:x2="9.255cm" svg:y2="13.825cm" draw:start-shape="id32" draw:start-glue-point="5" draw:end-shape="id33" draw:end-glue-point="0" svg:d="M10127 12512v657h-872v656" svg:viewBox="0 0 873 1314">
          <text:p/>
        </draw:connector>
        <draw:connector draw:style-name="gr59" draw:text-style-name="P2" draw:layer="layout" svg:x1="13.21cm" svg:y1="21.722cm" svg:x2="12.605cm" svg:y2="16.365cm" draw:start-shape="id34" draw:start-glue-point="0" draw:end-shape="id33" draw:end-glue-point="4" svg:d="M13210 21722v-2678h-605v-2679" svg:viewBox="0 0 606 5358">
          <text:p/>
        </draw:connector>
        <draw:connector draw:style-name="gr59" draw:text-style-name="P2" draw:layer="layout" svg:x1="8.341cm" svg:y1="18.27cm" svg:x2="4.914cm" svg:y2="23.96cm" draw:start-shape="id35" draw:start-glue-point="5" draw:end-shape="id36" draw:end-glue-point="10" svg:d="M8341 18270h-3427v5690" svg:viewBox="0 0 3428 5691">
          <text:p/>
        </draw:connector>
        <draw:connector draw:style-name="gr59" draw:text-style-name="P2" draw:layer="layout" svg:x1="8.941cm" svg:y1="18.27cm" svg:x2="11.93cm" svg:y2="21.722cm" draw:start-shape="id35" draw:start-glue-point="7" draw:end-shape="id34" draw:end-glue-point="10" svg:d="M8941 18270h2989v3452" svg:viewBox="0 0 2990 3453">
          <text:p/>
        </draw:connector>
        <draw:connector draw:style-name="gr59" draw:text-style-name="P2" draw:layer="layout" draw:line-skew="0cm -1.087cm" svg:x1="4.037cm" svg:y1="23.96cm" svg:x2="4.175cm" svg:y2="15.095cm" draw:start-shape="id36" draw:start-glue-point="9" draw:end-shape="id33" draw:end-glue-point="3" svg:d="M4037 23960v-3797h-1450v-5068h1588" svg:viewBox="0 0 1589 8866">
          <text:p/>
        </draw:connector>
        <draw:custom-shape draw:style-name="gr25" draw:text-style-name="P1" xml:id="id37" draw:id="id37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draw:line-skew="-0.295cm" svg:x1="13.212cm" svg:y1="2.657cm" svg:x2="8.62cm" svg:y2="3.441cm" draw:start-shape="id37" draw:start-glue-point="8" draw:end-shape="id38" draw:end-glue-point="0" svg:d="M13212 2657v98h-4592v686" svg:viewBox="0 0 4593 785">
          <text:p/>
        </draw:connector>
        <draw:rect draw:style-name="gr24" draw:text-style-name="P2" xml:id="id32" draw:id="id32" draw:layer="layout" svg:width="8.525cm" svg:height="2.857cm" svg:x="4.175cm" svg:y="9.65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74" draw:text-style-name="P22" draw:layer="layout" svg:width="7.303cm" svg:height="2.627cm" svg:x="4.627cm" svg:y="9.89cm">
          <draw:text-box>
            <text:p><text:span text:style-name="T3">Entry</text:span><text:span text:style-name="T6"> /</text:span></text:p>
            <text:p><text:span text:style-name="T3">Do</text:span><text:span text:style-name="T6"> </text:span><text:span text:style-name="T14">/ </text:span><text:span text:style-name="T23">waitForUsbMessage()</text:span></text:p>
            <text:p><text:span text:style-name="T24">Exit</text:span><text:span text:style-name="T25"> </text:span></text:p>
            <text:p text:style-name="P32"><text:span text:style-name="T23">=&gt; On usbPresent raise </text:span><text:span text:style-name="T23">mpdCreationDone</text:span></text:p>
            <text:p text:style-name="P32"><text:span text:style-name="T23">=&gt; On usbAbsent raise </text:span><text:span text:style-name="T23">criticalError</text:span></text:p>
          </draw:text-box>
        </draw:frame>
        <draw:frame draw:style-name="gr75" draw:text-style-name="P23" draw:layer="layout" svg:width="3.175cm" svg:height="1.36cm" svg:x="6.985cm" svg:y="9.655cm">
          <draw:text-box>
            <text:p><text:span text:style-name="T18">MpdCreation</text:span></text:p>
          </draw:text-box>
        </draw:frame>
        <draw:connector draw:style-name="gr59" draw:text-style-name="P2" draw:layer="layout" svg:x1="10.634cm" svg:y1="7.667cm" svg:x2="11.072cm" svg:y2="9.655cm" draw:start-shape="id38" draw:start-glue-point="5" draw:end-shape="id32" draw:end-glue-point="7" svg:d="M10634 7667v994h438v994" svg:viewBox="0 0 439 1989">
          <text:p/>
        </draw:connector>
        <draw:frame draw:style-name="gr54" draw:text-style-name="P14" draw:layer="layout" svg:width="3.492cm" svg:height="0.952cm" svg:x="7.28cm" svg:y="8.485cm">
          <draw:text-box>
            <text:p><text:span text:style-name="T11">creatio</text:span><text:span text:style-name="T11">nDone</text:span></text:p>
            <text:p><text:span text:style-name="T11">/</text:span><text:span text:style-name="T11">start_m</text:span><text:span text:style-name="T11">pd_</text:span><text:span text:style-name="T27">cre</text:span><text:span text:style-name="T27">ation</text:span><text:span text:style-name="T11">()</text:span></text:p>
          </draw:text-box>
        </draw:frame>
        <draw:frame draw:style-name="gr46" draw:text-style-name="P18" draw:layer="layout" svg:width="1.822cm" svg:height="0.806cm" svg:x="16.958cm" svg:y="11.477cm">
          <draw:text-box>
            <text:p><text:span text:style-name="T16">Err</text:span><text:span text:style-name="T16">or</text:span></text:p>
          </draw:text-box>
        </draw:frame>
        <draw:connector draw:style-name="gr59" draw:text-style-name="P2" draw:layer="layout" svg:x1="13.7cm" svg:y1="6.638cm" svg:x2="18.773cm" svg:y2="12.112cm" draw:start-shape="id38" draw:start-glue-point="8" draw:end-shape="id39" draw:end-glue-point="0" svg:d="M13700 6638h5073v5474" svg:viewBox="0 0 5074 5475">
          <text:p/>
        </draw:connector>
        <draw:connector draw:style-name="gr59" draw:text-style-name="P2" draw:layer="layout" svg:x1="12.7cm" svg:y1="11.816cm" svg:x2="18.415cm" svg:y2="12.471cm" draw:start-shape="id32" draw:start-glue-point="8" draw:end-shape="id39" svg:d="M12700 11816h2845v655h2870" svg:viewBox="0 0 5716 656">
          <text:p/>
        </draw:connector>
        <draw:frame draw:style-name="gr29" draw:text-style-name="P14" draw:layer="layout" svg:width="3.175cm" svg:height="0.887cm" svg:x="10.215cm" svg:y="12.601cm">
          <draw:text-box>
            <text:p><text:span text:style-name="T11">mpdCreationDone</text:span></text:p>
            <text:p><text:span text:style-name="T11">/goto_standby()</text:span></text:p>
          </draw:text-box>
        </draw:frame>
        <draw:connector draw:style-name="gr59" draw:text-style-name="P2" draw:layer="layout" svg:x1="14.335cm" svg:y1="14.653cm" svg:x2="18.773cm" svg:y2="12.83cm" draw:start-shape="id33" draw:start-glue-point="11" draw:end-shape="id39" draw:end-glue-point="2" svg:d="M14335 14653h4438v-1823" svg:viewBox="0 0 4439 1824">
          <text:p/>
        </draw:connector>
        <draw:connector draw:style-name="gr59" draw:text-style-name="P2" draw:layer="layout" draw:line-skew="0.612cm" svg:x1="15.74cm" svg:y1="23.643cm" svg:x2="19.572cm" svg:y2="25.231cm" draw:start-shape="id34" draw:start-glue-point="8" draw:end-shape="id40" draw:end-glue-point="2" svg:d="M15740 23643h2336v2114h1496v-526" svg:viewBox="0 0 3833 2115">
          <text:p/>
        </draw:connector>
        <draw:connector draw:style-name="gr59" draw:text-style-name="P2" draw:layer="layout" draw:line-skew="1.939cm" svg:x1="4.176cm" svg:y1="26.5cm" svg:x2="19.572cm" svg:y2="25.231cm" draw:start-shape="id36" draw:start-glue-point="6" draw:end-shape="id40" draw:end-glue-point="2" svg:d="M4176 26500v2440h15396v-3709" svg:viewBox="0 0 15397 3710">
          <text:p/>
        </draw:connector>
        <draw:frame draw:style-name="gr76" draw:text-style-name="P14" draw:layer="layout" svg:width="4.763cm" svg:height="2.223cm" svg:x="15.37cm" svg:y="16.24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28">/</text:span><text:span text:style-name="T28">playSound(</text:span><text:span text:style-name="T11">SO</text:span><text:span text:style-name="T11">UND_PRESET</text:span><text:span text:style-name="T11">x)</text:span></text:p>
            <text:p><text:span text:style-name="T11">/</text:span><text:span text:style-name="T11">setLed(LED_PL</text:span><text:span text:style-name="T11">AY)</text:span></text:p>
            <text:p><text:span text:style-name="T11">/</text:span><text:span text:style-name="T11">startMpdPlayba</text:span><text:span text:style-name="T11">ck()</text:span></text:p>
          </draw:text-box>
        </draw:frame>
        <draw:frame draw:style-name="gr77" draw:text-style-name="P14" draw:layer="layout" svg:width="4.445cm" svg:height="1.27cm" svg:x="4.71cm" svg:y="18.68cm">
          <draw:text-box>
            <text:p><text:span text:style-name="T11">/</text:span><text:span text:style-name="T11">p</text:span><text:span text:style-name="T11">l</text:span><text:span text:style-name="T11">a</text:span><text:span text:style-name="T11">y</text:span><text:span text:style-name="T11">S</text:span><text:span text:style-name="T11">o</text:span><text:span text:style-name="T11">u</text:span><text:span text:style-name="T11">n</text:span><text:span text:style-name="T11">d</text:span><text:span text:style-name="T11">(</text:span><text:span text:style-name="T29">S</text:span><text:span text:style-name="T29">O</text:span><text:span text:style-name="T29">U</text:span><text:span text:style-name="T29">N</text:span><text:span text:style-name="T29">D</text:span><text:span text:style-name="T29">_</text:span><text:span text:style-name="T29">S</text:span><text:span text:style-name="T29">P</text:span><text:span text:style-name="T29">O</text:span><text:span text:style-name="T29">T</text:span><text:span text:style-name="T29">I</text:span><text:span text:style-name="T29">F</text:span><text:span text:style-name="T29">Y</text:span><text:span text:style-name="T11">)</text:span></text:p>
            <text:p><text:span text:style-name="T11">/</text:span><text:span text:style-name="T11">s</text:span><text:span text:style-name="T11">e</text:span><text:span text:style-name="T11">t</text:span><text:span text:style-name="T11">L</text:span><text:span text:style-name="T11">e</text:span><text:span text:style-name="T11">d</text:span><text:span text:style-name="T11">(</text:span><text:span text:style-name="T11">L</text:span><text:span text:style-name="T11">E</text:span><text:span text:style-name="T11">D</text:span><text:span text:style-name="T11">_</text:span><text:span text:style-name="T11">P</text:span><text:span text:style-name="T11">L</text:span><text:span text:style-name="T11">A</text:span><text:span text:style-name="T11">Y</text:span><text:span text:style-name="T11">)</text:span></text:p>
            <text:p><text:span text:style-name="T11">/</text:span><text:span text:style-name="T11">s</text:span><text:span text:style-name="T11">t</text:span><text:span text:style-name="T11">a</text:span><text:span text:style-name="T11">r</text:span><text:span text:style-name="T11">t</text:span><text:span text:style-name="T11">S</text:span><text:span text:style-name="T11">p</text:span><text:span text:style-name="T11">o</text:span><text:span text:style-name="T11">t</text:span><text:span text:style-name="T11">i</text:span><text:span text:style-name="T11">f</text:span><text:span text:style-name="T11">y</text:span><text:span text:style-name="T11">P</text:span><text:span text:style-name="T11">l</text:span><text:span text:style-name="T11">a</text:span><text:span text:style-name="T11">y</text:span><text:span text:style-name="T11">b</text:span><text:span text:style-name="T11">a</text:span><text:span text:style-name="T11">c</text:span><text:span text:style-name="T11">k</text:span><text:span text:style-name="T11">(</text:span><text:span text:style-name="T11">)</text:span></text:p>
          </draw:text-box>
        </draw:frame>
        <draw:frame draw:style-name="gr78" draw:text-style-name="P14" draw:layer="layout" svg:width="3.81cm" svg:height="1.535cm" svg:x="8.22cm" svg:y="19.567cm">
          <draw:text-box>
            <text:p><text:span text:style-name="T11">/playSound(</text:span><text:span text:style-name="T29">SOUND_PLAY</text:span><text:span text:style-name="T11">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29" draw:text-style-name="P14" draw:layer="layout" svg:width="2.54cm" svg:height="0.887cm" svg:x="1.635cm" svg:y="20.367cm">
          <draw:text-box>
            <text:p><text:span text:style-name="T11">ButtonStop</text:span></text:p>
            <text:p><text:span text:style-name="T11">/gotoStandby()</text:span></text:p>
          </draw:text-box>
        </draw:frame>
        <draw:frame draw:style-name="gr69" draw:text-style-name="P35" draw:layer="layout" svg:width="4.445cm" svg:height="1.587cm" svg:x="14.652cm" svg:y="19.098cm">
          <draw:text-box>
            <text:p><text:span text:style-name="T27">VolumeChanged</text:span></text:p>
            <text:p><text:span text:style-name="T27">/</text:span><text:span text:style-name="T27">playSound(SOUND_PLA</text:span><text:span text:style-name="T27">Y)</text:span></text:p>
            <text:p><text:span text:style-name="T27">/setLed(LED_PLAY</text:span></text:p>
            <text:p><text:span text:style-name="T27">/startMpdPlayback()</text:span></text:p>
          </draw:text-box>
        </draw:frame>
        <draw:frame draw:style-name="gr56" draw:text-style-name="P14" draw:layer="layout" svg:width="2.54cm" svg:height="0.953cm" svg:x="12.43cm" svg:y="17.509cm">
          <draw:text-box>
            <text:p><text:span text:style-name="T11">Button</text:span><text:span text:style-name="T11">Stop</text:span></text:p>
            <text:p><text:span text:style-name="T11">/</text:span><text:span text:style-name="T11">gotoSt</text:span><text:span text:style-name="T11">andby(</text:span><text:span text:style-name="T11">)</text:span></text:p>
          </draw:text-box>
        </draw:frame>
        <draw:frame draw:style-name="gr54" draw:text-style-name="P18" draw:layer="layout" svg:width="1.822cm" svg:height="0.952cm" svg:x="18.745cm" svg:y="23.86cm">
          <draw:text-box>
            <text:p><text:span text:style-name="T16">Error</text:span></text:p>
          </draw:text-box>
        </draw:frame>
        <draw:g draw:style-name="gr1" xml:id="id39" draw:id="id39">
          <draw:custom-shape draw:style-name="gr67" draw:text-style-name="P30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40" draw:id="id40">
          <draw:custom-shape draw:style-name="gr67" draw:text-style-name="P30" draw:layer="layout" svg:width="0.717cm" svg:height="0.718cm" svg:x="19.2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93cm" svg:y1="24.599cm" svg:x2="19.854cm" svg:y2="25.161cm">
              <text:p/>
            </draw:line>
            <draw:line draw:style-name="gr57" draw:text-style-name="P2" draw:layer="layout" svg:x1="19.848cm" svg:y1="24.579cm" svg:x2="19.264cm" svg:y2="25.162cm">
              <text:p/>
            </draw:line>
          </draw:g>
        </draw:g>
        <draw:frame draw:style-name="gr79" draw:text-style-name="P14" draw:layer="layout" svg:width="3.357cm" svg:height="1.317cm" svg:x="12.883cm" svg:y="10.36cm">
          <draw:text-box>
            <text:p><text:span text:style-name="T11">timeOut, </text:span></text:p>
            <text:p><text:span text:style-name="T11">criticalError,</text:span></text:p>
            <text:p><text:span text:style-name="T11">/goto_error()</text:span></text:p>
          </draw:text-box>
        </draw:frame>
        <draw:frame draw:style-name="gr80" draw:text-style-name="P14" draw:layer="layout" svg:width="2.222cm" svg:height="0.887cm" svg:x="16.24cm" svg:y="5.833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29" draw:text-style-name="P14" draw:layer="layout" svg:width="3.175cm" svg:height="0.887cm" svg:x="15.287cm" svg:y="13.765cm">
          <draw:text-box>
            <text:p><text:span text:style-name="T11">criticalE</text:span><text:span text:style-name="T11">rror</text:span></text:p>
            <text:p><text:span text:style-name="T11">/</text:span><text:span text:style-name="T11">goto_err</text:span><text:span text:style-name="T11">or()</text:span></text:p>
          </draw:text-box>
        </draw:frame>
        <draw:frame draw:style-name="gr29" draw:text-style-name="P14" draw:layer="layout" svg:width="2.54cm" svg:height="0.887cm" svg:x="16.105cm" svg:y="23.595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56" draw:text-style-name="P14" draw:layer="layout" svg:width="2.54cm" svg:height="0.953cm" svg:x="4.075cm" svg:y="27.987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81" draw:text-style-name="P2" draw:layer="layout" draw:type="curve" draw:line-skew="-0.15cm" svg:x1="2.587cm" svg:y1="24.531cm" svg:x2="2.587cm" svg:y2="25.799cm" draw:start-shape="id36" draw:start-glue-point="11" draw:end-shape="id36" draw:end-glue-point="12" svg:d="M2587 24531c-976 0-976 1268 0 1268" svg:viewBox="0 0 733 1269">
          <text:p/>
        </draw:connector>
        <draw:frame draw:style-name="gr54" draw:text-style-name="P14" draw:layer="layout" svg:width="2.541cm" svg:height="0.952cm" svg:x="0.681cm" svg:y="25.765cm">
          <draw:text-box>
            <text:p><text:span text:style-name="T11">ButtonPlay</text:span></text:p>
            <text:p><text:span text:style-name="T11">/playSound()</text:span></text:p>
          </draw:text-box>
        </draw:frame>
        <draw:connector draw:style-name="gr59" draw:text-style-name="P2" draw:layer="layout" draw:line-skew="-0.554cm" svg:x1="9.255cm" svg:y1="24.531cm" svg:x2="10.681cm" svg:y2="22.326cm" draw:start-shape="id36" draw:start-glue-point="13" draw:end-shape="id34" draw:end-glue-point="16" svg:d="M9255 24531h159v-2205h1267" svg:viewBox="0 0 1427 2206">
          <text:p/>
        </draw:connector>
        <draw:frame draw:style-name="gr82" draw:text-style-name="P14" draw:layer="layout" svg:width="4.645cm" svg:height="2.222cm" svg:x="5.845cm" svg:y="20.82cm">
          <draw:text-box>
            <text:p><text:span text:style-name="T11">B</text:span><text:span text:style-name="T11">u</text:span><text:span text:style-name="T11">tt</text:span><text:span text:style-name="T11">o</text:span><text:span text:style-name="T11">n</text:span><text:span text:style-name="T11">P</text:span><text:span text:style-name="T11">r</text:span><text:span text:style-name="T11">e</text:span><text:span text:style-name="T11">s</text:span><text:span text:style-name="T11">e</text:span><text:span text:style-name="T11">t</text:span><text:span text:style-name="T11">1</text:span><text:span text:style-name="T11">,</text:span></text:p>
            <text:p><text:span text:style-name="T11">B</text:span><text:span text:style-name="T11">u</text:span><text:span text:style-name="T11">tt</text:span><text:span text:style-name="T11">o</text:span><text:span text:style-name="T11">n</text:span><text:span text:style-name="T11">P</text:span><text:span text:style-name="T11">r</text:span><text:span text:style-name="T11">e</text:span><text:span text:style-name="T11">s</text:span><text:span text:style-name="T11">e</text:span><text:span text:style-name="T11">t</text:span><text:span text:style-name="T11">2</text:span><text:span text:style-name="T11">,</text:span></text:p>
            <text:p><text:span text:style-name="T11">B</text:span><text:span text:style-name="T11">u</text:span><text:span text:style-name="T11">tt</text:span><text:span text:style-name="T11">o</text:span><text:span text:style-name="T11">n</text:span><text:span text:style-name="T11">P</text:span><text:span text:style-name="T11">r</text:span><text:span text:style-name="T11">e</text:span><text:span text:style-name="T11">s</text:span><text:span text:style-name="T11">e</text:span><text:span text:style-name="T11">t</text:span><text:span text:style-name="T11">3</text:span><text:span text:style-name="T11">,</text:span></text:p>
            <text:p><text:span text:style-name="T11">/</text:span><text:span text:style-name="T11">p</text:span><text:span text:style-name="T11">l</text:span><text:span text:style-name="T11">a</text:span><text:span text:style-name="T11">y</text:span><text:span text:style-name="T11">S</text:span><text:span text:style-name="T11">o</text:span><text:span text:style-name="T11">u</text:span><text:span text:style-name="T11">n</text:span><text:span text:style-name="T11">d</text:span><text:span text:style-name="T11">(</text:span><text:span text:style-name="T11">S</text:span><text:span text:style-name="T11">O</text:span><text:span text:style-name="T11">U</text:span><text:span text:style-name="T11">N</text:span><text:span text:style-name="T11">D</text:span><text:span text:style-name="T11">_</text:span><text:span text:style-name="T11">P</text:span><text:span text:style-name="T11">R</text:span><text:span text:style-name="T11">E</text:span><text:span text:style-name="T11">S</text:span><text:span text:style-name="T11">E</text:span><text:span text:style-name="T11">T</text:span><text:span text:style-name="T11">x</text:span><text:span text:style-name="T11">)</text:span></text:p>
            <text:p><text:span text:style-name="T11">/</text:span><text:span text:style-name="T11">s</text:span><text:span text:style-name="T11">e</text:span><text:span text:style-name="T11">t</text:span><text:span text:style-name="T11">L</text:span><text:span text:style-name="T11">e</text:span><text:span text:style-name="T11">d</text:span><text:span text:style-name="T11">(</text:span><text:span text:style-name="T11">L</text:span><text:span text:style-name="T11">E</text:span><text:span text:style-name="T11">D</text:span><text:span text:style-name="T11">_</text:span><text:span text:style-name="T11">P</text:span><text:span text:style-name="T11">R</text:span><text:span text:style-name="T11">E</text:span><text:span text:style-name="T11">S</text:span><text:span text:style-name="T11">E</text:span><text:span text:style-name="T11">T</text:span><text:span text:style-name="T11">x</text:span><text:span text:style-name="T11">)</text:span></text:p>
            <text:p><text:span text:style-name="T11">/</text:span><text:span text:style-name="T11">s</text:span><text:span text:style-name="T11">t</text:span><text:span text:style-name="T11">a</text:span><text:span text:style-name="T11">rt</text:span><text:span text:style-name="T11">M</text:span><text:span text:style-name="T11">p</text:span><text:span text:style-name="T11">d</text:span><text:span text:style-name="T11">P</text:span><text:span text:style-name="T11">l</text:span><text:span text:style-name="T11">a</text:span><text:span text:style-name="T11">y</text:span><text:span text:style-name="T11">b</text:span><text:span text:style-name="T11">a</text:span><text:span text:style-name="T11">c</text:span><text:span text:style-name="T11">k</text:span><text:span text:style-name="T11">()</text:span></text:p>
          </draw:text-box>
        </draw:frame>
        <draw:connector draw:style-name="gr59" draw:text-style-name="P2" draw:layer="layout" svg:x1="10.64cm" svg:y1="27.17cm" svg:x2="5.921cm" svg:y2="26.5cm" draw:start-shape="id41" draw:start-glue-point="5" draw:end-shape="id36" draw:end-glue-point="2" svg:d="M10640 27170h-4719v-670" svg:viewBox="0 0 4720 671">
          <text:p/>
        </draw:connector>
        <draw:frame draw:style-name="gr83" draw:text-style-name="P14" draw:layer="layout" svg:width="4.763cm" svg:height="0.635cm" svg:x="5.444cm" svg:y="27.135cm">
          <draw:text-box>
            <text:p><text:span text:style-name="T11">/startSpotifyPlayback()</text:span></text:p>
          </draw:text-box>
        </draw:frame>
        <draw:connector draw:style-name="gr81" draw:text-style-name="P2" draw:layer="layout" draw:type="curve" svg:x1="15.74cm" svg:y1="22.992cm" svg:x2="15.74cm" svg:y2="22.261cm" draw:start-shape="id34" draw:start-glue-point="1" draw:end-shape="id34" draw:end-glue-point="12" svg:d="M15740 22992c751 0 751-731 0-731" svg:viewBox="0 0 564 732">
          <text:p/>
        </draw:connector>
        <draw:frame draw:style-name="gr84" draw:text-style-name="P14" draw:layer="layout" svg:width="4.232cm" svg:height="1.841cm" svg:x="16.105cm" svg:y="21.472cm">
          <draw:text-box>
            <text:p><text:span text:style-name="T11">B</text:span><text:span text:style-name="T11">u</text:span><text:span text:style-name="T11">t</text:span><text:span text:style-name="T11">t</text:span><text:span text:style-name="T11">o</text:span><text:span text:style-name="T11">n</text:span><text:span text:style-name="T11">P</text:span><text:span text:style-name="T11">r</text:span><text:span text:style-name="T11">e</text:span><text:span text:style-name="T11">s</text:span><text:span text:style-name="T11">e</text:span><text:span text:style-name="T11">t</text:span><text:span text:style-name="T11">1</text:span><text:span text:style-name="T11">,</text:span></text:p>
            <text:p><text:span text:style-name="T11">B</text:span><text:span text:style-name="T11">u</text:span><text:span text:style-name="T11">t</text:span><text:span text:style-name="T11">t</text:span><text:span text:style-name="T11">o</text:span><text:span text:style-name="T11">n</text:span><text:span text:style-name="T11">P</text:span><text:span text:style-name="T11">r</text:span><text:span text:style-name="T11">e</text:span><text:span text:style-name="T11">s</text:span><text:span text:style-name="T11">e</text:span><text:span text:style-name="T11">t</text:span><text:span text:style-name="T11">2</text:span><text:span text:style-name="T11">,</text:span></text:p>
            <text:p><text:span text:style-name="T11">B</text:span><text:span text:style-name="T11">u</text:span><text:span text:style-name="T11">t</text:span><text:span text:style-name="T11">t</text:span><text:span text:style-name="T11">o</text:span><text:span text:style-name="T11">n</text:span><text:span text:style-name="T11">P</text:span><text:span text:style-name="T11">r</text:span><text:span text:style-name="T11">e</text:span><text:span text:style-name="T11">s</text:span><text:span text:style-name="T11">e</text:span><text:span text:style-name="T11">t</text:span><text:span text:style-name="T11">3</text:span><text:span text:style-name="T11">,</text:span></text:p>
            <text:p><text:span text:style-name="T11">/</text:span><text:span text:style-name="T11">p</text:span><text:span text:style-name="T11">l</text:span><text:span text:style-name="T11">a</text:span><text:span text:style-name="T11">y</text:span><text:span text:style-name="T11">S</text:span><text:span text:style-name="T11">o</text:span><text:span text:style-name="T11">u</text:span><text:span text:style-name="T11">n</text:span><text:span text:style-name="T11">d</text:span><text:span text:style-name="T11">(</text:span><text:span text:style-name="T11">S</text:span><text:span text:style-name="T11">O</text:span><text:span text:style-name="T11">U</text:span><text:span text:style-name="T11">N</text:span><text:span text:style-name="T11">D</text:span><text:span text:style-name="T11">_</text:span><text:span text:style-name="T11">N</text:span><text:span text:style-name="T11">E</text:span><text:span text:style-name="T11">X</text:span><text:span text:style-name="T11">T</text:span><text:span text:style-name="T11">)</text:span></text:p>
            <text:p><text:span text:style-name="T11">/</text:span><text:span text:style-name="T11">n</text:span><text:span text:style-name="T11">e</text:span><text:span text:style-name="T11">x</text:span><text:span text:style-name="T11">t</text:span><text:span text:style-name="T11">S</text:span><text:span text:style-name="T11">o</text:span><text:span text:style-name="T11">n</text:span><text:span text:style-name="T11">g</text:span><text:span text:style-name="T11">(</text:span><text:span text:style-name="T11">)</text:span></text:p>
          </draw:text-box>
        </draw:frame>
        <draw:custom-shape draw:style-name="gr13" draw:text-style-name="P2" xml:id="id41" draw:id="id41" draw:layer="layout" svg:width="0.6cm" svg:height="0.6cm" svg:x="10.64cm" svg:y="26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10.703cm" svg:y1="23.649cm" svg:x2="10.94cm" svg:y2="26.87cm" draw:start-shape="id34" draw:start-glue-point="9" draw:end-shape="id41" draw:end-glue-point="4" svg:d="M10703 23649h-523v1905h760v1316" svg:viewBox="0 0 761 3222">
          <text:p/>
        </draw:connector>
        <draw:connector draw:style-name="gr59" draw:text-style-name="P2" draw:layer="layout" draw:line-skew="-0.946cm" svg:x1="11.24cm" svg:y1="27.17cm" svg:x2="14.241cm" svg:y2="27.97cm" draw:start-shape="id41" draw:start-glue-point="7" draw:end-shape="id42" draw:end-glue-point="5" svg:d="M11240 27170h555v800h2446" svg:viewBox="0 0 3002 801">
          <text:p/>
        </draw:connector>
        <draw:frame draw:style-name="gr85" draw:text-style-name="P36" draw:layer="layout" svg:width="4.127cm" svg:height="0.888cm" svg:x="15.505cm" svg:y="26.564cm">
          <draw:text-box>
            <text:p><text:span text:style-name="T30">/playSound(</text:span><text:span text:style-name="T31">SOUND_NEXT</text:span><text:span text:style-name="T32">)</text:span></text:p>
            <text:p text:style-name="P32"><text:span text:style-name="T32">/nextSong()</text:span></text:p>
          </draw:text-box>
        </draw:frame>
        <draw:custom-shape draw:style-name="gr13" draw:text-style-name="P2" xml:id="id35" draw:id="id35" draw:layer="layout" svg:width="0.6cm" svg:height="0.6cm" svg:x="8.341cm" svg:y="17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7.827cm" svg:y1="16.365cm" svg:x2="8.641cm" svg:y2="17.97cm" draw:start-shape="id33" draw:start-glue-point="12" draw:end-shape="id35" draw:end-glue-point="4" svg:d="M7827 16365v790h814v815" svg:viewBox="0 0 815 1606">
          <text:p/>
        </draw:connector>
        <draw:frame draw:style-name="gr86" draw:text-style-name="P14" draw:layer="layout" svg:width="2.251cm" svg:height="0.645cm" svg:x="5.734cm" svg:y="16.566cm">
          <draw:text-box>
            <text:p><text:span text:style-name="T11">ButtonPlay</text:span></text:p>
          </draw:text-box>
        </draw:frame>
        <draw:frame draw:style-name="gr86" draw:text-style-name="P37" draw:layer="layout" svg:width="3.81cm" svg:height="0.645cm" svg:x="5.092cm" svg:y="17.71cm">
          <draw:text-box>
            <text:p><text:span text:style-name="T14">[</text:span><text:span text:style-name="T23">isSpotifyConnected</text:span><text:span text:style-name="T14">]</text:span></text:p>
          </draw:text-box>
        </draw:frame>
        <draw:frame draw:style-name="gr86" draw:text-style-name="P14" draw:layer="layout" svg:width="1.588cm" svg:height="0.645cm" svg:x="8.937cm" svg:y="17.71cm">
          <draw:text-box>
            <text:p><text:span text:style-name="T11">[else]</text:span></text:p>
          </draw:text-box>
        </draw:frame>
        <draw:connector draw:style-name="gr59" draw:text-style-name="P2" draw:layer="layout" draw:line-skew="0.451cm -0.397cm" svg:x1="14.335cm" svg:y1="15.746cm" svg:x2="14.773cm" svg:y2="21.722cm" draw:start-shape="id33" draw:start-glue-point="8" draw:end-shape="id34" draw:end-glue-point="7" svg:d="M14335 15746h952v2901h-514v3075" svg:viewBox="0 0 953 5977">
          <text:p/>
        </draw:connector>
        <draw:frame draw:style-name="gr86" draw:text-style-name="P14" draw:layer="layout" svg:width="2.222cm" svg:height="0.645cm" svg:x="9.255cm" svg:y="25.437cm">
          <draw:text-box>
            <text:p><text:span text:style-name="T11">ButtonPlay</text:span></text:p>
          </draw:text-box>
        </draw:frame>
        <draw:frame draw:style-name="gr83" draw:text-style-name="P35" draw:layer="layout" svg:width="3.175cm" svg:height="0.635cm" svg:x="7.785cm" svg:y="26.617cm">
          <draw:text-box>
            <text:p><text:span text:style-name="T27">[isSpotifyConnected]</text:span></text:p>
          </draw:text-box>
        </draw:frame>
        <draw:frame draw:style-name="gr86" draw:text-style-name="P14" draw:layer="layout" svg:width="1.271cm" svg:height="0.645cm" svg:x="10.999cm" svg:y="26.7cm">
          <draw:text-box>
            <text:p><text:span text:style-name="T11">[else]</text:span></text:p>
          </draw:text-box>
        </draw:frame>
        <draw:custom-shape draw:style-name="gr13" draw:text-style-name="P2" xml:id="id42" draw:id="id42" draw:layer="layout" svg:width="0.6cm" svg:height="0.6cm" svg:x="14.241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14.541cm" svg:y1="27.67cm" svg:x2="11.478cm" svg:y2="24.229cm" draw:start-shape="id42" draw:start-glue-point="4" draw:end-shape="id34" draw:end-glue-point="17" svg:d="M14541 27670v-1716h-3063v-1725" svg:viewBox="0 0 3064 3442">
          <text:p/>
        </draw:connector>
        <draw:connector draw:style-name="gr59" draw:text-style-name="P2" draw:layer="layout" draw:line-skew="0.238cm" svg:x1="14.841cm" svg:y1="27.97cm" svg:x2="15.315cm" svg:y2="24.229cm" draw:start-shape="id42" draw:start-glue-point="7" draw:end-shape="id34" draw:end-glue-point="15" svg:d="M14841 27970h764v-2016h-290v-1725" svg:viewBox="0 0 765 3742">
          <text:p/>
        </draw:connector>
        <draw:frame draw:style-name="gr83" draw:text-style-name="P14" draw:layer="layout" svg:width="1.905cm" svg:height="0.635cm" svg:x="12.347cm" svg:y="27.987cm">
          <draw:text-box>
            <text:p><text:span text:style-name="T11">[isPlayOn]</text:span></text:p>
          </draw:text-box>
        </draw:frame>
        <draw:frame draw:style-name="gr56" draw:text-style-name="P36" draw:layer="layout" svg:width="4.127cm" svg:height="0.953cm" svg:x="11.395cm" svg:y="25.047cm">
          <draw:text-box>
            <text:p><text:span text:style-name="T30">/</text:span><text:span text:style-name="T30">playSound(</text:span><text:span text:style-name="T31">SOUND_PLA</text:span><text:span text:style-name="T31">Y</text:span><text:span text:style-name="T32">)</text:span></text:p>
            <text:p text:style-name="P32"><text:span text:style-name="T32">/setLed(LED_PLAY)</text:span></text:p>
          </draw:text-box>
        </draw:frame>
        <draw:frame draw:style-name="gr86" draw:text-style-name="P14" draw:layer="layout" svg:width="1.27cm" svg:height="0.645cm" svg:x="13.565cm" svg:y="27.125cm">
          <draw:text-box>
            <text:p><text:span text:style-name="T11">[else]</text:span></text:p>
          </draw:text-box>
        </draw:frame>
      </draw:page>
      <draw:page draw:name="page4" draw:style-name="dp1" draw:master-page-name="Default">
        <draw:connector draw:style-name="gr87" draw:text-style-name="P2" draw:layer="layout" svg:x1="8.067cm" svg:y1="11.833cm" svg:x2="14.017cm" svg:y2="5.923cm" draw:start-shape="id43" draw:start-glue-point="1" draw:end-shape="id44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44" draw:id="id44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88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89" draw:text-style-name="P38" draw:layer="layout" svg:width="2.858cm" svg:height="1.026cm" svg:x="13.314cm" svg:y="4.582cm">
            <draw:text-box>
              <text:p text:style-name="P4"><text:span text:style-name="T33">VolumeControl</text:span></text:p>
            </draw:text-box>
          </draw:frame>
        </draw:g>
        <draw:g draw:style-name="gr1" xml:id="id43" draw:id="id43">
          <draw:custom-shape draw:style-name="gr67" draw:text-style-name="P30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45" draw:id="id45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88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89" draw:text-style-name="P38" draw:layer="layout" svg:width="2.858cm" svg:height="1.026cm" svg:x="13.315cm" svg:y="7.182cm">
            <draw:text-box>
              <text:p text:style-name="P4"><text:span text:style-name="T33">UsbService</text:span></text:p>
            </draw:text-box>
          </draw:frame>
        </draw:g>
        <draw:connector draw:style-name="gr87" draw:text-style-name="P2" draw:layer="layout" svg:x1="8.067cm" svg:y1="11.833cm" svg:x2="14.018cm" svg:y2="8.522cm" draw:start-shape="id43" draw:end-shape="id45" draw:end-glue-point="3" svg:d="M8067 11833h2987v-3311h2964" svg:viewBox="0 0 5952 3312">
          <text:p/>
        </draw:connector>
        <draw:custom-shape draw:style-name="gr44" draw:text-style-name="P1" xml:id="id46" draw:id="id46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8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89" draw:text-style-name="P38" draw:layer="layout" svg:width="3.261cm" svg:height="1.026cm" svg:x="13.296cm" svg:y="9.762cm">
          <draw:text-box>
            <text:p text:style-name="P4"><text:span text:style-name="T33">SpotifyConnect</text:span></text:p>
          </draw:text-box>
        </draw:frame>
        <draw:connector draw:style-name="gr87" draw:text-style-name="P2" draw:layer="layout" svg:x1="8.067cm" svg:y1="11.833cm" svg:x2="13.999cm" svg:y2="11.103cm" draw:start-shape="id43" draw:end-shape="id46" draw:end-glue-point="6" svg:d="M8067 11833h2978v-730h2954" svg:viewBox="0 0 5933 731">
          <text:p/>
        </draw:connector>
        <draw:custom-shape draw:style-name="gr44" draw:text-style-name="P1" xml:id="id47" draw:id="id47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8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89" draw:text-style-name="P38" draw:layer="layout" svg:width="3.261cm" svg:height="1.026cm" svg:x="13.314cm" svg:y="12.278cm">
          <draw:text-box>
            <text:p text:style-name="P4"><text:span text:style-name="T33">WifiService</text:span></text:p>
          </draw:text-box>
        </draw:frame>
        <draw:connector draw:style-name="gr87" draw:text-style-name="P2" draw:layer="layout" svg:x1="8.067cm" svg:y1="11.833cm" svg:x2="14.017cm" svg:y2="13.619cm" draw:start-shape="id43" draw:start-glue-point="1" draw:end-shape="id47" draw:end-glue-point="6" svg:d="M8067 11833h2987v1786h2963" svg:viewBox="0 0 5951 1787">
          <text:p/>
        </draw:connector>
        <draw:custom-shape draw:style-name="gr44" draw:text-style-name="P1" xml:id="id48" draw:id="id48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8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89" draw:text-style-name="P38" draw:layer="layout" svg:width="3.261cm" svg:height="1.026cm" svg:x="13.314cm" svg:y="14.818cm">
          <draw:text-box>
            <text:p text:style-name="P4"><text:span text:style-name="T33">PowerControl</text:span></text:p>
          </draw:text-box>
        </draw:frame>
        <draw:connector draw:style-name="gr87" draw:text-style-name="P2" draw:layer="layout" svg:x1="8.067cm" svg:y1="11.833cm" svg:x2="14.017cm" svg:y2="16.159cm" draw:start-shape="id43" draw:end-shape="id48" draw:end-glue-point="6" svg:d="M8067 11833h2987v4326h2963" svg:viewBox="0 0 5951 4327">
          <text:p/>
        </draw:connector>
        <draw:custom-shape draw:style-name="gr44" draw:text-style-name="P1" xml:id="id49" draw:id="id49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8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89" draw:text-style-name="P38" draw:layer="layout" svg:width="3.261cm" svg:height="1.026cm" svg:x="13.314cm" svg:y="17.599cm">
          <draw:text-box>
            <text:p text:style-name="P4"><text:span text:style-name="T33">Errorhandler</text:span></text:p>
          </draw:text-box>
        </draw:frame>
        <draw:connector draw:style-name="gr87" draw:text-style-name="P2" draw:layer="layout" svg:x1="8.067cm" svg:y1="11.833cm" svg:x2="14.017cm" svg:y2="18.94cm" draw:start-shape="id43" draw:end-shape="id49" draw:end-glue-point="6" svg:d="M8067 11833h2987v7107h2963" svg:viewBox="0 0 5951 7108">
          <text:p/>
        </draw:connector>
        <draw:custom-shape draw:style-name="gr44" draw:text-style-name="P1" xml:id="id50" draw:id="id50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8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89" draw:text-style-name="P38" draw:layer="layout" svg:width="3.261cm" svg:height="1.026cm" svg:x="13.315cm" svg:y="20.399cm">
          <draw:text-box>
            <text:p text:style-name="P4"><text:span text:style-name="T33">RemoteMonitoring</text:span></text:p>
          </draw:text-box>
        </draw:frame>
        <draw:connector draw:style-name="gr87" draw:text-style-name="P2" draw:layer="layout" svg:x1="8.067cm" svg:y1="11.833cm" svg:x2="14.018cm" svg:y2="21.74cm" draw:start-shape="id43" draw:start-glue-point="1" draw:end-shape="id50" draw:end-glue-point="6" svg:d="M8067 11833h2987v9907h2964" svg:viewBox="0 0 5952 990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22T18:01:07.628163364</dc:date>
    <meta:editing-duration>PT5H13M17S</meta:editing-duration>
    <meta:editing-cycles>44</meta:editing-cycles>
    <meta:print-date>2026-04-03T16:45:26.431431754</meta:print-date>
    <meta:document-statistic meta:object-count="341"/>
  </office:meta>
</office:document-meta>
</file>