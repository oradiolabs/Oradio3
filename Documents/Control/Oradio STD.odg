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9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6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47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0.902cm" loext:decorative="false"/>
      <style:paragraph-properties style:writing-mode="lr-tb"/>
    </style:style>
    <style:style style:name="gr7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2" style:family="graphic" style:parent-style-name="standard">
      <style:graphic-properties draw:stroke="none" draw:fill="none" fo:min-height="2.2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7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1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2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3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10pt"/>
    </style:style>
    <style:style style:name="P32" style:family="paragraph">
      <style:text-properties fo:color="#c9211e" loext:opacity="100%"/>
    </style:style>
    <style:style style:name="P33" style:family="paragraph">
      <loext:graphic-properties draw:fill="none" draw:fill-color="#ffffff"/>
      <style:text-properties fo:color="#c9211e" loext:opacity="100%" fo:font-size="8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style:text-properties fo:color="#c9211e" loext:opacity="100%" fo:font-size="10pt" style:font-size-asian="10pt" style:font-size-complex="10pt"/>
    </style:style>
    <style:style style:name="P36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37" style:family="paragraph">
      <loext:graphic-properties draw:fill="none" draw:fill-color="#ffffff"/>
      <style:text-properties fo:color="#c9211e" loext:opacity="100%" fo:font-size="10pt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40" style:family="paragraph">
      <loext:graphic-properties draw:fill="none"/>
      <style:text-properties fo:font-size="12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none" draw:fill-color="#ffffff"/>
      <style:text-properties fo:font-size="8pt" style:font-size-asian="10pt" style:font-size-complex="10pt"/>
    </style:style>
    <style:style style:name="P45" style:family="paragraph">
      <loext:graphic-properties draw:fill="none" draw:fill-color="#ffffff"/>
      <style:text-properties fo:color="#000000" loext:opacity="100%" fo:font-size="8p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10pt"/>
    </style:style>
    <style:style style:name="T23" style:family="text">
      <style:text-properties fo:color="#c9211e" loext:opacity="100%" fo:font-size="8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loext:opacity="100%" fo:font-size="10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10pt" style:font-size-complex="1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8pt" style:font-size-asian="10pt" style:font-size-complex="10pt"/>
    </style:style>
    <style:style style:name="T35" style:family="text">
      <style:text-properties fo:color="#000000" loext:opacity="100%" fo:font-size="8pt"/>
    </style:style>
    <style:style style:name="T36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</text:span><text:span text:style-name="T2">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</text:span><text:span text:style-name="T5">executed when </text:span><text:span text:style-name="T5">entering a state.</text:span></text:p>
            <text:p><text:span text:style-name="T4">Do actions</text:span><text:span text:style-name="T5">: are </text:span><text:span text:style-name="T5">performed while </text:span><text:span text:style-name="T5">in that state</text:span></text:p>
            <text:p><text:span text:style-name="T4">Exit actions</text:span><text:span text:style-name="T5">: are </text:span><text:span text:style-name="T5">executed when </text:span><text:span text:style-name="T5">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</text:span><text:span text:style-name="T14">that splits an </text:span><text:span text:style-name="T14">incoming transition </text:span><text:span text:style-name="T14">into two or more </text:span><text:span text:style-name="T14">outgoing transitions, </text:span><text:span text:style-name="T14">allowing for </text:span><text:span text:style-name="T14">concurrent paths. It is </text:span><text:span text:style-name="T14">used to represent the </text:span><text:span text:style-name="T14">beginning of parallel </text:span><text:span text:style-name="T14">processes within a </text:span><text:span text:style-name="T14">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</text:span><text:span text:style-name="T14">combine multiple </text:span><text:span text:style-name="T14">incoming transitions </text:span><text:span text:style-name="T14">into a single outgoing </text:span><text:span text:style-name="T14">transition, effectively </text:span><text:span text:style-name="T14">synchronizing </text:span><text:span text:style-name="T14">concurrent activities. </text:span><text:span text:style-name="T14">It allows the system </text:span><text:span text:style-name="T14">to wait for all </text:span><text:span text:style-name="T14">incoming transitions </text:span><text:span text:style-name="T14">to complete before </text:span><text:span text:style-name="T14">proceeding to the </text:span><text:span text:style-name="T14">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</text:span><text:span text:style-name="T14">represent separate </text:span><text:span text:style-name="T14">areas of concern </text:span><text:span text:style-name="T14">within a state, </text:span><text:span text:style-name="T14">allowing for </text:span><text:span text:style-name="T14">independent state </text:span><text:span text:style-name="T14">transitions in each </text:span><text:span text:style-name="T14">region, </text:span><text:span text:style-name="T14">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</text:span><text:span text:style-name="T7">that causes the </text:span><text:span text:style-name="T7">transition.</text:span></text:p>
            <text:p><text:span text:style-name="T15">/action</text:span><text:span text:style-name="T7">: An </text:span><text:span text:style-name="T7">operation </text:span><text:span text:style-name="T7">executed in </text:span><text:span text:style-name="T7">response to an </text:span><text:span text:style-name="T7">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</text:span><text:span text:style-name="T14">state that has </text:span><text:span text:style-name="T14">substructure and </text:span><text:span text:style-name="T14">internal behavior. It </text:span><text:span text:style-name="T14">can contain one or </text:span><text:span text:style-name="T14">more regions, which </text:span><text:span text:style-name="T14">can contain one or </text:span><text:span text:style-name="T14">more states. The </text:span><text:span text:style-name="T14">state diagrams are </text:span><text:span text:style-name="T14">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</text:span><text:span text:style-name="T17">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</text:span><text:span text:style-name="T19">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1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2.855cm" svg:x="2.37cm" svg:y="9.95cm">
          <draw:text-box>
            <text:p><text:span text:style-name="T3">Entry</text:span><text:span text:style-name="T20"> </text:span><text:span text:style-name="T20">/checkMsgQueu</text:span><text:span text:style-name="T20">e()</text:span></text:p>
            <text:p><text:span text:style-name="T3">Do</text:span><text:span text:style-name="T20"> </text:span><text:span text:style-name="T20">[queue.not_emp</text:span><text:span text:style-name="T20">ty]/ </text:span><text:span text:style-name="T20">processMsg()</text:span></text:p>
            <text:p><text:span text:style-name="T3">Exit</text:span><text:span text:style-name="T20"> </text:span></text:p>
            <text:p><text:span text:style-name="T20"><text:s text:c="3"/></text:span><text:span text:style-name="T20">on </text:span><text:span text:style-name="T20">msgProcessed </text:span><text:span text:style-name="T20">raise </text:span><text:span text:style-name="T20">nextMessage</text:span></text:p>
            <text:p><text:span text:style-name="T20"><text:s text:c="3"/></text:span><text:span text:style-name="T20">on </text:span><text:span text:style-name="T20">queueException </text:span><text:span text:style-name="T20">raise </text:span><text:span text:style-name="T20">criticalError</text:span></text:p>
            <text:p><text:span text:style-name="T20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14cm">
          <draw:text-box>
            <text:p><text:span text:style-name="T18">Checking</text:span><text:span text:style-name="T18">Queue</text:span></text:p>
          </draw:text-box>
        </draw:frame>
        <draw:connector draw:style-name="gr55" draw:text-style-name="P2" draw:layer="layout" draw:line-skew="0.651cm -8.456cm -0.837cm" svg:x1="4.041cm" svg:y1="12.565cm" svg:x2="3.691cm" svg:y2="9.14cm" draw:start-shape="id16" draw:start-glue-point="6" draw:end-shape="id16" draw:end-glue-point="9" svg:d="M4041 12565v1152h-2406v-5915h2056v1338" svg:viewBox="0 0 2407 5916">
          <text:p/>
        </draw:connector>
        <draw:frame draw:style-name="gr56" draw:text-style-name="P27" draw:layer="layout" svg:width="3.175cm" svg:height="0.953cm" svg:x="1.617cm" svg:y="13.034cm">
          <draw:text-box>
            <text:p><text:span text:style-name="T20">nextMes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</text:span><text:span text:style-name="T19">Contro</text:span><text:span text:style-name="T19">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</text:span><text:span text:style-name="T18">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laying</text:span></text:p>
          </draw:text-box>
        </draw:frame>
        <draw:connector draw:style-name="gr58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59" draw:text-style-name="P29" draw:layer="layout" svg:width="7.62cm" svg:height="2.223cm" svg:x="1.952cm" svg:y="25.847cm">
          <text:p text:style-name="P28"><text:span text:style-name="T21">The </text:span><text:span text:style-name="T21">CheckingQ</text:span><text:span text:style-name="T21">ueue state </text:span><text:span text:style-name="T21">and </text:span><text:span text:style-name="T21">OradioCont</text:span><text:span text:style-name="T21">rol </text:span><text:span text:style-name="T21">composite </text:span><text:span text:style-name="T21">state are </text:span><text:span text:style-name="T21">concurrent </text:span><text:span text:style-name="T21">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oCreation</text:span></text:p>
          </draw:text-box>
        </draw:frame>
        <draw:line draw:style-name="gr60" draw:text-style-name="P2" draw:layer="layout" svg:x1="10.207cm" svg:y1="6.715cm" svg:x2="10.207cm" svg:y2="28.305cm">
          <text:p/>
        </draw:line>
        <draw:connector draw:style-name="gr61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8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8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8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8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8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2" draw:text-style-name="P9" draw:layer="layout" svg:width="4.445cm" svg:height="1.487cm" svg:x="10.525cm" svg:y="3.54cm">
          <draw:text-box>
            <text:p><text:span text:style-name="T7">StartDon</text:span><text:span text:style-name="T7">e</text:span></text:p>
            <text:p><text:span text:style-name="T7">/</text:span><text:span text:style-name="T7">startOrad</text:span><text:span text:style-name="T7">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</text:span><text:span text:style-name="T7">r</text:span><text:span text:style-name="T7">r</text:span><text:span text:style-name="T7">o</text:span><text:span text:style-name="T7">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2" draw:layer="layout" svg:width="3.8cm" svg:height="1.673cm" svg:x="11.355cm" svg:y="15.155cm">
          <draw:text-box>
            <text:p><text:span text:style-name="T3">E</text:span><text:span text:style-name="T3">n</text:span><text:span text:style-name="T3">t</text:span><text:span text:style-name="T3">r</text:span><text:span text:style-name="T3">y</text:span><text:span text:style-name="T6"> </text:span><text:span text:style-name="T6">/</text:span></text:p>
            <text:p><text:span text:style-name="T3">D</text:span><text:span text:style-name="T3">o</text:span><text:span text:style-name="T6"> </text:span><text:span text:style-name="T6">/</text:span></text:p>
            <text:p><text:span text:style-name="T3">E</text:span><text:span text:style-name="T3">x</text:span><text:span text:style-name="T3">it</text:span><text:span text:style-name="T6"> </text:span><text:span text:style-name="T6">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4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8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4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7.785cm" svg:y1="7.432cm" svg:x2="8.198cm" svg:y2="9.14cm" draw:start-shape="id27" draw:start-glue-point="8" draw:end-shape="id16" draw:end-glue-point="7" svg:d="M7785 7432v855h413v853" svg:viewBox="0 0 414 1709">
          <text:p/>
        </draw:connector>
        <draw:g draw:style-name="gr1" xml:id="id29" draw:id="id29">
          <draw:custom-shape draw:style-name="gr65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28" draw:id="id28">
          <draw:custom-shape draw:style-name="gr65" draw:text-style-name="P30" draw:layer="layout" svg:width="0.717cm" svg:height="0.718cm" svg:x="9.155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285cm" svg:x2="9.795cm" svg:y2="13.847cm">
              <text:p/>
            </draw:line>
            <draw:line draw:style-name="gr57" draw:text-style-name="P2" draw:layer="layout" svg:x1="9.789cm" svg:y1="13.265cm" svg:x2="9.205cm" svg:y2="13.848cm">
              <text:p/>
            </draw:line>
          </draw:g>
        </draw:g>
        <draw:frame draw:style-name="gr51" draw:text-style-name="P9" draw:layer="layout" svg:width="1.588cm" svg:height="0.725cm" svg:x="7.984cm" svg:y="13.61cm">
          <draw:text-box>
            <text:p><text:span text:style-name="T7">Erro</text:span><text:span text:style-name="T7">r</text:span></text:p>
          </draw:text-box>
        </draw:frame>
        <draw:connector draw:style-name="gr63" draw:text-style-name="P2" draw:layer="layout" svg:x1="8.349cm" svg:y1="12.565cm" svg:x2="9.155cm" svg:y2="13.558cm" draw:start-shape="id16" draw:start-glue-point="4" draw:end-shape="id28" draw:end-glue-point="3" svg:d="M8349 12565v993h806" svg:viewBox="0 0 807 994">
          <text:p/>
        </draw:connector>
        <draw:frame draw:style-name="gr66" draw:text-style-name="P22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4">on </text:span><text:span text:style-name="T14">usbAbsent </text:span><text:span text:style-name="T14">raise </text:span><text:span text:style-name="T14">criticalErro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58" draw:text-style-name="P2" draw:layer="layout" draw:line-skew="0.695cm" svg:x1="16.881cm" svg:y1="14.631cm" svg:x2="19.18cm" svg:y2="15.881cm" draw:end-shape="id29" draw:end-glue-point="3" svg:d="M16881 14631h1582v1250h717" svg:viewBox="0 0 2300 1251">
          <text:p/>
        </draw:connector>
        <draw:frame draw:style-name="gr29" draw:text-style-name="P14" draw:layer="layout" svg:width="2.222cm" svg:height="0.887cm" svg:x="6.08cm" svg:y="12.948cm">
          <draw:text-box>
            <text:p><text:span text:style-name="T11">criticalE</text:span><text:span text:style-name="T11">rror</text:span></text:p>
            <text:p><text:span text:style-name="T11">/</text:span><text:span text:style-name="T11">goto_err</text:span><text:span text:style-name="T11">or()</text:span></text:p>
          </draw:text-box>
        </draw:frame>
        <draw:connector draw:style-name="gr63" draw:text-style-name="P2" draw:layer="layout" svg:x1="6.643cm" svg:y1="23.673cm" svg:x2="6.547cm" svg:y2="24.572cm" draw:start-shape="id30" draw:start-glue-point="7" draw:end-shape="id31" draw:end-glue-point="1" svg:d="M6643 23673h526v899h-622" svg:viewBox="0 0 623 900">
          <text:p/>
        </draw:connector>
        <draw:connector draw:style-name="gr63" draw:text-style-name="P2" draw:layer="layout" svg:x1="6.043cm" svg:y1="23.673cm" svg:x2="5.947cm" svg:y2="24.572cm" draw:start-shape="id30" draw:start-glue-point="5" draw:end-shape="id31" draw:end-glue-point="3" svg:d="M6043 23673h-597v899h501" svg:viewBox="0 0 598 900">
          <text:p/>
        </draw:connector>
        <draw:g draw:style-name="gr39" xml:id="id31" draw:id="id31">
          <draw:custom-shape draw:style-name="gr26" draw:text-style-name="P1" draw:layer="layout" svg:width="0.4cm" svg:height="0.4cm" svg:x="6.047cm" svg:y="24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947cm" svg:y="2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" draw:text-style-name="P2" draw:layer="layout" svg:x1="6.591cm" svg:y1="18.998cm" svg:x2="7.096cm" svg:y2="20.056cm" draw:start-shape="id32" draw:start-glue-point="12" draw:end-shape="id33" draw:end-glue-point="7" svg:d="M6591 18998v538h505v520" svg:viewBox="0 0 506 1059">
          <text:p/>
        </draw:connector>
        <draw:connector draw:style-name="gr63" draw:text-style-name="P2" draw:layer="layout" svg:x1="6.578cm" svg:y1="22.361cm" svg:x2="6.343cm" svg:y2="23.373cm" draw:start-shape="id33" draw:start-glue-point="5" draw:end-shape="id30" draw:end-glue-point="4" svg:d="M6578 22361v494h-235v518" svg:viewBox="0 0 236 1013">
          <text:p/>
        </draw:connector>
        <draw:rect draw:style-name="gr24" draw:text-style-name="P2" xml:id="id32" draw:id="id32" draw:layer="layout" svg:width="4.763cm" svg:height="2.209cm" svg:x="3.71cm" svg:y="16.80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4.156cm" svg:y="16.775cm">
          <draw:text-box>
            <text:p><text:span text:style-name="T18">ActivateOradio</text:span><text:span text:style-name="T18">Ap</text:span></text:p>
          </draw:text-box>
        </draw:frame>
        <draw:frame draw:style-name="gr64" draw:text-style-name="P22" draw:layer="layout" svg:width="2.816cm" svg:height="1.673cm" svg:x="3.752cm" svg:y="17.377cm">
          <draw:text-box>
            <text:p><text:span text:style-name="T3">Entry</text:span><text:span text:style-name="T6"> </text:span></text:p>
            <text:p><text:span text:style-name="T3">Do</text:span></text:p>
            <text:p><text:span text:style-name="T3">Exit</text:span><text:span text:style-name="T6"> </text:span><text:span text:style-name="T14">/</text:span></text:p>
          </draw:text-box>
        </draw:frame>
        <draw:rect draw:style-name="gr24" draw:text-style-name="P2" xml:id="id33" draw:id="id33" draw:layer="layout" svg:width="4.681cm" svg:height="2.305cm" svg:x="3.31cm" svg:y="20.0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98cm" svg:y="20.048cm">
          <draw:text-box>
            <text:p><text:span text:style-name="T18">OradioApActive</text:span></text:p>
          </draw:text-box>
        </draw:frame>
        <draw:frame draw:style-name="gr64" draw:text-style-name="P22" draw:layer="layout" svg:width="2.381cm" svg:height="1.673cm" svg:x="3.634cm" svg:y="20.656cm">
          <draw:text-box>
            <text:p><text:span text:style-name="T3">Entry</text:span><text:span text:style-name="T6"> </text:span><text:span text:style-name="T14">/</text:span></text:p>
            <text:p><text:span text:style-name="T3">Do</text:span></text:p>
            <text:p><text:span text:style-name="T3">Exit</text:span><text:span text:style-name="T6"> </text:span></text:p>
          </draw:text-box>
        </draw:frame>
        <draw:custom-shape draw:style-name="gr13" draw:text-style-name="P2" xml:id="id30" draw:id="id30" draw:layer="layout" svg:width="0.6cm" svg:height="0.6cm" svg:x="6.043cm" svg:y="23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34" draw:id="id34" draw:layer="layout" svg:width="0.4cm" svg:height="0.4cm" svg:x="8.486cm" svg:y="1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8.486cm" svg:y1="16.133cm" svg:x2="7.149cm" svg:y2="16.807cm" draw:start-shape="id34" draw:start-glue-point="6" draw:end-shape="id32" draw:end-glue-point="9" svg:d="M8486 16133h-1337v674" svg:viewBox="0 0 1338 675">
          <text:p/>
        </draw:connector>
        <draw:g draw:style-name="gr4">
          <draw:frame draw:style-name="gr23" draw:text-style-name="P24" draw:layer="layout" svg:width="7.869cm" svg:height="0.639cm" svg:x="1.635cm" svg:y="15.086cm">
            <draw:text-box>
              <text:p text:style-name="P10"><text:span text:style-name="T19">OradioAccessP</text:span><text:span text:style-name="T19">oint</text:span></text:p>
            </draw:text-box>
          </draw:frame>
          <draw:rect draw:style-name="gr24" draw:text-style-name="P2" draw:layer="layout" svg:width="7.869cm" svg:height="10.16cm" svg:x="1.703cm" svg:y="15.052cm" draw:corner-radius="0.5cm">
            <draw:glue-point draw:id="4" svg:x="-3.688cm" svg:y="-5.004cm"/>
            <text:p/>
          </draw:rect>
          <draw:line draw:style-name="gr57" draw:text-style-name="P2" draw:layer="layout" svg:x1="1.705cm" svg:y1="15.755cm" svg:x2="9.57cm" svg:y2="15.751cm">
            <text:p/>
          </draw:line>
        </draw:g>
        <draw:frame draw:style-name="gr64" draw:text-style-name="P22" draw:layer="layout" svg:width="1.935cm" svg:height="1.673cm" svg:x="1.922cm" svg:y="15.922cm">
          <draw:text-box>
            <text:p><text:span text:style-name="T3">E</text:span><text:span text:style-name="T3">nt</text:span><text:span text:style-name="T3">ry</text:span><text:span text:style-name="T6"> </text:span><text:span text:style-name="T6">/</text:span></text:p>
            <text:p><text:span text:style-name="T3">D</text:span><text:span text:style-name="T3">o</text:span><text:span text:style-name="T6"> /</text:span></text:p>
            <text:p><text:span text:style-name="T3">E</text:span><text:span text:style-name="T3">xit</text:span><text:span text:style-name="T6"> </text:span><text:span text:style-name="T6">/</text:span></text:p>
          </draw:text-box>
        </draw:frame>
        <draw:line draw:style-name="gr60" draw:text-style-name="P2" draw:layer="layout" svg:x1="1cm" svg:y1="14.435cm" svg:x2="10.207cm" svg:y2="14.435cm">
          <text:p/>
        </draw:line>
        <draw:line draw:style-name="gr60" draw:text-style-name="P2" draw:layer="layout" svg:x1="1.001cm" svg:y1="25.535cm" svg:x2="10.208cm" svg:y2="25.535cm">
          <text:p/>
        </draw:line>
        <draw:g draw:style-name="gr1">
          <draw:custom-shape draw:style-name="gr65" draw:text-style-name="P30" draw:layer="layout" svg:width="0.717cm" svg:height="0.718cm" svg:x="9.237cm" svg:y="19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16cm" svg:y1="19.418cm" svg:x2="9.877cm" svg:y2="19.98cm">
              <text:p/>
            </draw:line>
            <draw:line draw:style-name="gr57" draw:text-style-name="P2" draw:layer="layout" svg:x1="9.871cm" svg:y1="19.398cm" svg:x2="9.287cm" svg:y2="19.981cm">
              <text:p/>
            </draw:line>
          </draw:g>
        </draw:g>
        <draw:frame draw:style-name="gr51" draw:text-style-name="P9" draw:layer="layout" svg:width="1.588cm" svg:height="0.725cm" svg:x="8.219cm" svg:y="19.96cm">
          <draw:text-box>
            <text:p><text:span text:style-name="T7">Error</text:span></text:p>
          </draw:text-box>
        </draw:frame>
      </draw:page>
      <draw:page draw:name="page3" draw:style-name="dp1" draw:master-page-name="Default">
        <draw:g draw:style-name="gr4">
          <draw:frame draw:style-name="gr23" draw:text-style-name="P24" draw:layer="layout" svg:width="19.04cm" svg:height="1.319cm" svg:x="1.06cm" svg:y="0.997cm">
            <draw:text-box>
              <text:p text:style-name="P10"><text:span text:style-name="T19">OradioAccessP</text:span><text:span text:style-name="T19">oint</text:span></text:p>
            </draw:text-box>
          </draw:frame>
          <draw:rect draw:style-name="gr24" draw:text-style-name="P25" draw:layer="layout" svg:width="19.04cm" svg:height="27.591cm" svg:x="1cm" svg:y="1.109cm" draw:corner-radius="0.5cm">
            <text:p/>
          </draw:rect>
          <draw:line draw:style-name="gr52" draw:text-style-name="P2" draw:layer="layout" svg:x1="1.004cm" svg:y1="2.148cm" svg:x2="20.031cm" svg:y2="2.137cm">
            <text:p/>
          </draw:line>
        </draw:g>
        <draw:frame draw:style-name="gr68" draw:text-style-name="P31" draw:layer="layout" svg:width="5.715cm" svg:height="0.722cm" svg:x="12.43cm" svg:y="18.775cm">
          <draw:text-box>
            <text:p><text:span text:style-name="T22">/</text:span><text:span text:style-name="T22">playSound(SOUND_</text:span><text:span text:style-name="T22">NO_WIFI)</text:span></text:p>
          </draw:text-box>
        </draw:frame>
        <draw:connector draw:style-name="gr63" draw:text-style-name="P2" draw:layer="layout" svg:x1="5.01cm" svg:y1="2.822cm" svg:x2="8.822cm" svg:y2="4.505cm" draw:end-shape="id35" draw:end-glue-point="10" svg:d="M5010 2822v591h3812v1092" svg:viewBox="0 0 3813 1684">
          <text:p/>
        </draw:connector>
        <draw:connector draw:style-name="gr63" draw:text-style-name="P2" draw:layer="layout" draw:line-skew="1.618cm" svg:x1="10.141cm" svg:y1="17.671cm" svg:x2="10.145cm" svg:y2="19.77cm" draw:start-shape="id36" draw:start-glue-point="7" draw:end-shape="id37" draw:end-glue-point="1" svg:d="M10141 17671h2144v2099h-2140" svg:viewBox="0 0 2145 2100">
          <text:p/>
        </draw:connector>
        <draw:connector draw:style-name="gr63" draw:text-style-name="P2" draw:layer="layout" draw:line-skew="-2.3cm" svg:x1="9.541cm" svg:y1="17.671cm" svg:x2="9.545cm" svg:y2="19.77cm" draw:start-shape="id36" draw:start-glue-point="5" draw:end-shape="id37" draw:end-glue-point="3" svg:d="M9541 17671h-2826v2099h2830" svg:viewBox="0 0 2831 2100">
          <text:p/>
        </draw:connector>
        <draw:frame draw:style-name="gr54" draw:text-style-name="P31" draw:layer="layout" svg:width="5.446cm" svg:height="0.952cm" svg:x="1.586cm" svg:y="18.78cm">
          <draw:text-box>
            <text:p><text:span text:style-name="T22">/</text:span><text:span text:style-name="T22">playSound(SOUND_</text:span><text:span text:style-name="T22">WIFI)</text:span></text:p>
          </draw:text-box>
        </draw:frame>
        <draw:g draw:style-name="gr39" xml:id="id37" draw:id="id37">
          <draw:custom-shape draw:style-name="gr26" draw:text-style-name="P1" draw:layer="layout" svg:width="0.4cm" svg:height="0.4cm" svg:x="9.645cm" svg:y="19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9.545cm" svg:y="19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3.493cm" svg:height="1.357cm" svg:x="5.762cm" svg:y="2.5cm">
          <draw:text-box>
            <text:p><text:span text:style-name="T14">LongPressPlay</text:span></text:p>
            <text:p><text:span text:style-name="T11">/startOradioAP()</text:span></text:p>
          </draw:text-box>
        </draw:frame>
        <draw:connector draw:style-name="gr63" draw:text-style-name="P2" draw:layer="layout" draw:line-skew="0.505cm" svg:x1="11.175cm" svg:y1="9.217cm" svg:x2="13.39cm" svg:y2="12.054cm" draw:start-shape="id35" draw:start-glue-point="12" draw:end-shape="id38" draw:end-glue-point="7" svg:d="M11175 9217v1943h2215v894" svg:viewBox="0 0 2216 2838">
          <text:p/>
        </draw:connector>
        <draw:frame draw:style-name="gr29" draw:text-style-name="P33" draw:layer="layout" svg:width="2.14cm" svg:height="1.205cm" svg:x="15.37cm" svg:y="12.177cm">
          <draw:text-box>
            <text:p text:style-name="P32"><text:span text:style-name="T23">????</text:span></text:p>
            <text:p text:style-name="P32"><text:span text:style-name="T23">timeOut</text:span></text:p>
            <text:p text:style-name="P32"><text:span text:style-name="T23">/gotoError()</text:span></text:p>
          </draw:text-box>
        </draw:frame>
        <draw:g draw:style-name="gr1" xml:id="id39" draw:id="id39">
          <draw:custom-shape draw:style-name="gr65" draw:text-style-name="P30" draw:layer="layout" svg:width="0.717cm" svg:height="0.718cm" svg:x="19.015cm" svg:y="9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094cm" svg:y1="9.575cm" svg:x2="19.655cm" svg:y2="10.137cm">
              <text:p/>
            </draw:line>
            <draw:line draw:style-name="gr57" draw:text-style-name="P2" draw:layer="layout" svg:x1="19.649cm" svg:y1="9.555cm" svg:x2="19.065cm" svg:y2="10.138cm">
              <text:p/>
            </draw:line>
          </draw:g>
        </draw:g>
        <draw:connector draw:style-name="gr63" draw:text-style-name="P2" draw:layer="layout" svg:x1="12.473cm" svg:y1="14.652cm" svg:x2="9.841cm" svg:y2="17.371cm" draw:start-shape="id38" draw:start-glue-point="5" draw:end-shape="id36" draw:end-glue-point="4" svg:d="M12473 14652v1348h-2632v1371" svg:viewBox="0 0 2633 2720">
          <text:p/>
        </draw:connector>
        <draw:frame draw:style-name="gr70" draw:text-style-name="P34" draw:layer="layout" svg:width="2.97cm" svg:height="1.433cm" svg:x="11.365cm" svg:y="9.609cm">
          <draw:text-box>
            <text:p><text:span text:style-name="T14">ApActive,</text:span></text:p>
            <text:p><text:span text:style-name="T14">ButtonStop</text:span></text:p>
            <text:p><text:span text:style-name="T14">/ - </text:span></text:p>
          </draw:text-box>
        </draw:frame>
        <draw:rect draw:style-name="gr24" draw:text-style-name="P2" xml:id="id35" draw:id="id35" draw:layer="layout" svg:width="7.195cm" svg:height="4.75cm" svg:x="6.822cm" svg:y="4.5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8.302cm" svg:y="4.64cm">
          <draw:text-box>
            <text:p><text:span text:style-name="T18">ActivateOradio</text:span><text:span text:style-name="T18">Ap</text:span></text:p>
          </draw:text-box>
        </draw:frame>
        <draw:frame draw:style-name="gr53" draw:text-style-name="P22" draw:layer="layout" svg:width="6.35cm" svg:height="3.74cm" svg:x="7.25cm" svg:y="5.175cm">
          <draw:text-box>
            <text:p><text:span text:style-name="T3">Entry</text:span><text:span text:style-name="T6"> </text:span></text:p>
            <text:p><text:span text:style-name="T6"><text:s text:c="3"/></text:span><text:span text:style-name="T14">/startLedPlayFlashin</text:span><text:span text:style-name="T14">g();</text:span></text:p>
            <text:p><text:span text:style-name="T14"><text:s text:c="4"/></text:span><text:span text:style-name="T14">playSound(</text:span><text:span text:style-name="T24">SOUND_A</text:span><text:span text:style-name="T24">P_START</text:span><text:span text:style-name="T14">)</text:span></text:p>
            <text:p><text:span text:style-name="T3">Do</text:span><text:span text:style-name="T6"> </text:span><text:span text:style-name="T14">/WaitForWiFiMessag</text:span><text:span text:style-name="T14">e()</text:span></text:p>
            <text:p><text:span text:style-name="T3">Exit</text:span><text:span text:style-name="T6"> </text:span><text:span text:style-name="T14">/</text:span></text:p>
            <text:p><text:span text:style-name="T14"><text:s text:c="2"/></text:span><text:span text:style-name="T14">upon WiFiAp raise </text:span><text:span text:style-name="T14">ApActive</text:span></text:p>
            <text:p><text:span text:style-name="T14"><text:s text:c="2"/></text:span><text:span text:style-name="T14">upon WiFiApFail </text:span><text:span text:style-name="T14">raise ApFail</text:span></text:p>
            <text:p><text:span text:style-name="T14"><text:s text:c="2"/></text:span><text:span text:style-name="T14">upon WaitTimeOut </text:span><text:span text:style-name="T14">raise criticalError</text:span></text:p>
          </draw:text-box>
        </draw:frame>
        <draw:frame draw:style-name="gr51" draw:text-style-name="P9" draw:layer="layout" svg:width="1.588cm" svg:height="0.725cm" svg:x="18.145cm" svg:y="10.207cm">
          <draw:text-box>
            <text:p><text:span text:style-name="T7">Error</text:span></text:p>
          </draw:text-box>
        </draw:frame>
        <draw:connector draw:style-name="gr71" draw:text-style-name="P2" draw:layer="layout" draw:type="curve" draw:line-skew="0.054cm -1.197cm" svg:x1="7.617cm" svg:y1="14.652cm" svg:x2="6.696cm" svg:y2="12.97cm" draw:start-shape="id38" draw:start-glue-point="11" draw:end-shape="id38" draw:end-glue-point="13" svg:d="M7617 14652c0 832-1310 693-2177 65s-1291-1747 1256-1747" svg:viewBox="0 0 2850 2263">
          <text:p/>
        </draw:connector>
        <draw:rect draw:style-name="gr24" draw:text-style-name="P2" xml:id="id38" draw:id="id38" draw:layer="layout" svg:width="8.274cm" svg:height="2.598cm" svg:x="6.696cm" svg:y="12.0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8.285cm" svg:y="12.23cm">
          <draw:text-box>
            <text:p><text:span text:style-name="T18">OradioApActive</text:span></text:p>
          </draw:text-box>
        </draw:frame>
        <draw:frame draw:style-name="gr72" draw:text-style-name="P22" draw:layer="layout" svg:width="8.373cm" svg:height="2.541cm" svg:x="7.032cm" svg:y="12.365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</text:span><text:span text:style-name="T14">()</text:span></text:p>
            <text:p><text:span text:style-name="T3">Exit</text:span><text:span text:style-name="T6"> </text:span></text:p>
            <text:p><text:span text:style-name="T6"><text:s text:c="3"/></text:span><text:span text:style-name="T14">upon WifiMessage </text:span><text:span text:style-name="T14">raise </text:span><text:span text:style-name="T14">OradioApStopped</text:span></text:p>
          </draw:text-box>
        </draw:frame>
        <draw:connector draw:style-name="gr63" draw:text-style-name="P2" draw:layer="layout" svg:x1="14.017cm" svg:y1="8.098cm" svg:x2="19.373cm" svg:y2="9.489cm" draw:start-shape="id35" draw:start-glue-point="8" draw:end-shape="id39" draw:end-glue-point="0" svg:d="M14017 8098h5356v1391" svg:viewBox="0 0 5357 1392">
          <text:p/>
        </draw:connector>
        <draw:frame draw:style-name="gr54" draw:text-style-name="P36" draw:layer="layout" svg:width="3.175cm" svg:height="1.039cm" svg:x="15.287cm" svg:y="7.032cm">
          <draw:text-box>
            <text:p text:style-name="P35"><text:span text:style-name="T14">criticalError</text:span></text:p>
            <text:p text:style-name="P35"><text:span text:style-name="T14">/gotoError</text:span></text:p>
          </draw:text-box>
        </draw:frame>
        <draw:connector draw:style-name="gr63" draw:text-style-name="P2" draw:layer="layout" svg:x1="6.822cm" svg:y1="6.88cm" svg:x2="2.552cm" svg:y2="6.472cm" draw:start-shape="id35" draw:start-glue-point="3" draw:end-shape="id40" draw:end-glue-point="1" svg:d="M6822 6880h-2134v-408h-2136" svg:viewBox="0 0 4271 409">
          <text:p/>
        </draw:connector>
        <draw:frame draw:style-name="gr73" draw:text-style-name="P31" draw:layer="layout" svg:width="3.675cm" svg:height="1.433cm" svg:x="1.77cm" svg:y="13.225cm">
          <draw:text-box>
            <text:p><text:span text:style-name="T22">LongPressPlay</text:span></text:p>
            <text:p><text:span text:style-name="T22">[OradioApActive]</text:span></text:p>
            <text:p><text:span text:style-name="T22">/ --</text:span></text:p>
          </draw:text-box>
        </draw:frame>
        <draw:g draw:style-name="gr39" xml:id="id40" draw:id="id40">
          <draw:custom-shape draw:style-name="gr26" draw:text-style-name="P1" draw:layer="layout" svg:width="0.4cm" svg:height="0.4cm" svg:x="2.052cm" svg:y="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.952cm" svg:y="6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6" draw:text-style-name="P37" draw:layer="layout" svg:width="6.35cm" svg:height="1.433cm" svg:x="1cm" svg:y="7.187cm">
          <draw:text-box>
            <text:p text:style-name="P32"><text:span text:style-name="T25">ApFail</text:span></text:p>
            <text:p text:style-name="P32"><text:span text:style-name="T25">/</text:span><text:span text:style-name="T25">playSound(SOUND_</text:span><text:span text:style-name="T25">AP_STOP)</text:span></text:p>
            <text:p text:style-name="P32"><text:span text:style-name="T25"><text:s/></text:span><text:span text:style-name="T25">stopLedPlayFlashing</text:span><text:span text:style-name="T25">()</text:span></text:p>
          </draw:text-box>
        </draw:frame>
        <draw:custom-shape draw:style-name="gr13" draw:text-style-name="P2" xml:id="id36" draw:id="id36" draw:layer="layout" svg:width="0.6cm" svg:height="0.6cm" svg:x="9.541cm" svg:y="17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34" draw:layer="layout" svg:width="5.08cm" svg:height="1.433cm" svg:x="12.747cm" svg:y="14.97cm">
          <draw:text-box>
            <text:p text:style-name="P38"><text:span text:style-name="T14">ButtonStop,</text:span></text:p>
            <text:p text:style-name="P38"><text:span text:style-name="T14">OradioApStopped</text:span></text:p>
            <text:p text:style-name="P39"><text:span text:style-name="T14">/</text:span><text:span text:style-name="T14">stopLedPlayFlashing</text:span><text:span text:style-name="T14">()</text:span></text:p>
          </draw:text-box>
        </draw:frame>
        <draw:frame draw:style-name="gr75" draw:text-style-name="P34" draw:layer="layout" svg:width="3.493cm" svg:height="0.645cm" svg:x="6.162cm" svg:y="16.875cm">
          <draw:text-box>
            <text:p text:style-name="P38"><text:span text:style-name="T14">[isWifiConnected]</text:span></text:p>
          </draw:text-box>
        </draw:frame>
        <draw:frame draw:style-name="gr76" draw:text-style-name="P34" draw:layer="layout" svg:width="2.222cm" svg:height="0.645cm" svg:x="9.89cm" svg:y="16.982cm">
          <draw:text-box>
            <text:p text:style-name="P38"><text:span text:style-name="T14">[else]</text:span></text:p>
          </draw:text-box>
        </draw:frame>
      </draw:page>
      <draw:page draw:name="page4" draw:style-name="dp1" draw:master-page-name="Default">
        <draw:rect draw:style-name="gr24" draw:text-style-name="P2" xml:id="id42" draw:id="id42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7" draw:text-style-name="P40" draw:layer="layout" svg:width="9.842cm" svg:height="2.09cm" svg:x="4.71cm" svg:y="14.367cm">
          <draw:text-box>
            <text:p><text:span text:style-name="T3">Entry</text:span><text:span text:style-name="T26"> /playSound(SOUND_STOP); setLed(LED_STOP); </text:span><text:span text:style-name="T26">stopPlayers()</text:span></text:p>
            <text:p><text:span text:style-name="T3">do</text:span><text:span text:style-name="T6"> </text:span><text:span text:style-name="T26">/ waitForButtonPressed()</text:span></text:p>
            <text:p><text:span text:style-name="T3">exit</text:span><text:span text:style-name="T6"> / </text:span><text:span text:style-name="T26">on usbAbsent raise 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3" draw:id="id43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8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41"><text:span text:style-name="T27">exit</text:span><text:span text:style-name="T28"> /</text:span><text:span text:style-name="T26">on </text:span><text:span text:style-name="T26">usbAbsent </text:span></text:p>
            <text:p text:style-name="P41"><text:span text:style-name="T26"><text:s text:c="15"/></text:span><text:span text:style-name="T26">raise </text:span><text:span text:style-name="T26">critica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5" draw:id="id45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9" draw:text-style-name="P42" draw:layer="layout" svg:width="6.433cm" svg:height="2.461cm" svg:x="2.822cm" svg:y="24.252cm">
          <draw:text-box>
            <text:p text:style-name="P41"><text:span text:style-name="T27">entry</text:span><text:span text:style-name="T28"> </text:span><text:span text:style-name="T29">/</text:span><text:span text:style-name="T26">playSound(</text:span><text:span text:style-name="T26">SOUND_SP</text:span><text:span text:style-name="T26">OTIFY);</text:span></text:p>
            <text:p text:style-name="P41"><text:span text:style-name="T26">setLed(LED</text:span><text:span text:style-name="T26">_PLAY)</text:span></text:p>
            <text:p><text:span text:style-name="T3">do</text:span><text:span text:style-name="T6"> /</text:span></text:p>
            <text:p text:style-name="P41"><text:span text:style-name="T27">exit</text:span><text:span text:style-name="T28"> / </text:span><text:span text:style-name="T26">on </text:span><text:span text:style-name="T26">usbAbsent </text:span><text:span text:style-name="T26">raise </text:span><text:span text:style-name="T26">criticalError</text:span></text:p>
            <text:p text:style-name="P41"><text:span text:style-name="T26">if not </text:span><text:span text:style-name="T26">isSpotifyCon</text:span><text:span text:style-name="T26">nected raise </text:span><text:span text:style-name="T26">ButtonSt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</text:span><text:span text:style-name="T18">Playing</text:span></text:p>
          </draw:text-box>
        </draw:frame>
        <draw:rect draw:style-name="gr24" draw:text-style-name="P2" xml:id="id47" draw:id="id47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80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)</text:span></text:p>
            <text:p text:style-name="P43"><text:span text:style-name="T3">Do</text:span><text:span text:style-name="T6"> /</text:span></text:p>
            <text:p text:style-name="P43"><text:span text:style-name="T26">shared_q = new Queue(); Create new instances for:</text:span></text:p>
            <text:p text:style-name="P43"><text:span text:style-name="T26">USBService(shared_q); SpotifyConnect(shared_q); </text:span></text:p>
            <text:p text:style-name="P43"><text:span text:style-name="T26">Backlighting(); MPDMonitor(); MPDControl();</text:span></text:p>
            <text:p text:style-name="P43"><text:span text:style-name="T26">PowerSupplyService(); LEDControl(); RMService(); </text:span></text:p>
            <text:p text:style-name="P43"><text:span text:style-name="T26">TouchButtons(shared_q); VolumeControl(shared_q);</text:span></text:p>
            <text:p text:style-name="P43"><text:span text:style-name="T26">WebService(shared_q)</text:span></text:p>
            <text:p><text:span text:style-name="T3">exit</text:span><text:span text:style-name="T6"> </text:span><text:span text:style-name="T26">/if creationFailed then raise criticalError </text:span></text:p>
            <text:p><text:span text:style-name="T26"><text:tab/></text:span><text:span text:style-name="T26">else raise 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n</text:span></text:p>
          </draw:text-box>
        </draw:frame>
        <draw:connector draw:style-name="gr58" draw:text-style-name="P2" draw:layer="layout" svg:x1="10.127cm" svg:y1="12.512cm" svg:x2="9.255cm" svg:y2="13.825cm" draw:start-shape="id41" draw:start-glue-point="5" draw:end-shape="id42" draw:end-glue-point="0" svg:d="M10127 12512v657h-872v656" svg:viewBox="0 0 873 1314">
          <text:p/>
        </draw:connector>
        <draw:connector draw:style-name="gr58" draw:text-style-name="P2" draw:layer="layout" svg:x1="13.21cm" svg:y1="21.722cm" svg:x2="12.605cm" svg:y2="16.365cm" draw:start-shape="id43" draw:start-glue-point="0" draw:end-shape="id42" draw:end-glue-point="4" svg:d="M13210 21722v-2678h-605v-2679" svg:viewBox="0 0 606 5358">
          <text:p/>
        </draw:connector>
        <draw:connector draw:style-name="gr58" draw:text-style-name="P2" draw:layer="layout" svg:x1="8.341cm" svg:y1="18.27cm" svg:x2="4.914cm" svg:y2="23.96cm" draw:start-shape="id44" draw:start-glue-point="5" draw:end-shape="id45" draw:end-glue-point="10" svg:d="M8341 18270h-3427v5690" svg:viewBox="0 0 3428 5691">
          <text:p/>
        </draw:connector>
        <draw:connector draw:style-name="gr58" draw:text-style-name="P2" draw:layer="layout" svg:x1="8.941cm" svg:y1="18.27cm" svg:x2="11.93cm" svg:y2="21.722cm" draw:start-shape="id44" draw:start-glue-point="7" draw:end-shape="id43" draw:end-glue-point="10" svg:d="M8941 18270h2989v3452" svg:viewBox="0 0 2990 3453">
          <text:p/>
        </draw:connector>
        <draw:connector draw:style-name="gr58" draw:text-style-name="P2" draw:layer="layout" draw:line-skew="0cm -1.087cm" svg:x1="4.037cm" svg:y1="23.96cm" svg:x2="4.175cm" svg:y2="15.095cm" draw:start-shape="id45" draw:start-glue-point="9" draw:end-shape="id42" draw:end-glue-point="3" svg:d="M4037 23960v-3797h-1450v-5068h1588" svg:viewBox="0 0 1589 8866">
          <text:p/>
        </draw:connector>
        <draw:custom-shape draw:style-name="gr25" draw:text-style-name="P1" xml:id="id46" draw:id="id46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line-skew="-0.295cm" svg:x1="13.212cm" svg:y1="2.657cm" svg:x2="8.62cm" svg:y2="3.441cm" draw:start-shape="id46" draw:start-glue-point="8" draw:end-shape="id47" draw:end-glue-point="0" svg:d="M13212 2657v98h-4592v686" svg:viewBox="0 0 4593 785">
          <text:p/>
        </draw:connector>
        <draw:rect draw:style-name="gr24" draw:text-style-name="P2" xml:id="id41" draw:id="id41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81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6">waitForUsbMessage()</text:span></text:p>
            <text:p><text:span text:style-name="T27">Exit</text:span><text:span text:style-name="T28"> </text:span></text:p>
            <text:p text:style-name="P41"><text:span text:style-name="T26">=&gt; On usbPresent raise mpdCreationDone</text:span></text:p>
            <text:p text:style-name="P41"><text:span text:style-name="T26">=&gt; On usbAbsent raise criticalError</text:span></text:p>
          </draw:text-box>
        </draw:frame>
        <draw:frame draw:style-name="gr82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8" draw:text-style-name="P2" draw:layer="layout" svg:x1="10.634cm" svg:y1="7.667cm" svg:x2="11.072cm" svg:y2="9.655cm" draw:start-shape="id47" draw:start-glue-point="5" draw:end-shape="id41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nDone</text:span></text:p>
            <text:p><text:span text:style-name="T11">/startMpdC</text:span><text:span text:style-name="T30">re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8" draw:text-style-name="P2" draw:layer="layout" svg:x1="13.7cm" svg:y1="6.638cm" svg:x2="18.773cm" svg:y2="12.112cm" draw:start-shape="id47" draw:start-glue-point="8" draw:end-shape="id48" draw:end-glue-point="0" svg:d="M13700 6638h5073v5474" svg:viewBox="0 0 5074 5475">
          <text:p/>
        </draw:connector>
        <draw:connector draw:style-name="gr58" draw:text-style-name="P2" draw:layer="layout" svg:x1="12.7cm" svg:y1="11.816cm" svg:x2="18.415cm" svg:y2="12.471cm" draw:start-shape="id41" draw:start-glue-point="8" draw:end-shape="id48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8" draw:text-style-name="P2" draw:layer="layout" svg:x1="14.335cm" svg:y1="14.653cm" svg:x2="18.773cm" svg:y2="12.83cm" draw:start-shape="id42" draw:start-glue-point="11" draw:end-shape="id48" draw:end-glue-point="2" svg:d="M14335 14653h4438v-1823" svg:viewBox="0 0 4439 1824">
          <text:p/>
        </draw:connector>
        <draw:connector draw:style-name="gr58" draw:text-style-name="P2" draw:layer="layout" draw:line-skew="0.612cm" svg:x1="15.74cm" svg:y1="23.643cm" svg:x2="19.572cm" svg:y2="25.231cm" draw:start-shape="id43" draw:start-glue-point="8" draw:end-shape="id49" draw:end-glue-point="2" svg:d="M15740 23643h2336v2114h1496v-526" svg:viewBox="0 0 3833 2115">
          <text:p/>
        </draw:connector>
        <draw:connector draw:style-name="gr58" draw:text-style-name="P2" draw:layer="layout" draw:line-skew="1.939cm" svg:x1="4.176cm" svg:y1="26.5cm" svg:x2="19.572cm" svg:y2="25.231cm" draw:start-shape="id45" draw:start-glue-point="6" draw:end-shape="id49" draw:end-glue-point="2" svg:d="M4176 26500v2440h15396v-3709" svg:viewBox="0 0 15397 3710">
          <text:p/>
        </draw:connector>
        <draw:frame draw:style-name="gr83" draw:text-style-name="P14" draw:layer="layout" svg:width="4.763cm" svg:height="2.223cm" svg:x="15.3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31">/playSound(</text:span><text:span text:style-name="T11">SOUND_P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74" draw:text-style-name="P14" draw:layer="layout" svg:width="4.445cm" svg:height="1.27cm" svg:x="4.71cm" svg:y="18.68cm">
          <draw:text-box>
            <text:p><text:span text:style-name="T11">/playSound(</text:span><text:span text:style-name="T32">SOUND_SP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4" draw:text-style-name="P14" draw:layer="layout" svg:width="3.81cm" svg:height="1.535cm" svg:x="8.22cm" svg:y="19.567cm">
          <draw:text-box>
            <text:p><text:span text:style-name="T11">/playSound(</text:span><text:span text:style-name="T32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29" draw:text-style-name="P14" draw:layer="layout" svg:width="2.54cm" svg:height="0.887cm" svg:x="1.635cm" svg:y="20.367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85" draw:text-style-name="P44" draw:layer="layout" svg:width="4.445cm" svg:height="1.587cm" svg:x="14.652cm" svg:y="19.098cm">
          <draw:text-box>
            <text:p><text:span text:style-name="T30">VolumeChanged</text:span></text:p>
            <text:p><text:span text:style-name="T30">/playSound(SOUND_PLAY)</text:span></text:p>
            <text:p><text:span text:style-name="T30">/setLed(LED_PLAY</text:span></text:p>
            <text:p><text:span text:style-name="T30">/startMpdPlayback()</text:span></text:p>
          </draw:text-box>
        </draw:frame>
        <draw:frame draw:style-name="gr56" draw:text-style-name="P14" draw:layer="layout" svg:width="2.54cm" svg:height="0.953cm" svg:x="12.43cm" svg:y="17.509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48" draw:id="id48">
          <draw:custom-shape draw:style-name="gr65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49" draw:id="id49">
          <draw:custom-shape draw:style-name="gr65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6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29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7" draw:text-style-name="P2" draw:layer="layout" draw:type="curve" draw:line-skew="-0.15cm" svg:x1="2.587cm" svg:y1="24.531cm" svg:x2="2.587cm" svg:y2="25.799cm" draw:start-shape="id45" draw:start-glue-point="11" draw:end-shape="id45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8" draw:text-style-name="P2" draw:layer="layout" draw:line-skew="-0.554cm" svg:x1="9.255cm" svg:y1="24.531cm" svg:x2="10.681cm" svg:y2="22.326cm" draw:start-shape="id45" draw:start-glue-point="13" draw:end-shape="id43" draw:end-glue-point="16" svg:d="M9255 24531h159v-2205h1267" svg:viewBox="0 0 1427 2206">
          <text:p/>
        </draw:connector>
        <draw:frame draw:style-name="gr88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PRESETx)</text:span></text:p>
            <text:p><text:span text:style-name="T11">/setLed(LED_PRESETx)</text:span></text:p>
            <text:p><text:span text:style-name="T11">/startMpdPlayback()</text:span></text:p>
          </draw:text-box>
        </draw:frame>
        <draw:connector draw:style-name="gr58" draw:text-style-name="P2" draw:layer="layout" svg:x1="10.64cm" svg:y1="27.17cm" svg:x2="5.921cm" svg:y2="26.5cm" draw:start-shape="id50" draw:start-glue-point="5" draw:end-shape="id45" draw:end-glue-point="2" svg:d="M10640 27170h-4719v-670" svg:viewBox="0 0 4720 671">
          <text:p/>
        </draw:connector>
        <draw:frame draw:style-name="gr76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7" draw:text-style-name="P2" draw:layer="layout" draw:type="curve" svg:x1="15.74cm" svg:y1="22.992cm" svg:x2="15.74cm" svg:y2="22.261cm" draw:start-shape="id43" draw:start-glue-point="1" draw:end-shape="id43" draw:end-glue-point="12" svg:d="M15740 22992c751 0 751-731 0-731" svg:viewBox="0 0 564 732">
          <text:p/>
        </draw:connector>
        <draw:frame draw:style-name="gr89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NEXT)</text:span></text:p>
            <text:p><text:span text:style-name="T11">/nextSong()</text:span></text:p>
          </draw:text-box>
        </draw:frame>
        <draw:custom-shape draw:style-name="gr13" draw:text-style-name="P2" xml:id="id50" draw:id="id50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0.703cm" svg:y1="23.649cm" svg:x2="10.94cm" svg:y2="26.87cm" draw:start-shape="id43" draw:start-glue-point="9" draw:end-shape="id50" draw:end-glue-point="4" svg:d="M10703 23649h-523v1905h760v1316" svg:viewBox="0 0 761 3222">
          <text:p/>
        </draw:connector>
        <draw:connector draw:style-name="gr58" draw:text-style-name="P2" draw:layer="layout" draw:line-skew="-0.946cm" svg:x1="11.24cm" svg:y1="27.17cm" svg:x2="14.241cm" svg:y2="27.97cm" draw:start-shape="id50" draw:start-glue-point="7" draw:end-shape="id51" draw:end-glue-point="5" svg:d="M11240 27170h555v800h2446" svg:viewBox="0 0 3002 801">
          <text:p/>
        </draw:connector>
        <draw:frame draw:style-name="gr90" draw:text-style-name="P45" draw:layer="layout" svg:width="4.127cm" svg:height="0.888cm" svg:x="15.505cm" svg:y="26.564cm">
          <draw:text-box>
            <text:p><text:span text:style-name="T33">/playSound(</text:span><text:span text:style-name="T34">SOUND_NEXT</text:span><text:span text:style-name="T35">)</text:span></text:p>
            <text:p text:style-name="P41"><text:span text:style-name="T35">/nextSong()</text:span></text:p>
          </draw:text-box>
        </draw:frame>
        <draw:custom-shape draw:style-name="gr13" draw:text-style-name="P2" xml:id="id44" draw:id="id44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7.827cm" svg:y1="16.365cm" svg:x2="8.641cm" svg:y2="17.97cm" draw:start-shape="id42" draw:start-glue-point="12" draw:end-shape="id44" draw:end-glue-point="4" svg:d="M7827 16365v790h814v815" svg:viewBox="0 0 815 1606">
          <text:p/>
        </draw:connector>
        <draw:frame draw:style-name="gr75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75" draw:text-style-name="P34" draw:layer="layout" svg:width="3.81cm" svg:height="0.645cm" svg:x="5.092cm" svg:y="17.71cm">
          <draw:text-box>
            <text:p><text:span text:style-name="T14">[</text:span><text:span text:style-name="T26">isSpotifyConnected</text:span><text:span text:style-name="T14">]</text:span></text:p>
          </draw:text-box>
        </draw:frame>
        <draw:frame draw:style-name="gr75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8" draw:text-style-name="P2" draw:layer="layout" draw:line-skew="0.451cm -0.397cm" svg:x1="14.335cm" svg:y1="15.746cm" svg:x2="14.773cm" svg:y2="21.722cm" draw:start-shape="id42" draw:start-glue-point="8" draw:end-shape="id43" draw:end-glue-point="7" svg:d="M14335 15746h952v2901h-514v3075" svg:viewBox="0 0 953 5977">
          <text:p/>
        </draw:connector>
        <draw:frame draw:style-name="gr75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76" draw:text-style-name="P44" draw:layer="layout" svg:width="3.175cm" svg:height="0.635cm" svg:x="7.785cm" svg:y="26.617cm">
          <draw:text-box>
            <text:p><text:span text:style-name="T30">[isSpotifyConnected]</text:span></text:p>
          </draw:text-box>
        </draw:frame>
        <draw:frame draw:style-name="gr75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51" draw:id="id51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4.541cm" svg:y1="27.67cm" svg:x2="11.478cm" svg:y2="24.229cm" draw:start-shape="id51" draw:start-glue-point="4" draw:end-shape="id43" draw:end-glue-point="17" svg:d="M14541 27670v-1716h-3063v-1725" svg:viewBox="0 0 3064 3442">
          <text:p/>
        </draw:connector>
        <draw:connector draw:style-name="gr58" draw:text-style-name="P2" draw:layer="layout" draw:line-skew="0.238cm" svg:x1="14.841cm" svg:y1="27.97cm" svg:x2="15.315cm" svg:y2="24.229cm" draw:start-shape="id51" draw:start-glue-point="7" draw:end-shape="id43" draw:end-glue-point="15" svg:d="M14841 27970h764v-2016h-290v-1725" svg:viewBox="0 0 765 3742">
          <text:p/>
        </draw:connector>
        <draw:frame draw:style-name="gr76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5" draw:layer="layout" svg:width="4.127cm" svg:height="0.953cm" svg:x="11.395cm" svg:y="25.047cm">
          <draw:text-box>
            <text:p><text:span text:style-name="T33">/playSound(</text:span><text:span text:style-name="T34">SOUND_PLAY</text:span><text:span text:style-name="T35">)</text:span></text:p>
            <text:p text:style-name="P41"><text:span text:style-name="T35">/setLed(LED_PLAY)</text:span></text:p>
          </draw:text-box>
        </draw:frame>
        <draw:frame draw:style-name="gr75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  <draw:frame draw:style-name="gr35" draw:text-style-name="P46" draw:layer="layout" svg:width="15.24cm" svg:height="1.905cm" svg:x="2.905cm" svg:y="30.21cm">
          <draw:text-box>
            <text:p>Volume 4 sec not active when OFF pressed</text:p>
          </draw:text-box>
        </draw:frame>
      </draw:page>
      <draw:page draw:name="page5" draw:style-name="dp1" draw:master-page-name="Default">
        <draw:connector draw:style-name="gr91" draw:text-style-name="P2" draw:layer="layout" svg:x1="8.067cm" svg:y1="11.833cm" svg:x2="14.017cm" svg:y2="5.923cm" draw:start-shape="id52" draw:start-glue-point="1" draw:end-shape="id53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3" draw:id="id53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2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3" draw:text-style-name="P47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52" draw:id="id52">
          <draw:custom-shape draw:style-name="gr65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4" draw:id="id54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2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3" draw:text-style-name="P47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91" draw:text-style-name="P2" draw:layer="layout" svg:x1="8.067cm" svg:y1="11.833cm" svg:x2="14.018cm" svg:y2="8.522cm" draw:start-shape="id52" draw:end-shape="id54" draw:end-glue-point="3" svg:d="M8067 11833h2987v-3311h2964" svg:viewBox="0 0 5952 3312">
          <text:p/>
        </draw:connector>
        <draw:custom-shape draw:style-name="gr44" draw:text-style-name="P1" xml:id="id55" draw:id="id55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3" draw:text-style-name="P47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91" draw:text-style-name="P2" draw:layer="layout" svg:x1="8.067cm" svg:y1="11.833cm" svg:x2="13.999cm" svg:y2="11.103cm" draw:start-shape="id52" draw:end-shape="id55" draw:end-glue-point="6" svg:d="M8067 11833h2978v-730h2954" svg:viewBox="0 0 5933 731">
          <text:p/>
        </draw:connector>
        <draw:custom-shape draw:style-name="gr44" draw:text-style-name="P1" xml:id="id56" draw:id="id56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3" draw:text-style-name="P47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91" draw:text-style-name="P2" draw:layer="layout" svg:x1="8.067cm" svg:y1="11.833cm" svg:x2="14.017cm" svg:y2="13.619cm" draw:start-shape="id52" draw:start-glue-point="1" draw:end-shape="id56" draw:end-glue-point="6" svg:d="M8067 11833h2987v1786h2963" svg:viewBox="0 0 5951 1787">
          <text:p/>
        </draw:connector>
        <draw:custom-shape draw:style-name="gr44" draw:text-style-name="P1" xml:id="id57" draw:id="id57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3" draw:text-style-name="P47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91" draw:text-style-name="P2" draw:layer="layout" svg:x1="8.067cm" svg:y1="11.833cm" svg:x2="14.017cm" svg:y2="16.159cm" draw:start-shape="id52" draw:end-shape="id57" draw:end-glue-point="6" svg:d="M8067 11833h2987v4326h2963" svg:viewBox="0 0 5951 4327">
          <text:p/>
        </draw:connector>
        <draw:custom-shape draw:style-name="gr44" draw:text-style-name="P1" xml:id="id58" draw:id="id58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3" draw:text-style-name="P47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91" draw:text-style-name="P2" draw:layer="layout" svg:x1="8.067cm" svg:y1="11.833cm" svg:x2="14.017cm" svg:y2="18.94cm" draw:start-shape="id52" draw:end-shape="id58" draw:end-glue-point="6" svg:d="M8067 11833h2987v7107h2963" svg:viewBox="0 0 5951 7108">
          <text:p/>
        </draw:connector>
        <draw:custom-shape draw:style-name="gr44" draw:text-style-name="P1" xml:id="id59" draw:id="id59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3" draw:text-style-name="P47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91" draw:text-style-name="P2" draw:layer="layout" svg:x1="8.067cm" svg:y1="11.833cm" svg:x2="14.018cm" svg:y2="21.74cm" draw:start-shape="id52" draw:start-glue-point="1" draw:end-shape="id59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5T18:00:04.739226459</dc:date>
    <meta:editing-duration>PT5H55M39S</meta:editing-duration>
    <meta:editing-cycles>52</meta:editing-cycles>
    <meta:print-date>2026-04-03T16:45:26.431431754</meta:print-date>
    <dc:creator>Henk</dc:creator>
    <meta:document-statistic meta:object-count="395"/>
  </office:meta>
</office:document-meta>
</file>