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2.01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737cm" loext:decorative="false"/>
      <style:paragraph-properties style:writing-mode="lr-tb"/>
    </style:style>
    <style:style style:name="gr59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0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2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0.485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69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1.81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0.595cm" loext:decorative="false"/>
      <style:paragraph-properties style:writing-mode="lr-tb"/>
    </style:style>
    <style:style style:name="gr73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0.955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1.84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fo:min-height="2.211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867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37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1.11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1.285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1.067cm" loext:decorative="false"/>
      <style:paragraph-properties style:writing-mode="lr-tb"/>
    </style:style>
    <style:style style:name="gr8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in-height="0.638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91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92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93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="none" draw:fill-color="#ffffff"/>
      <style:text-properties fo:font-size="10pt" style:font-size-asian="12pt" style:font-size-complex="12pt"/>
    </style:style>
    <style:style style:name="P28" style:family="paragraph">
      <style:paragraph-properties fo:text-align="center"/>
      <style:text-properties fo:font-size="14pt" fo:font-style="italic" style:font-size-asian="14pt" style:font-size-complex="14pt"/>
    </style:style>
    <style:style style:name="P29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style:text-properties fo:font-size="8pt" style:font-size-asian="8pt" style:font-size-complex="8pt"/>
    </style:style>
    <style:style style:name="P32" style:family="paragraph">
      <loext:graphic-properties draw:fill="none" draw:fill-color="#ffffff"/>
      <style:text-properties fo:font-size="8pt" style:font-size-asian="8pt" style:font-size-complex="8pt"/>
    </style:style>
    <style:style style:name="P33" style:family="paragraph"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text-properties fo:font-size="10pt" style:font-size-asian="10pt" style:font-size-complex="10pt"/>
    </style:style>
    <style:style style:name="P35" style:family="paragraph">
      <loext:graphic-properties draw:fill="none"/>
      <style:text-properties fo:font-size="12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8" style:family="paragraph">
      <style:paragraph-properties fo:margin-left="0cm" fo:margin-right="0cm" fo:text-indent="0cm"/>
    </style:style>
    <style:style style:name="P39" style:family="paragraph">
      <loext:graphic-properties draw:fill="none" draw:fill-color="#ffffff"/>
      <style:text-properties fo:font-size="8pt" style:font-size-asian="10pt" style:font-size-complex="10pt"/>
    </style:style>
    <style:style style:name="P40" style:family="paragraph">
      <loext:graphic-properties draw:fill="none" draw:fill-color="#ffffff"/>
      <style:text-properties fo:color="#000000" loext:opacity="100%" fo:font-size="8pt"/>
    </style:style>
    <style:style style:name="P41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style:font-size-asian="12pt" style:font-size-complex="12pt"/>
    </style:style>
    <style:style style:name="T21" style:family="text">
      <style:text-properties fo:font-size="14pt" fo:font-style="italic" style:font-size-asian="14pt" style:font-size-complex="14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8pt" style:font-size-asian="10pt" style:font-size-complex="1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fo:font-size="8pt" style:font-size-asian="10pt" style:font-size-complex="10pt"/>
    </style:style>
    <style:style style:name="T31" style:family="text">
      <style:text-properties fo:color="#000000" loext:opacity="100%" fo:font-size="8pt"/>
    </style:style>
    <style:style style:name="T32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machin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e Pseudo 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State</text:span></text:p>
            <text:p><text:span text:style-name="T4">Entry action</text:span><text:span text:style-name="T5">s: are executed when entering a state.</text:span></text:p>
            <text:p><text:span text:style-name="T4">Do actions</text:span><text:span text:style-name="T5">: are performed while in that state</text:span></text:p>
            <text:p><text:span text:style-name="T4">Exit actions</text:span><text:span text:style-name="T5">: are executed when leaving a 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me</text:span></text:p>
              <text:p><text:span text:style-name="T8"/></text:p>
              <text:p><text:span text:style-name="T3">entry</text:span><text:span text:style-name="T6"> /action</text:span></text:p>
              <text:p><text:span text:style-name="T3">do</text:span><text:span text:style-name="T6"> /action</text:span></text:p>
              <text:p><text:span text:style-name="T3">exit</text:span><text:span text:style-name="T6"> 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e 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 text:style-name="P12"><text:span text:style-name="T10"/></text:p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6.72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3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2.58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5" draw:layer="layout" svg:width="8.31cm" svg:height="1cm" svg:x="11.405cm" svg:y="19.71cm">
          <draw:text-box>
            <text:p text:style-name="P10"><text:span text:style-name="T12">Composite 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3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3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6" draw:layer="layout" svg:width="9.525cm" svg:height="1.905cm" svg:x="11.16cm" svg:y="1.317cm">
          <draw:text-box>
            <text:p text:style-name="P4"><text:span text:style-name="T13">Fork</text:span><text:span text:style-name="T14">: a pseudo-state that splits an incoming transition into two or more outgoing transitions, allowing for concurrent paths. It is used to represent the beginning of parallel processes within a state machine.</text:span></text:p>
          </draw:text-box>
        </draw:frame>
        <draw:frame draw:style-name="gr36" draw:text-style-name="P16" draw:layer="layout" svg:width="8.89cm" svg:height="2.221cm" svg:x="11.11cm" svg:y="3.54cm">
          <draw:text-box>
            <text:p text:style-name="P4"><text:span text:style-name="T13">Join</text:span><text:span text:style-name="T14">: a state used to combine multiple incoming transitions into a single outgoing transition, effectively synchronizing concurrent activities. It allows the system to wait for all incoming transitions to complete before proceeding to the next 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3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3.135cm" svg:y="23.468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3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3.469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6" draw:layer="layout" svg:width="8.255cm" svg:height="1.827cm" svg:x="11.442cm" svg:y="25.472cm">
          <draw:text-box>
            <text:p text:style-name="P4"><text:span text:style-name="T13">Concurrent regions:</text:span><text:span text:style-name="T14"> represent separate areas of concern within a state, allowing for independent state transitions in each region, simultaneously</text:span></text:p>
          </draw:text-box>
        </draw:frame>
        <draw:frame draw:style-name="gr42" draw:text-style-name="P9" draw:layer="layout" svg:width="8.255cm" svg:height="2.093cm" svg:x="4.175cm" svg:y="9.067cm">
          <draw:text-box>
            <text:p><text:span text:style-name="T15">event:</text:span><text:span text:style-name="T7"> trigger that causes the transition.</text:span></text:p>
            <text:p><text:span text:style-name="T15">/action</text:span><text:span text:style-name="T7">: An operation executed in response to an accepted event </text:span></text:p>
          </draw:text-box>
        </draw:frame>
        <draw:frame draw:style-name="gr36" draw:text-style-name="P16" draw:layer="layout" svg:width="6.667cm" svg:height="2.221cm" svg:x="13.365cm" svg:y="9.563cm">
          <draw:text-box>
            <text:p text:style-name="P4"><text:span text:style-name="T13">Composite state</text:span><text:span text:style-name="T14">: A state that has substructure and internal behavior. It can contain one or more regions, which can contain one or more states. The state diagrams are executed in parallel </text:span></text:p>
          </draw:text-box>
        </draw:frame>
        <draw:custom-shape draw:style-name="gr43" draw:text-style-name="P17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8" draw:layer="layout" svg:width="4.762cm" svg:height="0.806cm" svg:x="1.17cm" svg:y="19.097cm">
          <draw:text-box>
            <text:p><text:span text:style-name="T16">Package</text:span></text:p>
          </draw:text-box>
        </draw:frame>
      </draw:page>
      <draw:page draw:name="page2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9" draw:layer="layout" svg:width="8.514cm" svg:height="2.945cm" svg:x="0.959cm" svg:y="1.018cm">
              <draw:text-box>
                <text:p text:style-name="P4"><text:span text:style-name="T17">OradioMai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5.08cm" svg:height="1.905cm" svg:x="14.335cm" svg:y="1.317cm">
          <text:p text:style-name="P20"><text:span text:style-name="T7">1-Power-ON</text:span></text:p>
          <text:p text:style-name="P20"><text:span text:style-name="T7">2-Raspi-BOOT</text:span></text:p>
          <text:p text:style-name="P20"><text:span text:style-name="T7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2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3" xml:id="id18" draw:id="id18" draw:layer="layout" svg:width="3.175cm" svg:height="0.725cm" svg:x="6.297cm" svg:y="2.91cm">
          <draw:text-box>
            <text:p><text:span text:style-name="T18">ColdStartup</text:span></text:p>
          </draw:text-box>
        </draw:frame>
        <draw:rect draw:style-name="gr24" draw:text-style-name="P2" xml:id="id22" draw:id="id22" draw:layer="layout" svg:width="4.829cm" svg:height="2.223cm" svg:x="13.001cm" svg:y="18.09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3" draw:layer="layout" svg:width="3.175cm" svg:height="0.725cm" svg:x="13.9cm" svg:y="18.092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04cm" svg:height="1.072cm" svg:x="1.06cm" svg:y="5.797cm">
            <draw:text-box>
              <text:p text:style-name="P10"><text:span text:style-name="T19">MainControl</text:span></text:p>
            </draw:text-box>
          </draw:frame>
          <draw:rect draw:style-name="gr24" draw:text-style-name="P25" draw:layer="layout" svg:width="19.04cm" svg:height="22.417cm" svg:x="1cm" svg:y="5.888cm" draw:corner-radius="0.5cm">
            <text:p/>
          </draw:rect>
          <draw:line draw:style-name="gr52" draw:text-style-name="P2" draw:layer="layout" svg:x1="1.004cm" svg:y1="6.732cm" svg:x2="20.031cm" svg:y2="6.723cm">
            <text:p/>
          </draw:line>
        </draw:g>
        <draw:rect draw:style-name="gr24" draw:text-style-name="P2" xml:id="id16" draw:id="id16" draw:layer="layout" svg:width="7.285cm" svg:height="3.425cm" svg:x="2.305cm" svg:y="9.6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6" draw:layer="layout" svg:width="7.302cm" svg:height="2.855cm" svg:x="2.37cm" svg:y="10.45cm">
          <draw:text-box>
            <text:p><text:span text:style-name="T3">Entry</text:span><text:span text:style-name="T20"> /checkMsgQueue()</text:span></text:p>
            <text:p><text:span text:style-name="T3">Do</text:span><text:span text:style-name="T20"> [queue.not_empty]/ processMsg()</text:span></text:p>
            <text:p><text:span text:style-name="T3">Exit</text:span><text:span text:style-name="T20"> </text:span></text:p>
            <text:p><text:span text:style-name="T20"><text:s text:c="3"/></text:span><text:span text:style-name="T20">on msgProcessed raise nextMessage</text:span></text:p>
            <text:p><text:span text:style-name="T20"><text:s text:c="3"/></text:span><text:span text:style-name="T20">on queueException raise criticalError</text:span></text:p>
            <text:p><text:span text:style-name="T20"/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3" draw:layer="layout" svg:width="3.81cm" svg:height="0.952cm" svg:x="3.14cm" svg:y="9.64cm">
          <draw:text-box>
            <text:p><text:span text:style-name="T18">CheckingQueue</text:span></text:p>
          </draw:text-box>
        </draw:frame>
        <draw:connector draw:style-name="gr55" draw:text-style-name="P2" draw:layer="layout" draw:line-skew="0.651cm -8.239cm -0.837cm" svg:x1="4.041cm" svg:y1="13.065cm" svg:x2="3.691cm" svg:y2="9.64cm" draw:start-shape="id16" draw:start-glue-point="6" draw:end-shape="id16" draw:end-glue-point="9" svg:d="M4041 13065v1152h-2189v-5915h1839v1338" svg:viewBox="0 0 2190 5916">
          <text:p/>
        </draw:connector>
        <draw:frame draw:style-name="gr56" draw:text-style-name="P27" draw:layer="layout" svg:width="3.175cm" svg:height="0.953cm" svg:x="1.317cm" svg:y="14.334cm">
          <draw:text-box>
            <text:p><text:span text:style-name="T20">nextMessage</text:span></text:p>
          </draw:text-box>
        </draw:frame>
        <draw:g draw:style-name="gr4">
          <draw:frame draw:style-name="gr23" draw:text-style-name="P24" draw:layer="layout" svg:width="8.815cm" svg:height="1.276cm" svg:x="10.677cm" svg:y="7.73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338cm" svg:x="11.18cm" svg:y="22.6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3" draw:layer="layout" svg:width="3.175cm" svg:height="0.725cm" svg:x="12.035cm" svg:y="22.662cm">
          <draw:text-box>
            <text:p><text:span text:style-name="T18">MpdPlaying</text:span></text:p>
          </draw:text-box>
        </draw:frame>
        <draw:rect draw:style-name="gr24" draw:text-style-name="P2" xml:id="id24" draw:id="id24" draw:layer="layout" svg:width="4.829cm" svg:height="2.175cm" svg:x="13.482cm" svg:y="25.2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3" draw:layer="layout" svg:width="3.81cm" svg:height="0.952cm" svg:x="14.2cm" svg:y="25.23cm">
          <draw:text-box>
            <text:p><text:span text:style-name="T18">SpotifyPlaying</text:span></text:p>
          </draw:text-box>
        </draw:frame>
        <draw:frame draw:style-name="gr58" draw:text-style-name="P14" xml:id="id29" draw:id="id29" draw:layer="layout" svg:width="4.728cm" svg:height="0.987cm" svg:x="5.762cm" svg:y="23.49cm">
          <draw:text-box>
            <text:p><text:span text:style-name="T11">[not wifiConnected]</text:span></text:p>
            <text:p><text:span text:style-name="T11">/playSound(SOUND_NO_WIFI)</text:span></text:p>
          </draw:text-box>
        </draw:frame>
        <draw:connector draw:style-name="gr59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60" draw:text-style-name="P29" draw:layer="layout" svg:width="7.62cm" svg:height="2.223cm" svg:x="1.952cm" svg:y="25.447cm">
          <text:p text:style-name="P28"><text:span text:style-name="T21">The CheckingQueue state and OradioControl composite state are concurrent region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3.377cm" svg:y="11.0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3" draw:layer="layout" svg:width="3.876cm" svg:height="0.725cm" svg:x="14.269cm" svg:y="11.06cm">
          <draw:text-box>
            <text:p><text:span text:style-name="T18">OradioCreation</text:span></text:p>
          </draw:text-box>
        </draw:frame>
        <draw:line draw:style-name="gr61" draw:text-style-name="P2" draw:layer="layout" svg:x1="10.207cm" svg:y1="6.715cm" svg:x2="10.207cm" svg:y2="28.305cm">
          <text:p/>
        </draw:line>
        <draw:connector draw:style-name="gr62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9" draw:text-style-name="P2" draw:layer="layout" svg:x1="14.068cm" svg:y1="17.022cm" svg:x2="16.907cm" svg:y2="18.092cm" draw:start-shape="id21" draw:start-glue-point="5" draw:end-shape="id22" draw:end-glue-point="7" svg:d="M14068 17022v535h2839v535" svg:viewBox="0 0 2840 1071">
          <text:p/>
        </draw:connector>
        <draw:connector draw:style-name="gr59" draw:text-style-name="P2" draw:layer="layout" svg:x1="14.152cm" svg:y1="20.315cm" svg:x2="13.594cm" svg:y2="22.622cm" draw:start-shape="id22" draw:start-glue-point="6" draw:end-shape="id23" draw:end-glue-point="0" svg:d="M14152 20315v1154h-558v1153" svg:viewBox="0 0 559 2308">
          <text:p/>
        </draw:connector>
        <draw:connector draw:style-name="gr59" draw:text-style-name="P2" draw:layer="layout" svg:x1="17.007cm" svg:y1="20.315cm" svg:x2="17.388cm" svg:y2="25.26cm" draw:start-shape="id22" draw:start-glue-point="4" draw:end-shape="id24" draw:end-glue-point="7" svg:d="M17007 20315v2473h381v2472" svg:viewBox="0 0 382 4946">
          <text:p/>
        </draw:connector>
        <draw:connector draw:style-name="gr59" draw:text-style-name="P2" draw:layer="layout" svg:x1="16.009cm" svg:y1="24.39cm" svg:x2="15.821cm" svg:y2="20.315cm" draw:start-shape="id23" draw:start-glue-point="8" draw:end-shape="id22" draw:end-glue-point="10" svg:d="M16009 24390h501v-2921h-689v-1154" svg:viewBox="0 0 690 4076">
          <text:p/>
        </draw:connector>
        <draw:connector draw:style-name="gr59" draw:text-style-name="P2" draw:layer="layout" svg:x1="18.311cm" svg:y1="26.905cm" svg:x2="17.83cm" svg:y2="19.773cm" draw:start-shape="id24" draw:start-glue-point="8" draw:end-shape="id22" draw:end-glue-point="8" svg:d="M18311 26905h501v-7132h-982" svg:viewBox="0 0 983 7133">
          <text:p/>
        </draw:connector>
        <draw:frame draw:style-name="gr63" draw:text-style-name="P9" draw:layer="layout" svg:width="4.445cm" svg:height="1.487cm" svg:x="10.525cm" svg:y="3.54cm">
          <draw:text-box>
            <text:p><text:span text:style-name="T7">StartDone</text:span></text:p>
            <text:p><text:span text:style-name="T7">/startOradioControl</text:span></text:p>
          </draw:text-box>
        </draw:frame>
        <draw:custom-shape draw:style-name="gr25" draw:text-style-name="P1" xml:id="id25" draw:id="id25" draw:layer="layout" svg:width="0.4cm" svg:height="0.4cm" svg:x="18.286cm" svg:y="8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18.486cm" svg:y1="9.158cm" svg:x2="18cm" svg:y2="11.075cm" draw:start-shape="id25" draw:start-glue-point="8" draw:end-shape="id26" draw:end-glue-point="7" svg:d="M18486 9158v959h-486v958" svg:viewBox="0 0 487 1918">
          <text:p/>
        </draw:connector>
        <draw:frame draw:style-name="gr65" draw:text-style-name="P9" draw:layer="layout" svg:width="1.588cm" svg:height="0.725cm" svg:x="18.127cm" svg:y="16.24cm">
          <draw:text-box>
            <text:p><text:span text:style-name="T7">Error</text:span></text:p>
          </draw:text-box>
        </draw:frame>
        <draw:rect draw:style-name="gr24" draw:text-style-name="P2" xml:id="id21" draw:id="id21" draw:layer="layout" svg:width="4.04cm" svg:height="2.54cm" svg:x="11.247cm" svg:y="14.4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6" draw:text-style-name="P22" draw:layer="layout" svg:width="3.8cm" svg:height="1.673cm" svg:x="11.355cm" svg:y="15.15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175cm" svg:height="0.725cm" svg:x="11.982cm" svg:y="14.61cm">
          <draw:text-box>
            <text:p><text:span text:style-name="T18">MpdCreation</text:span></text:p>
          </draw:text-box>
        </draw:frame>
        <draw:frame draw:style-name="gr66" draw:text-style-name="P22" draw:layer="layout" svg:width="3.8cm" svg:height="1.673cm" svg:x="13.075cm" svg:y="18.5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6" draw:text-style-name="P22" draw:layer="layout" svg:width="3.8cm" svg:height="1.673cm" svg:x="11.387cm" svg:y="23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6" draw:text-style-name="P22" draw:layer="layout" svg:width="3.8cm" svg:height="1.673cm" svg:x="13.61cm" svg:y="25.8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9" draw:text-style-name="P2" draw:layer="layout" svg:x1="17.367cm" svg:y1="13.312cm" svg:x2="14.515cm" svg:y2="14.482cm" draw:start-shape="id26" draw:start-glue-point="5" draw:end-shape="id21" draw:end-glue-point="7" svg:d="M17367 13312v585h-2852v585" svg:viewBox="0 0 2853 1171">
          <text:p/>
        </draw:connector>
        <draw:frame draw:style-name="gr66" draw:text-style-name="P22" draw:layer="layout" svg:width="3.8cm" svg:height="1.673cm" svg:x="13.727cm" svg:y="11.60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line draw:style-name="gr61" draw:text-style-name="P2" draw:layer="layout" svg:x1="1.418cm" svg:y1="15.875cm" svg:x2="10.207cm" svg:y2="15.875cm">
          <text:p/>
        </draw:line>
        <draw:rect draw:style-name="gr24" draw:text-style-name="P2" xml:id="id28" draw:id="id28" draw:layer="layout" svg:width="5.398cm" svg:height="2.118cm" svg:x="2.622cm" svg:y="17.76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3" draw:layer="layout" svg:width="4.311cm" svg:height="0.735cm" svg:x="3.222cm" svg:y="17.68cm">
          <draw:text-box>
            <text:p><text:span text:style-name="T18">ActivateOr</text:span><text:span text:style-name="T18">adioAp</text:span></text:p>
          </draw:text-box>
        </draw:frame>
        <draw:frame draw:style-name="gr68" draw:text-style-name="P22" draw:layer="layout" svg:width="5.733cm" svg:height="1.729cm" svg:x="-6.302cm" svg:y="19.097cm">
          <draw:text-box>
            <text:p><text:span text:style-name="T3">E</text:span><text:span text:style-name="T3">n</text:span><text:span text:style-name="T3">t</text:span><text:span text:style-name="T3">r</text:span><text:span text:style-name="T3">y</text:span><text:span text:style-name="T6"> </text:span><text:span text:style-name="T14">/</text:span><text:span text:style-name="T14">s</text:span><text:span text:style-name="T14">t</text:span><text:span text:style-name="T14">a</text:span><text:span text:style-name="T14">r</text:span><text:span text:style-name="T14">t</text:span><text:span text:style-name="T14">_</text:span><text:span text:style-name="T14">l</text:span><text:span text:style-name="T14">e</text:span><text:span text:style-name="T14">d</text:span><text:span text:style-name="T14">P</text:span><text:span text:style-name="T14">l</text:span><text:span text:style-name="T14">a</text:span><text:span text:style-name="T14">y</text:span><text:span text:style-name="T14">_</text:span><text:span text:style-name="T14">f</text:span><text:span text:style-name="T14">l</text:span><text:span text:style-name="T14">a</text:span><text:span text:style-name="T14">s</text:span><text:span text:style-name="T14">h</text:span><text:span text:style-name="T14">i</text:span><text:span text:style-name="T14">n</text:span><text:span text:style-name="T14">g</text:span><text:span text:style-name="T14">(</text:span><text:span text:style-name="T14">)</text:span></text:p>
            <text:p><text:span text:style-name="T3">D</text:span><text:span text:style-name="T3">o</text:span><text:span text:style-name="T6"> </text:span><text:span text:style-name="T14">/</text:span></text:p>
            <text:p><text:span text:style-name="T3">E</text:span><text:span text:style-name="T3">x</text:span><text:span text:style-name="T3">i</text:span><text:span text:style-name="T3">t</text:span><text:span text:style-name="T6"> </text:span><text:span text:style-name="T14">/</text:span></text:p>
          </draw:text-box>
        </draw:fram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7.785cm" svg:y1="7.432cm" svg:x2="8.198cm" svg:y2="9.64cm" draw:start-shape="id27" draw:start-glue-point="8" draw:end-shape="id16" draw:end-glue-point="7" svg:d="M7785 7432v1105h413v1103" svg:viewBox="0 0 414 2209">
          <text:p/>
        </draw:connector>
        <draw:g draw:style-name="gr1" xml:id="id34" draw:id="id34">
          <draw:custom-shape draw:style-name="gr69" draw:text-style-name="P30" draw:layer="layout" svg:width="0.717cm" svg:height="0.718cm" svg:x="19.1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59cm" svg:y1="15.608cm" svg:x2="19.82cm" svg:y2="16.17cm">
              <text:p/>
            </draw:line>
            <draw:line draw:style-name="gr57" draw:text-style-name="P2" draw:layer="layout" svg:x1="19.814cm" svg:y1="15.588cm" svg:x2="19.23cm" svg:y2="16.171cm">
              <text:p/>
            </draw:line>
          </draw:g>
        </draw:g>
        <draw:g draw:style-name="gr1" xml:id="id32" draw:id="id32">
          <draw:custom-shape draw:style-name="gr69" draw:text-style-name="P30" draw:layer="layout" svg:width="0.717cm" svg:height="0.718cm" svg:x="9.155cm" svg:y="13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785cm" svg:x2="9.795cm" svg:y2="14.347cm">
              <text:p/>
            </draw:line>
            <draw:line draw:style-name="gr57" draw:text-style-name="P2" draw:layer="layout" svg:x1="9.789cm" svg:y1="13.765cm" svg:x2="9.205cm" svg:y2="14.348cm">
              <text:p/>
            </draw:line>
          </draw:g>
        </draw:g>
        <draw:frame draw:style-name="gr51" draw:text-style-name="P9" draw:layer="layout" svg:width="1.588cm" svg:height="0.725cm" svg:x="8.619cm" svg:y="14.652cm">
          <draw:text-box>
            <text:p><text:span text:style-name="T7">Error</text:span></text:p>
          </draw:text-box>
        </draw:frame>
        <draw:connector draw:style-name="gr64" draw:text-style-name="P2" draw:layer="layout" svg:x1="1.879cm" svg:y1="16.324cm" svg:x2="4.123cm" svg:y2="17.767cm" draw:end-shape="id28" draw:end-glue-point="10" svg:d="M1879 16324v471h2244v972" svg:viewBox="0 0 2245 1444">
          <text:p/>
        </draw:connector>
        <draw:connector draw:style-name="gr64" draw:text-style-name="P2" draw:layer="layout" svg:x1="10.49cm" svg:y1="23.983cm" svg:x2="5.645cm" svg:y2="24.67cm" draw:start-shape="id29" draw:start-glue-point="1" draw:end-shape="id30" draw:end-glue-point="1" svg:d="M10490 23983h500v687h-5345" svg:viewBox="0 0 5346 688">
          <text:p/>
        </draw:connector>
        <draw:connector draw:style-name="gr64" draw:text-style-name="P2" draw:layer="layout" svg:x1="1.482cm" svg:y1="23.909cm" svg:x2="5.045cm" svg:y2="24.67cm" draw:start-shape="id31" draw:end-shape="id30" draw:end-glue-point="3" svg:d="M1482 23909h-500v761h4063" svg:viewBox="0 0 4064 762">
          <text:p/>
        </draw:connector>
        <draw:frame draw:style-name="gr70" draw:text-style-name="P14" xml:id="id31" draw:id="id31" draw:layer="layout" svg:width="4.493cm" svg:height="1.039cm" svg:x="1.482cm" svg:y="23.39cm">
          <draw:text-box>
            <text:p><text:span text:style-name="T11">[wifiCon</text:span><text:span text:style-name="T11">nected]</text:span></text:p>
            <text:p><text:span text:style-name="T11">/</text:span><text:span text:style-name="T11">playSou</text:span><text:span text:style-name="T11">nd(SOU</text:span><text:span text:style-name="T11">ND_WI</text:span><text:span text:style-name="T11">FI)</text:span></text:p>
          </draw:text-box>
        </draw:frame>
        <draw:g draw:style-name="gr39" xml:id="id30" draw:id="id30">
          <draw:custom-shape draw:style-name="gr26" draw:text-style-name="P1" draw:layer="layout" svg:width="0.4cm" svg:height="0.4cm" svg:x="5.145cm" svg:y="24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5.045cm" svg:y="24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0" draw:text-style-name="P14" draw:layer="layout" svg:width="2.54cm" svg:height="1.039cm" svg:x="1.952cm" svg:y="15.94cm">
          <draw:text-box>
            <text:p><text:span text:style-name="T11">LongPressPlay</text:span></text:p>
            <text:p><text:span text:style-name="T11">/startOradioAP</text:span></text:p>
          </draw:text-box>
        </draw:frame>
        <draw:line draw:style-name="gr61" draw:text-style-name="P2" draw:layer="layout" svg:x1="1.419cm" svg:y1="25.075cm" svg:x2="10.208cm" svg:y2="25.075cm">
          <text:p/>
        </draw:line>
        <draw:connector draw:style-name="gr64" draw:text-style-name="P2" draw:layer="layout" svg:x1="8.349cm" svg:y1="13.065cm" svg:x2="9.155cm" svg:y2="14.058cm" draw:start-shape="id16" draw:start-glue-point="4" draw:end-shape="id32" draw:end-glue-point="3" svg:d="M8349 13065v993h806" svg:viewBox="0 0 807 994">
          <text:p/>
        </draw:connector>
        <draw:connector draw:style-name="gr64" draw:text-style-name="P2" draw:layer="layout" svg:x1="9.896cm" svg:y1="19.262cm" svg:x2="9.613cm" svg:y2="21.955cm" draw:end-shape="id33" draw:end-glue-point="0" svg:d="M9896 19262v1084h-283v1609" svg:viewBox="0 0 284 2694">
          <text:p/>
        </draw:connector>
        <draw:frame draw:style-name="gr29" draw:text-style-name="P14" draw:layer="layout" svg:width="2.14cm" svg:height="0.887cm" svg:x="7.985cm" svg:y="17.258cm">
          <draw:text-box>
            <text:p><text:span text:style-name="T11">timeOut</text:span></text:p>
            <text:p><text:span text:style-name="T11">/gotoError()</text:span></text:p>
          </draw:text-box>
        </draw:frame>
        <draw:g draw:style-name="gr1" xml:id="id33" draw:id="id33">
          <draw:custom-shape draw:style-name="gr69" draw:text-style-name="P30" draw:layer="layout" svg:width="0.717cm" svg:height="0.718cm" svg:x="9.255cm" svg:y="21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34cm" svg:y1="22.041cm" svg:x2="9.895cm" svg:y2="22.603cm">
              <text:p/>
            </draw:line>
            <draw:line draw:style-name="gr57" draw:text-style-name="P2" draw:layer="layout" svg:x1="9.889cm" svg:y1="22.021cm" svg:x2="9.305cm" svg:y2="22.604cm">
              <text:p/>
            </draw:line>
          </draw:g>
        </draw:g>
        <draw:frame draw:style-name="gr71" draw:text-style-name="P22" draw:layer="layout" svg:width="6.668cm" svg:height="2.067cm" svg:x="10.842cm" svg:y="8.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 </text:span><text:span text:style-name="T14">on </text:span><text:span text:style-name="T14">usbAbsent raise </text:span><text:span text:style-name="T14">criticalError</text:span></text:p>
          </draw:text-box>
        </draw:frame>
        <draw:frame draw:style-name="gr29" draw:text-style-name="P14" draw:layer="layout" svg:width="2.222cm" svg:height="0.887cm" svg:x="16.34cm" svg:y="14.835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59" draw:text-style-name="P2" draw:layer="layout" draw:line-skew="0.695cm" svg:x1="16.881cm" svg:y1="14.631cm" svg:x2="19.18cm" svg:y2="15.881cm" draw:end-shape="id34" draw:end-glue-point="3" svg:d="M16881 14631h1581v1250h718" svg:viewBox="0 0 2300 1251">
          <text:p/>
        </draw:connector>
        <draw:frame draw:style-name="gr29" draw:text-style-name="P14" draw:layer="layout" svg:width="2.222cm" svg:height="0.887cm" svg:x="6.08cm" svg:y="13.448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51" draw:text-style-name="P9" draw:layer="layout" svg:width="1.588cm" svg:height="0.725cm" svg:x="8.302cm" svg:y="22.182cm">
          <draw:text-box>
            <text:p><text:span text:style-name="T7">Error</text:span></text:p>
          </draw:text-box>
        </draw:frame>
        <draw:connector draw:style-name="gr64" draw:text-style-name="P2" draw:layer="layout" svg:x1="5.027cm" svg:y1="16.43cm" svg:x2="9.234cm" svg:y2="16.378cm" svg:d="M5027 16430h2104v-52h2103" svg:viewBox="0 0 4208 53">
          <text:p/>
        </draw:connector>
        <draw:frame draw:style-name="gr72" draw:text-style-name="P32" draw:layer="layout" svg:width="3.593cm" svg:height="0.887cm" svg:x="5.144cm" svg:y="16.253cm">
          <draw:text-box>
            <text:p text:style-name="P31"><text:span text:style-name="T22">OradioApStopped</text:span></text:p>
            <text:p text:style-name="P31"><text:span text:style-name="T22">[OradioApActive]</text:span></text:p>
          </draw:text-box>
        </draw:frame>
        <draw:connector draw:style-name="gr73" draw:text-style-name="P2" draw:layer="layout" draw:type="curve" draw:line-skew="-0.224cm" svg:x1="3.005cm" svg:y1="23.076cm" svg:x2="2.404cm" svg:y2="21.638cm" draw:start-shape="id35" draw:start-glue-point="11" draw:end-shape="id35" draw:end-glue-point="13" svg:d="M3005 23076c0 417-551 348-889-116s-463-1322 288-1322" svg:viewBox="0 0 1157 1715">
          <text:p/>
        </draw:connector>
        <draw:frame draw:style-name="gr74" draw:text-style-name="P14" draw:layer="layout" svg:width="2.857cm" svg:height="1.205cm" svg:x="0.683cm" svg:y="21.702cm">
          <draw:text-box>
            <text:p><text:span text:style-name="T11">LongPressPlay</text:span></text:p>
            <text:p><text:span text:style-name="T11">[OradioApActive]</text:span></text:p>
            <text:p><text:span text:style-name="T11">/ --</text:span></text:p>
          </draw:text-box>
        </draw:frame>
        <draw:rect draw:style-name="gr24" draw:text-style-name="P2" draw:layer="layout" svg:width="5.398cm" svg:height="2.223cm" svg:x="-6.267cm" svg:y="24.81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51" draw:text-style-name="P23" draw:layer="layout" svg:width="3.876cm" svg:height="0.725cm" svg:x="-5.532cm" svg:y="24.808cm">
          <draw:text-box>
            <text:p><text:span text:style-name="T18">OradioApActive</text:span></text:p>
          </draw:text-box>
        </draw:frame>
        <draw:frame draw:style-name="gr68" draw:text-style-name="P22" draw:layer="layout" svg:width="5.733cm" svg:height="1.729cm" svg:x="-6.302cm" svg:y="25.343cm">
          <draw:text-box>
            <text:p><text:span text:style-name="T3">Entry</text:span><text:span text:style-name="T6"> </text:span><text:span text:style-name="T14">/start_ledPlay_flashing()</text:span></text:p>
            <text:p><text:span text:style-name="T3">Do</text:span><text:span text:style-name="T6"> </text:span><text:span text:style-name="T14">/WaitForWifiMessage()</text:span></text:p>
            <text:p><text:span text:style-name="T3">Exit</text:span><text:span text:style-name="T6"> </text:span><text:span text:style-name="T14">/stop_ledPlay_flashing()</text:span></text:p>
          </draw:text-box>
        </draw:frame>
        <draw:rect draw:style-name="gr24" draw:text-style-name="P2" xml:id="id35" draw:id="id35" draw:layer="layout" svg:width="5.398cm" svg:height="2.223cm" svg:x="2.404cm" svg:y="20.85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3.222cm" svg:y="20.912cm">
          <draw:text-box>
            <text:p><text:span text:style-name="T18">OradioApActive</text:span></text:p>
          </draw:text-box>
        </draw:frame>
        <draw:frame draw:style-name="gr68" draw:text-style-name="P22" draw:layer="layout" svg:width="5.733cm" svg:height="1.729cm" svg:x="3.005cm" svg:y="21.396cm">
          <draw:text-box>
            <text:p><text:span text:style-name="T3">Entry</text:span><text:span text:style-name="T6"> </text:span><text:span text:style-name="T14">/</text:span></text:p>
            <text:p><text:span text:style-name="T3">Do</text:span><text:span text:style-name="T6"> </text:span><text:span text:style-name="T14">/WaitForWifiMessage()</text:span></text:p>
            <text:p><text:span text:style-name="T3">Exit</text:span><text:span text:style-name="T6"> </text:span><text:span text:style-name="T14">/stop_ledPlay_flashing()</text:span></text:p>
          </draw:text-box>
        </draw:frame>
        <draw:frame draw:style-name="gr50" draw:text-style-name="P22" draw:layer="layout" svg:width="5.464cm" svg:height="1.674cm" svg:x="2.905cm" svg:y="18.376cm">
          <draw:text-box>
            <text:p><text:span text:style-name="T3">Entry</text:span><text:span text:style-name="T6"> </text:span><text:span text:style-name="T14">/start_ledPlay_flashing()</text:span></text:p>
            <text:p><text:span text:style-name="T3">Do</text:span><text:span text:style-name="T6"> </text:span><text:span text:style-name="T14">/WaitForActiveAp()</text:span></text:p>
            <text:p><text:span text:style-name="T3">Exit</text:span><text:span text:style-name="T6"> </text:span><text:span text:style-name="T14">/</text:span></text:p>
          </draw:text-box>
        </draw:frame>
        <draw:connector draw:style-name="gr64" draw:text-style-name="P2" draw:layer="layout" svg:x1="6.391cm" svg:y1="19.885cm" svg:x2="6.771cm" svg:y2="20.854cm" draw:start-shape="id28" draw:start-glue-point="5" draw:end-shape="id35" draw:end-glue-point="7" svg:d="M6391 19885v485h380v484" svg:viewBox="0 0 381 970">
          <text:p/>
        </draw:connector>
        <draw:frame draw:style-name="gr65" draw:text-style-name="P34" draw:layer="layout" svg:width="2.54cm" svg:height="0.645cm" svg:x="4.492cm" svg:y="20.04cm">
          <draw:text-box>
            <text:p text:style-name="P33"><text:span text:style-name="T14">ApActive</text:span></text:p>
          </draw:text-box>
        </draw:frame>
      </draw:page>
      <draw:page draw:name="page3" draw:style-name="dp1" draw:master-page-name="Default">
        <draw:rect draw:style-name="gr24" draw:text-style-name="P2" xml:id="id37" draw:id="id37" draw:layer="layout" svg:width="10.16cm" svg:height="2.54cm" svg:x="4.175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draw:glue-point draw:id="13" svg:x="-4.119cm" svg:y="5.003cm"/>
          <text:p/>
        </draw:rect>
        <draw:frame draw:style-name="gr75" draw:text-style-name="P35" draw:layer="layout" svg:width="9.842cm" svg:height="2.09cm" svg:x="4.71cm" svg:y="14.367cm">
          <draw:text-box>
            <text:p><text:span text:style-name="T3">Entry</text:span><text:span text:style-name="T22"> /playSound(SOUND_STOP); setLed(LED_STOP); stopPlayers()</text:span></text:p>
            <text:p><text:span text:style-name="T3">do</text:span><text:span text:style-name="T6"> </text:span><text:span text:style-name="T22">/ waitForButtonPressed()</text:span></text:p>
            <text:p><text:span text:style-name="T3">exit</text:span><text:span text:style-name="T6"> / </text:span><text:span text:style-name="T22">on usbAbsent raise criticalError</text:span></text:p>
          </draw:text-box>
          <draw:glue-point draw:id="4" svg:x="5cm" svg:y="-4.997cm"/>
          <draw:glue-point draw:id="5" svg:x="5cm" svg:y="-4.997cm"/>
        </draw:frame>
        <draw:frame draw:style-name="gr51" draw:text-style-name="P23" draw:layer="layout" svg:width="3.175cm" svg:height="0.725cm" svg:x="6.715cm" svg:y="13.927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154cm" svg:height="1.774cm" svg:x="0.682cm" svg:y="1.09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19.154cm" svg:height="28.257cm" svg:x="0.846cm" svg:y="1cm" draw:corner-radius="0.5cm">
            <draw:glue-point draw:id="4" svg:x="-3.688cm" svg:y="-5.004cm"/>
            <text:p/>
          </draw:rect>
          <draw:line draw:style-name="gr10" draw:text-style-name="P2" draw:layer="layout" svg:x1="0.851cm" svg:y1="2.027cm" svg:x2="19.993cm" svg:y2="2.017cm">
            <text:p/>
          </draw:line>
        </draw:g>
        <draw:rect draw:style-name="gr24" draw:text-style-name="P2" xml:id="id38" draw:id="id38" draw:layer="layout" svg:width="5.059cm" svg:height="2.54cm" svg:x="10.681cm" svg:y="21.7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draw:glue-point draw:id="11" svg:x="5.003cm" svg:y="-1.633cm"/>
          <draw:glue-point draw:id="12" svg:x="5.003cm" svg:y="-2.881cm"/>
          <draw:glue-point draw:id="13" svg:x="-1.097cm" svg:y="4.874cm"/>
          <draw:glue-point draw:id="14" svg:x="0.873cm" svg:y="4.874cm"/>
          <draw:glue-point draw:id="15" svg:x="4.162cm" svg:y="4.874cm"/>
          <draw:glue-point draw:id="16" svg:x="-5cm" svg:y="-2.625cm"/>
          <draw:glue-point draw:id="17" svg:x="-3.425cm" svg:y="4.874cm"/>
          <draw:glue-point draw:id="18" svg:x="1.595cm" svg:y="-5.003cm"/>
          <text:p/>
        </draw:rect>
        <draw:frame draw:style-name="gr76" draw:text-style-name="P22" draw:layer="layout" svg:width="4.545cm" svg:height="1.991cm" svg:x="10.742cm" svg:y="22.2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 text:style-name="P36"><text:span text:style-name="T23">exit</text:span><text:span text:style-name="T24"> /</text:span><text:span text:style-name="T22">on usbAbsent </text:span></text:p>
            <text:p text:style-name="P36"><text:span text:style-name="T22"><text:s text:c="15"/></text:span><text:span text:style-name="T22">raise criticalError</text:span></text:p>
          </draw:text-box>
        </draw:frame>
        <draw:frame draw:style-name="gr54" draw:text-style-name="P23" draw:layer="layout" svg:width="3.175cm" svg:height="0.952cm" svg:x="11.795cm" svg:y="21.755cm">
          <draw:text-box>
            <text:p><text:span text:style-name="T18">MpdPlaying</text:span></text:p>
          </draw:text-box>
        </draw:frame>
        <draw:rect draw:style-name="gr24" draw:text-style-name="P2" xml:id="id40" draw:id="id40" draw:layer="layout" svg:width="6.668cm" svg:height="2.54cm" svg:x="2.587cm" svg:y="23.9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draw:glue-point draw:id="11" svg:x="-5.001cm" svg:y="-2.755cm"/>
          <draw:glue-point draw:id="12" svg:x="-5.001cm" svg:y="2.244cm"/>
          <draw:glue-point draw:id="13" svg:x="5.002cm" svg:y="-2.755cm"/>
          <draw:glue-point draw:id="14" svg:x="1.574cm" svg:y="-5.003cm"/>
          <text:p/>
        </draw:rect>
        <draw:frame draw:style-name="gr77" draw:text-style-name="P37" draw:layer="layout" svg:width="6.433cm" svg:height="2.461cm" svg:x="2.822cm" svg:y="24.252cm">
          <draw:text-box>
            <text:p text:style-name="P36"><text:span text:style-name="T23">entry</text:span><text:span text:style-name="T24"> </text:span><text:span text:style-name="T25">/</text:span><text:span text:style-name="T22">playSound(SOUND_SPOTIFY);</text:span></text:p>
            <text:p text:style-name="P36"><text:span text:style-name="T22">setLed(LED_PLAY)</text:span></text:p>
            <text:p><text:span text:style-name="T3">do</text:span><text:span text:style-name="T6"> /</text:span></text:p>
            <text:p text:style-name="P36"><text:span text:style-name="T23">exit</text:span><text:span text:style-name="T24"> / </text:span><text:span text:style-name="T22">on usbAbsent raise criticalError</text:span></text:p>
            <text:p text:style-name="P36"><text:span text:style-name="T22">if not isSpotifyConnected raise ButtonStop</text:span></text:p>
          </draw:text-box>
        </draw:frame>
        <draw:frame draw:style-name="gr54" draw:text-style-name="P23" draw:layer="layout" svg:width="3.523cm" svg:height="0.952cm" svg:x="3.222cm" svg:y="23.86cm">
          <draw:text-box>
            <text:p><text:span text:style-name="T18">SpotifyPlaying</text:span></text:p>
          </draw:text-box>
        </draw:frame>
        <draw:rect draw:style-name="gr24" draw:text-style-name="P2" xml:id="id42" draw:id="id42" draw:layer="layout" svg:width="10.16cm" svg:height="4.226cm" svg:x="3.54cm" svg:y="3.4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78" draw:text-style-name="P22" draw:layer="layout" svg:width="8.137cm" svg:height="4.117cm" svg:x="4.123cm" svg:y="3.785cm">
          <draw:text-box>
            <text:p><text:span text:style-name="T3">Entry</text:span><text:span text:style-name="T6"> / </text:span><text:span text:style-name="T14">setLed(LED_STOP)</text:span></text:p>
            <text:p text:style-name="P38"><text:span text:style-name="T3">Do</text:span><text:span text:style-name="T6"> /</text:span></text:p>
            <text:p text:style-name="P38"><text:span text:style-name="T22">shared_q = new Queue(); Create new instances for:</text:span></text:p>
            <text:p text:style-name="P38"><text:span text:style-name="T22">USBService(shared_q); SpotifyConnect(shared_q); </text:span></text:p>
            <text:p text:style-name="P38"><text:span text:style-name="T22">Backlighting(); MPDMonitor(); MPDControl();</text:span></text:p>
            <text:p text:style-name="P38"><text:span text:style-name="T22">PowerSupplyService(); LEDControl(); RMService(); </text:span></text:p>
            <text:p text:style-name="P38"><text:span text:style-name="T22">TouchButtons(shared_q); VolumeControl(shared_q);</text:span></text:p>
            <text:p text:style-name="P38"><text:span text:style-name="T22">WebService(shared_q)</text:span></text:p>
            <text:p><text:span text:style-name="T3">exit</text:span><text:span text:style-name="T6"> </text:span><text:span text:style-name="T22">/if creationFailed then raise criticalError </text:span></text:p>
            <text:p><text:span text:style-name="T22"><text:tab/></text:span><text:span text:style-name="T22">else raise creationDone</text:span></text:p>
          </draw:text-box>
        </draw:frame>
        <draw:frame draw:style-name="gr51" draw:text-style-name="P23" draw:layer="layout" svg:width="3.876cm" svg:height="0.725cm" svg:x="6.632cm" svg:y="3.367cm">
          <draw:text-box>
            <text:p><text:span text:style-name="T18">OradioCreation</text:span></text:p>
          </draw:text-box>
        </draw:frame>
        <draw:connector draw:style-name="gr59" draw:text-style-name="P2" draw:layer="layout" svg:x1="10.127cm" svg:y1="12.512cm" svg:x2="9.255cm" svg:y2="13.825cm" draw:start-shape="id36" draw:start-glue-point="5" draw:end-shape="id37" draw:end-glue-point="0" svg:d="M10127 12512v657h-872v656" svg:viewBox="0 0 873 1314">
          <text:p/>
        </draw:connector>
        <draw:connector draw:style-name="gr59" draw:text-style-name="P2" draw:layer="layout" svg:x1="13.21cm" svg:y1="21.722cm" svg:x2="12.605cm" svg:y2="16.365cm" draw:start-shape="id38" draw:start-glue-point="0" draw:end-shape="id37" draw:end-glue-point="4" svg:d="M13210 21722v-2678h-605v-2679" svg:viewBox="0 0 606 5358">
          <text:p/>
        </draw:connector>
        <draw:connector draw:style-name="gr59" draw:text-style-name="P2" draw:layer="layout" svg:x1="8.341cm" svg:y1="18.27cm" svg:x2="4.914cm" svg:y2="23.96cm" draw:start-shape="id39" draw:start-glue-point="5" draw:end-shape="id40" draw:end-glue-point="10" svg:d="M8341 18270h-3427v5690" svg:viewBox="0 0 3428 5691">
          <text:p/>
        </draw:connector>
        <draw:connector draw:style-name="gr59" draw:text-style-name="P2" draw:layer="layout" svg:x1="8.941cm" svg:y1="18.27cm" svg:x2="11.93cm" svg:y2="21.722cm" draw:start-shape="id39" draw:start-glue-point="7" draw:end-shape="id38" draw:end-glue-point="10" svg:d="M8941 18270h2989v3452" svg:viewBox="0 0 2990 3453">
          <text:p/>
        </draw:connector>
        <draw:connector draw:style-name="gr59" draw:text-style-name="P2" draw:layer="layout" draw:line-skew="0cm -1.087cm" svg:x1="4.037cm" svg:y1="23.96cm" svg:x2="4.175cm" svg:y2="15.095cm" draw:start-shape="id40" draw:start-glue-point="9" draw:end-shape="id37" draw:end-glue-point="3" svg:d="M4037 23960v-3797h-1450v-5068h1588" svg:viewBox="0 0 1589 8866">
          <text:p/>
        </draw:connector>
        <draw:custom-shape draw:style-name="gr25" draw:text-style-name="P1" xml:id="id41" draw:id="id41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draw:line-skew="-0.295cm" svg:x1="13.212cm" svg:y1="2.657cm" svg:x2="8.62cm" svg:y2="3.441cm" draw:start-shape="id41" draw:start-glue-point="8" draw:end-shape="id42" draw:end-glue-point="0" svg:d="M13212 2657v98h-4592v686" svg:viewBox="0 0 4593 785">
          <text:p/>
        </draw:connector>
        <draw:rect draw:style-name="gr24" draw:text-style-name="P2" xml:id="id36" draw:id="id36" draw:layer="layout" svg:width="8.525cm" svg:height="2.857cm" svg:x="4.175cm" svg:y="9.65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79" draw:text-style-name="P22" draw:layer="layout" svg:width="7.303cm" svg:height="2.627cm" svg:x="4.627cm" svg:y="9.89cm">
          <draw:text-box>
            <text:p><text:span text:style-name="T3">Entry</text:span><text:span text:style-name="T6"> /</text:span></text:p>
            <text:p><text:span text:style-name="T3">Do</text:span><text:span text:style-name="T6"> </text:span><text:span text:style-name="T14">/ </text:span><text:span text:style-name="T22">waitForUsbMessage()</text:span></text:p>
            <text:p><text:span text:style-name="T23">Exit</text:span><text:span text:style-name="T24"> </text:span></text:p>
            <text:p text:style-name="P36"><text:span text:style-name="T22">=&gt; On usbPresent raise mpdCreationDone</text:span></text:p>
            <text:p text:style-name="P36"><text:span text:style-name="T22">=&gt; On usbAbsent raise criticalError</text:span></text:p>
          </draw:text-box>
        </draw:frame>
        <draw:frame draw:style-name="gr80" draw:text-style-name="P23" draw:layer="layout" svg:width="3.175cm" svg:height="1.36cm" svg:x="6.985cm" svg:y="9.655cm">
          <draw:text-box>
            <text:p><text:span text:style-name="T18">MpdCreation</text:span></text:p>
          </draw:text-box>
        </draw:frame>
        <draw:connector draw:style-name="gr59" draw:text-style-name="P2" draw:layer="layout" svg:x1="10.634cm" svg:y1="7.667cm" svg:x2="11.072cm" svg:y2="9.655cm" draw:start-shape="id42" draw:start-glue-point="5" draw:end-shape="id36" draw:end-glue-point="7" svg:d="M10634 7667v994h438v994" svg:viewBox="0 0 439 1989">
          <text:p/>
        </draw:connector>
        <draw:frame draw:style-name="gr54" draw:text-style-name="P14" draw:layer="layout" svg:width="3.492cm" svg:height="0.952cm" svg:x="7.28cm" svg:y="8.485cm">
          <draw:text-box>
            <text:p><text:span text:style-name="T11">creationDone</text:span></text:p>
            <text:p><text:span text:style-name="T11">/start_mpd_</text:span><text:span text:style-name="T26">creation</text:span><text:span text:style-name="T11">()</text:span></text:p>
          </draw:text-box>
        </draw:frame>
        <draw:frame draw:style-name="gr46" draw:text-style-name="P18" draw:layer="layout" svg:width="1.822cm" svg:height="0.806cm" svg:x="16.958cm" svg:y="11.477cm">
          <draw:text-box>
            <text:p><text:span text:style-name="T16">Error</text:span></text:p>
          </draw:text-box>
        </draw:frame>
        <draw:connector draw:style-name="gr59" draw:text-style-name="P2" draw:layer="layout" svg:x1="13.7cm" svg:y1="6.638cm" svg:x2="18.773cm" svg:y2="12.112cm" draw:start-shape="id42" draw:start-glue-point="8" draw:end-shape="id43" draw:end-glue-point="0" svg:d="M13700 6638h5073v5474" svg:viewBox="0 0 5074 5475">
          <text:p/>
        </draw:connector>
        <draw:connector draw:style-name="gr59" draw:text-style-name="P2" draw:layer="layout" svg:x1="12.7cm" svg:y1="11.816cm" svg:x2="18.415cm" svg:y2="12.471cm" draw:start-shape="id36" draw:start-glue-point="8" draw:end-shape="id43" svg:d="M12700 11816h2845v655h2870" svg:viewBox="0 0 5716 656">
          <text:p/>
        </draw:connector>
        <draw:frame draw:style-name="gr29" draw:text-style-name="P14" draw:layer="layout" svg:width="3.175cm" svg:height="0.887cm" svg:x="10.215cm" svg:y="12.601cm">
          <draw:text-box>
            <text:p><text:span text:style-name="T11">mpdCreationDone</text:span></text:p>
            <text:p><text:span text:style-name="T11">/goto_standby()</text:span></text:p>
          </draw:text-box>
        </draw:frame>
        <draw:connector draw:style-name="gr59" draw:text-style-name="P2" draw:layer="layout" svg:x1="14.335cm" svg:y1="14.653cm" svg:x2="18.773cm" svg:y2="12.83cm" draw:start-shape="id37" draw:start-glue-point="11" draw:end-shape="id43" draw:end-glue-point="2" svg:d="M14335 14653h4438v-1823" svg:viewBox="0 0 4439 1824">
          <text:p/>
        </draw:connector>
        <draw:connector draw:style-name="gr59" draw:text-style-name="P2" draw:layer="layout" draw:line-skew="0.612cm" svg:x1="15.74cm" svg:y1="23.643cm" svg:x2="19.572cm" svg:y2="25.231cm" draw:start-shape="id38" draw:start-glue-point="8" draw:end-shape="id44" draw:end-glue-point="2" svg:d="M15740 23643h2336v2114h1496v-526" svg:viewBox="0 0 3833 2115">
          <text:p/>
        </draw:connector>
        <draw:connector draw:style-name="gr59" draw:text-style-name="P2" draw:layer="layout" draw:line-skew="1.939cm" svg:x1="4.176cm" svg:y1="26.5cm" svg:x2="19.572cm" svg:y2="25.231cm" draw:start-shape="id40" draw:start-glue-point="6" draw:end-shape="id44" draw:end-glue-point="2" svg:d="M4176 26500v2440h15396v-3709" svg:viewBox="0 0 15397 3710">
          <text:p/>
        </draw:connector>
        <draw:frame draw:style-name="gr81" draw:text-style-name="P14" draw:layer="layout" svg:width="4.763cm" svg:height="2.223cm" svg:x="15.37cm" svg:y="16.24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27">/playSound(</text:span><text:span text:style-name="T11">SOUND_PRESETx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82" draw:text-style-name="P14" draw:layer="layout" svg:width="4.445cm" svg:height="1.27cm" svg:x="4.71cm" svg:y="18.68cm">
          <draw:text-box>
            <text:p><text:span text:style-name="T11">/playSound(</text:span><text:span text:style-name="T28">SOUND_SPOTIFY</text:span><text:span text:style-name="T11">)</text:span></text:p>
            <text:p><text:span text:style-name="T11">/setLed(LED_PLAY)</text:span></text:p>
            <text:p><text:span text:style-name="T11">/startSpotifyPlayback()</text:span></text:p>
          </draw:text-box>
        </draw:frame>
        <draw:frame draw:style-name="gr83" draw:text-style-name="P14" draw:layer="layout" svg:width="3.81cm" svg:height="1.535cm" svg:x="8.22cm" svg:y="19.567cm">
          <draw:text-box>
            <text:p><text:span text:style-name="T11">/playSound(</text:span><text:span text:style-name="T28">SOUND_PLAY</text:span><text:span text:style-name="T11">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29" draw:text-style-name="P14" draw:layer="layout" svg:width="2.54cm" svg:height="0.887cm" svg:x="1.635cm" svg:y="20.367cm">
          <draw:text-box>
            <text:p><text:span text:style-name="T11">ButtonStop</text:span></text:p>
            <text:p><text:span text:style-name="T11">/gotoStandby()</text:span></text:p>
          </draw:text-box>
        </draw:frame>
        <draw:frame draw:style-name="gr84" draw:text-style-name="P39" draw:layer="layout" svg:width="4.445cm" svg:height="1.587cm" svg:x="14.652cm" svg:y="19.098cm">
          <draw:text-box>
            <text:p><text:span text:style-name="T26">VolumeChanged</text:span></text:p>
            <text:p><text:span text:style-name="T26">/playSound(SOUND_PLAY)</text:span></text:p>
            <text:p><text:span text:style-name="T26">/setLed(LED_PLAY</text:span></text:p>
            <text:p><text:span text:style-name="T26">/startMpdPlayback()</text:span></text:p>
          </draw:text-box>
        </draw:frame>
        <draw:frame draw:style-name="gr56" draw:text-style-name="P14" draw:layer="layout" svg:width="2.54cm" svg:height="0.953cm" svg:x="12.43cm" svg:y="17.509cm">
          <draw:text-box>
            <text:p><text:span text:style-name="T11">ButtonStop</text:span></text:p>
            <text:p><text:span text:style-name="T11">/gotoStandby()</text:span></text:p>
          </draw:text-box>
        </draw:frame>
        <draw:frame draw:style-name="gr54" draw:text-style-name="P18" draw:layer="layout" svg:width="1.822cm" svg:height="0.952cm" svg:x="18.745cm" svg:y="23.86cm">
          <draw:text-box>
            <text:p><text:span text:style-name="T16">Error</text:span></text:p>
          </draw:text-box>
        </draw:frame>
        <draw:g draw:style-name="gr1" xml:id="id43" draw:id="id43">
          <draw:custom-shape draw:style-name="gr69" draw:text-style-name="P30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44" draw:id="id44">
          <draw:custom-shape draw:style-name="gr69" draw:text-style-name="P30" draw:layer="layout" svg:width="0.717cm" svg:height="0.718cm" svg:x="19.2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93cm" svg:y1="24.599cm" svg:x2="19.854cm" svg:y2="25.161cm">
              <text:p/>
            </draw:line>
            <draw:line draw:style-name="gr57" draw:text-style-name="P2" draw:layer="layout" svg:x1="19.848cm" svg:y1="24.579cm" svg:x2="19.264cm" svg:y2="25.162cm">
              <text:p/>
            </draw:line>
          </draw:g>
        </draw:g>
        <draw:frame draw:style-name="gr85" draw:text-style-name="P14" draw:layer="layout" svg:width="3.357cm" svg:height="1.317cm" svg:x="12.883cm" svg:y="10.36cm">
          <draw:text-box>
            <text:p><text:span text:style-name="T11">timeOut, </text:span></text:p>
            <text:p><text:span text:style-name="T11">criticalError,</text:span></text:p>
            <text:p><text:span text:style-name="T11">/goto_error()</text:span></text:p>
          </draw:text-box>
        </draw:frame>
        <draw:frame draw:style-name="gr29" draw:text-style-name="P14" draw:layer="layout" svg:width="2.222cm" svg:height="0.887cm" svg:x="16.24cm" svg:y="5.833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29" draw:text-style-name="P14" draw:layer="layout" svg:width="3.175cm" svg:height="0.887cm" svg:x="15.287cm" svg:y="13.765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29" draw:text-style-name="P14" draw:layer="layout" svg:width="2.54cm" svg:height="0.887cm" svg:x="16.105cm" svg:y="23.595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56" draw:text-style-name="P14" draw:layer="layout" svg:width="2.54cm" svg:height="0.953cm" svg:x="4.075cm" svg:y="27.987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86" draw:text-style-name="P2" draw:layer="layout" draw:type="curve" draw:line-skew="-0.15cm" svg:x1="2.587cm" svg:y1="24.531cm" svg:x2="2.587cm" svg:y2="25.799cm" draw:start-shape="id40" draw:start-glue-point="11" draw:end-shape="id40" draw:end-glue-point="12" svg:d="M2587 24531c-976 0-976 1268 0 1268" svg:viewBox="0 0 733 1269">
          <text:p/>
        </draw:connector>
        <draw:frame draw:style-name="gr54" draw:text-style-name="P14" draw:layer="layout" svg:width="2.541cm" svg:height="0.952cm" svg:x="0.681cm" svg:y="25.765cm">
          <draw:text-box>
            <text:p><text:span text:style-name="T11">ButtonPlay</text:span></text:p>
            <text:p><text:span text:style-name="T11">/playSound()</text:span></text:p>
          </draw:text-box>
        </draw:frame>
        <draw:connector draw:style-name="gr59" draw:text-style-name="P2" draw:layer="layout" draw:line-skew="-0.554cm" svg:x1="9.255cm" svg:y1="24.531cm" svg:x2="10.681cm" svg:y2="22.326cm" draw:start-shape="id40" draw:start-glue-point="13" draw:end-shape="id38" draw:end-glue-point="16" svg:d="M9255 24531h159v-2205h1267" svg:viewBox="0 0 1427 2206">
          <text:p/>
        </draw:connector>
        <draw:frame draw:style-name="gr87" draw:text-style-name="P14" draw:layer="layout" svg:width="4.645cm" svg:height="2.222cm" svg:x="5.845cm" svg:y="20.8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playSound(SOUND_PRESETx)</text:span></text:p>
            <text:p><text:span text:style-name="T11">/setLed(LED_PRESETx)</text:span></text:p>
            <text:p><text:span text:style-name="T11">/startMpdPlayback()</text:span></text:p>
          </draw:text-box>
        </draw:frame>
        <draw:connector draw:style-name="gr59" draw:text-style-name="P2" draw:layer="layout" svg:x1="10.64cm" svg:y1="27.17cm" svg:x2="5.921cm" svg:y2="26.5cm" draw:start-shape="id45" draw:start-glue-point="5" draw:end-shape="id40" draw:end-glue-point="2" svg:d="M10640 27170h-4719v-670" svg:viewBox="0 0 4720 671">
          <text:p/>
        </draw:connector>
        <draw:frame draw:style-name="gr65" draw:text-style-name="P14" draw:layer="layout" svg:width="4.763cm" svg:height="0.635cm" svg:x="5.444cm" svg:y="27.135cm">
          <draw:text-box>
            <text:p><text:span text:style-name="T11">/startSpotifyPlayback()</text:span></text:p>
          </draw:text-box>
        </draw:frame>
        <draw:connector draw:style-name="gr86" draw:text-style-name="P2" draw:layer="layout" draw:type="curve" svg:x1="15.74cm" svg:y1="22.992cm" svg:x2="15.74cm" svg:y2="22.261cm" draw:start-shape="id38" draw:start-glue-point="1" draw:end-shape="id38" draw:end-glue-point="12" svg:d="M15740 22992c751 0 751-731 0-731" svg:viewBox="0 0 564 732">
          <text:p/>
        </draw:connector>
        <draw:frame draw:style-name="gr88" draw:text-style-name="P14" draw:layer="layout" svg:width="4.232cm" svg:height="1.841cm" svg:x="16.105cm" svg:y="21.47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playSound(SOUND_NEXT)</text:span></text:p>
            <text:p><text:span text:style-name="T11">/nextSong()</text:span></text:p>
          </draw:text-box>
        </draw:frame>
        <draw:custom-shape draw:style-name="gr13" draw:text-style-name="P2" xml:id="id45" draw:id="id45" draw:layer="layout" svg:width="0.6cm" svg:height="0.6cm" svg:x="10.64cm" svg:y="26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10.703cm" svg:y1="23.649cm" svg:x2="10.94cm" svg:y2="26.87cm" draw:start-shape="id38" draw:start-glue-point="9" draw:end-shape="id45" draw:end-glue-point="4" svg:d="M10703 23649h-523v1905h760v1316" svg:viewBox="0 0 761 3222">
          <text:p/>
        </draw:connector>
        <draw:connector draw:style-name="gr59" draw:text-style-name="P2" draw:layer="layout" draw:line-skew="-0.946cm" svg:x1="11.24cm" svg:y1="27.17cm" svg:x2="14.241cm" svg:y2="27.97cm" draw:start-shape="id45" draw:start-glue-point="7" draw:end-shape="id46" draw:end-glue-point="5" svg:d="M11240 27170h555v800h2446" svg:viewBox="0 0 3002 801">
          <text:p/>
        </draw:connector>
        <draw:frame draw:style-name="gr89" draw:text-style-name="P40" draw:layer="layout" svg:width="4.127cm" svg:height="0.888cm" svg:x="15.505cm" svg:y="26.564cm">
          <draw:text-box>
            <text:p><text:span text:style-name="T29">/playSound(</text:span><text:span text:style-name="T30">SOUND_NEXT</text:span><text:span text:style-name="T31">)</text:span></text:p>
            <text:p text:style-name="P36"><text:span text:style-name="T31">/nextSong()</text:span></text:p>
          </draw:text-box>
        </draw:frame>
        <draw:custom-shape draw:style-name="gr13" draw:text-style-name="P2" xml:id="id39" draw:id="id39" draw:layer="layout" svg:width="0.6cm" svg:height="0.6cm" svg:x="8.341cm" svg:y="17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7.827cm" svg:y1="16.365cm" svg:x2="8.641cm" svg:y2="17.97cm" draw:start-shape="id37" draw:start-glue-point="12" draw:end-shape="id39" draw:end-glue-point="4" svg:d="M7827 16365v790h814v815" svg:viewBox="0 0 815 1606">
          <text:p/>
        </draw:connector>
        <draw:frame draw:style-name="gr90" draw:text-style-name="P14" draw:layer="layout" svg:width="2.251cm" svg:height="0.645cm" svg:x="5.734cm" svg:y="16.566cm">
          <draw:text-box>
            <text:p><text:span text:style-name="T11">ButtonPlay</text:span></text:p>
          </draw:text-box>
        </draw:frame>
        <draw:frame draw:style-name="gr90" draw:text-style-name="P34" draw:layer="layout" svg:width="3.81cm" svg:height="0.645cm" svg:x="5.092cm" svg:y="17.71cm">
          <draw:text-box>
            <text:p><text:span text:style-name="T14">[</text:span><text:span text:style-name="T22">isSpotifyConnected</text:span><text:span text:style-name="T14">]</text:span></text:p>
          </draw:text-box>
        </draw:frame>
        <draw:frame draw:style-name="gr90" draw:text-style-name="P14" draw:layer="layout" svg:width="1.588cm" svg:height="0.645cm" svg:x="8.937cm" svg:y="17.71cm">
          <draw:text-box>
            <text:p><text:span text:style-name="T11">[else]</text:span></text:p>
          </draw:text-box>
        </draw:frame>
        <draw:connector draw:style-name="gr59" draw:text-style-name="P2" draw:layer="layout" draw:line-skew="0.451cm -0.397cm" svg:x1="14.335cm" svg:y1="15.746cm" svg:x2="14.773cm" svg:y2="21.722cm" draw:start-shape="id37" draw:start-glue-point="8" draw:end-shape="id38" draw:end-glue-point="7" svg:d="M14335 15746h952v2901h-514v3075" svg:viewBox="0 0 953 5977">
          <text:p/>
        </draw:connector>
        <draw:frame draw:style-name="gr90" draw:text-style-name="P14" draw:layer="layout" svg:width="2.222cm" svg:height="0.645cm" svg:x="9.255cm" svg:y="25.437cm">
          <draw:text-box>
            <text:p><text:span text:style-name="T11">ButtonPlay</text:span></text:p>
          </draw:text-box>
        </draw:frame>
        <draw:frame draw:style-name="gr65" draw:text-style-name="P39" draw:layer="layout" svg:width="3.175cm" svg:height="0.635cm" svg:x="7.785cm" svg:y="26.617cm">
          <draw:text-box>
            <text:p><text:span text:style-name="T26">[isSpotifyConnected]</text:span></text:p>
          </draw:text-box>
        </draw:frame>
        <draw:frame draw:style-name="gr90" draw:text-style-name="P14" draw:layer="layout" svg:width="1.271cm" svg:height="0.645cm" svg:x="10.999cm" svg:y="26.7cm">
          <draw:text-box>
            <text:p><text:span text:style-name="T11">[else]</text:span></text:p>
          </draw:text-box>
        </draw:frame>
        <draw:custom-shape draw:style-name="gr13" draw:text-style-name="P2" xml:id="id46" draw:id="id46" draw:layer="layout" svg:width="0.6cm" svg:height="0.6cm" svg:x="14.241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14.541cm" svg:y1="27.67cm" svg:x2="11.478cm" svg:y2="24.229cm" draw:start-shape="id46" draw:start-glue-point="4" draw:end-shape="id38" draw:end-glue-point="17" svg:d="M14541 27670v-1716h-3063v-1725" svg:viewBox="0 0 3064 3442">
          <text:p/>
        </draw:connector>
        <draw:connector draw:style-name="gr59" draw:text-style-name="P2" draw:layer="layout" draw:line-skew="0.238cm" svg:x1="14.841cm" svg:y1="27.97cm" svg:x2="15.315cm" svg:y2="24.229cm" draw:start-shape="id46" draw:start-glue-point="7" draw:end-shape="id38" draw:end-glue-point="15" svg:d="M14841 27970h764v-2016h-290v-1725" svg:viewBox="0 0 765 3742">
          <text:p/>
        </draw:connector>
        <draw:frame draw:style-name="gr65" draw:text-style-name="P14" draw:layer="layout" svg:width="1.905cm" svg:height="0.635cm" svg:x="12.347cm" svg:y="27.987cm">
          <draw:text-box>
            <text:p><text:span text:style-name="T11">[isPlayOn]</text:span></text:p>
          </draw:text-box>
        </draw:frame>
        <draw:frame draw:style-name="gr56" draw:text-style-name="P40" draw:layer="layout" svg:width="4.127cm" svg:height="0.953cm" svg:x="11.395cm" svg:y="25.047cm">
          <draw:text-box>
            <text:p><text:span text:style-name="T29">/playSound(</text:span><text:span text:style-name="T30">SOUND_PLAY</text:span><text:span text:style-name="T31">)</text:span></text:p>
            <text:p text:style-name="P36"><text:span text:style-name="T31">/setLed(LED_PLAY)</text:span></text:p>
          </draw:text-box>
        </draw:frame>
        <draw:frame draw:style-name="gr90" draw:text-style-name="P14" draw:layer="layout" svg:width="1.27cm" svg:height="0.645cm" svg:x="13.565cm" svg:y="27.125cm">
          <draw:text-box>
            <text:p><text:span text:style-name="T11">[else]</text:span></text:p>
          </draw:text-box>
        </draw:frame>
      </draw:page>
      <draw:page draw:name="page4" draw:style-name="dp1" draw:master-page-name="Default">
        <draw:connector draw:style-name="gr91" draw:text-style-name="P2" draw:layer="layout" svg:x1="8.067cm" svg:y1="11.833cm" svg:x2="14.017cm" svg:y2="5.923cm" draw:start-shape="id47" draw:start-glue-point="1" draw:end-shape="id48" draw:end-glue-point="6" svg:d="M8067 11833h2987v-5910h2963" svg:viewBox="0 0 5951 5911">
          <text:p/>
        </draw:connector>
        <draw:g draw:style-name="gr4">
          <draw:frame draw:style-name="gr23" draw:text-style-name="P24" draw:layer="layout" svg:width="7.555cm" svg:height="1.694cm" svg:x="1.001cm" svg:y="1.093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48" draw:id="id48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92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93" draw:text-style-name="P41" draw:layer="layout" svg:width="2.858cm" svg:height="1.026cm" svg:x="13.314cm" svg:y="4.582cm">
            <draw:text-box>
              <text:p text:style-name="P4"><text:span text:style-name="T32">VolumeControl</text:span></text:p>
            </draw:text-box>
          </draw:frame>
        </draw:g>
        <draw:g draw:style-name="gr1" xml:id="id47" draw:id="id47">
          <draw:custom-shape draw:style-name="gr69" draw:text-style-name="P30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49" draw:id="id49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92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93" draw:text-style-name="P41" draw:layer="layout" svg:width="2.858cm" svg:height="1.026cm" svg:x="13.315cm" svg:y="7.182cm">
            <draw:text-box>
              <text:p text:style-name="P4"><text:span text:style-name="T32">UsbService</text:span></text:p>
            </draw:text-box>
          </draw:frame>
        </draw:g>
        <draw:connector draw:style-name="gr91" draw:text-style-name="P2" draw:layer="layout" svg:x1="8.067cm" svg:y1="11.833cm" svg:x2="14.018cm" svg:y2="8.522cm" draw:start-shape="id47" draw:end-shape="id49" draw:end-glue-point="3" svg:d="M8067 11833h2987v-3311h2964" svg:viewBox="0 0 5952 3312">
          <text:p/>
        </draw:connector>
        <draw:custom-shape draw:style-name="gr44" draw:text-style-name="P1" xml:id="id50" draw:id="id50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2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93" draw:text-style-name="P41" draw:layer="layout" svg:width="3.261cm" svg:height="1.026cm" svg:x="13.296cm" svg:y="9.762cm">
          <draw:text-box>
            <text:p text:style-name="P4"><text:span text:style-name="T32">SpotifyConnect</text:span></text:p>
          </draw:text-box>
        </draw:frame>
        <draw:connector draw:style-name="gr91" draw:text-style-name="P2" draw:layer="layout" svg:x1="8.067cm" svg:y1="11.833cm" svg:x2="13.999cm" svg:y2="11.103cm" draw:start-shape="id47" draw:end-shape="id50" draw:end-glue-point="6" svg:d="M8067 11833h2978v-730h2954" svg:viewBox="0 0 5933 731">
          <text:p/>
        </draw:connector>
        <draw:custom-shape draw:style-name="gr44" draw:text-style-name="P1" xml:id="id51" draw:id="id51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2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93" draw:text-style-name="P41" draw:layer="layout" svg:width="3.261cm" svg:height="1.026cm" svg:x="13.314cm" svg:y="12.278cm">
          <draw:text-box>
            <text:p text:style-name="P4"><text:span text:style-name="T32">WifiService</text:span></text:p>
          </draw:text-box>
        </draw:frame>
        <draw:connector draw:style-name="gr91" draw:text-style-name="P2" draw:layer="layout" svg:x1="8.067cm" svg:y1="11.833cm" svg:x2="14.017cm" svg:y2="13.619cm" draw:start-shape="id47" draw:start-glue-point="1" draw:end-shape="id51" draw:end-glue-point="6" svg:d="M8067 11833h2987v1786h2963" svg:viewBox="0 0 5951 1787">
          <text:p/>
        </draw:connector>
        <draw:custom-shape draw:style-name="gr44" draw:text-style-name="P1" xml:id="id52" draw:id="id52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2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93" draw:text-style-name="P41" draw:layer="layout" svg:width="3.261cm" svg:height="1.026cm" svg:x="13.314cm" svg:y="14.818cm">
          <draw:text-box>
            <text:p text:style-name="P4"><text:span text:style-name="T32">PowerControl</text:span></text:p>
          </draw:text-box>
        </draw:frame>
        <draw:connector draw:style-name="gr91" draw:text-style-name="P2" draw:layer="layout" svg:x1="8.067cm" svg:y1="11.833cm" svg:x2="14.017cm" svg:y2="16.159cm" draw:start-shape="id47" draw:end-shape="id52" draw:end-glue-point="6" svg:d="M8067 11833h2987v4326h2963" svg:viewBox="0 0 5951 4327">
          <text:p/>
        </draw:connector>
        <draw:custom-shape draw:style-name="gr44" draw:text-style-name="P1" xml:id="id53" draw:id="id53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2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93" draw:text-style-name="P41" draw:layer="layout" svg:width="3.261cm" svg:height="1.026cm" svg:x="13.314cm" svg:y="17.599cm">
          <draw:text-box>
            <text:p text:style-name="P4"><text:span text:style-name="T32">Errorhandler</text:span></text:p>
          </draw:text-box>
        </draw:frame>
        <draw:connector draw:style-name="gr91" draw:text-style-name="P2" draw:layer="layout" svg:x1="8.067cm" svg:y1="11.833cm" svg:x2="14.017cm" svg:y2="18.94cm" draw:start-shape="id47" draw:end-shape="id53" draw:end-glue-point="6" svg:d="M8067 11833h2987v7107h2963" svg:viewBox="0 0 5951 7108">
          <text:p/>
        </draw:connector>
        <draw:custom-shape draw:style-name="gr44" draw:text-style-name="P1" xml:id="id54" draw:id="id54" draw:layer="layout" svg:width="0.635cm" svg:height="0.635cm" svg:x="14.018cm" svg:y="21.4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2" draw:text-style-name="P2" draw:layer="layout" svg:width="6.092cm" svg:height="2.297cm" svg:x="13.324cm" svg:y="20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2cm" svg:y1="20.393cm" svg:x2="16.152cm" svg:y2="20.663cm">
            <text:p/>
          </draw:line>
          <draw:line draw:style-name="gr10" draw:text-style-name="P2" draw:layer="layout" svg:x1="13.303cm" svg:y1="20.969cm" svg:x2="15.836cm" svg:y2="20.971cm">
            <text:p/>
          </draw:line>
          <draw:line draw:style-name="gr10" draw:text-style-name="P2" draw:layer="layout" svg:x1="16.15cm" svg:y1="20.663cm" svg:x2="15.836cm" svg:y2="20.972cm">
            <text:p/>
          </draw:line>
        </draw:g>
        <draw:frame draw:style-name="gr93" draw:text-style-name="P41" draw:layer="layout" svg:width="3.261cm" svg:height="1.026cm" svg:x="13.315cm" svg:y="20.399cm">
          <draw:text-box>
            <text:p text:style-name="P4"><text:span text:style-name="T32">RemoteMonitoring</text:span></text:p>
          </draw:text-box>
        </draw:frame>
        <draw:connector draw:style-name="gr91" draw:text-style-name="P2" draw:layer="layout" svg:x1="8.067cm" svg:y1="11.833cm" svg:x2="14.018cm" svg:y2="21.74cm" draw:start-shape="id47" draw:start-glue-point="1" draw:end-shape="id54" draw:end-glue-point="6" svg:d="M8067 11833h2987v9907h2964" svg:viewBox="0 0 5952 990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23T17:59:39.900238653</dc:date>
    <meta:editing-duration>PT5H27M36S</meta:editing-duration>
    <meta:editing-cycles>47</meta:editing-cycles>
    <meta:print-date>2026-04-03T16:45:26.431431754</meta:print-date>
    <meta:document-statistic meta:object-count="358"/>
  </office:meta>
</office:document-meta>
</file>