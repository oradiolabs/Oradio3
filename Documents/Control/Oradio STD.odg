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09cm" fo:min-width="0cm" loext:decorative="fals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349cm" fo:min-width="0.134cm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svg:stroke-width="0cm" svg:stroke-color="#000000" draw:marker-start="" draw:marker-start-width="0.2cm" draw:marker-end="Arrow_20_concave" draw:marker-end-width="0.2cm" draw:textarea-vertical-align="middle" fo:padding-top="0.125cm" fo:padding-bottom="0.125cm" fo:padding-left="0.25cm" fo:padding-right="0.25cm" loext:decorative="false"/>
    </style:style>
    <style:style style:name="gr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 loext:decorative="false"/>
    </style:style>
    <style:style style:name="gr7" style:family="graphic" style:parent-style-name="objectwithoutfill">
      <style:graphic-properties svg:stroke-color="#000000" draw:marker-start="Arrow_20_concave" draw:marker-end="" draw:marker-end-width="0.2cm" draw:fill="none" draw:textarea-vertical-align="middle" loext:decorative="false"/>
    </style:style>
    <style:style style:name="gr8" style:family="graphic" style:parent-style-name="standard">
      <style:graphic-properties svg:stroke-width="0cm" svg:stroke-color="#000000" draw:marker-start="Arrow_20_concave" draw:marker-start-width="0.2cm" draw:marker-end-width="0.2cm" draw:textarea-vertical-align="middle" fo:padding-top="0.125cm" fo:padding-bottom="0.125cm" fo:padding-left="0.25cm" fo:padding-right="0.25cm" loext:decorative="false"/>
    </style:style>
    <style:style style:name="gr9" style:family="graphic" style:parent-style-name="objectwithoutfill">
      <style:graphic-properties svg:stroke-color="#000000" draw:marker-end="Arrow_20_concave" draw:marker-end-width="0.2cm" draw:fill="none" draw:textarea-vertical-align="middle" loext:decorative="false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3.174cm" fo:min-width="5.843cm" loext:decorative="false"/>
    </style:style>
    <style:style style:name="gr12" style:family="graphic" style:parent-style-name="standard">
      <style:graphic-properties draw:stroke="none" draw:fill="none" fo:min-height="1.279cm" loext:decorative="false"/>
      <style:paragraph-properties style:writing-mode="lr-tb"/>
    </style:style>
    <style:style style:name="gr13" style:family="graphic" style:parent-style-name="standard">
      <style:graphic-properties svg:stroke-width="0.05cm" svg:stroke-color="#000000" draw:marker-start-width="0.35cm" draw:marker-end-width="0.35cm" draw:fill="none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14" style:family="graphic" style:parent-style-name="standard">
      <style:graphic-properties draw:stroke="none" svg:stroke-color="#000000" draw:fill="none" draw:fill-color="#ffffff" fo:min-height="0.50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7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4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93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656cm" loext:decorative="false"/>
      <style:paragraph-properties style:writing-mode="lr-tb"/>
    </style:style>
    <style:style style:name="gr1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2.371cm" loext:decorative="false"/>
      <style:paragraph-properties style:writing-mode="lr-tb"/>
    </style:style>
    <style:style style:name="gr2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33cm" fo:min-width="5.89cm" loext:decorative="false"/>
    </style:style>
    <style:style style:name="gr23" style:family="graphic" style:parent-style-name="standard">
      <style:graphic-properties draw:stroke="none" svg:stroke-width="0.25cm" svg:stroke-color="#000000" draw:marker-start-width="0.575cm" draw:marker-end-width="0.575cm" draw:fill="none" draw:fill-color="#ffffff" draw:auto-grow-height="false" fo:min-height="1.25cm" loext:decorative="false"/>
      <style:paragraph-properties style:writing-mode="lr-tb"/>
    </style:style>
    <style:style style:name="gr24" style:family="graphic" style:parent-style-name="standard">
      <style:graphic-properties svg:stroke-color="#000000" draw:fill="none" draw:textarea-vertical-align="middle" loext:decorative="false"/>
    </style:style>
    <style:style style:name="gr2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 style:protect="size" loext:decorative="false"/>
    </style:style>
    <style:style style:name="gr2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 loext:decorative="false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.174cm" fo:min-width="0cm" loext:decorative="false"/>
    </style:style>
    <style:style style:name="gr2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2cm" fo:min-width="1.137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0.637cm" loext:decorative="false"/>
      <style:paragraph-properties style:writing-mode="lr-tb"/>
    </style:style>
    <style:style style:name="gr30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93cm" fo:min-width="1.155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1.971cm" loext:decorative="false"/>
      <style:paragraph-properties style:writing-mode="lr-tb"/>
    </style:style>
    <style:style style:name="gr37" style:family="graphic" style:parent-style-name="objectwithoutfill">
      <style:graphic-properties draw:stroke="dash" draw:stroke-dash="Long_20_Dash" svg:stroke-width="0.035cm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3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4cm" fo:min-width="1.137cm" style:writing-mode="lr-tb" loext:decorative="false"/>
      <style:paragraph-properties style:writing-mode="lr-tb"/>
    </style:style>
    <style:style style:name="gr39" style:family="graphic">
      <style:graphic-properties style:protect="size" style:writing-mode="lr-tb" loext:decorative="false"/>
    </style:style>
    <style:style style:name="gr40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1.577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1.843cm" loext:decorative="false"/>
      <style:paragraph-properties style:writing-mode="lr-tb"/>
    </style:style>
    <style:style style:name="gr43" style:family="graphic" style:parent-style-name="standard">
      <style:graphic-properties draw:fill-color="#000000" draw:textarea-horizontal-align="justify" draw:textarea-vertical-align="middle" draw:auto-grow-height="false" fo:min-height="0.199cm" fo:min-width="0cm" fo:wrap-option="wrap" loext:decorative="false"/>
    </style:style>
    <style:style style:name="gr44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 loext:decorative="false"/>
    </style:style>
    <style:style style:name="gr45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27.65cm" fo:min-width="19.117cm" loext:decorative="false"/>
    </style:style>
    <style:style style:name="gr48" style:family="graphic" style:parent-style-name="standard">
      <style:graphic-properties draw:stroke="none" draw:fill="none" fo:min-height="2.695cm" loext:decorative="false"/>
      <style:paragraph-properties style:writing-mode="lr-tb"/>
    </style:style>
    <style:style style:name="gr49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515cm" fo:min-width="4.204cm" fo:wrap-option="wrap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2" style:family="graphic" style:parent-style-name="objectwithoutfill">
      <style:graphic-properties svg:stroke-color="#000000" draw:fill="none" draw:textarea-vertical-align="middle" loext:decorative="false"/>
    </style:style>
    <style:style style:name="gr53" style:family="graphic" style:parent-style-name="standard">
      <style:graphic-properties draw:stroke="none" draw:fill="none" fo:min-height="2.605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55" style:family="graphic" style:parent-style-name="objectwithoutfill">
      <style:graphic-properties svg:stroke-width="0.035cm" svg:stroke-color="#000000" draw:marker-start-width="0.252cm" draw:marker-end="Arrowheads_20_22" draw:marker-end-width="0.352cm" draw:fill="none" draw:textarea-vertical-align="middle" fo:padding-top="0.142cm" fo:padding-bottom="0.142cm" fo:padding-left="0.267cm" fo:padding-right="0.267cm" loext:decorative="fals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5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in-height="0.737cm" loext:decorative="false"/>
      <style:paragraph-properties style:writing-mode="lr-tb"/>
    </style:style>
    <style:style style:name="gr59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60" style:family="graphic" style:parent-style-name="standard">
      <style:graphic-properties draw:fill="none" loext:fill-use-slide-background="false" draw:textarea-horizontal-align="justify" draw:textarea-vertical-align="middle" draw:auto-grow-height="false" fo:min-height="1.973cm" fo:min-width="7.12cm" style:writing-mode="lr-tb" loext:decorative="false"/>
      <style:paragraph-properties style:writing-mode="lr-tb"/>
    </style:style>
    <style:style style:name="gr61" style:family="graphic" style:parent-style-name="objectwithoutfill">
      <style:graphic-properties draw:stroke="dash" draw:stroke-dash="Long_20_Dash" svg:stroke-color="#000000" svg:stroke-linecap="butt" draw:fill="none" draw:textarea-vertical-align="middle" loext:decorative="false"/>
    </style:style>
    <style:style style:name="gr62" style:family="graphic" style:parent-style-name="objectwithoutfill">
      <style:graphic-properties svg:stroke-width="0.051cm" svg:stroke-color="#000000" draw:marker-start-width="0.279cm" draw:marker-end="Arrowheads_20_2" draw:marker-end-width="0.381cm" draw:fill="none" draw:textarea-vertical-align="middle" fo:padding-top="0.15cm" fo:padding-bottom="0.15cm" fo:padding-left="0.275cm" fo:padding-right="0.275cm" loext:decorative="fals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in-height="1.237cm" loext:decorative="false"/>
      <style:paragraph-properties style:writing-mode="lr-tb"/>
    </style:style>
    <style:style style:name="gr64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 loext:decorative="false"/>
    </style:style>
    <style:style style:name="gr65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in-height="0.485cm" loext:decorative="false"/>
      <style:paragraph-properties style:writing-mode="lr-tb"/>
    </style:style>
    <style:style style:name="gr67" style:family="graphic" style:parent-style-name="standard">
      <style:graphic-properties draw:stroke="none" draw:fill="none" fo:min-height="1.479cm" loext:decorative="false"/>
      <style:paragraph-properties style:writing-mode="lr-tb"/>
    </style:style>
    <style:style style:name="gr68" style:family="graphic" style:parent-style-name="standard">
      <style:graphic-properties svg:stroke-width="0.05cm" svg:stroke-color="#000000" draw:marker-start-width="0.35cm" draw:marker-end-width="0.35cm" draw:fill="solid" draw:fill-color="#ffffff" draw:textarea-horizontal-align="justify" draw:textarea-vertical-align="middle" draw:auto-grow-height="false" fo:min-height="0.208cm" fo:min-width="0cm" fo:padding-top="0.15cm" fo:padding-bottom="0.15cm" fo:padding-left="0.275cm" fo:padding-right="0.275cm" style:protect="size" loext:decorative="false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70" style:family="graphic" style:parent-style-name="standard">
      <style:graphic-properties draw:stroke="none" draw:fill="none" fo:min-height="1.817cm" loext:decorative="false"/>
      <style:paragraph-properties style:writing-mode="lr-tb"/>
    </style:style>
    <style:style style:name="gr71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in-height="0.955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in-height="1.107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in-height="0.902cm" loext:decorative="false"/>
      <style:paragraph-properties style:writing-mode="lr-tb"/>
    </style:style>
    <style:style style:name="gr77" style:family="graphic" style:parent-style-name="standard">
      <style:graphic-properties draw:stroke="none" draw:fill="none" fo:min-height="2.211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in-height="1.183cm" loext:decorative="false"/>
      <style:paragraph-properties style:writing-mode="lr-tb"/>
    </style:style>
    <style:style style:name="gr79" style:family="graphic" style:parent-style-name="standard">
      <style:graphic-properties draw:stroke="none" draw:fill="none" fo:min-height="1.84cm" loext:decorative="false"/>
      <style:paragraph-properties style:writing-mode="lr-tb"/>
    </style:style>
    <style:style style:name="gr80" style:family="graphic" style:parent-style-name="standard">
      <style:graphic-properties draw:stroke="none" draw:fill="none" fo:min-height="1.741cm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draw:fill="none" fo:min-height="2.211cm" loext:decorative="false"/>
      <style:paragraph-properties style:writing-mode="lr-tb"/>
    </style:style>
    <style:style style:name="gr82" style:family="graphic" style:parent-style-name="standard">
      <style:graphic-properties draw:stroke="none" draw:fill="none" fo:min-height="3.867cm" loext:decorative="false"/>
      <style:paragraph-properties style:writing-mode="lr-tb"/>
    </style:style>
    <style:style style:name="gr83" style:family="graphic" style:parent-style-name="standard">
      <style:graphic-properties draw:stroke="none" draw:fill="none" fo:min-height="2.377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in-height="1.11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in-height="1.973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in-height="1.285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in-height="1.067cm" loext:decorative="false"/>
      <style:paragraph-properties style:writing-mode="lr-tb"/>
    </style:style>
    <style:style style:name="gr89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in-height="1.972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in-height="1.591cm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in-height="0.638cm" loext:decorative="false"/>
      <style:paragraph-properties style:writing-mode="lr-tb"/>
    </style:style>
    <style:style style:name="gr94" style:family="graphic" style:parent-style-name="objectwithoutfill">
      <style:graphic-properties svg:stroke-width="0.035cm" svg:stroke-color="#000000" draw:marker-start-width="0.252cm" draw:marker-end="Arrowheads_20_21" draw:marker-end-width="0.352cm" draw:fill="none" draw:textarea-vertical-align="middle" fo:padding-top="0.142cm" fo:padding-bottom="0.142cm" fo:padding-left="0.267cm" fo:padding-right="0.267cm" loext:decorative="false"/>
    </style:style>
    <style:style style:name="gr95" style:family="graphic" style:parent-style-name="standard">
      <style:graphic-properties svg:stroke-color="#000000" draw:fill="none" draw:textarea-horizontal-align="justify" draw:textarea-vertical-align="middle" draw:auto-grow-height="false" fo:min-height="2.047cm" fo:min-width="5.592cm" loext:decorative="false"/>
    </style:style>
    <style:style style:name="gr96" style:family="graphic" style:parent-style-name="standard">
      <style:graphic-properties draw:stroke="none" draw:fill="none" fo:min-height="0.776cm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style:font-name="Liberation Mono"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P7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style:paragraph-properties fo:text-align="center" loext:tab-stop-distance="0cm" style:writing-mode="lr-tb">
        <style:tab-stops/>
      </style:paragraph-properties>
    </style:style>
    <style:style style:name="P11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0pt" fo:font-weight="bold" style:font-size-asian="18pt" style:font-weight-asian="bold" style:font-size-complex="18pt" style:font-weight-complex="bold"/>
    </style:style>
    <style:style style:name="P12" style:family="paragraph">
      <style:paragraph-properties fo:text-align="center"/>
      <style:text-properties fo:font-size="6pt" style:font-size-asian="6pt" style:font-size-complex="6pt"/>
    </style:style>
    <style:style style:name="P13" style:family="paragraph">
      <loext:graphic-properties draw:fill="none"/>
      <style:paragraph-properties fo:text-align="center" style:writing-mode="lr-tb"/>
      <style:text-properties fo:font-size="6pt" style:font-size-asian="6pt" style:font-size-complex="6pt"/>
    </style:style>
    <style:style style:name="P14" style:family="paragraph">
      <loext:graphic-properties draw:fill="none" draw:fill-color="#ffffff"/>
      <style:text-properties fo:font-size="8pt"/>
    </style:style>
    <style:style style:name="P15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0pt" style:font-size-asian="18pt" style:font-size-complex="18pt"/>
    </style:style>
    <style:style style:name="P16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 draw:fill-color="#ffffff"/>
      <style:text-properties fo:font-size="14pt" style:font-size-asian="14pt" style:font-size-complex="14pt"/>
    </style:style>
    <style:style style:name="P19" style:family="paragraph">
      <loext:graphic-properties draw:fill="none"/>
      <style:paragraph-properties fo:margin-top="0.42cm" fo:margin-bottom="0.35cm"/>
      <style:text-properties style:font-name="Liberation Mono" fo:font-size="16pt" style:font-size-asian="10pt" style:font-size-complex="10pt"/>
    </style:style>
    <style:style style:name="P20" style:family="paragraph"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2pt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  <style:text-properties fo:font-size="12pt" fo:font-weight="bold"/>
    </style:style>
    <style:style style:name="P24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26" style:family="paragraph">
      <loext:graphic-properties draw:fill="none"/>
      <style:text-properties fo:font-size="10pt"/>
    </style:style>
    <style:style style:name="P27" style:family="paragraph">
      <loext:graphic-properties draw:fill="none" draw:fill-color="#ffffff"/>
      <style:text-properties fo:font-size="10pt" style:font-size-asian="12pt" style:font-size-complex="12pt"/>
    </style:style>
    <style:style style:name="P28" style:family="paragraph">
      <style:paragraph-properties fo:text-align="center"/>
      <style:text-properties fo:font-size="14pt" fo:font-style="italic" style:font-size-asian="14pt" style:font-size-complex="14pt"/>
    </style:style>
    <style:style style:name="P29" style:family="paragraph">
      <loext:graphic-properties draw:fill="none"/>
      <style:paragraph-properties fo:text-align="center" style:writing-mode="lr-tb"/>
      <style:text-properties fo:font-size="14pt" fo:font-style="italic" style:font-size-asian="14pt" style:font-size-complex="14pt"/>
    </style:style>
    <style:style style:name="P30" style:family="paragraph">
      <loext:graphic-properties draw:fill="solid" draw:fill-color="#ffffff"/>
      <style:paragraph-properties fo:text-align="center"/>
    </style:style>
    <style:style style:name="P31" style:family="paragraph">
      <loext:graphic-properties draw:fill="none" draw:fill-color="#ffffff"/>
      <style:text-properties fo:font-size="8pt" style:font-size-asian="8pt" style:font-size-complex="8pt"/>
    </style:style>
    <style:style style:name="P32" style:family="paragraph">
      <loext:graphic-properties draw:fill="none" draw:fill-color="#ffffff"/>
      <style:text-properties fo:font-size="10pt" style:font-size-asian="10pt" style:font-size-complex="10pt"/>
    </style:style>
    <style:style style:name="P33" style:family="paragraph">
      <style:text-properties fo:font-size="10pt"/>
    </style:style>
    <style:style style:name="P34" style:family="paragraph">
      <loext:graphic-properties draw:fill="none" draw:fill-color="#ffffff"/>
      <style:text-properties fo:font-size="10pt"/>
    </style:style>
    <style:style style:name="P35" style:family="paragraph">
      <style:text-properties fo:font-size="12pt"/>
    </style:style>
    <style:style style:name="P36" style:family="paragraph">
      <loext:graphic-properties draw:fill="none"/>
      <style:text-properties fo:font-size="12pt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39" style:family="paragraph">
      <style:paragraph-properties fo:margin-left="0cm" fo:margin-right="0cm" fo:text-indent="0cm"/>
    </style:style>
    <style:style style:name="P40" style:family="paragraph">
      <loext:graphic-properties draw:fill="none" draw:fill-color="#ffffff"/>
      <style:text-properties fo:font-size="8pt" style:font-size-asian="10pt" style:font-size-complex="10pt"/>
    </style:style>
    <style:style style:name="P41" style:family="paragraph">
      <loext:graphic-properties draw:fill="none" draw:fill-color="#ffffff"/>
      <style:text-properties fo:color="#000000" loext:opacity="100%" fo:font-size="8pt"/>
    </style:style>
    <style:style style:name="P42" style:family="paragraph">
      <loext:graphic-properties draw:fill="none" draw:fill-color="#ffffff"/>
    </style:style>
    <style:style style:name="P43" style:family="paragraph">
      <loext:graphic-properties draw:fill="none"/>
      <style:paragraph-properties fo:margin-top="0.42cm" fo:margin-bottom="0.35cm"/>
      <style:text-properties style:font-name="Liberation Mono" fo:font-size="8pt" style:font-size-asian="8pt" style:font-size-complex="8pt"/>
    </style:style>
    <style:style style:name="T1" style:family="text">
      <style:text-properties style:font-name="Liberation Mono" fo:font-size="12pt" style:font-size-asian="12pt" style:font-size-complex="12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/>
    </style:style>
    <style:style style:name="T8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" style:family="text">
      <style:text-properties style:font-name="Liberation Mono" fo:font-size="10pt" fo:font-weight="bold" style:font-size-asian="18pt" style:font-weight-asian="bold" style:font-size-complex="18pt" style:font-weight-complex="bold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8pt"/>
    </style:style>
    <style:style style:name="T12" style:family="text">
      <style:text-properties style:font-name="Liberation Mono" fo:font-size="10pt" style:font-size-asian="18pt" style:font-size-complex="18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2pt" fo:font-weight="bold" style:font-weight-asian="bold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font-name="Liberation Mono" fo:font-size="16pt" style:font-size-asian="10pt" style:font-size-complex="10pt"/>
    </style:style>
    <style:style style:name="T18" style:family="text">
      <style:text-properties fo:font-size="12pt" fo:font-weight="bold"/>
    </style:style>
    <style:style style:name="T19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0pt" style:font-size-asian="12pt" style:font-size-complex="12pt"/>
    </style:style>
    <style:style style:name="T21" style:family="text">
      <style:text-properties fo:font-size="14pt" fo:font-style="italic" style:font-size-asian="14pt" style:font-size-complex="14pt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8pt" style:font-size-asian="10pt" style:font-size-complex="10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8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loext:opacity="100%" fo:font-size="8pt" style:font-size-asian="10pt" style:font-size-complex="10pt"/>
    </style:style>
    <style:style style:name="T31" style:family="text">
      <style:text-properties fo:color="#000000" loext:opacity="100%" fo:font-size="8pt"/>
    </style:style>
    <style:style style:name="T32" style:family="text">
      <style:text-properties style:font-name="Liberation Mono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Template" draw:style-name="dp1" draw:master-page-name="Default">
        <draw:g draw:style-name="gr1">
          <draw:custom-shape draw:style-name="gr2" draw:text-style-name="P1" draw:layer="layout" svg:width="0.696cm" svg:height="0.647cm" svg:x="2.426cm" svg:y="2.7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896cm" svg:height="0.847cm" svg:x="2.326cm" svg:y="2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">
          <draw:line draw:style-name="gr5" draw:text-style-name="P3" draw:layer="layout" svg:x1="10.894cm" svg:y1="2.286cm" svg:x2="10.059cm" svg:y2="2.295cm">
            <text:p/>
          </draw:line>
          <draw:line draw:style-name="gr6" draw:text-style-name="P2" draw:layer="layout" svg:x1="10.021cm" svg:y1="1.97cm" svg:x2="10.029cm" svg:y2="2.627cm">
            <text:p/>
          </draw:line>
          <draw:line draw:style-name="gr7" draw:text-style-name="P2" draw:layer="layout" svg:x1="8.472cm" svg:y1="1.612cm" svg:x2="9.988cm" svg:y2="2.17cm">
            <text:p/>
          </draw:line>
          <draw:line draw:style-name="gr7" draw:text-style-name="P2" draw:layer="layout" svg:x1="8.631cm" svg:y1="2.96cm" svg:x2="9.996cm" svg:y2="2.445cm">
            <text:p/>
          </draw:line>
        </draw:g>
        <draw:g draw:style-name="gr1">
          <draw:g draw:style-name="gr4">
            <draw:line draw:style-name="gr8" draw:text-style-name="P3" draw:layer="layout" svg:x1="11.094cm" svg:y1="4.47cm" svg:x2="10.259cm" svg:y2="4.479cm">
              <text:p/>
            </draw:line>
            <draw:line draw:style-name="gr6" draw:text-style-name="P2" draw:layer="layout" svg:x1="10.221cm" svg:y1="4.154cm" svg:x2="10.229cm" svg:y2="4.811cm">
              <text:p/>
            </draw:line>
            <draw:line draw:style-name="gr9" draw:text-style-name="P2" draw:layer="layout" svg:x1="8.672cm" svg:y1="3.796cm" svg:x2="10.188cm" svg:y2="4.354cm">
              <text:p/>
            </draw:line>
            <draw:line draw:style-name="gr9" draw:text-style-name="P2" draw:layer="layout" svg:x1="8.831cm" svg:y1="5.144cm" svg:x2="10.196cm" svg:y2="4.629cm">
              <text:p/>
            </draw:line>
          </draw:g>
          <draw:g draw:style-name="gr4">
            <draw:line draw:style-name="gr8" draw:text-style-name="P3" draw:layer="layout" svg:x1="11.094cm" svg:y1="4.47cm" svg:x2="10.259cm" svg:y2="4.479cm">
              <text:p/>
            </draw:line>
            <draw:line draw:style-name="gr6" draw:text-style-name="P2" draw:layer="layout" svg:x1="10.221cm" svg:y1="4.154cm" svg:x2="10.229cm" svg:y2="4.811cm">
              <text:p/>
            </draw:line>
            <draw:line draw:style-name="gr9" draw:text-style-name="P2" draw:layer="layout" svg:x1="8.672cm" svg:y1="3.796cm" svg:x2="10.188cm" svg:y2="4.354cm">
              <text:p/>
            </draw:line>
            <draw:line draw:style-name="gr9" draw:text-style-name="P2" draw:layer="layout" svg:x1="8.831cm" svg:y1="5.144cm" svg:x2="10.196cm" svg:y2="4.629cm">
              <text:p/>
            </draw:line>
          </draw:g>
        </draw:g>
        <draw:g draw:style-name="gr4">
          <draw:line draw:style-name="gr10" draw:text-style-name="P2" draw:layer="layout" svg:x1="2.41cm" svg:y1="7.248cm" svg:x2="2.723cm" svg:y2="7.561cm">
            <text:p/>
          </draw:line>
          <draw:line draw:style-name="gr10" draw:text-style-name="P2" draw:layer="layout" svg:x1="2.72cm" svg:y1="7.237cm" svg:x2="2.394cm" svg:y2="7.562cm">
            <text:p/>
          </draw:line>
        </draw:g>
        <draw:g draw:style-name="gr1">
          <draw:g draw:style-name="gr1">
            <draw:custom-shape draw:style-name="gr11" draw:text-style-name="P2" draw:layer="layout" svg:width="6.343cm" svg:height="3.424cm" svg:x="1.324cm" svg:y="19.878cm">
              <text:p/>
              <draw:enhanced-geometry svg:viewBox="0 0 21600 21600" draw:type="rectangle" draw:enhanced-path="M 0 0 L 21600 0 21600 21600 0 21600 0 0 Z N"/>
            </draw:custom-shape>
            <draw:g draw:style-name="gr4">
              <draw:line draw:style-name="gr10" draw:text-style-name="P2" draw:layer="layout" svg:x1="4.81cm" svg:y1="19.875cm" svg:x2="4.81cm" svg:y2="20.277cm">
                <text:p/>
              </draw:line>
              <draw:line draw:style-name="gr10" draw:text-style-name="P2" draw:layer="layout" svg:x1="1.302cm" svg:y1="20.733cm" svg:x2="4.421cm" svg:y2="20.736cm">
                <text:p/>
              </draw:line>
              <draw:line draw:style-name="gr10" draw:text-style-name="P2" draw:layer="layout" svg:x1="4.808cm" svg:y1="20.278cm" svg:x2="4.421cm" svg:y2="20.738cm">
                <text:p/>
              </draw:line>
            </draw:g>
          </draw:g>
          <draw:frame draw:style-name="gr12" draw:text-style-name="P5" draw:layer="layout" svg:width="3.812cm" svg:height="1.529cm" svg:x="1.215cm" svg:y="19.891cm">
            <draw:text-box>
              <text:p text:style-name="P4"><text:span text:style-name="T1">State machine</text:span></text:p>
            </draw:text-box>
          </draw:frame>
        </draw:g>
        <draw:custom-shape draw:style-name="gr13" draw:text-style-name="P2" draw:layer="layout" svg:width="0.6cm" svg:height="0.6cm" svg:x="2.339cm" svg:y="5.8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6" draw:layer="layout" svg:width="4.997cm" svg:height="0.751cm" svg:x="3.66cm" svg:y="1.348cm">
          <draw:text-box>
            <text:p><text:span text:style-name="T2">Initial State</text:span></text:p>
          </draw:text-box>
        </draw:frame>
        <draw:frame draw:style-name="gr15" draw:text-style-name="P6" draw:layer="layout" svg:width="2.373cm" svg:height="0.725cm" svg:x="3.716cm" svg:y="2.642cm">
          <draw:text-box>
            <text:p><text:span text:style-name="T2">End State</text:span></text:p>
          </draw:text-box>
        </draw:frame>
        <draw:frame draw:style-name="gr16" draw:text-style-name="P6" draw:layer="layout" svg:width="5.178cm" svg:height="0.725cm" svg:x="3.186cm" svg:y="6.875cm">
          <draw:text-box>
            <text:p><text:span text:style-name="T2">Terminate Pseudo State</text:span></text:p>
          </draw:text-box>
        </draw:frame>
        <draw:frame draw:style-name="gr17" draw:text-style-name="P7" draw:layer="layout" svg:width="10.478cm" svg:height="2.189cm" svg:x="1cm" svg:y="15.682cm">
          <draw:text-box>
            <text:p><text:span text:style-name="T3">Simple State</text:span></text:p>
            <text:p><text:span text:style-name="T4">Entry action</text:span><text:span text:style-name="T5">s: are </text:span><text:span text:style-name="T5">executed when entering a </text:span><text:span text:style-name="T5">state.</text:span></text:p>
            <text:p><text:span text:style-name="T4">Do actions</text:span><text:span text:style-name="T5">: are performed </text:span><text:span text:style-name="T5">while in that state</text:span></text:p>
            <text:p><text:span text:style-name="T4">Exit actions</text:span><text:span text:style-name="T5">: are executed </text:span><text:span text:style-name="T5">when leaving a state</text:span></text:p>
          </draw:text-box>
        </draw:frame>
        <draw:frame draw:style-name="gr18" draw:text-style-name="P8" draw:layer="layout" svg:width="4.661cm" svg:height="0.906cm" svg:x="3.641cm" svg:y="3.857cm">
          <draw:text-box>
            <text:p><text:span text:style-name="T6">Entry Point</text:span></text:p>
          </draw:text-box>
        </draw:frame>
        <draw:frame draw:style-name="gr18" draw:text-style-name="P8" draw:layer="layout" svg:width="4.661cm" svg:height="0.906cm" svg:x="3.817cm" svg:y="4.659cm">
          <draw:text-box>
            <text:p><text:span text:style-name="T6">Exit Point</text:span></text:p>
          </draw:text-box>
        </draw:frame>
        <draw:frame draw:style-name="gr18" draw:text-style-name="P8" draw:layer="layout" svg:width="4.661cm" svg:height="0.906cm" svg:x="3.422cm" svg:y="5.768cm">
          <draw:text-box>
            <text:p><text:span text:style-name="T6">Guard</text:span></text:p>
          </draw:text-box>
        </draw:frame>
        <draw:g draw:style-name="gr1">
          <draw:connector draw:style-name="gr19" draw:text-style-name="P2" draw:layer="layout" draw:type="line" svg:x1="2.58cm" svg:y1="10.601cm" svg:x2="2.588cm" svg:y2="12.447cm" draw:end-shape="id1" draw:end-glue-point="4" svg:d="M2580 10601l8 1846" svg:viewBox="0 0 9 1847">
            <text:p/>
          </draw:connector>
          <draw:frame draw:style-name="gr20" draw:text-style-name="P9" draw:layer="layout" svg:width="2.222cm" svg:height="1.199cm" svg:x="2.588cm" svg:y="10.92cm">
            <draw:text-box>
              <text:p><text:span text:style-name="T7">event</text:span></text:p>
              <text:p><text:span text:style-name="T7">/action</text:span></text:p>
            </draw:text-box>
          </draw:frame>
          <draw:frame draw:style-name="gr21" draw:text-style-name="P8" draw:layer="layout" svg:width="3.492cm" svg:height="2.621cm" svg:x="1.853cm" svg:y="12.507cm">
            <draw:text-box>
              <text:p><text:span text:style-name="T8">StateName</text:span></text:p>
              <text:p><text:span text:style-name="T8"/></text:p>
              <text:p><text:span text:style-name="T3">entry</text:span><text:span text:style-name="T6"> /action</text:span></text:p>
              <text:p><text:span text:style-name="T3">do</text:span><text:span text:style-name="T6"> /action</text:span></text:p>
              <text:p><text:span text:style-name="T3">exit</text:span><text:span text:style-name="T6"> /action</text:span></text:p>
            </draw:text-box>
          </draw:frame>
          <draw:custom-shape draw:style-name="gr22" draw:text-style-name="P2" xml:id="id1" draw:id="id1" draw:layer="layout" svg:width="6.668cm" svg:height="2.858cm" svg:x="1.317cm" svg:y="12.447cm">
            <draw:glue-point draw:id="4" svg:x="-3.095cm" svg:y="-5.003cm"/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1">
          <draw:frame draw:style-name="gr23" draw:text-style-name="P11" draw:layer="layout" svg:width="8.31cm" svg:height="1.479cm" svg:x="11.605cm" svg:y="12.077cm">
            <draw:text-box>
              <text:p text:style-name="P10"><text:span text:style-name="T9">Composite State</text:span></text:p>
            </draw:text-box>
          </draw:frame>
          <draw:rect draw:style-name="gr24" draw:text-style-name="P2" draw:layer="layout" svg:width="8.31cm" svg:height="5.374cm" svg:x="11.58cm" svg:y="12.101cm" draw:corner-radius="0.5cm">
            <text:p/>
          </draw:rect>
          <draw:line draw:style-name="gr10" draw:text-style-name="P2" draw:layer="layout" svg:x1="11.581cm" svg:y1="12.955cm" svg:x2="19.884cm" svg:y2="12.953cm">
            <text:p/>
          </draw:line>
          <draw:custom-shape draw:style-name="gr25" draw:text-style-name="P1" xml:id="id2" draw:id="id2" draw:layer="layout" svg:width="0.4cm" svg:height="0.4cm" svg:x="15.035cm" svg:y="13.1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" draw:layer="layout" svg:width="0.4cm" svg:height="0.4cm" svg:x="15.227cm" svg:y="16.4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xml:id="id5" draw:id="id5" draw:layer="layout" svg:width="0.6cm" svg:height="0.6cm" svg:x="15.127cm" svg:y="16.3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3" xml:id="id3" draw:id="id3" draw:layer="layout" svg:width="1.905cm" svg:height="1.27cm" svg:x="16.435cm" svg:y="14.3cm">
            <draw:glue-point draw:id="4" svg:x="3.005cm" svg:y="-5cm"/>
            <draw:glue-point draw:id="5" svg:x="3.005cm" svg:y="5cm"/>
            <text:p text:style-name="P12"><text:span text:style-name="T10"/></text:p>
  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14" draw:layer="layout" svg:width="1.387cm" svg:height="0.887cm" svg:x="16.723cm" svg:y="14.465cm">
            <draw:text-box>
              <text:p><text:span text:style-name="T11">Simple State</text:span></text:p>
            </draw:text-box>
            <draw:glue-point draw:id="4" svg:x="5cm" svg:y="-4.994cm"/>
            <draw:glue-point draw:id="5" svg:x="5cm" svg:y="-4.994cm"/>
            <draw:glue-point draw:id="6" svg:x="5cm" svg:y="-4.994cm"/>
          </draw:frame>
          <draw:connector draw:style-name="gr30" draw:text-style-name="P2" draw:layer="layout" svg:x1="15.435cm" svg:y1="13.365cm" svg:x2="17.387cm" svg:y2="14.3cm" draw:start-shape="id2" draw:start-glue-point="10" draw:end-shape="id3" draw:end-glue-point="0" svg:d="M15435 13365h1952v935" svg:viewBox="0 0 1953 936">
            <text:p/>
          </draw:connector>
          <draw:connector draw:style-name="gr31" draw:text-style-name="P2" draw:layer="layout" draw:type="curve" svg:x1="18.34cm" svg:y1="14.935cm" svg:x2="17.959cm" svg:y2="14.3cm" draw:start-shape="id3" draw:start-glue-point="1" draw:end-shape="id3" draw:end-glue-point="4" svg:d="M18340 14935c751 0 626-568 343-915s-724-471-724 280" svg:viewBox="0 0 946 1190">
            <text:p/>
          </draw:connector>
          <draw:custom-shape draw:style-name="gr28" draw:text-style-name="P13" xml:id="id4" draw:id="id4" draw:layer="layout" svg:width="1.905cm" svg:height="1.27cm" svg:x="12.295cm" svg:y="14.3cm">
            <draw:glue-point draw:id="4" svg:x="3.005cm" svg:y="-5cm"/>
            <draw:glue-point draw:id="5" svg:x="3.005cm" svg:y="5cm"/>
            <text:p/>
  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14" draw:layer="layout" svg:width="1.387cm" svg:height="0.887cm" svg:x="12.583cm" svg:y="14.465cm">
            <draw:text-box>
              <text:p><text:span text:style-name="T11">Simple State</text:span></text:p>
            </draw:text-box>
            <draw:glue-point draw:id="4" svg:x="5cm" svg:y="-4.994cm"/>
            <draw:glue-point draw:id="5" svg:x="5cm" svg:y="-4.994cm"/>
            <draw:glue-point draw:id="6" svg:x="5cm" svg:y="-4.994cm"/>
          </draw:frame>
          <draw:connector draw:style-name="gr32" draw:text-style-name="P2" draw:layer="layout" svg:x1="15.093cm" svg:y1="13.507cm" svg:x2="13.247cm" svg:y2="14.3cm" draw:start-shape="id2" draw:start-glue-point="7" draw:end-shape="id4" draw:end-glue-point="0" svg:d="M15093 13507h-1846v793" svg:viewBox="0 0 1847 794">
            <text:p/>
          </draw:connector>
          <draw:connector draw:style-name="gr33" draw:text-style-name="P2" draw:layer="layout" svg:x1="13.247cm" svg:y1="15.57cm" svg:x2="15.127cm" svg:y2="16.694cm" draw:start-shape="id4" draw:start-glue-point="2" draw:end-shape="id5" draw:end-glue-point="6" svg:d="M13247 15570v1124h1880" svg:viewBox="0 0 1881 1125">
            <text:p/>
          </draw:connector>
          <draw:connector draw:style-name="gr33" draw:text-style-name="P2" draw:layer="layout" svg:x1="17.387cm" svg:y1="15.57cm" svg:x2="15.727cm" svg:y2="16.694cm" draw:start-shape="id3" draw:start-glue-point="2" draw:end-shape="id5" draw:end-glue-point="10" svg:d="M17387 15570v1124h-1660" svg:viewBox="0 0 1661 1125">
            <text:p/>
          </draw:connector>
          <draw:rect draw:style-name="gr24" draw:text-style-name="P2" draw:layer="layout" svg:width="8.31cm" svg:height="5.374cm" svg:x="11.58cm" svg:y="12.101cm" draw:corner-radius="0.5cm">
            <text:p/>
          </draw:rect>
        </draw:g>
        <draw:frame draw:style-name="gr23" draw:text-style-name="P15" draw:layer="layout" svg:width="8.31cm" svg:height="1cm" svg:x="11.405cm" svg:y="19.71cm">
          <draw:text-box>
            <text:p text:style-name="P10"><text:span text:style-name="T12">Composite State</text:span></text:p>
          </draw:text-box>
        </draw:frame>
        <draw:rect draw:style-name="gr24" draw:text-style-name="P2" draw:layer="layout" svg:width="8.31cm" svg:height="5.374cm" svg:x="11.38cm" svg:y="19.734cm" draw:corner-radius="0.5cm">
          <text:p/>
        </draw:rect>
        <draw:line draw:style-name="gr10" draw:text-style-name="P2" draw:layer="layout" svg:x1="11.381cm" svg:y1="20.588cm" svg:x2="19.684cm" svg:y2="20.586cm">
          <text:p/>
        </draw:line>
        <draw:custom-shape draw:style-name="gr34" draw:text-style-name="P13" xml:id="id14" draw:id="id14" draw:layer="layout" svg:width="1.905cm" svg:height="1.193cm" svg:x="15.917cm" svg:y="21.027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1.387cm" svg:height="0.887cm" svg:x="16.135cm" svg:y="21.167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ustom-shape draw:style-name="gr28" draw:text-style-name="P13" xml:id="id9" draw:id="id9" draw:layer="layout" svg:width="1.905cm" svg:height="1.27cm" svg:x="12.717cm" svg:y="21.01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1.387cm" svg:height="0.887cm" svg:x="12.935cm" svg:y="21.227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rect draw:style-name="gr24" draw:text-style-name="P2" draw:layer="layout" svg:width="8.31cm" svg:height="5.374cm" svg:x="11.38cm" svg:y="19.734cm" draw:corner-radius="0.5cm">
          <text:p/>
        </draw:rect>
        <draw:frame draw:style-name="gr35" draw:text-style-name="P16" draw:layer="layout" svg:width="9.525cm" svg:height="1.905cm" svg:x="11.16cm" svg:y="1.317cm">
          <draw:text-box>
            <text:p text:style-name="P4"><text:span text:style-name="T13">Fork</text:span><text:span text:style-name="T14">: a pseudo-state that splits </text:span><text:span text:style-name="T14">an incoming transition into two </text:span><text:span text:style-name="T14">or more outgoing transitions, </text:span><text:span text:style-name="T14">allowing for concurrent paths. It </text:span><text:span text:style-name="T14">is used to represent the </text:span><text:span text:style-name="T14">beginning of parallel processes </text:span><text:span text:style-name="T14">within a state machine.</text:span></text:p>
          </draw:text-box>
        </draw:frame>
        <draw:frame draw:style-name="gr36" draw:text-style-name="P16" draw:layer="layout" svg:width="8.89cm" svg:height="2.221cm" svg:x="11.11cm" svg:y="3.54cm">
          <draw:text-box>
            <text:p text:style-name="P4"><text:span text:style-name="T13">Join</text:span><text:span text:style-name="T14">: a state used to combine </text:span><text:span text:style-name="T14">multiple incoming transitions </text:span><text:span text:style-name="T14">into a single outgoing transition, </text:span><text:span text:style-name="T14">effectively synchronizing </text:span><text:span text:style-name="T14">concurrent activities. It allows </text:span><text:span text:style-name="T14">the system to wait for all </text:span><text:span text:style-name="T14">incoming transitions to complete </text:span><text:span text:style-name="T14">before proceeding to the next </text:span><text:span text:style-name="T14">state.</text:span></text:p>
          </draw:text-box>
        </draw:frame>
        <draw:line draw:style-name="gr37" draw:text-style-name="P2" xml:id="id7" draw:id="id7" draw:layer="layout" svg:x1="11.442cm" svg:y1="22.615cm" svg:x2="19.697cm" svg:y2="22.615cm">
          <text:p/>
        </draw:line>
        <draw:custom-shape draw:style-name="gr28" draw:text-style-name="P13" xml:id="id11" draw:id="id11" draw:layer="layout" svg:width="1.905cm" svg:height="1.27cm" svg:x="12.917cm" svg:y="23.251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1.387cm" svg:height="0.887cm" svg:x="13.135cm" svg:y="23.468cm">
          <draw:text-box>
            <text:p><text:span text:style-name="T11">Sim</text:span><text:span text:style-name="T11">ple </text:span><text:span text:style-name="T11">Stat</text:span><text:span text:style-name="T11">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ustom-shape draw:style-name="gr38" draw:text-style-name="P13" xml:id="id12" draw:id="id12" draw:layer="layout" svg:width="1.905cm" svg:height="1.272cm" svg:x="15.917cm" svg:y="23.25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1.387cm" svg:height="0.887cm" svg:x="16.135cm" svg:y="23.469cm">
          <draw:text-box>
            <text:p><text:span text:style-name="T11">Sim</text:span><text:span text:style-name="T11">ple </text:span><text:span text:style-name="T11">Stat</text:span><text:span text:style-name="T11">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ustom-shape draw:style-name="gr25" draw:text-style-name="P1" xml:id="id6" draw:id="id6" draw:layer="layout" svg:width="0.4cm" svg:height="0.4cm" svg:x="10.02cm" svg:y="22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8" draw:id="id8" draw:layer="layout" svg:width="0.4cm" svg:height="0.4cm" svg:x="11.621cm" svg:y="21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10" draw:id="id10" draw:layer="layout" svg:width="0.4cm" svg:height="0.4cm" svg:x="11.622cm" svg:y="23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9" xml:id="id15" draw:id="id15">
          <draw:custom-shape draw:style-name="gr26" draw:text-style-name="P1" draw:layer="layout" svg:width="0.4cm" svg:height="0.4cm" svg:x="18.845cm" svg:y="21.4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18.745cm" svg:y="21.3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9" xml:id="id13" draw:id="id13">
          <draw:custom-shape draw:style-name="gr26" draw:text-style-name="P1" draw:layer="layout" svg:width="0.4cm" svg:height="0.4cm" svg:x="18.88cm" svg:y="23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18.78cm" svg:y="23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0" draw:text-style-name="P2" draw:layer="layout" draw:type="line" svg:x1="10.42cm" svg:y1="22.647cm" svg:x2="11.442cm" svg:y2="22.615cm" draw:start-shape="id6" draw:start-glue-point="10" draw:end-shape="id7" draw:end-glue-point="3" svg:d="M10420 22647l1022-32" svg:viewBox="0 0 1023 33">
          <text:p/>
        </draw:connector>
        <draw:connector draw:style-name="gr40" draw:text-style-name="P2" draw:layer="layout" draw:type="line" svg:x1="12.021cm" svg:y1="21.648cm" svg:x2="12.717cm" svg:y2="21.645cm" draw:start-shape="id8" draw:start-glue-point="10" draw:end-shape="id9" draw:end-glue-point="3" svg:d="M12021 21648l696-3" svg:viewBox="0 0 697 4">
          <text:p/>
        </draw:connector>
        <draw:connector draw:style-name="gr40" draw:text-style-name="P2" draw:layer="layout" draw:type="line" svg:x1="12.022cm" svg:y1="23.949cm" svg:x2="12.917cm" svg:y2="23.886cm" draw:start-shape="id10" draw:start-glue-point="10" draw:end-shape="id11" draw:end-glue-point="3" svg:d="M12022 23949l895-63" svg:viewBox="0 0 896 64">
          <text:p/>
        </draw:connector>
        <draw:connector draw:style-name="gr40" draw:text-style-name="P2" draw:layer="layout" draw:type="line" svg:x1="14.822cm" svg:y1="23.886cm" svg:x2="15.917cm" svg:y2="23.886cm" draw:start-shape="id11" draw:start-glue-point="1" draw:end-shape="id12" draw:end-glue-point="3" svg:d="M14822 23886h1095" svg:viewBox="0 0 1096 1">
          <text:p/>
        </draw:connector>
        <draw:connector draw:style-name="gr40" draw:text-style-name="P2" draw:layer="layout" draw:type="line" svg:x1="17.822cm" svg:y1="23.886cm" svg:x2="18.78cm" svg:y2="23.867cm" draw:start-shape="id12" draw:start-glue-point="1" draw:end-shape="id13" draw:end-glue-point="3" svg:d="M17822 23886l958-19" svg:viewBox="0 0 959 20">
          <text:p/>
        </draw:connector>
        <draw:connector draw:style-name="gr40" draw:text-style-name="P2" draw:layer="layout" draw:type="line" svg:x1="17.822cm" svg:y1="21.623cm" svg:x2="18.745cm" svg:y2="21.645cm" draw:start-shape="id14" draw:start-glue-point="1" draw:end-shape="id15" draw:end-glue-point="3" svg:d="M17822 21623l923 22" svg:viewBox="0 0 924 23">
          <text:p/>
        </draw:connector>
        <draw:connector draw:style-name="gr40" draw:text-style-name="P2" draw:layer="layout" draw:type="line" svg:x1="14.622cm" svg:y1="21.645cm" svg:x2="15.917cm" svg:y2="21.623cm" draw:start-shape="id9" draw:start-glue-point="1" draw:end-shape="id14" draw:end-glue-point="3" svg:d="M14622 21645l1295-22" svg:viewBox="0 0 1296 23">
          <text:p/>
        </draw:connector>
        <draw:frame draw:style-name="gr41" draw:text-style-name="P16" draw:layer="layout" svg:width="8.255cm" svg:height="1.827cm" svg:x="11.442cm" svg:y="25.472cm">
          <draw:text-box>
            <text:p text:style-name="P4"><text:span text:style-name="T13">Co</text:span><text:span text:style-name="T13">ncu</text:span><text:span text:style-name="T13">rre</text:span><text:span text:style-name="T13">nt </text:span><text:span text:style-name="T13">regi</text:span><text:span text:style-name="T13">ons</text:span><text:span text:style-name="T13">:</text:span><text:span text:style-name="T14"> </text:span><text:span text:style-name="T14">repr</text:span><text:span text:style-name="T14">ese</text:span><text:span text:style-name="T14">nt </text:span><text:span text:style-name="T14">sep</text:span><text:span text:style-name="T14">arat</text:span><text:span text:style-name="T14">e </text:span><text:span text:style-name="T14">are</text:span><text:span text:style-name="T14">as </text:span><text:span text:style-name="T14">of </text:span><text:span text:style-name="T14">con</text:span><text:span text:style-name="T14">cer</text:span><text:span text:style-name="T14">n </text:span><text:span text:style-name="T14">with</text:span><text:span text:style-name="T14">in a </text:span><text:span text:style-name="T14">stat</text:span><text:span text:style-name="T14">e, </text:span><text:span text:style-name="T14">allo</text:span><text:span text:style-name="T14">win</text:span><text:span text:style-name="T14">g </text:span><text:span text:style-name="T14">for </text:span><text:span text:style-name="T14">inde</text:span><text:span text:style-name="T14">pen</text:span><text:span text:style-name="T14">den</text:span><text:span text:style-name="T14">t </text:span><text:span text:style-name="T14">stat</text:span><text:span text:style-name="T14">e </text:span><text:span text:style-name="T14">tran</text:span><text:span text:style-name="T14">sitio</text:span><text:span text:style-name="T14">ns </text:span><text:span text:style-name="T14">in </text:span><text:span text:style-name="T14">eac</text:span><text:span text:style-name="T14">h </text:span><text:span text:style-name="T14">regi</text:span><text:span text:style-name="T14">on, </text:span><text:span text:style-name="T14">sim</text:span><text:span text:style-name="T14">ulta</text:span><text:span text:style-name="T14">neo</text:span><text:span text:style-name="T14">usly</text:span></text:p>
          </draw:text-box>
        </draw:frame>
        <draw:frame draw:style-name="gr42" draw:text-style-name="P9" draw:layer="layout" svg:width="8.255cm" svg:height="2.093cm" svg:x="4.175cm" svg:y="9.067cm">
          <draw:text-box>
            <text:p><text:span text:style-name="T15">ev</text:span><text:span text:style-name="T15">ent</text:span><text:span text:style-name="T15">:</text:span><text:span text:style-name="T7"> </text:span><text:span text:style-name="T7">trig</text:span><text:span text:style-name="T7">ger </text:span><text:span text:style-name="T7">tha</text:span><text:span text:style-name="T7">t </text:span><text:span text:style-name="T7">ca</text:span><text:span text:style-name="T7">us</text:span><text:span text:style-name="T7">es </text:span><text:span text:style-name="T7">the </text:span><text:span text:style-name="T7">tra</text:span><text:span text:style-name="T7">nsit</text:span><text:span text:style-name="T7">ion</text:span><text:span text:style-name="T7">.</text:span></text:p>
            <text:p><text:span text:style-name="T15">/</text:span><text:span text:style-name="T15">act</text:span><text:span text:style-name="T15">ion</text:span><text:span text:style-name="T7">: </text:span><text:span text:style-name="T7">An </text:span><text:span text:style-name="T7">op</text:span><text:span text:style-name="T7">era</text:span><text:span text:style-name="T7">tio</text:span><text:span text:style-name="T7">n </text:span><text:span text:style-name="T7">ex</text:span><text:span text:style-name="T7">ec</text:span><text:span text:style-name="T7">ute</text:span><text:span text:style-name="T7">d </text:span><text:span text:style-name="T7">in </text:span><text:span text:style-name="T7">res</text:span><text:span text:style-name="T7">po</text:span><text:span text:style-name="T7">ns</text:span><text:span text:style-name="T7">e </text:span><text:span text:style-name="T7">to </text:span><text:span text:style-name="T7">an </text:span><text:span text:style-name="T7">acc</text:span><text:span text:style-name="T7">ept</text:span><text:span text:style-name="T7">ed </text:span><text:span text:style-name="T7">ev</text:span><text:span text:style-name="T7">ent </text:span></text:p>
          </draw:text-box>
        </draw:frame>
        <draw:frame draw:style-name="gr36" draw:text-style-name="P16" draw:layer="layout" svg:width="6.667cm" svg:height="2.221cm" svg:x="13.365cm" svg:y="9.563cm">
          <draw:text-box>
            <text:p text:style-name="P4"><text:span text:style-name="T13">Co</text:span><text:span text:style-name="T13">mp</text:span><text:span text:style-name="T13">osit</text:span><text:span text:style-name="T13">e </text:span><text:span text:style-name="T13">stat</text:span><text:span text:style-name="T13">e</text:span><text:span text:style-name="T14">: A </text:span><text:span text:style-name="T14">stat</text:span><text:span text:style-name="T14">e </text:span><text:span text:style-name="T14">that </text:span><text:span text:style-name="T14">has </text:span><text:span text:style-name="T14">sub</text:span><text:span text:style-name="T14">stru</text:span><text:span text:style-name="T14">ctur</text:span><text:span text:style-name="T14">e </text:span><text:span text:style-name="T14">and </text:span><text:span text:style-name="T14">inte</text:span><text:span text:style-name="T14">rnal </text:span><text:span text:style-name="T14">beh</text:span><text:span text:style-name="T14">avio</text:span><text:span text:style-name="T14">r. It </text:span><text:span text:style-name="T14">can </text:span><text:span text:style-name="T14">cont</text:span><text:span text:style-name="T14">ain </text:span><text:span text:style-name="T14">one </text:span><text:span text:style-name="T14">or </text:span><text:span text:style-name="T14">mor</text:span><text:span text:style-name="T14">e </text:span><text:span text:style-name="T14">regi</text:span><text:span text:style-name="T14">ons, </text:span><text:span text:style-name="T14">whi</text:span><text:span text:style-name="T14">ch </text:span><text:span text:style-name="T14">can </text:span><text:span text:style-name="T14">cont</text:span><text:span text:style-name="T14">ain </text:span><text:span text:style-name="T14">one </text:span><text:span text:style-name="T14">or </text:span><text:span text:style-name="T14">mor</text:span><text:span text:style-name="T14">e </text:span><text:span text:style-name="T14">stat</text:span><text:span text:style-name="T14">es. </text:span><text:span text:style-name="T14">The </text:span><text:span text:style-name="T14">stat</text:span><text:span text:style-name="T14">e </text:span><text:span text:style-name="T14">diag</text:span><text:span text:style-name="T14">ram</text:span><text:span text:style-name="T14">s </text:span><text:span text:style-name="T14">are </text:span><text:span text:style-name="T14">exe</text:span><text:span text:style-name="T14">cute</text:span><text:span text:style-name="T14">d in </text:span><text:span text:style-name="T14">par</text:span><text:span text:style-name="T14">allel </text:span></text:p>
          </draw:text-box>
        </draw:frame>
        <draw:custom-shape draw:style-name="gr43" draw:text-style-name="P17" draw:layer="layout" svg:width="0.635cm" svg:height="0.635cm" svg:x="2.387cm" svg:y="1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635cm" svg:height="0.635cm" svg:x="2.387cm" svg:y="3.957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44" draw:text-style-name="P1" draw:layer="layout" svg:width="0.635cm" svg:height="0.635cm" svg:x="2.37cm" svg:y="4.81cm">
            <text:p/>
  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45" draw:text-style-name="P2" draw:layer="layout" svg:x1="2.497cm" svg:y1="4.937cm" svg:x2="2.878cm" svg:y2="5.318cm">
            <text:p/>
          </draw:line>
          <draw:line draw:style-name="gr45" draw:text-style-name="P2" draw:layer="layout" svg:x1="2.497cm" svg:y1="5.318cm" svg:x2="2.878cm" svg:y2="4.937cm">
            <text:p/>
          </draw:line>
        </draw:g>
        <draw:frame draw:style-name="gr46" draw:text-style-name="P18" draw:layer="layout" svg:width="4.762cm" svg:height="0.806cm" svg:x="1.17cm" svg:y="19.097cm">
          <draw:text-box>
            <text:p><text:span text:style-name="T16">Pa</text:span><text:span text:style-name="T16">ck</text:span><text:span text:style-name="T16">ag</text:span><text:span text:style-name="T16">e</text:span></text:p>
          </draw:text-box>
        </draw:frame>
      </draw:page>
      <draw:page draw:name="page2" draw:style-name="dp1" draw:master-page-name="Default">
        <draw:g draw:style-name="gr1">
          <draw:g draw:style-name="gr1">
            <draw:custom-shape draw:style-name="gr47" draw:text-style-name="P2" draw:layer="layout" svg:width="19.617cm" svg:height="27.9cm" svg:x="0.75cm" svg:y="1.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8" draw:text-style-name="P19" draw:layer="layout" svg:width="8.514cm" svg:height="2.945cm" svg:x="0.959cm" svg:y="1.018cm">
              <draw:text-box>
                <text:p text:style-name="P4"><text:span text:style-name="T17">O</text:span><text:span text:style-name="T17">r</text:span><text:span text:style-name="T17">a</text:span><text:span text:style-name="T17">d</text:span><text:span text:style-name="T17">i</text:span><text:span text:style-name="T17">o</text:span><text:span text:style-name="T17">M</text:span><text:span text:style-name="T17">a</text:span><text:span text:style-name="T17">i</text:span><text:span text:style-name="T17">n </text:span></text:p>
              </draw:text-box>
            </draw:frame>
            <draw:polyline draw:style-name="gr10" draw:text-style-name="P2" draw:layer="layout" svg:width="1.458cm" svg:height="7.298cm" draw:transform="rotate (-1.5707963267949) translate (7.98099078947369cm 1.017cm)" svg:viewBox="0 0 1459 7299" draw:points="0,0 729,0 1459,1825 1459,7299">
              <text:p/>
            </draw:polyline>
          </draw:g>
        </draw:g>
        <draw:custom-shape draw:style-name="gr25" draw:text-style-name="P1" xml:id="id17" draw:id="id17" draw:layer="layout" svg:width="0.4cm" svg:height="0.4cm" svg:x="9.185cm" svg:y="1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1" draw:layer="layout" svg:width="5.08cm" svg:height="1.905cm" svg:x="14.335cm" svg:y="1.317cm">
          <text:p text:style-name="P20"><text:span text:style-name="T7">1-Power-ON</text:span></text:p>
          <text:p text:style-name="P20"><text:span text:style-name="T7">2-Raspi-BOOT</text:span></text:p>
          <text:p text:style-name="P20"><text:span text:style-name="T7">3-Run Oradio_control</text:span></text:p>
          <draw:enhanced-geometry svg:viewBox="0 0 21600 21600" draw:text-areas="800 800 20800 20800" draw:type="round-rectangular-callout" draw:modifiers="-20588.2306632553 2685.834207764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4" draw:text-style-name="P2" xml:id="id19" draw:id="id19" draw:layer="layout" svg:width="4.829cm" svg:height="2.54cm" svg:x="5.562cm" svg:y="2.91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50" draw:text-style-name="P22" draw:layer="layout" svg:width="2.923cm" svg:height="1.674cm" svg:x="5.914cm" svg:y="3.545cm">
          <draw:text-box>
            <text:p><text:span text:style-name="T6">entry /</text:span></text:p>
            <text:p><text:span text:style-name="T6">do /</text:span></text:p>
            <text:p><text:span text:style-name="T6">exit /</text:span></text:p>
          </draw:text-box>
        </draw:frame>
        <draw:frame draw:style-name="gr51" draw:text-style-name="P23" xml:id="id18" draw:id="id18" draw:layer="layout" svg:width="3.175cm" svg:height="0.725cm" svg:x="6.297cm" svg:y="2.91cm">
          <draw:text-box>
            <text:p><text:span text:style-name="T18">ColdStartup</text:span></text:p>
          </draw:text-box>
        </draw:frame>
        <draw:rect draw:style-name="gr24" draw:text-style-name="P2" xml:id="id22" draw:id="id22" draw:layer="layout" svg:width="4.829cm" svg:height="2.223cm" svg:x="13.001cm" svg:y="18.09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4.856cm" svg:y="-2.826cm"/>
          <draw:glue-point draw:id="10" svg:x="0.842cm" svg:y="5.003cm"/>
          <text:p/>
        </draw:rect>
        <draw:frame draw:style-name="gr51" draw:text-style-name="P23" draw:layer="layout" svg:width="3.175cm" svg:height="0.725cm" svg:x="13.9cm" svg:y="18.092cm">
          <draw:text-box>
            <text:p><text:span text:style-name="T18">Standby</text:span></text:p>
          </draw:text-box>
        </draw:frame>
        <draw:g draw:style-name="gr4">
          <draw:frame draw:style-name="gr23" draw:text-style-name="P24" draw:layer="layout" svg:width="19.04cm" svg:height="1.072cm" svg:x="1.06cm" svg:y="5.797cm">
            <draw:text-box>
              <text:p text:style-name="P10"><text:span text:style-name="T19">MainControl</text:span></text:p>
            </draw:text-box>
          </draw:frame>
          <draw:rect draw:style-name="gr24" draw:text-style-name="P25" draw:layer="layout" svg:width="19.04cm" svg:height="22.417cm" svg:x="1cm" svg:y="5.888cm" draw:corner-radius="0.5cm">
            <text:p/>
          </draw:rect>
          <draw:line draw:style-name="gr52" draw:text-style-name="P2" draw:layer="layout" svg:x1="1.004cm" svg:y1="6.732cm" svg:x2="20.031cm" svg:y2="6.723cm">
            <text:p/>
          </draw:line>
        </draw:g>
        <draw:rect draw:style-name="gr24" draw:text-style-name="P2" xml:id="id16" draw:id="id16" draw:layer="layout" svg:width="7.285cm" svg:height="3.425cm" svg:x="2.305cm" svg:y="9.64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3.097cm" svg:y="-5cm"/>
          <draw:glue-point draw:id="10" svg:x="5cm" svg:y="-2.551cm"/>
          <draw:glue-point draw:id="11" svg:x="-1.682cm" svg:y="5.003cm"/>
          <draw:glue-point draw:id="12" svg:x="4.164cm" svg:y="5.003cm"/>
          <draw:glue-point draw:id="13" svg:x="2.494cm" svg:y="5.003cm"/>
          <draw:glue-point draw:id="14" svg:x="0.406cm" svg:y="5.003cm"/>
          <text:p/>
        </draw:rect>
        <draw:frame draw:style-name="gr53" draw:text-style-name="P26" draw:layer="layout" svg:width="7.302cm" svg:height="2.855cm" svg:x="2.37cm" svg:y="10.45cm">
          <draw:text-box>
            <text:p><text:span text:style-name="T3">Entry</text:span><text:span text:style-name="T20"> </text:span><text:span text:style-name="T20">/checkMsgQueue()</text:span></text:p>
            <text:p><text:span text:style-name="T3">Do</text:span><text:span text:style-name="T20"> </text:span><text:span text:style-name="T20">[queue.not_empty]/ </text:span><text:span text:style-name="T20">processMsg()</text:span></text:p>
            <text:p><text:span text:style-name="T3">Exit</text:span><text:span text:style-name="T20"> </text:span></text:p>
            <text:p><text:span text:style-name="T20"><text:s text:c="3"/></text:span><text:span text:style-name="T20">on msgProcessed </text:span><text:span text:style-name="T20">raise nextMessage</text:span></text:p>
            <text:p><text:span text:style-name="T20"><text:s text:c="3"/></text:span><text:span text:style-name="T20">on queueException </text:span><text:span text:style-name="T20">raise criticalError</text:span></text:p>
            <text:p><text:span text:style-name="T20"/></text:p>
          </draw:text-box>
          <draw:glue-point draw:id="4" svg:x="-4.999cm" svg:y="-4.997cm"/>
          <draw:glue-point draw:id="5" svg:x="-4.999cm" svg:y="-4.997cm"/>
          <draw:glue-point draw:id="6" svg:x="5cm" svg:y="-5cm"/>
        </draw:frame>
        <draw:frame draw:style-name="gr54" draw:text-style-name="P23" draw:layer="layout" svg:width="3.81cm" svg:height="0.952cm" svg:x="3.14cm" svg:y="9.64cm">
          <draw:text-box>
            <text:p><text:span text:style-name="T18">CheckingQueue</text:span></text:p>
          </draw:text-box>
        </draw:frame>
        <draw:connector draw:style-name="gr55" draw:text-style-name="P2" draw:layer="layout" draw:line-skew="0.651cm -8.239cm -0.837cm" svg:x1="4.041cm" svg:y1="13.065cm" svg:x2="3.691cm" svg:y2="9.64cm" draw:start-shape="id16" draw:start-glue-point="6" draw:end-shape="id16" draw:end-glue-point="9" svg:d="M4041 13065v1152h-2189v-5915h1839v1338" svg:viewBox="0 0 2190 5916">
          <text:p/>
        </draw:connector>
        <draw:frame draw:style-name="gr56" draw:text-style-name="P27" draw:layer="layout" svg:width="3.175cm" svg:height="0.953cm" svg:x="1.317cm" svg:y="14.334cm">
          <draw:text-box>
            <text:p><text:span text:style-name="T20">nextMessage</text:span></text:p>
          </draw:text-box>
        </draw:frame>
        <draw:g draw:style-name="gr4">
          <draw:frame draw:style-name="gr23" draw:text-style-name="P24" draw:layer="layout" svg:width="8.815cm" svg:height="1.276cm" svg:x="10.677cm" svg:y="7.736cm">
            <draw:text-box>
              <text:p text:style-name="P10"><text:span text:style-name="T19">OradioControl</text:span></text:p>
            </draw:text-box>
          </draw:frame>
          <draw:rect draw:style-name="gr24" draw:text-style-name="P2" draw:layer="layout" svg:width="8.815cm" svg:height="20.32cm" svg:x="10.752cm" svg:y="7.667cm" draw:corner-radius="0.5cm">
            <draw:glue-point draw:id="4" svg:x="-3.688cm" svg:y="-5.004cm"/>
            <text:p/>
          </draw:rect>
          <draw:line draw:style-name="gr57" draw:text-style-name="P2" draw:layer="layout" svg:x1="10.755cm" svg:y1="8.507cm" svg:x2="19.564cm" svg:y2="8.5cm">
            <text:p/>
          </draw:line>
        </draw:g>
        <draw:rect draw:style-name="gr24" draw:text-style-name="P2" xml:id="id23" draw:id="id23" draw:layer="layout" svg:width="4.829cm" svg:height="2.338cm" svg:x="11.18cm" svg:y="22.62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text:p/>
        </draw:rect>
        <draw:frame draw:style-name="gr51" draw:text-style-name="P23" draw:layer="layout" svg:width="3.175cm" svg:height="0.725cm" svg:x="12.035cm" svg:y="22.662cm">
          <draw:text-box>
            <text:p><text:span text:style-name="T18">MpdPlaying</text:span></text:p>
          </draw:text-box>
        </draw:frame>
        <draw:rect draw:style-name="gr24" draw:text-style-name="P2" xml:id="id24" draw:id="id24" draw:layer="layout" svg:width="4.829cm" svg:height="2.175cm" svg:x="13.482cm" svg:y="25.26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54" draw:text-style-name="P23" draw:layer="layout" svg:width="3.81cm" svg:height="0.952cm" svg:x="14.2cm" svg:y="25.23cm">
          <draw:text-box>
            <text:p><text:span text:style-name="T18">SpotifyPlayin</text:span><text:span text:style-name="T18">g</text:span></text:p>
          </draw:text-box>
        </draw:frame>
        <draw:frame draw:style-name="gr58" draw:text-style-name="P14" xml:id="id29" draw:id="id29" draw:layer="layout" svg:width="4.728cm" svg:height="0.987cm" svg:x="5.762cm" svg:y="23.49cm">
          <draw:text-box>
            <text:p><text:span text:style-name="T11">[not wifiConnected]</text:span></text:p>
            <text:p><text:span text:style-name="T11">/</text:span><text:span text:style-name="T11">playSound(SOUND_</text:span><text:span text:style-name="T11">NO_WIFI)</text:span></text:p>
          </draw:text-box>
        </draw:frame>
        <draw:connector draw:style-name="gr59" draw:text-style-name="P2" draw:layer="layout" svg:x1="9.385cm" svg:y1="1.657cm" svg:x2="7.884cm" svg:y2="2.91cm" draw:start-shape="id17" draw:start-glue-point="8" draw:end-shape="id18" draw:end-glue-point="0" svg:d="M9385 1657v628h-1501v625" svg:viewBox="0 0 1502 1254">
          <text:p/>
        </draw:connector>
        <draw:custom-shape draw:style-name="gr60" draw:text-style-name="P29" draw:layer="layout" svg:width="7.62cm" svg:height="2.223cm" svg:x="1.952cm" svg:y="25.447cm">
          <text:p text:style-name="P28"><text:span text:style-name="T21">The CheckingQueue state and OradioControl composite state are concurrent regions</text:span></text:p>
          <draw:enhanced-geometry svg:viewBox="0 0 21600 21600" draw:type="rectangle" draw:enhanced-path="M 0 0 L 21600 0 21600 21600 0 21600 0 0 Z N"/>
        </draw:custom-shape>
        <draw:rect draw:style-name="gr24" draw:text-style-name="P2" xml:id="id26" draw:id="id26" draw:layer="layout" svg:width="5.715cm" svg:height="2.237cm" svg:x="13.377cm" svg:y="11.07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51" draw:text-style-name="P23" draw:layer="layout" svg:width="3.876cm" svg:height="0.725cm" svg:x="14.269cm" svg:y="11.06cm">
          <draw:text-box>
            <text:p><text:span text:style-name="T18">OradioCreation</text:span></text:p>
          </draw:text-box>
        </draw:frame>
        <draw:line draw:style-name="gr61" draw:text-style-name="P2" draw:layer="layout" svg:x1="10.207cm" svg:y1="6.715cm" svg:x2="10.207cm" svg:y2="28.305cm">
          <text:p/>
        </draw:line>
        <draw:connector draw:style-name="gr62" draw:text-style-name="P2" draw:layer="layout" svg:x1="10.391cm" svg:y1="4.831cm" svg:x2="13.007cm" svg:y2="5.738cm" draw:start-shape="id19" draw:start-glue-point="8" draw:end-shape="id20" draw:end-glue-point="11" svg:d="M10391 4831h2616v907" svg:viewBox="0 0 2617 908">
          <text:p/>
        </draw:connector>
        <draw:connector draw:style-name="gr59" draw:text-style-name="P2" draw:layer="layout" svg:x1="14.068cm" svg:y1="17.022cm" svg:x2="16.907cm" svg:y2="18.092cm" draw:start-shape="id21" draw:start-glue-point="5" draw:end-shape="id22" draw:end-glue-point="7" svg:d="M14068 17022v535h2839v535" svg:viewBox="0 0 2840 1071">
          <text:p/>
        </draw:connector>
        <draw:connector draw:style-name="gr59" draw:text-style-name="P2" draw:layer="layout" svg:x1="14.152cm" svg:y1="20.315cm" svg:x2="13.594cm" svg:y2="22.622cm" draw:start-shape="id22" draw:start-glue-point="6" draw:end-shape="id23" draw:end-glue-point="0" svg:d="M14152 20315v1154h-558v1153" svg:viewBox="0 0 559 2308">
          <text:p/>
        </draw:connector>
        <draw:connector draw:style-name="gr59" draw:text-style-name="P2" draw:layer="layout" svg:x1="17.007cm" svg:y1="20.315cm" svg:x2="17.388cm" svg:y2="25.26cm" draw:start-shape="id22" draw:start-glue-point="4" draw:end-shape="id24" draw:end-glue-point="7" svg:d="M17007 20315v2473h381v2472" svg:viewBox="0 0 382 4946">
          <text:p/>
        </draw:connector>
        <draw:connector draw:style-name="gr59" draw:text-style-name="P2" draw:layer="layout" svg:x1="16.009cm" svg:y1="24.39cm" svg:x2="15.821cm" svg:y2="20.315cm" draw:start-shape="id23" draw:start-glue-point="8" draw:end-shape="id22" draw:end-glue-point="10" svg:d="M16009 24390h501v-2921h-689v-1154" svg:viewBox="0 0 690 4076">
          <text:p/>
        </draw:connector>
        <draw:connector draw:style-name="gr59" draw:text-style-name="P2" draw:layer="layout" svg:x1="18.311cm" svg:y1="26.905cm" svg:x2="17.83cm" svg:y2="19.773cm" draw:start-shape="id24" draw:start-glue-point="8" draw:end-shape="id22" draw:end-glue-point="8" svg:d="M18311 26905h501v-7132h-982" svg:viewBox="0 0 983 7133">
          <text:p/>
        </draw:connector>
        <draw:frame draw:style-name="gr63" draw:text-style-name="P9" draw:layer="layout" svg:width="4.445cm" svg:height="1.487cm" svg:x="10.525cm" svg:y="3.54cm">
          <draw:text-box>
            <text:p><text:span text:style-name="T7">StartDone</text:span></text:p>
            <text:p><text:span text:style-name="T7">/startOradioControl</text:span></text:p>
          </draw:text-box>
        </draw:frame>
        <draw:custom-shape draw:style-name="gr25" draw:text-style-name="P1" xml:id="id25" draw:id="id25" draw:layer="layout" svg:width="0.4cm" svg:height="0.4cm" svg:x="18.286cm" svg:y="8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4" draw:text-style-name="P2" draw:layer="layout" svg:x1="18.486cm" svg:y1="9.158cm" svg:x2="18cm" svg:y2="11.075cm" draw:start-shape="id25" draw:start-glue-point="8" draw:end-shape="id26" draw:end-glue-point="7" svg:d="M18486 9158v959h-486v958" svg:viewBox="0 0 487 1918">
          <text:p/>
        </draw:connector>
        <draw:frame draw:style-name="gr51" draw:text-style-name="P9" draw:layer="layout" svg:width="1.588cm" svg:height="0.725cm" svg:x="18.127cm" svg:y="16.24cm">
          <draw:text-box>
            <text:p><text:span text:style-name="T7">Error</text:span></text:p>
          </draw:text-box>
        </draw:frame>
        <draw:rect draw:style-name="gr24" draw:text-style-name="P2" xml:id="id21" draw:id="id21" draw:layer="layout" svg:width="4.04cm" svg:height="2.54cm" svg:x="11.247cm" svg:y="14.48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draw:glue-point draw:id="10" svg:x="-5cm" svg:y="-2.291cm"/>
          <text:p/>
        </draw:rect>
        <draw:frame draw:style-name="gr65" draw:text-style-name="P22" draw:layer="layout" svg:width="3.8cm" svg:height="1.673cm" svg:x="11.355cm" svg:y="15.155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frame draw:style-name="gr51" draw:text-style-name="P23" draw:layer="layout" svg:width="3.175cm" svg:height="0.725cm" svg:x="11.982cm" svg:y="14.61cm">
          <draw:text-box>
            <text:p><text:span text:style-name="T18">MpdCreation</text:span></text:p>
          </draw:text-box>
        </draw:frame>
        <draw:frame draw:style-name="gr65" draw:text-style-name="P22" draw:layer="layout" svg:width="3.8cm" svg:height="1.673cm" svg:x="13.075cm" svg:y="18.59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frame draw:style-name="gr65" draw:text-style-name="P22" draw:layer="layout" svg:width="3.8cm" svg:height="1.673cm" svg:x="11.387cm" svg:y="23.27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frame draw:style-name="gr65" draw:text-style-name="P22" draw:layer="layout" svg:width="3.8cm" svg:height="1.673cm" svg:x="13.61cm" svg:y="25.86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connector draw:style-name="gr59" draw:text-style-name="P2" draw:layer="layout" svg:x1="17.367cm" svg:y1="13.312cm" svg:x2="14.515cm" svg:y2="14.482cm" draw:start-shape="id26" draw:start-glue-point="5" draw:end-shape="id21" draw:end-glue-point="7" svg:d="M17367 13312v585h-2852v585" svg:viewBox="0 0 2853 1171">
          <text:p/>
        </draw:connector>
        <draw:frame draw:style-name="gr65" draw:text-style-name="P22" draw:layer="layout" svg:width="3.8cm" svg:height="1.673cm" svg:x="13.727cm" svg:y="11.609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line draw:style-name="gr61" draw:text-style-name="P2" draw:layer="layout" svg:x1="1.418cm" svg:y1="15.875cm" svg:x2="10.207cm" svg:y2="15.875cm">
          <text:p/>
        </draw:line>
        <draw:rect draw:style-name="gr24" draw:text-style-name="P2" xml:id="id28" draw:id="id28" draw:layer="layout" svg:width="5.398cm" svg:height="2.118cm" svg:x="2.622cm" svg:y="17.767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2.223cm" svg:y="-5.002cm"/>
          <draw:glue-point draw:id="10" svg:x="-2.22cm" svg:y="-5.002cm"/>
          <draw:glue-point draw:id="11" svg:x="-3.888cm" svg:y="5.001cm"/>
          <draw:glue-point draw:id="12" svg:x="1.051cm" svg:y="4.922cm"/>
          <text:p/>
        </draw:rect>
        <draw:frame draw:style-name="gr66" draw:text-style-name="P23" draw:layer="layout" svg:width="4.311cm" svg:height="0.735cm" svg:x="3.222cm" svg:y="17.68cm">
          <draw:text-box>
            <text:p><text:span text:style-name="T18">ActivateOra</text:span><text:span text:style-name="T18">dioAp</text:span></text:p>
          </draw:text-box>
        </draw:frame>
        <draw:frame draw:style-name="gr67" draw:text-style-name="P22" draw:layer="layout" svg:width="5.733cm" svg:height="1.729cm" svg:x="-6.302cm" svg:y="19.097cm">
          <draw:text-box>
            <text:p><text:span text:style-name="T3">Entry</text:span><text:span text:style-name="T6"> </text:span><text:span text:style-name="T14">/start_ledPlay_f</text:span><text:span text:style-name="T14">lashing()</text:span></text:p>
            <text:p><text:span text:style-name="T3">Do</text:span><text:span text:style-name="T6"> </text:span><text:span text:style-name="T14">/</text:span></text:p>
            <text:p><text:span text:style-name="T3">Exit</text:span><text:span text:style-name="T6"> </text:span><text:span text:style-name="T14">/</text:span></text:p>
          </draw:text-box>
        </draw:frame>
        <draw:custom-shape draw:style-name="gr25" draw:text-style-name="P1" xml:id="id20" draw:id="id20" draw:layer="layout" svg:width="0.4cm" svg:height="0.4cm" svg:x="12.665cm" svg:y="5.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27" draw:id="id27" draw:layer="layout" svg:width="0.4cm" svg:height="0.4cm" svg:x="7.585cm" svg:y="7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4" draw:text-style-name="P2" draw:layer="layout" svg:x1="7.785cm" svg:y1="7.432cm" svg:x2="8.198cm" svg:y2="9.64cm" draw:start-shape="id27" draw:start-glue-point="8" draw:end-shape="id16" draw:end-glue-point="7" svg:d="M7785 7432v1105h413v1103" svg:viewBox="0 0 414 2209">
          <text:p/>
        </draw:connector>
        <draw:g draw:style-name="gr1" xml:id="id34" draw:id="id34">
          <draw:custom-shape draw:style-name="gr68" draw:text-style-name="P30" draw:layer="layout" svg:width="0.717cm" svg:height="0.718cm" svg:x="19.18cm" svg:y="15.5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9.259cm" svg:y1="15.608cm" svg:x2="19.82cm" svg:y2="16.17cm">
              <text:p/>
            </draw:line>
            <draw:line draw:style-name="gr57" draw:text-style-name="P2" draw:layer="layout" svg:x1="19.814cm" svg:y1="15.588cm" svg:x2="19.23cm" svg:y2="16.171cm">
              <text:p/>
            </draw:line>
          </draw:g>
        </draw:g>
        <draw:g draw:style-name="gr1" xml:id="id32" draw:id="id32">
          <draw:custom-shape draw:style-name="gr68" draw:text-style-name="P30" draw:layer="layout" svg:width="0.717cm" svg:height="0.718cm" svg:x="9.155cm" svg:y="13.6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9.234cm" svg:y1="13.785cm" svg:x2="9.795cm" svg:y2="14.347cm">
              <text:p/>
            </draw:line>
            <draw:line draw:style-name="gr57" draw:text-style-name="P2" draw:layer="layout" svg:x1="9.789cm" svg:y1="13.765cm" svg:x2="9.205cm" svg:y2="14.348cm">
              <text:p/>
            </draw:line>
          </draw:g>
        </draw:g>
        <draw:frame draw:style-name="gr51" draw:text-style-name="P9" draw:layer="layout" svg:width="1.588cm" svg:height="0.725cm" svg:x="8.619cm" svg:y="14.652cm">
          <draw:text-box>
            <text:p><text:span text:style-name="T7">Error</text:span></text:p>
          </draw:text-box>
        </draw:frame>
        <draw:connector draw:style-name="gr64" draw:text-style-name="P2" draw:layer="layout" svg:x1="1.879cm" svg:y1="16.324cm" svg:x2="4.123cm" svg:y2="17.767cm" draw:end-shape="id28" draw:end-glue-point="10" svg:d="M1879 16324v471h2244v972" svg:viewBox="0 0 2245 1444">
          <text:p/>
        </draw:connector>
        <draw:connector draw:style-name="gr64" draw:text-style-name="P2" draw:layer="layout" svg:x1="10.49cm" svg:y1="23.983cm" svg:x2="5.645cm" svg:y2="24.67cm" draw:start-shape="id29" draw:start-glue-point="1" draw:end-shape="id30" draw:end-glue-point="1" svg:d="M10490 23983h500v687h-5345" svg:viewBox="0 0 5346 688">
          <text:p/>
        </draw:connector>
        <draw:connector draw:style-name="gr64" draw:text-style-name="P2" draw:layer="layout" svg:x1="1.482cm" svg:y1="23.909cm" svg:x2="5.045cm" svg:y2="24.67cm" draw:start-shape="id31" draw:end-shape="id30" draw:end-glue-point="3" svg:d="M1482 23909h-500v761h4063" svg:viewBox="0 0 4064 762">
          <text:p/>
        </draw:connector>
        <draw:frame draw:style-name="gr69" draw:text-style-name="P14" xml:id="id31" draw:id="id31" draw:layer="layout" svg:width="4.493cm" svg:height="1.039cm" svg:x="1.482cm" svg:y="23.39cm">
          <draw:text-box>
            <text:p><text:span text:style-name="T11">[wifiConnected]</text:span></text:p>
            <text:p><text:span text:style-name="T11">/playSound(SOUND_WIFI)</text:span></text:p>
          </draw:text-box>
        </draw:frame>
        <draw:g draw:style-name="gr39" xml:id="id30" draw:id="id30">
          <draw:custom-shape draw:style-name="gr26" draw:text-style-name="P1" draw:layer="layout" svg:width="0.4cm" svg:height="0.4cm" svg:x="5.145cm" svg:y="24.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5.045cm" svg:y="24.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9" draw:text-style-name="P14" draw:layer="layout" svg:width="2.54cm" svg:height="1.039cm" svg:x="1.952cm" svg:y="15.94cm">
          <draw:text-box>
            <text:p><text:span text:style-name="T11">LongPressPlay</text:span></text:p>
            <text:p><text:span text:style-name="T11">/startOradioAP</text:span></text:p>
          </draw:text-box>
        </draw:frame>
        <draw:line draw:style-name="gr61" draw:text-style-name="P2" draw:layer="layout" svg:x1="1.419cm" svg:y1="25.075cm" svg:x2="10.208cm" svg:y2="25.075cm">
          <text:p/>
        </draw:line>
        <draw:connector draw:style-name="gr64" draw:text-style-name="P2" draw:layer="layout" svg:x1="8.349cm" svg:y1="13.065cm" svg:x2="9.155cm" svg:y2="14.058cm" draw:start-shape="id16" draw:start-glue-point="4" draw:end-shape="id32" draw:end-glue-point="3" svg:d="M8349 13065v993h806" svg:viewBox="0 0 807 994">
          <text:p/>
        </draw:connector>
        <draw:connector draw:style-name="gr64" draw:text-style-name="P2" draw:layer="layout" svg:x1="9.896cm" svg:y1="19.262cm" svg:x2="9.613cm" svg:y2="21.955cm" draw:end-shape="id33" draw:end-glue-point="0" svg:d="M9896 19262v1084h-283v1609" svg:viewBox="0 0 284 2694">
          <text:p/>
        </draw:connector>
        <draw:frame draw:style-name="gr29" draw:text-style-name="P14" draw:layer="layout" svg:width="2.14cm" svg:height="0.887cm" svg:x="7.985cm" svg:y="17.258cm">
          <draw:text-box>
            <text:p><text:span text:style-name="T11">timeOut</text:span></text:p>
            <text:p><text:span text:style-name="T11">/gotoError()</text:span></text:p>
          </draw:text-box>
        </draw:frame>
        <draw:g draw:style-name="gr1" xml:id="id33" draw:id="id33">
          <draw:custom-shape draw:style-name="gr68" draw:text-style-name="P30" draw:layer="layout" svg:width="0.717cm" svg:height="0.718cm" svg:x="9.255cm" svg:y="21.9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9.334cm" svg:y1="22.041cm" svg:x2="9.895cm" svg:y2="22.603cm">
              <text:p/>
            </draw:line>
            <draw:line draw:style-name="gr57" draw:text-style-name="P2" draw:layer="layout" svg:x1="9.889cm" svg:y1="22.021cm" svg:x2="9.305cm" svg:y2="22.604cm">
              <text:p/>
            </draw:line>
          </draw:g>
        </draw:g>
        <draw:frame draw:style-name="gr70" draw:text-style-name="P22" draw:layer="layout" svg:width="6.668cm" svg:height="2.067cm" svg:x="10.842cm" svg:y="8.6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 </text:span><text:span text:style-name="T14">on </text:span><text:span text:style-name="T14">usbAbsent </text:span><text:span text:style-name="T14">raise </text:span><text:span text:style-name="T14">criticalError</text:span></text:p>
          </draw:text-box>
        </draw:frame>
        <draw:frame draw:style-name="gr29" draw:text-style-name="P14" draw:layer="layout" svg:width="2.222cm" svg:height="0.887cm" svg:x="16.34cm" svg:y="14.835cm">
          <draw:text-box>
            <text:p><text:span text:style-name="T11">criticalError</text:span></text:p>
            <text:p><text:span text:style-name="T11">/goto_error()</text:span></text:p>
          </draw:text-box>
        </draw:frame>
        <draw:connector draw:style-name="gr59" draw:text-style-name="P2" draw:layer="layout" draw:line-skew="0.695cm" svg:x1="16.881cm" svg:y1="14.631cm" svg:x2="19.18cm" svg:y2="15.881cm" draw:end-shape="id34" draw:end-glue-point="3" svg:d="M16881 14631h1582v1250h717" svg:viewBox="0 0 2300 1251">
          <text:p/>
        </draw:connector>
        <draw:frame draw:style-name="gr29" draw:text-style-name="P14" draw:layer="layout" svg:width="2.222cm" svg:height="0.887cm" svg:x="6.08cm" svg:y="13.448cm">
          <draw:text-box>
            <text:p><text:span text:style-name="T11">criticalError</text:span></text:p>
            <text:p><text:span text:style-name="T11">/goto_error()</text:span></text:p>
          </draw:text-box>
        </draw:frame>
        <draw:frame draw:style-name="gr51" draw:text-style-name="P9" draw:layer="layout" svg:width="1.588cm" svg:height="0.725cm" svg:x="8.302cm" svg:y="22.182cm">
          <draw:text-box>
            <text:p><text:span text:style-name="T7">Error</text:span></text:p>
          </draw:text-box>
        </draw:frame>
        <draw:connector draw:style-name="gr64" draw:text-style-name="P2" draw:layer="layout" svg:x1="5.027cm" svg:y1="16.43cm" svg:x2="9.234cm" svg:y2="16.378cm" svg:d="M5027 16430h2104v-52h2103" svg:viewBox="0 0 4208 53">
          <text:p/>
        </draw:connector>
        <draw:frame draw:style-name="gr29" draw:text-style-name="P31" draw:layer="layout" svg:width="3.593cm" svg:height="0.887cm" svg:x="5.144cm" svg:y="16.253cm">
          <draw:text-box>
            <text:p><text:span text:style-name="T22">OradioApStopped</text:span></text:p>
            <text:p><text:span text:style-name="T22">[OradioApActive]</text:span></text:p>
          </draw:text-box>
        </draw:frame>
        <draw:connector draw:style-name="gr71" draw:text-style-name="P2" draw:layer="layout" draw:type="curve" draw:line-skew="-0.224cm" svg:x1="3.005cm" svg:y1="23.076cm" svg:x2="2.404cm" svg:y2="21.638cm" draw:start-shape="id35" draw:start-glue-point="11" draw:end-shape="id35" draw:end-glue-point="13" svg:d="M3005 23076c0 417-551 348-889-116s-463-1322 288-1322" svg:viewBox="0 0 1157 1715">
          <text:p/>
        </draw:connector>
        <draw:frame draw:style-name="gr72" draw:text-style-name="P14" draw:layer="layout" svg:width="2.857cm" svg:height="1.205cm" svg:x="0.683cm" svg:y="21.702cm">
          <draw:text-box>
            <text:p><text:span text:style-name="T11">LongPressPlay</text:span></text:p>
            <text:p><text:span text:style-name="T11">[OradioApActive]</text:span></text:p>
            <text:p><text:span text:style-name="T11">/ --</text:span></text:p>
          </draw:text-box>
        </draw:frame>
        <draw:rect draw:style-name="gr24" draw:text-style-name="P2" draw:layer="layout" svg:width="5.398cm" svg:height="2.223cm" svg:x="-6.267cm" svg:y="24.81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2.223cm" svg:y="-5.002cm"/>
          <draw:glue-point draw:id="10" svg:x="-2.22cm" svg:y="-5.002cm"/>
          <draw:glue-point draw:id="11" svg:x="-3.888cm" svg:y="5.001cm"/>
          <draw:glue-point draw:id="12" svg:x="1.051cm" svg:y="4.922cm"/>
          <text:p/>
        </draw:rect>
        <draw:frame draw:style-name="gr51" draw:text-style-name="P23" draw:layer="layout" svg:width="3.876cm" svg:height="0.725cm" svg:x="-5.532cm" svg:y="24.808cm">
          <draw:text-box>
            <text:p><text:span text:style-name="T18">OradioApA</text:span><text:span text:style-name="T18">ctive</text:span></text:p>
          </draw:text-box>
        </draw:frame>
        <draw:frame draw:style-name="gr67" draw:text-style-name="P22" draw:layer="layout" svg:width="5.733cm" svg:height="1.729cm" svg:x="-6.302cm" svg:y="25.343cm">
          <draw:text-box>
            <text:p><text:span text:style-name="T3">Entry</text:span><text:span text:style-name="T6"> </text:span><text:span text:style-name="T14">/start_ledPlay_f</text:span><text:span text:style-name="T14">lashing()</text:span></text:p>
            <text:p><text:span text:style-name="T3">Do</text:span><text:span text:style-name="T6"> </text:span><text:span text:style-name="T14">/WaitForWifiMe</text:span><text:span text:style-name="T14">ssage()</text:span></text:p>
            <text:p><text:span text:style-name="T3">Exit</text:span><text:span text:style-name="T6"> </text:span><text:span text:style-name="T14">/stop_ledPlay_f</text:span><text:span text:style-name="T14">lashing()</text:span></text:p>
          </draw:text-box>
        </draw:frame>
        <draw:rect draw:style-name="gr24" draw:text-style-name="P2" xml:id="id35" draw:id="id35" draw:layer="layout" svg:width="5.398cm" svg:height="2.223cm" svg:x="2.404cm" svg:y="20.854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2.223cm" svg:y="-5.002cm"/>
          <draw:glue-point draw:id="10" svg:x="-2.22cm" svg:y="-5.002cm"/>
          <draw:glue-point draw:id="11" svg:x="-3.888cm" svg:y="5.001cm"/>
          <draw:glue-point draw:id="12" svg:x="1.051cm" svg:y="4.922cm"/>
          <draw:glue-point draw:id="13" svg:x="-5.001cm" svg:y="-1.475cm"/>
          <text:p/>
        </draw:rect>
        <draw:frame draw:style-name="gr51" draw:text-style-name="P23" draw:layer="layout" svg:width="3.876cm" svg:height="0.725cm" svg:x="3.222cm" svg:y="20.912cm">
          <draw:text-box>
            <text:p><text:span text:style-name="T18">OradioApA</text:span><text:span text:style-name="T18">ctive</text:span></text:p>
          </draw:text-box>
        </draw:frame>
        <draw:frame draw:style-name="gr67" draw:text-style-name="P22" draw:layer="layout" svg:width="5.733cm" svg:height="1.729cm" svg:x="3.005cm" svg:y="21.396cm">
          <draw:text-box>
            <text:p><text:span text:style-name="T3">Entry</text:span><text:span text:style-name="T6"> </text:span><text:span text:style-name="T14">/</text:span></text:p>
            <text:p><text:span text:style-name="T3">Do</text:span><text:span text:style-name="T6"> </text:span><text:span text:style-name="T14">/WaitForWifiMe</text:span><text:span text:style-name="T14">ssage()</text:span></text:p>
            <text:p><text:span text:style-name="T3">Exit</text:span><text:span text:style-name="T6"> </text:span><text:span text:style-name="T14">/stop_ledPlay_f</text:span><text:span text:style-name="T14">lashing()</text:span></text:p>
          </draw:text-box>
        </draw:frame>
        <draw:frame draw:style-name="gr50" draw:text-style-name="P22" draw:layer="layout" svg:width="5.464cm" svg:height="1.674cm" svg:x="2.905cm" svg:y="18.376cm">
          <draw:text-box>
            <text:p><text:span text:style-name="T3">Entry</text:span><text:span text:style-name="T6"> </text:span><text:span text:style-name="T14">/start_ledPlay_f</text:span><text:span text:style-name="T14">lashing()</text:span></text:p>
            <text:p><text:span text:style-name="T3">Do</text:span><text:span text:style-name="T6"> </text:span><text:span text:style-name="T14">/WaitForActive</text:span><text:span text:style-name="T14">Ap()</text:span></text:p>
            <text:p><text:span text:style-name="T3">Exit</text:span><text:span text:style-name="T6"> </text:span><text:span text:style-name="T14">/</text:span></text:p>
          </draw:text-box>
        </draw:frame>
        <draw:connector draw:style-name="gr64" draw:text-style-name="P2" draw:layer="layout" svg:x1="6.391cm" svg:y1="19.885cm" svg:x2="6.771cm" svg:y2="20.854cm" draw:start-shape="id28" draw:start-glue-point="5" draw:end-shape="id35" draw:end-glue-point="7" svg:d="M6391 19885v485h380v484" svg:viewBox="0 0 381 970">
          <text:p/>
        </draw:connector>
        <draw:frame draw:style-name="gr73" draw:text-style-name="P32" draw:layer="layout" svg:width="2.54cm" svg:height="0.645cm" svg:x="4.492cm" svg:y="20.04cm">
          <draw:text-box>
            <text:p><text:span text:style-name="T14">ApActive</text:span></text:p>
          </draw:text-box>
        </draw:frame>
      </draw:page>
      <draw:page draw:name="page3" draw:style-name="dp1" draw:master-page-name="Default">
        <draw:g draw:style-name="gr4">
          <draw:frame draw:style-name="gr23" draw:text-style-name="P24" draw:layer="layout" svg:width="19.04cm" svg:height="1.319cm" svg:x="1.06cm" svg:y="0.997cm">
            <draw:text-box>
              <text:p text:style-name="P10"><text:span text:style-name="T19">OradioAcces</text:span><text:span text:style-name="T19">sPoint</text:span></text:p>
            </draw:text-box>
          </draw:frame>
          <draw:rect draw:style-name="gr24" draw:text-style-name="P25" draw:layer="layout" svg:width="19.04cm" svg:height="27.591cm" svg:x="1cm" svg:y="1.109cm" draw:corner-radius="0.5cm">
            <text:p/>
          </draw:rect>
          <draw:line draw:style-name="gr52" draw:text-style-name="P2" draw:layer="layout" svg:x1="1.004cm" svg:y1="2.148cm" svg:x2="20.031cm" svg:y2="2.137cm">
            <text:p/>
          </draw:line>
        </draw:g>
        <draw:frame draw:style-name="gr56" draw:text-style-name="P27" draw:layer="layout" svg:width="3.175cm" svg:height="0.953cm" svg:x="12.747cm" svg:y="19.11cm">
          <draw:text-box>
            <text:p><text:span text:style-name="T20">nextMessage</text:span></text:p>
          </draw:text-box>
        </draw:frame>
        <draw:frame draw:style-name="gr58" draw:text-style-name="P34" draw:layer="layout" svg:width="5.715cm" svg:height="1.039cm" svg:x="12.965cm" svg:y="15.361cm">
          <draw:text-box>
            <text:p text:style-name="P33">[not wifiConnected]</text:p>
            <text:p text:style-name="P33">/playSound(SOUND_NO_WIFI)</text:p>
          </draw:text-box>
        </draw:frame>
        <draw:connector draw:style-name="gr64" draw:text-style-name="P2" draw:layer="layout" svg:x1="5.01cm" svg:y1="2.822cm" svg:x2="8.822cm" svg:y2="4.505cm" draw:end-shape="id36" draw:end-glue-point="10" svg:d="M5010 2822v591h3812v1092" svg:viewBox="0 0 3813 1684">
          <text:p/>
        </draw:connector>
        <draw:connector draw:style-name="gr64" draw:text-style-name="P2" draw:layer="layout" svg:x1="12.77cm" svg:y1="14.012cm" svg:x2="10.945cm" svg:y2="16.27cm" draw:start-shape="id37" draw:start-glue-point="4" draw:end-shape="id38" draw:end-glue-point="1" svg:d="M12770 14012v2258h-1825" svg:viewBox="0 0 1826 2259">
          <text:p/>
        </draw:connector>
        <draw:connector draw:style-name="gr64" draw:text-style-name="P2" draw:layer="layout" svg:x1="8.441cm" svg:y1="14.012cm" svg:x2="10.345cm" svg:y2="16.27cm" draw:start-shape="id37" draw:start-glue-point="6" draw:end-shape="id38" draw:end-glue-point="3" svg:d="M8441 14012v2258h1904" svg:viewBox="0 0 1905 2259">
          <text:p/>
        </draw:connector>
        <draw:frame draw:style-name="gr74" draw:text-style-name="P34" draw:layer="layout" svg:width="5.446cm" svg:height="1.27cm" svg:x="3.74cm" svg:y="15.282cm">
          <draw:text-box>
            <text:p text:style-name="P33">[wifiConnected]</text:p>
            <text:p text:style-name="P33">/playSound(SOUND_WIFI)</text:p>
          </draw:text-box>
        </draw:frame>
        <draw:g draw:style-name="gr39" xml:id="id38" draw:id="id38">
          <draw:custom-shape draw:style-name="gr26" draw:text-style-name="P1" draw:layer="layout" svg:width="0.4cm" svg:height="0.4cm" svg:x="10.445cm" svg:y="16.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10.345cm" svg:y="15.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5" draw:text-style-name="P14" draw:layer="layout" svg:width="3.493cm" svg:height="1.357cm" svg:x="1.952cm" svg:y="2.905cm">
          <draw:text-box>
            <text:p><text:span text:style-name="T14">LongPressPlay</text:span></text:p>
            <text:p><text:span text:style-name="T11">/startOradioAP</text:span></text:p>
          </draw:text-box>
        </draw:frame>
        <draw:connector draw:style-name="gr64" draw:text-style-name="P2" draw:layer="layout" svg:x1="11.175cm" svg:y1="8.599cm" svg:x2="12.618cm" svg:y2="10.554cm" draw:start-shape="id36" draw:start-glue-point="12" draw:end-shape="id37" draw:end-glue-point="7" svg:d="M11175 8599v994h1443v961" svg:viewBox="0 0 1444 1956">
          <text:p/>
        </draw:connector>
        <draw:frame draw:style-name="gr29" draw:text-style-name="P14" draw:layer="layout" svg:width="2.14cm" svg:height="0.887cm" svg:x="7.985cm" svg:y="18.458cm">
          <draw:text-box>
            <text:p><text:span text:style-name="T11">timeOut</text:span></text:p>
            <text:p><text:span text:style-name="T11">/gotoError()</text:span></text:p>
          </draw:text-box>
        </draw:frame>
        <draw:g draw:style-name="gr1">
          <draw:custom-shape draw:style-name="gr68" draw:text-style-name="P30" draw:layer="layout" svg:width="0.717cm" svg:height="0.718cm" svg:x="19.097cm" svg:y="17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9.176cm" svg:y1="17.99cm" svg:x2="19.737cm" svg:y2="18.552cm">
              <text:p/>
            </draw:line>
            <draw:line draw:style-name="gr57" draw:text-style-name="P2" draw:layer="layout" svg:x1="19.731cm" svg:y1="17.97cm" svg:x2="19.147cm" svg:y2="18.553cm">
              <text:p/>
            </draw:line>
          </draw:g>
        </draw:g>
        <draw:connector draw:style-name="gr64" draw:text-style-name="P2" draw:layer="layout" svg:x1="5.027cm" svg:y1="17.63cm" svg:x2="9.234cm" svg:y2="17.578cm" svg:d="M5027 17630h2104v-52h2103" svg:viewBox="0 0 4208 53">
          <text:p/>
        </draw:connector>
        <draw:frame draw:style-name="gr29" draw:text-style-name="P31" draw:layer="layout" svg:width="3.593cm" svg:height="0.887cm" svg:x="5.144cm" svg:y="17.453cm">
          <draw:text-box>
            <text:p><text:span text:style-name="T22">OradioApStopped</text:span></text:p>
            <text:p><text:span text:style-name="T22">[OradioApActive]</text:span></text:p>
          </draw:text-box>
        </draw:frame>
        <draw:connector draw:style-name="gr64" draw:text-style-name="P2" draw:layer="layout" svg:x1="6.391cm" svg:y1="21.085cm" svg:x2="6.771cm" svg:y2="22.254cm" svg:d="M6391 21085v585h380v584" svg:viewBox="0 0 381 1170">
          <text:p/>
        </draw:connector>
        <draw:frame draw:style-name="gr76" draw:text-style-name="P32" draw:layer="layout" svg:width="2.97cm" svg:height="1.152cm" svg:x="9.255cm" svg:y="9.068cm">
          <draw:text-box>
            <text:p><text:span text:style-name="T14">ApActive</text:span></text:p>
            <text:p><text:span text:style-name="T14">/ - </text:span></text:p>
          </draw:text-box>
        </draw:frame>
        <draw:rect draw:style-name="gr24" draw:text-style-name="P2" xml:id="id36" draw:id="id36" draw:layer="layout" svg:width="7.195cm" svg:height="4.127cm" svg:x="6.822cm" svg:y="4.50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2.223cm" svg:y="-5.002cm"/>
          <draw:glue-point draw:id="10" svg:x="-2.22cm" svg:y="-5.002cm"/>
          <draw:glue-point draw:id="11" svg:x="-3.888cm" svg:y="5.001cm"/>
          <draw:glue-point draw:id="12" svg:x="1.051cm" svg:y="4.922cm"/>
          <text:p/>
        </draw:rect>
        <draw:frame draw:style-name="gr66" draw:text-style-name="P23" draw:layer="layout" svg:width="4.311cm" svg:height="0.735cm" svg:x="8.302cm" svg:y="4.64cm">
          <draw:text-box>
            <text:p><text:span text:style-name="T18">ActivateOradioAp</text:span></text:p>
          </draw:text-box>
        </draw:frame>
        <draw:frame draw:style-name="gr77" draw:text-style-name="P22" draw:layer="layout" svg:width="6.35cm" svg:height="2.855cm" svg:x="7.35cm" svg:y="5.375cm">
          <draw:text-box>
            <text:p><text:span text:style-name="T3">Entry</text:span><text:span text:style-name="T6"> </text:span><text:span text:style-name="T14">/start_ledPlay_flashing()</text:span></text:p>
            <text:p><text:span text:style-name="T3">Do</text:span><text:span text:style-name="T6"> </text:span><text:span text:style-name="T14">/WaitForWiFiMessage()</text:span></text:p>
            <text:p><text:span text:style-name="T3">Exit</text:span><text:span text:style-name="T6"> </text:span><text:span text:style-name="T14">/</text:span></text:p>
            <text:p><text:span text:style-name="T14"><text:s text:c="2"/></text:span><text:span text:style-name="T14">upon WiFiAp raise ApActive</text:span></text:p>
            <text:p><text:span text:style-name="T14"><text:s text:c="2"/></text:span><text:span text:style-name="T14">upon WiFiAoFail raise ApFail</text:span></text:p>
            <text:p><text:span text:style-name="T14"><text:s text:c="2"/></text:span><text:span text:style-name="T14">upon WaitTimeOut raise ApTimeout</text:span></text:p>
          </draw:text-box>
        </draw:frame>
        <draw:frame draw:style-name="gr51" draw:text-style-name="P9" draw:layer="layout" svg:width="1.588cm" svg:height="0.725cm" svg:x="17.509cm" svg:y="17.352cm">
          <draw:text-box>
            <text:p><text:span text:style-name="T7">Error</text:span></text:p>
          </draw:text-box>
        </draw:frame>
        <draw:connector draw:style-name="gr71" draw:text-style-name="P2" draw:layer="layout" draw:type="curve" draw:line-skew="0.054cm -1.197cm" svg:x1="7.51cm" svg:y1="14.012cm" svg:x2="6.696cm" svg:y2="11.773cm" draw:start-shape="id37" draw:start-glue-point="11" draw:end-shape="id37" draw:end-glue-point="13" svg:d="M7510 14012c0 832-1257 694-2097-74s-1264-2165 1283-2165" svg:viewBox="0 0 2748 2805">
          <text:p/>
        </draw:connector>
        <draw:rect draw:style-name="gr24" draw:text-style-name="P2" xml:id="id37" draw:id="id37" draw:layer="layout" svg:width="7.321cm" svg:height="3.458cm" svg:x="6.696cm" svg:y="10.554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2.223cm" svg:y="-5.002cm"/>
          <draw:glue-point draw:id="10" svg:x="-2.22cm" svg:y="-5.002cm"/>
          <draw:glue-point draw:id="11" svg:x="-3.888cm" svg:y="5.001cm"/>
          <draw:glue-point draw:id="12" svg:x="1.051cm" svg:y="4.922cm"/>
          <draw:glue-point draw:id="13" svg:x="-5.001cm" svg:y="-1.475cm"/>
          <text:p/>
        </draw:rect>
        <draw:frame draw:style-name="gr51" draw:text-style-name="P23" draw:layer="layout" svg:width="3.876cm" svg:height="0.725cm" svg:x="8.014cm" svg:y="10.712cm">
          <draw:text-box>
            <text:p><text:span text:style-name="T18">OradioApActive</text:span></text:p>
          </draw:text-box>
        </draw:frame>
        <draw:frame draw:style-name="gr67" draw:text-style-name="P22" draw:layer="layout" svg:width="5.733cm" svg:height="1.729cm" svg:x="7.649cm" svg:y="11.79cm">
          <draw:text-box>
            <text:p><text:span text:style-name="T3">Entry</text:span><text:span text:style-name="T6"> </text:span><text:span text:style-name="T14">/</text:span></text:p>
            <text:p><text:span text:style-name="T3">Do</text:span><text:span text:style-name="T6"> </text:span><text:span text:style-name="T14">/WaitForWifiMessage()</text:span></text:p>
            <text:p><text:span text:style-name="T3">Exit</text:span><text:span text:style-name="T6"> </text:span><text:span text:style-name="T14">/stop_ledPlay_flashing</text:span><text:span text:style-name="T14">()</text:span></text:p>
          </draw:text-box>
        </draw:frame>
        <draw:connector draw:style-name="gr64" draw:text-style-name="P2" draw:layer="layout" svg:x1="14.017cm" svg:y1="7.626cm" svg:x2="17.85cm" svg:y2="9.855cm" draw:start-shape="id36" draw:start-glue-point="8" svg:d="M14017 7626h2167v2229h1666" svg:viewBox="0 0 3834 2230">
          <text:p/>
        </draw:connector>
        <draw:frame draw:style-name="gr54" draw:text-style-name="P9" draw:layer="layout" svg:width="3.175cm" svg:height="0.952cm" svg:x="14.97cm" svg:y="7.045cm">
          <draw:text-box>
            <text:p text:style-name="P35">ApTimeout</text:p>
          </draw:text-box>
        </draw:frame>
        <draw:connector draw:style-name="gr64" draw:text-style-name="P2" draw:layer="layout" svg:x1="6.822cm" svg:y1="6.568cm" svg:x2="3.846cm" svg:y2="9.255cm" draw:start-shape="id36" draw:start-glue-point="3" svg:d="M6822 6568h-1738v2687h-1238" svg:viewBox="0 0 2977 2688">
          <text:p/>
        </draw:connector>
        <draw:frame draw:style-name="gr56" draw:text-style-name="P9" draw:layer="layout" svg:width="3.492cm" svg:height="0.953cm" svg:x="1.635cm" svg:y="7.997cm">
          <draw:text-box>
            <text:p text:style-name="P35">ApFail</text:p>
          </draw:text-box>
        </draw:frame>
        <draw:frame draw:style-name="gr78" draw:text-style-name="P34" draw:layer="layout" svg:width="3.675cm" svg:height="1.433cm" svg:x="1.77cm" svg:y="11.725cm">
          <draw:text-box>
            <text:p text:style-name="P33">LongPressPlay</text:p>
            <text:p text:style-name="P33">[OradioApActive]</text:p>
            <text:p text:style-name="P33">/ --</text:p>
          </draw:text-box>
        </draw:frame>
        <draw:connector draw:style-name="gr64" draw:text-style-name="P2" draw:layer="layout" svg:x1="19.192cm" svg:y1="10.724cm" svg:x2="16.828cm" svg:y2="11.324cm" svg:d="M19192 10724h-1182v600h-1182" svg:viewBox="0 0 2365 601">
          <text:p/>
        </draw:connector>
      </draw:page>
      <draw:page draw:name="page4" draw:style-name="dp1" draw:master-page-name="Default">
        <draw:rect draw:style-name="gr24" draw:text-style-name="P2" xml:id="id40" draw:id="id40" draw:layer="layout" svg:width="10.16cm" svg:height="2.54cm" svg:x="4.175cm" svg:y="13.82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4.856cm" svg:y="-2.826cm"/>
          <draw:glue-point draw:id="10" svg:x="0.842cm" svg:y="5.003cm"/>
          <draw:glue-point draw:id="11" svg:x="5.003cm" svg:y="-1.744cm"/>
          <draw:glue-point draw:id="12" svg:x="-1.406cm" svg:y="5.003cm"/>
          <draw:glue-point draw:id="13" svg:x="-4.119cm" svg:y="5.003cm"/>
          <text:p/>
        </draw:rect>
        <draw:frame draw:style-name="gr79" draw:text-style-name="P36" draw:layer="layout" svg:width="9.842cm" svg:height="2.09cm" svg:x="4.71cm" svg:y="14.367cm">
          <draw:text-box>
            <text:p><text:span text:style-name="T3">Entry</text:span><text:span text:style-name="T22"> /playSound(SOUND_STOP); </text:span><text:span text:style-name="T22">setLed(LED_STOP); stopPlayers()</text:span></text:p>
            <text:p><text:span text:style-name="T3">do</text:span><text:span text:style-name="T6"> </text:span><text:span text:style-name="T22">/ waitForButtonPressed()</text:span></text:p>
            <text:p><text:span text:style-name="T3">exit</text:span><text:span text:style-name="T6"> / </text:span><text:span text:style-name="T22">on usbAbsent raise </text:span><text:span text:style-name="T22">criticalError</text:span></text:p>
          </draw:text-box>
          <draw:glue-point draw:id="4" svg:x="5cm" svg:y="-4.997cm"/>
          <draw:glue-point draw:id="5" svg:x="5cm" svg:y="-4.997cm"/>
        </draw:frame>
        <draw:frame draw:style-name="gr51" draw:text-style-name="P23" draw:layer="layout" svg:width="3.175cm" svg:height="0.725cm" svg:x="6.715cm" svg:y="13.927cm">
          <draw:text-box>
            <text:p><text:span text:style-name="T18">Standby</text:span></text:p>
          </draw:text-box>
        </draw:frame>
        <draw:g draw:style-name="gr4">
          <draw:frame draw:style-name="gr23" draw:text-style-name="P24" draw:layer="layout" svg:width="19.154cm" svg:height="1.774cm" svg:x="0.682cm" svg:y="1.096cm">
            <draw:text-box>
              <text:p text:style-name="P10"><text:span text:style-name="T19">OradioControl</text:span></text:p>
            </draw:text-box>
          </draw:frame>
          <draw:rect draw:style-name="gr24" draw:text-style-name="P2" draw:layer="layout" svg:width="19.154cm" svg:height="28.257cm" svg:x="0.846cm" svg:y="1cm" draw:corner-radius="0.5cm">
            <draw:glue-point draw:id="4" svg:x="-3.688cm" svg:y="-5.004cm"/>
            <text:p/>
          </draw:rect>
          <draw:line draw:style-name="gr10" draw:text-style-name="P2" draw:layer="layout" svg:x1="0.851cm" svg:y1="2.027cm" svg:x2="19.993cm" svg:y2="2.017cm">
            <text:p/>
          </draw:line>
        </draw:g>
        <draw:rect draw:style-name="gr24" draw:text-style-name="P2" xml:id="id41" draw:id="id41" draw:layer="layout" svg:width="5.059cm" svg:height="2.54cm" svg:x="10.681cm" svg:y="21.72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draw:glue-point draw:id="10" svg:x="-2.532cm" svg:y="-5.003cm"/>
          <draw:glue-point draw:id="11" svg:x="5.003cm" svg:y="-1.633cm"/>
          <draw:glue-point draw:id="12" svg:x="5.003cm" svg:y="-2.881cm"/>
          <draw:glue-point draw:id="13" svg:x="-1.097cm" svg:y="4.874cm"/>
          <draw:glue-point draw:id="14" svg:x="0.873cm" svg:y="4.874cm"/>
          <draw:glue-point draw:id="15" svg:x="4.162cm" svg:y="4.874cm"/>
          <draw:glue-point draw:id="16" svg:x="-5cm" svg:y="-2.625cm"/>
          <draw:glue-point draw:id="17" svg:x="-3.425cm" svg:y="4.874cm"/>
          <draw:glue-point draw:id="18" svg:x="1.595cm" svg:y="-5.003cm"/>
          <text:p/>
        </draw:rect>
        <draw:frame draw:style-name="gr80" draw:text-style-name="P22" draw:layer="layout" svg:width="4.545cm" svg:height="1.991cm" svg:x="10.742cm" svg:y="22.29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 text:style-name="P37"><text:span text:style-name="T23">exit</text:span><text:span text:style-name="T24"> /</text:span><text:span text:style-name="T22">on usbAbsent </text:span></text:p>
            <text:p text:style-name="P37"><text:span text:style-name="T22"><text:s text:c="15"/></text:span><text:span text:style-name="T22">raise criticalError</text:span></text:p>
          </draw:text-box>
        </draw:frame>
        <draw:frame draw:style-name="gr54" draw:text-style-name="P23" draw:layer="layout" svg:width="3.175cm" svg:height="0.952cm" svg:x="11.795cm" svg:y="21.755cm">
          <draw:text-box>
            <text:p><text:span text:style-name="T18">MpdPlaying</text:span></text:p>
          </draw:text-box>
        </draw:frame>
        <draw:rect draw:style-name="gr24" draw:text-style-name="P2" xml:id="id43" draw:id="id43" draw:layer="layout" svg:width="6.668cm" svg:height="2.54cm" svg:x="2.587cm" svg:y="23.96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2.826cm" svg:y="-5cm"/>
          <draw:glue-point draw:id="10" svg:x="-1.511cm" svg:y="-5cm"/>
          <draw:glue-point draw:id="11" svg:x="-5.001cm" svg:y="-2.755cm"/>
          <draw:glue-point draw:id="12" svg:x="-5.001cm" svg:y="2.244cm"/>
          <draw:glue-point draw:id="13" svg:x="5.002cm" svg:y="-2.755cm"/>
          <draw:glue-point draw:id="14" svg:x="1.574cm" svg:y="-5.003cm"/>
          <text:p/>
        </draw:rect>
        <draw:frame draw:style-name="gr81" draw:text-style-name="P38" draw:layer="layout" svg:width="6.433cm" svg:height="2.461cm" svg:x="2.822cm" svg:y="24.252cm">
          <draw:text-box>
            <text:p text:style-name="P37"><text:span text:style-name="T23">entry</text:span><text:span text:style-name="T24"> </text:span><text:span text:style-name="T25">/</text:span><text:span text:style-name="T22">playSound(SOUND</text:span><text:span text:style-name="T22">_SPOTIFY);</text:span></text:p>
            <text:p text:style-name="P37"><text:span text:style-name="T22">setLed(LED_PLAY)</text:span></text:p>
            <text:p><text:span text:style-name="T3">do</text:span><text:span text:style-name="T6"> /</text:span></text:p>
            <text:p text:style-name="P37"><text:span text:style-name="T23">exit</text:span><text:span text:style-name="T24"> / </text:span><text:span text:style-name="T22">on </text:span><text:span text:style-name="T22">usbAbsent raise </text:span><text:span text:style-name="T22">criticalError</text:span></text:p>
            <text:p text:style-name="P37"><text:span text:style-name="T22">if not </text:span><text:span text:style-name="T22">isSpotifyConnected </text:span><text:span text:style-name="T22">raise ButtonStop</text:span></text:p>
          </draw:text-box>
        </draw:frame>
        <draw:frame draw:style-name="gr54" draw:text-style-name="P23" draw:layer="layout" svg:width="3.523cm" svg:height="0.952cm" svg:x="3.222cm" svg:y="23.86cm">
          <draw:text-box>
            <text:p><text:span text:style-name="T18">SpotifyPlayin</text:span><text:span text:style-name="T18">g</text:span></text:p>
          </draw:text-box>
        </draw:frame>
        <draw:rect draw:style-name="gr24" draw:text-style-name="P2" xml:id="id45" draw:id="id45" draw:layer="layout" svg:width="10.16cm" svg:height="4.226cm" svg:x="3.54cm" svg:y="3.441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82" draw:text-style-name="P22" draw:layer="layout" svg:width="8.137cm" svg:height="4.117cm" svg:x="4.123cm" svg:y="3.785cm">
          <draw:text-box>
            <text:p><text:span text:style-name="T3">Entry</text:span><text:span text:style-name="T6"> / </text:span><text:span text:style-name="T14">setLed(LED_STOP)</text:span></text:p>
            <text:p text:style-name="P39"><text:span text:style-name="T3">Do</text:span><text:span text:style-name="T6"> /</text:span></text:p>
            <text:p text:style-name="P39"><text:span text:style-name="T22">shared_q = new Queue(); Create new instances for:</text:span></text:p>
            <text:p text:style-name="P39"><text:span text:style-name="T22">USBService(shared_q); SpotifyConnect(shared_q); </text:span></text:p>
            <text:p text:style-name="P39"><text:span text:style-name="T22">Backlighting(); MPDMonitor(); MPDControl();</text:span></text:p>
            <text:p text:style-name="P39"><text:span text:style-name="T22">PowerSupplyService(); LEDControl(); RMService(); </text:span></text:p>
            <text:p text:style-name="P39"><text:span text:style-name="T22">TouchButtons(shared_q); VolumeControl(shared_q);</text:span></text:p>
            <text:p text:style-name="P39"><text:span text:style-name="T22">WebService(shared_q)</text:span></text:p>
            <text:p><text:span text:style-name="T3">exit</text:span><text:span text:style-name="T6"> </text:span><text:span text:style-name="T22">/if creationFailed then raise criticalError </text:span></text:p>
            <text:p><text:span text:style-name="T22"><text:tab/></text:span><text:span text:style-name="T22">else raise creationDone</text:span></text:p>
          </draw:text-box>
        </draw:frame>
        <draw:frame draw:style-name="gr51" draw:text-style-name="P23" draw:layer="layout" svg:width="3.876cm" svg:height="0.725cm" svg:x="6.632cm" svg:y="3.367cm">
          <draw:text-box>
            <text:p><text:span text:style-name="T18">OradioCreation</text:span></text:p>
          </draw:text-box>
        </draw:frame>
        <draw:connector draw:style-name="gr59" draw:text-style-name="P2" draw:layer="layout" svg:x1="10.127cm" svg:y1="12.512cm" svg:x2="9.255cm" svg:y2="13.825cm" draw:start-shape="id39" draw:start-glue-point="5" draw:end-shape="id40" draw:end-glue-point="0" svg:d="M10127 12512v657h-872v656" svg:viewBox="0 0 873 1314">
          <text:p/>
        </draw:connector>
        <draw:connector draw:style-name="gr59" draw:text-style-name="P2" draw:layer="layout" svg:x1="13.21cm" svg:y1="21.722cm" svg:x2="12.605cm" svg:y2="16.365cm" draw:start-shape="id41" draw:start-glue-point="0" draw:end-shape="id40" draw:end-glue-point="4" svg:d="M13210 21722v-2678h-605v-2679" svg:viewBox="0 0 606 5358">
          <text:p/>
        </draw:connector>
        <draw:connector draw:style-name="gr59" draw:text-style-name="P2" draw:layer="layout" svg:x1="8.341cm" svg:y1="18.27cm" svg:x2="4.914cm" svg:y2="23.96cm" draw:start-shape="id42" draw:start-glue-point="5" draw:end-shape="id43" draw:end-glue-point="10" svg:d="M8341 18270h-3427v5690" svg:viewBox="0 0 3428 5691">
          <text:p/>
        </draw:connector>
        <draw:connector draw:style-name="gr59" draw:text-style-name="P2" draw:layer="layout" svg:x1="8.941cm" svg:y1="18.27cm" svg:x2="11.93cm" svg:y2="21.722cm" draw:start-shape="id42" draw:start-glue-point="7" draw:end-shape="id41" draw:end-glue-point="10" svg:d="M8941 18270h2989v3452" svg:viewBox="0 0 2990 3453">
          <text:p/>
        </draw:connector>
        <draw:connector draw:style-name="gr59" draw:text-style-name="P2" draw:layer="layout" draw:line-skew="0cm -1.087cm" svg:x1="4.037cm" svg:y1="23.96cm" svg:x2="4.175cm" svg:y2="15.095cm" draw:start-shape="id43" draw:start-glue-point="9" draw:end-shape="id40" draw:end-glue-point="3" svg:d="M4037 23960v-3797h-1450v-5068h1588" svg:viewBox="0 0 1589 8866">
          <text:p/>
        </draw:connector>
        <draw:custom-shape draw:style-name="gr25" draw:text-style-name="P1" xml:id="id44" draw:id="id44" draw:layer="layout" svg:width="0.4cm" svg:height="0.4cm" svg:x="13.012cm" svg:y="2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4" draw:text-style-name="P2" draw:layer="layout" draw:line-skew="-0.295cm" svg:x1="13.212cm" svg:y1="2.657cm" svg:x2="8.62cm" svg:y2="3.441cm" draw:start-shape="id44" draw:start-glue-point="8" draw:end-shape="id45" draw:end-glue-point="0" svg:d="M13212 2657v98h-4592v686" svg:viewBox="0 0 4593 785">
          <text:p/>
        </draw:connector>
        <draw:rect draw:style-name="gr24" draw:text-style-name="P2" xml:id="id39" draw:id="id39" draw:layer="layout" svg:width="8.525cm" svg:height="2.857cm" svg:x="4.175cm" svg:y="9.65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draw:glue-point draw:id="10" svg:x="-5cm" svg:y="-2.291cm"/>
          <text:p/>
        </draw:rect>
        <draw:frame draw:style-name="gr83" draw:text-style-name="P22" draw:layer="layout" svg:width="7.303cm" svg:height="2.627cm" svg:x="4.627cm" svg:y="9.89cm">
          <draw:text-box>
            <text:p><text:span text:style-name="T3">Entry</text:span><text:span text:style-name="T6"> /</text:span></text:p>
            <text:p><text:span text:style-name="T3">Do</text:span><text:span text:style-name="T6"> </text:span><text:span text:style-name="T14">/ </text:span><text:span text:style-name="T22">waitForUsbMessage()</text:span></text:p>
            <text:p><text:span text:style-name="T23">Exit</text:span><text:span text:style-name="T24"> </text:span></text:p>
            <text:p text:style-name="P37"><text:span text:style-name="T22">=&gt; On usbPresent raise mpdCreationDone</text:span></text:p>
            <text:p text:style-name="P37"><text:span text:style-name="T22">=&gt; On usbAbsent raise criticalError</text:span></text:p>
          </draw:text-box>
        </draw:frame>
        <draw:frame draw:style-name="gr84" draw:text-style-name="P23" draw:layer="layout" svg:width="3.175cm" svg:height="1.36cm" svg:x="6.985cm" svg:y="9.655cm">
          <draw:text-box>
            <text:p><text:span text:style-name="T18">MpdCreation</text:span></text:p>
          </draw:text-box>
        </draw:frame>
        <draw:connector draw:style-name="gr59" draw:text-style-name="P2" draw:layer="layout" svg:x1="10.634cm" svg:y1="7.667cm" svg:x2="11.072cm" svg:y2="9.655cm" draw:start-shape="id45" draw:start-glue-point="5" draw:end-shape="id39" draw:end-glue-point="7" svg:d="M10634 7667v994h438v994" svg:viewBox="0 0 439 1989">
          <text:p/>
        </draw:connector>
        <draw:frame draw:style-name="gr54" draw:text-style-name="P14" draw:layer="layout" svg:width="3.492cm" svg:height="0.952cm" svg:x="7.28cm" svg:y="8.485cm">
          <draw:text-box>
            <text:p><text:span text:style-name="T11">creationDone</text:span></text:p>
            <text:p><text:span text:style-name="T11">/start_mpd_</text:span><text:span text:style-name="T26">creation</text:span><text:span text:style-name="T11">()</text:span></text:p>
          </draw:text-box>
        </draw:frame>
        <draw:frame draw:style-name="gr46" draw:text-style-name="P18" draw:layer="layout" svg:width="1.822cm" svg:height="0.806cm" svg:x="16.958cm" svg:y="11.477cm">
          <draw:text-box>
            <text:p><text:span text:style-name="T16">Error</text:span></text:p>
          </draw:text-box>
        </draw:frame>
        <draw:connector draw:style-name="gr59" draw:text-style-name="P2" draw:layer="layout" svg:x1="13.7cm" svg:y1="6.638cm" svg:x2="18.773cm" svg:y2="12.112cm" draw:start-shape="id45" draw:start-glue-point="8" draw:end-shape="id46" draw:end-glue-point="0" svg:d="M13700 6638h5073v5474" svg:viewBox="0 0 5074 5475">
          <text:p/>
        </draw:connector>
        <draw:connector draw:style-name="gr59" draw:text-style-name="P2" draw:layer="layout" svg:x1="12.7cm" svg:y1="11.816cm" svg:x2="18.415cm" svg:y2="12.471cm" draw:start-shape="id39" draw:start-glue-point="8" draw:end-shape="id46" svg:d="M12700 11816h2845v655h2870" svg:viewBox="0 0 5716 656">
          <text:p/>
        </draw:connector>
        <draw:frame draw:style-name="gr29" draw:text-style-name="P14" draw:layer="layout" svg:width="3.175cm" svg:height="0.887cm" svg:x="10.215cm" svg:y="12.601cm">
          <draw:text-box>
            <text:p><text:span text:style-name="T11">mpdCreationDone</text:span></text:p>
            <text:p><text:span text:style-name="T11">/goto_standby()</text:span></text:p>
          </draw:text-box>
        </draw:frame>
        <draw:connector draw:style-name="gr59" draw:text-style-name="P2" draw:layer="layout" svg:x1="14.335cm" svg:y1="14.653cm" svg:x2="18.773cm" svg:y2="12.83cm" draw:start-shape="id40" draw:start-glue-point="11" draw:end-shape="id46" draw:end-glue-point="2" svg:d="M14335 14653h4438v-1823" svg:viewBox="0 0 4439 1824">
          <text:p/>
        </draw:connector>
        <draw:connector draw:style-name="gr59" draw:text-style-name="P2" draw:layer="layout" draw:line-skew="0.612cm" svg:x1="15.74cm" svg:y1="23.643cm" svg:x2="19.572cm" svg:y2="25.231cm" draw:start-shape="id41" draw:start-glue-point="8" draw:end-shape="id47" draw:end-glue-point="2" svg:d="M15740 23643h2336v2114h1496v-526" svg:viewBox="0 0 3833 2115">
          <text:p/>
        </draw:connector>
        <draw:connector draw:style-name="gr59" draw:text-style-name="P2" draw:layer="layout" draw:line-skew="1.939cm" svg:x1="4.176cm" svg:y1="26.5cm" svg:x2="19.572cm" svg:y2="25.231cm" draw:start-shape="id43" draw:start-glue-point="6" draw:end-shape="id47" draw:end-glue-point="2" svg:d="M4176 26500v2440h15396v-3709" svg:viewBox="0 0 15397 3710">
          <text:p/>
        </draw:connector>
        <draw:frame draw:style-name="gr85" draw:text-style-name="P14" draw:layer="layout" svg:width="4.763cm" svg:height="2.223cm" svg:x="15.37cm" svg:y="16.24cm">
          <draw:text-box>
            <text:p><text:span text:style-name="T11">ButtonPreset1,</text:span></text:p>
            <text:p><text:span text:style-name="T11">ButtonPreset2,</text:span></text:p>
            <text:p><text:span text:style-name="T11">ButtonPreset3,</text:span></text:p>
            <text:p><text:span text:style-name="T27">/playSound(</text:span><text:span text:style-name="T11">SOUND_PRESETx)</text:span></text:p>
            <text:p><text:span text:style-name="T11">/setLed(LED_PLAY)</text:span></text:p>
            <text:p><text:span text:style-name="T11">/startMpdPlayback()</text:span></text:p>
          </draw:text-box>
        </draw:frame>
        <draw:frame draw:style-name="gr74" draw:text-style-name="P14" draw:layer="layout" svg:width="4.445cm" svg:height="1.27cm" svg:x="4.71cm" svg:y="18.68cm">
          <draw:text-box>
            <text:p><text:span text:style-name="T11">/playSound(</text:span><text:span text:style-name="T28">SOUND_SPOTIFY</text:span><text:span text:style-name="T11">)</text:span></text:p>
            <text:p><text:span text:style-name="T11">/setLed(LED_PLAY)</text:span></text:p>
            <text:p><text:span text:style-name="T11">/startSpotifyPlayback()</text:span></text:p>
          </draw:text-box>
        </draw:frame>
        <draw:frame draw:style-name="gr86" draw:text-style-name="P14" draw:layer="layout" svg:width="3.81cm" svg:height="1.535cm" svg:x="8.22cm" svg:y="19.567cm">
          <draw:text-box>
            <text:p><text:span text:style-name="T11">/playSound(</text:span><text:span text:style-name="T28">SOUND_PLAY</text:span><text:span text:style-name="T11">)</text:span></text:p>
            <text:p><text:span text:style-name="T11">/setLed(LED_PLAY)</text:span></text:p>
            <text:p><text:span text:style-name="T11">/startMpdPlayback()</text:span></text:p>
          </draw:text-box>
        </draw:frame>
        <draw:frame draw:style-name="gr29" draw:text-style-name="P14" draw:layer="layout" svg:width="2.54cm" svg:height="0.887cm" svg:x="1.635cm" svg:y="20.367cm">
          <draw:text-box>
            <text:p><text:span text:style-name="T11">ButtonStop</text:span></text:p>
            <text:p><text:span text:style-name="T11">/gotoStandby()</text:span></text:p>
          </draw:text-box>
        </draw:frame>
        <draw:frame draw:style-name="gr87" draw:text-style-name="P40" draw:layer="layout" svg:width="4.445cm" svg:height="1.587cm" svg:x="14.652cm" svg:y="19.098cm">
          <draw:text-box>
            <text:p><text:span text:style-name="T26">VolumeChanged</text:span></text:p>
            <text:p><text:span text:style-name="T26">/playSound(SOUND_PLAY)</text:span></text:p>
            <text:p><text:span text:style-name="T26">/setLed(LED_PLAY</text:span></text:p>
            <text:p><text:span text:style-name="T26">/startMpdPlayback()</text:span></text:p>
          </draw:text-box>
        </draw:frame>
        <draw:frame draw:style-name="gr56" draw:text-style-name="P14" draw:layer="layout" svg:width="2.54cm" svg:height="0.953cm" svg:x="12.43cm" svg:y="17.509cm">
          <draw:text-box>
            <text:p><text:span text:style-name="T11">ButtonStop</text:span></text:p>
            <text:p><text:span text:style-name="T11">/gotoStandby()</text:span></text:p>
          </draw:text-box>
        </draw:frame>
        <draw:frame draw:style-name="gr54" draw:text-style-name="P18" draw:layer="layout" svg:width="1.822cm" svg:height="0.952cm" svg:x="18.745cm" svg:y="23.86cm">
          <draw:text-box>
            <text:p><text:span text:style-name="T16">Error</text:span></text:p>
          </draw:text-box>
        </draw:frame>
        <draw:g draw:style-name="gr1" xml:id="id46" draw:id="id46">
          <draw:custom-shape draw:style-name="gr68" draw:text-style-name="P30" draw:layer="layout" svg:width="0.717cm" svg:height="0.718cm" svg:x="18.415cm" svg:y="12.1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8.494cm" svg:y1="12.198cm" svg:x2="19.055cm" svg:y2="12.76cm">
              <text:p/>
            </draw:line>
            <draw:line draw:style-name="gr57" draw:text-style-name="P2" draw:layer="layout" svg:x1="19.049cm" svg:y1="12.178cm" svg:x2="18.465cm" svg:y2="12.761cm">
              <text:p/>
            </draw:line>
          </draw:g>
        </draw:g>
        <draw:g draw:style-name="gr1" xml:id="id47" draw:id="id47">
          <draw:custom-shape draw:style-name="gr68" draw:text-style-name="P30" draw:layer="layout" svg:width="0.717cm" svg:height="0.718cm" svg:x="19.214cm" svg:y="24.5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9.293cm" svg:y1="24.599cm" svg:x2="19.854cm" svg:y2="25.161cm">
              <text:p/>
            </draw:line>
            <draw:line draw:style-name="gr57" draw:text-style-name="P2" draw:layer="layout" svg:x1="19.848cm" svg:y1="24.579cm" svg:x2="19.264cm" svg:y2="25.162cm">
              <text:p/>
            </draw:line>
          </draw:g>
        </draw:g>
        <draw:frame draw:style-name="gr88" draw:text-style-name="P14" draw:layer="layout" svg:width="3.357cm" svg:height="1.317cm" svg:x="12.883cm" svg:y="10.36cm">
          <draw:text-box>
            <text:p><text:span text:style-name="T11">timeOut, </text:span></text:p>
            <text:p><text:span text:style-name="T11">criticalError,</text:span></text:p>
            <text:p><text:span text:style-name="T11">/goto_error()</text:span></text:p>
          </draw:text-box>
        </draw:frame>
        <draw:frame draw:style-name="gr29" draw:text-style-name="P14" draw:layer="layout" svg:width="2.222cm" svg:height="0.887cm" svg:x="16.24cm" svg:y="5.833cm">
          <draw:text-box>
            <text:p><text:span text:style-name="T11">criticalError</text:span></text:p>
            <text:p><text:span text:style-name="T11">/goto_error()</text:span></text:p>
          </draw:text-box>
        </draw:frame>
        <draw:frame draw:style-name="gr29" draw:text-style-name="P14" draw:layer="layout" svg:width="3.175cm" svg:height="0.887cm" svg:x="15.287cm" svg:y="13.765cm">
          <draw:text-box>
            <text:p><text:span text:style-name="T11">criticalError</text:span></text:p>
            <text:p><text:span text:style-name="T11">/goto_error()</text:span></text:p>
          </draw:text-box>
        </draw:frame>
        <draw:frame draw:style-name="gr29" draw:text-style-name="P14" draw:layer="layout" svg:width="2.54cm" svg:height="0.887cm" svg:x="16.105cm" svg:y="23.595cm">
          <draw:text-box>
            <text:p><text:span text:style-name="T11">criticalError</text:span></text:p>
            <text:p><text:span text:style-name="T11">/goto_error()</text:span></text:p>
          </draw:text-box>
        </draw:frame>
        <draw:frame draw:style-name="gr56" draw:text-style-name="P14" draw:layer="layout" svg:width="2.54cm" svg:height="0.953cm" svg:x="4.075cm" svg:y="27.987cm">
          <draw:text-box>
            <text:p><text:span text:style-name="T11">criticalError</text:span></text:p>
            <text:p><text:span text:style-name="T11">/goto_error()</text:span></text:p>
          </draw:text-box>
        </draw:frame>
        <draw:connector draw:style-name="gr89" draw:text-style-name="P2" draw:layer="layout" draw:type="curve" draw:line-skew="-0.15cm" svg:x1="2.587cm" svg:y1="24.531cm" svg:x2="2.587cm" svg:y2="25.799cm" draw:start-shape="id43" draw:start-glue-point="11" draw:end-shape="id43" draw:end-glue-point="12" svg:d="M2587 24531c-976 0-976 1268 0 1268" svg:viewBox="0 0 733 1269">
          <text:p/>
        </draw:connector>
        <draw:frame draw:style-name="gr54" draw:text-style-name="P14" draw:layer="layout" svg:width="2.541cm" svg:height="0.952cm" svg:x="0.681cm" svg:y="25.765cm">
          <draw:text-box>
            <text:p><text:span text:style-name="T11">ButtonPlay</text:span></text:p>
            <text:p><text:span text:style-name="T11">/playSound()</text:span></text:p>
          </draw:text-box>
        </draw:frame>
        <draw:connector draw:style-name="gr59" draw:text-style-name="P2" draw:layer="layout" draw:line-skew="-0.554cm" svg:x1="9.255cm" svg:y1="24.531cm" svg:x2="10.681cm" svg:y2="22.326cm" draw:start-shape="id43" draw:start-glue-point="13" draw:end-shape="id41" draw:end-glue-point="16" svg:d="M9255 24531h159v-2205h1267" svg:viewBox="0 0 1427 2206">
          <text:p/>
        </draw:connector>
        <draw:frame draw:style-name="gr90" draw:text-style-name="P14" draw:layer="layout" svg:width="4.645cm" svg:height="2.222cm" svg:x="5.845cm" svg:y="20.82cm">
          <draw:text-box>
            <text:p><text:span text:style-name="T11">ButtonPreset1,</text:span></text:p>
            <text:p><text:span text:style-name="T11">ButtonPreset2,</text:span></text:p>
            <text:p><text:span text:style-name="T11">ButtonPreset3,</text:span></text:p>
            <text:p><text:span text:style-name="T11">/playSound(SOUND_PRESETx)</text:span></text:p>
            <text:p><text:span text:style-name="T11">/setLed(LED_PRESETx)</text:span></text:p>
            <text:p><text:span text:style-name="T11">/startMpdPlayback()</text:span></text:p>
          </draw:text-box>
        </draw:frame>
        <draw:connector draw:style-name="gr59" draw:text-style-name="P2" draw:layer="layout" svg:x1="10.64cm" svg:y1="27.17cm" svg:x2="5.921cm" svg:y2="26.5cm" draw:start-shape="id48" draw:start-glue-point="5" draw:end-shape="id43" draw:end-glue-point="2" svg:d="M10640 27170h-4719v-670" svg:viewBox="0 0 4720 671">
          <text:p/>
        </draw:connector>
        <draw:frame draw:style-name="gr91" draw:text-style-name="P14" draw:layer="layout" svg:width="4.763cm" svg:height="0.635cm" svg:x="5.444cm" svg:y="27.135cm">
          <draw:text-box>
            <text:p><text:span text:style-name="T11">/startSpotifyPlayback()</text:span></text:p>
          </draw:text-box>
        </draw:frame>
        <draw:connector draw:style-name="gr89" draw:text-style-name="P2" draw:layer="layout" draw:type="curve" svg:x1="15.74cm" svg:y1="22.992cm" svg:x2="15.74cm" svg:y2="22.261cm" draw:start-shape="id41" draw:start-glue-point="1" draw:end-shape="id41" draw:end-glue-point="12" svg:d="M15740 22992c751 0 751-731 0-731" svg:viewBox="0 0 564 732">
          <text:p/>
        </draw:connector>
        <draw:frame draw:style-name="gr92" draw:text-style-name="P14" draw:layer="layout" svg:width="4.232cm" svg:height="1.841cm" svg:x="16.105cm" svg:y="21.472cm">
          <draw:text-box>
            <text:p><text:span text:style-name="T11">ButtonPreset1,</text:span></text:p>
            <text:p><text:span text:style-name="T11">ButtonPreset2,</text:span></text:p>
            <text:p><text:span text:style-name="T11">ButtonPreset3,</text:span></text:p>
            <text:p><text:span text:style-name="T11">/playSound(SOUND_NEXT)</text:span></text:p>
            <text:p><text:span text:style-name="T11">/nextSong()</text:span></text:p>
          </draw:text-box>
        </draw:frame>
        <draw:custom-shape draw:style-name="gr13" draw:text-style-name="P2" xml:id="id48" draw:id="id48" draw:layer="layout" svg:width="0.6cm" svg:height="0.6cm" svg:x="10.64cm" svg:y="26.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9" draw:text-style-name="P2" draw:layer="layout" svg:x1="10.703cm" svg:y1="23.649cm" svg:x2="10.94cm" svg:y2="26.87cm" draw:start-shape="id41" draw:start-glue-point="9" draw:end-shape="id48" draw:end-glue-point="4" svg:d="M10703 23649h-523v1905h760v1316" svg:viewBox="0 0 761 3222">
          <text:p/>
        </draw:connector>
        <draw:connector draw:style-name="gr59" draw:text-style-name="P2" draw:layer="layout" draw:line-skew="-0.946cm" svg:x1="11.24cm" svg:y1="27.17cm" svg:x2="14.241cm" svg:y2="27.97cm" draw:start-shape="id48" draw:start-glue-point="7" draw:end-shape="id49" draw:end-glue-point="5" svg:d="M11240 27170h555v800h2446" svg:viewBox="0 0 3002 801">
          <text:p/>
        </draw:connector>
        <draw:frame draw:style-name="gr93" draw:text-style-name="P41" draw:layer="layout" svg:width="4.127cm" svg:height="0.888cm" svg:x="15.505cm" svg:y="26.564cm">
          <draw:text-box>
            <text:p><text:span text:style-name="T29">/playSound(</text:span><text:span text:style-name="T30">SOUND_NEXT</text:span><text:span text:style-name="T31">)</text:span></text:p>
            <text:p text:style-name="P37"><text:span text:style-name="T31">/nextSong()</text:span></text:p>
          </draw:text-box>
        </draw:frame>
        <draw:custom-shape draw:style-name="gr13" draw:text-style-name="P2" xml:id="id42" draw:id="id42" draw:layer="layout" svg:width="0.6cm" svg:height="0.6cm" svg:x="8.341cm" svg:y="17.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9" draw:text-style-name="P2" draw:layer="layout" svg:x1="7.827cm" svg:y1="16.365cm" svg:x2="8.641cm" svg:y2="17.97cm" draw:start-shape="id40" draw:start-glue-point="12" draw:end-shape="id42" draw:end-glue-point="4" svg:d="M7827 16365v790h814v815" svg:viewBox="0 0 815 1606">
          <text:p/>
        </draw:connector>
        <draw:frame draw:style-name="gr73" draw:text-style-name="P14" draw:layer="layout" svg:width="2.251cm" svg:height="0.645cm" svg:x="5.734cm" svg:y="16.566cm">
          <draw:text-box>
            <text:p><text:span text:style-name="T11">ButtonPlay</text:span></text:p>
          </draw:text-box>
        </draw:frame>
        <draw:frame draw:style-name="gr73" draw:text-style-name="P32" draw:layer="layout" svg:width="3.81cm" svg:height="0.645cm" svg:x="5.092cm" svg:y="17.71cm">
          <draw:text-box>
            <text:p><text:span text:style-name="T14">[</text:span><text:span text:style-name="T22">isSpotifyConnected</text:span><text:span text:style-name="T14">]</text:span></text:p>
          </draw:text-box>
        </draw:frame>
        <draw:frame draw:style-name="gr73" draw:text-style-name="P14" draw:layer="layout" svg:width="1.588cm" svg:height="0.645cm" svg:x="8.937cm" svg:y="17.71cm">
          <draw:text-box>
            <text:p><text:span text:style-name="T11">[else]</text:span></text:p>
          </draw:text-box>
        </draw:frame>
        <draw:connector draw:style-name="gr59" draw:text-style-name="P2" draw:layer="layout" draw:line-skew="0.451cm -0.397cm" svg:x1="14.335cm" svg:y1="15.746cm" svg:x2="14.773cm" svg:y2="21.722cm" draw:start-shape="id40" draw:start-glue-point="8" draw:end-shape="id41" draw:end-glue-point="7" svg:d="M14335 15746h952v2901h-514v3075" svg:viewBox="0 0 953 5977">
          <text:p/>
        </draw:connector>
        <draw:frame draw:style-name="gr73" draw:text-style-name="P14" draw:layer="layout" svg:width="2.222cm" svg:height="0.645cm" svg:x="9.255cm" svg:y="25.437cm">
          <draw:text-box>
            <text:p><text:span text:style-name="T11">ButtonPlay</text:span></text:p>
          </draw:text-box>
        </draw:frame>
        <draw:frame draw:style-name="gr91" draw:text-style-name="P40" draw:layer="layout" svg:width="3.175cm" svg:height="0.635cm" svg:x="7.785cm" svg:y="26.617cm">
          <draw:text-box>
            <text:p><text:span text:style-name="T26">[isSpotifyConnected]</text:span></text:p>
          </draw:text-box>
        </draw:frame>
        <draw:frame draw:style-name="gr73" draw:text-style-name="P14" draw:layer="layout" svg:width="1.271cm" svg:height="0.645cm" svg:x="10.999cm" svg:y="26.7cm">
          <draw:text-box>
            <text:p><text:span text:style-name="T11">[else]</text:span></text:p>
          </draw:text-box>
        </draw:frame>
        <draw:custom-shape draw:style-name="gr13" draw:text-style-name="P2" xml:id="id49" draw:id="id49" draw:layer="layout" svg:width="0.6cm" svg:height="0.6cm" svg:x="14.241cm" svg:y="27.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9" draw:text-style-name="P2" draw:layer="layout" svg:x1="14.541cm" svg:y1="27.67cm" svg:x2="11.478cm" svg:y2="24.229cm" draw:start-shape="id49" draw:start-glue-point="4" draw:end-shape="id41" draw:end-glue-point="17" svg:d="M14541 27670v-1716h-3063v-1725" svg:viewBox="0 0 3064 3442">
          <text:p/>
        </draw:connector>
        <draw:connector draw:style-name="gr59" draw:text-style-name="P2" draw:layer="layout" draw:line-skew="0.238cm" svg:x1="14.841cm" svg:y1="27.97cm" svg:x2="15.315cm" svg:y2="24.229cm" draw:start-shape="id49" draw:start-glue-point="7" draw:end-shape="id41" draw:end-glue-point="15" svg:d="M14841 27970h764v-2016h-290v-1725" svg:viewBox="0 0 765 3742">
          <text:p/>
        </draw:connector>
        <draw:frame draw:style-name="gr91" draw:text-style-name="P14" draw:layer="layout" svg:width="1.905cm" svg:height="0.635cm" svg:x="12.347cm" svg:y="27.987cm">
          <draw:text-box>
            <text:p><text:span text:style-name="T11">[isPlayOn]</text:span></text:p>
          </draw:text-box>
        </draw:frame>
        <draw:frame draw:style-name="gr56" draw:text-style-name="P41" draw:layer="layout" svg:width="4.127cm" svg:height="0.953cm" svg:x="11.395cm" svg:y="25.047cm">
          <draw:text-box>
            <text:p><text:span text:style-name="T29">/playSound(</text:span><text:span text:style-name="T30">SOUND_PLAY</text:span><text:span text:style-name="T31">)</text:span></text:p>
            <text:p text:style-name="P37"><text:span text:style-name="T31">/setLed(LED_PLAY)</text:span></text:p>
          </draw:text-box>
        </draw:frame>
        <draw:frame draw:style-name="gr73" draw:text-style-name="P14" draw:layer="layout" svg:width="1.27cm" svg:height="0.645cm" svg:x="13.565cm" svg:y="27.125cm">
          <draw:text-box>
            <text:p><text:span text:style-name="T11">[else]</text:span></text:p>
          </draw:text-box>
        </draw:frame>
        <draw:frame draw:style-name="gr35" draw:text-style-name="P42" draw:layer="layout" svg:width="15.24cm" svg:height="1.905cm" svg:x="2.905cm" svg:y="30.21cm">
          <draw:text-box>
            <text:p>Volume 4 sec not active when OFF pressed</text:p>
          </draw:text-box>
        </draw:frame>
      </draw:page>
      <draw:page draw:name="page5" draw:style-name="dp1" draw:master-page-name="Default">
        <draw:connector draw:style-name="gr94" draw:text-style-name="P2" draw:layer="layout" svg:x1="8.067cm" svg:y1="11.833cm" svg:x2="14.017cm" svg:y2="5.923cm" draw:start-shape="id50" draw:start-glue-point="1" draw:end-shape="id51" draw:end-glue-point="6" svg:d="M8067 11833h2987v-5910h2963" svg:viewBox="0 0 5951 5911">
          <text:p/>
        </draw:connector>
        <draw:g draw:style-name="gr4">
          <draw:frame draw:style-name="gr23" draw:text-style-name="P24" draw:layer="layout" svg:width="7.555cm" svg:height="1.694cm" svg:x="1.001cm" svg:y="1.093cm">
            <draw:text-box>
              <text:p text:style-name="P10"><text:span text:style-name="T19">OradioControl</text:span></text:p>
            </draw:text-box>
          </draw:frame>
          <draw:rect draw:style-name="gr24" draw:text-style-name="P2" draw:layer="layout" svg:width="7.555cm" svg:height="26.987cm" svg:x="1.065cm" svg:y="1.001cm" draw:corner-radius="0.5cm">
            <draw:glue-point draw:id="4" svg:x="-3.688cm" svg:y="-5.004cm"/>
            <text:p/>
          </draw:rect>
          <draw:line draw:style-name="gr10" draw:text-style-name="P2" draw:layer="layout" svg:x1="1.067cm" svg:y1="1.982cm" svg:x2="8.617cm" svg:y2="1.972cm">
            <text:p/>
          </draw:line>
        </draw:g>
        <draw:custom-shape draw:style-name="gr44" draw:text-style-name="P1" xml:id="id51" draw:id="id51" draw:layer="layout" svg:width="0.635cm" svg:height="0.635cm" svg:x="14.017cm" svg:y="5.605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g draw:style-name="gr1">
            <draw:custom-shape draw:style-name="gr95" draw:text-style-name="P2" draw:layer="layout" svg:width="6.092cm" svg:height="2.297cm" svg:x="13.323cm" svg:y="4.57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2" draw:layer="layout" svg:x1="16.151cm" svg:y1="4.576cm" svg:x2="16.151cm" svg:y2="4.846cm">
              <text:p/>
            </draw:line>
            <draw:line draw:style-name="gr10" draw:text-style-name="P2" draw:layer="layout" svg:x1="13.302cm" svg:y1="5.152cm" svg:x2="15.835cm" svg:y2="5.154cm">
              <text:p/>
            </draw:line>
            <draw:line draw:style-name="gr10" draw:text-style-name="P2" draw:layer="layout" svg:x1="16.149cm" svg:y1="4.846cm" svg:x2="15.835cm" svg:y2="5.155cm">
              <text:p/>
            </draw:line>
          </draw:g>
          <draw:frame draw:style-name="gr96" draw:text-style-name="P43" draw:layer="layout" svg:width="2.858cm" svg:height="1.026cm" svg:x="13.314cm" svg:y="4.582cm">
            <draw:text-box>
              <text:p text:style-name="P4"><text:span text:style-name="T32">VolumeControl</text:span></text:p>
            </draw:text-box>
          </draw:frame>
        </draw:g>
        <draw:g draw:style-name="gr1" xml:id="id50" draw:id="id50">
          <draw:custom-shape draw:style-name="gr68" draw:text-style-name="P30" draw:layer="layout" svg:width="0.717cm" svg:height="0.718cm" svg:x="7.35cm" svg:y="11.4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7.429cm" svg:y1="11.56cm" svg:x2="7.99cm" svg:y2="12.122cm">
              <text:p/>
            </draw:line>
            <draw:line draw:style-name="gr57" draw:text-style-name="P2" draw:layer="layout" svg:x1="7.984cm" svg:y1="11.54cm" svg:x2="7.4cm" svg:y2="12.123cm">
              <text:p/>
            </draw:line>
          </draw:g>
        </draw:g>
        <draw:custom-shape draw:style-name="gr44" draw:text-style-name="P1" xml:id="id52" draw:id="id52" draw:layer="layout" svg:width="0.635cm" svg:height="0.635cm" svg:x="14.018cm" svg:y="8.205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g draw:style-name="gr1">
            <draw:custom-shape draw:style-name="gr95" draw:text-style-name="P2" draw:layer="layout" svg:width="6.092cm" svg:height="2.297cm" svg:x="13.324cm" svg:y="7.17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2" draw:layer="layout" svg:x1="16.152cm" svg:y1="7.176cm" svg:x2="16.152cm" svg:y2="7.446cm">
              <text:p/>
            </draw:line>
            <draw:line draw:style-name="gr10" draw:text-style-name="P2" draw:layer="layout" svg:x1="13.303cm" svg:y1="7.752cm" svg:x2="15.836cm" svg:y2="7.754cm">
              <text:p/>
            </draw:line>
            <draw:line draw:style-name="gr10" draw:text-style-name="P2" draw:layer="layout" svg:x1="16.15cm" svg:y1="7.446cm" svg:x2="15.836cm" svg:y2="7.755cm">
              <text:p/>
            </draw:line>
          </draw:g>
          <draw:frame draw:style-name="gr96" draw:text-style-name="P43" draw:layer="layout" svg:width="2.858cm" svg:height="1.026cm" svg:x="13.315cm" svg:y="7.182cm">
            <draw:text-box>
              <text:p text:style-name="P4"><text:span text:style-name="T32">UsbService</text:span></text:p>
            </draw:text-box>
          </draw:frame>
        </draw:g>
        <draw:connector draw:style-name="gr94" draw:text-style-name="P2" draw:layer="layout" svg:x1="8.067cm" svg:y1="11.833cm" svg:x2="14.018cm" svg:y2="8.522cm" draw:start-shape="id50" draw:end-shape="id52" draw:end-glue-point="3" svg:d="M8067 11833h2987v-3311h2964" svg:viewBox="0 0 5952 3312">
          <text:p/>
        </draw:connector>
        <draw:custom-shape draw:style-name="gr44" draw:text-style-name="P1" xml:id="id53" draw:id="id53" draw:layer="layout" svg:width="0.635cm" svg:height="0.635cm" svg:x="13.999cm" svg:y="10.785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95" draw:text-style-name="P2" draw:layer="layout" svg:width="6.092cm" svg:height="2.297cm" svg:x="13.305cm" svg:y="9.75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33cm" svg:y1="9.756cm" svg:x2="16.133cm" svg:y2="10.026cm">
            <text:p/>
          </draw:line>
          <draw:line draw:style-name="gr10" draw:text-style-name="P2" draw:layer="layout" svg:x1="13.284cm" svg:y1="10.332cm" svg:x2="15.817cm" svg:y2="10.334cm">
            <text:p/>
          </draw:line>
          <draw:line draw:style-name="gr10" draw:text-style-name="P2" draw:layer="layout" svg:x1="16.131cm" svg:y1="10.026cm" svg:x2="15.817cm" svg:y2="10.335cm">
            <text:p/>
          </draw:line>
        </draw:g>
        <draw:frame draw:style-name="gr96" draw:text-style-name="P43" draw:layer="layout" svg:width="3.261cm" svg:height="1.026cm" svg:x="13.296cm" svg:y="9.762cm">
          <draw:text-box>
            <text:p text:style-name="P4"><text:span text:style-name="T32">SpotifyConnect</text:span></text:p>
          </draw:text-box>
        </draw:frame>
        <draw:connector draw:style-name="gr94" draw:text-style-name="P2" draw:layer="layout" svg:x1="8.067cm" svg:y1="11.833cm" svg:x2="13.999cm" svg:y2="11.103cm" draw:start-shape="id50" draw:end-shape="id53" draw:end-glue-point="6" svg:d="M8067 11833h2978v-730h2954" svg:viewBox="0 0 5933 731">
          <text:p/>
        </draw:connector>
        <draw:custom-shape draw:style-name="gr44" draw:text-style-name="P1" xml:id="id54" draw:id="id54" draw:layer="layout" svg:width="0.635cm" svg:height="0.635cm" svg:x="14.017cm" svg:y="13.301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95" draw:text-style-name="P2" draw:layer="layout" svg:width="6.092cm" svg:height="2.297cm" svg:x="13.323cm" svg:y="12.274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1cm" svg:y1="12.272cm" svg:x2="16.151cm" svg:y2="12.542cm">
            <text:p/>
          </draw:line>
          <draw:line draw:style-name="gr10" draw:text-style-name="P2" draw:layer="layout" svg:x1="13.302cm" svg:y1="12.848cm" svg:x2="15.835cm" svg:y2="12.85cm">
            <text:p/>
          </draw:line>
          <draw:line draw:style-name="gr10" draw:text-style-name="P2" draw:layer="layout" svg:x1="16.149cm" svg:y1="12.542cm" svg:x2="15.835cm" svg:y2="12.851cm">
            <text:p/>
          </draw:line>
        </draw:g>
        <draw:frame draw:style-name="gr96" draw:text-style-name="P43" draw:layer="layout" svg:width="3.261cm" svg:height="1.026cm" svg:x="13.314cm" svg:y="12.278cm">
          <draw:text-box>
            <text:p text:style-name="P4"><text:span text:style-name="T32">WifiService</text:span></text:p>
          </draw:text-box>
        </draw:frame>
        <draw:connector draw:style-name="gr94" draw:text-style-name="P2" draw:layer="layout" svg:x1="8.067cm" svg:y1="11.833cm" svg:x2="14.017cm" svg:y2="13.619cm" draw:start-shape="id50" draw:start-glue-point="1" draw:end-shape="id54" draw:end-glue-point="6" svg:d="M8067 11833h2987v1786h2963" svg:viewBox="0 0 5951 1787">
          <text:p/>
        </draw:connector>
        <draw:custom-shape draw:style-name="gr44" draw:text-style-name="P1" xml:id="id55" draw:id="id55" draw:layer="layout" svg:width="0.635cm" svg:height="0.635cm" svg:x="14.017cm" svg:y="15.841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95" draw:text-style-name="P2" draw:layer="layout" svg:width="6.092cm" svg:height="2.297cm" svg:x="13.323cm" svg:y="14.814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1cm" svg:y1="14.812cm" svg:x2="16.151cm" svg:y2="15.082cm">
            <text:p/>
          </draw:line>
          <draw:line draw:style-name="gr10" draw:text-style-name="P2" draw:layer="layout" svg:x1="13.302cm" svg:y1="15.388cm" svg:x2="15.835cm" svg:y2="15.39cm">
            <text:p/>
          </draw:line>
          <draw:line draw:style-name="gr10" draw:text-style-name="P2" draw:layer="layout" svg:x1="16.149cm" svg:y1="15.082cm" svg:x2="15.835cm" svg:y2="15.391cm">
            <text:p/>
          </draw:line>
        </draw:g>
        <draw:frame draw:style-name="gr96" draw:text-style-name="P43" draw:layer="layout" svg:width="3.261cm" svg:height="1.026cm" svg:x="13.314cm" svg:y="14.818cm">
          <draw:text-box>
            <text:p text:style-name="P4"><text:span text:style-name="T32">PowerControl</text:span></text:p>
          </draw:text-box>
        </draw:frame>
        <draw:connector draw:style-name="gr94" draw:text-style-name="P2" draw:layer="layout" svg:x1="8.067cm" svg:y1="11.833cm" svg:x2="14.017cm" svg:y2="16.159cm" draw:start-shape="id50" draw:end-shape="id55" draw:end-glue-point="6" svg:d="M8067 11833h2987v4326h2963" svg:viewBox="0 0 5951 4327">
          <text:p/>
        </draw:connector>
        <draw:custom-shape draw:style-name="gr44" draw:text-style-name="P1" xml:id="id56" draw:id="id56" draw:layer="layout" svg:width="0.635cm" svg:height="0.635cm" svg:x="14.017cm" svg:y="18.622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95" draw:text-style-name="P2" draw:layer="layout" svg:width="6.092cm" svg:height="2.297cm" svg:x="13.323cm" svg:y="17.5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1cm" svg:y1="17.593cm" svg:x2="16.151cm" svg:y2="17.863cm">
            <text:p/>
          </draw:line>
          <draw:line draw:style-name="gr10" draw:text-style-name="P2" draw:layer="layout" svg:x1="13.302cm" svg:y1="18.169cm" svg:x2="15.835cm" svg:y2="18.171cm">
            <text:p/>
          </draw:line>
          <draw:line draw:style-name="gr10" draw:text-style-name="P2" draw:layer="layout" svg:x1="16.149cm" svg:y1="17.863cm" svg:x2="15.835cm" svg:y2="18.172cm">
            <text:p/>
          </draw:line>
        </draw:g>
        <draw:frame draw:style-name="gr96" draw:text-style-name="P43" draw:layer="layout" svg:width="3.261cm" svg:height="1.026cm" svg:x="13.314cm" svg:y="17.599cm">
          <draw:text-box>
            <text:p text:style-name="P4"><text:span text:style-name="T32">Errorhandler</text:span></text:p>
          </draw:text-box>
        </draw:frame>
        <draw:connector draw:style-name="gr94" draw:text-style-name="P2" draw:layer="layout" svg:x1="8.067cm" svg:y1="11.833cm" svg:x2="14.017cm" svg:y2="18.94cm" draw:start-shape="id50" draw:end-shape="id56" draw:end-glue-point="6" svg:d="M8067 11833h2987v7107h2963" svg:viewBox="0 0 5951 7108">
          <text:p/>
        </draw:connector>
        <draw:custom-shape draw:style-name="gr44" draw:text-style-name="P1" xml:id="id57" draw:id="id57" draw:layer="layout" svg:width="0.635cm" svg:height="0.635cm" svg:x="14.018cm" svg:y="21.422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95" draw:text-style-name="P2" draw:layer="layout" svg:width="6.092cm" svg:height="2.297cm" svg:x="13.324cm" svg:y="20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2cm" svg:y1="20.393cm" svg:x2="16.152cm" svg:y2="20.663cm">
            <text:p/>
          </draw:line>
          <draw:line draw:style-name="gr10" draw:text-style-name="P2" draw:layer="layout" svg:x1="13.303cm" svg:y1="20.969cm" svg:x2="15.836cm" svg:y2="20.971cm">
            <text:p/>
          </draw:line>
          <draw:line draw:style-name="gr10" draw:text-style-name="P2" draw:layer="layout" svg:x1="16.15cm" svg:y1="20.663cm" svg:x2="15.836cm" svg:y2="20.972cm">
            <text:p/>
          </draw:line>
        </draw:g>
        <draw:frame draw:style-name="gr96" draw:text-style-name="P43" draw:layer="layout" svg:width="3.261cm" svg:height="1.026cm" svg:x="13.315cm" svg:y="20.399cm">
          <draw:text-box>
            <text:p text:style-name="P4"><text:span text:style-name="T32">RemoteMonitoring</text:span></text:p>
          </draw:text-box>
        </draw:frame>
        <draw:connector draw:style-name="gr94" draw:text-style-name="P2" draw:layer="layout" svg:x1="8.067cm" svg:y1="11.833cm" svg:x2="14.018cm" svg:y2="21.74cm" draw:start-shape="id50" draw:start-glue-point="1" draw:end-shape="id57" draw:end-glue-point="6" svg:d="M8067 11833h2987v9907h2964" svg:viewBox="0 0 5952 990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3" draw:display-name="Arrowheads 3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16:23:47.322558208</meta:creation-date>
    <meta:generator>LibreOffice/24.2.7.2$Linux_X86_64 LibreOffice_project/420$Build-2</meta:generator>
    <dc:date>2026-04-24T18:03:13.213328847</dc:date>
    <meta:editing-duration>PT5H34M28S</meta:editing-duration>
    <meta:editing-cycles>48</meta:editing-cycles>
    <meta:print-date>2026-04-03T16:45:26.431431754</meta:print-date>
    <dc:creator>Henk</dc:creator>
    <meta:document-statistic meta:object-count="398"/>
  </office:meta>
</office:document-meta>
</file>