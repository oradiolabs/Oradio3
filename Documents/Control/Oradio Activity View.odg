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591cm" fo:min-width="3.606cm" fo:padding-top="0.151cm" fo:padding-bottom="0.151cm" fo:padding-left="0.276cm" fo:padding-right="0.276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78cm" fo:min-width="0.014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591cm" fo:min-width="3.258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053cm" svg:stroke-color="#000000" draw:marker-start-width="0.279cm" draw:marker-end="Arrowheads_20_3" draw:marker-end-width="0.379cm" draw:fill="none" draw:textarea-vertical-align="middle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3.925cm" fo:min-width="0.014cm" fo:padding-top="0.151cm" fo:padding-bottom="0.151cm" fo:padding-left="0.276cm" fo:padding-right="0.276cm" loext:decorative="false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591cm" fo:min-width="17.228cm" fo:padding-top="0.151cm" fo:padding-bottom="0.151cm" fo:padding-left="0.276cm" fo:padding-right="0.276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861cm" fo:min-width="7.37cm" fo:padding-top="0.151cm" fo:padding-bottom="0.151cm" fo:padding-left="0.276cm" fo:padding-right="0.276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1.442cm" fo:min-width="0.014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2.374cm" fo:min-width="0.014cm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1.134cm" fo:min-width="0.014cm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778cm" fo:min-width="0.014cm" fo:padding-top="0.151cm" fo:padding-bottom="0.151cm" fo:padding-left="0.276cm" fo:padding-right="0.276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43cm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484cm" fo:min-width="2.624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604cm" fo:min-width="3.513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1.687cm" fo:min-width="0.014cm" fo:padding-top="0.151cm" fo:padding-bottom="0.151cm" fo:padding-left="0.276cm" fo:padding-right="0.276cm" loext:decorative="false"/>
    </style:style>
    <style:style style:name="gr21" style:family="graphic" style:parent-style-name="objectwithoutfill">
      <style:graphic-properties svg:stroke-width="0.053cm" svg:stroke-color="#000000" draw:marker-start-width="0.279cm" draw:marker-end="Arrowheads_20_5" draw:marker-end-width="0.379cm" draw:fill="none" draw:textarea-vertical-align="middle" fo:padding-top="0.151cm" fo:padding-bottom="0.151cm" fo:padding-left="0.276cm" fo:padding-right="0.276cm" loext:decorative="false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591cm" fo:min-width="3.287cm" fo:padding-top="0.151cm" fo:padding-bottom="0.151cm" fo:padding-left="0.276cm" fo:padding-right="0.276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1.603cm" fo:min-width="0.014cm" fo:padding-top="0.151cm" fo:padding-bottom="0.151cm" fo:padding-left="0.276cm" fo:padding-right="0.276cm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.106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856cm" fo:min-width="0.014cm" fo:padding-top="0.151cm" fo:padding-bottom="0.151cm" fo:padding-left="0.276cm" fo:padding-right="0.276cm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28" style:family="graphic" style:parent-style-name="objectwithoutfill">
      <style:graphic-properties svg:stroke-width="0.053cm" svg:stroke-color="#000000" draw:marker-start="Circle" draw:marker-start-width="0.279cm" draw:marker-end="Arrowheads_20_5" draw:marker-end-width="0.379cm" draw:fill="none" draw:textarea-vertical-align="middle" fo:padding-top="0.151cm" fo:padding-bottom="0.151cm" fo:padding-left="0.276cm" fo:padding-right="0.276cm" loext:decorative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391cm" fo:min-width="2.987cm" fo:padding-top="0.151cm" fo:padding-bottom="0.151cm" fo:padding-left="0.276cm" fo:padding-right="0.276cm" style:writing-mode="lr-tb" loext:decorative="false"/>
      <style:paragraph-properties style:writing-mode="lr-tb"/>
    </style:style>
    <style:style style:name="gr31" style:family="graphic" style:parent-style-name="objectwithoutfill">
      <style:graphic-properties draw:stroke="dash" draw:stroke-dash="Dash_20__28_Rounded_29_" svg:stroke-width="0.053cm" svg:stroke-color="#000000" draw:marker-start-width="0.279cm" draw:marker-end-width="0.279cm" svg:stroke-linecap="round" draw:fill="none" draw:textarea-vertical-align="middle" fo:padding-top="0.151cm" fo:padding-bottom="0.151cm" fo:padding-left="0.276cm" fo:padding-right="0.276cm" loext:decorative="false"/>
    </style:style>
    <style:style style:name="gr32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656cm" fo:min-width="3.893cm" fo:padding-top="0.151cm" fo:padding-bottom="0.151cm" fo:padding-left="0.276cm" fo:padding-right="0.276cm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1.183cm" loext:decorative="false"/>
      <style:paragraph-properties style:writing-mode="lr-tb"/>
    </style:style>
    <style:style style:name="gr34" style:family="graphic">
      <style:graphic-properties style:writing-mode="lr-tb" loext:decorative="false"/>
    </style:style>
    <style:style style:name="gr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none" draw:fill-color="#ffffff" draw:textarea-horizontal-align="justify" draw:textarea-vertical-align="top" draw:auto-grow-height="false" fo:min-height="2.554cm" fo:min-width="12.922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none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2.503cm" fo:min-width="0.014cm" fo:padding-top="0.151cm" fo:padding-bottom="0.151cm" fo:padding-left="0.276cm" fo:padding-right="0.276cm" loext:decorative="false"/>
    </style:style>
    <style:style style:name="gr38" style:family="graphic" style:parent-style-name="objectwithoutfill">
      <style:graphic-properties draw:stroke="dash" draw:stroke-dash="Dash_20__28_Rounded_29_" svg:stroke-width="0.053cm" svg:stroke-color="#000000" draw:marker-start-width="0.279cm" draw:marker-end="Arrowheads_20_5" draw:marker-end-width="0.379cm" svg:stroke-linecap="round" draw:fill="none" draw:textarea-vertical-align="middle" fo:padding-top="0.151cm" fo:padding-bottom="0.151cm" fo:padding-left="0.276cm" fo:padding-right="0.276cm" loext:decorative="false"/>
    </style:style>
    <style:style style:name="gr39" style:family="graphic" style:parent-style-name="objectwithoutfill">
      <style:graphic-properties svg:stroke-width="0.053cm" svg:stroke-color="#000000" draw:marker-start-width="0.279cm" draw:marker-end="Arrowheads_20_6" draw:marker-end-width="0.379cm" draw:fill="none" draw:textarea-vertical-align="middle" fo:padding-top="0.151cm" fo:padding-bottom="0.151cm" fo:padding-left="0.276cm" fo:padding-right="0.276cm" loext:decorative="false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none" draw:fill-color="#ffffff" draw:textarea-horizontal-align="justify" draw:textarea-vertical-align="top" draw:auto-grow-height="false" fo:min-height="3.171cm" fo:min-width="11.71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none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none" draw:fill-color="#ffffff" draw:textarea-horizontal-align="justify" draw:textarea-vertical-align="top" draw:auto-grow-height="false" fo:min-height="1.996cm" fo:min-width="5.034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none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468cm" fo:min-width="0.014cm" fo:padding-top="0.151cm" fo:padding-bottom="0.151cm" fo:padding-left="0.276cm" fo:padding-right="0.276cm" loext:decorative="false"/>
    </style:style>
    <style:style style:name="gr45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1.768cm" fo:min-width="0.014cm" fo:padding-top="0.151cm" fo:padding-bottom="0.151cm" fo:padding-left="0.276cm" fo:padding-right="0.276cm" loext:decorative="false"/>
    </style:style>
    <style:style style:name="gr46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1.185cm" fo:min-width="0.014cm" fo:padding-top="0.151cm" fo:padding-bottom="0.151cm" fo:padding-left="0.276cm" fo:padding-right="0.276cm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49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5.706cm" fo:min-width="0.014cm" fo:padding-top="0.151cm" fo:padding-bottom="0.151cm" fo:padding-left="0.276cm" fo:padding-right="0.276cm" loext:decorative="false"/>
    </style:style>
    <style:style style:name="gr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484cm" fo:min-width="2.624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604cm" fo:min-width="4.214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none" draw:fill-color="#ffffff" draw:textarea-horizontal-align="justify" draw:textarea-vertical-align="top" draw:auto-grow-height="false" fo:min-height="2.554cm" fo:min-width="12.922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none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2.873cm" fo:min-width="0.014cm" fo:padding-top="0.151cm" fo:padding-bottom="0.151cm" fo:padding-left="0.276cm" fo:padding-right="0.276cm" loext:decorative="false"/>
    </style:style>
    <style:style style:name="gr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none" draw:fill-color="#ffffff" draw:textarea-horizontal-align="justify" draw:textarea-vertical-align="top" draw:auto-grow-height="false" fo:min-height="3.171cm" fo:min-width="11.71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none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none" draw:fill-color="#ffffff" draw:textarea-horizontal-align="justify" draw:textarea-vertical-align="top" draw:auto-grow-height="false" fo:min-height="1.996cm" fo:min-width="5.034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none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1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368cm" fo:min-width="3.893cm" fo:padding-top="0.151cm" fo:padding-bottom="0.151cm" fo:padding-left="0.276cm" fo:padding-right="0.276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loext:graphic-properties draw:fill="none"/>
      <style:paragraph-properties fo:text-align="center" style:writing-mode="lr-tb"/>
      <style:text-properties fo:font-size="14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0pt"/>
    </style:style>
    <style:style style:name="P8" style:family="paragraph">
      <loext:graphic-properties draw:fill="none"/>
      <style:paragraph-properties fo:text-align="center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text-properties fo:font-size="8pt"/>
    </style:style>
    <style:style style:name="P13" style:family="paragraph">
      <loext:graphic-properties draw:fill="none" draw:fill-color="#ffffff"/>
      <style:text-properties fo:font-size="8pt" style:font-size-asian="10pt" style:font-size-complex="10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style:text-properties fo:font-size="10pt" style:font-size-asian="10pt" style:font-size-complex="10pt"/>
    </style:style>
    <style:style style:name="T1" style:family="text">
      <style:text-properties fo:font-size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Queue_at_messaging" draw:style-name="dp1" draw:master-page-name="Default">
        <draw:connector draw:style-name="gr1" draw:text-style-name="P1" draw:layer="layout" draw:type="line" svg:x1="10.841cm" svg:y1="3.623cm" svg:x2="10.707cm" svg:y2="11.695cm" draw:start-shape="id1" draw:start-glue-point="5" draw:end-shape="id2" draw:end-glue-point="0" svg:d="M10841 3623l-134 8072" svg:viewBox="0 0 135 8073">
          <text:p/>
        </draw:connector>
        <draw:custom-shape draw:style-name="gr2" draw:text-style-name="P3" xml:id="id3" draw:id="id3" draw:layer="layout" svg:width="4.158cm" svg:height="0.893cm" svg:x="1.287cm" svg:y="1.367cm">
          <draw:glue-point draw:id="4" svg:x="-2.954cm" svg:y="5.117cm"/>
          <text:p text:style-name="P2"><text:span text:style-name="T1">Remote Servic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138cm" svg:y1="2.26cm" svg:x2="2.029cm" svg:y2="20.681cm" draw:start-shape="id3" draw:start-glue-point="4" svg:d="M2138 2260l-109 18421" svg:viewBox="0 0 110 18422">
          <text:p/>
        </draw:connector>
        <draw:custom-shape draw:style-name="gr3" draw:text-style-name="P4" xml:id="id16" draw:id="id16" draw:layer="layout" svg:width="0.566cm" svg:height="1.082cm" svg:x="10.449cm" svg:y="5.803cm">
          <draw:glue-point draw:id="4" svg:x="-5.433cm" svg:y="-3.946cm"/>
          <draw:glue-point draw:id="5" svg:x="-5.433cm" svg:y="2.929cm"/>
          <draw:glue-point draw:id="6" svg:x="5.417cm" svg:y="-3.087cm"/>
          <draw:glue-point draw:id="7" svg:x="5.477cm" svg:y="-1.375cm"/>
          <draw:glue-point draw:id="8" svg:x="5.477cm" svg:y="2.87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" draw:id="id1" draw:layer="layout" svg:width="3.81cm" svg:height="0.893cm" svg:x="7.785cm" svg:y="2.73cm">
          <draw:glue-point draw:id="4" svg:x="-3.039cm" svg:y="5.296cm"/>
          <draw:glue-point draw:id="5" svg:x="3.023cm" svg:y="5.296cm"/>
          <text:p text:style-name="P5"><text:span text:style-name="T2">PubSubManag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.365cm" svg:y1="5.501cm" svg:x2="6.397cm" svg:y2="5.542cm" draw:start-shape="id4" draw:start-glue-point="4" draw:end-shape="id5" draw:end-glue-point="4" svg:d="M2365 5501l4032 41" svg:viewBox="0 0 4033 42">
          <text:p/>
        </draw:connector>
        <draw:frame draw:style-name="gr6" draw:text-style-name="P7" draw:layer="layout" svg:width="4.186cm" svg:height="1.039cm" svg:x="2.47cm" svg:y="4.388cm">
          <draw:text-box>
            <text:p><text:span text:style-name="T3">s</text:span><text:span text:style-name="T3">u</text:span><text:span text:style-name="T3">b</text:span><text:span text:style-name="T3">s</text:span><text:span text:style-name="T3">c</text:span><text:span text:style-name="T3">r</text:span><text:span text:style-name="T3">i</text:span><text:span text:style-name="T3">b</text:span><text:span text:style-name="T3">e</text:span><text:span text:style-name="T3">_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s</text:span><text:span text:style-name="T3">(</text:span></text:p>
            <text:p><text:span text:style-name="T3">w</text:span><text:span text:style-name="T3">i</text:span><text:span text:style-name="T3">f</text:span><text:span text:style-name="T3">i</text:span><text:span text:style-name="T3">_</text:span><text:span text:style-name="T3">l</text:span><text:span text:style-name="T3">i</text:span><text:span text:style-name="T3">s</text:span><text:span text:style-name="T3">t</text:span><text:span text:style-name="T3">e</text:span><text:span text:style-name="T3">n</text:span><text:span text:style-name="T3">e</text:span><text:span text:style-name="T3">r</text:span><text:span text:style-name="T3">)</text:span></text:p>
          </draw:text-box>
        </draw:frame>
        <draw:custom-shape draw:style-name="gr7" draw:text-style-name="P4" xml:id="id2" draw:id="id2" draw:layer="layout" svg:width="0.566cm" svg:height="4.227cm" svg:x="10.424cm" svg:y="11.695cm">
          <draw:glue-point draw:id="4" svg:x="-5.433cm" svg:y="-3.946cm"/>
          <draw:glue-point draw:id="5" svg:x="-5.433cm" svg:y="2.929cm"/>
          <draw:glue-point draw:id="6" svg:x="5.007cm" svg:y="-3.573cm"/>
          <draw:glue-point draw:id="7" svg:x="3.233cm" svg:y="-4.439cm"/>
          <draw:glue-point draw:id="8" svg:x="5.477cm" svg:y="-4.439cm"/>
          <draw:glue-point draw:id="9" svg:x="-5.477cm" svg:y="-1.636cm"/>
          <draw:glue-point draw:id="10" svg:x="5.477cm" svg:y="-1.636cm"/>
          <draw:glue-point draw:id="11" svg:x="5.477cm" svg:y="0.777cm"/>
          <draw:glue-point draw:id="12" svg:x="5.477cm" svg:y="1.984cm"/>
          <draw:glue-point draw:id="13" svg:x="5.477cm" svg:y="3.498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23" draw:id="id23" draw:layer="layout" svg:width="17.78cm" svg:height="0.893cm" svg:x="6.062cm" svg:y="1.417cm">
          <draw:glue-point draw:id="4" svg:x="-2.749cm" svg:y="5.01cm"/>
          <draw:glue-point draw:id="5" svg:x="3cm" svg:y="5.01cm"/>
          <draw:glue-point draw:id="6" svg:x="-4.256cm" svg:y="5.296cm"/>
          <draw:glue-point draw:id="7" svg:x="-2.136cm" svg:y="5.296cm"/>
          <draw:glue-point draw:id="8" svg:x="-1.297cm" svg:y="5.296cm"/>
          <draw:glue-point draw:id="9" svg:x="-4.655cm" svg:y="5.296cm"/>
          <draw:glue-point draw:id="10" svg:x="4.831cm" svg:y="5.296cm"/>
          <text:p text:style-name="P2"><text:span text:style-name="T1">&lt;&lt;module&gt; Messaging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6.708cm" svg:y1="3.857cm" svg:x2="16.705cm" svg:y2="13.747cm" draw:start-shape="id6" draw:end-shape="id7" draw:end-glue-point="0" svg:d="M16708 3857l-3 9890" svg:viewBox="0 0 4 9891">
          <text:p/>
        </draw:connector>
        <draw:custom-shape draw:style-name="gr9" draw:text-style-name="P6" xml:id="id6" draw:id="id6" draw:layer="layout" svg:width="7.922cm" svg:height="1.163cm" svg:x="12.747cm" svg:y="2.694cm">
          <text:p text:style-name="P5"><text:span text:style-name="T2">_subscribers</text:span></text:p>
          <text:p text:style-name="P5"><text:span text:style-name="T2">dict[Topic,list[Queue]]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25" draw:id="id25" draw:layer="layout" svg:width="0.566cm" svg:height="1.744cm" svg:x="1.739cm" svg:y="18.462cm">
          <draw:glue-point draw:id="4" svg:x="5.417cm" svg:y="-2.50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4" draw:id="id4" draw:layer="layout" svg:width="0.566cm" svg:height="2.676cm" svg:x="1.799cm" svg:y="4.834cm">
          <draw:glue-point draw:id="4" svg:x="5.417cm" svg:y="-2.50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9" draw:id="id9" draw:layer="layout" svg:width="0.566cm" svg:height="1.436cm" svg:x="16.414cm" svg:y="4.561cm">
          <draw:glue-point draw:id="4" svg:x="-5.433cm" svg:y="-3.946cm"/>
          <draw:glue-point draw:id="5" svg:x="-5.433cm" svg:y="2.929cm"/>
          <draw:glue-point draw:id="6" svg:x="5.007cm" svg:y="-3.573cm"/>
          <draw:glue-point draw:id="7" svg:x="5.417cm" svg:y="2.94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xml:id="id8" draw:id="id8" draw:layer="layout" svg:width="0.566cm" svg:height="1.08cm" svg:x="10.506cm" svg:y="4.082cm">
          <draw:glue-point draw:id="4" svg:x="5.417cm" svg:y="-2.509cm"/>
          <draw:glue-point draw:id="5" svg:x="-4.992cm" svg:y="-3.887cm"/>
          <draw:glue-point draw:id="6" svg:x="4.611cm" svg:y="1.138cm"/>
          <draw:glue-point draw:id="7" svg:x="5.477cm" svg:y="4.074cm"/>
          <draw:glue-point draw:id="8" svg:x="5.477cm" svg:y="1.138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1.957cm" svg:height="0.645cm" svg:x="8.568cm" svg:y="4.165cm">
          <draw:text-box>
            <text:p><text:span text:style-name="T3">i</text:span><text:span text:style-name="T3">n</text:span><text:span text:style-name="T3">i</text:span><text:span text:style-name="T3">t</text:span><text:span text:style-name="T3">(</text:span><text:span text:style-name="T3">)</text:span></text:p>
          </draw:text-box>
        </draw:frame>
        <draw:connector draw:style-name="gr5" draw:text-style-name="P8" draw:layer="layout" draw:type="line" svg:x1="11.072cm" svg:y1="4.744cm" svg:x2="16.414cm" svg:y2="4.713cm" draw:start-shape="id8" draw:start-glue-point="8" draw:end-shape="id9" draw:end-glue-point="4" svg:d="M11072 4744l5342-31" svg:viewBox="0 0 5343 32">
          <text:p/>
        </draw:connector>
        <draw:frame draw:style-name="gr15" draw:text-style-name="P7" draw:layer="layout" svg:width="4.527cm" svg:height="0.68cm" svg:x="11.795cm" svg:y="4.81cm">
          <draw:text-box>
            <text:p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 </text:span><text:span text:style-name="T3">e</text:span><text:span text:style-name="T3">m</text:span><text:span text:style-name="T3">p</text:span><text:span text:style-name="T3">t</text:span><text:span text:style-name="T3">y</text:span><text:span text:style-name="T3"> </text:span><text:span text:style-name="T3">d</text:span><text:span text:style-name="T3">i</text:span><text:span text:style-name="T3">c</text:span><text:span text:style-name="T3">t</text:span><text:span text:style-name="T3">i</text:span><text:span text:style-name="T3">o</text:span><text:span text:style-name="T3">n</text:span><text:span text:style-name="T3">a</text:span><text:span text:style-name="T3">r</text:span><text:span text:style-name="T3">y</text:span></text:p>
          </draw:text-box>
        </draw:frame>
        <draw:custom-shape draw:style-name="gr16" draw:text-style-name="P10" xml:id="id10" draw:id="id10" draw:layer="layout" svg:width="3.175cm" svg:height="1.785cm" svg:x="18.462cm" svg:y="4.427cm">
          <text:p text:style-name="P9"><text:span text:style-name="T4">_subscribers=</text:span></text:p>
          <text:p text:style-name="P9"><text:span text:style-name="T4">{</text:span></text:p>
          <text:p text:style-name="P9"><text:span text:style-name="T4">Topic.COMMAND: []</text:span></text:p>
          <text:p text:style-name="P9"><text:span text:style-name="T4">Topic.ERROR: []</text:span></text:p>
          <text:p text:style-name="P9"><text:span text:style-name="T4">}</text:span><text:span text:style-name="T5"> 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17" draw:text-style-name="P11" draw:layer="layout" draw:type="line" svg:x1="16.98cm" svg:y1="5.701cm" svg:x2="18.462cm" svg:y2="5.32cm" draw:start-shape="id9" draw:start-glue-point="7" draw:end-shape="id10" draw:end-glue-point="5" svg:d="M16980 5701l1482-381" svg:viewBox="0 0 1483 382">
          <text:p/>
        </draw:connector>
        <draw:custom-shape draw:style-name="gr18" draw:text-style-name="P10" xml:id="id12" draw:id="id12" draw:layer="layout" svg:width="4.065cm" svg:height="1.905cm" svg:x="18.46cm" svg:y="6.867cm">
          <text:p text:style-name="P9"><text:span text:style-name="T4">_subscribers=</text:span></text:p>
          <text:p text:style-name="P9"><text:span text:style-name="T4">{</text:span></text:p>
          <text:p text:style-name="P9"><text:span text:style-name="T4">Topic.COMMAND: [queue]</text:span></text:p>
          <text:p text:style-name="P9"><text:span text:style-name="T4">Topic.ERROR: []</text:span></text:p>
          <text:p text:style-name="P9"><text:span text:style-name="T4">}</text:span><text:span text:style-name="T5"> 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19" draw:text-style-name="P11" draw:layer="layout" draw:type="line" svg:x1="17.04cm" svg:y1="9.25cm" svg:x2="18.46cm" svg:y2="7.82cm" draw:start-shape="id11" draw:start-glue-point="6" draw:end-shape="id12" draw:end-glue-point="5" svg:d="M17040 9250l1420-1430" svg:viewBox="0 0 1421 1431">
          <text:p/>
        </draw:connector>
        <draw:custom-shape draw:style-name="gr20" draw:text-style-name="P4" xml:id="id11" draw:id="id11" draw:layer="layout" svg:width="0.566cm" svg:height="1.989cm" svg:x="16.474cm" svg:y="8.966cm">
          <draw:glue-point draw:id="4" svg:x="-5.433cm" svg:y="-3.946cm"/>
          <draw:glue-point draw:id="5" svg:x="-5.433cm" svg:y="2.929cm"/>
          <draw:glue-point draw:id="6" svg:x="5.007cm" svg:y="-3.573cm"/>
          <draw:glue-point draw:id="7" svg:x="5.417cm" svg:y="2.94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" draw:layer="layout" draw:line-skew="0.812cm" svg:x1="17.04cm" svg:y1="9.25cm" svg:x2="17.04cm" svg:y2="10.545cm" draw:start-shape="id11" draw:start-glue-point="6" draw:end-shape="id11" draw:end-glue-point="7" svg:d="M17040 9250h1339v1295h-1339" svg:viewBox="0 0 1340 1296">
          <text:p/>
        </draw:connector>
        <draw:frame draw:style-name="gr14" draw:text-style-name="P7" draw:layer="layout" svg:width="3.175cm" svg:height="0.645cm" svg:x="11.795cm" svg:y="8.62cm">
          <draw:text-box>
            <text:p><text:span text:style-name="T3">a</text:span><text:span text:style-name="T3">d</text:span><text:span text:style-name="T3">d</text:span><text:span text:style-name="T3"> </text:span><text:span text:style-name="T3">s</text:span><text:span text:style-name="T3">u</text:span><text:span text:style-name="T3">b</text:span><text:span text:style-name="T3">s</text:span><text:span text:style-name="T3">c</text:span><text:span text:style-name="T3">r</text:span><text:span text:style-name="T3">i</text:span><text:span text:style-name="T3">b</text:span><text:span text:style-name="T3">e</text:span><text:span text:style-name="T3">r</text:span></text:p>
          </draw:text-box>
        </draw:frame>
        <draw:custom-shape draw:style-name="gr22" draw:text-style-name="P3" xml:id="id13" draw:id="id13" draw:layer="layout" svg:width="3.839cm" svg:height="0.893cm" svg:x="24.313cm" svg:y="1.377cm">
          <draw:glue-point draw:id="4" svg:x="-2.297cm" svg:y="5.005cm"/>
          <draw:glue-point draw:id="5" svg:x="3.745cm" svg:y="5.005cm"/>
          <text:p text:style-name="P2"><text:span text:style-name="T1">Wifi Servic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7.669cm" svg:y1="2.269cm" svg:x2="27.765cm" svg:y2="10.242cm" draw:start-shape="id13" draw:start-glue-point="5" draw:end-shape="id14" draw:end-glue-point="0" svg:d="M27669 2269l96 7973" svg:viewBox="0 0 97 7974">
          <text:p/>
        </draw:connector>
        <draw:custom-shape draw:style-name="gr23" draw:text-style-name="P4" xml:id="id14" draw:id="id14" draw:layer="layout" svg:width="0.566cm" svg:height="1.905cm" svg:x="27.482cm" svg:y="10.242cm">
          <draw:glue-point draw:id="4" svg:x="5.417cm" svg:y="-2.50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3" draw:layer="layout" svg:width="3.81cm" svg:height="1.523cm" svg:x="23.742cm" svg:y="9.451cm">
          <draw:text-box>
            <text:p text:style-name="P12"><text:span text:style-name="T6">p</text:span><text:span text:style-name="T6">u</text:span><text:span text:style-name="T6">b</text:span><text:span text:style-name="T6">l</text:span><text:span text:style-name="T6">i</text:span><text:span text:style-name="T6">s</text:span><text:span text:style-name="T6">h</text:span><text:span text:style-name="T6">_</text:span><text:span text:style-name="T6">c</text:span><text:span text:style-name="T6">o</text:span><text:span text:style-name="T6">m</text:span><text:span text:style-name="T6">m</text:span><text:span text:style-name="T6">a</text:span><text:span text:style-name="T6">n</text:span><text:span text:style-name="T6">d</text:span><text:span text:style-name="T6">(</text:span></text:p>
            <text:p text:style-name="P12"><text:span text:style-name="T6">C</text:span><text:span text:style-name="T6">o</text:span><text:span text:style-name="T6">m</text:span><text:span text:style-name="T6">m</text:span><text:span text:style-name="T6">a</text:span><text:span text:style-name="T6">n</text:span><text:span text:style-name="T6">d</text:span><text:span text:style-name="T6">M</text:span><text:span text:style-name="T6">e</text:span><text:span text:style-name="T6">s</text:span><text:span text:style-name="T6">s</text:span><text:span text:style-name="T6">a</text:span><text:span text:style-name="T6">g</text:span><text:span text:style-name="T6">e</text:span><text:span text:style-name="T6">(</text:span></text:p>
            <text:p text:style-name="P12"><text:span text:style-name="T6">W</text:span><text:span text:style-name="T6">I</text:span><text:span text:style-name="T6">F</text:span><text:span text:style-name="T6">I</text:span><text:span text:style-name="T6">_</text:span><text:span text:style-name="T6">S</text:span><text:span text:style-name="T6">O</text:span><text:span text:style-name="T6">U</text:span><text:span text:style-name="T6">R</text:span><text:span text:style-name="T6">C</text:span><text:span text:style-name="T6">E</text:span><text:span text:style-name="T6">,</text:span><text:span text:style-name="T6"> </text:span></text:p>
            <text:p text:style-name="P12"><text:span text:style-name="T6">W</text:span><text:span text:style-name="T6">I</text:span><text:span text:style-name="T6">F</text:span><text:span text:style-name="T6">I</text:span><text:span text:style-name="T6">_</text:span><text:span text:style-name="T6">A</text:span><text:span text:style-name="T6">C</text:span><text:span text:style-name="T6">C</text:span><text:span text:style-name="T6">E</text:span><text:span text:style-name="T6">S</text:span><text:span text:style-name="T6">S</text:span><text:span text:style-name="T6">_</text:span><text:span text:style-name="T6">P</text:span><text:span text:style-name="T6">O</text:span><text:span text:style-name="T6">I</text:span><text:span text:style-name="T6">N</text:span><text:span text:style-name="T6">T</text:span><text:span text:style-name="T6">)</text:span><text:span text:style-name="T6">)</text:span></text:p>
          </draw:text-box>
          <draw:glue-point draw:id="4" svg:x="4.566cm" svg:y="5.004cm"/>
          <draw:glue-point draw:id="5" svg:x="5cm" svg:y="5.004cm"/>
          <draw:glue-point draw:id="6" svg:x="4.566cm" svg:y="5.004cm"/>
        </draw:frame>
        <draw:frame draw:style-name="gr25" draw:text-style-name="P14" draw:layer="layout" svg:width="4.128cm" svg:height="1.039cm" svg:x="24.812cm" svg:y="12.661cm">
          <draw:text-box>
            <text:p><text:span text:style-name="T7">W</text:span><text:span text:style-name="T7">i</text:span><text:span text:style-name="T7">f</text:span><text:span text:style-name="T7">i</text:span><text:span text:style-name="T7">E</text:span><text:span text:style-name="T7">v</text:span><text:span text:style-name="T7">e</text:span><text:span text:style-name="T7">n</text:span><text:span text:style-name="T7">t</text:span><text:span text:style-name="T7">L</text:span><text:span text:style-name="T7">i</text:span><text:span text:style-name="T7">s</text:span><text:span text:style-name="T7">t</text:span><text:span text:style-name="T7">e</text:span><text:span text:style-name="T7">n</text:span><text:span text:style-name="T7">e</text:span><text:span text:style-name="T7">r</text:span><text:span text:style-name="T7">(</text:span><text:span text:style-name="T7">)</text:span><text:span text:style-name="T8">→</text:span><text:span text:style-name="T7"> </text:span><text:span text:style-name="T7">N</text:span><text:span text:style-name="T7">M</text:span><text:span text:style-name="T7">_</text:span><text:span text:style-name="T7">C</text:span><text:span text:style-name="T7">O</text:span><text:span text:style-name="T7">N</text:span><text:span text:style-name="T7">N</text:span><text:span text:style-name="T7">E</text:span><text:span text:style-name="T7">C</text:span><text:span text:style-name="T7">T</text:span><text:span text:style-name="T7">E</text:span><text:span text:style-name="T7">D</text:span></text:p>
          </draw:text-box>
          <draw:glue-point draw:id="4" svg:x="1.153cm" svg:y="-4.995cm"/>
          <draw:glue-point draw:id="5" svg:x="1.921cm" svg:y="-4.995cm"/>
        </draw:frame>
        <draw:custom-shape draw:style-name="gr26" draw:text-style-name="P4" xml:id="id7" draw:id="id7" draw:layer="layout" svg:width="0.566cm" svg:height="1.158cm" svg:x="16.422cm" svg:y="13.747cm">
          <draw:glue-point draw:id="4" svg:x="-5.433cm" svg:y="-3.946cm"/>
          <draw:glue-point draw:id="5" svg:x="-5.433cm" svg:y="2.929cm"/>
          <draw:glue-point draw:id="6" svg:x="5.007cm" svg:y="-3.573cm"/>
          <draw:glue-point draw:id="7" svg:x="5.417cm" svg:y="2.944cm"/>
          <draw:glue-point draw:id="8" svg:x="-5cm" svg:y="2.48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4" draw:layer="layout" svg:width="4.762cm" svg:height="0.645cm" svg:x="11.478cm" svg:y="14.007cm">
          <draw:text-box>
            <text:p><text:span text:style-name="T7">q</text:span><text:span text:style-name="T7">u</text:span><text:span text:style-name="T7">e</text:span><text:span text:style-name="T7">u</text:span><text:span text:style-name="T7">e</text:span><text:span text:style-name="T7">=</text:span><text:span text:style-name="T7"> </text:span><text:span text:style-name="T7">_</text:span><text:span text:style-name="T7">s</text:span><text:span text:style-name="T7">u</text:span><text:span text:style-name="T7">b</text:span><text:span text:style-name="T7">s</text:span><text:span text:style-name="T7">c</text:span><text:span text:style-name="T7">r</text:span><text:span text:style-name="T7">i</text:span><text:span text:style-name="T7">b</text:span><text:span text:style-name="T7">e</text:span><text:span text:style-name="T7">r</text:span><text:span text:style-name="T7">s</text:span><text:span text:style-name="T7">[</text:span><text:span text:style-name="T7">t</text:span><text:span text:style-name="T7">o</text:span><text:span text:style-name="T7">p</text:span><text:span text:style-name="T7">i</text:span><text:span text:style-name="T7">c</text:span><text:span text:style-name="T7">]</text:span></text:p>
          </draw:text-box>
        </draw:frame>
        <draw:connector draw:style-name="gr28" draw:text-style-name="P1" draw:layer="layout" svg:x1="23.294cm" svg:y1="11.639cm" svg:x2="10.99cm" svg:y2="11.932cm" draw:start-shape="id15" draw:start-glue-point="3" draw:end-shape="id2" draw:end-glue-point="8" svg:d="M23294 11639h-6152v293h-6152" svg:viewBox="0 0 12305 294">
          <text:p/>
        </draw:connector>
        <draw:frame draw:style-name="gr29" draw:text-style-name="P14" draw:layer="layout" svg:width="5.397cm" svg:height="1.27cm" svg:x="17.51cm" svg:y="11.795cm">
          <draw:text-box>
            <text:p><text:span text:style-name="T7">p</text:span><text:span text:style-name="T7">u</text:span><text:span text:style-name="T7">b</text:span><text:span text:style-name="T7">l</text:span><text:span text:style-name="T7">i</text:span><text:span text:style-name="T7">s</text:span><text:span text:style-name="T7">h</text:span><text:span text:style-name="T7">(</text:span><text:span text:style-name="T7">t</text:span><text:span text:style-name="T7">o</text:span><text:span text:style-name="T7">p</text:span><text:span text:style-name="T7">i</text:span><text:span text:style-name="T7">c</text:span><text:span text:style-name="T7">:</text:span><text:span text:style-name="T7">T</text:span><text:span text:style-name="T7">o</text:span><text:span text:style-name="T7">p</text:span><text:span text:style-name="T7">i</text:span><text:span text:style-name="T7">c</text:span><text:span text:style-name="T7">,</text:span><text:span text:style-name="T7"> </text:span><text:span text:style-name="T7">m</text:span><text:span text:style-name="T7">e</text:span><text:span text:style-name="T7">s</text:span><text:span text:style-name="T7">s</text:span><text:span text:style-name="T7">a</text:span><text:span text:style-name="T7">g</text:span><text:span text:style-name="T7">e</text:span><text:span text:style-name="T7">: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</text:span><text:span text:style-name="T7">M</text:span><text:span text:style-name="T7">e</text:span><text:span text:style-name="T7">s</text:span><text:span text:style-name="T7">s</text:span><text:span text:style-name="T7">a</text:span><text:span text:style-name="T7">g</text:span><text:span text:style-name="T7">e</text:span><text:span text:style-name="T7">)</text:span></text:p>
          </draw:text-box>
        </draw:frame>
        <draw:custom-shape draw:style-name="gr30" draw:text-style-name="P6" xml:id="id17" draw:id="id17" draw:layer="layout" svg:width="3.539cm" svg:height="0.693cm" svg:x="12.142cm" svg:y="7.72cm">
          <draw:glue-point draw:id="4" svg:x="2.992cm" svg:y="5.382cm"/>
          <draw:glue-point draw:id="5" svg:x="3.888cm" svg:y="3.665cm"/>
          <text:p text:style-name="P5"><text:span text:style-name="T2">queue</text:span></text:p>
          <draw:enhanced-geometry svg:viewBox="0 0 21600 21600" draw:type="rectangle" draw:enhanced-path="M 0 0 L 21600 0 21600 21600 0 21600 0 0 Z N"/>
        </draw:custom-shape>
        <draw:connector draw:style-name="gr28" draw:text-style-name="P1" draw:layer="layout" svg:x1="6.963cm" svg:y1="5.634cm" svg:x2="10.449cm" svg:y2="5.918cm" draw:start-shape="id5" draw:start-glue-point="6" draw:end-shape="id16" draw:end-glue-point="4" svg:d="M6963 5634h1743v284h1743" svg:viewBox="0 0 3487 285">
          <text:p/>
        </draw:connector>
        <draw:connector draw:style-name="gr31" draw:text-style-name="P1" draw:layer="layout" draw:type="line" svg:x1="14.969cm" svg:y1="8.413cm" svg:x2="14.935cm" svg:y2="17.41cm" draw:start-shape="id17" draw:start-glue-point="4" draw:end-shape="id18" draw:end-glue-point="0" svg:d="M14969 8413l-34 8997" svg:viewBox="0 0 35 8998">
          <text:p/>
        </draw:connector>
        <draw:connector draw:style-name="gr5" draw:text-style-name="P8" draw:layer="layout" draw:type="line" svg:x1="16.422cm" svg:y1="14.613cm" svg:x2="10.99cm" svg:y2="14.646cm" draw:start-shape="id7" draw:start-glue-point="8" draw:end-shape="id2" draw:end-glue-point="12" svg:d="M16422 14613l-5432 33" svg:viewBox="0 0 5433 34">
          <text:p/>
        </draw:connector>
        <draw:connector draw:style-name="gr5" draw:text-style-name="P8" draw:layer="layout" draw:type="line" svg:x1="10.99cm" svg:y1="15.286cm" svg:x2="14.669cm" svg:y2="15.234cm" draw:start-shape="id2" draw:start-glue-point="13" draw:end-shape="id19" draw:end-glue-point="4" svg:d="M10990 15286l3679-52" svg:viewBox="0 0 3680 53">
          <text:p/>
        </draw:connector>
        <draw:frame draw:style-name="gr14" draw:text-style-name="P14" draw:layer="layout" svg:width="3.81cm" svg:height="0.645cm" svg:x="11.16cm" svg:y="15.287cm">
          <draw:text-box>
            <text:p><text:span text:style-name="T7">q</text:span><text:span text:style-name="T7">u</text:span><text:span text:style-name="T7">e</text:span><text:span text:style-name="T7">u</text:span><text:span text:style-name="T7">e</text:span><text:span text:style-name="T7">.</text:span><text:span text:style-name="T7">p</text:span><text:span text:style-name="T7">u</text:span><text:span text:style-name="T7">t</text:span><text:span text:style-name="T7">(</text:span><text:span text:style-name="T7">m</text:span><text:span text:style-name="T7">e</text:span><text:span text:style-name="T7">s</text:span><text:span text:style-name="T7">s</text:span><text:span text:style-name="T7">a</text:span><text:span text:style-name="T7">g</text:span><text:span text:style-name="T7">e</text:span><text:span text:style-name="T7">)</text:span></text:p>
          </draw:text-box>
        </draw:frame>
        <draw:custom-shape draw:style-name="gr32" draw:text-style-name="P6" xml:id="id21" draw:id="id21" draw:layer="layout" svg:width="4.445cm" svg:height="0.958cm" svg:x="3.345cm" svg:y="10.519cm">
          <draw:glue-point draw:id="4" svg:x="-3.21cm" svg:y="5cm"/>
          <text:p text:style-name="P5"><text:span text:style-name="T2">&lt;&lt;Thread&gt;&gt;</text:span></text:p>
          <text:p text:style-name="P5"><text:span text:style-name="T2">subscription_liste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" draw:layer="layout" svg:x1="10.467cm" svg:y1="9.625cm" svg:x2="5.567cm" svg:y2="10.519cm" draw:start-shape="id20" draw:start-glue-point="5" draw:end-shape="id21" draw:end-glue-point="0" svg:d="M10467 9625h-4900v894" svg:viewBox="0 0 4901 895">
          <text:p/>
        </draw:connector>
        <draw:frame draw:style-name="gr33" draw:text-style-name="P7" draw:layer="layout" svg:width="3.492cm" svg:height="1.433cm" svg:x="7.132cm" svg:y="5.98cm">
          <draw:text-box>
            <text:p><text:span text:style-name="T3">s</text:span><text:span text:style-name="T3">u</text:span><text:span text:style-name="T3">b</text:span><text:span text:style-name="T3">s</text:span><text:span text:style-name="T3">c</text:span><text:span text:style-name="T3">r</text:span><text:span text:style-name="T3">i</text:span><text:span text:style-name="T3">b</text:span><text:span text:style-name="T3">e</text:span><text:span text:style-name="T3">(</text:span></text:p>
            <text:p><text:span text:style-name="T3">T</text:span><text:span text:style-name="T3">o</text:span><text:span text:style-name="T3">p</text:span><text:span text:style-name="T3">i</text:span><text:span text:style-name="T3">c</text:span><text:span text:style-name="T3">.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,</text:span></text:p>
            <text:p><text:span text:style-name="T3">w</text:span><text:span text:style-name="T3">i</text:span><text:span text:style-name="T3">f</text:span><text:span text:style-name="T3">i</text:span><text:span text:style-name="T3">_</text:span><text:span text:style-name="T3">l</text:span><text:span text:style-name="T3">i</text:span><text:span text:style-name="T3">s</text:span><text:span text:style-name="T3">t</text:span><text:span text:style-name="T3">e</text:span><text:span text:style-name="T3">n</text:span><text:span text:style-name="T3">e</text:span><text:span text:style-name="T3">r</text:span><text:span text:style-name="T3">)</text:span></text:p>
          </draw:text-box>
        </draw:frame>
        <draw:g draw:style-name="gr34">
          <draw:custom-shape draw:style-name="gr35" draw:text-style-name="P15" draw:layer="layout" svg:width="13.476cm" svg:height="2.858cm" svg:x="5.016cm" svg:y="13.382cm">
            <draw:glue-point draw:id="4" svg:x="-5cm" svg:y="-5cm"/>
            <draw:glue-point draw:id="5" svg:x="5cm" svg:y="-5cm"/>
            <draw:glue-point draw:id="6" svg:x="-5cm" svg:y="-5cm" draw:escape-direction="down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7" draw:layer="layout" svg:width="1.556cm" svg:height="0.779cm" svg:x="4.992cm" svg:y="13.382cm">
            <text:p text:style-name="P16"><text:span text:style-name="T9">loop</text:span></text:p>
            <draw:enhanced-geometry svg:viewBox="0 0 21600 21600" draw:mirror-horizontal="false" draw:mirror-vertical="false" draw:type="non-primitve" draw:enhanced-path="M 0 0 L 21600 0 19000 21600 0 21600 0 0 Z N"/>
          </draw:custom-shape>
        </draw:g>
        <draw:custom-shape draw:style-name="gr37" draw:text-style-name="P4" xml:id="id20" draw:id="id20" draw:layer="layout" svg:width="0.566cm" svg:height="2.805cm" svg:x="10.467cm" svg:y="7.402cm">
          <draw:glue-point draw:id="4" svg:x="-5.433cm" svg:y="-3.946cm"/>
          <draw:glue-point draw:id="5" svg:x="-5.433cm" svg:y="2.929cm"/>
          <draw:glue-point draw:id="6" svg:x="5.007cm" svg:y="-3.573cm"/>
          <draw:glue-point draw:id="7" svg:x="5.417cm" svg:y="2.944cm"/>
          <draw:glue-point draw:id="8" svg:x="5.477cm" svg:y="-2.5cm"/>
          <draw:glue-point draw:id="9" svg:x="5.477cm" svg:y="1.25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type="line" svg:x1="11.033cm" svg:y1="8.103cm" svg:x2="12.142cm" svg:y2="8.066cm" draw:start-shape="id20" draw:start-glue-point="8" draw:end-shape="id17" draw:end-glue-point="3" svg:d="M11033 8103l1109-37" svg:viewBox="0 0 1110 38">
          <text:p/>
        </draw:connector>
        <draw:connector draw:style-name="gr5" draw:text-style-name="P8" draw:layer="layout" draw:type="line" svg:x1="11.033cm" svg:y1="9.154cm" svg:x2="16.474cm" svg:y2="9.176cm" draw:start-shape="id20" draw:start-glue-point="9" draw:end-shape="id11" draw:end-glue-point="4" svg:d="M11033 9154l5441 22" svg:viewBox="0 0 5442 23">
          <text:p/>
        </draw:connector>
        <draw:frame draw:style-name="gr14" draw:text-style-name="P14" draw:layer="layout" svg:width="2.858cm" svg:height="0.645cm" svg:x="12.112cm" svg:y="7.022cm">
          <draw:text-box>
            <text:p><text:span text:style-name="T7">c</text:span><text:span text:style-name="T7">r</text:span><text:span text:style-name="T7">e</text:span><text:span text:style-name="T7">a</text:span><text:span text:style-name="T7">t</text:span><text:span text:style-name="T7">e</text:span><text:span text:style-name="T7"> </text:span><text:span text:style-name="T7">q</text:span><text:span text:style-name="T7">u</text:span><text:span text:style-name="T7">e</text:span><text:span text:style-name="T7">u</text:span><text:span text:style-name="T7">e</text:span></text:p>
          </draw:text-box>
        </draw:frame>
        <draw:connector draw:style-name="gr31" draw:text-style-name="P1" draw:layer="layout" draw:type="line" svg:x1="4.141cm" svg:y1="11.477cm" svg:x2="4.147cm" svg:y2="16.892cm" draw:start-shape="id21" draw:start-glue-point="4" draw:end-shape="id22" draw:end-glue-point="5" svg:d="M4141 11477l6 5415" svg:viewBox="0 0 7 5416">
          <text:p/>
        </draw:connector>
        <draw:connector draw:style-name="gr38" draw:text-style-name="P1" draw:layer="layout" svg:x1="14.969cm" svg:y1="8.413cm" svg:x2="7.79cm" svg:y2="10.998cm" draw:start-shape="id17" draw:start-glue-point="4" draw:end-shape="id21" draw:end-glue-point="1" svg:d="M14969 8413v2585h-7179" svg:viewBox="0 0 7180 2586">
          <text:p/>
        </draw:connector>
        <draw:connector draw:style-name="gr1" draw:text-style-name="P1" draw:layer="layout" draw:type="line" svg:x1="6.676cm" svg:y1="2.31cm" svg:x2="6.68cm" svg:y2="5.427cm" draw:start-shape="id23" draw:start-glue-point="9" draw:end-shape="id5" draw:end-glue-point="0" svg:d="M6676 2310l4 3117" svg:viewBox="0 0 5 3118">
          <text:p/>
        </draw:connector>
        <draw:connector draw:style-name="gr39" draw:text-style-name="P1" draw:layer="layout" svg:x1="7.385cm" svg:y1="2.31cm" svg:x2="10.507cm" svg:y2="4.203cm" draw:start-shape="id23" draw:start-glue-point="6" draw:end-shape="id8" draw:end-glue-point="5" svg:d="M7385 2310v1893h3122" svg:viewBox="0 0 3123 1894">
          <text:p/>
        </draw:connector>
        <draw:custom-shape draw:style-name="gr3" draw:text-style-name="P4" xml:id="id5" draw:id="id5" draw:layer="layout" svg:width="0.566cm" svg:height="1.082cm" svg:x="6.397cm" svg:y="5.427cm">
          <draw:glue-point draw:id="4" svg:x="-5.433cm" svg:y="-3.946cm"/>
          <draw:glue-point draw:id="5" svg:x="-5.433cm" svg:y="2.929cm"/>
          <draw:glue-point draw:id="6" svg:x="5.417cm" svg:y="-3.087cm"/>
          <draw:glue-point draw:id="7" svg:x="5.477cm" svg:y="-1.375cm"/>
          <draw:glue-point draw:id="8" svg:x="5.477cm" svg:y="2.87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4" xml:id="id22" draw:id="id22">
          <draw:glue-point draw:id="4" svg:x="-3.063cm" svg:y="-5.11cm"/>
          <draw:glue-point draw:id="5" svg:x="-4.248cm" svg:y="-5cm"/>
          <draw:custom-shape draw:style-name="gr40" draw:text-style-name="P15" draw:layer="layout" svg:width="12.264cm" svg:height="3.475cm" svg:x="3.246cm" svg:y="16.892cm">
            <draw:glue-point draw:id="4" svg:x="-5cm" svg:y="-5cm"/>
            <draw:glue-point draw:id="5" svg:x="5cm" svg:y="-5cm"/>
            <draw:glue-point draw:id="6" svg:x="-5cm" svg:y="-5cm" draw:escape-direction="down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7" draw:layer="layout" svg:width="1.556cm" svg:height="0.779cm" svg:x="3.222cm" svg:y="16.892cm">
            <text:p text:style-name="P16"><text:span text:style-name="T9">l</text:span><text:span text:style-name="T9">o</text:span><text:span text:style-name="T9">o</text:span><text:span text:style-name="T9">p</text:span></text:p>
            <draw:enhanced-geometry svg:viewBox="0 0 21600 21600" draw:mirror-horizontal="false" draw:mirror-vertical="false" draw:type="non-primitve" draw:enhanced-path="M 0 0 L 21600 0 19000 21600 0 21600 0 0 Z N"/>
          </draw:custom-shape>
        </draw:g>
        <draw:frame draw:style-name="gr27" draw:text-style-name="P19" draw:layer="layout" svg:width="4.127cm" svg:height="0.725cm" svg:x="4.793cm" svg:y="16.792cm">
          <draw:text-box>
            <text:p text:style-name="P18"><text:span text:style-name="T2">[</text:span><text:span text:style-name="T2">w</text:span><text:span text:style-name="T2">a</text:span><text:span text:style-name="T2">i</text:span><text:span text:style-name="T2">t</text:span><text:span text:style-name="T2"> </text:span><text:span text:style-name="T2">f</text:span><text:span text:style-name="T2">o</text:span><text:span text:style-name="T2">r</text:span><text:span text:style-name="T2"> </text:span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text:span text:style-name="T2">]</text:span></text:p>
          </draw:text-box>
        </draw:frame>
        <draw:frame draw:style-name="gr27" draw:text-style-name="P19" draw:layer="layout" svg:width="4.445cm" svg:height="0.725cm" svg:x="11.16cm" svg:y="13.292cm">
          <draw:text-box>
            <text:p text:style-name="P18"><text:span text:style-name="T2">[</text:span><text:span text:style-name="T2">g</text:span><text:span text:style-name="T2">e</text:span><text:span text:style-name="T2">t</text:span><text:span text:style-name="T2"> </text:span><text:span text:style-name="T2">s</text:span><text:span text:style-name="T2">u</text:span><text:span text:style-name="T2">b</text:span><text:span text:style-name="T2">s</text:span><text:span text:style-name="T2">c</text:span><text:span text:style-name="T2">r</text:span><text:span text:style-name="T2">i</text:span><text:span text:style-name="T2">b</text:span><text:span text:style-name="T2">e</text:span><text:span text:style-name="T2">r</text:span><text:span text:style-name="T2">s</text:span><text:span text:style-name="T2">]</text:span></text:p>
          </draw:text-box>
        </draw:frame>
        <draw:g draw:style-name="gr34">
          <draw:custom-shape draw:style-name="gr42" draw:text-style-name="P15" draw:layer="layout" svg:width="5.588cm" svg:height="2.3cm" svg:x="8.312cm" svg:y="17.7cm">
            <draw:glue-point draw:id="4" svg:x="-5cm" svg:y="-5cm"/>
            <draw:glue-point draw:id="5" svg:x="5cm" svg:y="-5cm"/>
            <draw:glue-point draw:id="6" svg:x="-5cm" svg:y="-5cm" draw:escape-direction="down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1.201cm" svg:height="0.779cm" svg:x="8.302cm" svg:y="17.7cm">
            <text:p text:style-name="P16"><text:span text:style-name="T9">alt</text:span></text:p>
            <draw:enhanced-geometry svg:viewBox="0 0 21600 21600" draw:mirror-horizontal="false" draw:mirror-vertical="false" draw:type="non-primitve" draw:enhanced-path="M 0 0 L 21600 0 19000 21600 0 21600 0 0 Z N"/>
          </draw:custom-shape>
        </draw:g>
        <draw:custom-shape draw:style-name="gr44" draw:text-style-name="P4" xml:id="id19" draw:id="id19" draw:layer="layout" svg:width="0.566cm" svg:height="0.77cm" svg:x="14.669cm" svg:y="15.152cm">
          <draw:glue-point draw:id="4" svg:x="-5.433cm" svg:y="-3.946cm"/>
          <draw:glue-point draw:id="5" svg:x="-5.433cm" svg:y="2.929cm"/>
          <draw:glue-point draw:id="6" svg:x="5.007cm" svg:y="-3.573cm"/>
          <draw:glue-point draw:id="7" svg:x="5.417cm" svg:y="2.944cm"/>
          <draw:glue-point draw:id="8" svg:x="-5cm" svg:y="2.48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" xml:id="id18" draw:id="id18" draw:layer="layout" svg:width="0.566cm" svg:height="2.07cm" svg:x="14.652cm" svg:y="17.41cm">
          <draw:glue-point draw:id="4" svg:x="-5.433cm" svg:y="-3.946cm"/>
          <draw:glue-point draw:id="5" svg:x="-5.433cm" svg:y="2.929cm"/>
          <draw:glue-point draw:id="6" svg:x="5.007cm" svg:y="-3.573cm"/>
          <draw:glue-point draw:id="7" svg:x="5.417cm" svg:y="2.944cm"/>
          <draw:glue-point draw:id="8" svg:x="-5cm" svg:y="2.48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9" draw:layer="layout" svg:width="4.445cm" svg:height="0.725cm" svg:x="9.737cm" svg:y="17.555cm">
          <draw:text-box>
            <text:p text:style-name="P18"><text:span text:style-name="T2">[</text:span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text:span text:style-name="T2"> </text:span><text:span text:style-name="T2">a</text:span><text:span text:style-name="T2">v</text:span><text:span text:style-name="T2">a</text:span><text:span text:style-name="T2">i</text:span><text:span text:style-name="T2">l</text:span><text:span text:style-name="T2">a</text:span><text:span text:style-name="T2">b</text:span><text:span text:style-name="T2">l</text:span><text:span text:style-name="T2">e</text:span><text:span text:style-name="T2">]</text:span></text:p>
          </draw:text-box>
        </draw:frame>
        <draw:custom-shape draw:style-name="gr46" draw:text-style-name="P4" xml:id="id24" draw:id="id24" draw:layer="layout" svg:width="0.566cm" svg:height="1.487cm" svg:x="11.007cm" svg:y="18.245cm">
          <draw:glue-point draw:id="4" svg:x="-5.433cm" svg:y="-3.946cm"/>
          <draw:glue-point draw:id="5" svg:x="-5.433cm" svg:y="2.929cm"/>
          <draw:glue-point draw:id="6" svg:x="5.007cm" svg:y="-3.573cm"/>
          <draw:glue-point draw:id="7" svg:x="5.417cm" svg:y="2.944cm"/>
          <draw:glue-point draw:id="8" svg:x="-5cm" svg:y="2.483cm"/>
          <draw:glue-point draw:id="9" svg:x="-5cm" svg:y="-0.653cm"/>
          <draw:glue-point draw:id="10" svg:x="-5cm" svg:y="-3.14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type="line" svg:x1="14.652cm" svg:y1="18.445cm" svg:x2="11.573cm" svg:y2="18.457cm" draw:start-shape="id18" draw:start-glue-point="3" draw:end-shape="id24" draw:end-glue-point="6" svg:d="M14652 18445l-3079 12" svg:viewBox="0 0 3080 13">
          <text:p/>
        </draw:connector>
        <draw:frame draw:style-name="gr27" draw:text-style-name="P14" draw:layer="layout" svg:width="2.223cm" svg:height="0.645cm" svg:x="11.777cm" svg:y="18.462cm">
          <draw:text-box>
            <text:p text:style-name="P20"><text:span text:style-name="T7">m</text:span><text:span text:style-name="T7">e</text:span><text:span text:style-name="T7">s</text:span><text:span text:style-name="T7">s</text:span><text:span text:style-name="T7">a</text:span><text:span text:style-name="T7">g</text:span><text:span text:style-name="T7">e</text:span><text:span text:style-name="T7"> </text:span></text:p>
          </draw:text-box>
        </draw:frame>
        <draw:connector draw:style-name="gr5" draw:text-style-name="P8" draw:layer="layout" draw:type="line" svg:x1="11.007cm" svg:y1="18.891cm" svg:x2="2.305cm" svg:y2="18.897cm" draw:start-shape="id24" draw:start-glue-point="9" draw:end-shape="id25" draw:end-glue-point="4" svg:d="M11007 18891l-8702 6" svg:viewBox="0 0 8703 7">
          <text:p/>
        </draw:connector>
        <draw:frame draw:style-name="gr14" draw:text-style-name="P14" draw:layer="layout" svg:width="4.127cm" svg:height="1.039cm" svg:x="3.222cm" svg:y="18.78cm">
          <draw:text-box>
            <text:p text:style-name="P20"><text:span text:style-name="T7">&lt;</text:span><text:span text:style-name="T7">&lt;</text:span><text:span text:style-name="T7">c</text:span><text:span text:style-name="T7">a</text:span><text:span text:style-name="T7">l</text:span><text:span text:style-name="T7">l</text:span><text:span text:style-name="T7">b</text:span><text:span text:style-name="T7">a</text:span><text:span text:style-name="T7">c</text:span><text:span text:style-name="T7">k</text:span><text:span text:style-name="T7">&gt;</text:span><text:span text:style-name="T7">&gt;</text:span></text:p>
            <text:p text:style-name="P20"><text:span text:style-name="T7">w</text:span><text:span text:style-name="T7">i</text:span><text:span text:style-name="T7">f</text:span><text:span text:style-name="T7">i</text:span><text:span text:style-name="T7">_</text:span><text:span text:style-name="T7">l</text:span><text:span text:style-name="T7">i</text:span><text:span text:style-name="T7">s</text:span><text:span text:style-name="T7">t</text:span><text:span text:style-name="T7">e</text:span><text:span text:style-name="T7">n</text:span><text:span text:style-name="T7">e</text:span><text:span text:style-name="T7">r</text:span><text:span text:style-name="T7">(</text:span><text:span text:style-name="T7">m</text:span><text:span text:style-name="T7">e</text:span><text:span text:style-name="T7">s</text:span><text:span text:style-name="T7">s</text:span><text:span text:style-name="T7">a</text:span><text:span text:style-name="T7">g</text:span><text:span text:style-name="T7">e</text:span><text:span text:style-name="T7">)</text:span></text:p>
          </draw:text-box>
        </draw:frame>
        <draw:frame draw:style-name="gr27" draw:text-style-name="P14" draw:layer="layout" svg:width="4.127cm" svg:height="1.039cm" svg:x="5.445cm" svg:y="8.733cm">
          <draw:text-box>
            <text:p text:style-name="P20"><text:span text:style-name="T7">(</text:span><text:span text:style-name="T7">q</text:span><text:span text:style-name="T7">u</text:span><text:span text:style-name="T7">e</text:span><text:span text:style-name="T7">u</text:span><text:span text:style-name="T7">e</text:span><text:span text:style-name="T7">:</text:span><text:span text:style-name="T7"> </text:span><text:span text:style-name="T7">Q</text:span><text:span text:style-name="T7">u</text:span><text:span text:style-name="T7">e</text:span><text:span text:style-name="T7">u</text:span><text:span text:style-name="T7">e</text:span><text:span text:style-name="T7">,</text:span><text:span text:style-name="T7"> </text:span><text:span text:style-name="T7">c</text:span><text:span text:style-name="T7">a</text:span><text:span text:style-name="T7">l</text:span><text:span text:style-name="T7">l</text:span><text:span text:style-name="T7">b</text:span><text:span text:style-name="T7">a</text:span><text:span text:style-name="T7">c</text:span><text:span text:style-name="T7">k</text:span><text:span text:style-name="T7">:</text:span><text:span text:style-name="T7"> </text:span><text:span text:style-name="T7">w</text:span><text:span text:style-name="T7">i</text:span><text:span text:style-name="T7">f</text:span><text:span text:style-name="T7">i</text:span><text:span text:style-name="T7">_</text:span><text:span text:style-name="T7">l</text:span><text:span text:style-name="T7">i</text:span><text:span text:style-name="T7">s</text:span><text:span text:style-name="T7">t</text:span><text:span text:style-name="T7">e</text:span><text:span text:style-name="T7">n</text:span><text:span text:style-name="T7">e</text:span><text:span text:style-name="T7">r</text:span><text:span text:style-name="T7">)</text:span></text:p>
          </draw:text-box>
        </draw:frame>
        <draw:frame draw:style-name="gr47" draw:text-style-name="P14" draw:layer="layout" svg:width="1.924cm" svg:height="1.039cm" svg:x="-0.072cm" svg:y="18.78cm">
          <draw:text-box>
            <text:p><text:span text:style-name="T7">p</text:span><text:span text:style-name="T7">r</text:span><text:span text:style-name="T7">o</text:span><text:span text:style-name="T7">c</text:span><text:span text:style-name="T7">e</text:span><text:span text:style-name="T7">s</text:span><text:span text:style-name="T7">s</text:span></text:p>
            <text:p><text:span text:style-name="T7">m</text:span><text:span text:style-name="T7">e</text:span><text:span text:style-name="T7">s</text:span><text:span text:style-name="T7">s</text:span><text:span text:style-name="T7">a</text:span><text:span text:style-name="T7">g</text:span><text:span text:style-name="T7">e</text:span></text:p>
          </draw:text-box>
        </draw:frame>
        <draw:connector draw:style-name="gr1" draw:text-style-name="P1" draw:layer="layout" draw:type="line" svg:x1="23.541cm" svg:y1="2.31cm" svg:x2="23.577cm" svg:y2="11.06cm" draw:start-shape="id23" draw:start-glue-point="10" draw:end-shape="id15" draw:end-glue-point="0" svg:d="M23541 2310l36 8750" svg:viewBox="0 0 37 8751">
          <text:p/>
        </draw:connector>
        <draw:custom-shape draw:style-name="gr26" draw:text-style-name="P4" xml:id="id15" draw:id="id15" draw:layer="layout" svg:width="0.566cm" svg:height="1.158cm" svg:x="23.294cm" svg:y="11.06cm">
          <draw:glue-point draw:id="4" svg:x="-5.433cm" svg:y="-3.946cm"/>
          <draw:glue-point draw:id="5" svg:x="-5.433cm" svg:y="2.929cm"/>
          <draw:glue-point draw:id="6" svg:x="5.007cm" svg:y="-3.573cm"/>
          <draw:glue-point draw:id="7" svg:x="5.417cm" svg:y="2.944cm"/>
          <draw:glue-point draw:id="8" svg:x="-5cm" svg:y="2.48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type="line" svg:x1="27.482cm" svg:y1="11.194cm" svg:x2="23.86cm" svg:y2="11.226cm" draw:start-shape="id14" draw:start-glue-point="3" draw:end-shape="id15" draw:end-glue-point="6" svg:d="M27482 11194l-3622 32" svg:viewBox="0 0 3623 33">
          <text:p/>
        </draw:connector>
        <draw:connector draw:style-name="gr39" draw:text-style-name="P1" draw:layer="layout" svg:x1="28.575cm" svg:y1="13.714cm" svg:x2="28.048cm" svg:y2="10.717cm" draw:end-shape="id14" draw:end-glue-point="4" svg:d="M28575 13714v-2997h-527" svg:viewBox="0 0 528 2998">
          <text:p/>
        </draw:connector>
        <draw:connector draw:style-name="gr21" draw:text-style-name="P1" draw:layer="layout" svg:x1="11.015cm" svg:y1="6.655cm" svg:x2="11.033cm" svg:y2="7.802cm" draw:start-shape="id16" draw:start-glue-point="8" draw:end-shape="id20" draw:end-glue-point="6" svg:d="M11015 6655h545v1147h-527" svg:viewBox="0 0 546 1148">
          <text:p/>
        </draw:connector>
      </draw:page>
      <draw:page draw:name="Queue_at_subscriber" draw:style-name="dp1" draw:master-page-name="Default">
        <draw:connector draw:style-name="gr1" draw:text-style-name="P1" draw:layer="layout" draw:type="line" svg:x1="10.841cm" svg:y1="3.623cm" svg:x2="10.707cm" svg:y2="11.695cm" draw:start-shape="id26" draw:start-glue-point="5" draw:end-shape="id27" draw:end-glue-point="0" svg:d="M10841 3623l-134 8072" svg:viewBox="0 0 135 8073">
          <text:p/>
        </draw:connector>
        <draw:custom-shape draw:style-name="gr2" draw:text-style-name="P3" xml:id="id28" draw:id="id28" draw:layer="layout" svg:width="4.158cm" svg:height="0.893cm" svg:x="1.287cm" svg:y="1.367cm">
          <draw:glue-point draw:id="4" svg:x="-2.954cm" svg:y="5.117cm"/>
          <text:p text:style-name="P2"><text:span text:style-name="T1">Remote </text:span><text:span text:style-name="T1">Servic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138cm" svg:y1="2.26cm" svg:x2="2.029cm" svg:y2="20.681cm" draw:start-shape="id28" draw:start-glue-point="4" svg:d="M2138 2260l-109 18421" svg:viewBox="0 0 110 18422">
          <text:p/>
        </draw:connector>
        <draw:custom-shape draw:style-name="gr3" draw:text-style-name="P4" xml:id="id41" draw:id="id41" draw:layer="layout" svg:width="0.566cm" svg:height="1.082cm" svg:x="10.449cm" svg:y="5.803cm">
          <draw:glue-point draw:id="4" svg:x="-5.433cm" svg:y="-3.946cm"/>
          <draw:glue-point draw:id="5" svg:x="-5.433cm" svg:y="2.929cm"/>
          <draw:glue-point draw:id="6" svg:x="5.417cm" svg:y="-3.087cm"/>
          <draw:glue-point draw:id="7" svg:x="5.477cm" svg:y="-1.375cm"/>
          <draw:glue-point draw:id="8" svg:x="5.477cm" svg:y="2.87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26" draw:id="id26" draw:layer="layout" svg:width="3.81cm" svg:height="0.893cm" svg:x="7.785cm" svg:y="2.73cm">
          <draw:glue-point draw:id="4" svg:x="-3.039cm" svg:y="5.296cm"/>
          <draw:glue-point draw:id="5" svg:x="3.023cm" svg:y="5.296cm"/>
          <text:p text:style-name="P5"><text:span text:style-name="T2">PubSubManag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.365cm" svg:y1="5.636cm" svg:x2="6.397cm" svg:y2="5.542cm" draw:start-shape="id29" draw:start-glue-point="5" draw:end-shape="id30" draw:end-glue-point="4" svg:d="M2365 5636l4032-94" svg:viewBox="0 0 4033 95">
          <text:p/>
        </draw:connector>
        <draw:frame draw:style-name="gr48" draw:text-style-name="P7" draw:layer="layout" svg:width="4.186cm" svg:height="1.039cm" svg:x="2.47cm" svg:y="4.492cm">
          <draw:text-box>
            <text:p><text:span text:style-name="T3">subscribe_commands(</text:span></text:p>
            <text:p><text:span text:style-name="T3">wifi_listener)</text:span></text:p>
          </draw:text-box>
          <draw:glue-point draw:id="4" svg:x="2.107cm" svg:y="-4.995cm"/>
        </draw:frame>
        <draw:custom-shape draw:style-name="gr7" draw:text-style-name="P4" xml:id="id27" draw:id="id27" draw:layer="layout" svg:width="0.566cm" svg:height="4.227cm" svg:x="10.424cm" svg:y="11.695cm">
          <draw:glue-point draw:id="4" svg:x="-5.433cm" svg:y="-3.946cm"/>
          <draw:glue-point draw:id="5" svg:x="-5.433cm" svg:y="2.929cm"/>
          <draw:glue-point draw:id="6" svg:x="5.007cm" svg:y="-3.573cm"/>
          <draw:glue-point draw:id="7" svg:x="3.233cm" svg:y="-4.439cm"/>
          <draw:glue-point draw:id="8" svg:x="5.477cm" svg:y="-4.439cm"/>
          <draw:glue-point draw:id="9" svg:x="-5.477cm" svg:y="-1.636cm"/>
          <draw:glue-point draw:id="10" svg:x="5.477cm" svg:y="-1.636cm"/>
          <draw:glue-point draw:id="11" svg:x="5.477cm" svg:y="0.777cm"/>
          <draw:glue-point draw:id="12" svg:x="5.477cm" svg:y="1.984cm"/>
          <draw:glue-point draw:id="13" svg:x="5.477cm" svg:y="3.498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43" draw:id="id43" draw:layer="layout" svg:width="17.78cm" svg:height="0.893cm" svg:x="6.062cm" svg:y="1.417cm">
          <draw:glue-point draw:id="4" svg:x="-2.749cm" svg:y="5.01cm"/>
          <draw:glue-point draw:id="5" svg:x="3cm" svg:y="5.01cm"/>
          <draw:glue-point draw:id="6" svg:x="-4.256cm" svg:y="5.296cm"/>
          <draw:glue-point draw:id="7" svg:x="-2.136cm" svg:y="5.296cm"/>
          <draw:glue-point draw:id="8" svg:x="-1.297cm" svg:y="5.296cm"/>
          <draw:glue-point draw:id="9" svg:x="-4.655cm" svg:y="5.296cm"/>
          <draw:glue-point draw:id="10" svg:x="4.831cm" svg:y="5.296cm"/>
          <text:p text:style-name="P2"><text:span text:style-name="T1">&lt;&lt;module&gt; </text:span><text:span text:style-name="T1">Messaging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6.708cm" svg:y1="3.857cm" svg:x2="16.705cm" svg:y2="13.747cm" draw:start-shape="id31" draw:end-shape="id32" draw:end-glue-point="0" svg:d="M16708 3857l-3 9890" svg:viewBox="0 0 4 9891">
          <text:p/>
        </draw:connector>
        <draw:custom-shape draw:style-name="gr9" draw:text-style-name="P6" xml:id="id31" draw:id="id31" draw:layer="layout" svg:width="7.922cm" svg:height="1.163cm" svg:x="12.747cm" svg:y="2.694cm">
          <text:p text:style-name="P5"><text:span text:style-name="T2">_su</text:span><text:span text:style-name="T2">bscr</text:span><text:span text:style-name="T2">iber</text:span><text:span text:style-name="T2">s</text:span></text:p>
          <text:p text:style-name="P5"><text:span text:style-name="T2">dict[</text:span><text:span text:style-name="T2">Topi</text:span><text:span text:style-name="T2">c,lis</text:span><text:span text:style-name="T2">t[Qu</text:span><text:span text:style-name="T2">eue</text:span><text:span text:style-name="T2">]]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45" draw:id="id45" draw:layer="layout" svg:width="0.566cm" svg:height="1.744cm" svg:x="1.739cm" svg:y="18.462cm">
          <draw:glue-point draw:id="4" svg:x="5.417cm" svg:y="-2.50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" xml:id="id29" draw:id="id29" draw:layer="layout" svg:width="0.566cm" svg:height="6.008cm" svg:x="1.799cm" svg:y="4.834cm">
          <draw:glue-point draw:id="4" svg:x="5.417cm" svg:y="-2.509cm"/>
          <draw:glue-point draw:id="5" svg:x="5.477cm" svg:y="-3.666cm"/>
          <draw:glue-point draw:id="6" svg:x="5.477cm" svg:y="4.088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34" draw:id="id34" draw:layer="layout" svg:width="0.566cm" svg:height="1.436cm" svg:x="16.414cm" svg:y="4.561cm">
          <draw:glue-point draw:id="4" svg:x="-5.433cm" svg:y="-3.946cm"/>
          <draw:glue-point draw:id="5" svg:x="-5.433cm" svg:y="2.929cm"/>
          <draw:glue-point draw:id="6" svg:x="5.007cm" svg:y="-3.573cm"/>
          <draw:glue-point draw:id="7" svg:x="5.417cm" svg:y="2.94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xml:id="id33" draw:id="id33" draw:layer="layout" svg:width="0.566cm" svg:height="1.08cm" svg:x="10.506cm" svg:y="4.082cm">
          <draw:glue-point draw:id="4" svg:x="5.417cm" svg:y="-2.509cm"/>
          <draw:glue-point draw:id="5" svg:x="-4.992cm" svg:y="-3.887cm"/>
          <draw:glue-point draw:id="6" svg:x="4.611cm" svg:y="1.138cm"/>
          <draw:glue-point draw:id="7" svg:x="5.477cm" svg:y="4.074cm"/>
          <draw:glue-point draw:id="8" svg:x="5.477cm" svg:y="1.138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1.957cm" svg:height="0.645cm" svg:x="8.568cm" svg:y="4.165cm">
          <draw:text-box>
            <text:p><text:span text:style-name="T3">init()</text:span></text:p>
          </draw:text-box>
        </draw:frame>
        <draw:connector draw:style-name="gr5" draw:text-style-name="P8" draw:layer="layout" draw:type="line" svg:x1="11.072cm" svg:y1="4.744cm" svg:x2="16.414cm" svg:y2="4.713cm" draw:start-shape="id33" draw:start-glue-point="8" draw:end-shape="id34" draw:end-glue-point="4" svg:d="M11072 4744l5342-31" svg:viewBox="0 0 5343 32">
          <text:p/>
        </draw:connector>
        <draw:frame draw:style-name="gr15" draw:text-style-name="P7" draw:layer="layout" svg:width="4.527cm" svg:height="0.68cm" svg:x="11.795cm" svg:y="4.81cm">
          <draw:text-box>
            <text:p><text:span text:style-name="T3">create empty dictionary</text:span></text:p>
          </draw:text-box>
        </draw:frame>
        <draw:custom-shape draw:style-name="gr50" draw:text-style-name="P10" xml:id="id35" draw:id="id35" draw:layer="layout" svg:width="3.175cm" svg:height="1.785cm" svg:x="18.462cm" svg:y="4.427cm">
          <text:p text:style-name="P9"><text:span text:style-name="T4">_subscrib</text:span><text:span text:style-name="T4">ers=</text:span></text:p>
          <text:p text:style-name="P9"><text:span text:style-name="T4">{</text:span></text:p>
          <text:p text:style-name="P9"><text:span text:style-name="T4">Topic.CO</text:span><text:span text:style-name="T4">MMAND: </text:span><text:span text:style-name="T4">[]</text:span></text:p>
          <text:p text:style-name="P9"><text:span text:style-name="T4">Topic.ERR</text:span><text:span text:style-name="T4">OR: []</text:span></text:p>
          <text:p text:style-name="P9"><text:span text:style-name="T4">}</text:span><text:span text:style-name="T5"> 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51" draw:text-style-name="P11" draw:layer="layout" draw:type="line" svg:x1="16.98cm" svg:y1="5.701cm" svg:x2="18.462cm" svg:y2="5.32cm" draw:start-shape="id34" draw:start-glue-point="7" draw:end-shape="id35" draw:end-glue-point="5" svg:d="M16980 5701l1482-381" svg:viewBox="0 0 1483 382">
          <text:p/>
        </draw:connector>
        <draw:custom-shape draw:style-name="gr52" draw:text-style-name="P10" xml:id="id37" draw:id="id37" draw:layer="layout" svg:width="4.765cm" svg:height="1.905cm" svg:x="18.46cm" svg:y="6.867cm">
          <text:p text:style-name="P9"><text:span text:style-name="T4">_subscribers=</text:span></text:p>
          <text:p text:style-name="P9"><text:span text:style-name="T4">{</text:span></text:p>
          <text:p text:style-name="P9"><text:span text:style-name="T4">Topic.COMMAND: </text:span><text:span text:style-name="T4">[wifi_listener]</text:span></text:p>
          <text:p text:style-name="P9"><text:span text:style-name="T4">Topic.ERROR: []</text:span></text:p>
          <text:p text:style-name="P9"><text:span text:style-name="T4">}</text:span><text:span text:style-name="T5"> </text:span>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f0 $0" draw:handle-range-y-minimum="500" draw:handle-range-y-maximum="5000"/>
          </draw:enhanced-geometry>
        </draw:custom-shape>
        <draw:connector draw:style-name="gr53" draw:text-style-name="P11" draw:layer="layout" draw:type="line" svg:x1="17.04cm" svg:y1="8.55cm" svg:x2="18.46cm" svg:y2="7.82cm" draw:start-shape="id36" draw:start-glue-point="6" draw:end-shape="id37" draw:end-glue-point="5" svg:d="M17040 8550l1420-730" svg:viewBox="0 0 1421 731">
          <text:p/>
        </draw:connector>
        <draw:custom-shape draw:style-name="gr20" draw:text-style-name="P4" xml:id="id36" draw:id="id36" draw:layer="layout" svg:width="0.566cm" svg:height="1.989cm" svg:x="16.474cm" svg:y="8.266cm">
          <draw:glue-point draw:id="4" svg:x="-5.433cm" svg:y="-3.946cm"/>
          <draw:glue-point draw:id="5" svg:x="-5.433cm" svg:y="2.929cm"/>
          <draw:glue-point draw:id="6" svg:x="5.007cm" svg:y="-3.573cm"/>
          <draw:glue-point draw:id="7" svg:x="5.417cm" svg:y="2.94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" draw:layer="layout" draw:line-skew="0.26cm" svg:x1="17.04cm" svg:y1="8.55cm" svg:x2="17.04cm" svg:y2="9.845cm" draw:start-shape="id36" draw:start-glue-point="6" draw:end-shape="id36" draw:end-glue-point="7" svg:d="M17040 8550h787v1295h-787" svg:viewBox="0 0 788 1296">
          <text:p/>
        </draw:connector>
        <draw:frame draw:style-name="gr14" draw:text-style-name="P7" draw:layer="layout" svg:width="3.175cm" svg:height="0.645cm" svg:x="12.43cm" svg:y="7.667cm">
          <draw:text-box>
            <text:p><text:span text:style-name="T3">add subscriber</text:span></text:p>
          </draw:text-box>
        </draw:frame>
        <draw:custom-shape draw:style-name="gr22" draw:text-style-name="P3" xml:id="id38" draw:id="id38" draw:layer="layout" svg:width="3.839cm" svg:height="0.893cm" svg:x="24.313cm" svg:y="1.377cm">
          <draw:glue-point draw:id="4" svg:x="-2.297cm" svg:y="5.005cm"/>
          <draw:glue-point draw:id="5" svg:x="3.745cm" svg:y="5.005cm"/>
          <text:p text:style-name="P2"><text:span text:style-name="T1">Wifi Servic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7.669cm" svg:y1="2.269cm" svg:x2="27.765cm" svg:y2="10.242cm" draw:start-shape="id38" draw:start-glue-point="5" draw:end-shape="id39" draw:end-glue-point="0" svg:d="M27669 2269l96 7973" svg:viewBox="0 0 97 7974">
          <text:p/>
        </draw:connector>
        <draw:custom-shape draw:style-name="gr23" draw:text-style-name="P4" xml:id="id39" draw:id="id39" draw:layer="layout" svg:width="0.566cm" svg:height="1.905cm" svg:x="27.482cm" svg:y="10.242cm">
          <draw:glue-point draw:id="4" svg:x="5.417cm" svg:y="-2.50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3" draw:layer="layout" svg:width="3.81cm" svg:height="1.523cm" svg:x="23.742cm" svg:y="9.451cm">
          <draw:text-box>
            <text:p text:style-name="P12"><text:span text:style-name="T6">publis</text:span><text:span text:style-name="T6">h_co</text:span><text:span text:style-name="T6">mman</text:span><text:span text:style-name="T6">d(</text:span></text:p>
            <text:p text:style-name="P12"><text:span text:style-name="T6">Com</text:span><text:span text:style-name="T6">mand</text:span><text:span text:style-name="T6">Mess</text:span><text:span text:style-name="T6">age(</text:span></text:p>
            <text:p text:style-name="P12"><text:span text:style-name="T6">WIFI_</text:span><text:span text:style-name="T6">SOU</text:span><text:span text:style-name="T6">RCE, </text:span></text:p>
            <text:p text:style-name="P12"><text:span text:style-name="T6">WIFI_</text:span><text:span text:style-name="T6">ACCE</text:span><text:span text:style-name="T6">SS_P</text:span><text:span text:style-name="T6">OINT)</text:span><text:span text:style-name="T6">)</text:span></text:p>
          </draw:text-box>
          <draw:glue-point draw:id="4" svg:x="4.566cm" svg:y="5.004cm"/>
          <draw:glue-point draw:id="5" svg:x="5cm" svg:y="5.004cm"/>
          <draw:glue-point draw:id="6" svg:x="4.566cm" svg:y="5.004cm"/>
        </draw:frame>
        <draw:frame draw:style-name="gr25" draw:text-style-name="P14" draw:layer="layout" svg:width="4.128cm" svg:height="1.039cm" svg:x="24.812cm" svg:y="12.661cm">
          <draw:text-box>
            <text:p><text:span text:style-name="T7">WifiE</text:span><text:span text:style-name="T7">vent</text:span><text:span text:style-name="T7">Liste</text:span><text:span text:style-name="T7">ner()</text:span><text:span text:style-name="T8">→</text:span><text:span text:style-name="T7"> </text:span><text:span text:style-name="T7">NM_</text:span><text:span text:style-name="T7">CON</text:span><text:span text:style-name="T7">NEC</text:span><text:span text:style-name="T7">TED</text:span></text:p>
          </draw:text-box>
          <draw:glue-point draw:id="4" svg:x="1.153cm" svg:y="-4.995cm"/>
          <draw:glue-point draw:id="5" svg:x="1.921cm" svg:y="-4.995cm"/>
        </draw:frame>
        <draw:custom-shape draw:style-name="gr26" draw:text-style-name="P4" xml:id="id32" draw:id="id32" draw:layer="layout" svg:width="0.566cm" svg:height="1.158cm" svg:x="16.422cm" svg:y="13.747cm">
          <draw:glue-point draw:id="4" svg:x="-5.433cm" svg:y="-3.946cm"/>
          <draw:glue-point draw:id="5" svg:x="-5.433cm" svg:y="2.929cm"/>
          <draw:glue-point draw:id="6" svg:x="5.007cm" svg:y="-3.573cm"/>
          <draw:glue-point draw:id="7" svg:x="5.417cm" svg:y="2.944cm"/>
          <draw:glue-point draw:id="8" svg:x="-5cm" svg:y="2.48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4" draw:layer="layout" svg:width="4.762cm" svg:height="1.039cm" svg:x="11.478cm" svg:y="14.007cm">
          <draw:text-box>
            <text:p><text:span text:style-name="T7">wifi_listener= </text:span><text:span text:style-name="T7">_subscribers[topic]</text:span></text:p>
          </draw:text-box>
        </draw:frame>
        <draw:connector draw:style-name="gr28" draw:text-style-name="P1" draw:layer="layout" svg:x1="23.294cm" svg:y1="11.639cm" svg:x2="10.99cm" svg:y2="11.932cm" draw:start-shape="id40" draw:start-glue-point="3" draw:end-shape="id27" draw:end-glue-point="8" svg:d="M23294 11639h-6152v293h-6152" svg:viewBox="0 0 12305 294">
          <text:p/>
        </draw:connector>
        <draw:frame draw:style-name="gr29" draw:text-style-name="P14" draw:layer="layout" svg:width="5.397cm" svg:height="1.27cm" svg:x="17.51cm" svg:y="11.795cm">
          <draw:text-box>
            <text:p><text:span text:style-name="T7">publish(topic:Topic, </text:span><text:span text:style-name="T7">message:CommandMessage)</text:span></text:p>
          </draw:text-box>
        </draw:frame>
        <draw:connector draw:style-name="gr28" draw:text-style-name="P1" draw:layer="layout" svg:x1="6.963cm" svg:y1="5.634cm" svg:x2="10.449cm" svg:y2="5.918cm" draw:start-shape="id30" draw:start-glue-point="6" draw:end-shape="id41" draw:end-glue-point="4" svg:d="M6963 5634h1743v284h1743" svg:viewBox="0 0 3487 285">
          <text:p/>
        </draw:connector>
        <draw:connector draw:style-name="gr5" draw:text-style-name="P8" draw:layer="layout" draw:type="line" svg:x1="16.422cm" svg:y1="14.613cm" svg:x2="10.99cm" svg:y2="14.646cm" draw:start-shape="id32" draw:start-glue-point="8" draw:end-shape="id27" draw:end-glue-point="12" svg:d="M16422 14613l-5432 33" svg:viewBox="0 0 5433 34">
          <text:p/>
        </draw:connector>
        <draw:custom-shape draw:style-name="gr32" draw:text-style-name="P6" draw:layer="layout" svg:width="4.445cm" svg:height="0.958cm" svg:x="22.59cm" svg:y="16.875cm">
          <draw:glue-point draw:id="4" svg:x="-3.21cm" svg:y="5cm"/>
          <text:p text:style-name="P5"><text:span text:style-name="T2">&lt;&lt;</text:span><text:span text:style-name="T2">Th</text:span><text:span text:style-name="T2">re</text:span><text:span text:style-name="T2">ad</text:span><text:span text:style-name="T2">&gt;&gt;</text:span></text:p>
          <text:p text:style-name="P5"><text:span text:style-name="T2">su</text:span><text:span text:style-name="T2">bs</text:span><text:span text:style-name="T2">cri</text:span><text:span text:style-name="T2">pti</text:span><text:span text:style-name="T2">on</text:span><text:span text:style-name="T2">_li</text:span><text:span text:style-name="T2">st</text:span><text:span text:style-name="T2">en</text:span><text:span text:style-name="T2">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7" draw:layer="layout" svg:width="3.492cm" svg:height="1.433cm" svg:x="7.132cm" svg:y="6.08cm">
          <draw:text-box>
            <text:p><text:span text:style-name="T3">subscribe(</text:span></text:p>
            <text:p><text:span text:style-name="T3">Topic.COMMAND,</text:span></text:p>
            <text:p><text:span text:style-name="T3">wifi_listener)</text:span></text:p>
          </draw:text-box>
        </draw:frame>
        <draw:g draw:style-name="gr34">
          <draw:custom-shape draw:style-name="gr54" draw:text-style-name="P15" draw:layer="layout" svg:width="13.476cm" svg:height="2.858cm" svg:x="7.916cm" svg:y="13.382cm">
            <draw:glue-point draw:id="4" svg:x="-5cm" svg:y="-5cm"/>
            <draw:glue-point draw:id="5" svg:x="5cm" svg:y="-5cm"/>
            <draw:glue-point draw:id="6" svg:x="-5cm" svg:y="-5cm" draw:escape-direction="down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7" draw:layer="layout" svg:width="1.556cm" svg:height="0.779cm" svg:x="7.892cm" svg:y="13.382cm">
            <text:p text:style-name="P16"><text:span text:style-name="T9">loop</text:span></text:p>
            <draw:enhanced-geometry svg:viewBox="0 0 21600 21600" draw:mirror-horizontal="false" draw:mirror-vertical="false" draw:type="non-primitve" draw:enhanced-path="M 0 0 L 21600 0 19000 21600 0 21600 0 0 Z N"/>
          </draw:custom-shape>
        </draw:g>
        <draw:custom-shape draw:style-name="gr56" draw:text-style-name="P4" xml:id="id42" draw:id="id42" draw:layer="layout" svg:width="0.566cm" svg:height="3.175cm" svg:x="10.407cm" svg:y="7.667cm">
          <draw:glue-point draw:id="4" svg:x="-5.433cm" svg:y="-3.946cm"/>
          <draw:glue-point draw:id="5" svg:x="-5.433cm" svg:y="2.929cm"/>
          <draw:glue-point draw:id="6" svg:x="5.007cm" svg:y="-3.573cm"/>
          <draw:glue-point draw:id="7" svg:x="5.417cm" svg:y="2.944cm"/>
          <draw:glue-point draw:id="8" svg:x="5.477cm" svg:y="-2.5cm"/>
          <draw:glue-point draw:id="9" svg:x="5.477cm" svg:y="1.25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type="line" svg:x1="10.973cm" svg:y1="8.461cm" svg:x2="16.474cm" svg:y2="8.476cm" draw:start-shape="id42" draw:start-glue-point="8" draw:end-shape="id36" draw:end-glue-point="4" svg:d="M10973 8461l5501 15" svg:viewBox="0 0 5502 16">
          <text:p/>
        </draw:connector>
        <draw:connector draw:style-name="gr1" draw:text-style-name="P1" draw:layer="layout" draw:type="line" svg:x1="6.676cm" svg:y1="2.31cm" svg:x2="6.68cm" svg:y2="5.427cm" draw:start-shape="id43" draw:start-glue-point="9" draw:end-shape="id30" draw:end-glue-point="0" svg:d="M6676 2310l4 3117" svg:viewBox="0 0 5 3118">
          <text:p/>
        </draw:connector>
        <draw:connector draw:style-name="gr39" draw:text-style-name="P1" draw:layer="layout" svg:x1="7.385cm" svg:y1="2.31cm" svg:x2="10.507cm" svg:y2="4.203cm" draw:start-shape="id43" draw:start-glue-point="6" draw:end-shape="id33" draw:end-glue-point="5" svg:d="M7385 2310v1893h3122" svg:viewBox="0 0 3123 1894">
          <text:p/>
        </draw:connector>
        <draw:custom-shape draw:style-name="gr3" draw:text-style-name="P4" xml:id="id30" draw:id="id30" draw:layer="layout" svg:width="0.566cm" svg:height="1.082cm" svg:x="6.397cm" svg:y="5.427cm">
          <draw:glue-point draw:id="4" svg:x="-5.433cm" svg:y="-3.946cm"/>
          <draw:glue-point draw:id="5" svg:x="-5.433cm" svg:y="2.929cm"/>
          <draw:glue-point draw:id="6" svg:x="5.417cm" svg:y="-3.087cm"/>
          <draw:glue-point draw:id="7" svg:x="5.477cm" svg:y="-1.375cm"/>
          <draw:glue-point draw:id="8" svg:x="5.477cm" svg:y="2.87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4">
          <draw:glue-point draw:id="4" svg:x="-3.063cm" svg:y="-5.11cm"/>
          <draw:glue-point draw:id="5" svg:x="-4.248cm" svg:y="-5cm"/>
          <draw:custom-shape draw:style-name="gr57" draw:text-style-name="P15" draw:layer="layout" svg:width="12.264cm" svg:height="3.475cm" svg:x="3.246cm" svg:y="16.892cm">
            <draw:glue-point draw:id="4" svg:x="-5cm" svg:y="-5cm"/>
            <draw:glue-point draw:id="5" svg:x="5cm" svg:y="-5cm"/>
            <draw:glue-point draw:id="6" svg:x="-5cm" svg:y="-5cm" draw:escape-direction="down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7" draw:layer="layout" svg:width="1.556cm" svg:height="0.779cm" svg:x="3.222cm" svg:y="16.892cm">
            <text:p text:style-name="P16"><text:span text:style-name="T9">loop</text:span></text:p>
            <draw:enhanced-geometry svg:viewBox="0 0 21600 21600" draw:mirror-horizontal="false" draw:mirror-vertical="false" draw:type="non-primitve" draw:enhanced-path="M 0 0 L 21600 0 19000 21600 0 21600 0 0 Z N"/>
          </draw:custom-shape>
        </draw:g>
        <draw:frame draw:style-name="gr27" draw:text-style-name="P19" draw:layer="layout" svg:width="4.127cm" svg:height="0.725cm" svg:x="4.793cm" svg:y="16.792cm">
          <draw:text-box>
            <text:p text:style-name="P18"><text:span text:style-name="T2">[wait for </text:span><text:span text:style-name="T2">message]</text:span></text:p>
          </draw:text-box>
        </draw:frame>
        <draw:frame draw:style-name="gr27" draw:text-style-name="P19" draw:layer="layout" svg:width="4.445cm" svg:height="0.725cm" svg:x="11.16cm" svg:y="13.292cm">
          <draw:text-box>
            <text:p text:style-name="P18"><text:span text:style-name="T2">[get subscribers]</text:span></text:p>
          </draw:text-box>
        </draw:frame>
        <draw:g draw:style-name="gr34">
          <draw:custom-shape draw:style-name="gr59" draw:text-style-name="P15" draw:layer="layout" svg:width="5.588cm" svg:height="2.3cm" svg:x="8.312cm" svg:y="17.7cm">
            <draw:glue-point draw:id="4" svg:x="-5cm" svg:y="-5cm"/>
            <draw:glue-point draw:id="5" svg:x="5cm" svg:y="-5cm"/>
            <draw:glue-point draw:id="6" svg:x="-5cm" svg:y="-5cm" draw:escape-direction="down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7" draw:layer="layout" svg:width="1.201cm" svg:height="0.779cm" svg:x="8.302cm" svg:y="17.7cm">
            <text:p text:style-name="P16"><text:span text:style-name="T9">alt</text:span></text:p>
            <draw:enhanced-geometry svg:viewBox="0 0 21600 21600" draw:mirror-horizontal="false" draw:mirror-vertical="false" draw:type="non-primitve" draw:enhanced-path="M 0 0 L 21600 0 19000 21600 0 21600 0 0 Z N"/>
          </draw:custom-shape>
        </draw:g>
        <draw:frame draw:style-name="gr27" draw:text-style-name="P19" draw:layer="layout" svg:width="4.445cm" svg:height="0.725cm" svg:x="9.737cm" svg:y="17.555cm">
          <draw:text-box>
            <text:p text:style-name="P18"><text:span text:style-name="T2">[messa</text:span><text:span text:style-name="T2">ge </text:span><text:span text:style-name="T2">availabl</text:span><text:span text:style-name="T2">e]</text:span></text:p>
          </draw:text-box>
        </draw:frame>
        <draw:custom-shape draw:style-name="gr46" draw:text-style-name="P4" xml:id="id44" draw:id="id44" draw:layer="layout" svg:width="0.566cm" svg:height="1.487cm" svg:x="11.007cm" svg:y="18.245cm">
          <draw:glue-point draw:id="4" svg:x="-5.433cm" svg:y="-3.946cm"/>
          <draw:glue-point draw:id="5" svg:x="-5.433cm" svg:y="2.929cm"/>
          <draw:glue-point draw:id="6" svg:x="5.007cm" svg:y="-3.573cm"/>
          <draw:glue-point draw:id="7" svg:x="5.417cm" svg:y="2.944cm"/>
          <draw:glue-point draw:id="8" svg:x="-5cm" svg:y="2.483cm"/>
          <draw:glue-point draw:id="9" svg:x="-5cm" svg:y="-0.653cm"/>
          <draw:glue-point draw:id="10" svg:x="-5cm" svg:y="-3.14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type="line" svg:x1="14.652cm" svg:y1="18.445cm" svg:x2="11.573cm" svg:y2="18.457cm" draw:end-shape="id44" draw:end-glue-point="6" svg:d="M14652 18445l-3079 12" svg:viewBox="0 0 3080 13">
          <text:p/>
        </draw:connector>
        <draw:frame draw:style-name="gr27" draw:text-style-name="P14" draw:layer="layout" svg:width="2.223cm" svg:height="0.645cm" svg:x="11.777cm" svg:y="18.462cm">
          <draw:text-box>
            <text:p text:style-name="P20"><text:span text:style-name="T7">message </text:span></text:p>
          </draw:text-box>
        </draw:frame>
        <draw:connector draw:style-name="gr5" draw:text-style-name="P8" draw:layer="layout" draw:type="line" svg:x1="11.007cm" svg:y1="18.891cm" svg:x2="2.305cm" svg:y2="18.897cm" draw:start-shape="id44" draw:start-glue-point="9" draw:end-shape="id45" draw:end-glue-point="4" svg:d="M11007 18891l-8702 6" svg:viewBox="0 0 8703 7">
          <text:p/>
        </draw:connector>
        <draw:frame draw:style-name="gr14" draw:text-style-name="P14" draw:layer="layout" svg:width="4.127cm" svg:height="1.039cm" svg:x="3.222cm" svg:y="18.78cm">
          <draw:text-box>
            <text:p text:style-name="P20"><text:span text:style-name="T7">&lt;&lt;callback&gt;&gt;</text:span></text:p>
            <text:p text:style-name="P20"><text:span text:style-name="T7">wifi_listener(messag</text:span><text:span text:style-name="T7">e)</text:span></text:p>
          </draw:text-box>
        </draw:frame>
        <draw:frame draw:style-name="gr27" draw:text-style-name="P14" draw:layer="layout" svg:width="4.127cm" svg:height="0.645cm" svg:x="24.495cm" svg:y="15.605cm">
          <draw:text-box>
            <text:p text:style-name="P20"><text:span text:style-name="T7">(callback: wifi_listener)</text:span></text:p>
          </draw:text-box>
        </draw:frame>
        <draw:frame draw:style-name="gr47" draw:text-style-name="P14" draw:layer="layout" svg:width="1.924cm" svg:height="1.039cm" svg:x="-0.072cm" svg:y="18.78cm">
          <draw:text-box>
            <text:p><text:span text:style-name="T7">p</text:span><text:span text:style-name="T7">r</text:span><text:span text:style-name="T7">o</text:span><text:span text:style-name="T7">c</text:span><text:span text:style-name="T7">e</text:span><text:span text:style-name="T7">s</text:span><text:span text:style-name="T7">s</text:span></text:p>
            <text:p><text:span text:style-name="T7">m</text:span><text:span text:style-name="T7">e</text:span><text:span text:style-name="T7">s</text:span><text:span text:style-name="T7">s</text:span><text:span text:style-name="T7">a</text:span><text:span text:style-name="T7">g</text:span><text:span text:style-name="T7">e</text:span></text:p>
          </draw:text-box>
        </draw:frame>
        <draw:connector draw:style-name="gr1" draw:text-style-name="P1" draw:layer="layout" draw:type="line" svg:x1="23.541cm" svg:y1="2.31cm" svg:x2="23.577cm" svg:y2="11.06cm" draw:start-shape="id43" draw:start-glue-point="10" draw:end-shape="id40" draw:end-glue-point="0" svg:d="M23541 2310l36 8750" svg:viewBox="0 0 37 8751">
          <text:p/>
        </draw:connector>
        <draw:custom-shape draw:style-name="gr26" draw:text-style-name="P4" xml:id="id40" draw:id="id40" draw:layer="layout" svg:width="0.566cm" svg:height="1.158cm" svg:x="23.294cm" svg:y="11.06cm">
          <draw:glue-point draw:id="4" svg:x="-5.433cm" svg:y="-3.946cm"/>
          <draw:glue-point draw:id="5" svg:x="-5.433cm" svg:y="2.929cm"/>
          <draw:glue-point draw:id="6" svg:x="5.007cm" svg:y="-3.573cm"/>
          <draw:glue-point draw:id="7" svg:x="5.417cm" svg:y="2.944cm"/>
          <draw:glue-point draw:id="8" svg:x="-5cm" svg:y="2.48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type="line" svg:x1="27.482cm" svg:y1="11.194cm" svg:x2="23.86cm" svg:y2="11.226cm" draw:start-shape="id39" draw:start-glue-point="3" draw:end-shape="id40" draw:end-glue-point="6" svg:d="M27482 11194l-3622 32" svg:viewBox="0 0 3623 33">
          <text:p/>
        </draw:connector>
        <draw:connector draw:style-name="gr39" draw:text-style-name="P1" draw:layer="layout" svg:x1="28.575cm" svg:y1="13.714cm" svg:x2="28.048cm" svg:y2="10.717cm" draw:end-shape="id39" draw:end-glue-point="4" svg:d="M28575 13714v-2997h-527" svg:viewBox="0 0 528 2998">
          <text:p/>
        </draw:connector>
        <draw:custom-shape draw:style-name="gr61" draw:text-style-name="P6" xml:id="id46" draw:id="id46" draw:layer="layout" svg:width="4.445cm" svg:height="0.67cm" svg:x="4.81cm" svg:y="8.902cm">
          <draw:glue-point draw:id="4" svg:x="-3.21cm" svg:y="5cm"/>
          <text:p text:style-name="P5"><text:span text:style-name="T2">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" draw:layer="layout" svg:x1="11.015cm" svg:y1="6.655cm" svg:x2="10.973cm" svg:y2="8.12cm" draw:start-shape="id41" draw:start-glue-point="8" draw:end-shape="id42" draw:end-glue-point="6" svg:d="M11015 6655h527v1465h-569" svg:viewBox="0 0 570 1466">
          <text:p/>
        </draw:connector>
        <draw:connector draw:style-name="gr21" draw:text-style-name="P1" draw:layer="layout" svg:x1="10.407cm" svg:y1="8.002cm" svg:x2="7.032cm" svg:y2="8.902cm" draw:start-shape="id42" draw:start-glue-point="4" draw:end-shape="id46" draw:end-glue-point="0" svg:d="M10407 8002h-3375v900" svg:viewBox="0 0 3376 901">
          <text:p/>
        </draw:connector>
        <draw:connector draw:style-name="gr5" draw:text-style-name="P1" draw:layer="layout" draw:type="line" svg:x1="10.407cm" svg:y1="10.183cm" svg:x2="2.365cm" svg:y2="10.294cm" draw:start-shape="id42" draw:start-glue-point="5" draw:end-shape="id29" draw:end-glue-point="6" svg:d="M10407 10183l-8042 111" svg:viewBox="0 0 8043 112">
          <text:p/>
        </draw:connector>
        <draw:frame draw:style-name="gr14" draw:text-style-name="P14" draw:layer="layout" svg:width="2.858cm" svg:height="0.645cm" svg:x="7.35cm" svg:y="7.985cm">
          <draw:text-box>
            <text:p><text:span text:style-name="T7">create queue</text:span></text:p>
          </draw:text-box>
        </draw:frame>
        <draw:frame draw:style-name="gr14" draw:text-style-name="P14" draw:layer="layout" svg:width="2.858cm" svg:height="0.645cm" svg:x="2.904cm" svg:y="9.572cm">
          <draw:text-box>
            <text:p><text:span text:style-name="T7">queu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_28_Rounded_29_" draw:display-name="Dash (Rounded)" draw:style="round" draw:dots1="1" draw:dots1-length="201%" draw:distance="199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nk</meta:initial-creator>
    <meta:creation-date>2026-06-10T16:33:51.730017677</meta:creation-date>
    <dc:date>2026-06-16T18:03:04.630653568</dc:date>
    <dc:creator>Henk</dc:creator>
    <meta:editing-duration>PT30M32S</meta:editing-duration>
    <meta:editing-cycles>6</meta:editing-cycles>
    <meta:generator>LibreOffice/24.2.7.2$Linux_X86_64 LibreOffice_project/420$Build-2</meta:generator>
    <meta:document-statistic meta:object-count="150"/>
  </office:meta>
</office:document-meta>
</file>