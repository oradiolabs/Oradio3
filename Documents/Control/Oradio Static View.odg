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4.298cm" fo:min-width="12.8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9cm" fo:min-width="12.78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54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6.23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6.44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8.18cm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8.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68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21.589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21.19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1.46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2.943cm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2.9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95cm" fo:min-width="7.4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91cm" fo:min-width="7.385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26.007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45cm" fo:min-width="25.53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25.859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6.753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6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10.3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7.182cm" fo:min-width="7.4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4cm" fo:min-width="7.386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48cm" fo:min-width="6.53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23.788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cm" fo:min-width="23.579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5cm" fo:min-width="23.876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165cm" fo:padding-top="0.151cm" fo:padding-bottom="0.151cm" fo:padding-left="0.276cm" fo:padding-right="0.276cm" loext:decorative="false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93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747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>
      <style:graphic-properties draw:textarea-horizontal-align="justify" draw:textarea-vertical-align="middle" draw:auto-grow-height="false" fo:min-height="0.45cm" fo:min-width="26.64cm" style:writing-mode="lr-tb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45cm" fo:min-width="26.394cm" style:writing-mode="lr-tb" loext:decorative="false"/>
      <style:paragraph-properties style:writing-mode="lr-tb"/>
    </style:style>
    <style:style style:name="gr15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388cm" fo:padding-top="0.151cm" fo:padding-bottom="0.151cm" fo:padding-left="0.276cm" fo:padding-right="0.276cm" loext:decorative="false"/>
    </style:style>
    <style:style style:name="gr1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3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in-height="0.153cm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19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1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22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0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41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2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9.2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4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9cm" fo:min-width="10.97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6.2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6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36cm" fo:min-width="5.48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2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2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2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44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4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9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0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start"/>
      <style:text-properties fo:font-size="12pt"/>
    </style:style>
    <style:style style:name="P29" style:family="paragraph">
      <loext:graphic-properties draw:fill="none"/>
      <style:paragraph-properties fo:text-align="start" style:writing-mode="lr-tb"/>
      <style:text-properties fo:font-size="12pt"/>
    </style:style>
    <style:style style:name="P3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star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Utilities" draw:style-name="dp1" draw:master-page-name="Default">
        <draw:g draw:style-name="gr1">
          <draw:custom-shape draw:style-name="gr2" draw:text-style-name="P2" draw:layer="layout" svg:width="3.175cm" svg:height="0.679cm" svg:x="3.135cm" svg:y="5.144cm">
            <draw:glue-point draw:id="4" svg:x="0.5cm" svg:y="0cm" draw:align="top-left"/>
            <text:p text:style-name="P1"><text:span text:style-name="T1">&lt;&lt;Module&gt;&gt;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3.335cm" svg:height="4.507cm" svg:x="3.135cm" svg:y="5.823cm">
            <draw:glue-point draw:id="4" svg:x="0.501cm" svg:y="-0.003cm" draw:align="bottom-left" draw:escape-direction="down"/>
            <draw:glue-point draw:id="5" svg:x="-0.501cm" svg:y="-0.003cm" draw:align="bottom-right" draw:escape-direction="down"/>
            <draw:glue-point draw:id="6" svg:x="0cm" svg:y="-0.252cm" draw:align="bottom-left" draw:escape-direction="left"/>
            <draw:glue-point draw:id="7" svg:x="0cm" svg:y="-0.252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335cm" svg:height="1.271cm" svg:x="3.135cm" svg:y="10.329cm">
            <text:p text:style-name="P4"><text:span text:style-name="T2">Every modules/classes can use these utilities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7.041cm" svg:height="0.7cm" svg:x="1.42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6.739cm" svg:height="0.7cm" svg:x="1.518cm" svg:y="3.5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6.946cm" svg:height="0.7cm" svg:x="1.516cm" svg:y="13.1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8.732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1.153cm" svg:y="-4.294cm"/>
          <draw:glue-point draw:id="5" svg:x="3.461cm" svg:y="-5.146cm"/>
          <draw:custom-shape draw:style-name="gr9" draw:text-style-name="P10" draw:layer="layout" svg:width="4.047cm" svg:height="1.153cm" svg:x="10.583cm" svg:y="6.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system_sounds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4.047cm" svg:height="0.761cm" svg:x="10.583cm" svg:y="7.873cm">
            <text:p text:style-name="P11"><text:span text:style-name="T4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3" draw:layer="layout" svg:width="18.732cm" svg:height="0.952cm" svg:x="1cm" svg:y="1.1cm">
          <text:p text:style-name="P6">Static view: Utiliti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7.67cm" svg:y="4.932cm">
          <draw:text-box>
            <text:p><text:span text:style-name="T5">&lt;&lt;uses&gt;&gt;</text:span></text:p>
          </draw:text-box>
        </draw:frame>
        <draw:g draw:style-name="gr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10" draw:layer="layout" svg:width="4.465cm" svg:height="1.153cm" svg:x="4.375cm" svg:y="6.7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oradio_logging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4.465cm" svg:height="2.077cm" svg:x="4.375cm" svg:y="7.87cm">
            <text:p text:style-name="P11"><text:span text:style-name="T4">+ oradio_log.debug()</text:span></text:p>
            <text:p text:style-name="P11"><text:span text:style-name="T4">+ oradio_log.warning()</text:span></text:p>
            <text:p text:style-name="P11"><text:span text:style-name="T4">+ oradio_log.info()</text:span></text:p>
            <text:p text:style-name="P11"><text:span text:style-name="T4">+ oradio_log.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Throttle" draw:style-name="dp1" draw:master-page-name="Default">
        <draw:custom-shape draw:style-name="gr15" draw:text-style-name="P7" draw:layer="layout" svg:width="22.089cm" svg:height="0.7cm" svg:x="1.453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1.697cm" svg:height="0.7cm" svg:x="1.579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" draw:id="id2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glue-point draw:id="46" svg:x="-2.202cm" svg:y="5.141cm"/>
          <draw:custom-shape draw:style-name="gr17" draw:text-style-name="P16" draw:layer="layout" svg:width="21.77cm" svg:height="1.153cm" svg:x="1.57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8" draw:layer="layout" svg:width="21.77cm" svg:height="0.679cm" svg:x="1.57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7" draw:layer="layout" svg:width="21.965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7.44cm" svg:y="7.032cm">
          <draw:text-box>
            <text:p><text:span text:style-name="T5">&lt;&lt;uses&gt;&gt;</text:span></text:p>
          </draw:text-box>
        </draw:frame>
        <draw:custom-shape draw:style-name="gr20" draw:text-style-name="P8" draw:layer="layout" svg:width="23.495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9" draw:layer="layout" svg:x1="5.921cm" svg:y1="7.802cm" svg:x2="5.93cm" svg:y2="5.27cm" draw:start-shape="id1" draw:end-shape="id2" draw:end-glue-point="4" svg:d="M5921 7802v-1267h9v-1265" svg:viewBox="0 0 10 2533">
          <text:p/>
        </draw:connector>
        <draw:custom-shape draw:style-name="gr22" draw:text-style-name="P13" draw:layer="layout" svg:width="23.495cm" svg:height="0.952cm" svg:x="1cm" svg:y="1.1cm">
          <text:p text:style-name="P6">Static view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" draw:id="id1">
          <draw:custom-shape draw:style-name="gr23" draw:text-style-name="P10" draw:layer="layout" svg:width="7.302cm" svg:height="1.153cm" svg:x="2.27cm" svg:y="7.8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throttled_monitor.py</text:span></text:p>
            <text:p text:style-name="P9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7.302cm" svg:height="0.761cm" svg:x="2.27cm" svg:y="8.955cm">
            <text:p text:style-name="P20"><text:span text:style-name="T4">-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7.302cm" svg:height="0.599cm" svg:x="2.27cm" svg:y="9.7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6" draw:text-style-name="P22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7"><text:span text:style-name="T3">throttled_monitor.RpiThrottlingMonitor</text:span></text:p>
            <text:p text:style-name="P21"><text:span text:style-name="T3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7.62cm" svg:height="0.591cm" svg:x="4.58cm" svg:y="13.474cm">
            <text:p text:style-name="P11"><text:span text:style-name="T4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2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init()</text:span></text:p>
            <text:p text:style-name="P11"><text:span text:style-name="T4">+ start()</text:span></text:p>
            <text:p text:style-name="P11"><text:span text:style-name="T4">+ stop()</text:span></text:p>
            <text:p text:style-name="P11"><text:span text:style-name="T4">+ run()</text:span></text:p>
            <text:p text:style-name="P11"><text:span text:style-name="T4">+ force_throttled()</text:span></text:p>
            <text:p text:style-name="P11"><text:span text:style-name="T4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" draw:text-style-name="P19" draw:layer="layout" svg:x1="8.39cm" svg:y1="12.321cm" svg:x2="5.921cm" svg:y2="10.315cm" draw:start-shape="id3" draw:end-shape="id1" svg:d="M8390 12321v-1004h-2469v-1002" svg:viewBox="0 0 2470 2007">
          <text:p/>
        </draw:connector>
        <draw:frame draw:style-name="gr12" draw:text-style-name="P14" draw:layer="layout" svg:width="3.085cm" svg:height="0.725cm" svg:x="6.17cm" svg:y="10.525cm">
          <draw:text-box>
            <text:p><text:span text:style-name="T5">&lt;&lt;uses&gt;&gt;</text:span></text:p>
          </draw:text-box>
        </draw:frame>
        <draw:g draw:style-name="gr1" xml:id="id4" draw:id="id4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1">
            <draw:g draw:style-name="gr1">
              <draw:g draw:style-name="gr1">
                <draw:custom-shape draw:style-name="gr30" draw:text-style-name="P24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23"><text:span text:style-name="T3">&lt;&lt;thread&gt;&gt;</text:span></text:p>
                  <text:p text:style-name="P23"><text:span text:style-name="T3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2" draw:layer="layout" svg:width="5.64cm" svg:height="1.037cm" svg:x="15.997cm" svg:y="14.654cm">
                  <text:p text:style-name="P11"><text:span text:style-name="T4">+ stop_event: Event()</text:span></text:p>
                  <text:p text:style-name="P11"><text:span text:style-name="T4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12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11"><text:span text:style-name="T4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3" draw:text-style-name="P19" draw:layer="layout" svg:x1="15.997cm" svg:y1="14.868cm" svg:x2="12.2cm" svg:y2="14.477cm" draw:start-shape="id4" draw:end-shape="id3" draw:end-glue-point="1" svg:d="M15997 14868h-1898v-391h-1899" svg:viewBox="0 0 3798 392">
          <text:p/>
        </draw:connector>
        <draw:frame draw:style-name="gr12" draw:text-style-name="P14" draw:layer="layout" svg:width="3.81cm" svg:height="0.725cm" svg:x="12.43cm" svg:y="13.292cm">
          <draw:text-box>
            <text:p><text:span text:style-name="T5">&lt;&lt;consists of&gt;&gt;</text:span></text:p>
          </draw:text-box>
        </draw:frame>
        <draw:custom-shape draw:style-name="gr34" draw:text-style-name="P26" xml:id="id5" draw:id="id5" draw:layer="layout" svg:width="6.667cm" svg:height="1.5cm" svg:x="15.288cm" svg:y="11.265cm">
          <text:p text:style-name="P25"><text:span text:style-name="T6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5" draw:text-style-name="P27" draw:layer="layout" draw:type="line" svg:x1="12.2cm" svg:y1="12.748cm" svg:x2="15.288cm" svg:y2="12.015cm" draw:start-shape="id3" draw:start-glue-point="7" draw:end-shape="id5" draw:end-glue-point="5" svg:d="M12200 12748l3088-733" svg:viewBox="0 0 3089 734">
          <text:p/>
        </draw:connector>
      </draw:page>
      <draw:page draw:name="Messages" draw:style-name="dp1" draw:master-page-name="Default">
        <draw:g draw:style-name="gr1" xml:id="id7" draw:id="id7">
          <draw:g draw:style-name="gr1">
            <draw:g draw:style-name="gr1">
              <draw:custom-shape draw:style-name="gr36" draw:text-style-name="P2" draw:layer="layout" svg:width="4.005cm" svg:height="0.679cm" svg:x="17.51cm" svg:y="7.324cm">
                <draw:glue-point draw:id="4" svg:x="0.5cm" svg:y="0cm" draw:align="top-left"/>
                <text:p text:style-name="P1"><text:span text:style-name="T1">&lt;&lt;Module&gt;&gt; <text:s/>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3" draw:layer="layout" svg:width="7.937cm" svg:height="1.204cm" svg:x="17.51cm" svg:y="8.003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 text:style-name="P17"><text:span text:style-name="T3">All module/classes can publish an error mess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8" draw:text-style-name="P29" draw:layer="layout" svg:width="7.937cm" svg:height="0.493cm" svg:x="17.51cm" svg:y="9.207cm">
              <text:p text:style-name="P28"><text:span text:style-name="T2">- publish_error_message()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7" draw:layer="layout" svg:width="26.507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26.037cm" svg:height="0.7cm" svg:x="1.633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glue-point draw:id="45" svg:x="-2.202cm" svg:y="5.141cm"/>
          <draw:custom-shape draw:style-name="gr41" draw:text-style-name="P16" draw:layer="layout" svg:width="26.125cm" svg:height="1.153cm" svg:x="1.629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26.125cm" svg:height="0.679cm" svg:x="1.629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7" draw:layer="layout" svg:width="26.359cm" svg:height="0.7cm" svg:x="1.311cm" svg:y="19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8" draw:layer="layout" svg:width="27.30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27.305cm" svg:height="0.952cm" svg:x="1cm" svg:y="1.1cm">
          <text:p text:style-name="P6">Static view: Messag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11.25cm" svg:y="11.387cm">
          <draw:text-box>
            <text:p><text:span text:style-name="T5">&lt;&lt;uses&gt;&gt;</text:span></text:p>
          </draw:text-box>
          <draw:glue-point draw:id="4" svg:x="4.998cm" svg:y="-4.993cm"/>
          <draw:glue-point draw:id="5" svg:x="4.998cm" svg:y="-4.993cm"/>
          <draw:glue-point draw:id="6" svg:x="4.998cm" svg:y="-4.993cm"/>
        </draw:frame>
        <draw:g draw:style-name="gr1" xml:id="id6" draw:id="id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46" draw:text-style-name="P24" draw:layer="layout" svg:width="10.807cm" svg:height="1.153cm" svg:x="12.045cm" svg:y="15.3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0.807cm" svg:height="0.435cm" svg:x="12.045cm" svg:y="16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2" draw:layer="layout" svg:width="10.807cm" svg:height="0.993cm" svg:x="12.045cm" svg:y="16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message: CommandMessage)</text:span></text:p>
            <text:p text:style-name="P11"><text:span text:style-name="T4">+ publish_error_message(message: Error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 draw:style-name="gr1">
            <draw:glue-point draw:id="4" svg:x="0.501cm" svg:y="-0.003cm" draw:align="bottom-left"/>
            <draw:glue-point draw:id="5" svg:x="-0.501cm" svg:y="-0.003cm" draw:align="bottom-right"/>
            <draw:glue-point draw:id="6" svg:x="0cm" svg:y="-0.253cm" draw:align="bottom-right"/>
            <draw:glue-point draw:id="7" svg:x="0cm" svg:y="-0.253cm" draw:align="bottom-left"/>
            <draw:glue-point draw:id="8" svg:x="0cm" svg:y="0.751cm" draw:align="top-left"/>
            <draw:glue-point draw:id="9" svg:x="0cm" svg:y="0.751cm" draw:align="top-right"/>
            <draw:glue-point draw:id="10" svg:x="0.501cm" svg:y="0cm" draw:align="top-left"/>
            <draw:glue-point draw:id="11" svg:x="-0.501cm" svg:y="0.501cm" draw:align="top-right" draw:escape-direction="up"/>
            <draw:g draw:style-name="gr1">
              <draw:custom-shape draw:style-name="gr49" draw:text-style-name="P30" draw:layer="layout" svg:width="3.425cm" svg:height="0.679cm" svg:x="1.952cm" svg:y="7.563cm">
                <draw:glue-point draw:id="4" svg:x="0.5cm" svg:y="0cm" draw:align="top-left"/>
                <text:p text:style-name="P15"><text:span text:style-name="T3"><text:s text:c="2"/></text:span><text:span text:style-name="T3">&lt;&lt;class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3" draw:layer="layout" svg:width="7.938cm" svg:height="7.391cm" svg:x="1.952cm" svg:y="8.242cm">
                <draw:glue-point draw:id="4" svg:x="0.501cm" svg:y="-0.003cm" draw:align="bottom-left" draw:escape-direction="down"/>
                <draw:glue-point draw:id="5" svg:x="-0.501cm" svg:y="-0.003cm" draw:align="bottom-right" draw:escape-direction="down"/>
                <draw:glue-point draw:id="6" svg:x="0cm" svg:y="-0.252cm" draw:align="bottom-left" draw:escape-direction="left"/>
                <draw:glue-point draw:id="7" svg:x="0cm" svg:y="-0.252cm" draw:align="bottom-right" draw:escape-direction="right"/>
                <draw:glue-point draw:id="8" svg:x="0cm" svg:y="0.23cm" draw:align="top-left" draw:escape-direction="left"/>
                <draw:glue-point draw:id="9" svg:x="0cm" svg:y="0.23cm" draw:align="top-right" draw:escape-direction="up"/>
                <draw:glue-point draw:id="10" svg:x="-0.501cm" svg:y="0cm" draw:align="top-right" draw:escape-direction="up"/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51" draw:text-style-name="P32" draw:layer="layout" svg:width="7.938cm" svg:height="1.242cm" svg:x="1.952cm" svg:y="15.633cm">
            <text:p text:style-name="P31"><text:span text:style-name="T5">- publish_command_message()</text:span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4" draw:layer="layout" svg:width="6.985cm" svg:height="0.85cm" svg:x="2.487cm" svg:y="8.82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volume_control.VolumeControl</text:span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6.985cm" svg:height="0.85cm" svg:x="2.487cm" svg:y="9.69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spotify_connect.SpotifyConnec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6.985cm" svg:height="0.85cm" svg:x="2.487cm" svg:y="10.56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eb_service.WebService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6.985cm" svg:height="0.85cm" svg:x="2.487cm" svg:y="11.42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usb_service.USBServi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6.985cm" svg:height="0.85cm" svg:x="2.487cm" svg:y="12.21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touch_buttons.TouchButtons</text:span></text:p>
          <draw:enhanced-geometry svg:viewBox="0 0 21600 21600" draw:type="rectangle" draw:enhanced-path="M 0 0 L 21600 0 21600 21600 0 21600 0 0 Z N"/>
        </draw:custom-shape>
        <draw:connector draw:style-name="gr57" draw:text-style-name="P19" draw:layer="layout" svg:x1="20.615cm" svg:y1="15.311cm" svg:x2="21.478cm" svg:y2="9.7cm" draw:start-shape="id6" draw:start-glue-point="7" draw:end-shape="id7" draw:end-glue-point="2" svg:d="M20615 15311v-2806h863v-2805" svg:viewBox="0 0 864 5612">
          <text:p/>
        </draw:connector>
        <draw:connector draw:style-name="gr58" draw:text-style-name="P19" draw:layer="layout" svg:x1="17.448cm" svg:y1="15.311cm" svg:x2="9.89cm" svg:y2="12.219cm" draw:start-shape="id6" draw:start-glue-point="0" draw:end-shape="id8" svg:d="M17448 15311v-3092h-7558" svg:viewBox="0 0 7559 3093">
          <text:p/>
        </draw:connector>
        <draw:custom-shape draw:style-name="gr59" draw:text-style-name="P34" draw:layer="layout" svg:width="6.985cm" svg:height="0.85cm" svg:x="2.487cm" svg:y="13.06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3"><text:span text:style-name="T7">wifi_service.WifiService</text:span></text:p>
          <draw:enhanced-geometry svg:viewBox="0 0 21600 21600" draw:type="rectangle" draw:enhanced-path="M 0 0 L 21600 0 21600 21600 0 21600 0 0 Z N"/>
        </draw:custom-shape>
      </draw:page>
      <draw:page draw:name="Remote monitoring" draw:style-name="dp1" draw:master-page-name="Default">
        <draw:custom-shape draw:style-name="gr60" draw:text-style-name="P7" draw:layer="layout" svg:width="24.288cm" svg:height="0.7cm" svg:x="1.47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" draw:layer="layout" svg:width="24.079cm" svg:height="0.7cm" svg:x="1.608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0" draw:id="id10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62" draw:text-style-name="P16" draw:layer="layout" svg:width="24.161cm" svg:height="1.153cm" svg:x="1.604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8" draw:layer="layout" svg:width="24.161cm" svg:height="0.679cm" svg:x="1.604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4" draw:text-style-name="P7" draw:layer="layout" svg:width="24.376cm" svg:height="0.7cm" svg:x="1.311cm" svg:y="18.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582cm" svg:y="6.715cm">
          <draw:text-box>
            <text:p><text:span text:style-name="T5">&lt;&lt;uses&gt;&gt;</text:span></text:p>
          </draw:text-box>
        </draw:frame>
        <draw:custom-shape draw:style-name="gr65" draw:text-style-name="P8" draw:layer="layout" svg:width="25.71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66" draw:text-style-name="P10" draw:layer="layout" svg:width="7.19cm" svg:height="1.153cm" svg:x="1.952cm" svg:y="7.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remote_monitoring.RM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2" draw:layer="layout" svg:width="7.19cm" svg:height="1.002cm" svg:x="1.952cm" svg:y="9.013cm">
              <text:p text:style-name="P20"><text:span text:style-name="T4">- stop_monitor: Event</text:span></text:p>
              <text:p text:style-name="P20"><text:span text:style-name="T4">- wifi_cmd_queue: subscribe_command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2" draw:layer="layout" svg:width="7.19cm" svg:height="0.993cm" svg:x="1.952cm" svg:y="10.01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end_message()</text:span></text:p>
              <text:p text:style-name="P11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9" draw:text-style-name="P19" draw:layer="layout" draw:line-skew="0.345cm" svg:x1="7.145cm" svg:y1="7.861cm" svg:x2="6.436cm" svg:y2="5.27cm" draw:start-shape="id9" draw:start-glue-point="14" draw:end-shape="id10" draw:end-glue-point="4" svg:d="M7145 7861v-952h-709v-1639" svg:viewBox="0 0 710 2592">
          <text:p/>
        </draw:connector>
        <draw:custom-shape draw:style-name="gr70" draw:text-style-name="P13" draw:layer="layout" svg:width="25.717cm" svg:height="0.952cm" svg:x="1cm" svg:y="1.1cm">
          <text:p text:style-name="P6">Static view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9" draw:layer="layout" svg:x1="11.73cm" svg:y1="9.242cm" svg:x2="9.141cm" svg:y2="8.496cm" draw:start-shape="id11" draw:end-shape="id9" draw:end-glue-point="13" svg:d="M11730 9242h-1294v-746h-1295" svg:viewBox="0 0 2590 747">
          <text:p/>
        </draw:connector>
        <draw:frame draw:style-name="gr12" draw:text-style-name="P14" draw:layer="layout" svg:width="3.085cm" svg:height="0.725cm" svg:x="1.635cm" svg:y="12.34cm">
          <draw:text-box>
            <text:p><text:span text:style-name="T5">&lt;&lt;uses&gt;&gt;</text:span></text:p>
          </draw:text-box>
        </draw:fram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2" draw:text-style-name="P10" draw:layer="layout" svg:width="4.445cm" svg:height="1.627cm" svg:x="1.952cm" svg:y="13.1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remote_monitoring.</text:span></text:p>
              <text:p text:style-name="P9"><text:span text:style-name="T3">Heartbeat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4.445cm" svg:height="0.761cm" svg:x="1.952cm" svg:y="14.8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2" draw:layer="layout" svg:width="4.445cm" svg:height="1.387cm" svg:x="1.952cm" svg:y="15.5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tart_heartbeat()</text:span></text:p>
              <text:p text:style-name="P11"><text:span text:style-name="T4">+ stop_heartbeat()</text:span></text:p>
              <text:p text:style-name="P11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1">
            <draw:custom-shape draw:style-name="gr75" draw:text-style-name="P10" draw:layer="layout" svg:width="4.18cm" svg:height="1.153cm" svg:x="9.52cm" svg:y="14.7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BaseClass&gt;&gt;</text:span></text:p>
              <text:p text:style-name="P9"><text:span text:style-name="T3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2" draw:layer="layout" svg:width="4.18cm" svg:height="0.761cm" svg:x="9.52cm" svg:y="15.908cm">
              <text:p text:style-name="P20"><text:span text:style-name="T4">-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2" draw:layer="layout" svg:width="4.18cm" svg:height="0.993cm" svg:x="9.52cm" svg:y="16.6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tart()</text:span></text:p>
              <text:p text:style-name="P11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8" draw:text-style-name="P19" draw:layer="layout" svg:x1="5.162cm" svg:y1="13.183cm" svg:x2="3.951cm" svg:y2="11.008cm" draw:start-shape="id12" draw:start-glue-point="14" draw:end-shape="id9" draw:end-glue-point="8" svg:d="M5162 13183v-1089h-1211v-1086" svg:viewBox="0 0 1212 2176">
          <text:p/>
        </draw:connector>
        <draw:frame draw:style-name="gr12" draw:text-style-name="P14" draw:layer="layout" svg:width="3.085cm" svg:height="0.725cm" svg:x="9.255cm" svg:y="7.26cm">
          <draw:text-box>
            <text:p><text:span text:style-name="T5">&lt;&lt;uses&gt;&gt;</text:span></text:p>
          </draw:text-box>
        </draw:frame>
        <draw:g draw:style-name="gr1" xml:id="id11" draw:id="id1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9" draw:text-style-name="P24" draw:layer="layout" svg:width="6.35cm" svg:height="1.153cm" svg:x="11.73cm" svg:y="7.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layout" svg:width="6.35cm" svg:height="0.956cm" svg:x="11.73cm" svg:y="9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6.35cm" svg:height="0.599cm" svg:x="11.73cm" svg:y="9.9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2" draw:text-style-name="P24" draw:layer="layout" svg:width="8.39cm" svg:height="1.153cm" svg:x="12.4cm" svg:y="11.47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wifi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2" draw:layer="layout" svg:width="8.39cm" svg:height="0.784cm" svg:x="12.4cm" svg:y="12.63cm">
            <text:p text:style-name="P11"><text:span text:style-name="T4">+ stop_monitor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2" draw:layer="layout" svg:width="8.39cm" svg:height="0.599cm" svg:x="12.4cm" svg:y="13.4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safe_get(wifi_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5" draw:text-style-name="P26" xml:id="id14" draw:id="id14" draw:layer="layout" svg:width="6.667cm" svg:height="1.5cm" svg:x="19.285cm" svg:y="8.937cm">
          <text:p text:style-name="P25"><text:span text:style-name="T6">The wifi_monitor thread waits for wifi topic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6" draw:text-style-name="P27" draw:layer="layout" draw:type="line" svg:x1="20.79cm" svg:y1="12.479cm" svg:x2="22.618cm" svg:y2="10.437cm" draw:start-shape="id13" draw:start-glue-point="23" draw:end-shape="id14" draw:end-glue-point="2" svg:d="M20790 12479l1828-2042" svg:viewBox="0 0 1829 2043">
          <text:p/>
        </draw:connector>
        <draw:connector draw:style-name="gr87" draw:text-style-name="P19" draw:layer="layout" svg:x1="12.401cm" svg:y1="13.469cm" svg:x2="7.145cm" svg:y2="11.008cm" draw:start-shape="id13" draw:start-glue-point="11" draw:end-shape="id9" draw:end-glue-point="9" svg:d="M12401 13469h-5256v-2461" svg:viewBox="0 0 5257 2462">
          <text:p/>
        </draw:connector>
        <draw:frame draw:style-name="gr12" draw:text-style-name="P14" draw:layer="layout" svg:width="3.81cm" svg:height="0.725cm" svg:x="8.62cm" svg:y="12.747cm">
          <draw:text-box>
            <text:p><text:span text:style-name="T5">&lt;&lt;consists of&gt;&gt;</text:span></text:p>
          </draw:text-box>
        </draw:frame>
        <draw:connector draw:style-name="gr88" draw:text-style-name="P19" draw:layer="layout" svg:x1="9.521cm" svg:y1="17.118cm" svg:x2="6.396cm" svg:y2="16.413cm" draw:start-shape="id15" draw:start-glue-point="11" draw:end-shape="id12" draw:end-glue-point="12" svg:d="M9521 17118h-1563v-705h-1562" svg:viewBox="0 0 3126 706">
          <text:p/>
        </draw:connector>
        <draw:frame draw:style-name="gr12" draw:text-style-name="P14" draw:layer="layout" svg:width="3.81cm" svg:height="0.725cm" svg:x="5.127cm" svg:y="17.42cm">
          <draw:text-box>
            <text:p><text:span text:style-name="T5">&lt;&lt;consists of&gt;&gt;</text:span></text:p>
          </draw:text-box>
        </draw:frame>
      </draw:page>
      <draw:page draw:name="Web service" draw:style-name="dp1" draw:master-page-name="Default">
        <draw:custom-shape draw:style-name="gr89" draw:text-style-name="P7" draw:layer="layout" svg:width="23.589cm" svg:height="0.7cm" svg:x="1.46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7" draw:layer="layout" svg:width="23.452cm" svg:height="0.7cm" svg:x="1.602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7" draw:id="id1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91" draw:text-style-name="P16" draw:layer="layout" svg:width="23.532cm" svg:height="1.153cm" svg:x="1.598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8" draw:layer="layout" svg:width="23.532cm" svg:height="0.679cm" svg:x="1.598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7" draw:layer="layout" svg:width="23.743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20.457cm" svg:y="6.307cm">
          <draw:text-box>
            <text:p><text:span text:style-name="T5">&lt;&lt;uses&gt;&gt;</text:span></text:p>
          </draw:text-box>
        </draw:frame>
        <draw:custom-shape draw:style-name="gr94" draw:text-style-name="P8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6" draw:id="id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95" draw:text-style-name="P10" draw:layer="layout" svg:width="5.654cm" svg:height="1.627cm" svg:x="12.113cm" svg:y="7.2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eb_service.</text:span></text:p>
              <text:p text:style-name="P9"><text:span text:style-name="T3">Web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2" draw:layer="layout" svg:width="5.654cm" svg:height="0.949cm" svg:x="12.113cm" svg:y="8.895cm">
              <text:p text:style-name="P20"><text:span text:style-name="T4">- web_cmd_queue: Queue</text:span></text:p>
              <text:p text:style-name="P20"><text:span text:style-name="T4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36" draw:layer="layout" svg:width="5.654cm" svg:height="2.175cm" svg:x="12.113cm" svg:y="9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stop()</text:span></text:p>
              <text:p text:style-name="P35"><text:span text:style-name="T4">+ get_state()</text:span></text:p>
              <text:p text:style-name="P35"><text:span text:style-name="T4">+ star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8" draw:text-style-name="P19" draw:layer="layout" draw:line-skew="0.447cm" svg:x1="16.196cm" svg:y1="7.269cm" svg:x2="20.294cm" svg:y2="5.27cm" draw:start-shape="id16" draw:start-glue-point="14" draw:end-shape="id17" draw:end-glue-point="5" svg:d="M16196 7269v-554h4098v-1445" svg:viewBox="0 0 4099 2000">
          <text:p/>
        </draw:connector>
        <draw:custom-shape draw:style-name="gr99" draw:text-style-name="P13" draw:layer="layout" svg:width="24.765cm" svg:height="0.952cm" svg:x="1cm" svg:y="1.1cm">
          <text:p text:style-name="P6">Static view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8" draw:id="id1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00" draw:text-style-name="P10" draw:layer="layout" svg:width="4.763cm" svg:height="1.627cm" svg:x="19.2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eb_server.</text:span></text:p>
              <text:p text:style-name="P9"><text:span text:style-name="T3">UvicornServer</text:span></text:p>
              <text:p text:style-name="P9"><text:span text:style-name="T3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12" draw:layer="layout" svg:width="4.763cm" svg:height="0.473cm" svg:x="19.2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2" draw:layer="layout" svg:width="4.763cm" svg:height="1.781cm" svg:x="19.2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app:FastAPI)</text:span></text:p>
              <text:p text:style-name="P11"><text:span text:style-name="T4">+ run()</text:span></text:p>
              <text:p text:style-name="P11"><text:span text:style-name="T4">+ start()</text:span></text:p>
              <text:p text:style-name="P11"><text:span text:style-name="T4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03" draw:text-style-name="P10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3">fastapi_server.</text:span></text:p>
                <text:p text:style-name="P9"><text:span text:style-name="T3">api_ap</text:span></text:p>
                <text:p text:style-name="P9"><text:span text:style-name="T3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2" draw:layer="layout" svg:width="5.602cm" svg:height="0.676cm" svg:x="18.72cm" svg:y="15.644cm">
                <text:p text:style-name="P11"><text:span text:style-name="T4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2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4">+ @api_app.get()</text:span></text:p>
                <text:p text:style-name="P11"><text:span text:style-name="T4">+ @api_app.put()</text:span></text:p>
                <text:p text:style-name="P11"><text:span text:style-name="T4">+ @api_app.post()</text:span></text:p>
                <text:p text:style-name="P11"><text:span text:style-name="T4">+ @api_app.api_route()</text:span></text:p>
                <text:p text:style-name="P11"><text:span text:style-name="T4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2" draw:text-style-name="P14" draw:layer="layout" svg:width="3.81cm" svg:height="0.725cm" svg:x="18.145cm" svg:y="7.26cm">
          <draw:text-box>
            <text:p><text:span text:style-name="T5">&lt;&lt;consists of&gt;&gt;</text:span></text:p>
          </draw:text-box>
        </draw:frame>
        <draw:connector draw:style-name="gr106" draw:text-style-name="P19" draw:layer="layout" svg:x1="21.628cm" svg:y1="9.184cm" svg:x2="17.766cm" svg:y2="7.904cm" draw:start-shape="id18" draw:start-glue-point="0" draw:end-shape="id16" draw:end-glue-point="13" svg:d="M21628 9184v-1280h-3862" svg:viewBox="0 0 3863 1281">
          <text:p/>
        </draw:connector>
        <draw:connector draw:style-name="gr107" draw:text-style-name="P19" draw:layer="layout" draw:line-skew="-1.099cm" svg:x1="19.248cm" svg:y1="12.521cm" svg:x2="18.721cm" svg:y2="14.653cm" draw:start-shape="id18" draw:start-glue-point="11" draw:end-shape="id19" draw:end-glue-point="6" svg:d="M19248 12521h-2154v2132h1627" svg:viewBox="0 0 2155 2133">
          <text:p/>
        </draw:connector>
        <draw:frame draw:style-name="gr12" draw:text-style-name="P14" draw:layer="layout" svg:width="3.085cm" svg:height="0.725cm" svg:x="9.027cm" svg:y="7.032cm">
          <draw:text-box>
            <text:p><text:span text:style-name="T5">&lt;&lt;uses&gt;&gt;</text:span></text:p>
          </draw:text-box>
        </draw:frame>
        <draw:frame draw:style-name="gr12" draw:text-style-name="P14" draw:layer="layout" svg:width="3.085cm" svg:height="0.725cm" svg:x="17.192cm" svg:y="13.292cm">
          <draw:text-box>
            <text:p><text:span text:style-name="T5">&lt;&lt;uses&gt;&gt;</text:span></text:p>
          </draw:text-box>
        </draw:frame>
        <draw:g draw:style-name="gr1" xml:id="id21" draw:id="id2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08" draw:text-style-name="P24" draw:layer="layout" svg:width="6.35cm" svg:height="1.153cm" svg:x="2.622cm" svg:y="7.9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2" draw:layer="layout" svg:width="6.35cm" svg:height="0.601cm" svg:x="2.622cm" svg:y="9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2" draw:layer="layout" svg:width="6.35cm" svg:height="0.599cm" svg:x="2.622cm" svg:y="9.6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1" draw:text-style-name="P24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web_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layout" svg:width="8.39cm" svg:height="0.784cm" svg:x="6.897cm" svg:y="16.44cm">
            <text:p text:style-name="P11"><text:span text:style-name="T4">+ web_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- safe_get(wb_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4" draw:text-style-name="P26" xml:id="id22" draw:id="id22" draw:layer="layout" svg:width="6.667cm" svg:height="1.5cm" svg:x="1.552cm" svg:y="13.235cm">
          <text:p text:style-name="P25"><text:span text:style-name="T6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15" draw:text-style-name="P19" draw:layer="layout" svg:x1="14.822cm" svg:y1="15.288cm" svg:x2="13.685cm" svg:y2="12.019cm" draw:start-shape="id20" draw:start-glue-point="15" draw:end-shape="id16" draw:end-glue-point="8" svg:d="M14822 15288v-1636h-1137v-1633" svg:viewBox="0 0 1138 3270">
          <text:p/>
        </draw:connector>
        <draw:frame draw:style-name="gr12" draw:text-style-name="P14" draw:layer="layout" svg:width="3.81cm" svg:height="0.725cm" svg:x="11.16cm" svg:y="13.927cm">
          <draw:text-box>
            <text:p><text:span text:style-name="T5">&lt;&lt;consists of&gt;&gt;</text:span></text:p>
          </draw:text-box>
        </draw:frame>
        <draw:connector draw:style-name="gr116" draw:text-style-name="P19" draw:layer="layout" svg:x1="8.972cm" svg:y1="9.086cm" svg:x2="12.114cm" svg:y2="7.904cm" draw:start-shape="id21" draw:end-shape="id16" draw:end-glue-point="6" svg:d="M8972 9086h1571v-1182h1571" svg:viewBox="0 0 3143 1183">
          <text:p/>
        </draw:connector>
        <draw:connector draw:style-name="gr117" draw:text-style-name="P27" draw:layer="layout" draw:type="line" svg:x1="8.219cm" svg:y1="13.985cm" svg:x2="9.23cm" svg:y2="15.288cm" draw:start-shape="id22" draw:start-glue-point="7" draw:end-shape="id20" draw:end-glue-point="5" svg:d="M8219 13985l1011 1303" svg:viewBox="0 0 1012 1304">
          <text:p/>
        </draw:connector>
      </draw:page>
      <draw:page draw:name="WiFi" draw:style-name="dp1" draw:master-page-name="Default">
        <draw:custom-shape draw:style-name="gr118" draw:text-style-name="P7" draw:layer="layout" svg:width="25.161cm" svg:height="0.7cm" svg:x="1.475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" draw:layer="layout" svg:width="25.015cm" svg:height="0.7cm" svg:x="1.621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4" draw:id="id24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120" draw:text-style-name="P16" draw:layer="layout" svg:width="25.1cm" svg:height="1.153cm" svg:x="1.617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8" draw:layer="layout" svg:width="25.1cm" svg:height="0.679cm" svg:x="1.617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2" draw:text-style-name="P7" draw:layer="layout" svg:width="25.325cm" svg:height="0.7cm" svg:x="1.3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5.535cm" svg:y="6.625cm">
          <draw:text-box>
            <text:p><text:span text:style-name="T5">&lt;&lt;uses&gt;&gt;</text:span></text:p>
          </draw:text-box>
        </draw:frame>
        <draw:custom-shape draw:style-name="gr123" draw:text-style-name="P8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24" draw:text-style-name="P10" draw:layer="layout" svg:width="5.654cm" svg:height="1.627cm" svg:x="1.913cm" svg:y="7.3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service.</text:span></text:p>
              <text:p text:style-name="P9"><text:span text:style-name="T3">Wifi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12" draw:layer="layout" svg:width="5.654cm" svg:height="0.949cm" svg:x="1.913cm" svg:y="8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36" draw:layer="layout" svg:width="5.654cm" svg:height="2.175cm" svg:x="1.913cm" svg:y="9.9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4">+ init()</text:span></text:p>
              <text:p text:style-name="P35"><text:span text:style-name="T4">+ get_state()</text:span></text:p>
              <text:p text:style-name="P35"><text:span text:style-name="T4">+ wifi_connect()</text:span></text:p>
              <text:p text:style-name="P35"><text:span text:style-name="T4">+ wifi_disconnect()</text:span></text:p>
              <text:p text:style-name="P35"><text:span text:style-name="T4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27" draw:text-style-name="P19" draw:layer="layout" draw:line-skew="0.485cm" svg:x1="3.485cm" svg:y1="7.369cm" svg:x2="4.068cm" svg:y2="5.27cm" draw:start-shape="id23" draw:start-glue-point="5" draw:end-shape="id24" draw:end-glue-point="16" svg:d="M3485 7369v-566h583v-1533" svg:viewBox="0 0 584 2100">
          <text:p/>
        </draw:connector>
        <draw:custom-shape draw:style-name="gr128" draw:text-style-name="P13" draw:layer="layout" svg:width="26.352cm" svg:height="0.952cm" svg:x="1cm" svg:y="1.1cm">
          <text:p text:style-name="P6">Static view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81cm" svg:height="0.725cm" svg:x="12.747cm" svg:y="14.562cm">
          <draw:text-box>
            <text:p><text:span text:style-name="T5">&lt;&lt;consists of&gt;&gt;</text:span></text:p>
          </draw:text-box>
        </draw:frame>
        <draw:connector draw:style-name="gr129" draw:text-style-name="P19" draw:layer="layout" svg:x1="22.935cm" svg:y1="16.33cm" svg:x2="21.486cm" svg:y2="14.352cm" draw:start-shape="id25" draw:start-glue-point="14" draw:end-shape="id26" draw:end-glue-point="9" svg:d="M22935 16330v-990h-1449v-988" svg:viewBox="0 0 1450 1979">
          <text:p/>
        </draw:connector>
        <draw:connector draw:style-name="gr130" draw:text-style-name="P19" draw:layer="layout" svg:x1="12.341cm" svg:y1="8.837cm" svg:x2="7.566cm" svg:y2="8.004cm" draw:start-shape="id27" draw:start-glue-point="0" draw:end-shape="id23" draw:end-glue-point="13" svg:d="M12341 8837v-833h-4775" svg:viewBox="0 0 4776 834">
          <text:p/>
        </draw:connector>
        <draw:g draw:style-name="gr1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1" draw:text-style-name="P10" draw:layer="layout" svg:width="7.072cm" svg:height="1.627cm" svg:x="2.422cm" svg:y="13.6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service.</text:span></text:p>
              <text:p text:style-name="P9"><text:span text:style-name="T3">WifiEventListener</text:span></text:p>
              <text:p text:style-name="P9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12" draw:layer="layout" svg:width="7.072cm" svg:height="0.779cm" svg:x="2.422cm" svg:y="15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12" draw:layer="layout" svg:width="7.072cm" svg:height="0.599cm" svg:x="2.422cm" svg:y="16.0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2" draw:text-style-name="P14" draw:layer="layout" svg:width="3.085cm" svg:height="0.725cm" svg:x="3.54cm" svg:y="12.747cm">
          <draw:text-box>
            <text:p><text:span text:style-name="T5">&lt;&lt;uses&gt;&gt;</text:span></text:p>
          </draw:text-box>
        </draw:frame>
        <draw:frame draw:style-name="gr12" draw:text-style-name="P14" draw:layer="layout" svg:width="3.085cm" svg:height="0.725cm" svg:x="9.255cm" svg:y="7.032cm">
          <draw:text-box>
            <text:p><text:span text:style-name="T5">&lt;&lt;uses&gt;&gt;</text:span></text:p>
          </draw:text-box>
        </draw:frame>
        <draw:g draw:style-name="gr1" xml:id="id27" draw:id="id2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34" draw:text-style-name="P24" draw:layer="layout" svg:width="7.327cm" svg:height="1.153cm" svg:x="8.678cm" svg:y="8.8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2" draw:layer="layout" svg:width="7.327cm" svg:height="0.435cm" svg:x="8.678cm" svg:y="9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2" draw:layer="layout" svg:width="7.327cm" svg:height="0.993cm" svg:x="8.678cm" svg:y="10.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4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37" draw:text-style-name="P10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dbus.SystemBus</text:span></text:p>
              <text:p text:style-name="P9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12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12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0" draw:text-style-name="P10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dbus.Interface</text:span></text:p>
              <text:p text:style-name="P9"><text:span text:style-name="T3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2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12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43" draw:text-style-name="P10" draw:layer="layout" svg:width="7.072cm" svg:height="1.153cm" svg:x="16.378cm" svg:y="11.8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wifi_event_listener</text:span></text:p>
              <text:p text:style-name="P9"><text:span text:style-name="T3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2" draw:layer="layout" svg:width="7.072cm" svg:height="0.779cm" svg:x="16.378cm" svg:y="12.9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2" draw:layer="layout" svg:width="7.072cm" svg:height="0.599cm" svg:x="16.378cm" svg:y="13.7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46" draw:text-style-name="P19" draw:layer="layout" svg:x1="12.174cm" svg:y1="16.281cm" svg:x2="18.345cm" svg:y2="14.352cm" draw:start-shape="id28" draw:start-glue-point="5" draw:end-shape="id26" draw:end-glue-point="8" svg:d="M12174 16281v-966h6171v-963" svg:viewBox="0 0 6172 1930">
          <text:p/>
        </draw:connector>
        <draw:connector draw:style-name="gr147" draw:text-style-name="P19" draw:layer="layout" svg:x1="16.379cm" svg:y1="12.457cm" svg:x2="9.493cm" svg:y2="14.266cm" draw:start-shape="id26" draw:start-glue-point="6" draw:end-shape="id29" draw:end-glue-point="13" svg:d="M16379 12457h-3443v1809h-3443" svg:viewBox="0 0 6887 1810">
          <text:p/>
        </draw:connector>
        <draw:connector draw:style-name="gr148" draw:text-style-name="P19" draw:layer="layout" svg:x1="7.53cm" svg:y1="13.631cm" svg:x2="3.485cm" svg:y2="12.119cm" draw:start-shape="id29" draw:start-glue-point="14" draw:end-shape="id23" draw:end-glue-point="8" svg:d="M7530 13631v-757h-4045v-755" svg:viewBox="0 0 4046 1513">
          <text:p/>
        </draw:connector>
        <draw:custom-shape draw:style-name="gr149" draw:text-style-name="P26" xml:id="id30" draw:id="id30" draw:layer="layout" svg:width="7.703cm" svg:height="1.905cm" svg:x="19.332cm" svg:y="8.915cm">
          <text:p text:style-name="P25"><text:span text:style-name="T6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0" draw:text-style-name="P27" draw:layer="layout" draw:type="line" svg:x1="23.058cm" svg:y1="11.822cm" svg:x2="23.183cm" svg:y2="10.82cm" draw:start-shape="id26" draw:start-glue-point="15" draw:end-shape="id30" draw:end-glue-point="2" svg:d="M23058 11822l125-1002" svg:viewBox="0 0 126 1003">
          <text:p/>
        </draw:connector>
      </draw:page>
      <draw:page draw:name="USB" draw:style-name="dp1" draw:master-page-name="Default">
        <draw:custom-shape draw:style-name="gr151" draw:text-style-name="P7" draw:layer="layout" svg:width="27.14cm" svg:height="0.7cm" svg:x="1.482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7" draw:layer="layout" svg:width="26.989cm" svg:height="0.7cm" svg:x="1.633cm" svg:y="6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7" draw:layer="layout" svg:width="26.894cm" svg:height="0.7cm" svg:x="1.411cm" svg:y="18.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9.89cm" svg:y="7.35cm">
          <draw:text-box>
            <text:p><text:span text:style-name="T5">&lt;&lt;uses&gt;&gt;</text:span></text:p>
          </draw:text-box>
        </draw:frame>
        <draw:custom-shape draw:style-name="gr154" draw:text-style-name="P8" draw:layer="layout" svg:width="27.9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55" draw:text-style-name="P10" draw:layer="layout" svg:width="6.54cm" svg:height="1.153cm" svg:x="12.4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usb_service.USB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6.54cm" svg:height="1.075cm" svg:x="12.412cm" svg:y="9.864cm">
              <text:p text:style-name="P20"><text:span text:style-name="T4">- usb_observer: USBObserver()</text:span></text:p>
              <text:p text:style-name="P20"><text:span text:style-name="T4">- usb_monitor: USBMonito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2" draw:layer="layout" svg:width="6.54cm" svg:height="2.569cm" svg:x="12.4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)</text:span></text:p>
              <text:p text:style-name="P11"><text:span text:style-name="T4">+ get_state()</text:span></text:p>
              <text:p text:style-name="P11"><text:span text:style-name="T4">+ close()</text:span></text:p>
              <text:p text:style-name="P11"><text:span text:style-name="T4">- usb_inserted()</text:span></text:p>
              <text:p text:style-name="P11"><text:span text:style-name="T4">- usb_removed()</text:span></text:p>
              <text:p text:style-name="P11"><text:span text:style-name="T4">- send_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58" draw:text-style-name="P13" draw:layer="layout" svg:width="27.94cm" svg:height="0.952cm" svg:x="1cm" svg:y="1.1cm">
          <text:p text:style-name="P6">Static view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g draw:style-name="gr1">
              <draw:custom-shape draw:style-name="gr159" draw:text-style-name="P10" draw:layer="layout" svg:width="5.448cm" svg:height="1.153cm" svg:x="5.872cm" svg:y="10.65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9"><text:span text:style-name="T3">&lt;&lt;singleton&gt;&gt;</text:span></text:p>
                <text:p text:style-name="P9"><text:span text:style-name="T3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2" draw:layer="layout" svg:width="5.448cm" svg:height="0.692cm" svg:x="5.872cm" svg:y="11.812cm">
                <text:p text:style-name="P20"><text:span text:style-name="T4">- obser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2" draw:layer="layout" svg:width="5.448cm" svg:height="0.993cm" svg:x="5.872cm" svg:y="12.50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11"><text:span text:style-name="T4">+ start()</text:span></text:p>
                <text:p text:style-name="P11"><text:span text:style-name="T4">+ stop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2" draw:text-style-name="P10" draw:layer="layout" svg:width="5.448cm" svg:height="1.153cm" svg:x="20.494cm" svg:y="10.9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singleton&gt;&gt;</text:span></text:p>
              <text:p text:style-name="P9"><text:span text:style-name="T3">usb_service.USB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5.448cm" svg:height="0.434cm" svg:x="20.494cm" svg:y="12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2" draw:layer="layout" svg:width="5.448cm" svg:height="0.993cm" svg:x="20.494cm" svg:y="12.4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- on_created()</text:span></text:p>
              <text:p text:style-name="P11"><text:span text:style-name="T4">- usb_delete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5" draw:text-style-name="P19" draw:layer="layout" svg:x1="24.429cm" svg:y1="13.492cm" svg:x2="26.199cm" svg:y2="15.402cm" draw:start-shape="id31" draw:start-glue-point="9" draw:end-shape="id32" draw:end-glue-point="14" svg:d="M24429 13492v954h1770v956" svg:viewBox="0 0 1771 1911">
          <text:p/>
        </draw:connector>
        <draw:g draw:style-name="gr1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66" draw:text-style-name="P10" draw:layer="layout" svg:width="6.718cm" svg:height="1.153cm" svg:x="21.347cm" svg:y="15.40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BaseClass&gt;&gt;</text:span></text:p>
              <text:p text:style-name="P9"><text:span text:style-name="T3">PatternMatching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2" draw:layer="layout" svg:width="6.718cm" svg:height="0.366cm" svg:x="21.347cm" svg:y="16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12" draw:layer="layout" svg:width="6.718cm" svg:height="0.599cm" svg:x="21.347cm" svg:y="16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handle_event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69" draw:text-style-name="P19" draw:layer="layout" svg:x1="24.429cm" svg:y1="10.913cm" svg:x2="18.951cm" svg:y2="9.347cm" draw:start-shape="id31" draw:start-glue-point="14" draw:end-shape="id33" draw:end-glue-point="13" svg:d="M24429 10913v-1566h-5478" svg:viewBox="0 0 5479 1567">
          <text:p/>
        </draw:connector>
        <draw:connector draw:style-name="gr170" draw:text-style-name="P19" draw:layer="layout" svg:x1="9.807cm" svg:y1="10.66cm" svg:x2="12.413cm" svg:y2="9.347cm" draw:start-shape="id34" draw:start-glue-point="14" draw:end-shape="id33" draw:end-glue-point="6" svg:d="M9807 10660v-1313h2606" svg:viewBox="0 0 2607 1314">
          <text:p/>
        </draw:connector>
        <draw:g draw:style-name="gr1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71" draw:text-style-name="P30" draw:layer="layout" svg:width="4.41cm" svg:height="1.627cm" svg:x="7.71cm" svg:y="15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5"><text:span text:style-name="T3">&lt;&lt;Library&gt;&gt;</text:span></text:p>
              <text:p text:style-name="P37"><text:span text:style-name="T3">watchdog.observers.</text:span></text:p>
              <text:p text:style-name="P37"><text:span text:style-name="T3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2" draw:layer="layout" svg:width="4.41cm" svg:height="0.599cm" svg:x="7.71cm" svg:y="16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4.41cm" svg:height="0.599cm" svg:x="7.71cm" svg:y="17.3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chedul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4" draw:text-style-name="P19" draw:layer="layout" svg:x1="10.895cm" svg:y1="15.139cm" svg:x2="7.387cm" svg:y2="13.497cm" draw:start-shape="id35" draw:start-glue-point="14" draw:end-shape="id34" draw:end-glue-point="8" svg:d="M10895 15139v-822h-3508v-820" svg:viewBox="0 0 3509 1643">
          <text:p/>
        </draw:connector>
        <draw:frame draw:style-name="gr175" draw:text-style-name="P14" draw:layer="layout" svg:width="3.085cm" svg:height="0.725cm" svg:x="11.477cm" svg:y="14.245cm">
          <draw:text-box>
            <text:p><text:span text:style-name="T5">&lt;&lt;uses&gt;&gt;</text:span></text:p>
          </draw:text-box>
        </draw:frame>
        <draw:frame draw:style-name="gr12" draw:text-style-name="P14" draw:layer="layout" svg:width="2.223cm" svg:height="0.725cm" svg:x="22.589cm" svg:y="14.562cm">
          <draw:text-box>
            <text:p><text:span text:style-name="T5">&lt;&lt;is a&gt;&gt;</text:span></text:p>
          </draw:text-box>
        </draw:frame>
        <draw:frame draw:style-name="gr12" draw:text-style-name="P14" draw:layer="layout" svg:width="3.81cm" svg:height="0.725cm" svg:x="20.05cm" svg:y="8.62cm">
          <draw:text-box>
            <text:p><text:span text:style-name="T5">&lt;&lt;consists of&gt;&gt;</text:span></text:p>
          </draw:text-box>
        </draw:frame>
        <draw:frame draw:style-name="gr12" draw:text-style-name="P14" draw:layer="layout" svg:width="3.81cm" svg:height="0.725cm" svg:x="7.985cm" svg:y="8.62cm">
          <draw:text-box>
            <text:p><text:span text:style-name="T5">&lt;&lt;consists of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76" draw:text-style-name="P16" draw:layer="layout" svg:width="27.065cm" svg:height="0.679cm" svg:x="1.635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8" draw:layer="layout" svg:width="27.065cm" svg:height="2.101cm" svg:x="1.635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6" draw:id="id3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8" draw:text-style-name="P30" draw:layer="layout" svg:width="8.002cm" svg:height="0.679cm" svg:x="6.8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3" draw:layer="layout" svg:width="8.002cm" svg:height="0.679cm" svg:x="6.8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</text:span><text:span text:style-name="T3"> </text:span><text:span text:style-name="T3">u</text:span><text:span text:style-name="T3">s</text:span><text:span text:style-name="T3">b</text:span><text:span text:style-name="T3">_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=</text:span><text:span text:style-name="T3"> </text:span><text:span text:style-name="T3">U</text:span><text:span text:style-name="T3">S</text:span><text:span text:style-name="T3">B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(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0" draw:text-style-name="P19" draw:layer="layout" draw:line-skew="0.697cm" svg:x1="14.231cm" svg:y1="8.712cm" svg:x2="10.029cm" svg:y2="5.867cm" draw:start-shape="id33" draw:start-glue-point="5" draw:end-shape="id36" draw:end-glue-point="5" svg:d="M14231 8712v-727h-4202v-2118" svg:viewBox="0 0 4203 2846">
          <text:p/>
        </draw:connector>
        <draw:g draw:style-name="gr1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1" draw:text-style-name="P24" draw:layer="layout" svg:width="7.297cm" svg:height="1.153cm" svg:x="13.125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</text:span><text:span text:style-name="T3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2" draw:layer="layout" svg:width="7.297cm" svg:height="0.435cm" svg:x="13.125cm" svg:y="1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2" draw:layer="layout" svg:width="7.297cm" svg:height="0.993cm" svg:x="13.125cm" svg:y="16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publish_command_message(</text:span></text:p>
            <text:p text:style-name="P11"><text:span text:style-name="T4"><text:s text:c="17"/></text:span><text:span text:style-name="T4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4" draw:text-style-name="P19" draw:layer="layout" svg:x1="16.773cm" svg:y1="15.287cm" svg:x2="14.231cm" svg:y2="13.508cm" draw:start-shape="id37" draw:end-shape="id33" draw:end-glue-point="8" svg:d="M16773 15287v-890h-2542v-889" svg:viewBox="0 0 2543 1780">
          <text:p/>
        </draw:connector>
        <draw:g draw:style-name="gr1" xml:id="id38" draw:id="id3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85" draw:text-style-name="P10" draw:layer="layout" svg:width="5.397cm" svg:height="1.153cm" svg:x="1.495cm" svg:y="15.2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module&gt;&gt;</text:span></text:p>
              <text:p text:style-name="P9"><text:span text:style-name="T3">wifi_service.p</text:span><text:span text:style-name="T3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2" draw:layer="layout" svg:width="5.397cm" svg:height="0.434cm" svg:x="1.495cm" svg:y="16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12" draw:layer="layout" svg:width="5.397cm" svg:height="0.993cm" svg:x="1.495cm" svg:y="16.87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</text:span><text:span text:style-name="T4">networkmanager</text:span><text:span text:style-name="T4">_add(</text:span></text:p>
              <text:p text:style-name="P11"><text:span text:style-name="T4"><text:s text:c="9"/></text:span><text:span text:style-name="T4">network:str, </text:span><text:span text:style-name="T4">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88" draw:text-style-name="P19" draw:layer="layout" svg:x1="5.392cm" svg:y1="15.288cm" svg:x2="5.872cm" svg:y2="12.078cm" draw:start-shape="id38" draw:start-glue-point="14" draw:end-shape="id34" draw:end-glue-point="3" svg:d="M5392 15288v-897h-47v-2313h527" svg:viewBox="0 0 528 3211">
          <text:p/>
        </draw:connector>
      </draw:page>
      <draw:page draw:name="Volume" draw:style-name="dp1" draw:master-page-name="Default">
        <draw:custom-shape draw:style-name="gr189" draw:text-style-name="P7" draw:layer="layout" svg:width="23.669cm" svg:height="0.7cm" svg:x="1.461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7" draw:layer="layout" svg:width="23.537cm" svg:height="0.7cm" svg:x="1.593cm" svg:y="6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7" draw:layer="layout" svg:width="23.819cm" svg:height="0.7cm" svg:x="1.311cm" svg:y="17cm">
          <text:p text:style-name="P38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9cm" svg:y="7.032cm">
          <draw:text-box>
            <text:p><text:span text:style-name="T5">&lt;&lt;uses&gt;&gt;</text:span></text:p>
          </draw:text-box>
        </draw:frame>
        <draw:custom-shape draw:style-name="gr192" draw:text-style-name="P8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93" draw:text-style-name="P10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volume_control.VolumeControl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2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40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9"><text:span text:style-name="T8">+ set_notify()</text:span></text:p>
              <text:p text:style-name="P39"><text:span text:style-name="T8">+ start()</text:span></text:p>
              <text:p text:style-name="P39"><text:span text:style-name="T8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99" draw:text-style-name="P13" draw:layer="layout" svg:width="24.765cm" svg:height="0.952cm" svg:x="1cm" svg:y="1.1cm">
          <text:p text:style-name="P6">Static view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196" draw:text-style-name="P10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i2c_service.I2C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2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12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9" draw:text-style-name="P19" draw:layer="layout" svg:x1="22.449cm" svg:y1="8.906cm" svg:x2="13.941cm" svg:y2="8.247cm" draw:start-shape="id39" draw:start-glue-point="14" draw:end-shape="id40" draw:end-glue-point="13" svg:d="M22449 8906v-659h-8508" svg:viewBox="0 0 8509 660">
          <text:p/>
        </draw:connector>
        <draw:frame draw:style-name="gr200" draw:text-style-name="P14" draw:layer="layout" svg:width="2.512cm" svg:height="0.725cm" svg:x="15.287cm" svg:y="7.467cm">
          <draw:text-box>
            <text:p><text:span text:style-name="T5">&lt;&lt;has&gt;&gt;</text:span></text:p>
          </draw:text-box>
        </draw:frame>
        <draw:frame draw:style-name="gr201" draw:text-style-name="P41" draw:layer="layout" svg:width="7.937cm" svg:height="1.673cm" svg:x="2.587cm" svg:y="18.145cm">
          <draw:text-box>
            <text:p><text:span text:style-name="T11">Waarom start(), stop(), set_notify(). Staat altijd op notify. Dus notify default aan. Gaat nooit gestopt worden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2" draw:text-style-name="P16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8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1" draw:id="id4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4" draw:text-style-name="P30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3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6" draw:text-style-name="P19" draw:layer="layout" draw:line-skew="0.457cm" svg:x1="9.115cm" svg:y1="7.612cm" svg:x2="7.552cm" svg:y2="5.566cm" draw:start-shape="id40" draw:start-glue-point="5" draw:end-shape="id41" draw:end-glue-point="4" svg:d="M9115 7612v-567h-1563v-1479" svg:viewBox="0 0 1564 2047">
          <text:p/>
        </draw:connector>
        <draw:g draw:style-name="gr1" xml:id="id42" draw:id="id42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07" draw:text-style-name="P24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volume_control.</text:span></text:p>
            <text:p text:style-name="P23"><text:span text:style-name="T3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12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12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0" draw:text-style-name="P19" draw:layer="layout" svg:x1="11.841cm" svg:y1="12.932cm" svg:x2="13.571cm" svg:y2="10.916cm" draw:start-shape="id42" draw:start-glue-point="0" draw:end-shape="id40" draw:end-glue-point="10" svg:d="M11841 12932v-1009h1730v-1007" svg:viewBox="0 0 1731 2017">
          <text:p/>
        </draw:connector>
        <draw:g draw:style-name="gr1" xml:id="id43" draw:id="id43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1" draw:text-style-name="P24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2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2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</text:span><text:span text:style-name="T4">publish_command_m</text:span><text:span text:style-name="T4">essage(</text:span></text:p>
            <text:p text:style-name="P11"><text:span text:style-name="T4"><text:s text:c="17"/></text:span><text:span text:style-name="T4">message: </text:span><text:span text:style-name="T4">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4" draw:text-style-name="P19" draw:layer="layout" svg:x1="5.288cm" svg:y1="11.412cm" svg:x2="7.257cm" svg:y2="10.372cm" draw:start-shape="id43" draw:start-glue-point="0" draw:end-shape="id40" draw:end-glue-point="11" svg:d="M5288 11412v-1040h1969" svg:viewBox="0 0 1970 1041">
          <text:p/>
        </draw:connector>
        <draw:custom-shape draw:style-name="gr215" draw:text-style-name="P26" xml:id="id44" draw:id="id44" draw:layer="layout" svg:width="8.89cm" svg:height="1.719cm" svg:x="16.24cm" svg:y="14.521cm">
          <text:p text:style-name="P25"><text:span text:style-name="T6">T</text:span><text:span text:style-name="T6">h</text:span><text:span text:style-name="T6">e</text:span><text:span text:style-name="T6"> </text:span><text:span text:style-name="T6">v</text:span><text:span text:style-name="T6">o</text:span><text:span text:style-name="T6">l</text:span><text:span text:style-name="T6">u</text:span><text:span text:style-name="T6">m</text:span><text:span text:style-name="T6">e</text:span><text:span text:style-name="T6">_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w</text:span><text:span text:style-name="T6">a</text:span><text:span text:style-name="T6">i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v</text:span><text:span text:style-name="T6">o</text:span><text:span text:style-name="T6">l</text:span><text:span text:style-name="T6">u</text:span><text:span text:style-name="T6">m</text:span><text:span text:style-name="T6">e</text:span><text:span text:style-name="T6"> </text:span><text:span text:style-name="T6">(</text:span><text:span text:style-name="T6">a</text:span><text:span text:style-name="T6">d</text:span><text:span text:style-name="T6">c</text:span><text:span text:style-name="T6">)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s</text:span><text:span text:style-name="T6">,</text:span><text:span text:style-name="T6"> </text:span><text:span text:style-name="T6">s</text:span><text:span text:style-name="T6">e</text:span><text:span text:style-name="T6">t</text:span><text:span text:style-name="T6"> </text:span><text:span text:style-name="T6">n</text:span><text:span text:style-name="T6">e</text:span><text:span text:style-name="T6">w</text:span><text:span text:style-name="T6"> </text:span><text:span text:style-name="T6">v</text:span><text:span text:style-name="T6">o</text:span><text:span text:style-name="T6">l</text:span><text:span text:style-name="T6">u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s</text:span><text:span text:style-name="T6">h</text:span><text:span text:style-name="T6">e</text:span><text:span text:style-name="T6">s</text:span><text:span text:style-name="T6"> </text:span><text:span text:style-name="T6">a</text:span><text:span text:style-name="T6"> </text:span><text:span text:style-name="T6">v</text:span><text:span text:style-name="T6">o</text:span><text:span text:style-name="T6">l</text:span><text:span text:style-name="T6">u</text:span><text:span text:style-name="T6">m</text:span><text:span text:style-name="T6">e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d</text:span><text:span text:style-name="T6"> 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16" draw:text-style-name="P27" draw:layer="layout" draw:type="line" svg:x1="14.11cm" svg:y1="14.427cm" svg:x2="16.24cm" svg:y2="15.381cm" draw:start-shape="id42" draw:end-shape="id44" draw:end-glue-point="5" svg:d="M14110 14427l2130 954" svg:viewBox="0 0 2131 955">
          <text:p/>
        </draw:connector>
        <draw:g draw:style-name="gr1" xml:id="id45" draw:id="id4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17" draw:text-style-name="P10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volume_adc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8" draw:text-style-name="P12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9" draw:text-style-name="P12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0" draw:text-style-name="P19" draw:layer="layout" svg:x1="15.358cm" svg:y1="18.188cm" svg:x2="13.941cm" svg:y2="10.372cm" draw:start-shape="id45" draw:start-glue-point="5" draw:end-shape="id40" draw:end-glue-point="12" svg:d="M15358 18188v-7816h-1417" svg:viewBox="0 0 1418 7817">
          <text:p/>
        </draw:connector>
      </draw:page>
      <draw:page draw:name="Error" draw:style-name="dp1" draw:master-page-name="Default">
        <draw:custom-shape draw:style-name="gr221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7" draw:layer="layout" svg:width="19.218cm" svg:height="0.7cm" svg:x="1.549cm" svg:y="5.6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7" draw:id="id47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4.178cm" svg:y="5.141cm"/>
          <draw:glue-point draw:id="41" svg:x="-3.935cm" svg:y="5.141cm"/>
          <draw:glue-point draw:id="42" svg:x="1.565cm" svg:y="4.219cm"/>
          <draw:glue-point draw:id="43" svg:x="4.481cm" svg:y="4.219cm"/>
          <draw:glue-point draw:id="44" svg:x="4.603cm" svg:y="5.141cm"/>
          <draw:custom-shape draw:style-name="gr223" draw:text-style-name="P16" draw:layer="layout" svg:width="19.283cm" svg:height="1.153cm" svg:x="1.546cm" svg:y="3.43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</text:span></text:p>
            <text:p text:style-name="P15"><text:span text:style-name="T3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18" draw:layer="layout" svg:width="19.283cm" svg:height="0.679cm" svg:x="1.546cm" svg:y="4.59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5" draw:text-style-name="P7" draw:layer="layout" svg:width="19.456cm" svg:height="0.7cm" svg:x="1.311cm" svg:y="17.1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5.217cm" svg:y="6.942cm">
          <draw:text-box>
            <text:p><text:span text:style-name="T5">&lt;&lt;uses&gt;&gt;</text:span></text:p>
          </draw:text-box>
        </draw:frame>
        <draw:custom-shape draw:style-name="gr226" draw:text-style-name="P8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6" draw:id="id4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27" draw:text-style-name="P10" draw:layer="layout" svg:width="6.229cm" svg:height="1.153cm" svg:x="1.756cm" svg:y="8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error_service.py.Error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12" draw:layer="layout" svg:width="6.229cm" svg:height="0.746cm" svg:x="1.756cm" svg:y="9.764cm">
              <text:p text:style-name="P11"><text:span text:style-name="T4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12" draw:layer="layout" svg:width="6.229cm" svg:height="0.993cm" svg:x="1.756cm" svg:y="10.5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- init()</text:span></text:p>
              <text:p text:style-name="P11"><text:span text:style-name="T4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30" draw:text-style-name="P19" draw:layer="layout" svg:x1="3.488cm" svg:y1="8.612cm" svg:x2="5.403cm" svg:y2="5.27cm" draw:start-shape="id46" draw:start-glue-point="5" draw:end-shape="id47" draw:end-glue-point="4" svg:d="M3488 8612v-1672h1915v-1670" svg:viewBox="0 0 1916 3343">
          <text:p/>
        </draw:connector>
        <draw:custom-shape draw:style-name="gr231" draw:text-style-name="P13" draw:layer="layout" svg:width="20.637cm" svg:height="0.952cm" svg:x="1cm" svg:y="1.1cm">
          <text:p text:style-name="P6">Static view: Erro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8" draw:id="id48">
          <draw:glue-point draw:id="4" svg:x="-4cm" svg:y="-5cm"/>
          <draw:custom-shape draw:style-name="gr232" draw:text-style-name="P24" draw:layer="layout" svg:width="5.715cm" svg:height="1.153cm" svg:x="7.032cm" svg:y="13.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12" draw:layer="layout" svg:width="5.715cm" svg:height="0.771cm" svg:x="7.032cm" svg:y="14.853cm">
            <text:p text:style-name="P11"><text:span text:style-name="T4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4" draw:text-style-name="P12" draw:layer="layout" svg:width="5.715cm" svg:height="0.599cm" svg:x="7.032cm" svg:y="15.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5" draw:text-style-name="P19" draw:layer="layout" svg:x1="9.889cm" svg:y1="13.7cm" svg:x2="11.881cm" svg:y2="11.292cm" draw:start-shape="id48" draw:end-shape="id49" draw:end-glue-point="5" svg:d="M9889 13700v-1204h1992v-1204" svg:viewBox="0 0 1993 2409">
          <text:p/>
        </draw:connector>
        <draw:frame draw:style-name="gr12" draw:text-style-name="P14" draw:layer="layout" svg:width="3.085cm" svg:height="0.725cm" svg:x="7.032cm" svg:y="12.657cm">
          <draw:text-box>
            <text:p><text:span text:style-name="T5">&lt;&lt;uses&gt;&gt;</text:span></text:p>
          </draw:text-box>
        </draw:frame>
        <draw:g draw:style-name="gr1" xml:id="id49" draw:id="id4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36" draw:text-style-name="P24" draw:layer="layout" svg:width="6.163cm" svg:height="1.153cm" svg:x="10.712cm" svg:y="8.5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2" draw:layer="layout" svg:width="6.163cm" svg:height="0.517cm" svg:x="10.712cm" svg:y="9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2" draw:layer="layout" svg:width="6.163cm" svg:height="1.18cm" svg:x="10.712cm" svg:y="10.1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9" draw:text-style-name="P19" draw:layer="layout" svg:x1="10.712cm" svg:y1="9.905cm" svg:x2="7.984cm" svg:y2="9.247cm" draw:start-shape="id49" draw:end-shape="id46" draw:end-glue-point="13" svg:d="M10712 9905h-1364v-658h-1364" svg:viewBox="0 0 2729 659">
          <text:p/>
        </draw:connector>
      </draw:page>
      <draw:page draw:name="Messaging" draw:style-name="dp1" draw:master-page-name="Default">
        <draw:custom-shape draw:style-name="gr240" draw:text-style-name="P7" draw:layer="layout" svg:width="26.821cm" svg:height="0.7cm" svg:x="1.484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7" draw:layer="layout" svg:width="26.346cm" svg:height="0.7cm" svg:x="1.637cm" svg:y="7.4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6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15"><text:span text:style-name="T3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8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7"><text:span text:style-name="T3"/></text:p>
          <text:p text:style-name="P17"><text:span text:style-name="T3"/></text:p>
          <text:p text:style-name="P17"><text:span text:style-name="T3"/></text:p>
          <text:p text:style-name="P17"><text:span text:style-name="T3"/></text:p>
          <text:p text:style-name="P17"><text:span text:style-name="T3"/></text:p>
          <text:p text:style-name="P1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7" draw:layer="layout" svg:width="26.672cm" svg:height="0.7cm" svg:x="1.311cm" svg:y="18.5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582cm" svg:y="8.212cm">
          <draw:text-box>
            <text:p><text:span text:style-name="T5">&lt;&lt;uses&gt;&gt;</text:span></text:p>
          </draw:text-box>
        </draw:frame>
        <draw:custom-shape draw:style-name="gr245" draw:text-style-name="P8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0" draw:id="id5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46" draw:text-style-name="P10" draw:layer="layout" svg:width="9.721cm" svg:height="1.153cm" svg:x="1.7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</text:span></text:p>
              <text:p text:style-name="P9"><text:span text:style-name="T3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2" draw:layer="layout" svg:width="9.721cm" svg:height="0.985cm" svg:x="1.756cm" svg:y="10.14cm">
              <text:p text:style-name="P11"><text:span text:style-name="T4">- CommandMessage()</text:span></text:p>
              <text:p text:style-name="P11"><text:span text:style-name="T4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12" draw:layer="layout" svg:width="9.721cm" svg:height="2.963cm" svg:x="1.7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ubscribe_commands() -&gt; Queue</text:span></text:p>
              <text:p text:style-name="P11"><text:span text:style-name="T4">+ subscribe_errors() -&gt; Queue</text:span></text:p>
              <text:p text:style-name="P11"><text:span text:style-name="T4">+ unsubscribe_commands(queue: Queue)</text:span></text:p>
              <text:p text:style-name="P11"><text:span text:style-name="T4">+ unsubscribe_errors(queue: Queue)</text:span></text:p>
              <text:p text:style-name="P11"><text:span text:style-name="T4">+ publish_command(message: CommandMessage)</text:span></text:p>
              <text:p text:style-name="P11"><text:span text:style-name="T4">+ publish_error(message: ErrorMessage)</text:span></text:p>
              <text:p text:style-name="P11"><text:span text:style-name="T4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49" draw:text-style-name="P19" draw:layer="layout" svg:x1="8.776cm" svg:y1="8.989cm" svg:x2="9.963cm" svg:y2="5.45cm" draw:start-shape="id50" draw:start-glue-point="14" draw:end-shape="id51" draw:end-glue-point="5" svg:d="M8776 8989v-1771h1187v-1768" svg:viewBox="0 0 1188 3540">
          <text:p/>
        </draw:connector>
        <draw:custom-shape draw:style-name="gr250" draw:text-style-name="P13" draw:layer="layout" svg:width="27.7cm" svg:height="0.952cm" svg:x="1cm" svg:y="1.1cm">
          <text:p text:style-name="P6">Static view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5" draw:id="id5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1" draw:text-style-name="P10" draw:layer="layout" svg:width="6.667cm" svg:height="1.153cm" svg:x="18.068cm" svg:y="15.10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CommandMessage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6.667cm" svg:height="1.454cm" svg:x="18.068cm" svg:y="16.257cm">
              <text:p text:style-name="P11"><text:span text:style-name="T4">+ source: String</text:span></text:p>
              <text:p text:style-name="P11"><text:span text:style-name="T4">+ message: String</text:span></text:p>
              <text:p text:style-name="P11"><text:span text:style-name="T4">+ data: Any</text:span></text:p>
              <text:p text:style-name="P11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12" draw:layer="layout" svg:width="6.667cm" svg:height="0.599cm" svg:x="18.068cm" svg:y="17.7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4" draw:text-style-name="P10" draw:layer="layout" svg:width="6.667cm" svg:height="1.153cm" svg:x="10.208cm" svg:y="15.2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ErrorMessage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12" draw:layer="layout" svg:width="6.667cm" svg:height="0.994cm" svg:x="10.208cm" svg:y="16.405cm">
              <text:p text:style-name="P11"><text:span text:style-name="T4">+ source: String</text:span></text:p>
              <text:p text:style-name="P11"><text:span text:style-name="T4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2" draw:layer="layout" svg:width="6.667cm" svg:height="0.599cm" svg:x="10.208cm" svg:y="17.39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<text:s/></text:span><text:span text:style-name="T4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57" draw:text-style-name="P10" draw:layer="layout" svg:width="11.43cm" svg:height="1.153cm" svg:x="15.922cm" svg:y="9.41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PubSubManager</text:span></text:p>
              <text:p text:style-name="P9"><text:span text:style-name="T3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11.43cm" svg:height="0.908cm" svg:x="15.922cm" svg:y="10.565cm">
              <text:p text:style-name="P11"><text:span text:style-name="T4">- Topic.COMMAND: []</text:span></text:p>
              <text:p text:style-name="P11"><text:span text:style-name="T4">- Topic.ERROR: 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12" draw:layer="layout" svg:width="11.43cm" svg:height="1.387cm" svg:x="15.922cm" svg:y="11.4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ubscribe(topic: Topic) -&gt; Queue</text:span></text:p>
              <text:p text:style-name="P11"><text:span text:style-name="T4">+ unsubscripe(topic: Topic, queue:Queu)</text:span></text:p>
              <text:p text:style-name="P11"><text:span text:style-name="T4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60" draw:text-style-name="P10" draw:layer="layout" svg:width="6.667cm" svg:height="1.153cm" svg:x="1.952cm" svg:y="15.36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essaging.Topic</text:span></text:p>
              <text:p text:style-name="P9"><text:span text:style-name="T3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12" draw:layer="layout" svg:width="6.667cm" svg:height="0.994cm" svg:x="1.952cm" svg:y="16.517cm">
              <text:p text:style-name="P11"><text:span text:style-name="T4">+ COMMAND = "COMMAND"</text:span></text:p>
              <text:p text:style-name="P11"><text:span text:style-name="T4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12" draw:layer="layout" svg:width="6.667cm" svg:height="0.599cm" svg:x="1.952cm" svg:y="17.5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3" draw:text-style-name="P19" draw:layer="layout" svg:x1="15.923cm" svg:y1="10.048cm" svg:x2="11.476cm" svg:y2="9.623cm" draw:start-shape="id52" draw:start-glue-point="6" draw:end-shape="id50" draw:end-glue-point="13" svg:d="M15923 10048h-2224v-425h-2223" svg:viewBox="0 0 4448 426">
          <text:p/>
        </draw:connector>
        <draw:frame draw:style-name="gr12" draw:text-style-name="P14" draw:layer="layout" svg:width="2.54cm" svg:height="0.725cm" svg:x="12.43cm" svg:y="11.705cm">
          <draw:text-box>
            <text:p><text:span text:style-name="T5">&lt;&lt;has&gt;&gt;</text:span></text:p>
          </draw:text-box>
        </draw:frame>
        <draw:connector draw:style-name="gr264" draw:text-style-name="P19" draw:layer="layout" svg:x1="3.805cm" svg:y1="15.365cm" svg:x2="2.298cm" svg:y2="14.017cm" draw:start-shape="id53" draw:start-glue-point="5" draw:end-shape="id50" draw:end-glue-point="7" svg:d="M3805 15365v-675h-1507v-673" svg:viewBox="0 0 1508 1349">
          <text:p/>
        </draw:connector>
        <draw:connector draw:style-name="gr265" draw:text-style-name="P19" draw:layer="layout" svg:x1="12.061cm" svg:y1="15.253cm" svg:x2="8.776cm" svg:y2="14.017cm" draw:start-shape="id54" draw:start-glue-point="5" draw:end-shape="id50" draw:end-glue-point="9" svg:d="M12061 15253v-619h-3285v-617" svg:viewBox="0 0 3286 1237">
          <text:p/>
        </draw:connector>
        <draw:connector draw:style-name="gr266" draw:text-style-name="P19" draw:layer="layout" svg:x1="19.921cm" svg:y1="15.105cm" svg:x2="11.476cm" svg:y2="13.473cm" draw:start-shape="id55" draw:start-glue-point="5" draw:end-shape="id50" draw:end-glue-point="12" svg:d="M19921 15105v-1632h-8445" svg:viewBox="0 0 8446 1633">
          <text:p/>
        </draw:connector>
        <draw:g draw:style-name="gr1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67" draw:text-style-name="P24" draw:layer="layout" svg:width="4.14cm" svg:height="1.153cm" svg:x="16.405cm" svg:y="4.4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</text:span><text:span text:style-name="T3">&gt;</text:span></text:p>
            <text:p text:style-name="P23"><text:span text:style-name="T3">command</text:span><text:span text:style-name="T3">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12" draw:layer="layout" svg:width="4.14cm" svg:height="0.517cm" svg:x="16.405cm" svg:y="5.615cm">
            <text:p text:style-name="P11"><text:span text:style-name="T4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12" draw:layer="layout" svg:width="4.14cm" svg:height="0.465cm" svg:x="16.405cm" svg:y="6.1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1" draw:id="id5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0" draw:text-style-name="P30" draw:layer="layout" svg:width="7.937cm" svg:height="0.679cm" svg:x="6.788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3" draw:layer="layout" svg:width="7.937cm" svg:height="0.679cm" svg:x="6.788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 cmd_queue =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2" draw:text-style-name="P19" draw:layer="layout" svg:x1="16.405cm" svg:y1="5.529cm" svg:x2="14.725cm" svg:y2="4.728cm" draw:start-shape="id56" draw:start-glue-point="3" draw:end-shape="id51" draw:end-glue-point="14" svg:d="M16405 5529h-840v-801h-840" svg:viewBox="0 0 1681 802">
          <text:p/>
        </draw:connector>
        <draw:custom-shape draw:style-name="gr273" draw:text-style-name="P26" xml:id="id57" draw:id="id57" draw:layer="layout" svg:width="6.032cm" svg:height="1.937cm" svg:x="21.602cm" svg:y="4.143cm">
          <text:p text:style-name="P25"><text:span text:style-name="T6">The command_handler thread waits for a command topic and processes topic as events in the statemachin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74" draw:text-style-name="P27" draw:layer="layout" draw:type="line" svg:x1="20.545cm" svg:y1="5.306cm" svg:x2="21.602cm" svg:y2="5.112cm" draw:start-shape="id56" draw:start-glue-point="23" draw:end-shape="id57" draw:end-glue-point="5" svg:d="M20545 5306l1057-194" svg:viewBox="0 0 1058 195">
          <text:p/>
        </draw:connector>
        <draw:g draw:style-name="gr1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5" draw:text-style-name="P24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class&gt;&gt;</text:span></text:p>
            <text:p text:style-name="P23"><text:span text:style-name="T3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12" draw:layer="layout" svg:width="3.175cm" svg:height="0.517cm" svg:x="1.952cm" svg:y="5.645cm"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12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8" draw:text-style-name="P19" draw:layer="layout" svg:x1="5.126cm" svg:y1="6.083cm" svg:x2="6.788cm" svg:y2="4.795cm" draw:start-shape="id58" draw:start-glue-point="12" draw:end-shape="id51" draw:end-glue-point="9" svg:d="M5126 6083h831v-1288h831" svg:viewBox="0 0 1663 1289">
          <text:p/>
        </draw:connector>
      </draw:page>
      <draw:page draw:name="Power Supply" draw:style-name="dp1" draw:master-page-name="Default">
        <draw:custom-shape draw:style-name="gr221" draw:text-style-name="P7" draw:layer="layout" svg:width="19.565cm" svg:height="0.7cm" svg:x="1.437cm" svg:y="2.3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7" draw:layer="layout" svg:width="19.218cm" svg:height="0.7cm" svg:x="1.549cm" svg:y="7.2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7" draw:layer="layout" svg:width="19.456cm" svg:height="0.7cm" svg:x="1.229cm" svg:y="15.287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3.085cm" svg:height="0.725cm" svg:x="4.9cm" svg:y="8.212cm">
          <draw:text-box>
            <text:p><text:span text:style-name="T5">&lt;&lt;uses&gt;&gt;</text:span></text:p>
          </draw:text-box>
        </draw:frame>
        <draw:custom-shape draw:style-name="gr279" draw:text-style-name="P8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80" draw:text-style-name="P10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power_supply_control.PowerSupplyService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1" draw:text-style-name="P12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2" draw:text-style-name="P12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set_nom_voltage()</text:span></text:p>
              <text:p text:style-name="P11"><text:span text:style-name="T4">+ set_max_voltage()</text:span></text:p>
              <text:p text:style-name="P11"><text:span text:style-name="T4">+ set_standby_voltage()</text:span></text:p>
              <text:p text:style-name="P11"><text:span text:style-name="T4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1" draw:text-style-name="P13" draw:layer="layout" svg:width="20.637cm" svg:height="0.952cm" svg:x="1cm" svg:y="1.1cm">
          <text:p text:style-name="P6">Static view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83" draw:text-style-name="P10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singleton&gt;&gt;</text:span></text:p>
              <text:p text:style-name="P9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2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2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86" draw:text-style-name="P19" draw:layer="layout" svg:x1="14.261cm" svg:y1="11.428cm" svg:x2="10.747cm" svg:y2="10.657cm" draw:start-shape="id59" draw:start-glue-point="5" draw:end-shape="id60" draw:end-glue-point="1" svg:d="M14261 11428v-771h-3514" svg:viewBox="0 0 3515 772">
          <text:p/>
        </draw:connector>
        <draw:frame draw:style-name="gr12" draw:text-style-name="P14" draw:layer="layout" svg:width="2.512cm" svg:height="0.725cm" svg:x="12.43cm" svg:y="9.572cm">
          <draw:text-box>
            <text:p><text:span text:style-name="T5">&lt;&lt;has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87" draw:text-style-name="P16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</text:span><text:span text:style-name="T3">r</text:span><text:span text:style-name="T3">a</text:span><text:span text:style-name="T3">d</text:span><text:span text:style-name="T3">i</text:span><text:span text:style-name="T3">o</text:span><text:span text:style-name="T3">_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.</text:span><text:span text:style-name="T3">p</text:span><text:span text:style-name="T3">y</text:span><text:span text:style-name="T3"> </text:span><text:span text:style-name="T3">&lt;</text:span><text:span text:style-name="T3">&lt;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&gt;</text:span><text:span text:style-name="T3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8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1" draw:id="id6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9" draw:text-style-name="P30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3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1" draw:text-style-name="P19" draw:layer="layout" draw:line-skew="0.926cm" svg:x1="4.255cm" svg:y1="8.889cm" svg:x2="7.942cm" svg:y2="5.866cm" draw:start-shape="id60" draw:start-glue-point="5" draw:end-shape="id61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292" draw:text-style-name="P7" draw:layer="layout" svg:width="27.047cm" svg:height="0.7cm" svg:x="1.258cm" svg:y="2.0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7" draw:layer="layout" svg:width="26.989cm" svg:height="0.7cm" svg:x="1.316cm" svg:y="6.7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7" draw:id="id67">
          <draw:glue-point draw:id="4" svg:x="-0.787cm" svg:y="5.055cm"/>
          <draw:glue-point draw:id="5" svg:x="-5.063cm" svg:y="-3.065cm"/>
          <draw:glue-point draw:id="6" svg:x="-3.788cm" svg:y="5.05cm"/>
          <draw:custom-shape draw:style-name="gr293" draw:text-style-name="P10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led_control.</text:span></text:p>
            <text:p text:style-name="P9"><text:span text:style-name="T3">LEDControl</text:span></text:p>
            <text:p text:style-name="P9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12" draw:layer="layout" svg:width="4.363cm" svg:height="0.671cm" svg:x="1.317cm" svg:y="9.312cm">
            <text:p text:style-name="P11"><text:span text:style-name="T4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5" draw:text-style-name="P12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turn_on_led()</text:span></text:p>
            <text:p text:style-name="P11"><text:span text:style-name="T4">+ turn_off_led()</text:span></text:p>
            <text:p text:style-name="P11"><text:span text:style-name="T4">+ turn_off_all_leds()</text:span></text:p>
            <text:p text:style-name="P11"><text:span text:style-name="T4">+ turn_off_all_leds()</text:span></text:p>
            <text:p text:style-name="P11"><text:span text:style-name="T4">+ get_led_state()l</text:span></text:p>
            <text:p text:style-name="P11"><text:span text:style-name="T4">+ oneshot_on_led()</text:span></text:p>
            <text:p text:style-name="P11"><text:span text:style-name="T4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6" draw:text-style-name="P42" draw:layer="layout" svg:width="27.204cm" svg:height="0.7cm" svg:x="1.101cm" svg:y="16.947cm">
          <text:p text:style-name="P38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8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298" draw:text-style-name="P10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touch_buttons.</text:span></text:p>
              <text:p text:style-name="P9"><text:span text:style-name="T3">TouchButtons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12" draw:layer="layout" svg:width="4.602cm" svg:height="0.754cm" svg:x="7.185cm" svg:y="9.687cm">
              <text:p text:style-name="P11"><text:span text:style-name="T4">- stop_evt: Event()</text:span></text:p>
              <text:p text:style-name="P11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2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)</text:span></text:p>
              <text:p text:style-name="P11"><text:span text:style-name="T4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1">
            <draw:custom-shape draw:style-name="gr301" draw:text-style-name="P10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backlighting.</text:span></text:p>
              <text:p text:style-name="P9"><text:span text:style-name="T3">BackLighting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2" draw:layer="layout" svg:width="5.465cm" svg:height="1.06cm" svg:x="15.75cm" svg:y="9.647cm">
              <text:p text:style-name="P11"><text:span text:style-name="T4">- thread: backlighting_manager</text:span></text:p>
              <text:p text:style-name="P11"><text:span text:style-name="T4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2" draw:text-style-name="P14" draw:layer="layout" svg:width="2.512cm" svg:height="0.725cm" svg:x="8.965cm" svg:y="7.35cm">
          <draw:text-box>
            <text:p><text:span text:style-name="T5">&lt;&lt;uses&gt;&gt;</text:span></text:p>
          </draw:text-box>
        </draw:frame>
        <draw:custom-shape draw:style-name="gr250" draw:text-style-name="P13" draw:layer="layout" svg:width="27.7cm" svg:height="0.952cm" svg:x="1cm" svg:y="1cm">
          <text:p text:style-name="P6">static view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04" draw:text-style-name="P10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singleton&gt;&gt;</text:span></text:p>
              <text:p text:style-name="P9"><text:span text:style-name="T3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12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2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read_byte(device: int, register: int)</text:span></text:p>
              <text:p text:style-name="P11"><text:span text:style-name="T4">+ write_byte(device: int, register: int)</text:span></text:p>
              <text:p text:style-name="P11"><text:span text:style-name="T9">+ </text:span><text:span text:style-name="T10">read_block</text:span><text:span text:style-name="T9">(device: int, register: int, length: int)</text:span></text:p>
              <text:p text:style-name="P11"><text:span text:style-name="T9">+ write</text:span><text:span text:style-name="T10">_block</text:span><text:span text:style-name="T9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4" draw:id="id6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07" draw:text-style-name="P10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light_sensor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8" draw:text-style-name="P12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12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2" draw:id="id6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10" draw:text-style-name="P10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backlight_dac</text:span></text:p>
              <text:p text:style-name="P9"><text:span text:style-name="T3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1" draw:text-style-name="P12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2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3" draw:text-style-name="P24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singleton&gt;&gt;</text:span></text:p>
            <text:p text:style-name="P23"><text:span text:style-name="T3">gpio_service.</text:span></text:p>
            <text:p text:style-name="P23"><text:span text:style-name="T3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43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12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6" draw:text-style-name="P19" draw:layer="layout" draw:line-skew="-2.199cm" svg:x1="18.991cm" svg:y1="17.936cm" svg:x2="20.911cm" svg:y2="11.342cm" draw:start-shape="id62" draw:start-glue-point="4" draw:end-shape="id63" draw:end-glue-point="10" svg:d="M18991 17936v-5497h1920v-1097" svg:viewBox="0 0 1921 6595">
          <text:p/>
        </draw:connector>
        <draw:connector draw:style-name="gr317" draw:text-style-name="P19" draw:layer="layout" draw:line-skew="-2.581cm" svg:x1="17.899cm" svg:y1="17.97cm" svg:x2="19.696cm" svg:y2="11.342cm" draw:start-shape="id64" draw:start-glue-point="15" draw:end-shape="id63" draw:end-glue-point="9" svg:d="M17899 17970v-5896h1797v-732" svg:viewBox="0 0 1798 6629">
          <text:p/>
        </draw:connector>
        <draw:connector draw:style-name="gr318" draw:text-style-name="P19" draw:layer="layout" svg:x1="8.319cm" svg:y1="14.283cm" svg:x2="8.465cm" svg:y2="11.434cm" draw:start-shape="id65" draw:start-glue-point="14" draw:end-shape="id66" draw:end-glue-point="8" svg:d="M8319 14283v-1426h146v-1423" svg:viewBox="0 0 147 2850">
          <text:p/>
        </draw:connector>
        <draw:connector draw:style-name="gr319" draw:text-style-name="P19" draw:layer="layout" svg:x1="6.204cm" svg:y1="14.283cm" svg:x2="3.498cm" svg:y2="12.946cm" draw:start-shape="id65" draw:start-glue-point="4" draw:end-shape="id67" draw:end-glue-point="2" svg:d="M6204 14283v-670h-2706v-667" svg:viewBox="0 0 2707 1338">
          <text:p/>
        </draw:connector>
        <draw:connector draw:style-name="gr320" draw:text-style-name="P19" draw:layer="layout" svg:x1="21.91cm" svg:y1="13.161cm" svg:x2="21.214cm" svg:y2="10.798cm" draw:start-shape="id68" draw:start-glue-point="5" draw:end-shape="id63" draw:end-glue-point="12" svg:d="M21910 13161v-2363h-696" svg:viewBox="0 0 697 2364">
          <text:p/>
        </draw:connector>
        <draw:frame draw:style-name="gr12" draw:text-style-name="P14" draw:layer="layout" svg:width="2.512cm" svg:height="0.725cm" svg:x="19.415cm" svg:y="12.43cm">
          <draw:text-box>
            <text:p><text:span text:style-name="T5">&lt;&lt;has&gt;&gt;</text:span></text:p>
          </draw:text-box>
        </draw:frame>
        <draw:frame draw:style-name="gr321" draw:text-style-name="P14" draw:layer="layout" svg:width="2.512cm" svg:height="0.725cm" svg:x="5.762cm" svg:y="12.975cm">
          <draw:text-box>
            <text:p><text:span text:style-name="T5">&lt;&lt;has&gt;&gt;</text:span></text:p>
          </draw:text-box>
        </draw:frame>
        <draw:frame draw:style-name="gr322" draw:text-style-name="P41" draw:layer="layout" svg:width="6.35cm" svg:height="2.147cm" svg:x="1.635cm" svg:y="17.51cm">
          <draw:text-box>
            <text:p><text:span text:style-name="T11">Waarom backlighting thread met stop en off. Staat eigenlijk altijd aan! Wordt ook in de module gestart!</text:span></text:p>
          </draw:text-box>
        </draw:frame>
        <draw:g draw:style-name="gr1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23" draw:text-style-name="P10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&lt;&lt;thread&gt;&gt;</text:span></text:p>
              <text:p text:style-name="P9"><text:span text:style-name="T3">backlighting.</text:span></text:p>
              <text:p text:style-name="P9"><text:span text:style-name="T3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12" draw:layer="layout" svg:width="4.965cm" svg:height="0.754cm" svg:x="23.322cm" svg:y="10.394cm">
              <text:p text:style-name="P11"><text:span text:style-name="T4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5" draw:text-style-name="P12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26" draw:text-style-name="P19" draw:layer="layout" svg:x1="23.323cm" svg:y1="9.403cm" svg:x2="21.214cm" svg:y2="8.656cm" draw:start-shape="id69" draw:start-glue-point="6" draw:end-shape="id63" draw:end-glue-point="13" svg:d="M23323 9403h-1055v-747h-1054" svg:viewBox="0 0 2110 748">
          <text:p/>
        </draw:connector>
        <draw:connector draw:style-name="gr327" draw:text-style-name="P19" draw:layer="layout" svg:x1="25.577cm" svg:y1="13.161cm" svg:x2="26.907cm" svg:y2="11.747cm" draw:start-shape="id68" draw:start-glue-point="14" draw:end-shape="id69" draw:end-glue-point="9" svg:d="M25577 13161v-708h1330v-706" svg:viewBox="0 0 1331 1415">
          <text:p/>
        </draw:connector>
        <draw:frame draw:style-name="gr12" draw:text-style-name="P14" draw:layer="layout" svg:width="2.512cm" svg:height="0.725cm" svg:x="24.177cm" svg:y="11.795cm">
          <draw:text-box>
            <text:p><text:span text:style-name="T5">&lt;&lt;uses&gt;&gt;</text:span></text:p>
          </draw:text-box>
        </draw:frame>
        <draw:frame draw:style-name="gr12" draw:text-style-name="P14" draw:layer="layout" svg:width="3.81cm" svg:height="0.725cm" svg:x="21.955cm" svg:y="7.895cm">
          <draw:text-box>
            <text:p><text:span text:style-name="T5">&lt;&lt;consists of&gt;&gt;</text:span></text:p>
          </draw:text-box>
        </draw:frame>
        <draw:g draw:style-name="gr1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8" draw:text-style-name="P24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led_control.</text:span></text:p>
            <text:p text:style-name="P23"><text:span text:style-name="T3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12" draw:layer="layout" svg:width="3.492cm" svg:height="0.517cm" svg:x="1.5cm" svg:y="15.813cm">
            <text:p text:style-name="P11"><text:span text:style-name="T4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12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1" draw:text-style-name="P19" draw:layer="layout" svg:x1="2.471cm" svg:y1="14.187cm" svg:x2="1.846cm" svg:y2="12.946cm" draw:start-shape="id70" draw:start-glue-point="5" draw:end-shape="id67" draw:end-glue-point="6" svg:d="M2471 14187v-622h-625v-619" svg:viewBox="0 0 626 1242">
          <text:p/>
        </draw:connector>
        <draw:frame draw:style-name="gr12" draw:text-style-name="P14" draw:layer="layout" svg:width="3.81cm" svg:height="0.725cm" svg:x="1cm" svg:y="13.382cm">
          <draw:text-box>
            <text:p><text:span text:style-name="T5">&lt;&lt;consists of&gt;&gt;</text:span></text:p>
          </draw:text-box>
        </draw:fram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32" draw:text-style-name="P16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3" draw:text-style-name="P18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1" draw:id="id7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34" draw:text-style-name="P30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3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 leds = LEDControl()</text:span></text:p>
            <text:p text:style-name="P17"><text:span text:style-name="T3">- backlighting = Backlighting()</text:span></text:p>
            <text:p text:style-name="P17"><text:span text:style-name="T3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6" draw:text-style-name="P19" draw:layer="layout" svg:x1="8.465cm" svg:y1="8.061cm" svg:x2="11.394cm" svg:y2="6.115cm" draw:start-shape="id66" draw:start-glue-point="5" draw:end-shape="id71" draw:end-glue-point="5" svg:d="M8465 8061v-974h2929v-972" svg:viewBox="0 0 2930 1947">
          <text:p/>
        </draw:connector>
        <draw:connector draw:style-name="gr337" draw:text-style-name="P19" draw:layer="layout" svg:x1="3.498cm" svg:y1="7.685cm" svg:x2="9.461cm" svg:y2="6.115cm" draw:end-shape="id71" draw:end-glue-point="4" svg:d="M3498 7685v-522h5963v-1048" svg:viewBox="0 0 5964 1571">
          <text:p/>
        </draw:connector>
        <draw:connector draw:style-name="gr338" draw:text-style-name="P19" draw:layer="layout" svg:x1="20.911cm" svg:y1="8.021cm" svg:x2="17.192cm" svg:y2="5.46cm" draw:start-shape="id63" draw:start-glue-point="15" draw:end-shape="id71" draw:end-glue-point="8" svg:d="M20911 8021v-2561h-3719" svg:viewBox="0 0 3720 2562">
          <text:p/>
        </draw:connector>
        <draw:g draw:style-name="gr1" xml:id="id72" draw:id="id72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39" draw:text-style-name="P24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module&gt;&gt;</text:span></text:p>
            <text:p text:style-name="P23"><text:span text:style-name="T3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2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</text:span><text:span text:style-name="T4">publish_comman</text:span><text:span text:style-name="T4">d_message(</text:span></text:p>
            <text:p text:style-name="P11"><text:span text:style-name="T4"><text:s text:c="17"/></text:span><text:span text:style-name="T4">message: </text:span><text:span text:style-name="T4">CommandMessa</text:span><text:span text:style-name="T4">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19" draw:layer="layout" svg:x1="13.738cm" svg:y1="12.219cm" svg:x2="11.786cm" svg:y2="10.89cm" draw:start-shape="id72" draw:end-shape="id66" draw:end-glue-point="12" svg:d="M13738 12219v-1329h-1952" svg:viewBox="0 0 1953 1330">
          <text:p/>
        </draw:connector>
        <draw:frame draw:style-name="gr12" draw:text-style-name="P14" draw:layer="layout" svg:width="2.512cm" svg:height="0.725cm" svg:x="12.458cm" svg:y="10.207cm">
          <draw:text-box>
            <text:p><text:span text:style-name="T5">&lt;&lt;uses&gt;&gt;</text:span></text:p>
          </draw:text-box>
        </draw:frame>
        <draw:frame draw:style-name="gr12" draw:text-style-name="P14" draw:layer="layout" svg:width="2.512cm" svg:height="0.725cm" svg:x="18.462cm" svg:y="4.492cm">
          <draw:text-box>
            <text:p><text:span text:style-name="T5">&lt;&lt;uses&gt;&gt;</text:span></text:p>
          </draw:text-box>
        </draw:frame>
      </draw:page>
      <draw:page draw:name="Music Players" draw:style-name="dp1" draw:master-page-name="Default">
        <draw:custom-shape draw:style-name="gr343" draw:text-style-name="P7" draw:layer="layout" svg:width="25.039cm" svg:height="0.7cm" svg:x="1.635cm" svg:y="2.55cm">
          <text:p text:style-name="P6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7" draw:layer="layout" svg:width="25.091cm" svg:height="0.7cm" svg:x="1.635cm" svg:y="7.35cm">
          <text:p text:style-name="P6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5" draw:text-style-name="P16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18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7" draw:text-style-name="P7" draw:layer="layout" svg:width="24.824cm" svg:height="0.7cm" svg:x="1.85cm" svg:y="18.98cm">
          <text:p text:style-name="P6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8" draw:text-style-name="P8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1">
            <draw:custom-shape draw:style-name="gr349" draw:text-style-name="P10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pd_monitor.MPDMonitor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2" draw:layer="layout" svg:width="5.397cm" svg:height="0.545cm" svg:x="7.655cm" svg:y="10.295cm">
              <text:p text:style-name="P11"><text:span text:style-name="T4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1" draw:text-style-name="P12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class: MPDService)</text:span></text:p>
              <text:p text:style-name="P11"><text:span text:style-name="T4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1">
            <draw:custom-shape draw:style-name="gr352" draw:text-style-name="P10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mpd_control.MPDControl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12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12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init(class: MPDService)</text:span></text:p>
              <text:p text:style-name="P11"><text:span text:style-name="T4">+ is_web_radio()</text:span></text:p>
              <text:p text:style-name="P11"><text:span text:style-name="T4">+ next()</text:span></text:p>
              <text:p text:style-name="P11"><text:span text:style-name="T4">+ play()</text:span></text:p>
              <text:p text:style-name="P11"><text:span text:style-name="T4">+ stop()</text:span></text:p>
              <text:p text:style-name="P11"><text:span text:style-name="T4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1">
            <draw:custom-shape draw:style-name="gr355" draw:text-style-name="P10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9"><text:span text:style-name="T3">spotify_connect.SpotifyConnect</text:span></text:p>
              <text:p text:style-name="P9"><text:span text:style-name="T3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12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2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11"><text:span text:style-name="T4">+ play()</text:span></text:p>
              <text:p text:style-name="P11"><text:span text:style-name="T4">+ pause()</text:span></text:p>
              <text:p text:style-name="P11"><text:span text:style-name="T4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58" draw:text-style-name="P19" draw:layer="layout" draw:line-skew="0.511cm" svg:x1="9.155cm" svg:y1="9.143cm" svg:x2="10.029cm" svg:y2="6.816cm" draw:start-shape="id73" draw:start-glue-point="5" draw:end-shape="id74" draw:end-glue-point="5" svg:d="M9155 9143v-654h874v-1673" svg:viewBox="0 0 875 2328">
          <text:p/>
        </draw:connector>
        <draw:connector draw:style-name="gr359" draw:text-style-name="P19" draw:layer="layout" draw:line-skew="0.218cm" svg:x1="1.841cm" svg:y1="9.094cm" svg:x2="8.429cm" svg:y2="6.816cm" draw:start-shape="id75" draw:start-glue-point="4" draw:end-shape="id74" draw:end-glue-point="4" svg:d="M1841 9094v-922h6588v-1356" svg:viewBox="0 0 6589 2279">
          <text:p/>
        </draw:connector>
        <draw:connector draw:style-name="gr360" draw:text-style-name="P19" draw:layer="layout" svg:x1="24.127cm" svg:y1="8.795cm" svg:x2="14.83cm" svg:y2="5.146cm" draw:start-shape="id76" draw:start-glue-point="14" draw:end-shape="id74" draw:end-glue-point="14" svg:d="M24127 8795v-3649h-9297" svg:viewBox="0 0 9298 3650">
          <text:p/>
        </draw:connector>
        <draw:custom-shape draw:style-name="gr361" draw:text-style-name="P13" draw:layer="layout" svg:width="25.995cm" svg:height="1.205cm" svg:x="1cm" svg:y="1.099cm">
          <text:p text:style-name="P6">Static View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2.54cm" svg:height="0.725cm" svg:x="2.587cm" svg:y="8.302cm">
          <draw:text-box>
            <text:p><text:span text:style-name="T5">&lt;&lt;uses&gt;&gt;</text:span></text:p>
          </draw:text-box>
        </draw:frame>
        <draw:g draw:style-name="gr1" xml:id="id78" draw:id="id78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62" draw:text-style-name="P10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mpd_service.MPDService</text:span></text:p>
            <text:p text:style-name="P9"><text:span text:style-name="T3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2" draw:layer="layout" svg:width="5.397cm" svg:height="0.669cm" svg:x="7.603cm" svg:y="15.201cm">
            <text:p text:style-name="P11"><text:span text:style-name="T4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12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init()</text:span></text:p>
            <text:p text:style-name="P11"><text:span text:style-name="T4">+ get_stats()</text:span></text:p>
            <text:p text:style-name="P11"><text:span text:style-name="T4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7" draw:id="id77">
          <draw:custom-shape draw:style-name="gr365" draw:text-style-name="P10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3">mpd.MPDClient</text:span></text:p>
            <text:p text:style-name="P9"><text:span text:style-name="T3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2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2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4">+ init()</text:span></text:p>
            <text:p text:style-name="P11"><text:span text:style-name="T4">+ idle()</text:span></text:p>
            <text:p text:style-name="P11"><text:span text:style-name="T4">+ update()</text:span></text:p>
            <text:p text:style-name="P11"><text:span text:style-name="T4">+ next()</text:span></text:p>
            <text:p text:style-name="P11"><text:span text:style-name="T4">+ play()</text:span></text:p>
            <text:p text:style-name="P11"><text:span text:style-name="T4">+ stop()</text:span></text:p>
            <text:p text:style-name="P11"><text:span text:style-name="T4">+ pause()</text:span></text:p>
            <text:p text:style-name="P11"><text:span text:style-name="T4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8" draw:text-style-name="P19" draw:layer="layout" svg:x1="14.252cm" svg:y1="15.889cm" svg:x2="13cm" svg:y2="15.652cm" draw:start-shape="id77" draw:start-glue-point="3" draw:end-shape="id78" draw:end-glue-point="1" svg:d="M14252 15889h-627v-237h-625" svg:viewBox="0 0 1253 238">
          <text:p/>
        </draw:connector>
        <draw:frame draw:style-name="gr12" draw:text-style-name="P14" draw:layer="layout" svg:width="2.83cm" svg:height="0.725cm" svg:x="4.492cm" svg:y="13.61cm">
          <draw:text-box>
            <text:p><text:span text:style-name="T5">&lt;&lt;is A&gt;&gt;</text:span></text:p>
          </draw:text-box>
          <draw:glue-point draw:id="4" svg:x="0.512cm" svg:y="-0.606cm"/>
        </draw:frame>
        <draw:connector draw:style-name="gr369" draw:text-style-name="P19" draw:layer="layout" svg:x1="12.636cm" svg:y1="14.048cm" svg:x2="11.552cm" svg:y2="11.833cm" draw:start-shape="id78" draw:start-glue-point="6" draw:end-shape="id73" draw:end-glue-point="9" svg:d="M12636 14048v-1108h-1084v-1107" svg:viewBox="0 0 1085 2216">
          <text:p/>
        </draw:connector>
        <draw:connector draw:style-name="gr370" draw:text-style-name="P19" draw:layer="layout" svg:x1="7.603cm" svg:y1="15.652cm" svg:x2="6.637cm" svg:y2="13.489cm" draw:start-shape="id78" draw:start-glue-point="3" draw:end-shape="id75" draw:end-glue-point="10" svg:d="M7603 15652h-966v-2163" svg:viewBox="0 0 967 2164">
          <text:p/>
        </draw:connector>
        <draw:frame draw:style-name="gr12" draw:text-style-name="P14" draw:layer="layout" svg:width="2.222cm" svg:height="0.725cm" svg:x="9.89cm" svg:y="12.975cm">
          <draw:text-box>
            <text:p><text:span text:style-name="T5">&lt;&lt;is A&gt;&gt;</text:span></text:p>
          </draw:text-box>
          <draw:glue-point draw:id="4" svg:x="0.512cm" svg:y="-0.606cm"/>
        </draw:frame>
        <draw:frame draw:style-name="gr12" draw:text-style-name="P14" draw:layer="layout" svg:width="3.147cm" svg:height="0.725cm" svg:x="20.685cm" svg:y="7.985cm">
          <draw:text-box>
            <text:p><text:span text:style-name="T5">&lt;&lt;uses&gt;&gt;</text:span></text:p>
          </draw:text-box>
        </draw:frame>
        <draw:frame draw:style-name="gr12" draw:text-style-name="P14" draw:layer="layout" svg:width="2.54cm" svg:height="0.725cm" svg:x="9.89cm" svg:y="8.302cm">
          <draw:text-box>
            <text:p><text:span text:style-name="T5">&lt;&lt;uses&gt;&gt;</text:span></text:p>
          </draw:text-box>
        </draw:frame>
        <draw:frame draw:style-name="gr12" draw:text-style-name="P14" draw:layer="layout" svg:width="3.81cm" svg:height="0.725cm" svg:x="10.525cm" svg:y="17.51cm">
          <draw:text-box>
            <text:p><text:span text:style-name="T5">&lt;&lt;consists of&gt;&gt;</text:span></text:p>
          </draw:text-box>
        </draw:frame>
        <draw:g draw:style-name="gr1" xml:id="id79" draw:id="id7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71" draw:text-style-name="P24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mpd_control.</text:span></text:p>
            <text:p text:style-name="P23"><text:span text:style-name="T3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12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2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4" draw:text-style-name="P19" draw:layer="layout" svg:x1="4.461cm" svg:y1="15.276cm" svg:x2="3.04cm" svg:y2="13.489cm" draw:start-shape="id79" draw:start-glue-point="8" draw:end-shape="id75" draw:end-glue-point="8" svg:d="M4461 15276v-894h-1421v-893" svg:viewBox="0 0 1422 1788">
          <text:p/>
        </draw:connector>
        <draw:g draw:style-name="gr1" xml:id="id80" draw:id="id8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75" draw:text-style-name="P24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3"><text:span text:style-name="T3">&lt;&lt;thread&gt;&gt;</text:span></text:p>
            <text:p text:style-name="P23"><text:span text:style-name="T3">mpd_monitor.</text:span></text:p>
            <text:p text:style-name="P23"><text:span text:style-name="T3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12" draw:layer="layout" svg:width="3.235cm" svg:height="0.728cm" svg:x="14.335cm" svg:y="10.647cm">
            <text:p text:style-name="P11"><text:span text:style-name="T4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2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8" draw:text-style-name="P19" draw:layer="layout" svg:x1="14.335cm" svg:y1="10.515cm" svg:x2="13.051cm" svg:y2="9.778cm" draw:start-shape="id80" draw:end-shape="id73" draw:end-glue-point="13" svg:d="M14335 10515h-642v-737h-642" svg:viewBox="0 0 1285 738">
          <text:p/>
        </draw:connector>
        <draw:g draw:style-name="gr1" xml:id="id74" draw:id="id7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9" draw:text-style-name="P30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(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0" draw:text-style-name="P3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3">-</text:span><text:span text:style-name="T3"> </text:span><text:span text:style-name="T3">m</text:span><text:span text:style-name="T3">p</text:span><text:span text:style-name="T3">d</text:span><text:span text:style-name="T3">_</text:span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 </text:span><text:span text:style-name="T3">=</text:span><text:span text:style-name="T3"> </text:span><text:span text:style-name="T3">M</text:span><text:span text:style-name="T3">P</text:span><text:span text:style-name="T3">D</text:span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(</text:span><text:span text:style-name="T3">)</text:span></text:p>
            <text:p text:style-name="P17"><text:span text:style-name="T3">-</text:span><text:span text:style-name="T3"> </text:span><text:span text:style-name="T3">m</text:span><text:span text:style-name="T3">p</text:span><text:span text:style-name="T3">d</text:span><text:span text:style-name="T3">_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=</text:span><text:span text:style-name="T3"> </text:span><text:span text:style-name="T3">M</text:span><text:span text:style-name="T3">P</text:span><text:span text:style-name="T3">D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(</text:span><text:span text:style-name="T3">)</text:span></text:p>
            <text:p text:style-name="P17"><text:span text:style-name="T3">-</text:span><text:span text:style-name="T3"> </text:span><text:span text:style-name="T3">s</text:span><text:span text:style-name="T3">p</text:span><text:span text:style-name="T3">o</text:span><text:span text:style-name="T3">t</text:span><text:span text:style-name="T3">i</text:span><text:span text:style-name="T3">f</text:span><text:span text:style-name="T3">y</text:span><text:span text:style-name="T3">_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 </text:span><text:span text:style-name="T3">=</text:span><text:span text:style-name="T3"> </text:span><text:span text:style-name="T3">S</text:span><text:span text:style-name="T3">p</text:span><text:span text:style-name="T3">o</text:span><text:span text:style-name="T3">t</text:span><text:span text:style-name="T3">i</text:span><text:span text:style-name="T3">f</text:span><text:span text:style-name="T3">y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(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14" draw:layer="layout" svg:width="3.81cm" svg:height="0.725cm" svg:x="1.217cm" svg:y="14.462cm">
          <draw:text-box>
            <text:p><text:span text:style-name="T5">&lt;&lt;consists of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01T17:57:34.346008166</dc:date>
    <meta:editing-duration>PT15H38M52S</meta:editing-duration>
    <meta:editing-cycles>115</meta:editing-cycles>
    <meta:print-date>2026-05-31T17:56:35.806719548</meta:print-date>
    <dc:creator>Henk</dc:creator>
    <meta:printed-by>PDF files: Henk</meta:printed-by>
    <meta:document-statistic meta:object-count="558"/>
  </office:meta>
</office:document-meta>
</file>