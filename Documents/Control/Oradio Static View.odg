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7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>
      <style:graphic-properties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9.366cm" fo:min-width="9.70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9.608cm" fo:padding-top="0.151cm" fo:padding-bottom="0.151cm" fo:padding-left="0.276cm" fo:padding-right="0.276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6.753cm" fo:padding-top="0.151cm" fo:padding-bottom="0.151cm" fo:padding-left="0.276cm" fo:padding-right="0.276cm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4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3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1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65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33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98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48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36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5.456cm" fo:min-width="7.4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7.386cm" fo:padding-top="0.151cm" fo:padding-bottom="0.151cm" fo:padding-left="0.276cm" fo:padding-right="0.276cm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>
      <style:graphic-properties draw:textarea-horizontal-align="justify" draw:textarea-vertical-align="middle" draw:auto-grow-height="false" fo:min-height="0.45cm" fo:min-width="19.373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45cm" fo:min-width="19.202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45cm" fo:min-width="19.44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0.403cm" fo:padding-top="0.151cm" fo:padding-bottom="0.151cm" fo:padding-left="0.276cm" fo:padding-right="0.276cm" loext:decorative="false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1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3.9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>
      <style:graphic-properties draw:textarea-horizontal-align="justify" draw:textarea-vertical-align="middle" draw:auto-grow-height="false" fo:min-height="0.45cm" fo:min-width="19.698cm" style:writing-mode="lr-tb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45cm" fo:min-width="19.585cm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16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38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79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8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89" style:family="graphic" style:parent-style-name="standard">
      <style:graphic-properties draw:stroke="none" draw:fill="none" fo:min-height="3.793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6.1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0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221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7.148cm" fo:padding-top="0.151cm" fo:padding-bottom="0.151cm" fo:padding-left="0.276cm" fo:padding-right="0.276cm" loext:decorative="false"/>
    </style:style>
    <style:style style:name="gr2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6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267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2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start"/>
      <style:text-properties fo:font-size="12pt"/>
    </style:style>
    <style:style style:name="P26" style:family="paragraph">
      <loext:graphic-properties draw:fill="none"/>
      <style:paragraph-properties fo:text-align="start"/>
      <style:text-properties fo:font-size="12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0" style:family="paragraph">
      <loext:graphic-properties draw:fill="none"/>
      <style:text-properties fo:font-size="12pt" style:font-size-asian="12pt" style:font-size-complex="12pt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0.367cm" svg:y="7.032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" draw:id="id4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.78cm" svg:y="8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.78cm" svg:y="9.703cm">
            <text:p text:style-name="P11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1" draw:text-style-name="P10" draw:layer="layout" svg:width="4.465cm" svg:height="1.153cm" svg:x="7.917cm" svg:y="11.6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465cm" svg:height="0.887cm" svg:x="7.917cm" svg:y="12.765cm">
            <text:p text:style-name="P11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3" draw:layer="layout" svg:x1="23.284cm" svg:y1="7.929cm" svg:x2="21.449cm" svg:y2="5.27cm" draw:start-shape="id1" draw:end-shape="id2" draw:end-glue-point="7" svg:d="M23284 7929v-1330h-1835v-1329" svg:viewBox="0 0 1836 2660">
          <text:p/>
        </draw:connector>
        <draw:connector draw:style-name="gr14" draw:text-style-name="P13" draw:layer="layout" svg:x1="12.073cm" svg:y1="11.612cm" svg:x2="11.494cm" svg:y2="5.27cm" draw:start-shape="id3" draw:start-glue-point="5" draw:end-shape="id2" draw:end-glue-point="35" svg:d="M12073 11612v-3172h-579v-3170" svg:viewBox="0 0 580 6343">
          <text:p/>
        </draw:connector>
        <draw:connector draw:style-name="gr15" draw:text-style-name="P13" draw:layer="layout" svg:x1="4.269cm" svg:y1="8.686cm" svg:x2="5.111cm" svg:y2="5.27cm" draw:start-shape="id4" draw:start-glue-point="4" draw:end-shape="id2" draw:end-glue-point="17" svg:d="M4269 8686v-1777h842v-1639" svg:viewBox="0 0 843 3417">
          <text:p/>
        </draw:connector>
        <draw:custom-shape draw:style-name="gr16" draw:text-style-name="P14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" draw:id="id5">
          <draw:glue-point draw:id="4" svg:x="1.153cm" svg:y="-4.294cm"/>
          <draw:glue-point draw:id="5" svg:x="3.461cm" svg:y="-5.146cm"/>
          <draw:glue-point draw:id="6" svg:x="-3.33cm" svg:y="-4.948cm"/>
          <draw:custom-shape draw:style-name="gr17" draw:text-style-name="P10" draw:layer="controls" svg:width="4.047cm" svg:height="1.153cm" svg:x="6.492cm" svg:y="8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controls" svg:width="4.047cm" svg:height="1.262cm" svg:x="6.492cm" svg:y="9.743cm">
            <text:p text:style-name="P11"><text:span text:style-name="T3">+ xxxx</text:span></text:p>
            <text:p text:style-name="P11"><text:span text:style-name="T3">+ xxxx</text:span></text:p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3" draw:layer="controls" svg:x1="7.168cm" svg:y1="8.603cm" svg:x2="8.939cm" svg:y2="5.27cm" draw:start-shape="id5" draw:start-glue-point="6" draw:end-shape="id2" draw:end-glue-point="45" svg:d="M7168 8603v-1674h1771v-1659" svg:viewBox="0 0 1772 3334">
          <text:p/>
        </draw:connector>
        <draw:g draw:style-name="gr3" xml:id="id1" draw:id="id1">
          <draw:custom-shape draw:style-name="gr20" draw:text-style-name="P10" draw:layer="layout" svg:width="7.302cm" svg:height="1.153cm" svg:x="19.633cm" svg:y="7.92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throttled_monitor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7.302cm" svg:height="0.761cm" svg:x="19.633cm" svg:y="9.082cm">
            <text:p text:style-name="P15"><text:span text:style-name="T3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7.302cm" svg:height="0.599cm" svg:x="19.633cm" svg:y="9.8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6" draw:id="id6">
          <draw:glue-point draw:id="4" svg:x="-5.035cm" svg:y="-2.72cm"/>
          <draw:glue-point draw:id="5" svg:x="-0.912cm" svg:y="-1.099cm"/>
          <draw:glue-point draw:id="6" svg:x="-0.496cm" svg:y="-1.099cm"/>
          <draw:custom-shape draw:style-name="gr23" draw:text-style-name="P17" draw:layer="layout" svg:width="7.62cm" svg:height="1.153cm" svg:x="18.84cm" svg:y="12.1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1">throttled_monitor.RpiThrottlingMonitor</text:span></text:p>
            <text:p text:style-name="P16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62cm" svg:height="0.591cm" svg:x="18.84cm" svg:y="13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62cm" svg:height="2.175cm" svg:x="18.84cm" svg:y="13.9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- init()</text:span></text:p>
            <text:p text:style-name="P11"><text:span text:style-name="T3">+ start()</text:span></text:p>
            <text:p text:style-name="P11"><text:span text:style-name="T3">+ stop()</text:span></text:p>
            <text:p text:style-name="P11"><text:span text:style-name="T3">+ force_throttled()</text:span></text:p>
            <text:p text:style-name="P11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3" draw:layer="layout" svg:x1="22.65cm" svg:y1="12.172cm" svg:x2="23.284cm" svg:y2="10.442cm" draw:start-shape="id6" draw:end-shape="id1" svg:d="M22650 12172v-866h634v-864" svg:viewBox="0 0 635 1731">
          <text:p/>
        </draw:connector>
        <draw:frame draw:style-name="gr7" draw:text-style-name="P7" draw:layer="layout" svg:width="3.085cm" svg:height="0.725cm" svg:x="20.367cm" svg:y="10.842cm">
          <draw:text-box>
            <text:p><text:span text:style-name="T2">&lt;&lt;uses&gt;&gt;</text:span></text:p>
          </draw:text-box>
        </draw:frame>
        <draw:g draw:style-name="gr27">
          <draw:polygon draw:style-name="gr28" draw:text-style-name="P19" draw:layer="layout" svg:width="5.199cm" svg:height="1.904cm" svg:x="1.832cm" svg:y="14.652cm" svg:viewBox="0 0 5200 1905" draw:points="5200,476 5200,1905 0,1905 0,0 4420,0">
            <text:p text:style-name="P18"><text:span text:style-name="T4">oradio_log:</text:span></text:p>
            <text:p text:style-name="P18"><text:span text:style-name="T4">Implementation detail</text:span></text:p>
          </draw:polygon>
          <draw:path draw:style-name="gr29" draw:text-style-name="P19" draw:layer="layout" svg:width="0.651cm" svg:height="0.398cm" svg:x="6.316cm" svg:y="14.69cm" svg:viewBox="0 0 652 399" svg:d="M0 0c217 133 435 265 652 399-217 0-435 0-652 0 0-134 0-266 0-399z">
            <text:p/>
          </draw:path>
        </draw:g>
        <draw:frame draw:style-name="gr7" draw:text-style-name="P7" draw:layer="layout" svg:width="3.085cm" svg:height="0.725cm" svg:x="8.62cm" svg:y="7.26cm">
          <draw:text-box>
            <text:p><text:span text:style-name="T2">&lt;&lt;uses&gt;&gt;</text:span></text:p>
          </draw:text-box>
        </draw:frame>
        <draw:connector draw:style-name="gr30" draw:text-style-name="P13" draw:layer="layout" svg:x1="16.239cm" svg:y1="14.435cm" svg:x2="18.84cm" svg:y2="13.066cm" draw:start-shape="id7" draw:start-glue-point="4" draw:end-shape="id6" draw:end-glue-point="4" svg:d="M16239 14435v-1369h2601" svg:viewBox="0 0 2602 1370">
          <text:p/>
        </draw:connector>
        <draw:frame draw:style-name="gr7" draw:text-style-name="P7" draw:layer="layout" svg:width="3.085cm" svg:height="0.725cm" svg:x="15.06cm" svg:y="12.112cm">
          <draw:text-box>
            <text:p><text:span text:style-name="T2">&lt;&lt;uses&gt;&gt;</text:span></text:p>
          </draw:text-box>
        </draw:frame>
        <draw:g draw:style-name="gr3" xml:id="id7" draw:id="id7">
          <draw:glue-point draw:id="4" svg:x="3.4cm" svg:y="-5.131cm"/>
          <draw:custom-shape draw:style-name="gr31" draw:text-style-name="P21" draw:layer="layout" svg:width="7.937cm" svg:height="1.153cm" svg:x="9.573cm" svg:y="14.4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2" draw:layer="layout" svg:width="7.937cm" svg:height="0.435cm" svg:x="9.573cm" svg:y="15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7.937cm" svg:height="0.599cm" svg:x="9.573cm" svg:y="15.9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Messages" draw:style-name="dp1" draw:master-page-name="Default">
        <draw:g draw:style-name="gr3" xml:id="id9" draw:id="id9">
          <draw:g draw:style-name="gr3">
            <draw:custom-shape draw:style-name="gr34" draw:text-style-name="P23" draw:layer="layout" svg:width="5.127cm" svg:height="0.679cm" svg:x="17.34cm" svg:y="6.938cm">
              <draw:glue-point draw:id="4" svg:x="0.5cm" svg:y="0cm" draw:align="top-left"/>
              <text:p text:style-name="P22"><text:span text:style-name="T5">&lt;&lt;Module&gt;&gt;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24" draw:layer="layout" svg:width="10.16cm" svg:height="9.575cm" svg:x="17.34cm" svg:y="7.617cm">
              <draw:glue-point draw:id="4" svg:x="0.501cm" svg:y="-0.003cm" draw:align="bottom-left" draw:escape-direction="down"/>
              <draw:glue-point draw:id="5" svg:x="-0.501cm" svg:y="-0.003cm" draw:align="bottom-right" draw:escape-direction="down"/>
              <draw:glue-point draw:id="6" svg:x="0cm" svg:y="-0.252cm" draw:align="bottom-left" draw:escape-direction="left"/>
              <draw:glue-point draw:id="7" svg:x="0cm" svg:y="-0.252cm" draw:align="bottom-right" draw:escape-direction="right"/>
              <draw:glue-point draw:id="8" svg:x="0cm" svg:y="0.23cm" draw:align="top-left" draw:escape-direction="left"/>
              <draw:glue-point draw:id="9" svg:x="0cm" svg:y="0.23cm" draw:align="top-right" draw:escape-direction="up"/>
              <draw:glue-point draw:id="10" svg:x="-0.501cm" svg:y="0cm" draw:align="top-right" draw:escape-direction="up"/>
              <text:p text:style-name="P5"><text:span text:style-name="T1">All module/classes can use the global error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6" draw:text-style-name="P26" draw:layer="layout" svg:width="10.16cm" svg:height="0.952cm" svg:x="17.34cm" svg:y="17.21cm">
            <text:p text:style-name="P25">- put_error_message()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37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9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27.30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7.305cm" svg:height="0.952cm" svg:x="1cm" svg:y="1.1cm">
          <text:p text:style-name="P1">Static view: Messag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11.885cm" svg:y="11.705cm">
          <draw:text-box>
            <text:p><text:span text:style-name="T2">&lt;&lt;uses&gt;&gt;</text:span></text:p>
          </draw:text-box>
          <draw:glue-point draw:id="4" svg:x="4.998cm" svg:y="-4.993cm"/>
          <draw:glue-point draw:id="5" svg:x="4.998cm" svg:y="-4.993cm"/>
          <draw:glue-point draw:id="6" svg:x="4.998cm" svg:y="-4.993cm"/>
        </draw:frame>
        <draw:g draw:style-name="gr3" xml:id="id8" draw:id="id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40" draw:text-style-name="P21" draw:layer="layout" svg:width="9.855cm" svg:height="1.153cm" svg:x="6.397cm" svg:y="15.3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9.855cm" svg:height="0.435cm" svg:x="6.397cm" svg:y="16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2" draw:layer="layout" svg:width="9.855cm" svg:height="0.993cm" svg:x="6.397cm" svg:y="16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43" draw:text-style-name="P28" draw:layer="layout" svg:width="4.763cm" svg:height="0.753cm" svg:x="17.657cm" svg:y="15.36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power_supply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8" draw:layer="layout" svg:width="4.761cm" svg:height="0.753cm" svg:x="17.657cm" svg:y="14.634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remote_monitorin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8" draw:layer="layout" svg:width="4.764cm" svg:height="0.635cm" svg:x="17.657cm" svg:y="9.0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mpd_control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8" draw:layer="layout" svg:width="4.764cm" svg:height="0.815cm" svg:x="17.657cm" svg:y="9.645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spotify_connect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8" draw:layer="layout" svg:width="4.761cm" svg:height="0.667cm" svg:x="22.421cm" svg:y="10.40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touch_button</text:span><text:span text:style-name="T4">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4.761cm" svg:height="0.635cm" svg:x="22.421cm" svg:y="9.03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mpd_monitor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761cm" svg:height="0.7cm" svg:x="22.421cm" svg:y="13.1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web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8" draw:layer="layout" svg:width="4.764cm" svg:height="0.75cm" svg:x="17.657cm" svg:y="10.40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usb_servic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8" draw:layer="layout" svg:width="4.764cm" svg:height="0.565cm" svg:x="17.657cm" svg:y="11.11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led_control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8" draw:layer="layout" svg:width="4.764cm" svg:height="0.753cm" svg:x="17.657cm" svg:y="11.67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oradio_control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4.761cm" svg:height="0.753cm" svg:x="22.421cm" svg:y="11.04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oradio_control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layout" svg:width="4.761cm" svg:height="0.753cm" svg:x="22.421cm" svg:y="11.67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backlighting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4.764cm" svg:height="0.753cm" svg:x="17.657cm" svg:y="12.41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fastapi_serv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4.761cm" svg:height="0.753cm" svg:x="22.421cm" svg:y="12.411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gpio_servic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4.764cm" svg:height="0.753cm" svg:x="17.657cm" svg:y="13.14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i2c_servic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4.761cm" svg:height="0.753cm" svg:x="22.421cm" svg:y="9.67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mpd_servic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8" draw:layer="layout" svg:width="4.764cm" svg:height="0.753cm" svg:x="17.657cm" svg:y="13.8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oradio_util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8" draw:layer="layout" svg:width="4.761cm" svg:height="0.753cm" svg:x="22.421cm" svg:y="13.8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system_sound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8" draw:layer="layout" svg:width="4.763cm" svg:height="0.753cm" svg:x="22.387cm" svg:y="14.62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7"><text:span text:style-name="T4">throttled_monitor</text:span></text:p>
            <draw:enhanced-geometry svg:viewBox="0 0 21600 21600" draw:type="rectangle" draw:enhanced-path="M 0 0 L 21600 0 21600 21600 0 21600 0 0 Z N"/>
          </draw:custom-shape>
        </draw:g>
        <draw:g draw:style-name="gr3" xml:id="id10" draw:id="id10">
          <draw:g draw:style-name="gr3">
            <draw:glue-point draw:id="4" svg:x="0.501cm" svg:y="-0.003cm" draw:align="bottom-left"/>
            <draw:glue-point draw:id="5" svg:x="-0.501cm" svg:y="-0.003cm" draw:align="bottom-right"/>
            <draw:glue-point draw:id="6" svg:x="0cm" svg:y="-0.253cm" draw:align="bottom-right"/>
            <draw:glue-point draw:id="7" svg:x="0cm" svg:y="-0.253cm" draw:align="bottom-left"/>
            <draw:glue-point draw:id="8" svg:x="0cm" svg:y="0.751cm" draw:align="top-left"/>
            <draw:glue-point draw:id="9" svg:x="0cm" svg:y="0.751cm" draw:align="top-right"/>
            <draw:glue-point draw:id="10" svg:x="0.501cm" svg:y="0cm" draw:align="top-left"/>
            <draw:glue-point draw:id="11" svg:x="-0.501cm" svg:y="0.501cm" draw:align="top-right" draw:escape-direction="up"/>
            <draw:g draw:style-name="gr3">
              <draw:custom-shape draw:style-name="gr62" draw:text-style-name="P29" draw:layer="layout" svg:width="3.425cm" svg:height="0.679cm" svg:x="1.952cm" svg:y="7.356cm">
                <draw:glue-point draw:id="4" svg:x="0.5cm" svg:y="0cm" draw:align="top-left"/>
                <text:p text:style-name="P3"><text:span text:style-name="T1"><text:s text:c="2"/></text:span><text:span text:style-name="T1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3" draw:text-style-name="P24" draw:layer="layout" svg:width="7.938cm" svg:height="5.665cm" svg:x="1.952cm" svg:y="8.035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64" draw:text-style-name="P31" draw:layer="layout" svg:width="7.938cm" svg:height="0.952cm" svg:x="1.952cm" svg:y="13.7cm">
            <text:p text:style-name="P30"><text:span text:style-name="T2">- </text:span><text:span text:style-name="T2">put_comman</text:span><text:span text:style-name="T2">d_message()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65" draw:text-style-name="P33" draw:layer="layout" svg:width="6.985cm" svg:height="0.85cm" svg:x="2.487cm" svg:y="8.8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2"><text:span text:style-name="T4">volume_control.VolumeContro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3" draw:layer="layout" svg:width="6.985cm" svg:height="0.85cm" svg:x="2.487cm" svg:y="9.6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2"><text:span text:style-name="T4">spotify_connect.SpotifyConnect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985cm" svg:height="0.85cm" svg:x="2.487cm" svg:y="10.5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2"><text:span text:style-name="T4">web_service.WebService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33" draw:layer="layout" svg:width="6.985cm" svg:height="0.85cm" svg:x="2.487cm" svg:y="11.42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2"><text:span text:style-name="T4">usb_service.USBService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3" draw:layer="layout" svg:width="6.985cm" svg:height="0.85cm" svg:x="2.487cm" svg:y="12.215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2"><text:span text:style-name="T4">touch_buttons.TouchButtons</text:span></text:p>
            <draw:enhanced-geometry svg:viewBox="0 0 21600 21600" draw:type="rectangle" draw:enhanced-path="M 0 0 L 21600 0 21600 21600 0 21600 0 0 Z N"/>
          </draw:custom-shape>
        </draw:g>
        <draw:connector draw:style-name="gr70" draw:text-style-name="P13" draw:layer="layout" svg:x1="14.212cm" svg:y1="15.311cm" svg:x2="17.34cm" svg:y2="12.55cm" draw:start-shape="id8" draw:start-glue-point="7" draw:end-shape="id9" svg:d="M14212 15311v-2761h3128" svg:viewBox="0 0 3129 2762">
          <text:p/>
        </draw:connector>
        <draw:connector draw:style-name="gr71" draw:text-style-name="P13" draw:layer="layout" svg:x1="11.324cm" svg:y1="15.311cm" svg:x2="9.89cm" svg:y2="11.004cm" draw:start-shape="id8" draw:start-glue-point="0" draw:end-shape="id10" svg:d="M11324 15311v-4307h-1434" svg:viewBox="0 0 1435 4308">
          <text:p/>
        </draw:connector>
      </draw:page>
      <draw:page draw:name="Remote monitoring" draw:style-name="dp1" draw:master-page-name="Default">
        <draw:custom-shape draw:style-name="gr72" draw:text-style-name="P2" draw:layer="layout" svg:width="19.873cm" svg:height="0.7cm" svg:x="1.44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" draw:layer="layout" svg:width="19.702cm" svg:height="0.7cm" svg:x="1.554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2" draw:id="id1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74" draw:text-style-name="P4" draw:layer="layout" svg:width="19.769cm" svg:height="1.153cm" svg:x="1.551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6" draw:layer="layout" svg:width="19.769cm" svg:height="0.679cm" svg:x="1.551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2" draw:layer="layout" svg:width="19.945cm" svg:height="0.7cm" svg:x="1.3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4.582cm" svg:y="6.715cm">
          <draw:text-box>
            <text:p><text:span text:style-name="T2">&lt;&lt;uses&gt;&gt;</text:span></text:p>
          </draw:text-box>
        </draw:frame>
        <draw:custom-shape draw:style-name="gr77" draw:text-style-name="P8" draw:layer="layout" svg:width="20.95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78" draw:text-style-name="P10" draw:layer="layout" svg:width="6.423cm" svg:height="1.153cm" svg:x="2.719cm" svg:y="7.5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2" draw:layer="layout" svg:width="6.423cm" svg:height="0.76cm" svg:x="2.719cm" svg:y="8.671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2" draw:layer="layout" svg:width="6.423cm" svg:height="0.993cm" svg:x="2.719cm" svg:y="9.4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nd_message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1" draw:text-style-name="P13" draw:layer="layout" draw:line-skew="0.345cm" svg:x1="7.357cm" svg:y1="7.519cm" svg:x2="5.505cm" svg:y2="5.27cm" draw:start-shape="id11" draw:start-glue-point="14" draw:end-shape="id12" draw:end-glue-point="4" svg:d="M7357 7519v-781h-1852v-1468" svg:viewBox="0 0 1853 2250">
          <text:p/>
        </draw:connector>
        <draw:custom-shape draw:style-name="gr82" draw:text-style-name="P14" draw:layer="layout" svg:width="20.955cm" svg:height="0.952cm" svg:x="1cm" svg:y="1.1cm">
          <text:p text:style-name="P1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3" draw:text-style-name="P10" draw:layer="layout" svg:width="4.449cm" svg:height="1.627cm" svg:x="14.913cm" svg:y="6.6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</text:span></text:p>
              <text:p text:style-name="P9"><text:span text:style-name="T1">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2" draw:layer="layout" svg:width="4.449cm" svg:height="0.67cm" svg:x="14.913cm" svg:y="8.255cm">
              <text:p text:style-name="P11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2" draw:layer="layout" svg:width="4.449cm" svg:height="2.569cm" svg:x="14.913cm" svg:y="8.9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6" draw:text-style-name="P13" draw:layer="layout" svg:x1="14.913cm" svg:y1="9.061cm" svg:x2="9.141cm" svg:y2="8.154cm" draw:start-shape="id13" draw:end-shape="id11" draw:end-glue-point="13" svg:d="M14913 9061h-2886v-907h-2886" svg:viewBox="0 0 5773 908">
          <text:p/>
        </draw:connector>
        <draw:frame draw:style-name="gr7" draw:text-style-name="P7" draw:layer="layout" svg:width="3.085cm" svg:height="0.725cm" svg:x="11.16cm" svg:y="7.26cm">
          <draw:text-box>
            <text:p><text:span text:style-name="T2">&lt;&lt;uses&gt;&gt;</text:span></text:p>
          </draw:text-box>
        </draw:frame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87" draw:text-style-name="P10" draw:layer="layout" svg:width="4.445cm" svg:height="1.627cm" svg:x="1.952cm" svg:y="13.1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</text:span></text:p>
              <text:p text:style-name="P9"><text:span text:style-name="T1">Heartbea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2" draw:layer="layout" svg:width="4.445cm" svg:height="0.761cm" svg:x="1.952cm" svg:y="14.8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2" draw:layer="layout" svg:width="4.445cm" svg:height="1.387cm" svg:x="1.952cm" svg:y="15.5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_heartbeat()</text:span></text:p>
              <text:p text:style-name="P11"><text:span text:style-name="T3">+ stop_heartbeat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90" draw:text-style-name="P10" draw:layer="layout" svg:width="4.18cm" svg:height="1.153cm" svg:x="11.107cm" svg:y="15.5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2" draw:layer="layout" svg:width="4.18cm" svg:height="0.761cm" svg:x="11.107cm" svg:y="16.708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2" draw:layer="layout" svg:width="4.18cm" svg:height="0.993cm" svg:x="11.107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3" draw:text-style-name="P13" draw:layer="layout" svg:x1="5.162cm" svg:y1="13.183cm" svg:x2="4.505cm" svg:y2="10.424cm" draw:start-shape="id14" draw:start-glue-point="14" draw:end-shape="id11" draw:end-glue-point="8" svg:d="M5162 13183v-1381h-657v-1378" svg:viewBox="0 0 658 2760">
          <text:p/>
        </draw:connector>
        <draw:frame draw:style-name="gr7" draw:text-style-name="P7" draw:layer="layout" svg:width="3.085cm" svg:height="0.725cm" svg:x="4.9cm" svg:y="11.16cm">
          <draw:text-box>
            <text:p><text:span text:style-name="T2">&lt;&lt;uses&gt;&gt;</text:span></text:p>
          </draw:text-box>
        </draw:frame>
        <draw:connector draw:style-name="gr94" draw:text-style-name="P13" draw:layer="layout" svg:x1="11.107cm" svg:y1="16.733cm" svg:x2="6.396cm" svg:y2="16.413cm" draw:start-shape="id15" draw:start-glue-point="22" draw:end-shape="id14" draw:end-glue-point="12" svg:d="M11107 16733h-2355v-320h-2356" svg:viewBox="0 0 4712 321">
          <text:p/>
        </draw:connector>
        <draw:frame draw:style-name="gr7" draw:text-style-name="P7" draw:layer="layout" svg:width="2.54cm" svg:height="0.725cm" svg:x="7.032cm" svg:y="16.557cm">
          <draw:text-box>
            <text:p><text:span text:style-name="T2">&lt;&lt;is a&gt;&gt;</text:span></text:p>
          </draw:text-box>
        </draw:frame>
      </draw:page>
      <draw:page draw:name="Web service" draw:style-name="dp1" draw:master-page-name="Default">
        <draw:custom-shape draw:style-name="gr95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7" draw:id="id1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7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uses&gt;&gt;</text:span></text:p>
          </draw:text-box>
        </draw:frame>
        <draw:custom-shape draw:style-name="gr100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1" draw:text-style-name="P10" draw:layer="layout" svg:width="5.654cm" svg:height="1.627cm" svg:x="2.013cm" svg:y="6.9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</text:span></text:p>
              <text:p text:style-name="P9"><text:span text:style-name="T1">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2" draw:layer="layout" svg:width="5.654cm" svg:height="0.949cm" svg:x="2.013cm" svg:y="8.595cm">
              <text:p text:style-name="P15"><text:span text:style-name="T3">- web_queue: Queue</text:span></text:p>
              <text:p text:style-name="P15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35" draw:layer="layout" svg:width="5.65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3">+ init()</text:span></text:p>
              <text:p text:style-name="P34"><text:span text:style-name="T3">+ stop()</text:span></text:p>
              <text:p text:style-name="P34"><text:span text:style-name="T3">+ get_state()</text:span></text:p>
              <text:p text:style-name="P34"><text:span text:style-name="T3">+ start()</text:span></text:p>
              <text:p text:style-name="P34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4" draw:text-style-name="P13" draw:layer="layout" draw:line-skew="0.485cm" svg:x1="3.585cm" svg:y1="6.969cm" svg:x2="3.265cm" svg:y2="5.27cm" draw:start-shape="id16" draw:start-glue-point="5" draw:end-shape="id17" draw:end-glue-point="16" svg:d="M3585 6969v-366h-320v-1333" svg:viewBox="0 0 321 1700">
          <text:p/>
        </draw:connector>
        <draw:custom-shape draw:style-name="gr105" draw:text-style-name="P14" draw:layer="layout" svg:width="24.765cm" svg:height="0.952cm" svg:x="1cm" svg:y="1.1cm">
          <text:p text:style-name="P1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6" draw:text-style-name="P10" draw:layer="layout" svg:width="4.763cm" svg:height="1.627cm" svg:x="12.7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</text:span></text:p>
              <text:p text:style-name="P9"><text:span text:style-name="T1">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2" draw:layer="layout" svg:width="4.763cm" svg:height="0.473cm" svg:x="12.7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4.763cm" svg:height="1.781cm" svg:x="12.7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app:FastAPI)</text:span></text:p>
              <text:p text:style-name="P11"><text:span text:style-name="T3">+ run()</text:span></text:p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109" draw:text-style-name="P10" draw:layer="layout" svg:width="5.602cm" svg:height="1.627cm" svg:x="19.232cm" svg:y="9.81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</text:span></text:p>
                <text:p text:style-name="P9"><text:span text:style-name="T1">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0" draw:text-style-name="P12" draw:layer="layout" svg:width="5.602cm" svg:height="0.676cm" svg:x="19.232cm" svg:y="11.441cm">
                <text:p text:style-name="P11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1" draw:text-style-name="P12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@api_app.get()</text:span></text:p>
                <text:p text:style-name="P11"><text:span text:style-name="T3">+ @api_app.put()</text:span></text:p>
                <text:p text:style-name="P11"><text:span text:style-name="T3">+ @api_app.post()</text:span></text:p>
                <text:p text:style-name="P11"><text:span text:style-name="T3">+ @api_app.api_route()</text:span></text:p>
                <text:p text:style-name="P11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525cm" svg:y="7.26cm">
          <draw:text-box>
            <text:p><text:span text:style-name="T2">&lt;&lt;consists of&gt;&gt;</text:span></text:p>
          </draw:text-box>
        </draw:frame>
        <draw:connector draw:style-name="gr112" draw:text-style-name="P13" draw:layer="layout" svg:x1="15.128cm" svg:y1="9.184cm" svg:x2="7.666cm" svg:y2="7.604cm" draw:start-shape="id18" draw:start-glue-point="0" draw:end-shape="id16" draw:end-glue-point="13" svg:d="M15128 9184v-1580h-7462" svg:viewBox="0 0 7463 1581">
          <text:p/>
        </draw:connector>
        <draw:connector draw:style-name="gr113" draw:text-style-name="P13" draw:layer="layout" svg:x1="17.509cm" svg:y1="9.82cm" svg:x2="23.278cm" svg:y2="9.815cm" draw:start-shape="id18" draw:start-glue-point="13" draw:end-shape="id19" draw:end-glue-point="14" svg:d="M17509 9820h862v-534h4907v529" svg:viewBox="0 0 5770 535">
          <text:p/>
        </draw:connector>
        <draw:g draw:style-name="gr3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4" draw:text-style-name="P10" draw:layer="layout" svg:width="4.849cm" svg:height="1.627cm" svg:x="2.183cm" svg:y="13.03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</text:span></text:p>
              <text:p text:style-name="P9"><text:span text:style-name="T1">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2" draw:layer="layout" svg:width="4.849cm" svg:height="0.779cm" svg:x="2.183cm" svg:y="14.66cm">
              <text:p text:style-name="P11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2" draw:layer="layout" svg:width="4.849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7" draw:text-style-name="P13" draw:layer="layout" svg:x1="5.684cm" svg:y1="13.034cm" svg:x2="3.585cm" svg:y2="11.719cm" draw:start-shape="id20" draw:start-glue-point="14" draw:end-shape="id16" draw:end-glue-point="8" svg:d="M5684 13034v-659h-2099v-656" svg:viewBox="0 0 2100 1316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&lt;uses&gt;&gt;</text:span></text:p>
          </draw:text-box>
        </draw:frame>
        <draw:frame draw:style-name="gr7" draw:text-style-name="P7" draw:layer="layout" svg:width="3.085cm" svg:height="0.725cm" svg:x="20.685cm" svg:y="8.62cm">
          <draw:text-box>
            <text:p><text:span text:style-name="T2">&lt;&lt;uses&gt;&gt;</text:span></text:p>
          </draw:text-box>
        </draw:frame>
      </draw:page>
      <draw:page draw:name="WiFi" draw:style-name="dp1" draw:master-page-name="Default">
        <draw:custom-shape draw:style-name="gr95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2" draw:id="id2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18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uses&gt;&gt;</text:span></text:p>
          </draw:text-box>
        </draw:frame>
        <draw:custom-shape draw:style-name="gr100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0" draw:text-style-name="P10" draw:layer="layout" svg:width="5.654cm" svg:height="1.627cm" svg:x="2.013cm" svg:y="6.9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</text:span></text:p>
              <text:p text:style-name="P9"><text:span text:style-name="T1">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12" draw:layer="layout" svg:width="5.654cm" svg:height="0.949cm" svg:x="2.013cm" svg:y="8.595cm">
              <text:p text:style-name="P15"><text:span text:style-name="T3">- web_queue: Queue</text:span></text:p>
              <text:p text:style-name="P15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35" draw:layer="layout" svg:width="5.65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3">+ init()</text:span></text:p>
              <text:p text:style-name="P34"><text:span text:style-name="T3">+ stop()</text:span></text:p>
              <text:p text:style-name="P34"><text:span text:style-name="T3">+ get_state()</text:span></text:p>
              <text:p text:style-name="P34"><text:span text:style-name="T3">+ start()</text:span></text:p>
              <text:p text:style-name="P34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3" draw:text-style-name="P13" draw:layer="layout" draw:line-skew="0.485cm" svg:x1="3.585cm" svg:y1="6.969cm" svg:x2="3.265cm" svg:y2="5.27cm" draw:start-shape="id21" draw:start-glue-point="5" draw:end-shape="id22" draw:end-glue-point="16" svg:d="M3585 6969v-366h-320v-1333" svg:viewBox="0 0 321 1700">
          <text:p/>
        </draw:connector>
        <draw:custom-shape draw:style-name="gr105" draw:text-style-name="P14" draw:layer="layout" svg:width="24.765cm" svg:height="0.952cm" svg:x="1cm" svg:y="1.1cm">
          <text:p text:style-name="P1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4" draw:text-style-name="P10" draw:layer="layout" svg:width="4.763cm" svg:height="1.627cm" svg:x="12.7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</text:span></text:p>
              <text:p text:style-name="P9"><text:span text:style-name="T1">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12" draw:layer="layout" svg:width="4.763cm" svg:height="0.473cm" svg:x="12.7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12" draw:layer="layout" svg:width="4.763cm" svg:height="1.781cm" svg:x="12.7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app:FastAPI)</text:span></text:p>
              <text:p text:style-name="P11"><text:span text:style-name="T3">+ run()</text:span></text:p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127" draw:text-style-name="P10" draw:layer="layout" svg:width="5.602cm" svg:height="1.627cm" svg:x="19.232cm" svg:y="9.81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</text:span></text:p>
                <text:p text:style-name="P9"><text:span text:style-name="T1">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8" draw:text-style-name="P12" draw:layer="layout" svg:width="5.602cm" svg:height="0.676cm" svg:x="19.232cm" svg:y="11.441cm">
                <text:p text:style-name="P11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9" draw:text-style-name="P12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@api_app.get()</text:span></text:p>
                <text:p text:style-name="P11"><text:span text:style-name="T3">+ @api_app.put()</text:span></text:p>
                <text:p text:style-name="P11"><text:span text:style-name="T3">+ @api_app.post()</text:span></text:p>
                <text:p text:style-name="P11"><text:span text:style-name="T3">+ @api_app.api_route()</text:span></text:p>
                <text:p text:style-name="P11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525cm" svg:y="7.26cm">
          <draw:text-box>
            <text:p><text:span text:style-name="T2">&lt;&lt;consists of&gt;&gt;</text:span></text:p>
          </draw:text-box>
        </draw:frame>
        <draw:connector draw:style-name="gr130" draw:text-style-name="P13" draw:layer="layout" svg:x1="15.128cm" svg:y1="9.184cm" svg:x2="7.666cm" svg:y2="7.604cm" draw:start-shape="id23" draw:start-glue-point="0" draw:end-shape="id21" draw:end-glue-point="13" svg:d="M15128 9184v-1580h-7462" svg:viewBox="0 0 7463 1581">
          <text:p/>
        </draw:connector>
        <draw:connector draw:style-name="gr131" draw:text-style-name="P13" draw:layer="layout" svg:x1="17.509cm" svg:y1="9.82cm" svg:x2="23.278cm" svg:y2="9.815cm" draw:start-shape="id23" draw:start-glue-point="13" draw:end-shape="id24" draw:end-glue-point="14" svg:d="M17509 9820h862v-534h4907v529" svg:viewBox="0 0 5770 535">
          <text:p/>
        </draw:connector>
        <draw:g draw:style-name="gr3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2" draw:text-style-name="P10" draw:layer="layout" svg:width="4.849cm" svg:height="1.627cm" svg:x="2.183cm" svg:y="13.03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</text:span></text:p>
              <text:p text:style-name="P9"><text:span text:style-name="T1">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12" draw:layer="layout" svg:width="4.849cm" svg:height="0.779cm" svg:x="2.183cm" svg:y="14.66cm">
              <text:p text:style-name="P11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12" draw:layer="layout" svg:width="4.849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5" draw:text-style-name="P13" draw:layer="layout" svg:x1="5.684cm" svg:y1="13.034cm" svg:x2="3.585cm" svg:y2="11.719cm" draw:start-shape="id25" draw:start-glue-point="14" draw:end-shape="id21" draw:end-glue-point="8" svg:d="M5684 13034v-659h-2099v-656" svg:viewBox="0 0 2100 1316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&lt;uses&gt;&gt;</text:span></text:p>
          </draw:text-box>
        </draw:frame>
        <draw:frame draw:style-name="gr7" draw:text-style-name="P7" draw:layer="layout" svg:width="3.085cm" svg:height="0.725cm" svg:x="20.685cm" svg:y="8.62cm">
          <draw:text-box>
            <text:p><text:span text:style-name="T2">&lt;&lt;uses&gt;&gt;</text:span></text:p>
          </draw:text-box>
        </draw:frame>
      </draw:page>
      <draw:page draw:name="USB" draw:style-name="dp1" draw:master-page-name="Default">
        <draw:custom-shape draw:style-name="gr136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38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0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10.297cm" svg:y="6.715cm">
          <draw:text-box>
            <text:p><text:span text:style-name="T2">&lt;&lt;uses&gt;&gt;</text:span></text:p>
          </draw:text-box>
        </draw:frame>
        <draw:custom-shape draw:style-name="gr141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2" draw:text-style-name="P10" draw:layer="layout" svg:width="6.54cm" svg:height="1.153cm" svg:x="11.412cm" svg:y="8.3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12" draw:layer="layout" svg:width="6.54cm" svg:height="1.075cm" svg:x="11.412cm" svg:y="9.464cm">
              <text:p text:style-name="P15"><text:span text:style-name="T3">- usb_observer: USBObserver</text:span></text:p>
              <text:p text:style-name="P15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2" draw:layer="layout" svg:width="6.54cm" svg:height="2.569cm" svg:x="11.412cm" svg:y="10.5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text:p text:style-name="P11"><text:span text:style-name="T3">+ get_state()</text:span></text:p>
              <text:p text:style-name="P11"><text:span text:style-name="T3">+ close()</text:span></text:p>
              <text:p text:style-name="P11"><text:span text:style-name="T3">- usb_inserted()</text:span></text:p>
              <text:p text:style-name="P11"><text:span text:style-name="T3">- usb_removed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5" draw:text-style-name="P13" draw:layer="layout" svg:x1="13.231cm" svg:y1="8.312cm" svg:x2="10.184cm" svg:y2="5.27cm" draw:start-shape="id26" draw:start-glue-point="5" draw:end-shape="id27" draw:end-glue-point="23" svg:d="M13231 8312v-1522h-3047v-1520" svg:viewBox="0 0 3048 3043">
          <text:p/>
        </draw:connector>
        <draw:custom-shape draw:style-name="gr146" draw:text-style-name="P14" draw:layer="layout" svg:width="26.352cm" svg:height="0.952cm" svg:x="1cm" svg:y="1.1cm">
          <text:p text:style-name="P1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147" draw:text-style-name="P10" draw:layer="layout" svg:width="5.448cm" svg:height="1.153cm" svg:x="2.1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&lt;&lt;singleton&gt;&gt;</text:span></text:p>
                <text:p text:style-name="P9"><text:span text:style-name="T1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8" draw:text-style-name="P12" draw:layer="layout" svg:width="5.448cm" svg:height="0.692cm" svg:x="2.172cm" svg:y="10.712cm">
                <text:p text:style-name="P15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9" draw:text-style-name="P12" draw:layer="layout" svg:width="5.448cm" svg:height="0.993cm" svg:x="2.1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start()</text:span></text:p>
                <text:p text:style-name="P11"><text:span text:style-name="T3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3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0" draw:text-style-name="P10" draw:layer="layout" svg:width="5.448cm" svg:height="1.153cm" svg:x="19.3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12" draw:layer="layout" svg:width="5.448cm" svg:height="0.434cm" svg:x="19.3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12" draw:layer="layout" svg:width="5.448cm" svg:height="0.993cm" svg:x="19.3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on_created()</text:span></text:p>
              <text:p text:style-name="P11"><text:span text:style-name="T3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3" draw:text-style-name="P13" draw:layer="layout" svg:x1="23.285cm" svg:y1="12.152cm" svg:x2="25.099cm" svg:y2="14.302cm" draw:start-shape="id28" draw:start-glue-point="9" draw:end-shape="id29" draw:end-glue-point="14" svg:d="M23285 12152v1074h1814v1076" svg:viewBox="0 0 1815 2151">
          <text:p/>
        </draw:connector>
        <draw:g draw:style-name="gr3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4" draw:text-style-name="P10" draw:layer="layout" svg:width="6.718cm" svg:height="1.153cm" svg:x="20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12" draw:layer="layout" svg:width="6.718cm" svg:height="0.366cm" svg:x="20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6.718cm" svg:height="0.599cm" svg:x="20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7" draw:text-style-name="P13" draw:layer="layout" svg:x1="23.285cm" svg:y1="9.573cm" svg:x2="17.951cm" svg:y2="8.947cm" draw:start-shape="id28" draw:start-glue-point="14" draw:end-shape="id26" draw:end-glue-point="13" svg:d="M23285 9573v-626h-5334" svg:viewBox="0 0 5335 627">
          <text:p/>
        </draw:connector>
        <draw:connector draw:style-name="gr158" draw:text-style-name="P13" draw:layer="layout" svg:x1="6.107cm" svg:y1="9.56cm" svg:x2="11.413cm" svg:y2="8.947cm" draw:start-shape="id30" draw:start-glue-point="14" draw:end-shape="id26" draw:end-glue-point="6" svg:d="M6107 9560v-613h5306" svg:viewBox="0 0 5307 614">
          <text:p/>
        </draw:connector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9" draw:text-style-name="P29" draw:layer="layout" svg:width="6.35cm" svg:height="1.153cm" svg:x="1.8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&lt;&lt;Library&gt;&gt;</text:span></text:p>
              <text:p text:style-name="P36"><text:span text:style-name="T1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12" draw:layer="layout" svg:width="6.35cm" svg:height="0.599cm" svg:x="1.8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12" draw:layer="layout" svg:width="6.35cm" svg:height="0.599cm" svg:x="1.8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2" draw:text-style-name="P13" draw:layer="layout" svg:x1="6.456cm" svg:y1="14.012cm" svg:x2="3.687cm" svg:y2="12.397cm" draw:start-shape="id31" draw:start-glue-point="14" draw:end-shape="id30" draw:end-glue-point="8" svg:d="M6456 14012v-808h-2769v-807" svg:viewBox="0 0 2770 1616">
          <text:p/>
        </draw:connector>
        <draw:frame draw:style-name="gr7" draw:text-style-name="P7" draw:layer="layout" svg:width="3.085cm" svg:height="0.725cm" svg:x="4.265cm" svg:y="12.43cm">
          <draw:text-box>
            <text:p><text:span text:style-name="T2">&lt;&lt;uses&gt;&gt;</text:span></text:p>
          </draw:text-box>
        </draw:frame>
        <draw:frame draw:style-name="gr7" draw:text-style-name="P7" draw:layer="layout" svg:width="2.223cm" svg:height="0.725cm" svg:x="22.907cm" svg:y="13.382cm">
          <draw:text-box>
            <text:p><text:span text:style-name="T2">&lt;&lt;is a&gt;&gt;</text:span></text:p>
          </draw:text-box>
        </draw:frame>
        <draw:frame draw:style-name="gr7" draw:text-style-name="P7" draw:layer="layout" svg:width="3.81cm" svg:height="0.725cm" svg:x="20.05cm" svg:y="7.895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81cm" svg:height="0.725cm" svg:x="6.397cm" svg:y="7.667cm">
          <draw:text-box>
            <text:p><text:span text:style-name="T2">&lt;&lt;consists of&gt;&gt;</text:span></text:p>
          </draw:text-box>
        </draw:frame>
      </draw:page>
      <draw:page draw:name="Volume" draw:style-name="dp1" draw:master-page-name="Default">
        <draw:custom-shape draw:style-name="gr163" draw:text-style-name="P2" draw:layer="layout" svg:width="20.198cm" svg:height="0.7cm" svg:x="1.43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" draw:layer="layout" svg:width="20.085cm" svg:height="0.7cm" svg:x="1.55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3" draw:id="id3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65" draw:text-style-name="P4" draw:layer="layout" svg:width="20.088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6" draw:layer="layout" svg:width="20.088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7" draw:text-style-name="P2" draw:layer="layout" svg:width="20.326cm" svg:height="0.7cm" svg:x="1.311cm" svg:y="15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.995cm" svg:y="6.942cm">
          <draw:text-box>
            <text:p><text:span text:style-name="T2">&lt;&lt;uses&gt;&gt;</text:span></text:p>
          </draw:text-box>
        </draw:frame>
        <draw:custom-shape draw:style-name="gr168" draw:text-style-name="P8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9" draw:text-style-name="P10" draw:layer="layout" svg:width="6.686cm" svg:height="1.153cm" svg:x="3.956cm" svg:y="8.1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6.686cm" svg:height="1.047cm" svg:x="3.956cm" svg:y="9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38" draw:layer="layout" svg:width="6.686cm" svg:height="1.387cm" svg:x="3.956cm" svg:y="10.3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7"><text:span text:style-name="T6">+ set_notify()</text:span></text:p>
              <text:p text:style-name="P37"><text:span text:style-name="T6">+ start()</text:span></text:p>
              <text:p text:style-name="P37"><text:span text:style-name="T6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2" draw:text-style-name="P13" draw:layer="layout" svg:x1="5.815cm" svg:y1="8.123cm" svg:x2="5.567cm" svg:y2="5.27cm" draw:start-shape="id32" draw:start-glue-point="5" draw:end-shape="id33" draw:end-glue-point="4" svg:d="M5815 8123v-1428h-248v-1425" svg:viewBox="0 0 249 2854">
          <text:p/>
        </draw:connector>
        <draw:custom-shape draw:style-name="gr82" draw:text-style-name="P14" draw:layer="layout" svg:width="20.95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3" draw:text-style-name="P10" draw:layer="layout" svg:width="8.572cm" svg:height="1.153cm" svg:x="13.065cm" svg:y="9.99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2" draw:layer="layout" svg:width="8.572cm" svg:height="0.761cm" svg:x="13.065cm" svg:y="11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2" draw:layer="layout" svg:width="8.572cm" svg:height="1.781cm" svg:x="13.065cm" svg:y="11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7">+ </text:span><text:span text:style-name="T8">read_block</text:span><text:span text:style-name="T7">(device: int, register: int, length: int)</text:span></text:p>
              <text:p text:style-name="P11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6" draw:text-style-name="P13" draw:layer="layout" svg:x1="19.256cm" svg:y1="9.993cm" svg:x2="10.641cm" svg:y2="8.758cm" draw:start-shape="id34" draw:start-glue-point="14" draw:end-shape="id32" draw:end-glue-point="13" svg:d="M19256 9993v-1235h-8615" svg:viewBox="0 0 8616 1236">
          <text:p/>
        </draw:connector>
        <draw:frame draw:style-name="gr7" draw:text-style-name="P7" draw:layer="layout" svg:width="2.512cm" svg:height="0.725cm" svg:x="15.287cm" svg:y="8.937cm">
          <draw:text-box>
            <text:p><text:span text:style-name="T2">&lt;&lt;has&gt;&gt;</text:span></text:p>
          </draw:text-box>
        </draw:frame>
        <draw:frame draw:style-name="gr177" draw:text-style-name="P39" draw:layer="layout" svg:width="7.937cm" svg:height="1.673cm" svg:x="6.397cm" svg:y="6.397cm">
          <draw:text-box>
            <text:p><text:span text:style-name="T9">Waarom start(), stop(), set_notify(). Staat altijd op </text:span><text:span text:style-name="T9">notify. Dus notify default aan. Gaat nooit gestopt </text:span><text:span text:style-name="T9">worden</text:span></text:p>
          </draw:text-box>
        </draw:frame>
      </draw:page>
      <draw:page draw:name="Error" draw:style-name="dp1" draw:master-page-name="Default">
        <draw:custom-shape draw:style-name="gr17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6" draw:id="id3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8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8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84" draw:text-style-name="P10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error_service.py.Error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12" draw:layer="layout" svg:width="6.229cm" svg:height="0.746cm" svg:x="1.756cm" svg:y="9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2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init()</text:span></text:p>
              <text:p text:style-name="P11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7" draw:text-style-name="P13" draw:layer="layout" svg:x1="3.488cm" svg:y1="8.612cm" svg:x2="5.403cm" svg:y2="5.27cm" draw:start-shape="id35" draw:start-glue-point="5" draw:end-shape="id36" draw:end-glue-point="4" svg:d="M3488 8612v-1672h1915v-1670" svg:viewBox="0 0 1916 3343">
          <text:p/>
        </draw:connector>
        <draw:custom-shape draw:style-name="gr188" draw:text-style-name="P14" draw:layer="layout" svg:width="20.637cm" svg:height="0.952cm" svg:x="1cm" svg:y="1.1cm">
          <text:p text:style-name="P1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9" draw:text-style-name="P40" draw:layer="layout" svg:width="6.35cm" svg:height="4.043cm" svg:x="13.065cm" svg:y="8.069cm">
          <draw:text-box>
            <text:p><text:span text:style-name="T2">from messaging import (</text:span></text:p>
            <text:p><text:span text:style-name="T2"><text:s text:c="4"/></text:span><text:span text:style-name="T2">ErrorMessage,</text:span></text:p>
            <text:p><text:span text:style-name="T2"><text:s text:c="4"/></text:span><text:span text:style-name="T2">get_error_message,</text:span></text:p>
            <text:p><text:span text:style-name="T2"><text:s text:c="4"/></text:span><text:span text:style-name="T2">put_error_message,</text:span></text:p>
            <text:p><text:span text:style-name="T2"><text:s text:c="4"/></text:span><text:span text:style-name="T2">CommandMessage,</text:span></text:p>
            <text:p><text:span text:style-name="T2"><text:s text:c="4"/></text:span><text:span text:style-name="T2">get_command_message,</text:span></text:p>
            <text:p><text:span text:style-name="T2"><text:s text:c="4"/></text:span><text:span text:style-name="T2">put_command_message,</text:span></text:p>
            <text:p><text:span text:style-name="T2">)</text:span></text:p>
          </draw:text-box>
        </draw:frame>
        <draw:g draw:style-name="gr3" xml:id="id37" draw:id="id37">
          <draw:glue-point draw:id="4" svg:x="-4cm" svg:y="-5cm"/>
          <draw:custom-shape draw:style-name="gr190" draw:text-style-name="P21" draw:layer="layout" svg:width="6.649cm" svg:height="1.153cm" svg:x="6.491cm" svg:y="12.86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2" draw:layer="layout" svg:width="6.649cm" svg:height="0.771cm" svg:x="6.491cm" svg:y="14.014cm">
            <text:p text:style-name="P11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12" draw:layer="layout" svg:width="6.649cm" svg:height="0.599cm" svg:x="6.491cm" svg:y="14.67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get_error_message():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3" draw:text-style-name="P13" draw:layer="layout" svg:x1="9.815cm" svg:y1="12.861cm" svg:x2="7.984cm" svg:y2="10.959cm" draw:start-shape="id37" draw:end-shape="id35" draw:end-glue-point="12" svg:d="M9815 12861v-1902h-1831" svg:viewBox="0 0 1832 1903">
          <text:p/>
        </draw:connector>
        <draw:frame draw:style-name="gr7" draw:text-style-name="P7" draw:layer="layout" svg:width="3.085cm" svg:height="0.725cm" svg:x="6.487cm" svg:y="12.022cm">
          <draw:text-box>
            <text:p><text:span text:style-name="T2">&lt;&lt;uses&gt;&gt;</text:span></text:p>
          </draw:text-box>
        </draw:frame>
      </draw:page>
      <draw:page draw:name="Messaging" draw:style-name="dp1" draw:master-page-name="Default">
        <draw:custom-shape draw:style-name="gr17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9" draw:id="id3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94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8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6" draw:text-style-name="P10" draw:layer="layout" svg:width="9.721cm" svg:height="1.153cm" svg:x="1.756cm" svg:y="7.7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</text:span></text:p>
              <text:p text:style-name="P9"><text:span text:style-name="T1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2" draw:layer="layout" svg:width="9.721cm" svg:height="0.985cm" svg:x="1.756cm" svg:y="8.94cm">
              <text:p text:style-name="P11"><text:span text:style-name="T3">- command_queue: Queue</text:span></text:p>
              <text:p text:style-name="P11"><text:span text:style-name="T3">- error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12" draw:layer="layout" svg:width="9.721cm" svg:height="1.781cm" svg:x="1.756cm" svg:y="9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ut_command_message(message: CommandMessage)</text:span></text:p>
              <text:p text:style-name="P11"><text:span text:style-name="T3">+ get_command_message()</text:span></text:p>
              <text:p text:style-name="P11"><text:span text:style-name="T3">+ put_error_message(message: ErrorMessage)</text:span></text:p>
              <text:p text:style-name="P11"><text:span text:style-name="T3">+ get_error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9" draw:text-style-name="P13" draw:layer="layout" svg:x1="4.458cm" svg:y1="7.788cm" svg:x2="5.403cm" svg:y2="5.27cm" draw:start-shape="id38" draw:start-glue-point="5" draw:end-shape="id39" draw:end-glue-point="4" svg:d="M4458 7788v-1260h945v-1258" svg:viewBox="0 0 946 2519">
          <text:p/>
        </draw:connector>
        <draw:custom-shape draw:style-name="gr188" draw:text-style-name="P14" draw:layer="layout" svg:width="20.637cm" svg:height="0.952cm" svg:x="1cm" svg:y="1.1cm">
          <text:p text:style-name="P1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0" draw:text-style-name="P10" draw:layer="layout" svg:width="6.667cm" svg:height="1.153cm" svg:x="13.383cm" svg:y="9.81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Command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12" draw:layer="layout" svg:width="6.667cm" svg:height="0.994cm" svg:x="13.383cm" svg:y="10.972cm">
              <text:p text:style-name="P11"><text:span text:style-name="T3">+ source: String</text:span></text:p>
              <text:p text:style-name="P11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2" draw:layer="layout" svg:width="6.667cm" svg:height="0.599cm" svg:x="13.383cm" svg:y="11.96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3" draw:text-style-name="P10" draw:layer="layout" svg:width="6.667cm" svg:height="1.153cm" svg:x="13.383cm" svg:y="13.1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Error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2" draw:layer="layout" svg:width="6.667cm" svg:height="0.994cm" svg:x="13.383cm" svg:y="14.329cm">
              <text:p text:style-name="P11"><text:span text:style-name="T3">+ source: String</text:span></text:p>
              <text:p text:style-name="P11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2" draw:layer="layout" svg:width="6.667cm" svg:height="0.599cm" svg:x="13.383cm" svg:y="15.32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06" draw:text-style-name="P7" draw:layer="layout" svg:width="5.398cm" svg:height="2.222cm" svg:x="22.907cm" svg:y="9.255cm">
          <draw:text-box>
            <text:p><text:span text:style-name="T2">Commandmessage:</text:span></text:p>
            <text:p><text:span text:style-name="T2">+ source: string</text:span></text:p>
            <text:p><text:span text:style-name="T2">+ command: string</text:span></text:p>
            <text:p><text:span text:style-name="T2">+ data: Optional[List[Any]]</text:span></text:p>
          </draw:text-box>
        </draw:frame>
        <draw:frame draw:style-name="gr207" draw:text-style-name="P7" draw:layer="layout" svg:width="6.35cm" svg:height="3.095cm" svg:x="22.272cm" svg:y="11.557cm">
          <draw:text-box>
            <text:p><text:span text:style-name="T2">Errormessage:</text:span></text:p>
            <text:p><text:span text:style-name="T2">+ source: string</text:span></text:p>
            <text:p><text:span text:style-name="T2">+ message: string</text:span></text:p>
            <text:p><text:span text:style-name="T2">+ data: Optional[List[Any]]</text:span></text:p>
            <text:p><text:span text:style-name="T2">Message: Error | Exception | ...</text:span></text:p>
          </draw:text-box>
        </draw:frame>
        <draw:connector draw:style-name="gr208" draw:text-style-name="P13" draw:layer="layout" svg:x1="13.384cm" svg:y1="12.021cm" svg:x2="11.476cm" svg:y2="11.091cm" draw:start-shape="id40" draw:start-glue-point="11" draw:end-shape="id38" draw:end-glue-point="12" svg:d="M13384 12021h-955v-930h-953" svg:viewBox="0 0 1909 931">
          <text:p/>
        </draw:connector>
        <draw:connector draw:style-name="gr209" draw:text-style-name="P13" draw:layer="layout" svg:x1="13.383cm" svg:y1="13.785cm" svg:x2="10.937cm" svg:y2="11.635cm" draw:start-shape="id41" draw:start-glue-point="21" draw:end-shape="id38" draw:end-glue-point="10" svg:d="M13383 13785h-2446v-2150" svg:viewBox="0 0 2447 2151">
          <text:p/>
        </draw:connector>
      </draw:page>
      <draw:page draw:name="Power Supply" draw:style-name="dp1" draw:master-page-name="Default">
        <draw:custom-shape draw:style-name="gr17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3" draw:id="id4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1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8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12" draw:text-style-name="P10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12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12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t_nom_voltage()</text:span></text:p>
              <text:p text:style-name="P11"><text:span text:style-name="T3">+ set_max_voltage()</text:span></text:p>
              <text:p text:style-name="P11"><text:span text:style-name="T3">+ set_standby_voltage()</text:span></text:p>
              <text:p text:style-name="P11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5" draw:text-style-name="P13" draw:layer="layout" svg:x1="4.255cm" svg:y1="7.989cm" svg:x2="5.403cm" svg:y2="5.27cm" draw:start-shape="id42" draw:start-glue-point="5" draw:end-shape="id43" draw:end-glue-point="4" svg:d="M4255 7989v-1361h1148v-1358" svg:viewBox="0 0 1149 2720">
          <text:p/>
        </draw:connector>
        <draw:custom-shape draw:style-name="gr188" draw:text-style-name="P14" draw:layer="layout" svg:width="20.637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16" draw:text-style-name="P10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12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8" draw:text-style-name="P12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7">+ </text:span><text:span text:style-name="T8">read_block</text:span><text:span text:style-name="T7">(device: int, register: int, length: int)</text:span></text:p>
              <text:p text:style-name="P11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9" draw:text-style-name="P13" draw:layer="layout" svg:x1="12.361cm" svg:y1="12.728cm" svg:x2="10.747cm" svg:y2="9.757cm" draw:start-shape="id44" draw:start-glue-point="5" draw:end-shape="id42" draw:end-glue-point="1" svg:d="M12361 12728v-2971h-1614" svg:viewBox="0 0 1615 2972">
          <text:p/>
        </draw:connector>
        <draw:frame draw:style-name="gr7" draw:text-style-name="P7" draw:layer="layout" svg:width="2.512cm" svg:height="0.725cm" svg:x="12.747cm" svg:y="11.16cm">
          <draw:text-box>
            <text:p><text:span text:style-name="T2">&lt;&lt;has&gt;&gt;</text:span></text:p>
          </draw:text-box>
        </draw:frame>
      </draw:page>
      <draw:page draw:name="Frontpanel service" draw:style-name="dp1" draw:master-page-name="Default">
        <draw:custom-shape draw:style-name="gr220" draw:text-style-name="P2" draw:layer="layout" svg:width="27.047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" draw:layer="layout" svg:width="26.989cm" svg:height="0.7cm" svg:x="1.316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5" draw:id="id45">
          <draw:glue-point draw:id="4" svg:x="-0.787cm" svg:y="5.055cm"/>
          <draw:glue-point draw:id="5" svg:x="-5.063cm" svg:y="-3.065cm"/>
          <draw:custom-shape draw:style-name="gr222" draw:text-style-name="P10" draw:layer="layout" svg:width="4.363cm" svg:height="1.627cm" svg:x="4.917cm" svg:y="7.2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</text:span></text:p>
            <text:p text:style-name="P9"><text:span text:style-name="T1">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12" draw:layer="layout" svg:width="4.363cm" svg:height="0.671cm" svg:x="4.917cm" svg:y="8.912cm">
            <text:p text:style-name="P11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12" draw:layer="layout" svg:width="4.363cm" svg:height="2.963cm" svg:x="4.9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turn_on_led()</text:span></text:p>
            <text:p text:style-name="P11"><text:span text:style-name="T3">+ turn_off_led()</text:span></text:p>
            <text:p text:style-name="P11"><text:span text:style-name="T3">+ turn_off_all_leds()</text:span></text:p>
            <text:p text:style-name="P11"><text:span text:style-name="T3">+ turn_off_all_leds()</text:span></text:p>
            <text:p text:style-name="P11"><text:span text:style-name="T3">+ get_led_state()l</text:span></text:p>
            <text:p text:style-name="P11"><text:span text:style-name="T3">+ oneshot_on_led()</text:span></text:p>
            <text:p text:style-name="P11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6" draw:id="id4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225" draw:text-style-name="P4" draw:layer="layout" svg:width="26.896cm" svg:height="1.153cm" svg:x="1.409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6" draw:layer="layout" svg:width="26.896cm" svg:height="0.679cm" svg:x="1.409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7" draw:text-style-name="P41" draw:layer="layout" svg:width="27.204cm" svg:height="0.7cm" svg:x="1.101cm" svg:y="16.147cm">
          <text:p text:style-name="P30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8" draw:text-style-name="P13" draw:layer="layout" draw:line-skew="0.338cm" svg:x1="7.098cm" svg:y1="7.285cm" svg:x2="4.758cm" svg:y2="5.47cm" draw:start-shape="id45" draw:end-shape="id46" draw:end-glue-point="16" svg:d="M7098 7285v-570h-2340v-1245" svg:viewBox="0 0 2341 1816">
          <text:p/>
        </draw:connector>
        <draw:custom-shape draw:style-name="gr229" draw:text-style-name="P8" draw:layer="layout" svg:width="27.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30" draw:text-style-name="P10" draw:layer="layout" svg:width="3.81cm" svg:height="1.627cm" svg:x="9.885cm" svg:y="7.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</text:span></text:p>
              <text:p text:style-name="P9"><text:span text:style-name="T1">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2" draw:layer="layout" svg:width="3.81cm" svg:height="0.754cm" svg:x="9.885cm" svg:y="8.987cm">
              <text:p text:style-name="P11"><text:span text:style-name="T3">- stop_evt: Event()</text:span></text:p>
              <text:p text:style-name="P11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12" draw:layer="layout" svg:width="3.81cm" svg:height="0.599cm" svg:x="9.885cm" svg:y="9.7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8" draw:id="id4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3">
            <draw:custom-shape draw:style-name="gr233" draw:text-style-name="P10" draw:layer="layout" svg:width="5.465cm" svg:height="1.627cm" svg:x="14.55cm" svg:y="7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</text:span></text:p>
              <text:p text:style-name="P9"><text:span text:style-name="T1">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2" draw:layer="layout" svg:width="5.465cm" svg:height="1.06cm" svg:x="14.55cm" svg:y="9.047cm">
              <text:p text:style-name="P11"><text:span text:style-name="T3">- thread: backlighting_manager</text:span></text:p>
              <text:p text:style-name="P11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12" draw:layer="layout" svg:width="5.465cm" svg:height="0.635cm" svg:x="14.55cm" svg:y="10.1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6" draw:text-style-name="P13" draw:layer="layout" draw:line-skew="0.405cm" svg:x1="10.945cm" svg:y1="7.361cm" svg:x2="10.473cm" svg:y2="5.47cm" draw:start-shape="id47" draw:start-glue-point="5" draw:end-shape="id46" draw:end-glue-point="18" svg:d="M10945 7361v-542h-472v-1349" svg:viewBox="0 0 473 1892">
          <text:p/>
        </draw:connector>
        <draw:connector draw:style-name="gr237" draw:text-style-name="P13" draw:layer="layout" svg:x1="19.711cm" svg:y1="7.421cm" svg:x2="18.869cm" svg:y2="5.47cm" draw:start-shape="id48" draw:start-glue-point="15" draw:end-shape="id46" draw:end-glue-point="25" svg:d="M19711 7421v-977h-842v-974" svg:viewBox="0 0 843 1952">
          <text:p/>
        </draw:connector>
        <draw:frame draw:style-name="gr7" draw:text-style-name="P7" draw:layer="layout" svg:width="2.512cm" svg:height="0.725cm" svg:x="3.515cm" svg:y="6.625cm">
          <draw:text-box>
            <text:p><text:span text:style-name="T2">&lt;&lt;uses&gt;&gt;</text:span></text:p>
          </draw:text-box>
        </draw:frame>
        <draw:custom-shape draw:style-name="gr238" draw:text-style-name="P14" draw:layer="layout" svg:width="27.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39" draw:text-style-name="P10" draw:layer="layout" svg:width="8.255cm" svg:height="1.153cm" svg:x="19.615cm" svg:y="12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8.255cm" svg:height="0.578cm" svg:x="19.615cm" svg:y="13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12" draw:layer="layout" svg:width="8.255cm" svg:height="1.781cm" svg:x="19.615cm" svg:y="13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7">+ </text:span><text:span text:style-name="T8">read_block</text:span><text:span text:style-name="T7">(device: int, register: int, length: int)</text:span></text:p>
              <text:p text:style-name="P11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42" draw:text-style-name="P10" draw:layer="layout" svg:width="5.397cm" svg:height="1.153cm" svg:x="12.8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ight_sensor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12" draw:layer="layout" svg:width="5.397cm" svg:height="0.56cm" svg:x="12.8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12" draw:layer="layout" svg:width="5.397cm" svg:height="0.591cm" svg:x="12.8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45" draw:text-style-name="P10" draw:layer="layout" svg:width="5.397cm" svg:height="1.153cm" svg:x="18.6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2" draw:layer="layout" svg:width="5.397cm" svg:height="0.632cm" svg:x="18.6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2" draw:layer="layout" svg:width="5.397cm" svg:height="0.667cm" svg:x="18.6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48" draw:text-style-name="P21" draw:layer="layout" svg:width="3.175cm" svg:height="1.627cm" svg:x="5.127cm" svg:y="13.5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singleton&gt;&gt;</text:span></text:p>
            <text:p text:style-name="P20"><text:span text:style-name="T1">gpio_service.</text:span></text:p>
            <text:p text:style-name="P20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42" draw:layer="layout" svg:width="3.175cm" svg:height="0.433cm" svg:x="5.127cm" svg:y="15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12" draw:layer="layout" svg:width="3.175cm" svg:height="0.39cm" svg:x="5.127cm" svg:y="15.6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1" draw:text-style-name="P13" draw:layer="layout" draw:line-skew="-2.199cm" svg:x1="18.991cm" svg:y1="17.064cm" svg:x2="19.711cm" svg:y2="10.742cm" draw:start-shape="id49" draw:start-glue-point="4" draw:end-shape="id48" draw:end-glue-point="10" svg:d="M18991 17064v-5361h720v-961" svg:viewBox="0 0 721 6323">
          <text:p/>
        </draw:connector>
        <draw:connector draw:style-name="gr252" draw:text-style-name="P13" draw:layer="layout" draw:line-skew="-2.581cm" svg:x1="17.899cm" svg:y1="17.194cm" svg:x2="18.496cm" svg:y2="10.742cm" draw:start-shape="id50" draw:start-glue-point="15" draw:end-shape="id48" draw:end-glue-point="9" svg:d="M17899 17194v-5808h597v-644" svg:viewBox="0 0 598 6453">
          <text:p/>
        </draw:connector>
        <draw:connector draw:style-name="gr253" draw:text-style-name="P13" draw:layer="layout" draw:line-skew="1.003cm" svg:x1="7.419cm" svg:y1="13.583cm" svg:x2="10.098cm" svg:y2="10.34cm" draw:start-shape="id51" draw:start-glue-point="14" draw:end-shape="id47" draw:end-glue-point="7" svg:d="M7419 13583v-620h2679v-2623" svg:viewBox="0 0 2680 3244">
          <text:p/>
        </draw:connector>
        <draw:connector draw:style-name="gr254" draw:text-style-name="P13" draw:layer="layout" svg:x1="5.304cm" svg:y1="13.583cm" svg:x2="7.098cm" svg:y2="12.546cm" draw:start-shape="id51" draw:start-glue-point="4" draw:end-shape="id45" draw:end-glue-point="2" svg:d="M5304 13583v-520h1794v-517" svg:viewBox="0 0 1795 1038">
          <text:p/>
        </draw:connector>
        <draw:connector draw:style-name="gr255" draw:text-style-name="P13" draw:layer="layout" svg:x1="21.91cm" svg:y1="12.161cm" svg:x2="20.014cm" svg:y2="10.198cm" draw:start-shape="id52" draw:start-glue-point="5" draw:end-shape="id48" draw:end-glue-point="12" svg:d="M21910 12161v-1963h-1896" svg:viewBox="0 0 1897 1964">
          <text:p/>
        </draw:connector>
        <draw:frame draw:style-name="gr7" draw:text-style-name="P7" draw:layer="layout" svg:width="2.512cm" svg:height="0.725cm" svg:x="19.732cm" svg:y="10.525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0.207cm" svg:y="10.752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3.24cm" svg:y="12.747cm">
          <draw:text-box>
            <text:p><text:span text:style-name="T2">&lt;&lt;has&gt;&gt;</text:span></text:p>
          </draw:text-box>
        </draw:frame>
        <draw:frame draw:style-name="gr256" draw:text-style-name="P39" draw:layer="layout" svg:width="6.35cm" svg:height="2.147cm" svg:x="1.635cm" svg:y="17.51cm">
          <draw:text-box>
            <text:p><text:span text:style-name="T9">Waarom backlighting thread met stop en off. Staat </text:span><text:span text:style-name="T9">eigenlijk altijd aan! Wordt ook in de module gestart!</text:span></text:p>
          </draw:text-box>
        </draw:frame>
        <draw:g draw:style-name="gr3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57" draw:text-style-name="P10" draw:layer="layout" svg:width="4.965cm" svg:height="1.627cm" svg:x="23.322cm" svg:y="7.0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thread&gt;&gt;</text:span></text:p>
              <text:p text:style-name="P9"><text:span text:style-name="T1">backlighting.</text:span></text:p>
              <text:p text:style-name="P9"><text:span text:style-name="T1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4.965cm" svg:height="0.754cm" svg:x="23.322cm" svg:y="8.694cm">
              <text:p text:style-name="P11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12" draw:layer="layout" svg:width="4.965cm" svg:height="0.599cm" svg:x="23.322cm" svg:y="9.4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0" draw:text-style-name="P13" draw:layer="layout" svg:x1="23.323cm" svg:y1="7.703cm" svg:x2="20.014cm" svg:y2="8.056cm" draw:start-shape="id53" draw:start-glue-point="6" draw:end-shape="id48" draw:end-glue-point="13" svg:d="M23323 7703h-1655v353h-1654" svg:viewBox="0 0 3310 354">
          <text:p/>
        </draw:connector>
        <draw:connector draw:style-name="gr261" draw:text-style-name="P13" draw:layer="layout" svg:x1="25.577cm" svg:y1="12.161cm" svg:x2="26.907cm" svg:y2="10.047cm" draw:start-shape="id52" draw:start-glue-point="14" draw:end-shape="id53" draw:end-glue-point="9" svg:d="M25577 12161v-1058h1330v-1056" svg:viewBox="0 0 1331 2115">
          <text:p/>
        </draw:connector>
        <draw:frame draw:style-name="gr7" draw:text-style-name="P7" draw:layer="layout" svg:width="2.512cm" svg:height="0.725cm" svg:x="23.542cm" svg:y="10.117cm">
          <draw:text-box>
            <text:p><text:span text:style-name="T2">&lt;&lt;uses&gt;&gt;</text:span></text:p>
          </draw:text-box>
        </draw:frame>
        <draw:frame draw:style-name="gr7" draw:text-style-name="P7" draw:layer="layout" svg:width="3.81cm" svg:height="0.725cm" svg:x="20.05cm" svg:y="6.942cm">
          <draw:text-box>
            <text:p><text:span text:style-name="T2">&lt;&lt;consists of&gt;&gt;</text:span></text:p>
          </draw:text-box>
        </draw:frame>
        <draw:g draw:style-name="gr3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62" draw:text-style-name="P21" draw:layer="layout" svg:width="3.492cm" svg:height="1.627cm" svg:x="1.2cm" svg:y="9.8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thread&gt;&gt;</text:span></text:p>
            <text:p text:style-name="P20"><text:span text:style-name="T1">led_control.</text:span></text:p>
            <text:p text:style-name="P20"><text:span text:style-name="T1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12" draw:layer="layout" svg:width="3.492cm" svg:height="0.517cm" svg:x="1.2cm" svg:y="11.513cm">
            <text:p text:style-name="P11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12" draw:layer="layout" svg:width="3.492cm" svg:height="0.465cm" svg:x="1.2cm" svg:y="12.0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5" draw:text-style-name="P13" draw:layer="layout" svg:x1="2.171cm" svg:y1="9.887cm" svg:x2="4.917cm" svg:y2="8.303cm" draw:start-shape="id54" draw:start-glue-point="5" draw:end-shape="id45" draw:end-glue-point="5" svg:d="M2171 9887v-1584h2746" svg:viewBox="0 0 2747 1585">
          <text:p/>
        </draw:connector>
        <draw:frame draw:style-name="gr7" draw:text-style-name="P7" draw:layer="layout" svg:width="3.81cm" svg:height="0.725cm" svg:x="1.082cm" svg:y="7.667cm">
          <draw:text-box>
            <text:p><text:span text:style-name="T2">&lt;&lt;consists of&gt;&gt;</text:span></text:p>
          </draw:text-box>
        </draw:frame>
      </draw:page>
      <draw:page draw:name="Music Players" draw:style-name="dp1" draw:master-page-name="Default">
        <draw:custom-shape draw:style-name="gr266" draw:text-style-name="P2" draw:layer="layout" svg:width="25.039cm" svg:height="0.7cm" svg:x="1.635cm" svg:y="2.7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draw:layer="layout" svg:width="25.091cm" svg:height="0.7cm" svg:x="1.635cm" svg:y="6.1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6" draw:id="id5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68" draw:text-style-name="P4" draw:layer="layout" svg:width="24.873cm" svg:height="1.153cm" svg:x="1.635cm" svg:y="3.7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6" draw:layer="layout" svg:width="24.873cm" svg:height="0.679cm" svg:x="1.635cm" svg:y="4.8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0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8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3">
            <draw:custom-shape draw:style-name="gr272" draw:text-style-name="P10" draw:layer="layout" svg:width="5.397cm" svg:height="1.153cm" svg:x="10.255cm" svg:y="8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3" draw:text-style-name="P12" draw:layer="layout" svg:width="5.397cm" svg:height="0.545cm" svg:x="10.255cm" svg:y="9.295cm">
              <text:p text:style-name="P11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4" draw:text-style-name="P12" draw:layer="layout" svg:width="5.397cm" svg:height="0.993cm" svg:x="10.255cm" svg:y="9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75" draw:text-style-name="P10" draw:layer="layout" svg:width="5.397cm" svg:height="1.153cm" svg:x="2.54cm" svg:y="7.7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6" draw:text-style-name="P12" draw:layer="layout" svg:width="5.397cm" svg:height="0.674cm" svg:x="2.54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7" draw:text-style-name="P12" draw:layer="layout" svg:width="5.397cm" svg:height="2.569cm" svg:x="2.54cm" svg:y="9.6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+ is_web_radio()</text:span></text:p>
              <text:p text:style-name="P11"><text:span text:style-name="T3">+ next()</text:span></text:p>
              <text:p text:style-name="P11"><text:span text:style-name="T3">+ play()</text:span></text:p>
              <text:p text:style-name="P11"><text:span text:style-name="T3">+ stop()</text:span></text:p>
              <text:p text:style-name="P11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278" draw:text-style-name="P10" draw:layer="layout" svg:width="6.552cm" svg:height="1.153cm" svg:x="20.165cm" svg:y="9.8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9" draw:text-style-name="P12" draw:layer="layout" svg:width="6.552cm" svg:height="0.761cm" svg:x="20.165cm" svg:y="11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0" draw:text-style-name="P12" draw:layer="layout" svg:width="6.552cm" svg:height="1.387cm" svg:x="20.165cm" svg:y="11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lay()</text:span></text:p>
              <text:p text:style-name="P11"><text:span text:style-name="T3">+ pause()</text:span></text:p>
              <text:p text:style-name="P11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81" draw:text-style-name="P13" draw:layer="layout" draw:line-skew="0.495cm" svg:x1="11.755cm" svg:y1="8.143cm" svg:x2="9.687cm" svg:y2="5.57cm" draw:start-shape="id55" draw:start-glue-point="5" draw:end-shape="id56" draw:end-glue-point="18" svg:d="M11755 8143v-793h-2068v-1780" svg:viewBox="0 0 2069 2574">
          <text:p/>
        </draw:connector>
        <draw:connector draw:style-name="gr282" draw:text-style-name="P13" draw:layer="layout" draw:line-skew="0.469cm" svg:x1="2.841cm" svg:y1="7.794cm" svg:x2="3.972cm" svg:y2="5.57cm" draw:start-shape="id57" draw:start-glue-point="4" draw:end-shape="id56" draw:end-glue-point="16" svg:d="M2841 7794v-644h1131v-1580" svg:viewBox="0 0 1132 2225">
          <text:p/>
        </draw:connector>
        <draw:connector draw:style-name="gr283" draw:text-style-name="P13" draw:layer="layout" svg:x1="24.897cm" svg:y1="9.891cm" svg:x2="24.811cm" svg:y2="5.57cm" draw:start-shape="id58" draw:start-glue-point="14" draw:end-shape="id56" draw:end-glue-point="42" svg:d="M24897 9891v-2162h-86v-2159" svg:viewBox="0 0 87 4322">
          <text:p/>
        </draw:connector>
        <draw:custom-shape draw:style-name="gr284" draw:text-style-name="P14" draw:layer="layout" svg:width="25.995cm" svg:height="1.205cm" svg:x="1cm" svg:y="1.0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54cm" svg:height="0.725cm" svg:x="4.81cm" svg:y="7.26cm">
          <draw:text-box>
            <text:p><text:span text:style-name="T2">&lt;&lt;uses&gt;&gt;</text:span></text:p>
          </draw:text-box>
        </draw:frame>
        <draw:g draw:style-name="gr3" xml:id="id60" draw:id="id60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285" draw:text-style-name="P10" draw:layer="layout" svg:width="5.397cm" svg:height="1.153cm" svg:x="9.603cm" svg:y="15.4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_service.MPDService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2" draw:layer="layout" svg:width="5.397cm" svg:height="0.669cm" svg:x="9.603cm" svg:y="16.601cm">
            <text:p text:style-name="P11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2" draw:layer="layout" svg:width="5.397cm" svg:height="1.387cm" svg:x="9.603cm" svg:y="17.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get_stats()</text:span></text:p>
            <text:p text:style-name="P11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9" draw:id="id59">
          <draw:custom-shape draw:style-name="gr288" draw:text-style-name="P10" draw:layer="layout" svg:width="3.829cm" svg:height="1.153cm" svg:x="18.443cm" svg:y="13.7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.MPDClient</text:span></text:p>
            <text:p text:style-name="P9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12" draw:layer="layout" svg:width="3.829cm" svg:height="0.504cm" svg:x="18.443cm" svg:y="14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12" draw:layer="layout" svg:width="3.829cm" svg:height="3.357cm" svg:x="18.443cm" svg:y="15.4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idle()</text:span></text:p>
            <text:p text:style-name="P11"><text:span text:style-name="T3">+ update()</text:span></text:p>
            <text:p text:style-name="P11"><text:span text:style-name="T3">+ next()</text:span></text:p>
            <text:p text:style-name="P11"><text:span text:style-name="T3">+ play()</text:span></text:p>
            <text:p text:style-name="P11"><text:span text:style-name="T3">+ stop()</text:span></text:p>
            <text:p text:style-name="P11"><text:span text:style-name="T3">+ pause()</text:span></text:p>
            <text:p text:style-name="P11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1" draw:text-style-name="P13" draw:layer="layout" svg:x1="18.443cm" svg:y1="16.283cm" svg:x2="15cm" svg:y2="17.052cm" draw:start-shape="id59" draw:start-glue-point="3" draw:end-shape="id60" draw:end-glue-point="1" svg:d="M18443 16283h-1722v769h-1721" svg:viewBox="0 0 3444 770">
          <text:p/>
        </draw:connector>
        <draw:frame draw:style-name="gr7" draw:text-style-name="P7" draw:layer="layout" svg:width="2.83cm" svg:height="0.725cm" svg:x="6.08cm" svg:y="17.102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292" draw:text-style-name="P13" draw:layer="layout" svg:x1="14.636cm" svg:y1="15.448cm" svg:x2="14.152cm" svg:y2="10.833cm" draw:start-shape="id60" draw:start-glue-point="6" draw:end-shape="id55" draw:end-glue-point="9" svg:d="M14636 15448v-2308h-484v-2307" svg:viewBox="0 0 485 4616">
          <text:p/>
        </draw:connector>
        <draw:connector draw:style-name="gr293" draw:text-style-name="P13" draw:layer="layout" svg:x1="9.603cm" svg:y1="17.052cm" svg:x2="6.437cm" svg:y2="12.189cm" draw:start-shape="id60" draw:start-glue-point="3" draw:end-shape="id57" draw:end-glue-point="9" svg:d="M9603 17052h-3166v-4863" svg:viewBox="0 0 3167 4864">
          <text:p/>
        </draw:connector>
        <draw:frame draw:style-name="gr7" draw:text-style-name="P7" draw:layer="layout" svg:width="2.222cm" svg:height="0.725cm" svg:x="12.33cm" svg:y="11.16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7" draw:text-style-name="P7" draw:layer="layout" svg:width="3.147cm" svg:height="0.725cm" svg:x="21.665cm" svg:y="7.26cm">
          <draw:text-box>
            <text:p><text:span text:style-name="T2">&lt;&lt;uses&gt;&gt;</text:span></text:p>
          </draw:text-box>
        </draw:frame>
        <draw:frame draw:style-name="gr7" draw:text-style-name="P7" draw:layer="layout" svg:width="2.54cm" svg:height="0.725cm" svg:x="7.985cm" svg:y="7.577cm">
          <draw:text-box>
            <text:p><text:span text:style-name="T2">&lt;&lt;uses&gt;&gt;</text:span></text:p>
          </draw:text-box>
        </draw:frame>
        <draw:frame draw:style-name="gr7" draw:text-style-name="P7" draw:layer="layout" svg:width="3.81cm" svg:height="0.725cm" svg:x="14.97cm" svg:y="17.42cm">
          <draw:text-box>
            <text:p><text:span text:style-name="T2">&lt;&lt;consists of&gt;&gt;</text:span></text:p>
          </draw:text-box>
        </draw:frame>
        <draw:g draw:style-name="gr3" xml:id="id61" draw:id="id6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94" draw:text-style-name="P21" draw:layer="layout" svg:width="4.538cm" svg:height="1.627cm" svg:x="1.443cm" svg:y="13.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thread&gt;&gt;</text:span></text:p>
            <text:p text:style-name="P20"><text:span text:style-name="T1">mpd_control.</text:span></text:p>
            <text:p text:style-name="P20"><text:span text:style-name="T1">remove_song_w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5" draw:text-style-name="P12" draw:layer="layout" svg:width="4.538cm" svg:height="0.435cm" svg:x="1.443cm" svg:y="15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12" draw:layer="layout" svg:width="4.538cm" svg:height="0.993cm" svg:x="1.443cm" svg:y="15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7" draw:text-style-name="P13" draw:layer="layout" svg:x1="4.361cm" svg:y1="13.65cm" svg:x2="4.04cm" svg:y2="12.189cm" draw:start-shape="id61" draw:start-glue-point="8" draw:end-shape="id57" draw:end-glue-point="8" svg:d="M4361 13650v-731h-321v-730" svg:viewBox="0 0 322 1462">
          <text:p/>
        </draw:connector>
        <draw:g draw:style-name="gr3" xml:id="id62" draw:id="id62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98" draw:text-style-name="P21" draw:layer="layout" svg:width="4.538cm" svg:height="1.627cm" svg:x="17.292cm" svg:y="7.0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thread&gt;&gt;</text:span></text:p>
            <text:p text:style-name="P20"><text:span text:style-name="T1">mpd_monitor.</text:span></text:p>
            <text:p text:style-name="P20"><text:span text:style-name="T1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12" draw:layer="layout" svg:width="4.538cm" svg:height="0.728cm" svg:x="17.292cm" svg:y="8.662cm">
            <text:p text:style-name="P11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2" draw:layer="layout" svg:width="4.538cm" svg:height="0.635cm" svg:x="17.292cm" svg:y="9.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1" draw:text-style-name="P13" draw:layer="layout" svg:x1="17.292cm" svg:y1="8.53cm" svg:x2="15.651cm" svg:y2="8.778cm" draw:start-shape="id62" draw:end-shape="id55" draw:end-glue-point="13" svg:d="M17292 8530h-820v248h-821" svg:viewBox="0 0 1642 2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25T17:57:36.243576587</dc:date>
    <meta:editing-duration>PT14H30M19S</meta:editing-duration>
    <meta:editing-cycles>100</meta:editing-cycles>
    <meta:print-date>2026-04-03T16:45:26.431431754</meta:print-date>
    <dc:creator>Henk</dc:creator>
    <meta:document-statistic meta:object-count="466"/>
  </office:meta>
</office:document-meta>
</file>