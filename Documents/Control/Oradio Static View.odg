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4.298cm" fo:min-width="12.8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9cm" fo:min-width="12.783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6.541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6.239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16.44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18.18cm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8.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86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1.589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21.19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21.465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2.943cm" fo:padding-top="0.151cm" fo:padding-bottom="0.151cm" fo:padding-left="0.276cm" fo:padding-right="0.276cm" loext:decorative="false"/>
    </style:style>
    <style:style style:name="gr2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2.943cm" fo:padding-top="0.151cm" fo:padding-bottom="0.151cm" fo:padding-left="0.276cm" fo:padding-right="0.276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95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91cm" fo:min-width="7.385cm" fo:padding-top="0.151cm" fo:padding-bottom="0.151cm" fo:padding-left="0.276cm" fo:padding-right="0.276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6.753cm" fo:padding-top="0.151cm" fo:padding-bottom="0.151cm" fo:padding-left="0.276cm" fo:padding-right="0.276cm" loext:decorative="false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10.35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7.182cm" fo:min-width="7.4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4cm" fo:min-width="7.386cm" fo:padding-top="0.151cm" fo:padding-bottom="0.151cm" fo:padding-left="0.276cm" fo:padding-right="0.276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45cm" fo:min-width="23.788cm" style:writing-mode="lr-tb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5cm" fo:min-width="23.579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45cm" fo:min-width="23.876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165cm" fo:padding-top="0.151cm" fo:padding-bottom="0.151cm" fo:padding-left="0.276cm" fo:padding-right="0.276cm" loext:decorative="false"/>
    </style:style>
    <style:style style:name="gr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93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165cm" fo:padding-top="0.151cm" fo:padding-bottom="0.151cm" fo:padding-left="0.276cm" fo:padding-right="0.276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747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9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9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>
      <style:graphic-properties draw:textarea-horizontal-align="justify" draw:textarea-vertical-align="middle" draw:auto-grow-height="false" fo:min-height="0.45cm" fo:min-width="24.661cm" style:writing-mode="lr-tb" loext:decorative="false"/>
      <style:paragraph-properties style:writing-mode="lr-tb"/>
    </style:style>
    <style:style style:name="gr123" style:family="graphic" style:parent-style-name="standard">
      <style:graphic-properties draw:textarea-horizontal-align="justify" draw:textarea-vertical-align="middle" draw:auto-grow-height="false" fo:min-height="0.45cm" fo:min-width="24.515cm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>
      <style:graphic-properties draw:textarea-horizontal-align="justify" draw:textarea-vertical-align="middle" draw:auto-grow-height="false" fo:min-height="0.45cm" fo:min-width="24.825cm" style:writing-mode="lr-tb" loext:decorative="false"/>
      <style:paragraph-properties style:writing-mode="lr-tb"/>
    </style:style>
    <style:style style:name="gr12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8cm" fo:padding-top="0.151cm" fo:padding-bottom="0.151cm" fo:padding-left="0.276cm" fo:padding-right="0.276cm" loext:decorative="false"/>
    </style:style>
    <style:style style:name="gr1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>
      <style:graphic-properties draw:textarea-horizontal-align="justify" draw:textarea-vertical-align="middle" draw:auto-grow-height="false" fo:min-height="0.45cm" fo:min-width="25.053cm" style:writing-mode="lr-tb" loext:decorative="false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0.45cm" fo:min-width="24.902cm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>
      <style:graphic-properties draw:textarea-horizontal-align="justify" draw:textarea-vertical-align="middle" draw:auto-grow-height="false" fo:min-height="0.45cm" fo:min-width="25.224cm" style:writing-mode="lr-tb" loext:decorative="false"/>
      <style:paragraph-properties style:writing-mode="lr-tb"/>
    </style:style>
    <style:style style:name="gr16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5.8cm" fo:padding-top="0.151cm" fo:padding-bottom="0.151cm" fo:padding-left="0.276cm" fo:padding-right="0.276cm" loext:decorative="false"/>
    </style:style>
    <style:style style:name="gr1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1" style:family="graphic" style:parent-style-name="standard">
      <style:graphic-properties draw:textarea-horizontal-align="justify" draw:textarea-vertical-align="middle" draw:auto-grow-height="false" fo:min-height="0.45cm" fo:min-width="19.698cm" style:writing-mode="lr-tb" loext:decorative="false"/>
      <style:paragraph-properties style:writing-mode="lr-tb"/>
    </style:style>
    <style:style style:name="gr182" style:family="graphic" style:parent-style-name="standard">
      <style:graphic-properties draw:textarea-horizontal-align="justify" draw:textarea-vertical-align="middle" draw:auto-grow-height="false" fo:min-height="0.45cm" fo:min-width="19.585cm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18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838cm" fo:min-width="20.403cm" fo:padding-top="0.151cm" fo:padding-bottom="0.151cm" fo:padding-left="0.276cm" fo:padding-right="0.276cm" loext:decorative="false"/>
    </style:style>
    <style:style style:name="gr1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38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403cm" fo:padding-top="0.151cm" fo:padding-bottom="0.151cm" fo:padding-left="0.276cm" fo:padding-right="0.276cm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97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198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0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6" style:family="graphic" style:parent-style-name="standard">
      <style:graphic-properties draw:textarea-horizontal-align="justify" draw:textarea-vertical-align="middle" draw:auto-grow-height="false" fo:min-height="0.45cm" fo:min-width="26.321cm" style:writing-mode="lr-tb" loext:decorative="false"/>
      <style:paragraph-properties style:writing-mode="lr-tb"/>
    </style:style>
    <style:style style:name="gr217" style:family="graphic" style:parent-style-name="standard">
      <style:graphic-properties draw:textarea-horizontal-align="justify" draw:textarea-vertical-align="middle" draw:auto-grow-height="false" fo:min-height="0.45cm" fo:min-width="25.846cm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>
      <style:graphic-properties draw:textarea-horizontal-align="justify" draw:textarea-vertical-align="middle" draw:auto-grow-height="false" fo:min-height="0.45cm" fo:min-width="26.172cm" style:writing-mode="lr-tb" loext:decorative="false"/>
      <style:paragraph-properties style:writing-mode="lr-tb"/>
    </style:style>
    <style:style style:name="gr22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2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9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4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9cm" fo:min-width="10.9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3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254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398cm" fo:min-width="27.148cm" fo:padding-top="0.151cm" fo:padding-bottom="0.151cm" fo:padding-left="0.276cm" fo:padding-right="0.276cm" loext:decorative="false"/>
    </style:style>
    <style:style style:name="gr2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23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9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9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00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0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5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6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start"/>
      <style:text-properties fo:font-size="12pt"/>
    </style:style>
    <style:style style:name="P29" style:family="paragraph">
      <loext:graphic-properties draw:fill="none"/>
      <style:paragraph-properties fo:text-align="start" style:writing-mode="lr-tb"/>
      <style:text-properties fo:font-size="12pt"/>
    </style:style>
    <style:style style:name="P3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start"/>
      <style:text-properties fo:font-size="12pt" style:font-size-asian="12pt" style:font-size-complex="12pt"/>
    </style:style>
    <style:style style:name="P3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1" style:family="paragraph">
      <style:paragraph-properties fo:text-align="start"/>
    </style:style>
    <style:style style:name="P42" style:family="paragraph">
      <style:paragraph-properties fo:text-align="start" style:writing-mode="lr-tb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g draw:style-name="gr1">
          <draw:custom-shape draw:style-name="gr2" draw:text-style-name="P2" draw:layer="layout" svg:width="3.175cm" svg:height="0.679cm" svg:x="3.135cm" svg:y="7.244cm">
            <draw:glue-point draw:id="4" svg:x="0.5cm" svg:y="0cm" draw:align="top-left"/>
            <text:p text:style-name="P1"><text:span text:style-name="T1">&lt;&lt;Module&gt;&gt;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3.335cm" svg:height="4.507cm" svg:x="3.135cm" svg:y="7.923cm">
            <draw:glue-point draw:id="4" svg:x="0.501cm" svg:y="-0.003cm" draw:align="bottom-left" draw:escape-direction="down"/>
            <draw:glue-point draw:id="5" svg:x="-0.501cm" svg:y="-0.003cm" draw:align="bottom-right" draw:escape-direction="down"/>
            <draw:glue-point draw:id="6" svg:x="0cm" svg:y="-0.252cm" draw:align="bottom-left" draw:escape-direction="left"/>
            <draw:glue-point draw:id="7" svg:x="0cm" svg:y="-0.252cm" draw:align="bottom-right" draw:escape-direction="right"/>
            <draw:glue-point draw:id="8" svg:x="0cm" svg:y="0.23cm" draw:align="top-left" draw:escape-direction="left"/>
            <draw:glue-point draw:id="9" svg:x="0cm" svg:y="0.23cm" draw:align="top-right" draw:escape-direction="up"/>
            <draw:glue-point draw:id="10" svg:x="-0.501cm" svg:y="0cm" draw:align="top-right" draw:escape-direction="up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3.335cm" svg:height="1.271cm" svg:x="3.135cm" svg:y="12.429cm">
            <text:p text:style-name="P4"><text:span text:style-name="T2">Every modules/classes can use these utilities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17.041cm" svg:height="0.7cm" svg:x="1.421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6.739cm" svg:height="0.7cm" svg:x="1.518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glue-point draw:id="46" svg:x="-2.202cm" svg:y="5.141cm"/>
          <draw:custom-shape draw:style-name="gr7" draw:text-style-name="P9" draw:layer="layout" svg:width="16.796cm" svg:height="1.153cm" svg:x="1.515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16.796cm" svg:height="0.679cm" svg:x="1.515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7" draw:layer="layout" svg:width="16.946cm" svg:height="0.7cm" svg:x="1.516cm" svg:y="15.28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8.732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" draw:id="id1">
          <draw:glue-point draw:id="4" svg:x="1.153cm" svg:y="-4.294cm"/>
          <draw:glue-point draw:id="5" svg:x="3.461cm" svg:y="-5.146cm"/>
          <draw:custom-shape draw:style-name="gr11" draw:text-style-name="P14" draw:layer="layout" svg:width="4.047cm" svg:height="1.153cm" svg:x="10.583cm" svg:y="8.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3">system_sounds.py</text:span></text:p>
            <text:p text:style-name="P13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6" draw:layer="layout" svg:width="4.047cm" svg:height="0.761cm" svg:x="10.583cm" svg:y="9.973cm">
            <text:p text:style-name="P15"><text:span text:style-name="T4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17" draw:layer="layout" svg:x1="13.072cm" svg:y1="8.956cm" svg:x2="14.859cm" svg:y2="5.27cm" draw:start-shape="id1" draw:start-glue-point="4" draw:end-shape="id2" draw:end-glue-point="5" svg:d="M13072 8956v-1912h1787v-1774" svg:viewBox="0 0 1788 3687">
          <text:p/>
        </draw:connector>
        <draw:custom-shape draw:style-name="gr14" draw:text-style-name="P18" draw:layer="layout" svg:width="18.732cm" svg:height="0.952cm" svg:x="1cm" svg:y="1.1cm">
          <text:p text:style-name="P6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7.67cm" svg:y="7.03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g draw:style-name="gr1" xml:id="id3" draw:id="id3">
          <draw:glue-point draw:id="4" svg:x="-3.94cm" svg:y="-4.644cm"/>
          <draw:glue-point draw:id="5" svg:x="4.311cm" svg:y="-5.137cm"/>
          <draw:glue-point draw:id="6" svg:x="3.601cm" svg:y="-5.137cm"/>
          <draw:custom-shape draw:style-name="gr16" draw:text-style-name="P14" draw:layer="layout" svg:width="4.465cm" svg:height="1.153cm" svg:x="4.375cm" svg:y="8.8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3">oradio_logging.py</text:span></text:p>
            <text:p text:style-name="P13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6" draw:layer="layout" svg:width="4.465cm" svg:height="2.077cm" svg:x="4.375cm" svg:y="9.97cm">
            <text:p text:style-name="P15"><text:span text:style-name="T4">+ oradio_log.debug()</text:span></text:p>
            <text:p text:style-name="P15"><text:span text:style-name="T4">+ oradio_log.warning()</text:span></text:p>
            <text:p text:style-name="P15"><text:span text:style-name="T4">+ oradio_log.info()</text:span></text:p>
            <text:p text:style-name="P15"><text:span text:style-name="T4">+ oradio_log.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17" draw:layer="layout" draw:line-skew="-0.563cm" svg:x1="6.607cm" svg:y1="8.817cm" svg:x2="4.875cm" svg:y2="5.27cm" draw:start-shape="id3" draw:end-shape="id2" draw:end-glue-point="4" svg:d="M6607 8817v-2337h-1732v-1210" svg:viewBox="0 0 1733 3548">
          <text:p/>
        </draw:connector>
      </draw:page>
      <draw:page draw:name="Throttle" draw:style-name="dp1" draw:master-page-name="Default">
        <draw:custom-shape draw:style-name="gr19" draw:text-style-name="P7" draw:layer="layout" svg:width="22.089cm" svg:height="0.7cm" svg:x="1.453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21.697cm" svg:height="0.7cm" svg:x="1.579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" draw:id="id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glue-point draw:id="46" svg:x="-2.202cm" svg:y="5.141cm"/>
          <draw:custom-shape draw:style-name="gr21" draw:text-style-name="P9" draw:layer="layout" svg:width="21.77cm" svg:height="1.153cm" svg:x="1.57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21.77cm" svg:height="0.679cm" svg:x="1.57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7" draw:layer="layout" svg:width="21.965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7.44cm" svg:y="7.03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24" draw:text-style-name="P12" draw:layer="layout" svg:width="23.49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7" draw:layer="layout" svg:x1="5.921cm" svg:y1="7.802cm" svg:x2="5.93cm" svg:y2="5.27cm" draw:start-shape="id4" draw:end-shape="id5" draw:end-glue-point="4" svg:d="M5921 7802v-1267h9v-1265" svg:viewBox="0 0 10 2533">
          <text:p/>
        </draw:connector>
        <draw:custom-shape draw:style-name="gr26" draw:text-style-name="P18" draw:layer="layout" svg:width="23.495cm" svg:height="0.952cm" svg:x="1cm" svg:y="1.1cm">
          <text:p text:style-name="P6">Static view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" draw:id="id4">
          <draw:custom-shape draw:style-name="gr27" draw:text-style-name="P14" draw:layer="layout" svg:width="7.302cm" svg:height="1.153cm" svg:x="2.27cm" svg:y="7.8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3">throttled_monitor.py</text:span></text:p>
            <text:p text:style-name="P13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7.302cm" svg:height="0.761cm" svg:x="2.27cm" svg:y="8.955cm">
            <text:p text:style-name="P20"><text:span text:style-name="T4">-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6" draw:layer="layout" svg:width="7.302cm" svg:height="0.599cm" svg:x="2.27cm" svg:y="9.71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30" draw:text-style-name="P22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throttled_monitor.RpiThrottlingMonitor</text:span></text:p>
            <text:p text:style-name="P21"><text:span text:style-name="T3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6" draw:layer="layout" svg:width="7.62cm" svg:height="0.591cm" svg:x="4.58cm" svg:y="13.474cm">
            <text:p text:style-name="P15"><text:span text:style-name="T4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6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- init()</text:span></text:p>
            <text:p text:style-name="P15"><text:span text:style-name="T4">+ start()</text:span></text:p>
            <text:p text:style-name="P15"><text:span text:style-name="T4">+ stop()</text:span></text:p>
            <text:p text:style-name="P15"><text:span text:style-name="T4">+ run()</text:span></text:p>
            <text:p text:style-name="P15"><text:span text:style-name="T4">+ force_throttled()</text:span></text:p>
            <text:p text:style-name="P15"><text:span text:style-name="T4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" draw:text-style-name="P17" draw:layer="layout" svg:x1="8.39cm" svg:y1="12.321cm" svg:x2="5.921cm" svg:y2="10.315cm" draw:start-shape="id6" draw:end-shape="id4" svg:d="M8390 12321v-1004h-2469v-1002" svg:viewBox="0 0 2470 2007">
          <text:p/>
        </draw:connector>
        <draw:frame draw:style-name="gr15" draw:text-style-name="P19" draw:layer="layout" svg:width="3.085cm" svg:height="0.725cm" svg:x="6.17cm" svg:y="10.525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g draw:style-name="gr1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1">
            <draw:g draw:style-name="gr1">
              <draw:g draw:style-name="gr1">
                <draw:custom-shape draw:style-name="gr34" draw:text-style-name="P24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23"><text:span text:style-name="T3">&lt;&lt;thread&gt;&gt;</text:span></text:p>
                  <text:p text:style-name="P23"><text:span text:style-name="T3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16" draw:layer="layout" svg:width="5.64cm" svg:height="1.037cm" svg:x="15.997cm" svg:y="14.654cm">
                  <text:p text:style-name="P15"><text:span text:style-name="T4">+ stop_event: Event()</text:span></text:p>
                  <text:p text:style-name="P15"><text:span text:style-name="T4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16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15"><text:span text:style-name="T4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7" draw:text-style-name="P17" draw:layer="layout" svg:x1="15.997cm" svg:y1="14.868cm" svg:x2="12.2cm" svg:y2="14.477cm" draw:start-shape="id7" draw:end-shape="id6" draw:end-glue-point="1" svg:d="M15997 14868h-1898v-391h-1899" svg:viewBox="0 0 3798 392">
          <text:p/>
        </draw:connector>
        <draw:frame draw:style-name="gr15" draw:text-style-name="P19" draw:layer="layout" svg:width="3.81cm" svg:height="0.725cm" svg:x="12.43cm" svg:y="13.292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  <draw:custom-shape draw:style-name="gr38" draw:text-style-name="P26" xml:id="id8" draw:id="id8" draw:layer="layout" svg:width="6.667cm" svg:height="1.5cm" svg:x="15.288cm" svg:y="11.265cm">
          <text:p text:style-name="P25"><text:span text:style-name="T6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9" draw:text-style-name="P27" draw:layer="layout" draw:type="line" svg:x1="12.2cm" svg:y1="12.748cm" svg:x2="15.288cm" svg:y2="12.015cm" draw:start-shape="id6" draw:start-glue-point="7" draw:end-shape="id8" draw:end-glue-point="5" svg:d="M12200 12748l3088-733" svg:viewBox="0 0 3089 734">
          <text:p/>
        </draw:connector>
      </draw:page>
      <draw:page draw:name="Messages" draw:style-name="dp1" draw:master-page-name="Default">
        <draw:g draw:style-name="gr1" xml:id="id10" draw:id="id10">
          <draw:g draw:style-name="gr1">
            <draw:g draw:style-name="gr1">
              <draw:custom-shape draw:style-name="gr40" draw:text-style-name="P2" draw:layer="layout" svg:width="4.005cm" svg:height="0.679cm" svg:x="17.51cm" svg:y="7.324cm">
                <draw:glue-point draw:id="4" svg:x="0.5cm" svg:y="0cm" draw:align="top-left"/>
                <text:p text:style-name="P1"><text:span text:style-name="T1">&lt;&lt;Module&gt;&gt; <text:s/>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3" draw:layer="layout" svg:width="7.937cm" svg:height="1.204cm" svg:x="17.51cm" svg:y="8.003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 text:style-name="P10"><text:span text:style-name="T3">All module/classes can publish an error mess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2" draw:text-style-name="P29" draw:layer="layout" svg:width="7.937cm" svg:height="0.493cm" svg:x="17.51cm" svg:y="9.207cm">
              <text:p text:style-name="P28"><text:span text:style-name="T2">- publish_error_message()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43" draw:text-style-name="P7" draw:layer="layout" svg:width="26.507cm" svg:height="0.7cm" svg:x="1.482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draw:layer="layout" svg:width="26.037cm" svg:height="0.7cm" svg:x="1.633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45" draw:text-style-name="P9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1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7" draw:text-style-name="P7" draw:layer="layout" svg:width="26.359cm" svg:height="0.7cm" svg:x="1.311cm" svg:y="19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27.30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27.305cm" svg:height="0.952cm" svg:x="1cm" svg:y="1.1cm">
          <text:p text:style-name="P6">Static view: Messag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11.25cm" svg:y="11.387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  <draw:glue-point draw:id="4" svg:x="4.998cm" svg:y="-4.993cm"/>
          <draw:glue-point draw:id="5" svg:x="4.998cm" svg:y="-4.993cm"/>
          <draw:glue-point draw:id="6" svg:x="4.998cm" svg:y="-4.993cm"/>
        </draw:frame>
        <draw:g draw:style-name="gr1" xml:id="id9" draw:id="id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50" draw:text-style-name="P24" draw:layer="layout" svg:width="10.807cm" svg:height="1.153cm" svg:x="12.045cm" svg:y="15.3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6" draw:layer="layout" svg:width="10.807cm" svg:height="0.435cm" svg:x="12.045cm" svg:y="16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10.807cm" svg:height="0.993cm" svg:x="12.045cm" svg:y="16.8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publish_command_message(message: CommandMessage)</text:span></text:p>
            <text:p text:style-name="P15"><text:span text:style-name="T4">+ publish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1" draw:id="id11">
          <draw:g draw:style-name="gr1">
            <draw:glue-point draw:id="4" svg:x="0.501cm" svg:y="-0.003cm" draw:align="bottom-left"/>
            <draw:glue-point draw:id="5" svg:x="-0.501cm" svg:y="-0.003cm" draw:align="bottom-right"/>
            <draw:glue-point draw:id="6" svg:x="0cm" svg:y="-0.253cm" draw:align="bottom-right"/>
            <draw:glue-point draw:id="7" svg:x="0cm" svg:y="-0.253cm" draw:align="bottom-left"/>
            <draw:glue-point draw:id="8" svg:x="0cm" svg:y="0.751cm" draw:align="top-left"/>
            <draw:glue-point draw:id="9" svg:x="0cm" svg:y="0.751cm" draw:align="top-right"/>
            <draw:glue-point draw:id="10" svg:x="0.501cm" svg:y="0cm" draw:align="top-left"/>
            <draw:glue-point draw:id="11" svg:x="-0.501cm" svg:y="0.501cm" draw:align="top-right" draw:escape-direction="up"/>
            <draw:g draw:style-name="gr1">
              <draw:custom-shape draw:style-name="gr53" draw:text-style-name="P30" draw:layer="layout" svg:width="3.425cm" svg:height="0.679cm" svg:x="1.952cm" svg:y="7.563cm">
                <draw:glue-point draw:id="4" svg:x="0.5cm" svg:y="0cm" draw:align="top-left"/>
                <text:p text:style-name="P8"><text:span text:style-name="T3"><text:s text:c="2"/></text:span><text:span text:style-name="T3">&lt;&lt;class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3" draw:layer="layout" svg:width="7.938cm" svg:height="7.391cm" svg:x="1.952cm" svg:y="8.242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55" draw:text-style-name="P32" draw:layer="layout" svg:width="7.938cm" svg:height="1.242cm" svg:x="1.952cm" svg:y="15.633cm">
            <text:p text:style-name="P31"><text:span text:style-name="T5">- publish_command_message()</text:span>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34" draw:layer="layout" svg:width="6.985cm" svg:height="0.85cm" svg:x="2.487cm" svg:y="8.82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volume_control.VolumeControl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6.985cm" svg:height="0.85cm" svg:x="2.487cm" svg:y="9.69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spotify_connect.SpotifyConnect</text:span></text:p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6.985cm" svg:height="0.85cm" svg:x="2.487cm" svg:y="10.56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web_service.WebService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6.985cm" svg:height="0.85cm" svg:x="2.487cm" svg:y="11.427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usb_service.USBService</text:span>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6.985cm" svg:height="0.85cm" svg:x="2.487cm" svg:y="12.21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touch_buttons.TouchButtons</text:span></text:p>
          <draw:enhanced-geometry svg:viewBox="0 0 21600 21600" draw:type="rectangle" draw:enhanced-path="M 0 0 L 21600 0 21600 21600 0 21600 0 0 Z N"/>
        </draw:custom-shape>
        <draw:connector draw:style-name="gr61" draw:text-style-name="P17" draw:layer="layout" svg:x1="20.615cm" svg:y1="15.311cm" svg:x2="21.478cm" svg:y2="9.7cm" draw:start-shape="id9" draw:start-glue-point="7" draw:end-shape="id10" draw:end-glue-point="2" svg:d="M20615 15311v-2806h863v-2805" svg:viewBox="0 0 864 5612">
          <text:p/>
        </draw:connector>
        <draw:connector draw:style-name="gr62" draw:text-style-name="P17" draw:layer="layout" svg:x1="17.448cm" svg:y1="15.311cm" svg:x2="9.89cm" svg:y2="12.219cm" draw:start-shape="id9" draw:start-glue-point="0" draw:end-shape="id11" svg:d="M17448 15311v-3092h-7558" svg:viewBox="0 0 7559 3093">
          <text:p/>
        </draw:connector>
        <draw:custom-shape draw:style-name="gr63" draw:text-style-name="P34" draw:layer="layout" svg:width="6.985cm" svg:height="0.85cm" svg:x="2.487cm" svg:y="13.06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wifi_service.WifiService</text:span></text:p>
          <draw:enhanced-geometry svg:viewBox="0 0 21600 21600" draw:type="rectangle" draw:enhanced-path="M 0 0 L 21600 0 21600 21600 0 21600 0 0 Z N"/>
        </draw:custom-shape>
      </draw:page>
      <draw:page draw:name="Remote monitoring" draw:style-name="dp1" draw:master-page-name="Default">
        <draw:custom-shape draw:style-name="gr64" draw:text-style-name="P7" draw:layer="layout" svg:width="24.288cm" svg:height="0.7cm" svg:x="1.47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" draw:layer="layout" svg:width="24.079cm" svg:height="0.7cm" svg:x="1.608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3" draw:id="id13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66" draw:text-style-name="P9" draw:layer="layout" svg:width="24.161cm" svg:height="1.153cm" svg:x="1.604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1" draw:layer="layout" svg:width="24.161cm" svg:height="0.679cm" svg:x="1.604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8" draw:text-style-name="P7" draw:layer="layout" svg:width="24.376cm" svg:height="0.7cm" svg:x="1.311cm" svg:y="18.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4.582cm" svg:y="6.715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69" draw:text-style-name="P12" draw:layer="layout" svg:width="25.71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70" draw:text-style-name="P14" draw:layer="layout" svg:width="6.423cm" svg:height="1.153cm" svg:x="2.719cm" svg:y="7.8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remote_monitoring.RMService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6" draw:layer="layout" svg:width="6.423cm" svg:height="1.002cm" svg:x="2.719cm" svg:y="9.013cm">
              <text:p text:style-name="P20"><text:span text:style-name="T4">- stop_monitor: Event</text:span></text:p>
              <text:p text:style-name="P20"><text:span text:style-name="T4">- wifi_cm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6" draw:layer="layout" svg:width="6.423cm" svg:height="0.993cm" svg:x="2.719cm" svg:y="10.01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send_message()</text:span></text:p>
              <text:p text:style-name="P15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3" draw:text-style-name="P17" draw:layer="layout" draw:line-skew="0.345cm" svg:x1="7.357cm" svg:y1="7.861cm" svg:x2="6.436cm" svg:y2="5.27cm" draw:start-shape="id12" draw:start-glue-point="14" draw:end-shape="id13" draw:end-glue-point="4" svg:d="M7357 7861v-952h-921v-1639" svg:viewBox="0 0 922 2592">
          <text:p/>
        </draw:connector>
        <draw:custom-shape draw:style-name="gr74" draw:text-style-name="P18" draw:layer="layout" svg:width="25.717cm" svg:height="0.952cm" svg:x="1cm" svg:y="1.1cm">
          <text:p text:style-name="P6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17" draw:layer="layout" svg:x1="11.73cm" svg:y1="9.242cm" svg:x2="9.141cm" svg:y2="8.496cm" draw:start-shape="id14" draw:end-shape="id12" draw:end-glue-point="13" svg:d="M11730 9242h-1294v-746h-1295" svg:viewBox="0 0 2590 747">
          <text:p/>
        </draw:connector>
        <draw:frame draw:style-name="gr15" draw:text-style-name="P19" draw:layer="layout" svg:width="3.085cm" svg:height="0.725cm" svg:x="1.635cm" svg:y="12.34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76" draw:text-style-name="P14" draw:layer="layout" svg:width="4.445cm" svg:height="1.627cm" svg:x="1.952cm" svg:y="13.18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remote_monitoring.</text:span></text:p>
              <text:p text:style-name="P13"><text:span text:style-name="T3">Heartbeat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6" draw:layer="layout" svg:width="4.445cm" svg:height="0.761cm" svg:x="1.952cm" svg:y="14.8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6" draw:layer="layout" svg:width="4.445cm" svg:height="1.387cm" svg:x="1.952cm" svg:y="15.5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start_heartbeat()</text:span></text:p>
              <text:p text:style-name="P15"><text:span text:style-name="T4">+ stop_heartbeat()</text:span></text:p>
              <text:p text:style-name="P15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18" draw:id="id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79" draw:text-style-name="P14" draw:layer="layout" svg:width="4.18cm" svg:height="1.153cm" svg:x="9.52cm" svg:y="14.7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&lt;&lt;BaseClass&gt;&gt;</text:span></text:p>
              <text:p text:style-name="P13"><text:span text:style-name="T3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6" draw:layer="layout" svg:width="4.18cm" svg:height="0.761cm" svg:x="9.52cm" svg:y="15.908cm">
              <text:p text:style-name="P20"><text:span text:style-name="T4">-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6" draw:layer="layout" svg:width="4.18cm" svg:height="0.993cm" svg:x="9.52cm" svg:y="16.6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start()</text:span></text:p>
              <text:p text:style-name="P15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2" draw:text-style-name="P17" draw:layer="layout" svg:x1="5.162cm" svg:y1="13.183cm" svg:x2="4.505cm" svg:y2="11.008cm" draw:start-shape="id15" draw:start-glue-point="14" draw:end-shape="id12" draw:end-glue-point="8" svg:d="M5162 13183v-1089h-657v-1086" svg:viewBox="0 0 658 2176">
          <text:p/>
        </draw:connector>
        <draw:frame draw:style-name="gr15" draw:text-style-name="P19" draw:layer="layout" svg:width="3.085cm" svg:height="0.725cm" svg:x="9.255cm" svg:y="7.26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g draw:style-name="gr1" xml:id="id14" draw:id="id14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83" draw:text-style-name="P24" draw:layer="layout" svg:width="6.35cm" svg:height="1.153cm" svg:x="11.73cm" svg:y="7.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6" draw:layer="layout" svg:width="6.35cm" svg:height="0.956cm" svg:x="11.73cm" svg:y="9.1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6" draw:layer="layout" svg:width="6.35cm" svg:height="0.599cm" svg:x="11.73cm" svg:y="9.9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6" draw:text-style-name="P24" draw:layer="layout" svg:width="8.39cm" svg:height="1.153cm" svg:x="12.4cm" svg:y="11.47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wifi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6" draw:layer="layout" svg:width="8.39cm" svg:height="0.784cm" svg:x="12.4cm" svg:y="12.63cm">
            <text:p text:style-name="P15"><text:span text:style-name="T4">+ stop_monitor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6" draw:layer="layout" svg:width="8.39cm" svg:height="0.599cm" svg:x="12.4cm" svg:y="13.4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- safe_get(wifi_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9" draw:text-style-name="P26" xml:id="id17" draw:id="id17" draw:layer="layout" svg:width="6.667cm" svg:height="1.5cm" svg:x="19.285cm" svg:y="8.937cm">
          <text:p text:style-name="P25"><text:span text:style-name="T6">The wifi_monitor thread waits for wifi topic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90" draw:text-style-name="P27" draw:layer="layout" draw:type="line" svg:x1="20.79cm" svg:y1="12.479cm" svg:x2="22.618cm" svg:y2="10.437cm" draw:start-shape="id16" draw:start-glue-point="23" draw:end-shape="id17" draw:end-glue-point="2" svg:d="M20790 12479l1828-2042" svg:viewBox="0 0 1829 2043">
          <text:p/>
        </draw:connector>
        <draw:connector draw:style-name="gr91" draw:text-style-name="P17" draw:layer="layout" svg:x1="12.401cm" svg:y1="13.469cm" svg:x2="7.357cm" svg:y2="11.008cm" draw:start-shape="id16" draw:start-glue-point="11" draw:end-shape="id12" draw:end-glue-point="9" svg:d="M12401 13469h-5044v-2461" svg:viewBox="0 0 5045 2462">
          <text:p/>
        </draw:connector>
        <draw:frame draw:style-name="gr15" draw:text-style-name="P19" draw:layer="layout" svg:width="3.81cm" svg:height="0.725cm" svg:x="8.62cm" svg:y="12.747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  <draw:connector draw:style-name="gr92" draw:text-style-name="P17" draw:layer="layout" svg:x1="9.521cm" svg:y1="17.118cm" svg:x2="6.396cm" svg:y2="16.413cm" draw:start-shape="id18" draw:start-glue-point="11" draw:end-shape="id15" draw:end-glue-point="12" svg:d="M9521 17118h-1563v-705h-1562" svg:viewBox="0 0 3126 706">
          <text:p/>
        </draw:connector>
        <draw:frame draw:style-name="gr15" draw:text-style-name="P19" draw:layer="layout" svg:width="3.81cm" svg:height="0.725cm" svg:x="5.127cm" svg:y="17.42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</draw:page>
      <draw:page draw:name="Web service" draw:style-name="dp1" draw:master-page-name="Default">
        <draw:custom-shape draw:style-name="gr93" draw:text-style-name="P7" draw:layer="layout" svg:width="23.589cm" svg:height="0.7cm" svg:x="1.46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7" draw:layer="layout" svg:width="23.452cm" svg:height="0.7cm" svg:x="1.602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0" draw:id="id20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95" draw:text-style-name="P9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1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7" draw:text-style-name="P7" draw:layer="layout" svg:width="23.743cm" svg:height="0.7cm" svg:x="1.3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20.457cm" svg:y="6.307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98" draw:text-style-name="P12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99" draw:text-style-name="P14" draw:layer="layout" svg:width="5.654cm" svg:height="1.627cm" svg:x="12.113cm" svg:y="7.2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web_service.</text:span></text:p>
              <text:p text:style-name="P13"><text:span text:style-name="T3">WebService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0" draw:text-style-name="P16" draw:layer="layout" svg:width="5.654cm" svg:height="0.949cm" svg:x="12.113cm" svg:y="8.895cm">
              <text:p text:style-name="P20"><text:span text:style-name="T4">- web_cmd_queue: Queue</text:span></text:p>
              <text:p text:style-name="P20"><text:span text:style-name="T4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1" draw:text-style-name="P36" draw:layer="layout" svg:width="5.654cm" svg:height="2.175cm" svg:x="12.113cm" svg:y="9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4">+ init()</text:span></text:p>
              <text:p text:style-name="P35"><text:span text:style-name="T4">+ stop()</text:span></text:p>
              <text:p text:style-name="P35"><text:span text:style-name="T4">+ get_state()</text:span></text:p>
              <text:p text:style-name="P35"><text:span text:style-name="T4">+ start()</text:span></text:p>
              <text:p text:style-name="P35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2" draw:text-style-name="P17" draw:layer="layout" draw:line-skew="0.447cm" svg:x1="16.196cm" svg:y1="7.269cm" svg:x2="20.294cm" svg:y2="5.27cm" draw:start-shape="id19" draw:start-glue-point="14" draw:end-shape="id20" draw:end-glue-point="5" svg:d="M16196 7269v-554h4098v-1445" svg:viewBox="0 0 4099 2000">
          <text:p/>
        </draw:connector>
        <draw:custom-shape draw:style-name="gr103" draw:text-style-name="P18" draw:layer="layout" svg:width="24.765cm" svg:height="0.952cm" svg:x="1cm" svg:y="1.1cm">
          <text:p text:style-name="P6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04" draw:text-style-name="P14" draw:layer="layout" svg:width="4.763cm" svg:height="1.627cm" svg:x="19.2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web_server.</text:span></text:p>
              <text:p text:style-name="P13"><text:span text:style-name="T3">UvicornServer</text:span></text:p>
              <text:p text:style-name="P13"><text:span text:style-name="T3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6" draw:layer="layout" svg:width="4.763cm" svg:height="0.473cm" svg:x="19.2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6" draw:layer="layout" svg:width="4.763cm" svg:height="1.781cm" svg:x="19.2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init(app:FastAPI)</text:span></text:p>
              <text:p text:style-name="P15"><text:span text:style-name="T4">+ run()</text:span></text:p>
              <text:p text:style-name="P15"><text:span text:style-name="T4">+ start()</text:span></text:p>
              <text:p text:style-name="P15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07" draw:text-style-name="P14" draw:layer="layout" svg:width="5.602cm" svg:height="1.627cm" svg:x="18.72cm" svg:y="14.01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3"><text:span text:style-name="T3">fastapi_server.</text:span></text:p>
                <text:p text:style-name="P13"><text:span text:style-name="T3">api_ap</text:span></text:p>
                <text:p text:style-name="P13"><text:span text:style-name="T3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16" draw:layer="layout" svg:width="5.602cm" svg:height="0.676cm" svg:x="18.72cm" svg:y="15.644cm">
                <text:p text:style-name="P15"><text:span text:style-name="T4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6" draw:layer="layout" svg:width="5.602cm" svg:height="2.175cm" svg:x="18.72cm" svg:y="16.31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5"><text:span text:style-name="T4">+ @api_app.get()</text:span></text:p>
                <text:p text:style-name="P15"><text:span text:style-name="T4">+ @api_app.put()</text:span></text:p>
                <text:p text:style-name="P15"><text:span text:style-name="T4">+ @api_app.post()</text:span></text:p>
                <text:p text:style-name="P15"><text:span text:style-name="T4">+ @api_app.api_route()</text:span></text:p>
                <text:p text:style-name="P15"><text:span text:style-name="T4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15" draw:text-style-name="P19" draw:layer="layout" svg:width="3.81cm" svg:height="0.725cm" svg:x="18.145cm" svg:y="7.26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  <draw:connector draw:style-name="gr110" draw:text-style-name="P17" draw:layer="layout" svg:x1="21.628cm" svg:y1="9.184cm" svg:x2="17.766cm" svg:y2="7.904cm" draw:start-shape="id21" draw:start-glue-point="0" draw:end-shape="id19" draw:end-glue-point="13" svg:d="M21628 9184v-1280h-3862" svg:viewBox="0 0 3863 1281">
          <text:p/>
        </draw:connector>
        <draw:connector draw:style-name="gr111" draw:text-style-name="P17" draw:layer="layout" draw:line-skew="-1.099cm" svg:x1="19.248cm" svg:y1="12.521cm" svg:x2="18.721cm" svg:y2="14.653cm" draw:start-shape="id21" draw:start-glue-point="11" draw:end-shape="id22" draw:end-glue-point="6" svg:d="M19248 12521h-2154v2132h1627" svg:viewBox="0 0 2155 2133">
          <text:p/>
        </draw:connector>
        <draw:frame draw:style-name="gr15" draw:text-style-name="P19" draw:layer="layout" svg:width="3.085cm" svg:height="0.725cm" svg:x="9.027cm" svg:y="7.03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frame draw:style-name="gr15" draw:text-style-name="P19" draw:layer="layout" svg:width="3.085cm" svg:height="0.725cm" svg:x="17.192cm" svg:y="13.29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g draw:style-name="gr1" xml:id="id24" draw:id="id24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12" draw:text-style-name="P24" draw:layer="layout" svg:width="6.35cm" svg:height="1.153cm" svg:x="2.622cm" svg:y="7.9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6" draw:layer="layout" svg:width="6.35cm" svg:height="0.601cm" svg:x="2.622cm" svg:y="9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6" draw:layer="layout" svg:width="6.35cm" svg:height="0.599cm" svg:x="2.622cm" svg:y="9.6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5" draw:text-style-name="P24" draw:layer="layout" svg:width="8.39cm" svg:height="1.153cm" svg:x="6.8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web_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6" draw:layer="layout" svg:width="8.39cm" svg:height="0.784cm" svg:x="6.897cm" svg:y="16.44cm">
            <text:p text:style-name="P15"><text:span text:style-name="T4">+ web_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6" draw:layer="layout" svg:width="8.39cm" svg:height="0.599cm" svg:x="6.8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- safe_get(wb_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8" draw:text-style-name="P26" xml:id="id25" draw:id="id25" draw:layer="layout" svg:width="6.667cm" svg:height="1.5cm" svg:x="1.552cm" svg:y="13.235cm">
          <text:p text:style-name="P25"><text:span text:style-name="T6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19" draw:text-style-name="P17" draw:layer="layout" svg:x1="14.822cm" svg:y1="15.288cm" svg:x2="13.685cm" svg:y2="12.019cm" draw:start-shape="id23" draw:start-glue-point="15" draw:end-shape="id19" draw:end-glue-point="8" svg:d="M14822 15288v-1636h-1137v-1633" svg:viewBox="0 0 1138 3270">
          <text:p/>
        </draw:connector>
        <draw:frame draw:style-name="gr15" draw:text-style-name="P19" draw:layer="layout" svg:width="3.81cm" svg:height="0.725cm" svg:x="11.16cm" svg:y="13.927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  <draw:connector draw:style-name="gr120" draw:text-style-name="P17" draw:layer="layout" svg:x1="8.972cm" svg:y1="9.086cm" svg:x2="12.114cm" svg:y2="7.904cm" draw:start-shape="id24" draw:end-shape="id19" draw:end-glue-point="6" svg:d="M8972 9086h1571v-1182h1571" svg:viewBox="0 0 3143 1183">
          <text:p/>
        </draw:connector>
        <draw:connector draw:style-name="gr121" draw:text-style-name="P27" draw:layer="layout" draw:type="line" svg:x1="8.219cm" svg:y1="13.985cm" svg:x2="9.23cm" svg:y2="15.288cm" draw:start-shape="id25" draw:start-glue-point="7" draw:end-shape="id23" draw:end-glue-point="5" svg:d="M8219 13985l1011 1303" svg:viewBox="0 0 1012 1304">
          <text:p/>
        </draw:connector>
      </draw:page>
      <draw:page draw:name="WiFi" draw:style-name="dp1" draw:master-page-name="Default">
        <draw:custom-shape draw:style-name="gr122" draw:text-style-name="P7" draw:layer="layout" svg:width="25.161cm" svg:height="0.7cm" svg:x="1.47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7" draw:layer="layout" svg:width="25.015cm" svg:height="0.7cm" svg:x="1.621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7" draw:id="id2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24" draw:text-style-name="P9" draw:layer="layout" svg:width="25.1cm" svg:height="1.153cm" svg:x="1.617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1" draw:layer="layout" svg:width="25.1cm" svg:height="0.679cm" svg:x="1.617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6" draw:text-style-name="P7" draw:layer="layout" svg:width="25.325cm" svg:height="0.7cm" svg:x="1.3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535cm" svg:y="6.625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127" draw:text-style-name="P12" draw:layer="layout" svg:width="26.35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8" draw:text-style-name="P14" draw:layer="layout" svg:width="5.654cm" svg:height="1.627cm" svg:x="1.913cm" svg:y="7.3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wifi_service.</text:span></text:p>
              <text:p text:style-name="P13"><text:span text:style-name="T3">WifiService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16" draw:layer="layout" svg:width="5.654cm" svg:height="0.949cm" svg:x="1.913cm" svg:y="8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36" draw:layer="layout" svg:width="5.654cm" svg:height="2.175cm" svg:x="1.913cm" svg:y="9.9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4">+ init()</text:span></text:p>
              <text:p text:style-name="P35"><text:span text:style-name="T4">+ get_state()</text:span></text:p>
              <text:p text:style-name="P35"><text:span text:style-name="T4">+ wifi_connect()</text:span></text:p>
              <text:p text:style-name="P35"><text:span text:style-name="T4">+ wifi_disconnect()</text:span></text:p>
              <text:p text:style-name="P35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31" draw:text-style-name="P17" draw:layer="layout" draw:line-skew="0.485cm" svg:x1="3.485cm" svg:y1="7.369cm" svg:x2="4.068cm" svg:y2="5.27cm" draw:start-shape="id26" draw:start-glue-point="5" draw:end-shape="id27" draw:end-glue-point="16" svg:d="M3485 7369v-566h583v-1533" svg:viewBox="0 0 584 2100">
          <text:p/>
        </draw:connector>
        <draw:custom-shape draw:style-name="gr132" draw:text-style-name="P18" draw:layer="layout" svg:width="26.352cm" svg:height="0.952cm" svg:x="1cm" svg:y="1.1cm">
          <text:p text:style-name="P6">Static view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81cm" svg:height="0.725cm" svg:x="12.747cm" svg:y="14.562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  <draw:connector draw:style-name="gr133" draw:text-style-name="P17" draw:layer="layout" svg:x1="22.935cm" svg:y1="16.33cm" svg:x2="21.486cm" svg:y2="14.352cm" draw:start-shape="id28" draw:start-glue-point="14" draw:end-shape="id29" draw:end-glue-point="9" svg:d="M22935 16330v-990h-1449v-988" svg:viewBox="0 0 1450 1979">
          <text:p/>
        </draw:connector>
        <draw:connector draw:style-name="gr134" draw:text-style-name="P17" draw:layer="layout" svg:x1="13.355cm" svg:y1="8.937cm" svg:x2="7.566cm" svg:y2="8.004cm" draw:start-shape="id30" draw:start-glue-point="0" draw:end-shape="id26" draw:end-glue-point="13" svg:d="M13355 8937v-933h-5789" svg:viewBox="0 0 5790 934">
          <text:p/>
        </draw:connector>
        <draw:g draw:style-name="gr1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5" draw:text-style-name="P14" draw:layer="layout" svg:width="7.072cm" svg:height="1.627cm" svg:x="2.422cm" svg:y="13.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wifi_service.</text:span></text:p>
              <text:p text:style-name="P13"><text:span text:style-name="T3">WifiEventListener</text:span></text:p>
              <text:p text:style-name="P13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16" draw:layer="layout" svg:width="7.072cm" svg:height="0.779cm" svg:x="2.422cm" svg:y="15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16" draw:layer="layout" svg:width="7.072cm" svg:height="0.599cm" svg:x="2.422cm" svg:y="16.0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5" draw:text-style-name="P19" draw:layer="layout" svg:width="3.085cm" svg:height="0.725cm" svg:x="3.54cm" svg:y="12.747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frame draw:style-name="gr15" draw:text-style-name="P19" draw:layer="layout" svg:width="3.085cm" svg:height="0.725cm" svg:x="9.255cm" svg:y="7.03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g draw:style-name="gr1" xml:id="id30" draw:id="id3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38" draw:text-style-name="P24" draw:layer="layout" svg:width="10.154cm" svg:height="1.153cm" svg:x="8.278cm" svg:y="8.9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6" draw:layer="layout" svg:width="10.154cm" svg:height="0.435cm" svg:x="8.278cm" svg:y="10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6" draw:layer="layout" svg:width="10.154cm" svg:height="0.599cm" svg:x="8.278cm" svg:y="10.4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publish_command_message(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1" draw:text-style-name="P14" draw:layer="layout" svg:width="7.072cm" svg:height="1.153cm" svg:x="10.2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dbus.SystemBus</text:span></text:p>
              <text:p text:style-name="P13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16" draw:layer="layout" svg:width="7.072cm" svg:height="0.486cm" svg:x="10.2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16" draw:layer="layout" svg:width="7.072cm" svg:height="0.373cm" svg:x="10.2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4" draw:text-style-name="P14" draw:layer="layout" svg:width="7.072cm" svg:height="1.153cm" svg:x="17.8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dbus.Interface</text:span></text:p>
              <text:p text:style-name="P13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16" draw:layer="layout" svg:width="7.072cm" svg:height="0.448cm" svg:x="17.8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16" draw:layer="layout" svg:width="7.072cm" svg:height="0.345cm" svg:x="17.8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7" draw:text-style-name="P14" draw:layer="layout" svg:width="7.072cm" svg:height="1.153cm" svg:x="16.378cm" svg:y="11.8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wifi_event_listener</text:span></text:p>
              <text:p text:style-name="P13"><text:span text:style-name="T3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16" draw:layer="layout" svg:width="7.072cm" svg:height="0.779cm" svg:x="16.378cm" svg:y="12.9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16" draw:layer="layout" svg:width="7.072cm" svg:height="0.599cm" svg:x="16.378cm" svg:y="13.75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0" draw:text-style-name="P17" draw:layer="layout" svg:x1="12.174cm" svg:y1="16.281cm" svg:x2="18.345cm" svg:y2="14.352cm" draw:start-shape="id31" draw:start-glue-point="5" draw:end-shape="id29" draw:end-glue-point="8" svg:d="M12174 16281v-966h6171v-963" svg:viewBox="0 0 6172 1930">
          <text:p/>
        </draw:connector>
        <draw:connector draw:style-name="gr151" draw:text-style-name="P17" draw:layer="layout" svg:x1="16.379cm" svg:y1="12.457cm" svg:x2="9.493cm" svg:y2="14.266cm" draw:start-shape="id29" draw:start-glue-point="6" draw:end-shape="id32" draw:end-glue-point="13" svg:d="M16379 12457h-3443v1809h-3443" svg:viewBox="0 0 6887 1810">
          <text:p/>
        </draw:connector>
        <draw:connector draw:style-name="gr152" draw:text-style-name="P17" draw:layer="layout" svg:x1="7.53cm" svg:y1="13.631cm" svg:x2="3.485cm" svg:y2="12.119cm" draw:start-shape="id32" draw:start-glue-point="14" draw:end-shape="id26" draw:end-glue-point="8" svg:d="M7530 13631v-757h-4045v-755" svg:viewBox="0 0 4046 1513">
          <text:p/>
        </draw:connector>
        <draw:custom-shape draw:style-name="gr153" draw:text-style-name="P26" xml:id="id33" draw:id="id33" draw:layer="layout" svg:width="7.703cm" svg:height="1.905cm" svg:x="19.332cm" svg:y="8.915cm">
          <text:p text:style-name="P25"><text:span text:style-name="T6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54" draw:text-style-name="P27" draw:layer="layout" draw:type="line" svg:x1="23.058cm" svg:y1="11.822cm" svg:x2="23.183cm" svg:y2="10.82cm" draw:start-shape="id29" draw:start-glue-point="15" draw:end-shape="id33" draw:end-glue-point="2" svg:d="M23058 11822l125-1002" svg:viewBox="0 0 126 1003">
          <text:p/>
        </draw:connector>
      </draw:page>
      <draw:page draw:name="USB" draw:style-name="dp1" draw:master-page-name="Default">
        <draw:custom-shape draw:style-name="gr155" draw:text-style-name="P7" draw:layer="layout" svg:width="25.553cm" svg:height="0.7cm" svg:x="1.482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7" draw:layer="layout" svg:width="25.402cm" svg:height="0.7cm" svg:x="1.633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5" draw:id="id3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57" draw:text-style-name="P9" draw:layer="layout" svg:width="25.406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1" draw:layer="layout" svg:width="25.406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9" draw:text-style-name="P7" draw:layer="layout" svg:width="25.724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10.297cm" svg:y="6.715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160" draw:text-style-name="P12" draw:layer="layout" svg:width="26.352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61" draw:text-style-name="P14" draw:layer="layout" svg:width="6.54cm" svg:height="1.153cm" svg:x="11.412cm" svg:y="8.3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usb_service.USBService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16" draw:layer="layout" svg:width="6.54cm" svg:height="1.075cm" svg:x="11.412cm" svg:y="9.464cm">
              <text:p text:style-name="P20"><text:span text:style-name="T4">- usb_observer: USBObserver</text:span></text:p>
              <text:p text:style-name="P20"><text:span text:style-name="T4">- usb_monitor: 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6" draw:layer="layout" svg:width="6.54cm" svg:height="2.569cm" svg:x="11.412cm" svg:y="10.5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init()</text:span></text:p>
              <text:p text:style-name="P15"><text:span text:style-name="T4">+ get_state()</text:span></text:p>
              <text:p text:style-name="P15"><text:span text:style-name="T4">+ close()</text:span></text:p>
              <text:p text:style-name="P15"><text:span text:style-name="T4">- usb_inserted()</text:span></text:p>
              <text:p text:style-name="P15"><text:span text:style-name="T4">- usb_removed()</text:span></text:p>
              <text:p text:style-name="P15"><text:span text:style-name="T4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4" draw:text-style-name="P17" draw:layer="layout" svg:x1="13.231cm" svg:y1="8.312cm" svg:x2="10.184cm" svg:y2="5.27cm" draw:start-shape="id34" draw:start-glue-point="5" draw:end-shape="id35" draw:end-glue-point="23" svg:d="M13231 8312v-1522h-3047v-1520" svg:viewBox="0 0 3048 3043">
          <text:p/>
        </draw:connector>
        <draw:custom-shape draw:style-name="gr132" draw:text-style-name="P18" draw:layer="layout" svg:width="26.352cm" svg:height="0.952cm" svg:x="1cm" svg:y="1.1cm">
          <text:p text:style-name="P6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65" draw:text-style-name="P14" draw:layer="layout" svg:width="5.448cm" svg:height="1.153cm" svg:x="2.172cm" svg:y="9.55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3"><text:span text:style-name="T3">&lt;&lt;singleton&gt;&gt;</text:span></text:p>
                <text:p text:style-name="P13"><text:span text:style-name="T3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6" draw:text-style-name="P16" draw:layer="layout" svg:width="5.448cm" svg:height="0.692cm" svg:x="2.172cm" svg:y="10.712cm">
                <text:p text:style-name="P20"><text:span text:style-name="T4">- obser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7" draw:text-style-name="P16" draw:layer="layout" svg:width="5.448cm" svg:height="0.993cm" svg:x="2.172cm" svg:y="11.40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5"><text:span text:style-name="T4">+ start()</text:span></text:p>
                <text:p text:style-name="P15"><text:span text:style-name="T4">+ stop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68" draw:text-style-name="P14" draw:layer="layout" svg:width="5.448cm" svg:height="1.153cm" svg:x="19.35cm" svg:y="9.5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&lt;&lt;singleton&gt;&gt;</text:span></text:p>
              <text:p text:style-name="P13"><text:span text:style-name="T3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6" draw:layer="layout" svg:width="5.448cm" svg:height="0.434cm" svg:x="19.35cm" svg:y="10.7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6" draw:layer="layout" svg:width="5.448cm" svg:height="0.993cm" svg:x="19.35cm" svg:y="11.15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- on_created()</text:span></text:p>
              <text:p text:style-name="P15"><text:span text:style-name="T4">- usb_delete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1" draw:text-style-name="P17" draw:layer="layout" svg:x1="23.285cm" svg:y1="12.152cm" svg:x2="25.099cm" svg:y2="14.302cm" draw:start-shape="id36" draw:start-glue-point="9" draw:end-shape="id37" draw:end-glue-point="14" svg:d="M23285 12152v1074h1814v1076" svg:viewBox="0 0 1815 2151">
          <text:p/>
        </draw:connector>
        <draw:g draw:style-name="gr1" xml:id="id37" draw:id="id3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72" draw:text-style-name="P14" draw:layer="layout" svg:width="6.718cm" svg:height="1.153cm" svg:x="20.247cm" svg:y="14.3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&lt;&lt;BaseClass&gt;&gt;</text:span></text:p>
              <text:p text:style-name="P13"><text:span text:style-name="T3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6" draw:layer="layout" svg:width="6.718cm" svg:height="0.366cm" svg:x="20.247cm" svg:y="15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6" draw:layer="layout" svg:width="6.718cm" svg:height="0.599cm" svg:x="20.247cm" svg:y="15.8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handle_event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5" draw:text-style-name="P17" draw:layer="layout" svg:x1="23.285cm" svg:y1="9.573cm" svg:x2="17.951cm" svg:y2="8.947cm" draw:start-shape="id36" draw:start-glue-point="14" draw:end-shape="id34" draw:end-glue-point="13" svg:d="M23285 9573v-626h-5334" svg:viewBox="0 0 5335 627">
          <text:p/>
        </draw:connector>
        <draw:connector draw:style-name="gr176" draw:text-style-name="P17" draw:layer="layout" svg:x1="6.107cm" svg:y1="9.56cm" svg:x2="11.413cm" svg:y2="8.947cm" draw:start-shape="id38" draw:start-glue-point="14" draw:end-shape="id34" draw:end-glue-point="6" svg:d="M6107 9560v-613h5306" svg:viewBox="0 0 5307 614">
          <text:p/>
        </draw:connector>
        <draw:g draw:style-name="gr1" xml:id="id39" draw:id="id3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77" draw:text-style-name="P30" draw:layer="layout" svg:width="6.35cm" svg:height="1.153cm" svg:x="1.87cm" svg:y="14.0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8"><text:span text:style-name="T3">&lt;&lt;Library&gt;&gt;</text:span></text:p>
              <text:p text:style-name="P37"><text:span text:style-name="T3">watchdog.observers.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16" draw:layer="layout" svg:width="6.35cm" svg:height="0.599cm" svg:x="1.87cm" svg:y="15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16" draw:layer="layout" svg:width="6.35cm" svg:height="0.599cm" svg:x="1.87cm" svg:y="15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schedul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80" draw:text-style-name="P17" draw:layer="layout" svg:x1="6.456cm" svg:y1="14.012cm" svg:x2="3.687cm" svg:y2="12.397cm" draw:start-shape="id39" draw:start-glue-point="14" draw:end-shape="id38" draw:end-glue-point="8" svg:d="M6456 14012v-808h-2769v-807" svg:viewBox="0 0 2770 1616">
          <text:p/>
        </draw:connector>
        <draw:frame draw:style-name="gr15" draw:text-style-name="P19" draw:layer="layout" svg:width="3.085cm" svg:height="0.725cm" svg:x="4.265cm" svg:y="12.43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frame draw:style-name="gr15" draw:text-style-name="P19" draw:layer="layout" svg:width="2.223cm" svg:height="0.725cm" svg:x="22.907cm" svg:y="13.382cm">
          <draw:text-box>
            <text:p><text:span text:style-name="T5">&lt;&lt;is a&gt;&gt;</text:span></text:p>
          </draw:text-box>
        </draw:frame>
        <draw:frame draw:style-name="gr15" draw:text-style-name="P19" draw:layer="layout" svg:width="3.81cm" svg:height="0.725cm" svg:x="20.05cm" svg:y="7.895cm">
          <draw:text-box>
            <text:p><text:span text:style-name="T5">&lt;&lt;consists </text:span><text:span text:style-name="T5">of&gt;&gt;</text:span></text:p>
          </draw:text-box>
        </draw:frame>
        <draw:frame draw:style-name="gr15" draw:text-style-name="P19" draw:layer="layout" svg:width="3.81cm" svg:height="0.725cm" svg:x="6.397cm" svg:y="7.667cm">
          <draw:text-box>
            <text:p><text:span text:style-name="T5">&lt;&lt;consists </text:span><text:span text:style-name="T5">of&gt;&gt;</text:span></text:p>
          </draw:text-box>
        </draw:frame>
      </draw:page>
      <draw:page draw:name="Volume" draw:style-name="dp1" draw:master-page-name="Default">
        <draw:custom-shape draw:style-name="gr181" draw:text-style-name="P7" draw:layer="layout" svg:width="20.198cm" svg:height="0.7cm" svg:x="1.439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7" draw:layer="layout" svg:width="20.085cm" svg:height="0.7cm" svg:x="1.552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1" draw:id="id4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83" draw:text-style-name="P9" draw:layer="layout" svg:width="20.088cm" svg:height="1.153cm" svg:x="1.54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1" draw:layer="layout" svg:width="20.088cm" svg:height="0.679cm" svg:x="1.54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5" draw:text-style-name="P7" draw:layer="layout" svg:width="20.326cm" svg:height="0.7cm" svg:x="1.311cm" svg:y="15.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2.995cm" svg:y="6.94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186" draw:text-style-name="P12" draw:layer="layout" svg:width="20.955cm" svg:height="15.14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87" draw:text-style-name="P14" draw:layer="layout" svg:width="6.686cm" svg:height="1.153cm" svg:x="3.956cm" svg:y="8.1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volume_control.VolumeControl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16" draw:layer="layout" svg:width="6.686cm" svg:height="1.047cm" svg:x="3.956cm" svg:y="9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9" draw:layer="layout" svg:width="6.686cm" svg:height="1.387cm" svg:x="3.956cm" svg:y="10.3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8"><text:span text:style-name="T8">+ set_notify()</text:span></text:p>
              <text:p text:style-name="P38"><text:span text:style-name="T8">+ start()</text:span></text:p>
              <text:p text:style-name="P38"><text:span text:style-name="T8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0" draw:text-style-name="P17" draw:layer="layout" svg:x1="5.815cm" svg:y1="8.123cm" svg:x2="5.567cm" svg:y2="5.27cm" draw:start-shape="id40" draw:start-glue-point="5" draw:end-shape="id41" draw:end-glue-point="4" svg:d="M5815 8123v-1428h-248v-1425" svg:viewBox="0 0 249 2854">
          <text:p/>
        </draw:connector>
        <draw:custom-shape draw:style-name="gr191" draw:text-style-name="P18" draw:layer="layout" svg:width="20.955cm" svg:height="0.952cm" svg:x="1cm" svg:y="1.1cm">
          <text:p text:style-name="P6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92" draw:text-style-name="P14" draw:layer="layout" svg:width="8.572cm" svg:height="1.153cm" svg:x="13.065cm" svg:y="9.99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i2c_service.I2CService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6" draw:layer="layout" svg:width="8.572cm" svg:height="0.761cm" svg:x="13.065cm" svg:y="11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6" draw:layer="layout" svg:width="8.572cm" svg:height="1.781cm" svg:x="13.065cm" svg:y="11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read_byte(device: int, register: int)</text:span></text:p>
              <text:p text:style-name="P15"><text:span text:style-name="T4">+ write_byte(device: int, register: int)</text:span></text:p>
              <text:p text:style-name="P15"><text:span text:style-name="T9">+ </text:span><text:span text:style-name="T10">read_block</text:span><text:span text:style-name="T9">(device: int, register: int, length: int)</text:span></text:p>
              <text:p text:style-name="P15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5" draw:text-style-name="P17" draw:layer="layout" svg:x1="19.256cm" svg:y1="9.993cm" svg:x2="10.641cm" svg:y2="8.758cm" draw:start-shape="id42" draw:start-glue-point="14" draw:end-shape="id40" draw:end-glue-point="13" svg:d="M19256 9993v-1235h-8615" svg:viewBox="0 0 8616 1236">
          <text:p/>
        </draw:connector>
        <draw:frame draw:style-name="gr15" draw:text-style-name="P19" draw:layer="layout" svg:width="2.512cm" svg:height="0.725cm" svg:x="15.287cm" svg:y="8.937cm">
          <draw:text-box>
            <text:p><text:span text:style-name="T5">&lt;</text:span><text:span text:style-name="T5">&lt;</text:span><text:span text:style-name="T5">h</text:span><text:span text:style-name="T5">a</text:span><text:span text:style-name="T5">s</text:span><text:span text:style-name="T5">&gt;</text:span><text:span text:style-name="T5">&gt;</text:span></text:p>
          </draw:text-box>
        </draw:frame>
        <draw:frame draw:style-name="gr196" draw:text-style-name="P40" draw:layer="layout" svg:width="7.937cm" svg:height="1.673cm" svg:x="6.397cm" svg:y="6.397cm">
          <draw:text-box>
            <text:p><text:span text:style-name="T11">W</text:span><text:span text:style-name="T11">a</text:span><text:span text:style-name="T11">a</text:span><text:span text:style-name="T11">r</text:span><text:span text:style-name="T11">o</text:span><text:span text:style-name="T11">m</text:span><text:span text:style-name="T11"> </text:span><text:span text:style-name="T11">s</text:span><text:span text:style-name="T11">t</text:span><text:span text:style-name="T11">a</text:span><text:span text:style-name="T11">r</text:span><text:span text:style-name="T11">t</text:span><text:span text:style-name="T11">(</text:span><text:span text:style-name="T11">)</text:span><text:span text:style-name="T11">,</text:span><text:span text:style-name="T11"> </text:span><text:span text:style-name="T11">s</text:span><text:span text:style-name="T11">t</text:span><text:span text:style-name="T11">o</text:span><text:span text:style-name="T11">p</text:span><text:span text:style-name="T11">(</text:span><text:span text:style-name="T11">)</text:span><text:span text:style-name="T11">,</text:span><text:span text:style-name="T11"> </text:span><text:span text:style-name="T11">s</text:span><text:span text:style-name="T11">e</text:span><text:span text:style-name="T11">t</text:span><text:span text:style-name="T11">_</text:span><text:span text:style-name="T11">n</text:span><text:span text:style-name="T11">o</text:span><text:span text:style-name="T11">t</text:span><text:span text:style-name="T11">i</text:span><text:span text:style-name="T11">f</text:span><text:span text:style-name="T11">y</text:span><text:span text:style-name="T11">(</text:span><text:span text:style-name="T11">)</text:span><text:span text:style-name="T11">.</text:span><text:span text:style-name="T11"> </text:span><text:span text:style-name="T11">S</text:span><text:span text:style-name="T11">t</text:span><text:span text:style-name="T11">a</text:span><text:span text:style-name="T11">a</text:span><text:span text:style-name="T11">t</text:span><text:span text:style-name="T11"> </text:span><text:span text:style-name="T11">a</text:span><text:span text:style-name="T11">l</text:span><text:span text:style-name="T11">t</text:span><text:span text:style-name="T11">i</text:span><text:span text:style-name="T11">j</text:span><text:span text:style-name="T11">d</text:span><text:span text:style-name="T11"> </text:span><text:span text:style-name="T11">o</text:span><text:span text:style-name="T11">p</text:span><text:span text:style-name="T11"> </text:span><text:span text:style-name="T11">n</text:span><text:span text:style-name="T11">o</text:span><text:span text:style-name="T11">t</text:span><text:span text:style-name="T11">i</text:span><text:span text:style-name="T11">f</text:span><text:span text:style-name="T11">y</text:span><text:span text:style-name="T11">.</text:span><text:span text:style-name="T11"> </text:span><text:span text:style-name="T11">D</text:span><text:span text:style-name="T11">u</text:span><text:span text:style-name="T11">s</text:span><text:span text:style-name="T11"> </text:span><text:span text:style-name="T11">n</text:span><text:span text:style-name="T11">o</text:span><text:span text:style-name="T11">t</text:span><text:span text:style-name="T11">i</text:span><text:span text:style-name="T11">f</text:span><text:span text:style-name="T11">y</text:span><text:span text:style-name="T11"> </text:span><text:span text:style-name="T11">d</text:span><text:span text:style-name="T11">e</text:span><text:span text:style-name="T11">f</text:span><text:span text:style-name="T11">a</text:span><text:span text:style-name="T11">u</text:span><text:span text:style-name="T11">l</text:span><text:span text:style-name="T11">t</text:span><text:span text:style-name="T11"> </text:span><text:span text:style-name="T11">a</text:span><text:span text:style-name="T11">a</text:span><text:span text:style-name="T11">n</text:span><text:span text:style-name="T11">.</text:span><text:span text:style-name="T11"> </text:span><text:span text:style-name="T11">G</text:span><text:span text:style-name="T11">a</text:span><text:span text:style-name="T11">a</text:span><text:span text:style-name="T11">t</text:span><text:span text:style-name="T11"> </text:span><text:span text:style-name="T11">n</text:span><text:span text:style-name="T11">o</text:span><text:span text:style-name="T11">o</text:span><text:span text:style-name="T11">i</text:span><text:span text:style-name="T11">t</text:span><text:span text:style-name="T11"> </text:span><text:span text:style-name="T11">g</text:span><text:span text:style-name="T11">e</text:span><text:span text:style-name="T11">s</text:span><text:span text:style-name="T11">t</text:span><text:span text:style-name="T11">o</text:span><text:span text:style-name="T11">p</text:span><text:span text:style-name="T11">t</text:span><text:span text:style-name="T11"> </text:span><text:span text:style-name="T11">w</text:span><text:span text:style-name="T11">o</text:span><text:span text:style-name="T11">r</text:span><text:span text:style-name="T11">d</text:span><text:span text:style-name="T11">e</text:span><text:span text:style-name="T11">n</text:span></text:p>
          </draw:text-box>
        </draw:frame>
      </draw:page>
      <draw:page draw:name="Error" draw:style-name="dp1" draw:master-page-name="Default">
        <draw:custom-shape draw:style-name="gr197" draw:text-style-name="P7" draw:layer="layout" svg:width="19.565cm" svg:height="0.7cm" svg:x="1.43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7" draw:layer="layout" svg:width="19.218cm" svg:height="0.7cm" svg:x="1.549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4" draw:id="id44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99" draw:text-style-name="P9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11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1" draw:text-style-name="P7" draw:layer="layout" svg:width="19.456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217cm" svg:y="6.94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202" draw:text-style-name="P12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03" draw:text-style-name="P14" draw:layer="layout" svg:width="6.229cm" svg:height="1.153cm" svg:x="1.756cm" svg:y="8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error_service.py.ErrorService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6" draw:layer="layout" svg:width="6.229cm" svg:height="0.746cm" svg:x="1.756cm" svg:y="9.764cm">
              <text:p text:style-name="P15"><text:span text:style-name="T4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6" draw:layer="layout" svg:width="6.229cm" svg:height="0.993cm" svg:x="1.756cm" svg:y="10.5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- init()</text:span></text:p>
              <text:p text:style-name="P15"><text:span text:style-name="T4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06" draw:text-style-name="P17" draw:layer="layout" svg:x1="3.488cm" svg:y1="8.612cm" svg:x2="5.403cm" svg:y2="5.27cm" draw:start-shape="id43" draw:start-glue-point="5" draw:end-shape="id44" draw:end-glue-point="4" svg:d="M3488 8612v-1672h1915v-1670" svg:viewBox="0 0 1916 3343">
          <text:p/>
        </draw:connector>
        <draw:custom-shape draw:style-name="gr207" draw:text-style-name="P18" draw:layer="layout" svg:width="20.637cm" svg:height="0.952cm" svg:x="1cm" svg:y="1.1cm">
          <text:p text:style-name="P6">Static view: Erro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5" draw:id="id45">
          <draw:glue-point draw:id="4" svg:x="-4cm" svg:y="-5cm"/>
          <draw:custom-shape draw:style-name="gr208" draw:text-style-name="P24" draw:layer="layout" svg:width="5.715cm" svg:height="1.153cm" svg:x="7.032cm" svg:y="13.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16" draw:layer="layout" svg:width="5.715cm" svg:height="0.771cm" svg:x="7.032cm" svg:y="14.853cm">
            <text:p text:style-name="P15"><text:span text:style-name="T4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16" draw:layer="layout" svg:width="5.715cm" svg:height="0.599cm" svg:x="7.032cm" svg:y="15.5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1" draw:text-style-name="P17" draw:layer="layout" svg:x1="9.889cm" svg:y1="13.7cm" svg:x2="11.881cm" svg:y2="11.292cm" draw:start-shape="id45" draw:end-shape="id46" draw:end-glue-point="5" svg:d="M9889 13700v-1204h1992v-1204" svg:viewBox="0 0 1993 2409">
          <text:p/>
        </draw:connector>
        <draw:frame draw:style-name="gr15" draw:text-style-name="P19" draw:layer="layout" svg:width="3.085cm" svg:height="0.725cm" svg:x="7.032cm" svg:y="12.657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g draw:style-name="gr1" xml:id="id46" draw:id="id4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12" draw:text-style-name="P24" draw:layer="layout" svg:width="6.163cm" svg:height="1.153cm" svg:x="10.712cm" svg:y="8.5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6" draw:layer="layout" svg:width="6.163cm" svg:height="0.517cm" svg:x="10.712cm" svg:y="9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16" draw:layer="layout" svg:width="6.163cm" svg:height="1.18cm" svg:x="10.712cm" svg:y="10.1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5" draw:text-style-name="P17" draw:layer="layout" svg:x1="10.712cm" svg:y1="9.905cm" svg:x2="7.984cm" svg:y2="9.247cm" draw:start-shape="id46" draw:end-shape="id43" draw:end-glue-point="13" svg:d="M10712 9905h-1364v-658h-1364" svg:viewBox="0 0 2729 659">
          <text:p/>
        </draw:connector>
      </draw:page>
      <draw:page draw:name="Messaging" draw:style-name="dp1" draw:master-page-name="Default">
        <draw:custom-shape draw:style-name="gr216" draw:text-style-name="P7" draw:layer="layout" svg:width="26.821cm" svg:height="0.7cm" svg:x="1.484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7" draw:layer="layout" svg:width="26.346cm" svg:height="0.7cm" svg:x="1.637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8" draw:id="id4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18" draw:text-style-name="P9" draw:layer="layout" svg:width="26.435cm" svg:height="1.153cm" svg:x="1.633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11" draw:layer="layout" svg:width="26.435cm" svg:height="0.679cm" svg:x="1.633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0" draw:text-style-name="P7" draw:layer="layout" svg:width="26.672cm" svg:height="0.7cm" svg:x="1.311cm" svg:y="18.5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217cm" svg:y="6.94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221" draw:text-style-name="P12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7" draw:id="id4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22" draw:text-style-name="P14" draw:layer="layout" svg:width="9.721cm" svg:height="1.153cm" svg:x="1.756cm" svg:y="7.7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messaging</text:span></text:p>
              <text:p text:style-name="P13"><text:span text:style-name="T3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6" draw:layer="layout" svg:width="9.721cm" svg:height="0.985cm" svg:x="1.756cm" svg:y="8.94cm">
              <text:p text:style-name="P15"><text:span text:style-name="T4">- CommandMessage()</text:span></text:p>
              <text:p text:style-name="P15"><text:span text:style-name="T4">- Error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4" draw:text-style-name="P16" draw:layer="layout" svg:width="9.721cm" svg:height="2.963cm" svg:x="1.756cm" svg:y="9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subscribe_commands() -&gt; Queue</text:span></text:p>
              <text:p text:style-name="P15"><text:span text:style-name="T4">+ subscribe_errors() -&gt; Queue</text:span></text:p>
              <text:p text:style-name="P15"><text:span text:style-name="T4">+ unsubscribe_commands(queue: Queue)</text:span></text:p>
              <text:p text:style-name="P15"><text:span text:style-name="T4">+ unsubscribe_errors(queue: Queue)</text:span></text:p>
              <text:p text:style-name="P15"><text:span text:style-name="T4">+ publish_command(message: CommandMessage)</text:span></text:p>
              <text:p text:style-name="P15"><text:span text:style-name="T4">+ publish_error(message: ErrorMessage)</text:span></text:p>
              <text:p text:style-name="P15"><text:span text:style-name="T4">+ safe_get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25" draw:text-style-name="P17" draw:layer="layout" svg:x1="4.458cm" svg:y1="7.789cm" svg:x2="6.92cm" svg:y2="5.27cm" draw:start-shape="id47" draw:start-glue-point="5" draw:end-shape="id48" draw:end-glue-point="4" svg:d="M4458 7789v-1261h2462v-1258" svg:viewBox="0 0 2463 2520">
          <text:p/>
        </draw:connector>
        <draw:custom-shape draw:style-name="gr226" draw:text-style-name="P18" draw:layer="layout" svg:width="27.7cm" svg:height="0.952cm" svg:x="1cm" svg:y="1.1cm">
          <text:p text:style-name="P6">Static view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27" draw:text-style-name="P14" draw:layer="layout" svg:width="6.667cm" svg:height="1.153cm" svg:x="18.068cm" svg:y="14.5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messaging.CommandMessage</text:span></text:p>
              <text:p text:style-name="P13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16" draw:layer="layout" svg:width="6.667cm" svg:height="1.454cm" svg:x="18.068cm" svg:y="15.657cm">
              <text:p text:style-name="P15"><text:span text:style-name="T4">+ source: String</text:span></text:p>
              <text:p text:style-name="P15"><text:span text:style-name="T4">+ message: String</text:span></text:p>
              <text:p text:style-name="P15"><text:span text:style-name="T4">+ data: Any</text:span></text:p>
              <text:p text:style-name="P1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9" draw:text-style-name="P16" draw:layer="layout" svg:width="6.667cm" svg:height="0.599cm" svg:x="18.068cm" svg:y="17.1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1" draw:id="id5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30" draw:text-style-name="P14" draw:layer="layout" svg:width="6.667cm" svg:height="1.153cm" svg:x="10.208cm" svg:y="14.65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messaging.ErrorMessage</text:span></text:p>
              <text:p text:style-name="P13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6" draw:layer="layout" svg:width="6.667cm" svg:height="0.994cm" svg:x="10.208cm" svg:y="15.805cm">
              <text:p text:style-name="P15"><text:span text:style-name="T4">+ source: String</text:span></text:p>
              <text:p text:style-name="P15"><text:span text:style-name="T4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2" draw:text-style-name="P16" draw:layer="layout" svg:width="6.667cm" svg:height="0.599cm" svg:x="10.208cm" svg:y="16.7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49" draw:id="id4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33" draw:text-style-name="P14" draw:layer="layout" svg:width="11.43cm" svg:height="1.153cm" svg:x="15.922cm" svg:y="7.7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messaging.PubSubManager</text:span></text:p>
              <text:p text:style-name="P13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6" draw:layer="layout" svg:width="11.43cm" svg:height="0.908cm" svg:x="15.922cm" svg:y="8.865cm">
              <text:p text:style-name="P15"><text:span text:style-name="T4">- Topic.COMMAND: []</text:span></text:p>
              <text:p text:style-name="P15"><text:span text:style-name="T4">- Topic.ERROR: [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16" draw:layer="layout" svg:width="11.43cm" svg:height="1.387cm" svg:x="15.922cm" svg:y="9.77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subscribe(topic: Topic) -&gt; Queue</text:span></text:p>
              <text:p text:style-name="P15"><text:span text:style-name="T4">+ unsubscripe(topic: Topic, queue:Queu)</text:span></text:p>
              <text:p text:style-name="P15"><text:span text:style-name="T4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0" draw:id="id5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36" draw:text-style-name="P14" draw:layer="layout" svg:width="6.667cm" svg:height="1.153cm" svg:x="1.952cm" svg:y="14.76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messaging.Topic</text:span></text:p>
              <text:p text:style-name="P13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6" draw:layer="layout" svg:width="6.667cm" svg:height="0.994cm" svg:x="1.952cm" svg:y="15.917cm">
              <text:p text:style-name="P15"><text:span text:style-name="T4">+ COMMAND = "COMMAND"</text:span></text:p>
              <text:p text:style-name="P15"><text:span text:style-name="T4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6" draw:layer="layout" svg:width="6.667cm" svg:height="0.599cm" svg:x="1.952cm" svg:y="16.9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39" draw:text-style-name="P17" draw:layer="layout" svg:x1="15.923cm" svg:y1="10.616cm" svg:x2="11.476cm" svg:y2="8.423cm" draw:start-shape="id49" draw:start-glue-point="11" draw:end-shape="id47" draw:end-glue-point="13" svg:d="M15923 10616h-2224v-2193h-2223" svg:viewBox="0 0 4448 2194">
          <text:p/>
        </draw:connector>
        <draw:frame draw:style-name="gr15" draw:text-style-name="P19" draw:layer="layout" svg:width="2.54cm" svg:height="0.725cm" svg:x="12.112cm" svg:y="7.667cm">
          <draw:text-box>
            <text:p><text:span text:style-name="T5">&lt;</text:span><text:span text:style-name="T5">&lt;</text:span><text:span text:style-name="T5">h</text:span><text:span text:style-name="T5">a</text:span><text:span text:style-name="T5">s</text:span><text:span text:style-name="T5">&gt;</text:span><text:span text:style-name="T5">&gt;</text:span></text:p>
          </draw:text-box>
        </draw:frame>
        <draw:connector draw:style-name="gr240" draw:text-style-name="P17" draw:layer="layout" svg:x1="3.805cm" svg:y1="14.765cm" svg:x2="4.458cm" svg:y2="12.817cm" draw:start-shape="id50" draw:start-glue-point="5" draw:end-shape="id47" draw:end-glue-point="8" svg:d="M3805 14765v-975h653v-973" svg:viewBox="0 0 654 1949">
          <text:p/>
        </draw:connector>
        <draw:connector draw:style-name="gr241" draw:text-style-name="P17" draw:layer="layout" svg:x1="12.061cm" svg:y1="14.653cm" svg:x2="8.776cm" svg:y2="12.817cm" draw:start-shape="id51" draw:start-glue-point="5" draw:end-shape="id47" draw:end-glue-point="9" svg:d="M12061 14653v-919h-3285v-917" svg:viewBox="0 0 3286 1837">
          <text:p/>
        </draw:connector>
        <draw:connector draw:style-name="gr242" draw:text-style-name="P17" draw:layer="layout" svg:x1="19.921cm" svg:y1="14.505cm" svg:x2="11.476cm" svg:y2="12.273cm" draw:start-shape="id52" draw:start-glue-point="5" draw:end-shape="id47" draw:end-glue-point="12" svg:d="M19921 14505v-2232h-8445" svg:viewBox="0 0 8446 2233">
          <text:p/>
        </draw:connector>
        <draw:frame draw:style-name="gr15" draw:text-style-name="P19" draw:layer="layout" svg:width="2.54cm" svg:height="0.725cm" svg:x="5.762cm" svg:y="13.29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</draw:page>
      <draw:page draw:name="Power Supply" draw:style-name="dp1" draw:master-page-name="Default">
        <draw:custom-shape draw:style-name="gr197" draw:text-style-name="P7" draw:layer="layout" svg:width="19.565cm" svg:height="0.7cm" svg:x="1.43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7" draw:layer="layout" svg:width="19.218cm" svg:height="0.7cm" svg:x="1.549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4" draw:id="id54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43" draw:text-style-name="P9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11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1" draw:text-style-name="P7" draw:layer="layout" svg:width="19.456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3.085cm" svg:height="0.725cm" svg:x="5.217cm" svg:y="6.942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202" draw:text-style-name="P12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45" draw:text-style-name="P14" draw:layer="layout" svg:width="8.991cm" svg:height="1.153cm" svg:x="1.756cm" svg:y="7.9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power_supply_control.PowerSupplyService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6" draw:layer="layout" svg:width="8.991cm" svg:height="0.604cm" svg:x="1.756cm" svg:y="9.1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6" draw:layer="layout" svg:width="8.991cm" svg:height="1.781cm" svg:x="1.756cm" svg:y="9.7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set_nom_voltage()</text:span></text:p>
              <text:p text:style-name="P15"><text:span text:style-name="T4">+ set_max_voltage()</text:span></text:p>
              <text:p text:style-name="P15"><text:span text:style-name="T4">+ set_standby_voltage()</text:span></text:p>
              <text:p text:style-name="P15"><text:span text:style-name="T4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48" draw:text-style-name="P17" draw:layer="layout" svg:x1="4.255cm" svg:y1="7.989cm" svg:x2="5.403cm" svg:y2="5.27cm" draw:start-shape="id53" draw:start-glue-point="5" draw:end-shape="id54" draw:end-glue-point="4" svg:d="M4255 7989v-1361h1148v-1358" svg:viewBox="0 0 1149 2720">
          <text:p/>
        </draw:connector>
        <draw:custom-shape draw:style-name="gr207" draw:text-style-name="P18" draw:layer="layout" svg:width="20.637cm" svg:height="0.952cm" svg:x="1cm" svg:y="1.1cm">
          <text:p text:style-name="P6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49" draw:text-style-name="P14" draw:layer="layout" svg:width="8.572cm" svg:height="1.153cm" svg:x="9.977cm" svg:y="12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&lt;&lt;singleton&gt;&gt;</text:span></text:p>
              <text:p text:style-name="P13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16" draw:layer="layout" svg:width="8.572cm" svg:height="0.761cm" svg:x="9.977cm" svg:y="13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16" draw:layer="layout" svg:width="8.572cm" svg:height="1.781cm" svg:x="9.977cm" svg:y="14.6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read_byte(device: int, register: int)</text:span></text:p>
              <text:p text:style-name="P15"><text:span text:style-name="T4">+ write_byte(device: int, register: int)</text:span></text:p>
              <text:p text:style-name="P15"><text:span text:style-name="T9">+ </text:span><text:span text:style-name="T10">read_block</text:span><text:span text:style-name="T9">(device: int, register: int, length: int)</text:span></text:p>
              <text:p text:style-name="P15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52" draw:text-style-name="P17" draw:layer="layout" svg:x1="12.361cm" svg:y1="12.728cm" svg:x2="10.747cm" svg:y2="9.757cm" draw:start-shape="id55" draw:start-glue-point="5" draw:end-shape="id53" draw:end-glue-point="1" svg:d="M12361 12728v-2971h-1614" svg:viewBox="0 0 1615 2972">
          <text:p/>
        </draw:connector>
        <draw:frame draw:style-name="gr15" draw:text-style-name="P19" draw:layer="layout" svg:width="2.512cm" svg:height="0.725cm" svg:x="12.747cm" svg:y="11.16cm">
          <draw:text-box>
            <text:p><text:span text:style-name="T5">&lt;</text:span><text:span text:style-name="T5">&lt;</text:span><text:span text:style-name="T5">h</text:span><text:span text:style-name="T5">a</text:span><text:span text:style-name="T5">s</text:span><text:span text:style-name="T5">&gt;</text:span><text:span text:style-name="T5">&gt;</text:span></text:p>
          </draw:text-box>
        </draw:frame>
      </draw:page>
      <draw:page draw:name="Frontpanel service" draw:style-name="dp1" draw:master-page-name="Default">
        <draw:custom-shape draw:style-name="gr253" draw:text-style-name="P7" draw:layer="layout" svg:width="27.047cm" svg:height="0.7cm" svg:x="1.258cm" svg:y="2.5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7" draw:layer="layout" svg:width="26.989cm" svg:height="0.7cm" svg:x="1.316cm" svg:y="5.8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6" draw:id="id56">
          <draw:glue-point draw:id="4" svg:x="-0.787cm" svg:y="5.055cm"/>
          <draw:glue-point draw:id="5" svg:x="-5.063cm" svg:y="-3.065cm"/>
          <draw:custom-shape draw:style-name="gr255" draw:text-style-name="P14" draw:layer="layout" svg:width="4.363cm" svg:height="1.627cm" svg:x="4.917cm" svg:y="7.2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3">led_control.</text:span></text:p>
            <text:p text:style-name="P13"><text:span text:style-name="T3">LEDControl</text:span></text:p>
            <text:p text:style-name="P13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16" draw:layer="layout" svg:width="4.363cm" svg:height="0.671cm" svg:x="4.917cm" svg:y="8.912cm">
            <text:p text:style-name="P15"><text:span text:style-name="T4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16" draw:layer="layout" svg:width="4.363cm" svg:height="2.963cm" svg:x="4.917cm" svg:y="9.5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turn_on_led()</text:span></text:p>
            <text:p text:style-name="P15"><text:span text:style-name="T4">+ turn_off_led()</text:span></text:p>
            <text:p text:style-name="P15"><text:span text:style-name="T4">+ turn_off_all_leds()</text:span></text:p>
            <text:p text:style-name="P15"><text:span text:style-name="T4">+ turn_off_all_leds()</text:span></text:p>
            <text:p text:style-name="P15"><text:span text:style-name="T4">+ get_led_state()l</text:span></text:p>
            <text:p text:style-name="P15"><text:span text:style-name="T4">+ oneshot_on_led()</text:span></text:p>
            <text:p text:style-name="P15"><text:span text:style-name="T4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7" draw:id="id5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258" draw:text-style-name="P9" draw:layer="layout" svg:width="26.896cm" svg:height="1.153cm" svg:x="1.409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9" draw:text-style-name="P11" draw:layer="layout" svg:width="26.896cm" svg:height="0.679cm" svg:x="1.409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0" draw:text-style-name="P42" draw:layer="layout" svg:width="27.204cm" svg:height="0.7cm" svg:x="1.101cm" svg:y="16.147cm">
          <text:p text:style-name="P4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1" draw:text-style-name="P17" draw:layer="layout" draw:line-skew="0.338cm" svg:x1="7.098cm" svg:y1="7.285cm" svg:x2="4.758cm" svg:y2="5.47cm" draw:start-shape="id56" draw:end-shape="id57" draw:end-glue-point="16" svg:d="M7098 7285v-570h-2340v-1245" svg:viewBox="0 0 2341 1816">
          <text:p/>
        </draw:connector>
        <draw:custom-shape draw:style-name="gr262" draw:text-style-name="P12" draw:layer="layout" svg:width="27.7cm" svg:height="17.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63" draw:text-style-name="P14" draw:layer="layout" svg:width="3.81cm" svg:height="1.627cm" svg:x="9.885cm" svg:y="7.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touch_buttons.</text:span></text:p>
              <text:p text:style-name="P13"><text:span text:style-name="T3">TouchButtons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16" draw:layer="layout" svg:width="3.81cm" svg:height="0.754cm" svg:x="9.885cm" svg:y="8.987cm">
              <text:p text:style-name="P15"><text:span text:style-name="T4">- stop_evt: Event()</text:span></text:p>
              <text:p text:style-name="P1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5" draw:text-style-name="P16" draw:layer="layout" svg:width="3.81cm" svg:height="0.599cm" svg:x="9.885cm" svg:y="9.7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1">
            <draw:custom-shape draw:style-name="gr266" draw:text-style-name="P14" draw:layer="layout" svg:width="5.465cm" svg:height="1.627cm" svg:x="14.55cm" svg:y="7.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backlighting.</text:span></text:p>
              <text:p text:style-name="P13"><text:span text:style-name="T3">BackLighting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16" draw:layer="layout" svg:width="5.465cm" svg:height="1.06cm" svg:x="14.55cm" svg:y="9.047cm">
              <text:p text:style-name="P15"><text:span text:style-name="T4">- thread: backlighting_manager</text:span></text:p>
              <text:p text:style-name="P15"><text:span text:style-name="T4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8" draw:text-style-name="P16" draw:layer="layout" svg:width="5.465cm" svg:height="0.635cm" svg:x="14.55cm" svg:y="10.1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9" draw:text-style-name="P17" draw:layer="layout" draw:line-skew="0.405cm" svg:x1="10.945cm" svg:y1="7.361cm" svg:x2="10.473cm" svg:y2="5.47cm" draw:start-shape="id58" draw:start-glue-point="5" draw:end-shape="id57" draw:end-glue-point="18" svg:d="M10945 7361v-542h-472v-1349" svg:viewBox="0 0 473 1892">
          <text:p/>
        </draw:connector>
        <draw:connector draw:style-name="gr270" draw:text-style-name="P17" draw:layer="layout" svg:x1="19.711cm" svg:y1="7.421cm" svg:x2="18.869cm" svg:y2="5.47cm" draw:start-shape="id59" draw:start-glue-point="15" draw:end-shape="id57" draw:end-glue-point="25" svg:d="M19711 7421v-977h-842v-974" svg:viewBox="0 0 843 1952">
          <text:p/>
        </draw:connector>
        <draw:frame draw:style-name="gr15" draw:text-style-name="P19" draw:layer="layout" svg:width="2.512cm" svg:height="0.725cm" svg:x="3.515cm" svg:y="6.625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custom-shape draw:style-name="gr271" draw:text-style-name="P18" draw:layer="layout" svg:width="27.7cm" svg:height="1.27cm" svg:x="1cm" svg:y="1cm">
          <text:p text:style-name="P6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72" draw:text-style-name="P14" draw:layer="layout" svg:width="8.255cm" svg:height="1.153cm" svg:x="19.615cm" svg:y="12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&lt;&lt;singleton&gt;&gt;</text:span></text:p>
              <text:p text:style-name="P13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3" draw:text-style-name="P16" draw:layer="layout" svg:width="8.255cm" svg:height="0.578cm" svg:x="19.615cm" svg:y="13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4" draw:text-style-name="P16" draw:layer="layout" svg:width="8.255cm" svg:height="1.781cm" svg:x="19.615cm" svg:y="13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read_byte(device: int, register: int)</text:span></text:p>
              <text:p text:style-name="P15"><text:span text:style-name="T4">+ write_byte(device: int, register: int)</text:span></text:p>
              <text:p text:style-name="P15"><text:span text:style-name="T9">+ </text:span><text:span text:style-name="T10">read_block</text:span><text:span text:style-name="T9">(device: int, register: int, length: int)</text:span></text:p>
              <text:p text:style-name="P15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75" draw:text-style-name="P14" draw:layer="layout" svg:width="5.397cm" svg:height="1.153cm" svg:x="12.802cm" svg:y="17.1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light_sensor</text:span></text:p>
              <text:p text:style-name="P13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6" draw:text-style-name="P16" draw:layer="layout" svg:width="5.397cm" svg:height="0.56cm" svg:x="12.802cm" svg:y="18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7" draw:text-style-name="P16" draw:layer="layout" svg:width="5.397cm" svg:height="0.591cm" svg:x="12.802cm" svg:y="18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78" draw:text-style-name="P14" draw:layer="layout" svg:width="5.397cm" svg:height="1.153cm" svg:x="18.69cm" svg:y="17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backlight_dac</text:span></text:p>
              <text:p text:style-name="P13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9" draw:text-style-name="P16" draw:layer="layout" svg:width="5.397cm" svg:height="0.632cm" svg:x="18.69cm" svg:y="18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0" draw:text-style-name="P16" draw:layer="layout" svg:width="5.397cm" svg:height="0.667cm" svg:x="18.69cm" svg:y="18.8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1" draw:text-style-name="P24" draw:layer="layout" svg:width="3.175cm" svg:height="1.627cm" svg:x="5.127cm" svg:y="13.5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singleton&gt;&gt;</text:span></text:p>
            <text:p text:style-name="P23"><text:span text:style-name="T3">gpio_service.</text:span></text:p>
            <text:p text:style-name="P23"><text:span text:style-name="T3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2" draw:text-style-name="P43" draw:layer="layout" svg:width="3.175cm" svg:height="0.433cm" svg:x="5.127cm" svg:y="15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16" draw:layer="layout" svg:width="3.175cm" svg:height="0.39cm" svg:x="5.127cm" svg:y="15.6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4" draw:text-style-name="P17" draw:layer="layout" draw:line-skew="-2.199cm" svg:x1="18.991cm" svg:y1="17.064cm" svg:x2="19.711cm" svg:y2="10.742cm" draw:start-shape="id60" draw:start-glue-point="4" draw:end-shape="id59" draw:end-glue-point="10" svg:d="M18991 17064v-5361h720v-961" svg:viewBox="0 0 721 6323">
          <text:p/>
        </draw:connector>
        <draw:connector draw:style-name="gr285" draw:text-style-name="P17" draw:layer="layout" draw:line-skew="-2.581cm" svg:x1="17.899cm" svg:y1="17.194cm" svg:x2="18.496cm" svg:y2="10.742cm" draw:start-shape="id61" draw:start-glue-point="15" draw:end-shape="id59" draw:end-glue-point="9" svg:d="M17899 17194v-5808h597v-644" svg:viewBox="0 0 598 6453">
          <text:p/>
        </draw:connector>
        <draw:connector draw:style-name="gr286" draw:text-style-name="P17" draw:layer="layout" draw:line-skew="1.003cm" svg:x1="7.419cm" svg:y1="13.583cm" svg:x2="10.098cm" svg:y2="10.34cm" draw:start-shape="id62" draw:start-glue-point="14" draw:end-shape="id58" draw:end-glue-point="7" svg:d="M7419 13583v-620h2679v-2623" svg:viewBox="0 0 2680 3244">
          <text:p/>
        </draw:connector>
        <draw:connector draw:style-name="gr287" draw:text-style-name="P17" draw:layer="layout" svg:x1="5.304cm" svg:y1="13.583cm" svg:x2="7.098cm" svg:y2="12.546cm" draw:start-shape="id62" draw:start-glue-point="4" draw:end-shape="id56" draw:end-glue-point="2" svg:d="M5304 13583v-520h1794v-517" svg:viewBox="0 0 1795 1038">
          <text:p/>
        </draw:connector>
        <draw:connector draw:style-name="gr288" draw:text-style-name="P17" draw:layer="layout" svg:x1="21.91cm" svg:y1="12.161cm" svg:x2="20.014cm" svg:y2="10.198cm" draw:start-shape="id63" draw:start-glue-point="5" draw:end-shape="id59" draw:end-glue-point="12" svg:d="M21910 12161v-1963h-1896" svg:viewBox="0 0 1897 1964">
          <text:p/>
        </draw:connector>
        <draw:frame draw:style-name="gr15" draw:text-style-name="P19" draw:layer="layout" svg:width="2.512cm" svg:height="0.725cm" svg:x="19.732cm" svg:y="10.525cm">
          <draw:text-box>
            <text:p><text:span text:style-name="T5">&lt;</text:span><text:span text:style-name="T5">&lt;</text:span><text:span text:style-name="T5">h</text:span><text:span text:style-name="T5">a</text:span><text:span text:style-name="T5">s</text:span><text:span text:style-name="T5">&gt;</text:span><text:span text:style-name="T5">&gt;</text:span></text:p>
          </draw:text-box>
        </draw:frame>
        <draw:frame draw:style-name="gr15" draw:text-style-name="P19" draw:layer="layout" svg:width="2.512cm" svg:height="0.725cm" svg:x="10.207cm" svg:y="10.752cm">
          <draw:text-box>
            <text:p><text:span text:style-name="T5">&lt;</text:span><text:span text:style-name="T5">&lt;</text:span><text:span text:style-name="T5">h</text:span><text:span text:style-name="T5">a</text:span><text:span text:style-name="T5">s</text:span><text:span text:style-name="T5">&gt;</text:span><text:span text:style-name="T5">&gt;</text:span></text:p>
          </draw:text-box>
        </draw:frame>
        <draw:frame draw:style-name="gr15" draw:text-style-name="P19" draw:layer="layout" svg:width="2.512cm" svg:height="0.725cm" svg:x="3.24cm" svg:y="12.747cm">
          <draw:text-box>
            <text:p><text:span text:style-name="T5">&lt;</text:span><text:span text:style-name="T5">&lt;</text:span><text:span text:style-name="T5">h</text:span><text:span text:style-name="T5">a</text:span><text:span text:style-name="T5">s</text:span><text:span text:style-name="T5">&gt;</text:span><text:span text:style-name="T5">&gt;</text:span></text:p>
          </draw:text-box>
        </draw:frame>
        <draw:frame draw:style-name="gr289" draw:text-style-name="P40" draw:layer="layout" svg:width="6.35cm" svg:height="2.147cm" svg:x="1.635cm" svg:y="17.51cm">
          <draw:text-box>
            <text:p><text:span text:style-name="T11">W</text:span><text:span text:style-name="T11">a</text:span><text:span text:style-name="T11">a</text:span><text:span text:style-name="T11">r</text:span><text:span text:style-name="T11">o</text:span><text:span text:style-name="T11">m</text:span><text:span text:style-name="T11"> </text:span><text:span text:style-name="T11">b</text:span><text:span text:style-name="T11">a</text:span><text:span text:style-name="T11">c</text:span><text:span text:style-name="T11">k</text:span><text:span text:style-name="T11">l</text:span><text:span text:style-name="T11">i</text:span><text:span text:style-name="T11">g</text:span><text:span text:style-name="T11">h</text:span><text:span text:style-name="T11">t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r</text:span><text:span text:style-name="T11">e</text:span><text:span text:style-name="T11">a</text:span><text:span text:style-name="T11">d</text:span><text:span text:style-name="T11"> </text:span><text:span text:style-name="T11">m</text:span><text:span text:style-name="T11">e</text:span><text:span text:style-name="T11">t</text:span><text:span text:style-name="T11"> </text:span><text:span text:style-name="T11">s</text:span><text:span text:style-name="T11">t</text:span><text:span text:style-name="T11">o</text:span><text:span text:style-name="T11">p</text:span><text:span text:style-name="T11"> </text:span><text:span text:style-name="T11">e</text:span><text:span text:style-name="T11">n</text:span><text:span text:style-name="T11"> </text:span><text:span text:style-name="T11">o</text:span><text:span text:style-name="T11">f</text:span><text:span text:style-name="T11">f</text:span><text:span text:style-name="T11">.</text:span><text:span text:style-name="T11"> </text:span><text:span text:style-name="T11">S</text:span><text:span text:style-name="T11">t</text:span><text:span text:style-name="T11">a</text:span><text:span text:style-name="T11">a</text:span><text:span text:style-name="T11">t</text:span><text:span text:style-name="T11"> </text:span><text:span text:style-name="T11">e</text:span><text:span text:style-name="T11">i</text:span><text:span text:style-name="T11">g</text:span><text:span text:style-name="T11">e</text:span><text:span text:style-name="T11">n</text:span><text:span text:style-name="T11">l</text:span><text:span text:style-name="T11">i</text:span><text:span text:style-name="T11">j</text:span><text:span text:style-name="T11">k</text:span><text:span text:style-name="T11"> </text:span><text:span text:style-name="T11">a</text:span><text:span text:style-name="T11">l</text:span><text:span text:style-name="T11">t</text:span><text:span text:style-name="T11">i</text:span><text:span text:style-name="T11">j</text:span><text:span text:style-name="T11">d</text:span><text:span text:style-name="T11"> </text:span><text:span text:style-name="T11">a</text:span><text:span text:style-name="T11">a</text:span><text:span text:style-name="T11">n</text:span><text:span text:style-name="T11">!</text:span><text:span text:style-name="T11"> </text:span><text:span text:style-name="T11">W</text:span><text:span text:style-name="T11">o</text:span><text:span text:style-name="T11">r</text:span><text:span text:style-name="T11">d</text:span><text:span text:style-name="T11">t</text:span><text:span text:style-name="T11"> </text:span><text:span text:style-name="T11">o</text:span><text:span text:style-name="T11">o</text:span><text:span text:style-name="T11">k</text:span><text:span text:style-name="T11"> </text:span><text:span text:style-name="T11">i</text:span><text:span text:style-name="T11">n</text:span><text:span text:style-name="T11"> </text:span><text:span text:style-name="T11">d</text:span><text:span text:style-name="T11">e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g</text:span><text:span text:style-name="T11">e</text:span><text:span text:style-name="T11">s</text:span><text:span text:style-name="T11">t</text:span><text:span text:style-name="T11">a</text:span><text:span text:style-name="T11">r</text:span><text:span text:style-name="T11">t</text:span><text:span text:style-name="T11">!</text:span></text:p>
          </draw:text-box>
        </draw:frame>
        <draw:g draw:style-name="gr1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90" draw:text-style-name="P14" draw:layer="layout" svg:width="4.965cm" svg:height="1.627cm" svg:x="23.322cm" svg:y="7.0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&lt;&lt;thread&gt;&gt;</text:span></text:p>
              <text:p text:style-name="P13"><text:span text:style-name="T3">backlighting.</text:span></text:p>
              <text:p text:style-name="P13"><text:span text:style-name="T3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16" draw:layer="layout" svg:width="4.965cm" svg:height="0.754cm" svg:x="23.322cm" svg:y="8.694cm">
              <text:p text:style-name="P15"><text:span text:style-name="T4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2" draw:text-style-name="P16" draw:layer="layout" svg:width="4.965cm" svg:height="0.599cm" svg:x="23.322cm" svg:y="9.4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93" draw:text-style-name="P17" draw:layer="layout" svg:x1="23.323cm" svg:y1="7.703cm" svg:x2="20.014cm" svg:y2="8.056cm" draw:start-shape="id64" draw:start-glue-point="6" draw:end-shape="id59" draw:end-glue-point="13" svg:d="M23323 7703h-1655v353h-1654" svg:viewBox="0 0 3310 354">
          <text:p/>
        </draw:connector>
        <draw:connector draw:style-name="gr294" draw:text-style-name="P17" draw:layer="layout" svg:x1="25.577cm" svg:y1="12.161cm" svg:x2="26.907cm" svg:y2="10.047cm" draw:start-shape="id63" draw:start-glue-point="14" draw:end-shape="id64" draw:end-glue-point="9" svg:d="M25577 12161v-1058h1330v-1056" svg:viewBox="0 0 1331 2115">
          <text:p/>
        </draw:connector>
        <draw:frame draw:style-name="gr15" draw:text-style-name="P19" draw:layer="layout" svg:width="2.512cm" svg:height="0.725cm" svg:x="23.542cm" svg:y="10.117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frame draw:style-name="gr15" draw:text-style-name="P19" draw:layer="layout" svg:width="3.81cm" svg:height="0.725cm" svg:x="20.05cm" svg:y="6.942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  <draw:g draw:style-name="gr1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95" draw:text-style-name="P24" draw:layer="layout" svg:width="3.492cm" svg:height="1.627cm" svg:x="1.2cm" svg:y="9.8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led_control.</text:span></text:p>
            <text:p text:style-name="P23"><text:span text:style-name="T3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16" draw:layer="layout" svg:width="3.492cm" svg:height="0.517cm" svg:x="1.2cm" svg:y="11.513cm">
            <text:p text:style-name="P15"><text:span text:style-name="T4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6" draw:layer="layout" svg:width="3.492cm" svg:height="0.465cm" svg:x="1.2cm" svg:y="12.0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8" draw:text-style-name="P17" draw:layer="layout" svg:x1="2.171cm" svg:y1="9.887cm" svg:x2="4.917cm" svg:y2="8.303cm" draw:start-shape="id65" draw:start-glue-point="5" draw:end-shape="id56" draw:end-glue-point="5" svg:d="M2171 9887v-1584h2746" svg:viewBox="0 0 2747 1585">
          <text:p/>
        </draw:connector>
        <draw:frame draw:style-name="gr15" draw:text-style-name="P19" draw:layer="layout" svg:width="3.81cm" svg:height="0.725cm" svg:x="1.082cm" svg:y="7.667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</draw:page>
      <draw:page draw:name="Music Players" draw:style-name="dp1" draw:master-page-name="Default">
        <draw:custom-shape draw:style-name="gr299" draw:text-style-name="P7" draw:layer="layout" svg:width="25.039cm" svg:height="0.7cm" svg:x="1.635cm" svg:y="2.7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7" draw:layer="layout" svg:width="25.091cm" svg:height="0.7cm" svg:x="1.635cm" svg:y="6.1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7" draw:id="id6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01" draw:text-style-name="P9" draw:layer="layout" svg:width="24.873cm" svg:height="1.153cm" svg:x="1.635cm" svg:y="3.7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oradio_control.py</text:span></text:p>
            <text:p text:style-name="P8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2" draw:text-style-name="P11" draw:layer="layout" svg:width="24.873cm" svg:height="0.679cm" svg:x="1.635cm" svg:y="4.8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3" draw:text-style-name="P7" draw:layer="layout" svg:width="24.824cm" svg:height="0.7cm" svg:x="1.85cm" svg:y="18.9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12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1">
            <draw:custom-shape draw:style-name="gr305" draw:text-style-name="P14" draw:layer="layout" svg:width="5.397cm" svg:height="1.153cm" svg:x="10.255cm" svg:y="8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mpd_monitor.MPDMonitor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16" draw:layer="layout" svg:width="5.397cm" svg:height="0.545cm" svg:x="10.255cm" svg:y="9.295cm">
              <text:p text:style-name="P15"><text:span text:style-name="T4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7" draw:text-style-name="P16" draw:layer="layout" svg:width="5.397cm" svg:height="0.993cm" svg:x="10.255cm" svg:y="9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init(class: MPDService)</text:span></text:p>
              <text:p text:style-name="P15"><text:span text:style-name="T4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08" draw:text-style-name="P14" draw:layer="layout" svg:width="5.397cm" svg:height="1.153cm" svg:x="2.54cm" svg:y="7.7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mpd_control.MPDControl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9" draw:text-style-name="P16" draw:layer="layout" svg:width="5.397cm" svg:height="0.674cm" svg:x="2.54cm" svg:y="8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0" draw:text-style-name="P16" draw:layer="layout" svg:width="5.397cm" svg:height="2.569cm" svg:x="2.54cm" svg:y="9.6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init(class: MPDService)</text:span></text:p>
              <text:p text:style-name="P15"><text:span text:style-name="T4">+ is_web_radio()</text:span></text:p>
              <text:p text:style-name="P15"><text:span text:style-name="T4">+ next()</text:span></text:p>
              <text:p text:style-name="P15"><text:span text:style-name="T4">+ play()</text:span></text:p>
              <text:p text:style-name="P15"><text:span text:style-name="T4">+ stop()</text:span></text:p>
              <text:p text:style-name="P15"><text:span text:style-name="T4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1">
            <draw:custom-shape draw:style-name="gr311" draw:text-style-name="P14" draw:layer="layout" svg:width="6.552cm" svg:height="1.153cm" svg:x="20.165cm" svg:y="9.8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3"><text:span text:style-name="T3">spotify_connect.SpotifyConnect</text:span></text:p>
              <text:p text:style-name="P13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2" draw:text-style-name="P16" draw:layer="layout" svg:width="6.552cm" svg:height="0.761cm" svg:x="20.165cm" svg:y="11.0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3" draw:text-style-name="P16" draw:layer="layout" svg:width="6.552cm" svg:height="1.387cm" svg:x="20.165cm" svg:y="11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5"><text:span text:style-name="T4">+ play()</text:span></text:p>
              <text:p text:style-name="P15"><text:span text:style-name="T4">+ pause()</text:span></text:p>
              <text:p text:style-name="P15"><text:span text:style-name="T4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14" draw:text-style-name="P17" draw:layer="layout" draw:line-skew="0.495cm" svg:x1="11.755cm" svg:y1="8.143cm" svg:x2="9.687cm" svg:y2="5.57cm" draw:start-shape="id66" draw:start-glue-point="5" draw:end-shape="id67" draw:end-glue-point="18" svg:d="M11755 8143v-793h-2068v-1780" svg:viewBox="0 0 2069 2574">
          <text:p/>
        </draw:connector>
        <draw:connector draw:style-name="gr315" draw:text-style-name="P17" draw:layer="layout" draw:line-skew="0.469cm" svg:x1="2.841cm" svg:y1="7.794cm" svg:x2="3.972cm" svg:y2="5.57cm" draw:start-shape="id68" draw:start-glue-point="4" draw:end-shape="id67" draw:end-glue-point="16" svg:d="M2841 7794v-644h1131v-1580" svg:viewBox="0 0 1132 2225">
          <text:p/>
        </draw:connector>
        <draw:connector draw:style-name="gr316" draw:text-style-name="P17" draw:layer="layout" svg:x1="24.897cm" svg:y1="9.891cm" svg:x2="24.811cm" svg:y2="5.57cm" draw:start-shape="id69" draw:start-glue-point="14" draw:end-shape="id67" draw:end-glue-point="42" svg:d="M24897 9891v-2162h-86v-2159" svg:viewBox="0 0 87 4322">
          <text:p/>
        </draw:connector>
        <draw:custom-shape draw:style-name="gr317" draw:text-style-name="P18" draw:layer="layout" svg:width="25.995cm" svg:height="1.205cm" svg:x="1cm" svg:y="1.099cm">
          <text:p text:style-name="P6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2.54cm" svg:height="0.725cm" svg:x="4.81cm" svg:y="7.26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g draw:style-name="gr1" xml:id="id71" draw:id="id71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18" draw:text-style-name="P14" draw:layer="layout" svg:width="5.397cm" svg:height="1.153cm" svg:x="9.603cm" svg:y="15.4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3">mpd_service.MPDService</text:span></text:p>
            <text:p text:style-name="P13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9" draw:text-style-name="P16" draw:layer="layout" svg:width="5.397cm" svg:height="0.669cm" svg:x="9.603cm" svg:y="16.601cm">
            <text:p text:style-name="P15"><text:span text:style-name="T4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6" draw:layer="layout" svg:width="5.397cm" svg:height="1.387cm" svg:x="9.603cm" svg:y="17.2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init()</text:span></text:p>
            <text:p text:style-name="P15"><text:span text:style-name="T4">+ get_stats()</text:span></text:p>
            <text:p text:style-name="P15"><text:span text:style-name="T4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0" draw:id="id70">
          <draw:custom-shape draw:style-name="gr321" draw:text-style-name="P14" draw:layer="layout" svg:width="3.829cm" svg:height="1.153cm" svg:x="18.443cm" svg:y="13.7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3">mpd.MPDClient</text:span></text:p>
            <text:p text:style-name="P13"><text:span text:style-name="T3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2" draw:text-style-name="P16" draw:layer="layout" svg:width="3.829cm" svg:height="0.504cm" svg:x="18.443cm" svg:y="14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3" draw:text-style-name="P16" draw:layer="layout" svg:width="3.829cm" svg:height="3.357cm" svg:x="18.443cm" svg:y="15.4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5"><text:span text:style-name="T4">+ init()</text:span></text:p>
            <text:p text:style-name="P15"><text:span text:style-name="T4">+ idle()</text:span></text:p>
            <text:p text:style-name="P15"><text:span text:style-name="T4">+ update()</text:span></text:p>
            <text:p text:style-name="P15"><text:span text:style-name="T4">+ next()</text:span></text:p>
            <text:p text:style-name="P15"><text:span text:style-name="T4">+ play()</text:span></text:p>
            <text:p text:style-name="P15"><text:span text:style-name="T4">+ stop()</text:span></text:p>
            <text:p text:style-name="P15"><text:span text:style-name="T4">+ pause()</text:span></text:p>
            <text:p text:style-name="P15"><text:span text:style-name="T4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4" draw:text-style-name="P17" draw:layer="layout" svg:x1="18.443cm" svg:y1="16.283cm" svg:x2="15cm" svg:y2="17.052cm" draw:start-shape="id70" draw:start-glue-point="3" draw:end-shape="id71" draw:end-glue-point="1" svg:d="M18443 16283h-1722v769h-1721" svg:viewBox="0 0 3444 770">
          <text:p/>
        </draw:connector>
        <draw:frame draw:style-name="gr15" draw:text-style-name="P19" draw:layer="layout" svg:width="2.83cm" svg:height="0.725cm" svg:x="6.08cm" svg:y="17.102cm">
          <draw:text-box>
            <text:p><text:span text:style-name="T5">&lt;</text:span><text:span text:style-name="T5">&lt;</text:span><text:span text:style-name="T5">i</text:span><text:span text:style-name="T5">s</text:span><text:span text:style-name="T5"> </text:span><text:span text:style-name="T5">A</text:span><text:span text:style-name="T5">&gt;</text:span><text:span text:style-name="T5">&gt;</text:span></text:p>
          </draw:text-box>
          <draw:glue-point draw:id="4" svg:x="0.512cm" svg:y="-0.606cm"/>
        </draw:frame>
        <draw:connector draw:style-name="gr325" draw:text-style-name="P17" draw:layer="layout" svg:x1="14.636cm" svg:y1="15.448cm" svg:x2="14.152cm" svg:y2="10.833cm" draw:start-shape="id71" draw:start-glue-point="6" draw:end-shape="id66" draw:end-glue-point="9" svg:d="M14636 15448v-2308h-484v-2307" svg:viewBox="0 0 485 4616">
          <text:p/>
        </draw:connector>
        <draw:connector draw:style-name="gr326" draw:text-style-name="P17" draw:layer="layout" svg:x1="9.603cm" svg:y1="17.052cm" svg:x2="6.437cm" svg:y2="12.189cm" draw:start-shape="id71" draw:start-glue-point="3" draw:end-shape="id68" draw:end-glue-point="9" svg:d="M9603 17052h-3166v-4863" svg:viewBox="0 0 3167 4864">
          <text:p/>
        </draw:connector>
        <draw:frame draw:style-name="gr15" draw:text-style-name="P19" draw:layer="layout" svg:width="2.222cm" svg:height="0.725cm" svg:x="12.33cm" svg:y="11.16cm">
          <draw:text-box>
            <text:p><text:span text:style-name="T5">&lt;</text:span><text:span text:style-name="T5">&lt;</text:span><text:span text:style-name="T5">i</text:span><text:span text:style-name="T5">s</text:span><text:span text:style-name="T5"> </text:span><text:span text:style-name="T5">A</text:span><text:span text:style-name="T5">&gt;</text:span><text:span text:style-name="T5">&gt;</text:span></text:p>
          </draw:text-box>
          <draw:glue-point draw:id="4" svg:x="0.512cm" svg:y="-0.606cm"/>
        </draw:frame>
        <draw:frame draw:style-name="gr15" draw:text-style-name="P19" draw:layer="layout" svg:width="3.147cm" svg:height="0.725cm" svg:x="21.665cm" svg:y="7.26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frame draw:style-name="gr15" draw:text-style-name="P19" draw:layer="layout" svg:width="2.54cm" svg:height="0.725cm" svg:x="7.985cm" svg:y="7.577cm">
          <draw:text-box>
            <text:p><text:span text:style-name="T5">&lt;</text:span><text:span text:style-name="T5">&lt;</text:span><text:span text:style-name="T5">u</text:span><text:span text:style-name="T5">s</text:span><text:span text:style-name="T5">e</text:span><text:span text:style-name="T5">s</text:span><text:span text:style-name="T5">&gt;</text:span><text:span text:style-name="T5">&gt;</text:span></text:p>
          </draw:text-box>
        </draw:frame>
        <draw:frame draw:style-name="gr15" draw:text-style-name="P19" draw:layer="layout" svg:width="3.81cm" svg:height="0.725cm" svg:x="14.97cm" svg:y="17.42cm">
          <draw:text-box>
            <text:p><text:span text:style-name="T5">&lt;</text:span><text:span text:style-name="T5">&lt;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s</text:span><text:span text:style-name="T5"> </text:span><text:span text:style-name="T5">o</text:span><text:span text:style-name="T5">f</text:span><text:span text:style-name="T5">&gt;</text:span><text:span text:style-name="T5">&gt;</text:span></text:p>
          </draw:text-box>
        </draw:frame>
        <draw:g draw:style-name="gr1" xml:id="id72" draw:id="id72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27" draw:text-style-name="P24" draw:layer="layout" svg:width="4.538cm" svg:height="1.627cm" svg:x="1.443cm" svg:y="13.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mpd_control.</text:span></text:p>
            <text:p text:style-name="P23"><text:span text:style-name="T3">remove_song_w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8" draw:text-style-name="P16" draw:layer="layout" svg:width="4.538cm" svg:height="0.435cm" svg:x="1.443cm" svg:y="15.2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9" draw:text-style-name="P16" draw:layer="layout" svg:width="4.538cm" svg:height="0.993cm" svg:x="1.443cm" svg:y="15.6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0" draw:text-style-name="P17" draw:layer="layout" svg:x1="4.361cm" svg:y1="13.65cm" svg:x2="4.04cm" svg:y2="12.189cm" draw:start-shape="id72" draw:start-glue-point="8" draw:end-shape="id68" draw:end-glue-point="8" svg:d="M4361 13650v-731h-321v-730" svg:viewBox="0 0 322 1462">
          <text:p/>
        </draw:connector>
        <draw:g draw:style-name="gr1" xml:id="id73" draw:id="id73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31" draw:text-style-name="P24" draw:layer="layout" svg:width="4.538cm" svg:height="1.627cm" svg:x="17.292cm" svg:y="7.0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mpd_monitor.</text:span></text:p>
            <text:p text:style-name="P23"><text:span text:style-name="T3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2" draw:text-style-name="P16" draw:layer="layout" svg:width="4.538cm" svg:height="0.728cm" svg:x="17.292cm" svg:y="8.662cm">
            <text:p text:style-name="P15"><text:span text:style-name="T4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3" draw:text-style-name="P16" draw:layer="layout" svg:width="4.538cm" svg:height="0.635cm" svg:x="17.292cm" svg:y="9.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4" draw:text-style-name="P17" draw:layer="layout" svg:x1="17.292cm" svg:y1="8.53cm" svg:x2="15.651cm" svg:y2="8.778cm" draw:start-shape="id73" draw:end-shape="id66" draw:end-glue-point="13" svg:d="M17292 8530h-820v248h-821" svg:viewBox="0 0 1642 2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31T17:56:57.299224445</dc:date>
    <meta:editing-duration>PT14H57M26S</meta:editing-duration>
    <meta:editing-cycles>108</meta:editing-cycles>
    <meta:print-date>2026-05-31T17:56:35.806719548</meta:print-date>
    <dc:creator>Henk</dc:creator>
    <meta:printed-by>PDF files: Henk</meta:printed-by>
    <meta:document-statistic meta:object-count="499"/>
  </office:meta>
</office:document-meta>
</file>