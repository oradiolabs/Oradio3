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4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6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22.745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22.787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23.039cm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715cm" fo:min-width="23.26cm" fo:padding-top="0.151cm" fo:padding-bottom="0.151cm" fo:padding-left="0.276cm" fo:padding-right="0.276cm" loext:decorative="false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82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3.26cm" fo:padding-top="0.151cm" fo:padding-bottom="0.151cm" fo:padding-left="0.276cm" fo:padding-right="0.276cm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45cm" fo:min-width="22.677cm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22.504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22.753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285cm" fo:min-width="23.443cm" fo:padding-top="0.151cm" fo:padding-bottom="0.151cm" fo:padding-left="0.276cm" fo:padding-right="0.276cm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5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3.443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creat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165cm" svg:y="-4.952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382cm" svg:y="-4.998cm"/>
          <draw:g draw:style-name="gr3">
            <draw:custom-shape draw:style-name="gr9" draw:text-style-name="P10" draw:layer="layout" svg:width="8.603cm" svg:height="1.153cm" svg:x="6.002cm" svg:y="12.4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8.603cm" svg:height="0.761cm" svg:x="6.002cm" svg:y="13.5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1" draw:layer="layout" svg:width="8.603cm" svg:height="1.781cm" svg:x="6.002cm" svg:y="14.3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set_nom_voltage()</text:span></text:p>
              <text:p text:style-name="P12"><text:span text:style-name="T3">+ set_max_voltage()</text:span></text:p>
              <text:p text:style-name="P12"><text:span text:style-name="T3">+ set_standby_voltage()</text:span></text:p>
              <text:p text:style-name="P12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12" draw:text-style-name="P10" draw:layer="layout" svg:width="6.423cm" svg:height="1.153cm" svg:x="16.337cm" svg:y="11.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1" draw:layer="layout" svg:width="6.423cm" svg:height="0.761cm" svg:x="16.337cm" svg:y="12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1" draw:layer="layout" svg:width="6.423cm" svg:height="0.803cm" svg:x="16.337cm" svg:y="13.11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" draw:text-style-name="P10" draw:layer="layout" svg:width="5.13cm" svg:height="1.153cm" svg:x="8.112cm" svg:y="7.80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1" draw:layer="layout" svg:width="5.13cm" svg:height="0.761cm" svg:x="8.112cm" svg:y="8.961cm">
              <text:p text:style-name="P13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1" draw:layer="layout" svg:width="5.13cm" svg:height="1.387cm" svg:x="8.112cm" svg:y="9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__init__(queue: Queue)</text:span></text:p>
              <text:p text:style-name="P12"><text:span text:style-name="T3">+ get_state()</text:span></text:p>
              <text:p text:style-name="P1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8" draw:text-style-name="P10" draw:layer="layout" svg:width="5.602cm" svg:height="1.153cm" svg:x="1.856cm" svg:y="7.8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1" draw:layer="layout" svg:width="5.602cm" svg:height="0.761cm" svg:x="1.856cm" svg:y="8.978cm">
              <text:p text:style-name="P13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5.602cm" svg:height="2.175cm" svg:x="1.856cm" svg:y="9.7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__init__(queue: Queue)</text:span></text:p>
              <text:p text:style-name="P12"><text:span text:style-name="T3">+ stop()</text:span></text:p>
              <text:p text:style-name="P12"><text:span text:style-name="T3">+ get_state()</text:span></text:p>
              <text:p text:style-name="P12"><text:span text:style-name="T3">+ start()</text:span></text:p>
              <text:p text:style-name="P1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7" draw:id="id7">
          <draw:glue-point draw:id="4" svg:x="1.153cm" svg:y="-4.294cm"/>
          <draw:glue-point draw:id="5" svg:x="3.461cm" svg:y="-5.146cm"/>
          <draw:custom-shape draw:style-name="gr21" draw:text-style-name="P10" draw:layer="layout" svg:width="4.047cm" svg:height="1.153cm" svg:x="21.82cm" svg:y="8.0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4.047cm" svg:height="0.761cm" svg:x="21.82cm" svg:y="9.185cm">
            <text:p text:style-name="P12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6" draw:id="id6">
          <draw:glue-point draw:id="4" svg:x="-3.94cm" svg:y="-4.644cm"/>
          <draw:custom-shape draw:style-name="gr23" draw:text-style-name="P10" draw:layer="layout" svg:width="4.465cm" svg:height="1.153cm" svg:x="14.55cm" svg:y="7.9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4.465cm" svg:height="0.761cm" svg:x="14.55cm" svg:y="9.129cm">
            <text:p text:style-name="P12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" draw:text-style-name="P14" draw:layer="layout" svg:x1="9.539cm" svg:y1="7.809cm" svg:x2="10.425cm" svg:y2="5.27cm" draw:start-shape="id1" draw:start-glue-point="5" draw:end-shape="id2" draw:end-glue-point="23" svg:d="M9539 7809v-1271h886v-1268" svg:viewBox="0 0 887 2540">
          <text:p/>
        </draw:connector>
        <draw:connector draw:style-name="gr26" draw:text-style-name="P14" draw:layer="layout" draw:line-skew="0.485cm" svg:x1="3.414cm" svg:y1="7.826cm" svg:x2="4.592cm" svg:y2="5.27cm" draw:start-shape="id3" draw:start-glue-point="5" draw:end-shape="id2" draw:end-glue-point="16" svg:d="M3414 7826v-794h1178v-1762" svg:viewBox="0 0 1179 2557">
          <text:p/>
        </draw:connector>
        <draw:connector draw:style-name="gr27" draw:text-style-name="P14" draw:layer="layout" draw:line-skew="-1.499cm" svg:x1="13.886cm" svg:y1="12.448cm" svg:x2="11.494cm" svg:y2="5.27cm" draw:start-shape="id4" draw:start-glue-point="15" draw:end-shape="id2" draw:end-glue-point="35" svg:d="M13886 12448v-5098h-2392v-2080" svg:viewBox="0 0 2393 7179">
          <text:p/>
        </draw:connector>
        <draw:connector draw:style-name="gr28" draw:text-style-name="P14" draw:layer="layout" draw:line-skew="1.993cm" svg:x1="16.695cm" svg:y1="11.201cm" svg:x2="20.446cm" svg:y2="5.27cm" draw:start-shape="id5" draw:start-glue-point="4" draw:end-shape="id2" draw:end-glue-point="29" svg:d="M16695 11201v-974h3751v-4957" svg:viewBox="0 0 3752 5932">
          <text:p/>
        </draw:connector>
        <draw:connector draw:style-name="gr29" draw:text-style-name="P14" draw:layer="layout" svg:x1="16.782cm" svg:y1="7.976cm" svg:x2="19.33cm" svg:y2="5.27cm" draw:start-shape="id6" draw:end-shape="id2" draw:end-glue-point="30" svg:d="M16782 7976v-1354h2548v-1352" svg:viewBox="0 0 2549 2707">
          <text:p/>
        </draw:connector>
        <draw:connector draw:style-name="gr30" draw:text-style-name="P14" draw:layer="layout" svg:x1="24.309cm" svg:y1="8.168cm" svg:x2="24.874cm" svg:y2="5.27cm" draw:start-shape="id7" draw:start-glue-point="4" draw:end-shape="id2" draw:end-glue-point="39" svg:d="M24309 8168v-1518h565v-1380" svg:viewBox="0 0 566 2899">
          <text:p/>
        </draw:connector>
        <draw:custom-shape draw:style-name="gr31" draw:text-style-name="P8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1.153cm" svg:y="-4.294cm"/>
          <draw:glue-point draw:id="5" svg:x="3.461cm" svg:y="-5.146cm"/>
          <draw:custom-shape draw:style-name="gr32" draw:text-style-name="P10" draw:layer="controls" svg:width="4.047cm" svg:height="1.153cm" svg:x="23.842cm" svg:y="11.1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controls" svg:width="4.047cm" svg:height="1.262cm" svg:x="23.842cm" svg:y="12.338cm">
            <text:p text:style-name="P12"><text:span text:style-name="T3">+ xxxx</text:span></text:p>
            <text:p text:style-name="P12"><text:span text:style-name="T3">+ xxxx</text:span></text:p>
            <text:p text:style-name="P1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" draw:text-style-name="P14" draw:layer="controls" svg:x1="27.265cm" svg:y1="11.185cm" svg:x2="26.716cm" svg:y2="5.27cm" draw:start-shape="id8" draw:start-glue-point="5" draw:end-shape="id2" draw:end-glue-point="44" svg:d="M27265 11185v-2958h-549v-2957" svg:viewBox="0 0 550 5916">
          <text:p/>
        </draw:connector>
      </draw:page>
      <draw:page draw:name="Frontpanel_interface" draw:style-name="dp1" draw:master-page-name="Default">
        <draw:custom-shape draw:style-name="gr35" draw:text-style-name="P2" draw:layer="layout" svg:width="23.245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23.287cm" svg:height="0.7cm" svg:x="1.301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9" draw:id="id9">
          <draw:custom-shape draw:style-name="gr37" draw:text-style-name="P10" draw:layer="layout" svg:width="5.08cm" svg:height="1.153cm" svg:x="1.917cm" svg:y="8.2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1" draw:layer="layout" svg:width="5.08cm" svg:height="0.671cm" svg:x="1.917cm" svg:y="9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1" draw:layer="layout" svg:width="5.08cm" svg:height="2.963cm" svg:x="1.917cm" svg:y="10.0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3">+ turn_on_led()</text:span></text:p>
            <text:p text:style-name="P12"><text:span text:style-name="T3">+ turn_off_led()</text:span></text:p>
            <text:p text:style-name="P12"><text:span text:style-name="T3">+ turn_off_all_leds()</text:span></text:p>
            <text:p text:style-name="P12"><text:span text:style-name="T3">+ turn_off_all_leds()</text:span></text:p>
            <text:p text:style-name="P12"><text:span text:style-name="T3">+ get_led_state()l</text:span></text:p>
            <text:p text:style-name="P12"><text:span text:style-name="T3">+ oneshot_on_led()</text:span></text:p>
            <text:p text:style-name="P12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0" draw:id="id1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40" draw:text-style-name="P4" draw:layer="layout" svg:width="22.909cm" svg:height="1.153cm" svg:x="1.387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6" draw:layer="layout" svg:width="22.909cm" svg:height="0.679cm" svg:x="1.387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2" draw:layer="layout" svg:width="23.539cm" svg:height="0.7cm" svg:x="1.101cm" svg:y="14.04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4" draw:layer="layout" draw:line-skew="0.168cm" svg:x1="4.457cm" svg:y1="8.259cm" svg:x2="5.969cm" svg:y2="5.47cm" draw:start-shape="id9" draw:end-shape="id10" draw:end-glue-point="4" svg:d="M4457 8259v-1227h1512v-1562" svg:viewBox="0 0 1513 2790">
          <text:p/>
        </draw:connector>
        <draw:custom-shape draw:style-name="gr44" draw:text-style-name="P8" draw:layer="layout" svg:width="23.812cm" svg:height="13.01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5" draw:text-style-name="P10" draw:layer="layout" svg:width="5.917cm" svg:height="1.153cm" svg:x="15.368cm" svg:y="8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1" draw:layer="layout" svg:width="5.917cm" svg:height="0.761cm" svg:x="15.368cm" svg:y="9.482cm">
              <text:p text:style-name="P13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1" draw:layer="layout" svg:width="5.917cm" svg:height="0.599cm" svg:x="15.368cm" svg:y="10.24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__init__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8" draw:text-style-name="P10" draw:layer="layout" svg:width="5.282cm" svg:height="1.153cm" svg:x="7.965cm" svg:y="8.3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1" draw:layer="layout" svg:width="5.282cm" svg:height="0.761cm" svg:x="7.965cm" svg:y="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1" draw:layer="layout" svg:width="5.282cm" svg:height="0.803cm" svg:x="7.965cm" svg:y="10.21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1" draw:text-style-name="P14" draw:layer="layout" draw:line-skew="0.451cm" svg:x1="20.956cm" svg:y1="8.33cm" svg:x2="19.587cm" svg:y2="5.47cm" draw:start-shape="id11" draw:start-glue-point="15" draw:end-shape="id10" draw:end-glue-point="5" svg:d="M20956 8330v-980h-1369v-1880" svg:viewBox="0 0 1370 2861">
          <text:p/>
        </draw:connector>
        <draw:connector draw:style-name="gr52" draw:text-style-name="P14" draw:layer="layout" draw:line-skew="0.465cm" svg:x1="9.434cm" svg:y1="8.303cm" svg:x2="8.642cm" svg:y2="5.444cm" draw:start-shape="id12" draw:start-glue-point="5" draw:end-shape="id10" draw:end-glue-point="42" svg:d="M9434 8303v-953h-792v-1906" svg:viewBox="0 0 793 2860">
          <text:p/>
        </draw:connector>
        <draw:frame draw:style-name="gr7" draw:text-style-name="P7" draw:layer="layout" svg:width="3.147cm" svg:height="0.725cm" svg:x="5.57cm" svg:y="7.107cm">
          <draw:text-box>
            <text:p><text:span text:style-name="T2">&lt;&lt;creates&gt;&gt;</text:span></text:p>
          </draw:text-box>
        </draw:frame>
        <draw:custom-shape draw:style-name="gr53" draw:text-style-name="P8" draw:layer="layout" svg:width="23.812cm" svg:height="1.27cm" svg:x="1cm" svg:y="1cm">
          <text:p text:style-name="P1">static view: Frontpanel interface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music_players" draw:style-name="dp1" draw:master-page-name="Default">
        <draw:custom-shape draw:style-name="gr54" draw:text-style-name="P2" draw:layer="layout" svg:width="23.177cm" svg:height="0.7cm" svg:x="1cm" svg:y="2.1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23.004cm" svg:height="0.7cm" svg:x="1.222cm" svg:y="5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custom-shape draw:style-name="gr56" draw:text-style-name="P4" draw:layer="layout" svg:width="22.63cm" svg:height="1.153cm" svg:x="1.392cm" svg:y="3.3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22.63cm" svg:height="0.679cm" svg:x="1.392cm" svg:y="4.4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8" draw:text-style-name="P2" draw:layer="layout" svg:width="23.253cm" svg:height="0.7cm" svg:x="0.854cm" svg:y="13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23.995cm" svg:height="13.587cm" svg:x="0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0" draw:text-style-name="P10" draw:layer="layout" svg:width="5.397cm" svg:height="1.153cm" svg:x="8.755cm" svg:y="8.5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1" draw:layer="layout" svg:width="5.397cm" svg:height="0.865cm" svg:x="8.755cm" svg:y="9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1" draw:layer="layout" svg:width="5.397cm" svg:height="0.912cm" svg:x="8.755cm" svg:y="10.53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3" draw:text-style-name="P10" draw:layer="layout" svg:width="5.397cm" svg:height="1.153cm" svg:x="2.64cm" svg:y="8.4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1" draw:layer="layout" svg:width="5.397cm" svg:height="0.761cm" svg:x="2.64cm" svg:y="9.5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1" draw:layer="layout" svg:width="5.397cm" svg:height="2.569cm" svg:x="2.64cm" svg:y="10.3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update-database()</text:span></text:p>
              <text:p text:style-name="P12"><text:span text:style-name="T3">+ is_web_radio()</text:span></text:p>
              <text:p text:style-name="P12"><text:span text:style-name="T3">+ next()</text:span></text:p>
              <text:p text:style-name="P12"><text:span text:style-name="T3">+ play()</text:span></text:p>
              <text:p text:style-name="P12"><text:span text:style-name="T3">+ stop()</text:span></text:p>
              <text:p text:style-name="P12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66" draw:text-style-name="P10" draw:layer="layout" svg:width="6.552cm" svg:height="1.153cm" svg:x="15.285cm" svg:y="8.6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1" draw:layer="layout" svg:width="6.552cm" svg:height="0.761cm" svg:x="15.285cm" svg:y="9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1" draw:layer="layout" svg:width="6.552cm" svg:height="1.387cm" svg:x="15.285cm" svg:y="10.5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play()</text:span></text:p>
              <text:p text:style-name="P12"><text:span text:style-name="T3">+ pause()</text:span></text:p>
              <text:p text:style-name="P12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9" draw:text-style-name="P14" draw:layer="layout" svg:x1="10.255cm" svg:y1="8.518cm" svg:x2="7.937cm" svg:y2="5.126cm" draw:start-shape="id13" draw:start-glue-point="5" draw:end-shape="id14" draw:end-glue-point="40" svg:d="M10255 8518v-1675h-2318v-1717" svg:viewBox="0 0 2319 3393">
          <text:p/>
        </draw:connector>
        <draw:connector draw:style-name="gr70" draw:text-style-name="P14" draw:layer="layout" svg:x1="2.941cm" svg:y1="8.426cm" svg:x2="5.918cm" svg:y2="5.17cm" draw:start-shape="id15" draw:start-glue-point="4" draw:end-shape="id14" draw:end-glue-point="4" svg:d="M2941 8426v-1629h2977v-1627" svg:viewBox="0 0 2978 3257">
          <text:p/>
        </draw:connector>
        <draw:connector draw:style-name="gr71" draw:text-style-name="P14" draw:layer="layout" svg:x1="20.017cm" svg:y1="8.618cm" svg:x2="18.022cm" svg:y2="5.17cm" draw:start-shape="id16" draw:start-glue-point="14" draw:end-shape="id14" draw:end-glue-point="31" svg:d="M20017 8618v-1725h-1995v-1723" svg:viewBox="0 0 1996 3449">
          <text:p/>
        </draw:connector>
        <draw:custom-shape draw:style-name="gr72" draw:text-style-name="P8" draw:layer="layout" svg:width="23.995cm" svg:height="1.205cm" svg:x="0.5cm" svg:y="0.4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147cm" svg:height="0.725cm" svg:x="5.79cm" svg:y="7.032cm">
          <draw:text-box>
            <text:p><text:span text:style-name="T2">&lt;&lt;creat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08T16:52:07.201553576</dc:date>
    <meta:editing-duration>PT7H43M43S</meta:editing-duration>
    <meta:editing-cycles>65</meta:editing-cycles>
    <meta:print-date>2026-04-03T16:45:26.431431754</meta:print-date>
    <dc:creator>Henk</dc:creator>
    <meta:document-statistic meta:object-count="98"/>
  </office:meta>
</office:document-meta>
</file>