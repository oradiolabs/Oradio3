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4.298cm" fo:min-width="12.8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9cm" fo:min-width="12.783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16.541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6.239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6.44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8.18cm" fo:padding-top="0.151cm" fo:padding-bottom="0.151cm" fo:padding-left="0.276cm" fo:padding-right="0.276cm" loext:decorative="false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8.18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868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20.327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19.957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5cm" fo:min-width="20.21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1.355cm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1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95cm" fo:min-width="7.4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191cm" fo:min-width="7.385cm" fo:padding-top="0.151cm" fo:padding-bottom="0.151cm" fo:padding-left="0.276cm" fo:padding-right="0.276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45cm" fo:min-width="26.007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25.537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45cm" fo:min-width="25.859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6.753cm" fo:padding-top="0.151cm" fo:padding-bottom="0.151cm" fo:padding-left="0.276cm" fo:padding-right="0.276cm" loext:decorative="false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6.753cm" fo:padding-top="0.151cm" fo:padding-bottom="0.151cm" fo:padding-left="0.276cm" fo:padding-right="0.276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10.35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7.182cm" fo:min-width="7.4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4cm" fo:min-width="7.386cm" fo:padding-top="0.151cm" fo:padding-bottom="0.151cm" fo:padding-left="0.276cm" fo:padding-right="0.276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45cm" fo:min-width="23.788cm" style:writing-mode="lr-tb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45cm" fo:min-width="23.579cm" style:writing-mode="lr-tb" loext:decorative="false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45cm" fo:min-width="23.876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5.165cm" fo:padding-top="0.151cm" fo:padding-bottom="0.151cm" fo:padding-left="0.276cm" fo:padding-right="0.276cm" loext:decorative="false"/>
    </style:style>
    <style:style style:name="gr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93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165cm" fo:padding-top="0.151cm" fo:padding-bottom="0.151cm" fo:padding-left="0.276cm" fo:padding-right="0.276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747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94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9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9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9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4" style:family="graphic" style:parent-style-name="standard">
      <style:graphic-properties draw:textarea-horizontal-align="justify" draw:textarea-vertical-align="middle" draw:auto-grow-height="false" fo:min-height="0.45cm" fo:min-width="24.661cm" style:writing-mode="lr-tb" loext:decorative="false"/>
      <style:paragraph-properties style:writing-mode="lr-tb"/>
    </style:style>
    <style:style style:name="gr125" style:family="graphic" style:parent-style-name="standard">
      <style:graphic-properties draw:textarea-horizontal-align="justify" draw:textarea-vertical-align="middle" draw:auto-grow-height="false" fo:min-height="0.45cm" fo:min-width="24.515cm" style:writing-mode="lr-tb" loext:decorative="false"/>
      <style:paragraph-properties style:writing-mode="lr-tb"/>
    </style:style>
    <style:style style:name="gr126" style:family="graphic" style:parent-style-name="standard">
      <style:graphic-properties draw:textarea-horizontal-align="justify" draw:textarea-vertical-align="middle" draw:auto-grow-height="false" fo:min-height="0.45cm" fo:min-width="24.825cm" style:writing-mode="lr-tb" loext:decorative="false"/>
      <style:paragraph-properties style:writing-mode="lr-tb"/>
    </style:style>
    <style:style style:name="gr12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5.8cm" fo:padding-top="0.151cm" fo:padding-bottom="0.151cm" fo:padding-left="0.276cm" fo:padding-right="0.276cm" loext:decorative="false"/>
    </style:style>
    <style:style style:name="gr1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9" style:family="graphic" style:parent-style-name="standard">
      <style:graphic-properties draw:textarea-horizontal-align="justify" draw:textarea-vertical-align="middle" draw:auto-grow-height="false" fo:min-height="0.45cm" fo:min-width="23.405cm" style:writing-mode="lr-tb" loext:decorative="false"/>
      <style:paragraph-properties style:writing-mode="lr-tb"/>
    </style:style>
    <style:style style:name="gr160" style:family="graphic" style:parent-style-name="standard">
      <style:graphic-properties draw:textarea-horizontal-align="justify" draw:textarea-vertical-align="middle" draw:auto-grow-height="false" fo:min-height="0.45cm" fo:min-width="23.271cm" style:writing-mode="lr-tb" loext:decorative="false"/>
      <style:paragraph-properties style:writing-mode="lr-tb"/>
    </style:style>
    <style:style style:name="gr161" style:family="graphic" style:parent-style-name="standard">
      <style:graphic-properties draw:textarea-horizontal-align="justify" draw:textarea-vertical-align="middle" draw:auto-grow-height="false" fo:min-height="0.45cm" fo:min-width="23.188cm" style:writing-mode="lr-tb" loext:decorative="false"/>
      <style:paragraph-properties style:writing-mode="lr-tb"/>
    </style:style>
    <style:style style:name="gr16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848cm" fo:padding-top="0.151cm" fo:padding-bottom="0.151cm" fo:padding-left="0.276cm" fo:padding-right="0.276cm" loext:decorative="false"/>
    </style:style>
    <style:style style:name="gr1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8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in-height="0.612cm" loext:decorative="false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4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195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19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19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5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226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227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2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6" style:family="graphic" style:parent-style-name="standard">
      <style:graphic-properties draw:textarea-horizontal-align="justify" draw:textarea-vertical-align="middle" draw:auto-grow-height="false" fo:min-height="0.45cm" fo:min-width="26.321cm" style:writing-mode="lr-tb" loext:decorative="false"/>
      <style:paragraph-properties style:writing-mode="lr-tb"/>
    </style:style>
    <style:style style:name="gr247" style:family="graphic" style:parent-style-name="standard">
      <style:graphic-properties draw:textarea-horizontal-align="justify" draw:textarea-vertical-align="middle" draw:auto-grow-height="false" fo:min-height="0.45cm" fo:min-width="25.846cm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0" style:family="graphic" style:parent-style-name="standard">
      <style:graphic-properties draw:textarea-horizontal-align="justify" draw:textarea-vertical-align="middle" draw:auto-grow-height="false" fo:min-height="0.45cm" fo:min-width="26.172cm" style:writing-mode="lr-tb" loext:decorative="false"/>
      <style:paragraph-properties style:writing-mode="lr-tb"/>
    </style:style>
    <style:style style:name="gr25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2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76cm" fo:min-width="9.2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4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99cm" fo:min-width="10.97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6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36cm" fo:min-width="5.48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2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8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299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3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30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3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8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9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350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3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35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3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5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6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start"/>
      <style:text-properties fo:font-size="12pt"/>
    </style:style>
    <style:style style:name="P30" style:family="paragraph">
      <loext:graphic-properties draw:fill="none"/>
      <style:paragraph-properties fo:text-align="start" style:writing-mode="lr-tb"/>
      <style:text-properties fo:font-size="12pt"/>
    </style:style>
    <style:style style:name="P31" style:family="paragraph">
      <style:paragraph-properties fo:text-align="start"/>
      <style:text-properties fo:font-size="12pt" style:font-size-asian="12pt" style:font-size-complex="12pt"/>
    </style:style>
    <style:style style:name="P3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start"/>
    </style:style>
    <style:style style:name="P3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42" style:family="paragraph">
      <style:paragraph-properties fo:text-align="start" style:writing-mode="lr-tb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Utilities" draw:style-name="dp1" draw:master-page-name="Default">
        <draw:g draw:style-name="gr1">
          <draw:custom-shape draw:style-name="gr2" draw:text-style-name="P2" draw:layer="layout" svg:width="3.175cm" svg:height="0.679cm" svg:x="3.135cm" svg:y="5.144cm">
            <draw:glue-point draw:id="4" svg:x="0.5cm" svg:y="0cm" draw:align="top-left"/>
            <text:p text:style-name="P1"><text:span text:style-name="T1">&lt;&lt;Module&gt;&gt;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3.335cm" svg:height="4.507cm" svg:x="3.135cm" svg:y="5.823cm">
            <draw:glue-point draw:id="4" svg:x="0.501cm" svg:y="-0.003cm" draw:align="bottom-left" draw:escape-direction="down"/>
            <draw:glue-point draw:id="5" svg:x="-0.501cm" svg:y="-0.003cm" draw:align="bottom-right" draw:escape-direction="down"/>
            <draw:glue-point draw:id="6" svg:x="0cm" svg:y="-0.252cm" draw:align="bottom-left" draw:escape-direction="left"/>
            <draw:glue-point draw:id="7" svg:x="0cm" svg:y="-0.252cm" draw:align="bottom-right" draw:escape-direction="right"/>
            <draw:glue-point draw:id="8" svg:x="0cm" svg:y="0.23cm" draw:align="top-left" draw:escape-direction="left"/>
            <draw:glue-point draw:id="9" svg:x="0cm" svg:y="0.23cm" draw:align="top-right" draw:escape-direction="up"/>
            <draw:glue-point draw:id="10" svg:x="-0.501cm" svg:y="0cm" draw:align="top-right" draw:escape-direction="up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3.335cm" svg:height="1.271cm" svg:x="3.135cm" svg:y="10.329cm">
            <text:p text:style-name="P4"><text:span text:style-name="T2">Every modules/classes can use these utilities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17.041cm" svg:height="0.7cm" svg:x="1.421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6.739cm" svg:height="0.7cm" svg:x="1.518cm" svg:y="3.5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6.946cm" svg:height="0.7cm" svg:x="1.516cm" svg:y="13.18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8.732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lue-point draw:id="4" svg:x="1.153cm" svg:y="-4.294cm"/>
          <draw:glue-point draw:id="5" svg:x="3.461cm" svg:y="-5.146cm"/>
          <draw:custom-shape draw:style-name="gr9" draw:text-style-name="P10" draw:layer="layout" svg:width="4.047cm" svg:height="1.153cm" svg:x="10.583cm" svg:y="6.7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system_sounds.py</text:span></text:p>
            <text:p text:style-name="P9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4.047cm" svg:height="0.761cm" svg:x="10.583cm" svg:y="7.873cm">
            <text:p text:style-name="P11"><text:span text:style-name="T4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3" draw:layer="layout" svg:width="18.732cm" svg:height="0.952cm" svg:x="1cm" svg:y="1.1cm">
          <text:p text:style-name="P6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7.67cm" svg:y="4.932cm">
          <draw:text-box>
            <text:p><text:span text:style-name="T5">&lt;&lt;uses&gt;&gt;</text:span></text:p>
          </draw:text-box>
        </draw:frame>
        <draw:g draw:style-name="gr1">
          <draw:glue-point draw:id="4" svg:x="-3.94cm" svg:y="-4.644cm"/>
          <draw:glue-point draw:id="5" svg:x="4.311cm" svg:y="-5.137cm"/>
          <draw:glue-point draw:id="6" svg:x="3.601cm" svg:y="-5.137cm"/>
          <draw:custom-shape draw:style-name="gr13" draw:text-style-name="P10" draw:layer="layout" svg:width="4.465cm" svg:height="1.153cm" svg:x="4.375cm" svg:y="6.7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oradio_logging.py</text:span></text:p>
            <text:p text:style-name="P9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4.465cm" svg:height="2.077cm" svg:x="4.375cm" svg:y="7.87cm">
            <text:p text:style-name="P11"><text:span text:style-name="T4">+ oradio_log.debug()</text:span></text:p>
            <text:p text:style-name="P11"><text:span text:style-name="T4">+ oradio_log.warning()</text:span></text:p>
            <text:p text:style-name="P11"><text:span text:style-name="T4">+ oradio_log.info()</text:span></text:p>
            <text:p text:style-name="P11"><text:span text:style-name="T4">+ oradio_log.err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Throttle" draw:style-name="dp1" draw:master-page-name="Default">
        <draw:custom-shape draw:style-name="gr15" draw:text-style-name="P7" draw:layer="layout" svg:width="20.827cm" svg:height="0.7cm" svg:x="1.445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0.457cm" svg:height="0.7cm" svg:x="1.564cm" svg:y="6.4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0.71cm" svg:height="0.7cm" svg:x="1.311cm" svg:y="17.1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7.122cm" svg:y="7.26cm">
          <draw:text-box>
            <text:p><text:span text:style-name="T5">&lt;&lt;uses&gt;&gt;</text:span></text:p>
          </draw:text-box>
        </draw:frame>
        <draw:custom-shape draw:style-name="gr18" draw:text-style-name="P8" draw:layer="layout" svg:width="21.90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21.907cm" svg:height="0.952cm" svg:x="1cm" svg:y="1.1cm">
          <text:p text:style-name="P6">Static view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" draw:id="id2">
          <draw:custom-shape draw:style-name="gr20" draw:text-style-name="P10" draw:layer="layout" svg:width="7.302cm" svg:height="1.153cm" svg:x="2.37cm" svg:y="8.1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throttled_monitor.py</text:span></text:p>
            <text:p text:style-name="P9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7.302cm" svg:height="0.761cm" svg:x="2.37cm" svg:y="9.255cm">
            <text:p text:style-name="P15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2" draw:layer="layout" svg:width="7.302cm" svg:height="0.599cm" svg:x="2.37cm" svg:y="9.5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+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" draw:id="id1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23" draw:text-style-name="P18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6"><text:span text:style-name="T3">throttled_monitor.RpiThrottlingMonitor</text:span></text:p>
            <text:p text:style-name="P17"><text:span text:style-name="T3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7.62cm" svg:height="0.591cm" svg:x="4.58cm" svg:y="13.474cm">
            <text:p text:style-name="P11"><text:span text:style-name="T4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- init()</text:span></text:p>
            <text:p text:style-name="P11"><text:span text:style-name="T4">+ start()</text:span></text:p>
            <text:p text:style-name="P11"><text:span text:style-name="T4">+ stop()</text:span></text:p>
            <text:p text:style-name="P11"><text:span text:style-name="T4">+ run()</text:span></text:p>
            <text:p text:style-name="P11"><text:span text:style-name="T4">+ force_throttled()</text:span></text:p>
            <text:p text:style-name="P11"><text:span text:style-name="T4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" draw:text-style-name="P19" draw:layer="layout" svg:x1="8.39cm" svg:y1="12.321cm" svg:x2="6.021cm" svg:y2="10.171cm" draw:start-shape="id1" draw:end-shape="id2" svg:d="M8390 12321v-1076h-2369v-1074" svg:viewBox="0 0 2370 2151">
          <text:p/>
        </draw:connector>
        <draw:frame draw:style-name="gr12" draw:text-style-name="P14" draw:layer="layout" svg:width="3.085cm" svg:height="0.725cm" svg:x="6.17cm" svg:y="10.525cm">
          <draw:text-box>
            <text:p><text:span text:style-name="T5">&lt;&lt;uses&gt;&gt;</text:span></text:p>
          </draw:text-box>
        </draw:frame>
        <draw:g draw:style-name="gr1" xml:id="id3" draw:id="id3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1">
            <draw:g draw:style-name="gr1">
              <draw:g draw:style-name="gr1">
                <draw:custom-shape draw:style-name="gr27" draw:text-style-name="P21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20"><text:span text:style-name="T3">&lt;&lt;thread&gt;&gt;</text:span></text:p>
                  <text:p text:style-name="P20"><text:span text:style-name="T3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8" draw:text-style-name="P12" draw:layer="layout" svg:width="5.64cm" svg:height="1.037cm" svg:x="15.997cm" svg:y="14.654cm">
                  <text:p text:style-name="P11"><text:span text:style-name="T4">+ stop_event: Event()</text:span></text:p>
                  <text:p text:style-name="P11"><text:span text:style-name="T4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2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11"><text:span text:style-name="T4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0" draw:text-style-name="P19" draw:layer="layout" svg:x1="15.997cm" svg:y1="14.868cm" svg:x2="12.2cm" svg:y2="14.477cm" draw:start-shape="id3" draw:end-shape="id1" draw:end-glue-point="1" svg:d="M15997 14868h-1898v-391h-1899" svg:viewBox="0 0 3798 392">
          <text:p/>
        </draw:connector>
        <draw:frame draw:style-name="gr12" draw:text-style-name="P14" draw:layer="layout" svg:width="3.81cm" svg:height="0.725cm" svg:x="12.43cm" svg:y="13.292cm">
          <draw:text-box>
            <text:p><text:span text:style-name="T5">&lt;&lt;consists of&gt;&gt;</text:span></text:p>
          </draw:text-box>
        </draw:frame>
        <draw:custom-shape draw:style-name="gr31" draw:text-style-name="P23" xml:id="id4" draw:id="id4" draw:layer="layout" svg:width="6.667cm" svg:height="1.5cm" svg:x="15.288cm" svg:y="11.265cm">
          <text:p text:style-name="P22"><text:span text:style-name="T6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2" draw:text-style-name="P24" draw:layer="layout" draw:type="line" svg:x1="12.2cm" svg:y1="12.748cm" svg:x2="15.288cm" svg:y2="12.015cm" draw:start-shape="id1" draw:start-glue-point="7" draw:end-shape="id4" draw:end-glue-point="5" svg:d="M12200 12748l3088-733" svg:viewBox="0 0 3089 734">
          <text:p/>
        </draw:connector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3" draw:text-style-name="P26" draw:layer="layout" svg:width="20.603cm" svg:height="0.679cm" svg:x="1.669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oradio_contro</text:span><text:span text:style-name="T3">l.py </text:span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7" draw:layer="layout" svg:width="20.603cm" svg:height="2.101cm" svg:x="1.669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5" draw:text-style-name="P28" draw:layer="layout" svg:width="7.706cm" svg:height="0.679cm" svg:x="5.359cm" svg:y="4.30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7.706cm" svg:height="0.679cm" svg:x="5.359cm" svg:y="4.98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throttle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19" draw:layer="layout" svg:x1="6.021cm" svg:y1="8.102cm" svg:x2="6.901cm" svg:y2="5.665cm" draw:start-shape="id2" draw:end-shape="id5" draw:end-glue-point="4" svg:d="M6021 8102v-1219h880v-1218" svg:viewBox="0 0 881 2438">
          <text:p/>
        </draw:connector>
      </draw:page>
      <draw:page draw:name="Messages" draw:style-name="dp1" draw:master-page-name="Default">
        <draw:g draw:style-name="gr1" xml:id="id7" draw:id="id7">
          <draw:g draw:style-name="gr1">
            <draw:g draw:style-name="gr1">
              <draw:custom-shape draw:style-name="gr38" draw:text-style-name="P2" draw:layer="layout" svg:width="4.005cm" svg:height="0.679cm" svg:x="17.51cm" svg:y="7.324cm">
                <draw:glue-point draw:id="4" svg:x="0.5cm" svg:y="0cm" draw:align="top-left"/>
                <text:p text:style-name="P1"><text:span text:style-name="T1">&lt;&lt;Module&gt;&gt; <text:s/>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3" draw:layer="layout" svg:width="7.937cm" svg:height="1.204cm" svg:x="17.51cm" svg:y="8.003cm">
                <draw:glue-point draw:id="4" svg:x="0.501cm" svg:y="-0.003cm" draw:align="bottom-left" draw:escape-direction="down"/>
                <draw:glue-point draw:id="5" svg:x="-0.501cm" svg:y="-0.003cm" draw:align="bottom-right" draw:escape-direction="down"/>
                <draw:glue-point draw:id="6" svg:x="0cm" svg:y="-0.252cm" draw:align="bottom-left" draw:escape-direction="left"/>
                <draw:glue-point draw:id="7" svg:x="0cm" svg:y="-0.252cm" draw:align="bottom-right" draw:escape-direction="right"/>
                <draw:glue-point draw:id="8" svg:x="0cm" svg:y="0.23cm" draw:align="top-left" draw:escape-direction="left"/>
                <draw:glue-point draw:id="9" svg:x="0cm" svg:y="0.23cm" draw:align="top-right" draw:escape-direction="up"/>
                <draw:glue-point draw:id="10" svg:x="-0.501cm" svg:y="0cm" draw:align="top-right" draw:escape-direction="up"/>
                <text:p text:style-name="P16"><text:span text:style-name="T3">All module/classes can publish an error messag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40" draw:text-style-name="P30" draw:layer="layout" svg:width="7.937cm" svg:height="0.493cm" svg:x="17.51cm" svg:y="9.207cm">
              <text:p text:style-name="P29"><text:span text:style-name="T2">- publish_error_message()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41" draw:text-style-name="P7" draw:layer="layout" svg:width="26.507cm" svg:height="0.7cm" svg:x="1.482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7" draw:layer="layout" svg:width="26.037cm" svg:height="0.7cm" svg:x="1.633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custom-shape draw:style-name="gr43" draw:text-style-name="P26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oradio_control.py</text:span></text:p>
            <text:p text:style-name="P25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7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7" draw:layer="layout" svg:width="26.359cm" svg:height="0.7cm" svg:x="1.311cm" svg:y="19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8" draw:layer="layout" svg:width="27.30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7.305cm" svg:height="0.952cm" svg:x="1cm" svg:y="1.1cm">
          <text:p text:style-name="P6">Static view: Messag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11.25cm" svg:y="11.387cm">
          <draw:text-box>
            <text:p><text:span text:style-name="T5">&lt;&lt;uses&gt;&gt;</text:span></text:p>
          </draw:text-box>
          <draw:glue-point draw:id="4" svg:x="4.998cm" svg:y="-4.993cm"/>
          <draw:glue-point draw:id="5" svg:x="4.998cm" svg:y="-4.993cm"/>
          <draw:glue-point draw:id="6" svg:x="4.998cm" svg:y="-4.993cm"/>
        </draw:frame>
        <draw:g draw:style-name="gr1" xml:id="id6" draw:id="id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48" draw:text-style-name="P21" draw:layer="layout" svg:width="10.807cm" svg:height="1.153cm" svg:x="12.045cm" svg:y="15.3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module&gt;&gt;</text:span></text:p>
            <text:p text:style-name="P20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2" draw:layer="layout" svg:width="10.807cm" svg:height="0.435cm" svg:x="12.045cm" svg:y="16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2" draw:layer="layout" svg:width="10.807cm" svg:height="0.993cm" svg:x="12.045cm" svg:y="16.8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publish_command_message(message: CommandMessage)</text:span></text:p>
            <text:p text:style-name="P11"><text:span text:style-name="T4">+ publish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 draw:style-name="gr1">
            <draw:glue-point draw:id="4" svg:x="0.501cm" svg:y="-0.003cm" draw:align="bottom-left"/>
            <draw:glue-point draw:id="5" svg:x="-0.501cm" svg:y="-0.003cm" draw:align="bottom-right"/>
            <draw:glue-point draw:id="6" svg:x="0cm" svg:y="-0.253cm" draw:align="bottom-right"/>
            <draw:glue-point draw:id="7" svg:x="0cm" svg:y="-0.253cm" draw:align="bottom-left"/>
            <draw:glue-point draw:id="8" svg:x="0cm" svg:y="0.751cm" draw:align="top-left"/>
            <draw:glue-point draw:id="9" svg:x="0cm" svg:y="0.751cm" draw:align="top-right"/>
            <draw:glue-point draw:id="10" svg:x="0.501cm" svg:y="0cm" draw:align="top-left"/>
            <draw:glue-point draw:id="11" svg:x="-0.501cm" svg:y="0.501cm" draw:align="top-right" draw:escape-direction="up"/>
            <draw:g draw:style-name="gr1">
              <draw:custom-shape draw:style-name="gr51" draw:text-style-name="P28" draw:layer="layout" svg:width="3.425cm" svg:height="0.679cm" svg:x="1.952cm" svg:y="7.563cm">
                <draw:glue-point draw:id="4" svg:x="0.5cm" svg:y="0cm" draw:align="top-left"/>
                <text:p text:style-name="P25"><text:span text:style-name="T3"><text:s text:c="2"/></text:span><text:span text:style-name="T3">&lt;&lt;class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2" draw:text-style-name="P3" draw:layer="layout" svg:width="7.938cm" svg:height="7.391cm" svg:x="1.952cm" svg:y="8.242cm">
                <draw:glue-point draw:id="4" svg:x="0.501cm" svg:y="-0.003cm" draw:align="bottom-left" draw:escape-direction="down"/>
                <draw:glue-point draw:id="5" svg:x="-0.501cm" svg:y="-0.003cm" draw:align="bottom-right" draw:escape-direction="down"/>
                <draw:glue-point draw:id="6" svg:x="0cm" svg:y="-0.252cm" draw:align="bottom-left" draw:escape-direction="left"/>
                <draw:glue-point draw:id="7" svg:x="0cm" svg:y="-0.252cm" draw:align="bottom-right" draw:escape-direction="right"/>
                <draw:glue-point draw:id="8" svg:x="0cm" svg:y="0.23cm" draw:align="top-left" draw:escape-direction="left"/>
                <draw:glue-point draw:id="9" svg:x="0cm" svg:y="0.23cm" draw:align="top-right" draw:escape-direction="up"/>
                <draw:glue-point draw:id="10" svg:x="-0.501cm" svg:y="0cm" draw:align="top-right" draw:escape-direction="up"/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53" draw:text-style-name="P32" draw:layer="layout" svg:width="7.938cm" svg:height="1.242cm" svg:x="1.952cm" svg:y="15.633cm">
            <text:p text:style-name="P31"><text:span text:style-name="T5">- publish_command_message()</text:span></text:p>
            <draw:enhanced-geometry svg:viewBox="0 0 21600 21600" draw:type="rectangle" draw:enhanced-path="M 0 0 L 21600 0 21600 21600 0 21600 0 0 Z N"/>
          </draw:custom-shape>
        </draw:g>
        <draw:custom-shape draw:style-name="gr54" draw:text-style-name="P34" draw:layer="layout" svg:width="6.985cm" svg:height="0.85cm" svg:x="2.487cm" svg:y="8.82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volume_control.VolumeControl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6.985cm" svg:height="0.85cm" svg:x="2.487cm" svg:y="9.69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spotify_connect.SpotifyConnect</text:span></text:p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6.985cm" svg:height="0.85cm" svg:x="2.487cm" svg:y="10.56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web_service.WebService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6.985cm" svg:height="0.85cm" svg:x="2.487cm" svg:y="11.427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usb_service.USBService</text:span></text:p>
          <draw:enhanced-geometry svg:viewBox="0 0 21600 21600" draw:type="rectangle" draw:enhanced-path="M 0 0 L 21600 0 21600 21600 0 21600 0 0 Z N"/>
        </draw:custom-shape>
        <draw:custom-shape draw:style-name="gr58" draw:text-style-name="P34" draw:layer="layout" svg:width="6.985cm" svg:height="0.85cm" svg:x="2.487cm" svg:y="12.21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touch_buttons.TouchButtons</text:span></text:p>
          <draw:enhanced-geometry svg:viewBox="0 0 21600 21600" draw:type="rectangle" draw:enhanced-path="M 0 0 L 21600 0 21600 21600 0 21600 0 0 Z N"/>
        </draw:custom-shape>
        <draw:connector draw:style-name="gr59" draw:text-style-name="P19" draw:layer="layout" svg:x1="20.615cm" svg:y1="15.311cm" svg:x2="21.478cm" svg:y2="9.7cm" draw:start-shape="id6" draw:start-glue-point="7" draw:end-shape="id7" draw:end-glue-point="2" svg:d="M20615 15311v-2806h863v-2805" svg:viewBox="0 0 864 5612">
          <text:p/>
        </draw:connector>
        <draw:connector draw:style-name="gr60" draw:text-style-name="P19" draw:layer="layout" svg:x1="17.448cm" svg:y1="15.311cm" svg:x2="9.89cm" svg:y2="12.219cm" draw:start-shape="id6" draw:start-glue-point="0" draw:end-shape="id8" svg:d="M17448 15311v-3092h-7558" svg:viewBox="0 0 7559 3093">
          <text:p/>
        </draw:connector>
        <draw:custom-shape draw:style-name="gr61" draw:text-style-name="P34" draw:layer="layout" svg:width="6.985cm" svg:height="0.85cm" svg:x="2.487cm" svg:y="13.06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wifi_service.WifiService</text:span></text:p>
          <draw:enhanced-geometry svg:viewBox="0 0 21600 21600" draw:type="rectangle" draw:enhanced-path="M 0 0 L 21600 0 21600 21600 0 21600 0 0 Z N"/>
        </draw:custom-shape>
      </draw:page>
      <draw:page draw:name="Remote monitoring" draw:style-name="dp1" draw:master-page-name="Default">
        <draw:custom-shape draw:style-name="gr62" draw:text-style-name="P7" draw:layer="layout" svg:width="24.288cm" svg:height="0.7cm" svg:x="1.47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7" draw:layer="layout" svg:width="24.079cm" svg:height="0.7cm" svg:x="1.608cm" svg:y="6.4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24.376cm" svg:height="0.7cm" svg:x="1.311cm" svg:y="18.8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8" draw:layer="layout" svg:width="25.71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66" draw:text-style-name="P10" draw:layer="layout" svg:width="7.19cm" svg:height="1.153cm" svg:x="2.452cm" svg:y="8.6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remote_monitoring.RM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12" draw:layer="layout" svg:width="7.19cm" svg:height="1.002cm" svg:x="2.452cm" svg:y="9.813cm">
              <text:p text:style-name="P15"><text:span text:style-name="T4">- stop_monitor: Event</text:span></text:p>
              <text:p text:style-name="P15"><text:span text:style-name="T4">- wifi_cmd_queue: subscribe_command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12" draw:layer="layout" svg:width="7.19cm" svg:height="0.993cm" svg:x="2.452cm" svg:y="10.81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end_message()</text:span></text:p>
              <text:p text:style-name="P11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9" draw:text-style-name="P13" draw:layer="layout" svg:width="25.717cm" svg:height="0.952cm" svg:x="1cm" svg:y="1.1cm">
          <text:p text:style-name="P6">Static view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9" draw:layer="layout" svg:x1="12.23cm" svg:y1="10.042cm" svg:x2="9.641cm" svg:y2="9.296cm" draw:start-shape="id9" draw:end-shape="id10" draw:end-glue-point="13" svg:d="M12230 10042h-1294v-746h-1295" svg:viewBox="0 0 2590 747">
          <text:p/>
        </draw:connector>
        <draw:frame draw:style-name="gr12" draw:text-style-name="P14" draw:layer="layout" svg:width="3.085cm" svg:height="0.725cm" svg:x="1.635cm" svg:y="13.14cm">
          <draw:text-box>
            <text:p><text:span text:style-name="T5">&lt;&lt;uses&gt;&gt;</text:span></text:p>
          </draw:text-box>
        </draw:frame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71" draw:text-style-name="P10" draw:layer="layout" svg:width="4.445cm" svg:height="1.627cm" svg:x="1.952cm" svg:y="13.98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remote_monitoring.</text:span></text:p>
              <text:p text:style-name="P9"><text:span text:style-name="T3">Heartbeat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12" draw:layer="layout" svg:width="4.445cm" svg:height="0.761cm" svg:x="1.952cm" svg:y="15.6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2" draw:layer="layout" svg:width="4.445cm" svg:height="1.387cm" svg:x="1.952cm" svg:y="16.3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tart_heartbeat()</text:span></text:p>
              <text:p text:style-name="P11"><text:span text:style-name="T4">+ stop_heartbeat()</text:span></text:p>
              <text:p text:style-name="P11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74" draw:text-style-name="P10" draw:layer="layout" svg:width="4.18cm" svg:height="1.153cm" svg:x="11.32cm" svg:y="15.5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BaseClass&gt;&gt;</text:span></text:p>
              <text:p text:style-name="P9"><text:span text:style-name="T3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12" draw:layer="layout" svg:width="4.18cm" svg:height="0.761cm" svg:x="11.32cm" svg:y="16.708cm">
              <text:p text:style-name="P15"><text:span text:style-name="T4">-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2" draw:layer="layout" svg:width="4.18cm" svg:height="0.993cm" svg:x="11.32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tart()</text:span></text:p>
              <text:p text:style-name="P11"><text:span text:style-name="T4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7" draw:text-style-name="P19" draw:layer="layout" svg:x1="5.162cm" svg:y1="13.983cm" svg:x2="4.451cm" svg:y2="11.808cm" draw:start-shape="id11" draw:start-glue-point="14" draw:end-shape="id10" draw:end-glue-point="8" svg:d="M5162 13983v-1089h-711v-1086" svg:viewBox="0 0 712 2176">
          <text:p/>
        </draw:connector>
        <draw:frame draw:style-name="gr12" draw:text-style-name="P14" draw:layer="layout" svg:width="3.085cm" svg:height="0.725cm" svg:x="9.255cm" svg:y="8.06cm">
          <draw:text-box>
            <text:p><text:span text:style-name="T5">&lt;&lt;uses&gt;&gt;</text:span></text:p>
          </draw:text-box>
        </draw:frame>
        <draw:g draw:style-name="gr1" xml:id="id9" draw:id="id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78" draw:text-style-name="P21" draw:layer="layout" svg:width="6.35cm" svg:height="1.153cm" svg:x="12.23cm" svg:y="8.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module&gt;&gt;</text:span></text:p>
            <text:p text:style-name="P20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2" draw:layer="layout" svg:width="6.35cm" svg:height="0.956cm" svg:x="12.23cm" svg:y="9.9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2" draw:layer="layout" svg:width="6.35cm" svg:height="0.599cm" svg:x="12.23cm" svg:y="10.7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subscribe_commands() -&gt;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1" draw:text-style-name="P21" draw:layer="layout" svg:width="8.39cm" svg:height="1.153cm" svg:x="12.4cm" svg:y="12.27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thread&gt;&gt;</text:span></text:p>
            <text:p text:style-name="P20"><text:span text:style-name="T3">wifi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2" draw:layer="layout" svg:width="8.39cm" svg:height="0.784cm" svg:x="12.4cm" svg:y="13.43cm">
            <text:p text:style-name="P11"><text:span text:style-name="T4">+ stop_monitor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2" draw:layer="layout" svg:width="8.39cm" svg:height="0.599cm" svg:x="12.4cm" svg:y="14.21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- safe_get(wifi_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4" draw:text-style-name="P23" xml:id="id13" draw:id="id13" draw:layer="layout" svg:width="6.667cm" svg:height="1.5cm" svg:x="19.285cm" svg:y="9.737cm">
          <text:p text:style-name="P22"><text:span text:style-name="T6">The wifi_monitor thread waits for wifi topic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85" draw:text-style-name="P24" draw:layer="layout" draw:type="line" svg:x1="20.79cm" svg:y1="13.279cm" svg:x2="22.618cm" svg:y2="11.237cm" draw:start-shape="id12" draw:start-glue-point="23" draw:end-shape="id13" draw:end-glue-point="2" svg:d="M20790 13279l1828-2042" svg:viewBox="0 0 1829 2043">
          <text:p/>
        </draw:connector>
        <draw:connector draw:style-name="gr86" draw:text-style-name="P19" draw:layer="layout" svg:x1="12.401cm" svg:y1="14.269cm" svg:x2="7.645cm" svg:y2="11.808cm" draw:start-shape="id12" draw:start-glue-point="11" draw:end-shape="id10" draw:end-glue-point="9" svg:d="M12401 14269h-4756v-2461" svg:viewBox="0 0 4757 2462">
          <text:p/>
        </draw:connector>
        <draw:frame draw:style-name="gr12" draw:text-style-name="P14" draw:layer="layout" svg:width="3.81cm" svg:height="0.725cm" svg:x="8.62cm" svg:y="13.547cm">
          <draw:text-box>
            <text:p><text:span text:style-name="T5">&lt;&lt;consists of&gt;&gt;</text:span></text:p>
          </draw:text-box>
        </draw:frame>
        <draw:connector draw:style-name="gr87" draw:text-style-name="P19" draw:layer="layout" svg:x1="11.321cm" svg:y1="17.918cm" svg:x2="6.396cm" svg:y2="17.213cm" draw:start-shape="id14" draw:start-glue-point="11" draw:end-shape="id11" draw:end-glue-point="12" svg:d="M11321 17918h-2463v-705h-2462" svg:viewBox="0 0 4926 706">
          <text:p/>
        </draw:connector>
        <draw:frame draw:style-name="gr12" draw:text-style-name="P14" draw:layer="layout" svg:width="3.81cm" svg:height="0.725cm" svg:x="6.397cm" svg:y="16.24cm">
          <draw:text-box>
            <text:p><text:span text:style-name="T5">&lt;&lt;consists of&gt;&gt;</text:span></text:p>
          </draw:text-box>
        </draw:fram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88" draw:text-style-name="P26" draw:layer="layout" svg:width="23.812cm" svg:height="0.679cm" svg:x="1.635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27" draw:layer="layout" svg:width="23.812cm" svg:height="2.101cm" svg:x="1.635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90" draw:text-style-name="P28" draw:layer="layout" svg:width="7.706cm" svg:height="0.679cm" svg:x="7.259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3" draw:layer="layout" svg:width="7.706cm" svg:height="0.679cm" svg:x="7.259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14" draw:layer="layout" svg:width="3.085cm" svg:height="0.725cm" svg:x="4.582cm" svg:y="7.515cm">
          <draw:text-box>
            <text:p><text:span text:style-name="T5">&lt;&lt;uses&gt;&gt;</text:span></text:p>
          </draw:text-box>
        </draw:frame>
        <draw:connector draw:style-name="gr92" draw:text-style-name="P19" draw:layer="layout" svg:x1="7.645cm" svg:y1="8.661cm" svg:x2="8.801cm" svg:y2="5.664cm" draw:start-shape="id10" draw:start-glue-point="14" draw:end-shape="id15" draw:end-glue-point="4" svg:d="M7645 8661v-1500h1156v-1497" svg:viewBox="0 0 1157 2998">
          <text:p/>
        </draw:connector>
      </draw:page>
      <draw:page draw:name="Web service" draw:style-name="dp1" draw:master-page-name="Default">
        <draw:custom-shape draw:style-name="gr93" draw:text-style-name="P7" draw:layer="layout" svg:width="23.589cm" svg:height="0.7cm" svg:x="1.465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7" draw:layer="layout" svg:width="23.452cm" svg:height="0.7cm" svg:x="1.602cm" svg:y="6.4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7" draw:layer="layout" svg:width="23.743cm" svg:height="0.7cm" svg:x="1.311cm" svg:y="18.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11.477cm" svg:y="7.577cm">
          <draw:text-box>
            <text:p><text:span text:style-name="T5">&lt;&lt;uses&gt;&gt;</text:span></text:p>
          </draw:text-box>
        </draw:frame>
        <draw:custom-shape draw:style-name="gr96" draw:text-style-name="P8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97" draw:text-style-name="P10" draw:layer="layout" svg:width="6.985cm" svg:height="1.627cm" svg:x="10.525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web_service.</text:span></text:p>
              <text:p text:style-name="P9"><text:span text:style-name="T3">Web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12" draw:layer="layout" svg:width="6.985cm" svg:height="0.949cm" svg:x="10.525cm" svg:y="10.195cm">
              <text:p text:style-name="P15"><text:span text:style-name="T4">- cmd_queue: subscribe_commands()</text:span></text:p>
              <text:p text:style-name="P15"><text:span text:style-name="T4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9" draw:text-style-name="P36" draw:layer="layout" svg:width="6.985cm" svg:height="2.175cm" svg:x="10.525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5"><text:span text:style-name="T4">+ init()</text:span></text:p>
              <text:p text:style-name="P35"><text:span text:style-name="T4">+ stop()</text:span></text:p>
              <text:p text:style-name="P35"><text:span text:style-name="T4">+ get_state()</text:span></text:p>
              <text:p text:style-name="P35"><text:span text:style-name="T4">+ start()</text:span></text:p>
              <text:p text:style-name="P35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0" draw:text-style-name="P13" draw:layer="layout" svg:width="24.765cm" svg:height="0.952cm" svg:x="1cm" svg:y="1.1cm">
          <text:p text:style-name="P6">Static view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6" draw:id="id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01" draw:text-style-name="P10" draw:layer="layout" svg:width="4.763cm" svg:height="1.627cm" svg:x="20.0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web_server.</text:span></text:p>
              <text:p text:style-name="P9"><text:span text:style-name="T3">UvicornServer</text:span></text:p>
              <text:p text:style-name="P9"><text:span text:style-name="T3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2" draw:layer="layout" svg:width="4.763cm" svg:height="0.473cm" svg:x="20.0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12" draw:layer="layout" svg:width="4.763cm" svg:height="1.781cm" svg:x="20.0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init(app:FastAPI)</text:span></text:p>
              <text:p text:style-name="P11"><text:span text:style-name="T4">+ run()</text:span></text:p>
              <text:p text:style-name="P11"><text:span text:style-name="T4">+ start()</text:span></text:p>
              <text:p text:style-name="P11"><text:span text:style-name="T4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18" draw:id="id1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g draw:style-name="gr1">
              <draw:custom-shape draw:style-name="gr104" draw:text-style-name="P10" draw:layer="layout" svg:width="5.602cm" svg:height="1.627cm" svg:x="18.72cm" svg:y="14.01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3">fastapi_server.</text:span></text:p>
                <text:p text:style-name="P9"><text:span text:style-name="T3">api_ap</text:span></text:p>
                <text:p text:style-name="P9"><text:span text:style-name="T3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2" draw:layer="layout" svg:width="5.602cm" svg:height="0.676cm" svg:x="18.72cm" svg:y="15.644cm">
                <text:p text:style-name="P11"><text:span text:style-name="T4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6" draw:text-style-name="P12" draw:layer="layout" svg:width="5.602cm" svg:height="2.175cm" svg:x="18.72cm" svg:y="16.31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4">+ @api_app.get()</text:span></text:p>
                <text:p text:style-name="P11"><text:span text:style-name="T4">+ @api_app.put()</text:span></text:p>
                <text:p text:style-name="P11"><text:span text:style-name="T4">+ @api_app.post()</text:span></text:p>
                <text:p text:style-name="P11"><text:span text:style-name="T4">+ @api_app.api_route()</text:span></text:p>
                <text:p text:style-name="P11"><text:span text:style-name="T4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12" draw:text-style-name="P14" draw:layer="layout" svg:width="3.81cm" svg:height="0.725cm" svg:x="17.51cm" svg:y="8.53cm">
          <draw:text-box>
            <text:p><text:span text:style-name="T5">&lt;&lt;consists of&gt;&gt;</text:span></text:p>
          </draw:text-box>
        </draw:frame>
        <draw:connector draw:style-name="gr107" draw:text-style-name="P19" draw:layer="layout" svg:x1="20.047cm" svg:y1="11.124cm" svg:x2="17.509cm" svg:y2="9.204cm" draw:start-shape="id16" draw:start-glue-point="3" draw:end-shape="id17" draw:end-glue-point="13" svg:d="M20047 11124h-1269v-1920h-1269" svg:viewBox="0 0 2539 1921">
          <text:p/>
        </draw:connector>
        <draw:connector draw:style-name="gr108" draw:text-style-name="P19" draw:layer="layout" svg:x1="24.809cm" svg:y1="12.521cm" svg:x2="24.321cm" svg:y2="14.653cm" draw:start-shape="id16" draw:start-glue-point="12" draw:end-shape="id18" draw:end-glue-point="13" svg:d="M24809 12521h527v2132h-1015" svg:viewBox="0 0 1016 2133">
          <text:p/>
        </draw:connector>
        <draw:frame draw:style-name="gr12" draw:text-style-name="P14" draw:layer="layout" svg:width="3.085cm" svg:height="0.725cm" svg:x="8.302cm" svg:y="8.53cm">
          <draw:text-box>
            <text:p><text:span text:style-name="T5">&lt;&lt;uses&gt;&gt;</text:span></text:p>
          </draw:text-box>
        </draw:frame>
        <draw:frame draw:style-name="gr12" draw:text-style-name="P14" draw:layer="layout" svg:width="3.085cm" svg:height="0.725cm" svg:x="21.955cm" svg:y="13.065cm">
          <draw:text-box>
            <text:p><text:span text:style-name="T5">&lt;&lt;uses&gt;&gt;</text:span></text:p>
          </draw:text-box>
        </draw:frame>
        <draw:g draw:style-name="gr1" xml:id="id20" draw:id="id2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09" draw:text-style-name="P21" draw:layer="layout" svg:width="6.35cm" svg:height="1.153cm" svg:x="1.922cm" svg:y="8.6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module&gt;&gt;</text:span></text:p>
            <text:p text:style-name="P20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2" draw:layer="layout" svg:width="6.35cm" svg:height="0.601cm" svg:x="1.922cm" svg:y="9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2" draw:layer="layout" svg:width="6.35cm" svg:height="0.599cm" svg:x="1.922cm" svg:y="10.3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subscribe_commands() -&gt;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9" draw:id="id1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2" draw:text-style-name="P21" draw:layer="layout" svg:width="8.39cm" svg:height="1.153cm" svg:x="6.8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thread&gt;&gt;</text:span></text:p>
            <text:p text:style-name="P20"><text:span text:style-name="T3">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layout" svg:width="8.39cm" svg:height="0.784cm" svg:x="6.897cm" svg:y="16.44cm">
            <text:p text:style-name="P11"><text:span text:style-name="T4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2" draw:layer="layout" svg:width="8.39cm" svg:height="0.599cm" svg:x="6.8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- safe_get(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5" draw:text-style-name="P23" xml:id="id21" draw:id="id21" draw:layer="layout" svg:width="6.667cm" svg:height="1.5cm" svg:x="1.552cm" svg:y="13.235cm">
          <text:p text:style-name="P22"><text:span text:style-name="T6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16" draw:text-style-name="P19" draw:layer="layout" svg:x1="14.822cm" svg:y1="15.288cm" svg:x2="12.467cm" svg:y2="13.319cm" draw:start-shape="id19" draw:start-glue-point="15" draw:end-shape="id17" draw:end-glue-point="8" svg:d="M14822 15288v-986h-2355v-983" svg:viewBox="0 0 2356 1970">
          <text:p/>
        </draw:connector>
        <draw:frame draw:style-name="gr12" draw:text-style-name="P14" draw:layer="layout" svg:width="3.81cm" svg:height="0.725cm" svg:x="11.16cm" svg:y="14.335cm">
          <draw:text-box>
            <text:p><text:span text:style-name="T5">&lt;&lt;consists of&gt;&gt;</text:span></text:p>
          </draw:text-box>
        </draw:frame>
        <draw:connector draw:style-name="gr117" draw:text-style-name="P19" draw:layer="layout" svg:x1="8.272cm" svg:y1="9.786cm" svg:x2="10.526cm" svg:y2="9.204cm" draw:start-shape="id20" draw:end-shape="id17" draw:end-glue-point="6" svg:d="M8272 9786h1126v-582h1128" svg:viewBox="0 0 2255 583">
          <text:p/>
        </draw:connector>
        <draw:connector draw:style-name="gr118" draw:text-style-name="P24" draw:layer="layout" draw:type="line" svg:x1="8.219cm" svg:y1="13.985cm" svg:x2="9.23cm" svg:y2="15.288cm" draw:start-shape="id21" draw:start-glue-point="7" draw:end-shape="id19" draw:end-glue-point="5" svg:d="M8219 13985l1011 1303" svg:viewBox="0 0 1012 1304">
          <text:p/>
        </draw:connector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19" draw:text-style-name="P26" draw:layer="layout" svg:width="23.177cm" svg:height="0.679cm" svg:x="1.635cm" svg:y="3.2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27" draw:layer="layout" svg:width="23.177cm" svg:height="2.101cm" svg:x="1.635cm" svg:y="3.9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2" draw:id="id2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21" draw:text-style-name="P28" draw:layer="layout" svg:width="7.501cm" svg:height="0.679cm" svg:x="6.809cm" svg:y="4.30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3" draw:layer="layout" svg:width="7.501cm" svg:height="0.679cm" svg:x="6.809cm" svg:y="4.98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web_service: </text:span><text:span text:style-name="T3">We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3" draw:text-style-name="P19" draw:layer="layout" draw:line-skew="0.552cm" svg:x1="10.915cm" svg:y1="8.569cm" svg:x2="8.309cm" svg:y2="5.663cm" draw:start-shape="id17" draw:start-glue-point="4" draw:end-shape="id22" draw:end-glue-point="4" svg:d="M10915 8569v-902h-2606v-2004" svg:viewBox="0 0 2607 2907">
          <text:p/>
        </draw:connector>
      </draw:page>
      <draw:page draw:name="WiFi" draw:style-name="dp1" draw:master-page-name="Default">
        <draw:custom-shape draw:style-name="gr124" draw:text-style-name="P7" draw:layer="layout" svg:width="25.161cm" svg:height="0.7cm" svg:x="1.475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" draw:layer="layout" svg:width="25.015cm" svg:height="0.7cm" svg:x="1.621cm" svg:y="6.5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" draw:layer="layout" svg:width="25.325cm" svg:height="0.7cm" svg:x="1.311cm" svg:y="18.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3.857cm" svg:y="7.577cm">
          <draw:text-box>
            <text:p><text:span text:style-name="T5">&lt;&lt;uses&gt;&gt;</text:span></text:p>
          </draw:text-box>
        </draw:frame>
        <draw:custom-shape draw:style-name="gr127" draw:text-style-name="P8" draw:layer="layout" svg:width="26.35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6" draw:id="id2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28" draw:text-style-name="P10" draw:layer="layout" svg:width="5.654cm" svg:height="1.627cm" svg:x="1.913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wifi_service.</text:span></text:p>
              <text:p text:style-name="P9"><text:span text:style-name="T3">Wifi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12" draw:layer="layout" svg:width="5.654cm" svg:height="0.949cm" svg:x="1.913cm" svg:y="10.1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36" draw:layer="layout" svg:width="5.654cm" svg:height="2.175cm" svg:x="1.913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5"><text:span text:style-name="T4">+ init()</text:span></text:p>
              <text:p text:style-name="P35"><text:span text:style-name="T4">+ get_state()</text:span></text:p>
              <text:p text:style-name="P35"><text:span text:style-name="T4">+ wifi_connect()</text:span></text:p>
              <text:p text:style-name="P35"><text:span text:style-name="T4">+ wifi_disconnect()</text:span></text:p>
              <text:p text:style-name="P35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31" draw:text-style-name="P13" draw:layer="layout" svg:width="26.352cm" svg:height="0.952cm" svg:x="1cm" svg:y="1.1cm">
          <text:p text:style-name="P6">Static view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81cm" svg:height="0.725cm" svg:x="17.51cm" svg:y="15.515cm">
          <draw:text-box>
            <text:p><text:span text:style-name="T5">&lt;&lt;consists of&gt;&gt;</text:span></text:p>
          </draw:text-box>
        </draw:frame>
        <draw:connector draw:style-name="gr132" draw:text-style-name="P19" draw:layer="layout" svg:x1="22.935cm" svg:y1="16.33cm" svg:x2="21.486cm" svg:y2="14.752cm" draw:start-shape="id23" draw:start-glue-point="14" draw:end-shape="id24" draw:end-glue-point="9" svg:d="M22935 16330v-790h-1449v-788" svg:viewBox="0 0 1450 1579">
          <text:p/>
        </draw:connector>
        <draw:connector draw:style-name="gr133" draw:text-style-name="P19" draw:layer="layout" svg:x1="11.841cm" svg:y1="10.137cm" svg:x2="7.566cm" svg:y2="9.204cm" draw:start-shape="id25" draw:start-glue-point="0" draw:end-shape="id26" draw:end-glue-point="13" svg:d="M11841 10137v-933h-4275" svg:viewBox="0 0 4276 934">
          <text:p/>
        </draw:connector>
        <draw:g draw:style-name="gr1" xml:id="id28" draw:id="id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4" draw:text-style-name="P10" draw:layer="layout" svg:width="7.072cm" svg:height="1.627cm" svg:x="2.022cm" svg:y="15.0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wifi_service.</text:span></text:p>
              <text:p text:style-name="P9"><text:span text:style-name="T3">WifiEventListener</text:span></text:p>
              <text:p text:style-name="P9"><text:span text:style-name="T3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5" draw:text-style-name="P12" draw:layer="layout" svg:width="7.072cm" svg:height="0.779cm" svg:x="2.022cm" svg:y="16.6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6" draw:text-style-name="P12" draw:layer="layout" svg:width="7.072cm" svg:height="0.599cm" svg:x="2.022cm" svg:y="17.4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2" draw:text-style-name="P14" draw:layer="layout" svg:width="3.085cm" svg:height="0.725cm" svg:x="4.175cm" svg:y="13.41cm">
          <draw:text-box>
            <text:p><text:span text:style-name="T5">&lt;&lt;uses&gt;&gt;</text:span></text:p>
          </draw:text-box>
        </draw:frame>
        <draw:frame draw:style-name="gr12" draw:text-style-name="P14" draw:layer="layout" svg:width="3.085cm" svg:height="0.725cm" svg:x="8.392cm" svg:y="8.212cm">
          <draw:text-box>
            <text:p><text:span text:style-name="T5">&lt;&lt;uses&gt;&gt;</text:span></text:p>
          </draw:text-box>
        </draw:frame>
        <draw:g draw:style-name="gr1" xml:id="id25" draw:id="id25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37" draw:text-style-name="P21" draw:layer="layout" svg:width="7.327cm" svg:height="1.153cm" svg:x="8.178cm" svg:y="10.13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module&gt;&gt;</text:span></text:p>
            <text:p text:style-name="P20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2" draw:layer="layout" svg:width="7.327cm" svg:height="0.435cm" svg:x="8.178cm" svg:y="11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2" draw:layer="layout" svg:width="7.327cm" svg:height="0.993cm" svg:x="8.178cm" svg:y="11.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publish_command_message(</text:span></text:p>
            <text:p text:style-name="P11"><text:span text:style-name="T4"><text:s text:c="14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7" draw:id="id2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40" draw:text-style-name="P10" draw:layer="layout" svg:width="7.072cm" svg:height="1.153cm" svg:x="10.2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dbus.SystemBus</text:span></text:p>
              <text:p text:style-name="P9"><text:span text:style-name="T3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12" draw:layer="layout" svg:width="7.072cm" svg:height="0.486cm" svg:x="10.2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12" draw:layer="layout" svg:width="7.072cm" svg:height="0.373cm" svg:x="10.2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43" draw:text-style-name="P10" draw:layer="layout" svg:width="7.072cm" svg:height="1.153cm" svg:x="17.8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dbus.Interface</text:span></text:p>
              <text:p text:style-name="P9"><text:span text:style-name="T3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12" draw:layer="layout" svg:width="7.072cm" svg:height="0.448cm" svg:x="17.8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12" draw:layer="layout" svg:width="7.072cm" svg:height="0.345cm" svg:x="17.8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46" draw:text-style-name="P10" draw:layer="layout" svg:width="7.072cm" svg:height="1.153cm" svg:x="16.378cm" svg:y="12.2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wifi_event_listener</text:span></text:p>
              <text:p text:style-name="P9"><text:span text:style-name="T3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12" draw:layer="layout" svg:width="7.072cm" svg:height="0.779cm" svg:x="16.378cm" svg:y="1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12" draw:layer="layout" svg:width="7.072cm" svg:height="0.599cm" svg:x="16.378cm" svg:y="14.15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49" draw:text-style-name="P19" draw:layer="layout" svg:x1="16.887cm" svg:y1="16.281cm" svg:x2="18.345cm" svg:y2="14.752cm" draw:start-shape="id27" draw:start-glue-point="15" draw:end-shape="id24" draw:end-glue-point="8" svg:d="M16887 16281v-766h1458v-763" svg:viewBox="0 0 1459 1530">
          <text:p/>
        </draw:connector>
        <draw:connector draw:style-name="gr150" draw:text-style-name="P19" draw:layer="layout" svg:x1="16.379cm" svg:y1="14.208cm" svg:x2="9.093cm" svg:y2="15.666cm" draw:start-shape="id24" draw:start-glue-point="11" draw:end-shape="id28" draw:end-glue-point="13" svg:d="M16379 14208h-3643v1458h-3643" svg:viewBox="0 0 7287 1459">
          <text:p/>
        </draw:connector>
        <draw:connector draw:style-name="gr151" draw:text-style-name="P19" draw:layer="layout" svg:x1="7.13cm" svg:y1="15.031cm" svg:x2="3.485cm" svg:y2="13.319cm" draw:start-shape="id28" draw:start-glue-point="14" draw:end-shape="id26" draw:end-glue-point="8" svg:d="M7130 15031v-857h-3645v-855" svg:viewBox="0 0 3646 1713">
          <text:p/>
        </draw:connector>
        <draw:custom-shape draw:style-name="gr152" draw:text-style-name="P23" xml:id="id29" draw:id="id29" draw:layer="layout" svg:width="7.703cm" svg:height="1.905cm" svg:x="18.432cm" svg:y="8.915cm">
          <text:p text:style-name="P22"><text:span text:style-name="T6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53" draw:text-style-name="P24" draw:layer="layout" draw:type="line" svg:x1="23.058cm" svg:y1="12.222cm" svg:x2="22.283cm" svg:y2="10.82cm" draw:start-shape="id24" draw:start-glue-point="15" draw:end-shape="id29" draw:end-glue-point="2" svg:d="M23058 12222l-775-1402" svg:viewBox="0 0 776 1403">
          <text:p/>
        </draw:connector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54" draw:text-style-name="P26" draw:layer="layout" svg:width="24.765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o</text:span><text:span text:style-name="T3">r</text:span><text:span text:style-name="T3">a</text:span><text:span text:style-name="T3">d</text:span><text:span text:style-name="T3">i</text:span><text:span text:style-name="T3">o</text:span><text:span text:style-name="T3">_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.</text:span><text:span text:style-name="T3">p</text:span><text:span text:style-name="T3">y</text:span><text:span text:style-name="T3"> </text:span><text:span text:style-name="T3">&lt;</text:span><text:span text:style-name="T3">&lt;</text:span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3">&gt;</text:span><text:span text:style-name="T3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27" draw:layer="layout" svg:width="24.765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0" draw:id="id3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56" draw:text-style-name="P28" draw:layer="layout" svg:width="8.014cm" svg:height="0.679cm" svg:x="7.164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3" draw:layer="layout" svg:width="8.014cm" svg:height="0.679cm" svg:x="7.164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wifi_service: </text:span><text:span text:style-name="T3">Wifi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8" draw:text-style-name="P19" draw:layer="layout" draw:line-skew="0.553cm" svg:x1="3.485cm" svg:y1="8.569cm" svg:x2="8.767cm" svg:y2="5.662cm" draw:start-shape="id26" draw:start-glue-point="5" draw:end-shape="id30" draw:end-glue-point="4" svg:d="M3485 8569v-902h5282v-2005" svg:viewBox="0 0 5283 2908">
          <text:p/>
        </draw:connector>
      </draw:page>
      <draw:page draw:name="USB" draw:style-name="dp1" draw:master-page-name="Default">
        <draw:custom-shape draw:style-name="gr159" draw:text-style-name="P7" draw:layer="layout" svg:width="23.905cm" svg:height="0.7cm" svg:x="1.473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7" draw:layer="layout" svg:width="23.771cm" svg:height="0.7cm" svg:x="1.607cm" svg:y="6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7" draw:layer="layout" svg:width="23.688cm" svg:height="0.7cm" svg:x="1.411cm" svg:y="18.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9.702cm" svg:y="12.657cm">
          <draw:text-box>
            <text:p><text:span text:style-name="T5">&lt;&lt;uses&gt;&gt;</text:span></text:p>
          </draw:text-box>
        </draw:frame>
        <draw:custom-shape draw:style-name="gr162" draw:text-style-name="P8" draw:layer="layout" svg:width="25.4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63" draw:text-style-name="P10" draw:layer="layout" svg:width="6.54cm" svg:height="1.153cm" svg:x="16.812cm" svg:y="8.7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usb_service.USB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12" draw:layer="layout" svg:width="6.54cm" svg:height="1.075cm" svg:x="16.812cm" svg:y="9.864cm">
              <text:p text:style-name="P15"><text:span text:style-name="T4">- observer: Observ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12" draw:layer="layout" svg:width="6.54cm" svg:height="0.993cm" svg:x="16.812cm" svg:y="10.9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init()</text:span></text:p>
              <text:p text:style-name="P11"><text:span text:style-name="T4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66" draw:text-style-name="P13" draw:layer="layout" svg:width="25.4cm" svg:height="0.952cm" svg:x="1cm" svg:y="1.1cm">
          <text:p text:style-name="P6">Static view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4" draw:id="id3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g draw:style-name="gr1">
              <draw:custom-shape draw:style-name="gr167" draw:text-style-name="P10" draw:layer="layout" svg:width="5.448cm" svg:height="1.153cm" svg:x="11.149cm" svg:y="13.60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3">&lt;&lt;singleton&gt;&gt;</text:span></text:p>
                <text:p text:style-name="P9"><text:span text:style-name="T3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8" draw:text-style-name="P12" draw:layer="layout" svg:width="5.448cm" svg:height="0.692cm" svg:x="11.149cm" svg:y="14.758cm">
                <text:p text:style-name="P15"><text:span text:style-name="T4">- obse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9" draw:text-style-name="P12" draw:layer="layout" svg:width="5.448cm" svg:height="0.993cm" svg:x="11.149cm" svg:y="15.45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4">+ on_created(event)</text:span></text:p>
                <text:p text:style-name="P11"><text:span text:style-name="T4">+ on_deleted (even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1" xml:id="id37" draw:id="id3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70" draw:text-style-name="P10" draw:layer="layout" svg:width="6.718cm" svg:height="1.153cm" svg:x="1.542cm" svg:y="15.8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BaseClass&gt;&gt;</text:span></text:p>
              <text:p text:style-name="P9"><text:span text:style-name="T3">FileSystem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12" draw:layer="layout" svg:width="6.718cm" svg:height="0.366cm" svg:x="1.542cm" svg:y="16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12" draw:layer="layout" svg:width="6.718cm" svg:height="0.993cm" svg:x="1.542cm" svg:y="17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on_created( event)</text:span></text:p>
              <text:p text:style-name="P11"><text:span text:style-name="T4">+ on_deleted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36" draw:id="id3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73" draw:text-style-name="P28" draw:layer="layout" svg:width="4.41cm" svg:height="1.627cm" svg:x="20.11cm" svg:y="14.5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25"><text:span text:style-name="T3">&lt;&lt;Library&gt;&gt;</text:span></text:p>
              <text:p text:style-name="P37"><text:span text:style-name="T3">watchdog.observers.</text:span></text:p>
              <text:p text:style-name="P37"><text:span text:style-name="T3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2" draw:layer="layout" svg:width="4.41cm" svg:height="0.599cm" svg:x="20.11cm" svg:y="16.165cm">
              <text:p text:style-name="P11">- USBObserver: 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5" draw:text-style-name="P12" draw:layer="layout" svg:width="4.41cm" svg:height="0.993cm" svg:x="20.11cm" svg:y="16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chedule()</text:span></text:p>
              <text:p text:style-name="P11"><text:span text:style-name="T4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76" draw:text-style-name="P14" draw:layer="layout" svg:width="2.223cm" svg:height="0.862cm" svg:x="8.66cm" svg:y="16.648cm">
          <draw:text-box>
            <text:p><text:span text:style-name="T5">&lt;&lt;is a&gt;</text:span></text:p>
          </draw:text-box>
        </draw:frame>
        <draw:frame draw:style-name="gr12" draw:text-style-name="P14" draw:layer="layout" svg:width="3.81cm" svg:height="0.725cm" svg:x="19.137cm" svg:y="12.34cm">
          <draw:text-box>
            <text:p><text:span text:style-name="T5">&lt;&lt;consists of&gt;&gt;</text:span></text:p>
          </draw:text-box>
        </draw:fram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77" draw:text-style-name="P26" draw:layer="layout" svg:width="23.838cm" svg:height="0.679cm" svg:x="1.609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27" draw:layer="layout" svg:width="23.838cm" svg:height="2.101cm" svg:x="1.609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2" draw:id="id3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79" draw:text-style-name="P28" draw:layer="layout" svg:width="8.002cm" svg:height="0.679cm" svg:x="16.1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3" draw:layer="layout" svg:width="8.002cm" svg:height="0.679cm" svg:x="16.1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usb_service = US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1" draw:text-style-name="P19" draw:layer="layout" draw:line-skew="0.697cm" svg:x1="18.631cm" svg:y1="8.712cm" svg:x2="19.329cm" svg:y2="5.867cm" draw:start-shape="id31" draw:start-glue-point="5" draw:end-shape="id32" draw:end-glue-point="5" svg:d="M18631 8712v-727h698v-2118" svg:viewBox="0 0 699 2846">
          <text:p/>
        </draw:connector>
        <draw:g draw:style-name="gr1" xml:id="id33" draw:id="id33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82" draw:text-style-name="P21" draw:layer="layout" svg:width="7.297cm" svg:height="1.153cm" svg:x="8.137cm" svg:y="8.84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module&gt;&gt;</text:span></text:p>
            <text:p text:style-name="P20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2" draw:layer="layout" svg:width="7.297cm" svg:height="0.435cm" svg:x="8.137cm" svg:y="9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2" draw:layer="layout" svg:width="7.297cm" svg:height="0.993cm" svg:x="8.137cm" svg:y="10.36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publish_command_message(</text:span></text:p>
            <text:p text:style-name="P11"><text:span text:style-name="T4"><text:s text:c="17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5" draw:text-style-name="P19" draw:layer="layout" svg:x1="11.785cm" svg:y1="11.36cm" svg:x2="15.084cm" svg:y2="13.606cm" draw:start-shape="id33" draw:end-shape="id34" draw:end-glue-point="14" svg:d="M11785 11360v1122h3299v1124" svg:viewBox="0 0 3300 2247">
          <text:p/>
        </draw:connector>
        <draw:g draw:style-name="gr1" xml:id="id35" draw:id="id3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86" draw:text-style-name="P10" draw:layer="layout" svg:width="5.397cm" svg:height="1.153cm" svg:x="1.593cm" svg:y="11.90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module&gt;&gt;</text:span></text:p>
              <text:p text:style-name="P9"><text:span text:style-name="T3">wifi_service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12" draw:layer="layout" svg:width="5.397cm" svg:height="0.434cm" svg:x="1.593cm" svg:y="13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12" draw:layer="layout" svg:width="5.397cm" svg:height="0.993cm" svg:x="1.593cm" svg:y="13.4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networkmanager_add(</text:span></text:p>
              <text:p text:style-name="P11"><text:span text:style-name="T4"><text:s text:c="9"/></text:span><text:span text:style-name="T4">network:str, 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89" draw:text-style-name="P19" draw:layer="layout" svg:x1="6.989cm" svg:y1="12.543cm" svg:x2="11.149cm" svg:y2="14.234cm" draw:start-shape="id35" draw:start-glue-point="13" draw:end-shape="id34" draw:end-glue-point="21" svg:d="M6989 12543h2080v1691h2080" svg:viewBox="0 0 4161 1692">
          <text:p/>
        </draw:connector>
        <draw:frame draw:style-name="gr12" draw:text-style-name="P14" draw:layer="layout" svg:width="3.81cm" svg:height="0.725cm" svg:x="19.137cm" svg:y="13.292cm">
          <draw:text-box>
            <text:p><text:span text:style-name="T5">&lt;&lt;schedules&gt;&gt;</text:span></text:p>
          </draw:text-box>
        </draw:frame>
        <draw:connector draw:style-name="gr190" draw:text-style-name="P19" draw:layer="layout" svg:x1="23.295cm" svg:y1="14.539cm" svg:x2="18.631cm" svg:y2="11.932cm" draw:start-shape="id36" draw:start-glue-point="14" draw:end-shape="id31" draw:end-glue-point="8" svg:d="M23295 14539v-1305h-4664v-1302" svg:viewBox="0 0 4665 2608">
          <text:p/>
        </draw:connector>
        <draw:connector draw:style-name="gr191" draw:text-style-name="P19" draw:layer="layout" svg:x1="16.596cm" svg:y1="15.899cm" svg:x2="20.111cm" svg:y2="15.174cm" draw:start-shape="id34" draw:start-glue-point="12" draw:end-shape="id36" draw:end-glue-point="6" svg:d="M16596 15899h1758v-725h1757" svg:viewBox="0 0 3516 726">
          <text:p/>
        </draw:connector>
        <draw:frame draw:style-name="gr192" draw:text-style-name="P14" draw:layer="layout" svg:width="3.085cm" svg:height="0.725cm" svg:x="17.232cm" svg:y="16.24cm">
          <draw:text-box>
            <text:p><text:span text:style-name="T5">&lt;&lt;uses&gt;&gt;</text:span></text:p>
          </draw:text-box>
        </draw:frame>
        <draw:connector draw:style-name="gr193" draw:text-style-name="P19" draw:layer="layout" svg:x1="11.15cm" svg:y1="15.899cm" svg:x2="8.259cm" svg:y2="16.458cm" draw:start-shape="id34" draw:start-glue-point="11" draw:end-shape="id37" draw:end-glue-point="13" svg:d="M11150 15899h-1445v559h-1446" svg:viewBox="0 0 2892 560">
          <text:p/>
        </draw:connector>
        <draw:frame draw:style-name="gr192" draw:text-style-name="P14" draw:layer="layout" svg:width="3.085cm" svg:height="0.725cm" svg:x="19.732cm" svg:y="7.577cm">
          <draw:text-box>
            <text:p><text:span text:style-name="T5">&lt;&lt;uses&gt;&gt;</text:span></text:p>
          </draw:text-box>
        </draw:frame>
      </draw:page>
      <draw:page draw:name="Volume" draw:style-name="dp1" draw:master-page-name="Default">
        <draw:custom-shape draw:style-name="gr194" draw:text-style-name="P7" draw:layer="layout" svg:width="23.669cm" svg:height="0.7cm" svg:x="1.461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7" draw:layer="layout" svg:width="23.537cm" svg:height="0.7cm" svg:x="1.593cm" svg:y="6.3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7" draw:layer="layout" svg:width="23.819cm" svg:height="0.7cm" svg:x="1.311cm" svg:y="17cm">
          <text:p text:style-name="P38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4.9cm" svg:y="7.032cm">
          <draw:text-box>
            <text:p><text:span text:style-name="T5">&lt;&lt;uses&gt;&gt;</text:span></text:p>
          </draw:text-box>
        </draw:frame>
        <draw:custom-shape draw:style-name="gr197" draw:text-style-name="P8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9" draw:id="id3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98" draw:text-style-name="P10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volume_control.VolumeControl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9" draw:text-style-name="P12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0" draw:text-style-name="P40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9"><text:span text:style-name="T8">+ set_notify()</text:span></text:p>
              <text:p text:style-name="P39"><text:span text:style-name="T8">+ start()</text:span></text:p>
              <text:p text:style-name="P39"><text:span text:style-name="T8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0" draw:text-style-name="P13" draw:layer="layout" svg:width="24.765cm" svg:height="0.952cm" svg:x="1cm" svg:y="1.1cm">
          <text:p text:style-name="P6">Static view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01" draw:text-style-name="P10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i2c_service.I2C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2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2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read_byte(device: int, register: int)</text:span></text:p>
              <text:p text:style-name="P11"><text:span text:style-name="T4">+ write_byte(device: int, register: int)</text:span></text:p>
              <text:p text:style-name="P11"><text:span text:style-name="T9">+ </text:span><text:span text:style-name="T10">read_block</text:span><text:span text:style-name="T9">(device: int, register: int, length: int)</text:span></text:p>
              <text:p text:style-name="P11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04" draw:text-style-name="P19" draw:layer="layout" svg:x1="22.449cm" svg:y1="8.906cm" svg:x2="13.941cm" svg:y2="8.247cm" draw:start-shape="id38" draw:start-glue-point="14" draw:end-shape="id39" draw:end-glue-point="13" svg:d="M22449 8906v-659h-8508" svg:viewBox="0 0 8509 660">
          <text:p/>
        </draw:connector>
        <draw:frame draw:style-name="gr12" draw:text-style-name="P14" draw:layer="layout" svg:width="2.512cm" svg:height="0.725cm" svg:x="15.287cm" svg:y="7.467cm">
          <draw:text-box>
            <text:p><text:span text:style-name="T5">&lt;&lt;has&gt;&gt;</text:span></text:p>
          </draw:text-box>
        </draw:frame>
        <draw:frame draw:style-name="gr205" draw:text-style-name="P41" draw:layer="layout" svg:width="7.937cm" svg:height="1.673cm" svg:x="2.587cm" svg:y="18.145cm">
          <draw:text-box>
            <text:p><text:span text:style-name="T11">Waarom start(), stop(), </text:span><text:span text:style-name="T11">set_notify(). Staat altijd op </text:span><text:span text:style-name="T11">notify. Dus notify default </text:span><text:span text:style-name="T11">aan. Gaat nooit gestopt </text:span><text:span text:style-name="T11">worden</text:span></text:p>
          </draw:text-box>
        </draw:fram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06" draw:text-style-name="P26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27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0" draw:id="id4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8" draw:text-style-name="P28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3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0" draw:text-style-name="P19" draw:layer="layout" draw:line-skew="0.457cm" svg:x1="9.115cm" svg:y1="7.612cm" svg:x2="7.552cm" svg:y2="5.566cm" draw:start-shape="id39" draw:start-glue-point="5" draw:end-shape="id40" draw:end-glue-point="4" svg:d="M9115 7612v-567h-1563v-1479" svg:viewBox="0 0 1564 2047">
          <text:p/>
        </draw:connector>
        <draw:g draw:style-name="gr1" xml:id="id41" draw:id="id41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11" draw:text-style-name="P21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thread&gt;&gt;</text:span></text:p>
            <text:p text:style-name="P20"><text:span text:style-name="T3">volume_control.</text:span></text:p>
            <text:p text:style-name="P20"><text:span text:style-name="T3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12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2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4" draw:text-style-name="P19" draw:layer="layout" svg:x1="11.841cm" svg:y1="12.932cm" svg:x2="13.571cm" svg:y2="10.916cm" draw:start-shape="id41" draw:start-glue-point="0" draw:end-shape="id39" draw:end-glue-point="10" svg:d="M11841 12932v-1009h1730v-1007" svg:viewBox="0 0 1731 2017">
          <text:p/>
        </draw:connector>
        <draw:g draw:style-name="gr1" xml:id="id42" draw:id="id42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15" draw:text-style-name="P21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module&gt;&gt;</text:span></text:p>
            <text:p text:style-name="P20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12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7" draw:text-style-name="P12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publish_command_message(</text:span></text:p>
            <text:p text:style-name="P11"><text:span text:style-name="T4"><text:s text:c="17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8" draw:text-style-name="P19" draw:layer="layout" svg:x1="5.288cm" svg:y1="11.412cm" svg:x2="7.257cm" svg:y2="10.372cm" draw:start-shape="id42" draw:start-glue-point="0" draw:end-shape="id39" draw:end-glue-point="11" svg:d="M5288 11412v-1040h1969" svg:viewBox="0 0 1970 1041">
          <text:p/>
        </draw:connector>
        <draw:custom-shape draw:style-name="gr219" draw:text-style-name="P23" xml:id="id43" draw:id="id43" draw:layer="layout" svg:width="8.89cm" svg:height="1.719cm" svg:x="16.24cm" svg:y="14.521cm">
          <text:p text:style-name="P22"><text:span text:style-name="T6">The volume_manager thread waits for volume (adc) changes, set new volume and publishes a volume changed messag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20" draw:text-style-name="P24" draw:layer="layout" draw:type="line" svg:x1="14.11cm" svg:y1="14.427cm" svg:x2="16.24cm" svg:y2="15.381cm" draw:start-shape="id41" draw:end-shape="id43" draw:end-glue-point="5" svg:d="M14110 14427l2130 954" svg:viewBox="0 0 2131 955">
          <text:p/>
        </draw:connector>
        <draw:g draw:style-name="gr1" xml:id="id44" draw:id="id4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21" draw:text-style-name="P10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volume_adc</text:span></text:p>
              <text:p text:style-name="P9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2" draw:text-style-name="P12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3" draw:text-style-name="P12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24" draw:text-style-name="P19" draw:layer="layout" svg:x1="15.358cm" svg:y1="18.188cm" svg:x2="13.941cm" svg:y2="10.372cm" draw:start-shape="id44" draw:start-glue-point="5" draw:end-shape="id39" draw:end-glue-point="12" svg:d="M15358 18188v-7816h-1417" svg:viewBox="0 0 1418 7817">
          <text:p/>
        </draw:connector>
      </draw:page>
      <draw:page draw:name="Error" draw:style-name="dp1" draw:master-page-name="Default">
        <draw:custom-shape draw:style-name="gr225" draw:text-style-name="P7" draw:layer="layout" svg:width="19.565cm" svg:height="0.7cm" svg:x="1.43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7" draw:layer="layout" svg:width="19.218cm" svg:height="0.7cm" svg:x="1.549cm" svg:y="6.4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7" draw:layer="layout" svg:width="19.456cm" svg:height="0.7cm" svg:x="1.311cm" svg:y="17.1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4.582cm" svg:y="7.895cm">
          <draw:text-box>
            <text:p><text:span text:style-name="T5">&lt;&lt;uses&gt;&gt;</text:span></text:p>
          </draw:text-box>
        </draw:frame>
        <draw:custom-shape draw:style-name="gr228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7" draw:id="id4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29" draw:text-style-name="P10" draw:layer="layout" svg:width="6.229cm" svg:height="1.153cm" svg:x="1.756cm" svg:y="8.9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error_service.py.Error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0" draw:text-style-name="P12" draw:layer="layout" svg:width="6.229cm" svg:height="0.746cm" svg:x="1.756cm" svg:y="10.064cm">
              <text:p text:style-name="P11"><text:span text:style-name="T4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2" draw:layer="layout" svg:width="6.229cm" svg:height="0.993cm" svg:x="1.756cm" svg:y="10.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- init()</text:span></text:p>
              <text:p text:style-name="P11"><text:span text:style-name="T4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2" draw:text-style-name="P13" draw:layer="layout" svg:width="20.637cm" svg:height="0.952cm" svg:x="1cm" svg:y="1.1cm">
          <text:p text:style-name="P6">Static view: Erro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5" draw:id="id45">
          <draw:glue-point draw:id="4" svg:x="-4cm" svg:y="-5cm"/>
          <draw:custom-shape draw:style-name="gr233" draw:text-style-name="P21" draw:layer="layout" svg:width="5.715cm" svg:height="1.153cm" svg:x="11.132cm" svg:y="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module&gt;&gt;</text:span></text:p>
            <text:p text:style-name="P20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4" draw:text-style-name="P12" draw:layer="layout" svg:width="5.715cm" svg:height="0.771cm" svg:x="11.132cm" svg:y="15.153cm">
            <text:p text:style-name="P11"><text:span text:style-name="T4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5" draw:text-style-name="P12" draw:layer="layout" svg:width="5.715cm" svg:height="0.599cm" svg:x="11.132cm" svg:y="15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6" draw:text-style-name="P19" draw:layer="layout" svg:x1="13.989cm" svg:y1="14cm" svg:x2="11.881cm" svg:y2="12.492cm" draw:start-shape="id45" draw:end-shape="id46" draw:end-glue-point="5" svg:d="M13989 14000v-754h-2108v-754" svg:viewBox="0 0 2109 1509">
          <text:p/>
        </draw:connector>
        <draw:frame draw:style-name="gr12" draw:text-style-name="P14" draw:layer="layout" svg:width="3.085cm" svg:height="0.725cm" svg:x="14.335cm" svg:y="12.975cm">
          <draw:text-box>
            <text:p><text:span text:style-name="T5">&lt;&lt;uses&gt;&gt;</text:span></text:p>
          </draw:text-box>
        </draw:frame>
        <draw:g draw:style-name="gr1" xml:id="id46" draw:id="id46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37" draw:text-style-name="P21" draw:layer="layout" svg:width="6.163cm" svg:height="1.153cm" svg:x="10.712cm" svg:y="9.7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thread&gt;&gt;</text:span></text:p>
            <text:p text:style-name="P20"><text:span text:style-name="T3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12" draw:layer="layout" svg:width="6.163cm" svg:height="0.517cm" svg:x="10.712cm" svg:y="1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9" draw:text-style-name="P12" draw:layer="layout" svg:width="6.163cm" svg:height="1.18cm" svg:x="10.712cm" svg:y="11.3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0" draw:text-style-name="P19" draw:layer="layout" svg:x1="10.712cm" svg:y1="11.105cm" svg:x2="7.984cm" svg:y2="9.547cm" draw:start-shape="id46" draw:end-shape="id47" draw:end-glue-point="13" svg:d="M10712 11105h-1364v-1558h-1364" svg:viewBox="0 0 2729 1559">
          <text:p/>
        </draw:connector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41" draw:text-style-name="P26" draw:layer="layout" svg:width="19.311cm" svg:height="0.679cm" svg:x="1.691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27" draw:layer="layout" svg:width="19.311cm" svg:height="2.101cm" svg:x="1.691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8" draw:id="id4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43" draw:text-style-name="P28" draw:layer="layout" svg:width="6.985cm" svg:height="0.679cm" svg:x="5.762cm" svg:y="4.24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4" draw:text-style-name="P3" draw:layer="layout" svg:width="6.985cm" svg:height="0.679cm" svg:x="5.762cm" svg:y="4.92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_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text:span text:style-name="T3">=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(</text:span><text:span text:style-name="T3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5" draw:text-style-name="P19" draw:layer="layout" draw:line-skew="0.409cm" svg:x1="3.488cm" svg:y1="8.912cm" svg:x2="7.159cm" svg:y2="5.606cm" draw:start-shape="id47" draw:start-glue-point="5" draw:end-shape="id48" draw:end-glue-point="4" svg:d="M3488 8912v-1245h3671v-2061" svg:viewBox="0 0 3672 3307">
          <text:p/>
        </draw:connector>
      </draw:page>
      <draw:page draw:name="Messaging" draw:style-name="dp1" draw:master-page-name="Default">
        <draw:custom-shape draw:style-name="gr246" draw:text-style-name="P7" draw:layer="layout" svg:width="26.821cm" svg:height="0.7cm" svg:x="1.484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7" draw:layer="layout" svg:width="26.346cm" svg:height="0.7cm" svg:x="1.637cm" svg:y="7.4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6" draw:layer="layout" svg:width="26.435cm" svg:height="0.679cm" svg:x="1.635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5"><text:span text:style-name="T3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7" draw:layer="layout" svg:width="26.435cm" svg:height="3.049cm" svg:x="1.635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6"><text:span text:style-name="T3"/></text:p>
          <text:p text:style-name="P16"><text:span text:style-name="T3"/></text:p>
          <text:p text:style-name="P16"><text:span text:style-name="T3"/></text:p>
          <text:p text:style-name="P16"><text:span text:style-name="T3"/></text:p>
          <text:p text:style-name="P16"><text:span text:style-name="T3"/></text:p>
          <text:p text:style-name="P1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7" draw:layer="layout" svg:width="26.672cm" svg:height="0.7cm" svg:x="1.311cm" svg:y="18.5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4.582cm" svg:y="8.212cm">
          <draw:text-box>
            <text:p><text:span text:style-name="T5">&lt;&lt;uses&gt;&gt;</text:span></text:p>
          </draw:text-box>
        </draw:frame>
        <draw:custom-shape draw:style-name="gr251" draw:text-style-name="P8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9" draw:id="id4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52" draw:text-style-name="P10" draw:layer="layout" svg:width="9.721cm" svg:height="1.153cm" svg:x="1.756cm" svg:y="8.9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essaging</text:span></text:p>
              <text:p text:style-name="P9"><text:span text:style-name="T3">&lt;&lt;modul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3" draw:text-style-name="P12" draw:layer="layout" svg:width="9.721cm" svg:height="0.985cm" svg:x="1.756cm" svg:y="10.14cm">
              <text:p text:style-name="P11"><text:span text:style-name="T4">- CommandMessage()</text:span></text:p>
              <text:p text:style-name="P11"><text:span text:style-name="T4">- Error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12" draw:layer="layout" svg:width="9.721cm" svg:height="2.963cm" svg:x="1.756cm" svg:y="11.0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ubscribe_commands() -&gt; Queue</text:span></text:p>
              <text:p text:style-name="P11"><text:span text:style-name="T4">+ subscribe_errors() -&gt; Queue</text:span></text:p>
              <text:p text:style-name="P11"><text:span text:style-name="T4">+ unsubscribe_commands(queue: Queue)</text:span></text:p>
              <text:p text:style-name="P11"><text:span text:style-name="T4">+ unsubscribe_errors(queue: Queue)</text:span></text:p>
              <text:p text:style-name="P11"><text:span text:style-name="T4">+ publish_command(message: CommandMessage)</text:span></text:p>
              <text:p text:style-name="P11"><text:span text:style-name="T4">+ publish_error(message: ErrorMessage)</text:span></text:p>
              <text:p text:style-name="P11"><text:span text:style-name="T4">+ safe_get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55" draw:text-style-name="P19" draw:layer="layout" svg:x1="8.776cm" svg:y1="8.989cm" svg:x2="9.963cm" svg:y2="5.45cm" draw:start-shape="id49" draw:start-glue-point="14" draw:end-shape="id50" draw:end-glue-point="5" svg:d="M8776 8989v-1771h1187v-1768" svg:viewBox="0 0 1188 3540">
          <text:p/>
        </draw:connector>
        <draw:custom-shape draw:style-name="gr256" draw:text-style-name="P13" draw:layer="layout" svg:width="27.7cm" svg:height="0.952cm" svg:x="1cm" svg:y="1.1cm">
          <text:p text:style-name="P6">Static view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4" draw:id="id5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57" draw:text-style-name="P10" draw:layer="layout" svg:width="6.667cm" svg:height="1.153cm" svg:x="18.068cm" svg:y="15.10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essaging.CommandMessage</text:span></text:p>
              <text:p text:style-name="P9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8" draw:text-style-name="P12" draw:layer="layout" svg:width="6.667cm" svg:height="1.454cm" svg:x="18.068cm" svg:y="16.257cm">
              <text:p text:style-name="P11"><text:span text:style-name="T4">+ source: String</text:span></text:p>
              <text:p text:style-name="P11"><text:span text:style-name="T4">+ message: String</text:span></text:p>
              <text:p text:style-name="P11"><text:span text:style-name="T4">+ data: Any</text:span></text:p>
              <text:p text:style-name="P11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9" draw:text-style-name="P12" draw:layer="layout" svg:width="6.667cm" svg:height="0.599cm" svg:x="18.068cm" svg:y="17.7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<text:s/></text:span><text:span text:style-name="T4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3" draw:id="id5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60" draw:text-style-name="P10" draw:layer="layout" svg:width="6.667cm" svg:height="1.153cm" svg:x="10.208cm" svg:y="15.25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essaging.ErrorMessage</text:span></text:p>
              <text:p text:style-name="P9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1" draw:text-style-name="P12" draw:layer="layout" svg:width="6.667cm" svg:height="0.994cm" svg:x="10.208cm" svg:y="16.405cm">
              <text:p text:style-name="P11"><text:span text:style-name="T4">+ source: String</text:span></text:p>
              <text:p text:style-name="P11"><text:span text:style-name="T4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2" draw:text-style-name="P12" draw:layer="layout" svg:width="6.667cm" svg:height="0.599cm" svg:x="10.208cm" svg:y="17.39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<text:s/></text:span><text:span text:style-name="T4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1" draw:id="id5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63" draw:text-style-name="P10" draw:layer="layout" svg:width="11.43cm" svg:height="1.153cm" svg:x="15.922cm" svg:y="9.4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essaging.PubSubManager</text:span></text:p>
              <text:p text:style-name="P9"><text:span text:style-name="T3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4" draw:text-style-name="P12" draw:layer="layout" svg:width="11.43cm" svg:height="0.908cm" svg:x="15.922cm" svg:y="10.565cm">
              <text:p text:style-name="P11"><text:span text:style-name="T4">- Topic.COMMAND: []</text:span></text:p>
              <text:p text:style-name="P11"><text:span text:style-name="T4">- Topic.ERROR: [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5" draw:text-style-name="P12" draw:layer="layout" svg:width="11.43cm" svg:height="1.387cm" svg:x="15.922cm" svg:y="11.47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ubscribe(topic: Topic) -&gt; Queue</text:span></text:p>
              <text:p text:style-name="P11"><text:span text:style-name="T4">+ unsubscripe(topic: Topic, queue:Queu)</text:span></text:p>
              <text:p text:style-name="P11"><text:span text:style-name="T4">+ publish(topic: Topic, 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66" draw:text-style-name="P10" draw:layer="layout" svg:width="6.667cm" svg:height="1.153cm" svg:x="1.952cm" svg:y="15.36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essaging.Topic</text:span></text:p>
              <text:p text:style-name="P9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12" draw:layer="layout" svg:width="6.667cm" svg:height="0.994cm" svg:x="1.952cm" svg:y="16.517cm">
              <text:p text:style-name="P11"><text:span text:style-name="T4">+ COMMAND = "COMMAND"</text:span></text:p>
              <text:p text:style-name="P11"><text:span text:style-name="T4">+ ERROR = "ERROR"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8" draw:text-style-name="P12" draw:layer="layout" svg:width="6.667cm" svg:height="0.599cm" svg:x="1.952cm" svg:y="17.5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9" draw:text-style-name="P19" draw:layer="layout" svg:x1="15.923cm" svg:y1="10.048cm" svg:x2="11.476cm" svg:y2="9.623cm" draw:start-shape="id51" draw:start-glue-point="6" draw:end-shape="id49" draw:end-glue-point="13" svg:d="M15923 10048h-2224v-425h-2223" svg:viewBox="0 0 4448 426">
          <text:p/>
        </draw:connector>
        <draw:frame draw:style-name="gr12" draw:text-style-name="P14" draw:layer="layout" svg:width="2.54cm" svg:height="0.725cm" svg:x="12.43cm" svg:y="11.705cm">
          <draw:text-box>
            <text:p><text:span text:style-name="T5">&lt;&lt;has&gt;&gt;</text:span></text:p>
          </draw:text-box>
        </draw:frame>
        <draw:connector draw:style-name="gr270" draw:text-style-name="P19" draw:layer="layout" svg:x1="3.805cm" svg:y1="15.365cm" svg:x2="2.298cm" svg:y2="14.017cm" draw:start-shape="id52" draw:start-glue-point="5" draw:end-shape="id49" draw:end-glue-point="7" svg:d="M3805 15365v-675h-1507v-673" svg:viewBox="0 0 1508 1349">
          <text:p/>
        </draw:connector>
        <draw:connector draw:style-name="gr271" draw:text-style-name="P19" draw:layer="layout" svg:x1="12.061cm" svg:y1="15.253cm" svg:x2="8.776cm" svg:y2="14.017cm" draw:start-shape="id53" draw:start-glue-point="5" draw:end-shape="id49" draw:end-glue-point="9" svg:d="M12061 15253v-619h-3285v-617" svg:viewBox="0 0 3286 1237">
          <text:p/>
        </draw:connector>
        <draw:connector draw:style-name="gr272" draw:text-style-name="P19" draw:layer="layout" svg:x1="19.921cm" svg:y1="15.105cm" svg:x2="11.476cm" svg:y2="13.473cm" draw:start-shape="id54" draw:start-glue-point="5" draw:end-shape="id49" draw:end-glue-point="12" svg:d="M19921 15105v-1632h-8445" svg:viewBox="0 0 8446 1633">
          <text:p/>
        </draw:connector>
        <draw:g draw:style-name="gr1" xml:id="id55" draw:id="id5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73" draw:text-style-name="P21" draw:layer="layout" svg:width="4.14cm" svg:height="1.153cm" svg:x="16.405cm" svg:y="4.46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thread&gt;&gt;</text:span></text:p>
            <text:p text:style-name="P20"><text:span text:style-name="T3">command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4" draw:text-style-name="P12" draw:layer="layout" svg:width="4.14cm" svg:height="0.517cm" svg:x="16.405cm" svg:y="5.615cm">
            <text:p text:style-name="P11"><text:span text:style-name="T4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5" draw:text-style-name="P12" draw:layer="layout" svg:width="4.14cm" svg:height="0.465cm" svg:x="16.405cm" svg:y="6.1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0" draw:id="id5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76" draw:text-style-name="P28" draw:layer="layout" svg:width="7.937cm" svg:height="0.679cm" svg:x="6.788cm" svg:y="4.0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7" draw:text-style-name="P3" draw:layer="layout" svg:width="7.937cm" svg:height="0.679cm" svg:x="6.788cm" svg:y="4.7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cmd_queue = subscribe_command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8" draw:text-style-name="P19" draw:layer="layout" svg:x1="16.405cm" svg:y1="5.529cm" svg:x2="14.725cm" svg:y2="4.728cm" draw:start-shape="id55" draw:start-glue-point="3" draw:end-shape="id50" draw:end-glue-point="14" svg:d="M16405 5529h-840v-801h-840" svg:viewBox="0 0 1681 802">
          <text:p/>
        </draw:connector>
        <draw:custom-shape draw:style-name="gr279" draw:text-style-name="P23" xml:id="id56" draw:id="id56" draw:layer="layout" svg:width="6.032cm" svg:height="1.937cm" svg:x="21.602cm" svg:y="4.143cm">
          <text:p text:style-name="P22"><text:span text:style-name="T6">The command_handler thread waits for a command topic and processes topic as events in the statemachin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80" draw:text-style-name="P24" draw:layer="layout" draw:type="line" svg:x1="20.545cm" svg:y1="5.306cm" svg:x2="21.602cm" svg:y2="5.112cm" draw:start-shape="id55" draw:start-glue-point="23" draw:end-shape="id56" draw:end-glue-point="5" svg:d="M20545 5306l1057-194" svg:viewBox="0 0 1058 195">
          <text:p/>
        </draw:connector>
        <draw:g draw:style-name="gr1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81" draw:text-style-name="P21" draw:layer="layout" svg:width="3.175cm" svg:height="1.153cm" svg:x="1.952cm" svg:y="4.4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class&gt;&gt;</text:span></text:p>
            <text:p text:style-name="P20"><text:span text:style-name="T3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2" draw:text-style-name="P12" draw:layer="layout" svg:width="3.175cm" svg:height="0.517cm" svg:x="1.952cm" svg:y="5.6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12" draw:layer="layout" svg:width="3.175cm" svg:height="0.465cm" svg:x="1.952cm" svg:y="6.1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4" draw:text-style-name="P19" draw:layer="layout" svg:x1="5.126cm" svg:y1="6.083cm" svg:x2="6.788cm" svg:y2="4.795cm" draw:start-shape="id57" draw:start-glue-point="12" draw:end-shape="id50" draw:end-glue-point="9" svg:d="M5126 6083h831v-1288h831" svg:viewBox="0 0 1663 1289">
          <text:p/>
        </draw:connector>
      </draw:page>
      <draw:page draw:name="Power Supply" draw:style-name="dp1" draw:master-page-name="Default">
        <draw:custom-shape draw:style-name="gr225" draw:text-style-name="P7" draw:layer="layout" svg:width="19.565cm" svg:height="0.7cm" svg:x="1.43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7" draw:layer="layout" svg:width="19.218cm" svg:height="0.7cm" svg:x="1.549cm" svg:y="7.2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7" draw:layer="layout" svg:width="19.456cm" svg:height="0.7cm" svg:x="1.229cm" svg:y="15.28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4.9cm" svg:y="8.212cm">
          <draw:text-box>
            <text:p><text:span text:style-name="T5">&lt;&lt;uses&gt;&gt;</text:span></text:p>
          </draw:text-box>
        </draw:frame>
        <draw:custom-shape draw:style-name="gr285" draw:text-style-name="P8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86" draw:text-style-name="P10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power_supply_control.PowerSupply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12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8" draw:text-style-name="P12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et_nom_voltage()</text:span></text:p>
              <text:p text:style-name="P11"><text:span text:style-name="T4">+ set_max_voltage()</text:span></text:p>
              <text:p text:style-name="P11"><text:span text:style-name="T4">+ set_standby_voltage()</text:span></text:p>
              <text:p text:style-name="P11"><text:span text:style-name="T4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2" draw:text-style-name="P13" draw:layer="layout" svg:width="20.637cm" svg:height="0.952cm" svg:x="1cm" svg:y="1.1cm">
          <text:p text:style-name="P6">Static view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89" draw:text-style-name="P10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singleton&gt;&gt;</text:span></text:p>
              <text:p text:style-name="P9"><text:span text:style-name="T3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2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12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read_byte(device: int, register: int)</text:span></text:p>
              <text:p text:style-name="P11"><text:span text:style-name="T4">+ write_byte(device: int, register: int)</text:span></text:p>
              <text:p text:style-name="P11"><text:span text:style-name="T9">+ </text:span><text:span text:style-name="T10">read_block</text:span><text:span text:style-name="T9">(device: int, register: int, length: int)</text:span></text:p>
              <text:p text:style-name="P11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92" draw:text-style-name="P19" draw:layer="layout" svg:x1="14.261cm" svg:y1="11.428cm" svg:x2="10.747cm" svg:y2="10.657cm" draw:start-shape="id58" draw:start-glue-point="5" draw:end-shape="id59" draw:end-glue-point="1" svg:d="M14261 11428v-771h-3514" svg:viewBox="0 0 3515 772">
          <text:p/>
        </draw:connector>
        <draw:frame draw:style-name="gr12" draw:text-style-name="P14" draw:layer="layout" svg:width="2.512cm" svg:height="0.725cm" svg:x="12.43cm" svg:y="9.572cm">
          <draw:text-box>
            <text:p><text:span text:style-name="T5">&lt;&lt;has&gt;&gt;</text:span></text:p>
          </draw:text-box>
        </draw:fram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93" draw:text-style-name="P26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4" draw:text-style-name="P27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0" draw:id="id6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95" draw:text-style-name="P28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3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97" draw:text-style-name="P19" draw:layer="layout" draw:line-skew="0.926cm" svg:x1="4.255cm" svg:y1="8.889cm" svg:x2="7.942cm" svg:y2="5.866cm" draw:start-shape="id59" draw:start-glue-point="5" draw:end-shape="id60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298" draw:text-style-name="P7" draw:layer="layout" svg:width="27.047cm" svg:height="0.7cm" svg:x="1.258cm" svg:y="2.0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7" draw:layer="layout" svg:width="26.989cm" svg:height="0.7cm" svg:x="1.316cm" svg:y="6.7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6" draw:id="id66">
          <draw:glue-point draw:id="4" svg:x="-0.787cm" svg:y="5.055cm"/>
          <draw:glue-point draw:id="5" svg:x="-5.063cm" svg:y="-3.065cm"/>
          <draw:glue-point draw:id="6" svg:x="-3.788cm" svg:y="5.05cm"/>
          <draw:custom-shape draw:style-name="gr300" draw:text-style-name="P10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led_control.</text:span></text:p>
            <text:p text:style-name="P9"><text:span text:style-name="T3">LEDControl</text:span></text:p>
            <text:p text:style-name="P9"><text:span text:style-name="T3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2" draw:layer="layout" svg:width="4.363cm" svg:height="0.671cm" svg:x="1.317cm" svg:y="9.312cm">
            <text:p text:style-name="P11"><text:span text:style-name="T4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2" draw:text-style-name="P12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turn_on_led()</text:span></text:p>
            <text:p text:style-name="P11"><text:span text:style-name="T4">+ turn_off_led()</text:span></text:p>
            <text:p text:style-name="P11"><text:span text:style-name="T4">+ turn_off_all_leds()</text:span></text:p>
            <text:p text:style-name="P11"><text:span text:style-name="T4">+ turn_off_all_leds()</text:span></text:p>
            <text:p text:style-name="P11"><text:span text:style-name="T4">+ get_led_state()l</text:span></text:p>
            <text:p text:style-name="P11"><text:span text:style-name="T4">+ oneshot_on_led()</text:span></text:p>
            <text:p text:style-name="P11"><text:span text:style-name="T4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3" draw:text-style-name="P42" draw:layer="layout" svg:width="27.204cm" svg:height="0.7cm" svg:x="1.101cm" svg:y="16.947cm">
          <text:p text:style-name="P38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8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5" draw:id="id6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05" draw:text-style-name="P10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touch_buttons.</text:span></text:p>
              <text:p text:style-name="P9"><text:span text:style-name="T3">TouchButtons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6" draw:text-style-name="P12" draw:layer="layout" svg:width="4.602cm" svg:height="0.754cm" svg:x="7.185cm" svg:y="9.687cm">
              <text:p text:style-name="P11"><text:span text:style-name="T4">- stop_evt: Event()</text:span></text:p>
              <text:p text:style-name="P11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7" draw:text-style-name="P12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init()</text:span></text:p>
              <text:p text:style-name="P11"><text:span text:style-name="T4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1">
            <draw:custom-shape draw:style-name="gr308" draw:text-style-name="P10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backlighting.</text:span></text:p>
              <text:p text:style-name="P9"><text:span text:style-name="T3">BackLighting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9" draw:text-style-name="P12" draw:layer="layout" svg:width="5.465cm" svg:height="1.06cm" svg:x="15.75cm" svg:y="9.647cm">
              <text:p text:style-name="P11"><text:span text:style-name="T4">- thread: backlighting_manager</text:span></text:p>
              <text:p text:style-name="P11"><text:span text:style-name="T4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0" draw:text-style-name="P12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2" draw:text-style-name="P14" draw:layer="layout" svg:width="2.512cm" svg:height="0.725cm" svg:x="8.965cm" svg:y="7.35cm">
          <draw:text-box>
            <text:p><text:span text:style-name="T5">&lt;&lt;uses&gt;&gt;</text:span></text:p>
          </draw:text-box>
        </draw:frame>
        <draw:custom-shape draw:style-name="gr256" draw:text-style-name="P13" draw:layer="layout" svg:width="27.7cm" svg:height="0.952cm" svg:x="1cm" svg:y="1cm">
          <text:p text:style-name="P6">static view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7" draw:id="id6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11" draw:text-style-name="P10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singleton&gt;&gt;</text:span></text:p>
              <text:p text:style-name="P9"><text:span text:style-name="T3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2" draw:text-style-name="P12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3" draw:text-style-name="P12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read_byte(device: int, register: int)</text:span></text:p>
              <text:p text:style-name="P11"><text:span text:style-name="T4">+ write_byte(device: int, register: int)</text:span></text:p>
              <text:p text:style-name="P11"><text:span text:style-name="T9">+ </text:span><text:span text:style-name="T10">read_block</text:span><text:span text:style-name="T9">(device: int, register: int, length: int)</text:span></text:p>
              <text:p text:style-name="P11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14" draw:text-style-name="P10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light_sensor</text:span></text:p>
              <text:p text:style-name="P9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5" draw:text-style-name="P12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6" draw:text-style-name="P12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17" draw:text-style-name="P10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backlight_dac</text:span></text:p>
              <text:p text:style-name="P9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8" draw:text-style-name="P12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9" draw:text-style-name="P12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4" draw:id="id6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20" draw:text-style-name="P21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singleton&gt;&gt;</text:span></text:p>
            <text:p text:style-name="P20"><text:span text:style-name="T3">gpio_service.</text:span></text:p>
            <text:p text:style-name="P20"><text:span text:style-name="T3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1" draw:text-style-name="P43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2" draw:text-style-name="P12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3" draw:text-style-name="P19" draw:layer="layout" draw:line-skew="-2.199cm" svg:x1="18.991cm" svg:y1="17.936cm" svg:x2="20.911cm" svg:y2="11.342cm" draw:start-shape="id61" draw:start-glue-point="4" draw:end-shape="id62" draw:end-glue-point="10" svg:d="M18991 17936v-5497h1920v-1097" svg:viewBox="0 0 1921 6595">
          <text:p/>
        </draw:connector>
        <draw:connector draw:style-name="gr324" draw:text-style-name="P19" draw:layer="layout" draw:line-skew="-2.581cm" svg:x1="17.899cm" svg:y1="17.97cm" svg:x2="19.696cm" svg:y2="11.342cm" draw:start-shape="id63" draw:start-glue-point="15" draw:end-shape="id62" draw:end-glue-point="9" svg:d="M17899 17970v-5896h1797v-732" svg:viewBox="0 0 1798 6629">
          <text:p/>
        </draw:connector>
        <draw:connector draw:style-name="gr325" draw:text-style-name="P19" draw:layer="layout" svg:x1="8.319cm" svg:y1="14.283cm" svg:x2="8.465cm" svg:y2="11.434cm" draw:start-shape="id64" draw:start-glue-point="14" draw:end-shape="id65" draw:end-glue-point="8" svg:d="M8319 14283v-1426h146v-1423" svg:viewBox="0 0 147 2850">
          <text:p/>
        </draw:connector>
        <draw:connector draw:style-name="gr326" draw:text-style-name="P19" draw:layer="layout" svg:x1="6.204cm" svg:y1="14.283cm" svg:x2="3.498cm" svg:y2="12.946cm" draw:start-shape="id64" draw:start-glue-point="4" draw:end-shape="id66" draw:end-glue-point="2" svg:d="M6204 14283v-670h-2706v-667" svg:viewBox="0 0 2707 1338">
          <text:p/>
        </draw:connector>
        <draw:connector draw:style-name="gr327" draw:text-style-name="P19" draw:layer="layout" svg:x1="21.91cm" svg:y1="13.161cm" svg:x2="21.214cm" svg:y2="10.798cm" draw:start-shape="id67" draw:start-glue-point="5" draw:end-shape="id62" draw:end-glue-point="12" svg:d="M21910 13161v-2363h-696" svg:viewBox="0 0 697 2364">
          <text:p/>
        </draw:connector>
        <draw:frame draw:style-name="gr12" draw:text-style-name="P14" draw:layer="layout" svg:width="2.512cm" svg:height="0.725cm" svg:x="19.415cm" svg:y="12.43cm">
          <draw:text-box>
            <text:p><text:span text:style-name="T5">&lt;&lt;has&gt;&gt;</text:span></text:p>
          </draw:text-box>
        </draw:frame>
        <draw:frame draw:style-name="gr12" draw:text-style-name="P14" draw:layer="layout" svg:width="2.512cm" svg:height="0.725cm" svg:x="5.762cm" svg:y="12.975cm">
          <draw:text-box>
            <text:p><text:span text:style-name="T5">&lt;&lt;has&gt;&gt;</text:span></text:p>
          </draw:text-box>
        </draw:frame>
        <draw:frame draw:style-name="gr328" draw:text-style-name="P41" draw:layer="layout" svg:width="6.35cm" svg:height="2.147cm" svg:x="1.635cm" svg:y="17.51cm">
          <draw:text-box>
            <text:p><text:span text:style-name="T11">Waarom backlighting </text:span><text:span text:style-name="T11">thread met stop en off. </text:span><text:span text:style-name="T11">Staat eigenlijk altijd aan! </text:span><text:span text:style-name="T11">Wordt ook in de module </text:span><text:span text:style-name="T11">gestart!</text:span></text:p>
          </draw:text-box>
        </draw:frame>
        <draw:g draw:style-name="gr1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29" draw:text-style-name="P10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thread&gt;&gt;</text:span></text:p>
              <text:p text:style-name="P9"><text:span text:style-name="T3">backlighting.</text:span></text:p>
              <text:p text:style-name="P9"><text:span text:style-name="T3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0" draw:text-style-name="P12" draw:layer="layout" svg:width="4.965cm" svg:height="0.754cm" svg:x="23.322cm" svg:y="10.394cm">
              <text:p text:style-name="P11"><text:span text:style-name="T4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1" draw:text-style-name="P12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32" draw:text-style-name="P19" draw:layer="layout" svg:x1="23.323cm" svg:y1="9.403cm" svg:x2="21.214cm" svg:y2="8.656cm" draw:start-shape="id68" draw:start-glue-point="6" draw:end-shape="id62" draw:end-glue-point="13" svg:d="M23323 9403h-1055v-747h-1054" svg:viewBox="0 0 2110 748">
          <text:p/>
        </draw:connector>
        <draw:connector draw:style-name="gr333" draw:text-style-name="P19" draw:layer="layout" svg:x1="25.577cm" svg:y1="13.161cm" svg:x2="26.907cm" svg:y2="11.747cm" draw:start-shape="id67" draw:start-glue-point="14" draw:end-shape="id68" draw:end-glue-point="9" svg:d="M25577 13161v-708h1330v-706" svg:viewBox="0 0 1331 1415">
          <text:p/>
        </draw:connector>
        <draw:frame draw:style-name="gr12" draw:text-style-name="P14" draw:layer="layout" svg:width="2.512cm" svg:height="0.725cm" svg:x="24.177cm" svg:y="11.795cm">
          <draw:text-box>
            <text:p><text:span text:style-name="T5">&lt;&lt;uses&gt;&gt;</text:span></text:p>
          </draw:text-box>
        </draw:frame>
        <draw:frame draw:style-name="gr12" draw:text-style-name="P14" draw:layer="layout" svg:width="3.81cm" svg:height="0.725cm" svg:x="21.955cm" svg:y="7.895cm">
          <draw:text-box>
            <text:p><text:span text:style-name="T5">&lt;&lt;consists of&gt;&gt;</text:span></text:p>
          </draw:text-box>
        </draw:frame>
        <draw:g draw:style-name="gr1" xml:id="id69" draw:id="id6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34" draw:text-style-name="P21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thread&gt;&gt;</text:span></text:p>
            <text:p text:style-name="P20"><text:span text:style-name="T3">led_control.</text:span></text:p>
            <text:p text:style-name="P20"><text:span text:style-name="T3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2" draw:layer="layout" svg:width="3.492cm" svg:height="0.517cm" svg:x="1.5cm" svg:y="15.813cm">
            <text:p text:style-name="P11"><text:span text:style-name="T4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2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7" draw:text-style-name="P19" draw:layer="layout" svg:x1="2.471cm" svg:y1="14.187cm" svg:x2="1.846cm" svg:y2="12.946cm" draw:start-shape="id69" draw:start-glue-point="5" draw:end-shape="id66" draw:end-glue-point="6" svg:d="M2471 14187v-622h-625v-619" svg:viewBox="0 0 626 1242">
          <text:p/>
        </draw:connector>
        <draw:frame draw:style-name="gr12" draw:text-style-name="P14" draw:layer="layout" svg:width="3.81cm" svg:height="0.725cm" svg:x="1cm" svg:y="13.382cm">
          <draw:text-box>
            <text:p><text:span text:style-name="T5">&lt;&lt;consists of&gt;&gt;</text:span></text:p>
          </draw:text-box>
        </draw:fram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38" draw:text-style-name="P26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27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0" draw:id="id7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40" draw:text-style-name="P28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3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leds = LEDControl()</text:span></text:p>
            <text:p text:style-name="P16"><text:span text:style-name="T3">- backlighting = Backlighting()</text:span></text:p>
            <text:p text:style-name="P16"><text:span text:style-name="T3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2" draw:text-style-name="P19" draw:layer="layout" svg:x1="8.465cm" svg:y1="8.061cm" svg:x2="11.394cm" svg:y2="6.115cm" draw:start-shape="id65" draw:start-glue-point="5" draw:end-shape="id70" draw:end-glue-point="5" svg:d="M8465 8061v-974h2929v-972" svg:viewBox="0 0 2930 1947">
          <text:p/>
        </draw:connector>
        <draw:connector draw:style-name="gr343" draw:text-style-name="P19" draw:layer="layout" svg:x1="3.498cm" svg:y1="7.685cm" svg:x2="9.461cm" svg:y2="6.115cm" draw:end-shape="id70" draw:end-glue-point="4" svg:d="M3498 7685v-522h5963v-1048" svg:viewBox="0 0 5964 1571">
          <text:p/>
        </draw:connector>
        <draw:connector draw:style-name="gr344" draw:text-style-name="P19" draw:layer="layout" svg:x1="20.911cm" svg:y1="8.021cm" svg:x2="17.192cm" svg:y2="5.46cm" draw:start-shape="id62" draw:start-glue-point="15" draw:end-shape="id70" draw:end-glue-point="8" svg:d="M20911 8021v-2561h-3719" svg:viewBox="0 0 3720 2562">
          <text:p/>
        </draw:connector>
        <draw:g draw:style-name="gr1" xml:id="id71" draw:id="id7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345" draw:text-style-name="P21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module&gt;&gt;</text:span></text:p>
            <text:p text:style-name="P20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12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7" draw:text-style-name="P12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publish_command_message(</text:span></text:p>
            <text:p text:style-name="P11"><text:span text:style-name="T4"><text:s text:c="17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8" draw:text-style-name="P19" draw:layer="layout" svg:x1="13.738cm" svg:y1="12.219cm" svg:x2="11.786cm" svg:y2="10.89cm" draw:start-shape="id71" draw:end-shape="id65" draw:end-glue-point="12" svg:d="M13738 12219v-1329h-1952" svg:viewBox="0 0 1953 1330">
          <text:p/>
        </draw:connector>
        <draw:frame draw:style-name="gr12" draw:text-style-name="P14" draw:layer="layout" svg:width="2.512cm" svg:height="0.725cm" svg:x="12.458cm" svg:y="10.207cm">
          <draw:text-box>
            <text:p><text:span text:style-name="T5">&lt;&lt;uses&gt;&gt;</text:span></text:p>
          </draw:text-box>
        </draw:frame>
        <draw:frame draw:style-name="gr12" draw:text-style-name="P14" draw:layer="layout" svg:width="2.512cm" svg:height="0.725cm" svg:x="18.462cm" svg:y="4.492cm">
          <draw:text-box>
            <text:p><text:span text:style-name="T5">&lt;&lt;uses&gt;&gt;</text:span></text:p>
          </draw:text-box>
        </draw:frame>
      </draw:page>
      <draw:page draw:name="Music Players" draw:style-name="dp1" draw:master-page-name="Default">
        <draw:custom-shape draw:style-name="gr349" draw:text-style-name="P7" draw:layer="layout" svg:width="25.039cm" svg:height="0.7cm" svg:x="1.635cm" svg:y="2.5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7" draw:layer="layout" svg:width="25.091cm" svg:height="0.7cm" svg:x="1.635cm" svg:y="7.3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51" draw:text-style-name="P26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2" draw:text-style-name="P27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53" draw:text-style-name="P7" draw:layer="layout" svg:width="24.824cm" svg:height="0.7cm" svg:x="1.85cm" svg:y="18.98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4" draw:text-style-name="P8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72" draw:id="id7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1">
            <draw:custom-shape draw:style-name="gr355" draw:text-style-name="P10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pd_monitor.MPDMonitor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6" draw:text-style-name="P12" draw:layer="layout" svg:width="5.397cm" svg:height="0.545cm" svg:x="7.655cm" svg:y="10.295cm">
              <text:p text:style-name="P11"><text:span text:style-name="T4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7" draw:text-style-name="P12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init(class: MPDService)</text:span></text:p>
              <text:p text:style-name="P11"><text:span text:style-name="T4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74" draw:id="id7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58" draw:text-style-name="P10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pd_control.MPDControl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9" draw:text-style-name="P12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0" draw:text-style-name="P12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init(class: MPDService)</text:span></text:p>
              <text:p text:style-name="P11"><text:span text:style-name="T4">+ is_web_radio()</text:span></text:p>
              <text:p text:style-name="P11"><text:span text:style-name="T4">+ next()</text:span></text:p>
              <text:p text:style-name="P11"><text:span text:style-name="T4">+ play()</text:span></text:p>
              <text:p text:style-name="P11"><text:span text:style-name="T4">+ stop()</text:span></text:p>
              <text:p text:style-name="P11"><text:span text:style-name="T4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75" draw:id="id7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1">
            <draw:custom-shape draw:style-name="gr361" draw:text-style-name="P10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spotify_connect.SpotifyConnect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2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12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play()</text:span></text:p>
              <text:p text:style-name="P11"><text:span text:style-name="T4">+ pause()</text:span></text:p>
              <text:p text:style-name="P11"><text:span text:style-name="T4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64" draw:text-style-name="P19" draw:layer="layout" draw:line-skew="0.511cm" svg:x1="9.155cm" svg:y1="9.143cm" svg:x2="10.029cm" svg:y2="6.816cm" draw:start-shape="id72" draw:start-glue-point="5" draw:end-shape="id73" draw:end-glue-point="5" svg:d="M9155 9143v-654h874v-1673" svg:viewBox="0 0 875 2328">
          <text:p/>
        </draw:connector>
        <draw:connector draw:style-name="gr365" draw:text-style-name="P19" draw:layer="layout" draw:line-skew="0.218cm" svg:x1="1.841cm" svg:y1="9.094cm" svg:x2="8.429cm" svg:y2="6.816cm" draw:start-shape="id74" draw:start-glue-point="4" draw:end-shape="id73" draw:end-glue-point="4" svg:d="M1841 9094v-922h6588v-1356" svg:viewBox="0 0 6589 2279">
          <text:p/>
        </draw:connector>
        <draw:connector draw:style-name="gr366" draw:text-style-name="P19" draw:layer="layout" svg:x1="24.127cm" svg:y1="8.795cm" svg:x2="14.83cm" svg:y2="5.146cm" draw:start-shape="id75" draw:start-glue-point="14" draw:end-shape="id73" draw:end-glue-point="14" svg:d="M24127 8795v-3649h-9297" svg:viewBox="0 0 9298 3650">
          <text:p/>
        </draw:connector>
        <draw:custom-shape draw:style-name="gr367" draw:text-style-name="P13" draw:layer="layout" svg:width="25.995cm" svg:height="1.205cm" svg:x="1cm" svg:y="1.099cm">
          <text:p text:style-name="P6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2.54cm" svg:height="0.725cm" svg:x="2.587cm" svg:y="8.302cm">
          <draw:text-box>
            <text:p><text:span text:style-name="T5">&lt;&lt;uses&gt;&gt;</text:span></text:p>
          </draw:text-box>
        </draw:frame>
        <draw:g draw:style-name="gr1" xml:id="id77" draw:id="id77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368" draw:text-style-name="P10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mpd_service.MPDService</text:span></text:p>
            <text:p text:style-name="P9"><text:span text:style-name="T3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12" draw:layer="layout" svg:width="5.397cm" svg:height="0.669cm" svg:x="7.603cm" svg:y="15.201cm">
            <text:p text:style-name="P11"><text:span text:style-name="T4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2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init()</text:span></text:p>
            <text:p text:style-name="P11"><text:span text:style-name="T4">+ get_stats()</text:span></text:p>
            <text:p text:style-name="P11"><text:span text:style-name="T4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6" draw:id="id76">
          <draw:custom-shape draw:style-name="gr371" draw:text-style-name="P10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mpd.MPDClient</text:span></text:p>
            <text:p text:style-name="P9"><text:span text:style-name="T3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2" draw:text-style-name="P12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3" draw:text-style-name="P12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init()</text:span></text:p>
            <text:p text:style-name="P11"><text:span text:style-name="T4">+ idle()</text:span></text:p>
            <text:p text:style-name="P11"><text:span text:style-name="T4">+ update()</text:span></text:p>
            <text:p text:style-name="P11"><text:span text:style-name="T4">+ next()</text:span></text:p>
            <text:p text:style-name="P11"><text:span text:style-name="T4">+ play()</text:span></text:p>
            <text:p text:style-name="P11"><text:span text:style-name="T4">+ stop()</text:span></text:p>
            <text:p text:style-name="P11"><text:span text:style-name="T4">+ pause()</text:span></text:p>
            <text:p text:style-name="P11"><text:span text:style-name="T4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4" draw:text-style-name="P19" draw:layer="layout" svg:x1="14.252cm" svg:y1="15.889cm" svg:x2="13cm" svg:y2="15.652cm" draw:start-shape="id76" draw:start-glue-point="3" draw:end-shape="id77" draw:end-glue-point="1" svg:d="M14252 15889h-627v-237h-625" svg:viewBox="0 0 1253 238">
          <text:p/>
        </draw:connector>
        <draw:frame draw:style-name="gr12" draw:text-style-name="P14" draw:layer="layout" svg:width="2.83cm" svg:height="0.725cm" svg:x="4.492cm" svg:y="13.61cm">
          <draw:text-box>
            <text:p><text:span text:style-name="T5">&lt;&lt;is A&gt;&gt;</text:span></text:p>
          </draw:text-box>
          <draw:glue-point draw:id="4" svg:x="0.512cm" svg:y="-0.606cm"/>
        </draw:frame>
        <draw:connector draw:style-name="gr375" draw:text-style-name="P19" draw:layer="layout" svg:x1="12.636cm" svg:y1="14.048cm" svg:x2="11.552cm" svg:y2="11.833cm" draw:start-shape="id77" draw:start-glue-point="6" draw:end-shape="id72" draw:end-glue-point="9" svg:d="M12636 14048v-1108h-1084v-1107" svg:viewBox="0 0 1085 2216">
          <text:p/>
        </draw:connector>
        <draw:connector draw:style-name="gr376" draw:text-style-name="P19" draw:layer="layout" svg:x1="7.603cm" svg:y1="15.652cm" svg:x2="6.637cm" svg:y2="13.489cm" draw:start-shape="id77" draw:start-glue-point="3" draw:end-shape="id74" draw:end-glue-point="10" svg:d="M7603 15652h-966v-2163" svg:viewBox="0 0 967 2164">
          <text:p/>
        </draw:connector>
        <draw:frame draw:style-name="gr12" draw:text-style-name="P14" draw:layer="layout" svg:width="2.222cm" svg:height="0.725cm" svg:x="9.89cm" svg:y="12.975cm">
          <draw:text-box>
            <text:p><text:span text:style-name="T5">&lt;</text:span><text:span text:style-name="T5">&lt;</text:span><text:span text:style-name="T5">i</text:span><text:span text:style-name="T5">s</text:span><text:span text:style-name="T5"> </text:span><text:span text:style-name="T5">A</text:span><text:span text:style-name="T5">&gt;</text:span><text:span text:style-name="T5">&gt;</text:span></text:p>
          </draw:text-box>
          <draw:glue-point draw:id="4" svg:x="0.512cm" svg:y="-0.606cm"/>
        </draw:frame>
        <draw:frame draw:style-name="gr12" draw:text-style-name="P14" draw:layer="layout" svg:width="3.147cm" svg:height="0.725cm" svg:x="20.685cm" svg:y="7.985cm">
          <draw:text-box>
            <text:p><text:span text:style-name="T5">&lt;&lt;uses&gt;&gt;</text:span></text:p>
          </draw:text-box>
        </draw:frame>
        <draw:frame draw:style-name="gr12" draw:text-style-name="P14" draw:layer="layout" svg:width="2.54cm" svg:height="0.725cm" svg:x="9.89cm" svg:y="8.302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frame draw:style-name="gr12" draw:text-style-name="P14" draw:layer="layout" svg:width="3.81cm" svg:height="0.725cm" svg:x="10.525cm" svg:y="17.51cm">
          <draw:text-box>
            <text:p><text:span text:style-name="T5">&lt;&lt;consists of&gt;&gt;</text:span></text:p>
          </draw:text-box>
        </draw:frame>
        <draw:g draw:style-name="gr1" xml:id="id78" draw:id="id78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77" draw:text-style-name="P21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thread&gt;&gt;</text:span></text:p>
            <text:p text:style-name="P20"><text:span text:style-name="T3">mpd_control.</text:span></text:p>
            <text:p text:style-name="P20"><text:span text:style-name="T3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8" draw:text-style-name="P12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9" draw:text-style-name="P12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0" draw:text-style-name="P19" draw:layer="layout" svg:x1="4.461cm" svg:y1="15.276cm" svg:x2="3.04cm" svg:y2="13.489cm" draw:start-shape="id78" draw:start-glue-point="8" draw:end-shape="id74" draw:end-glue-point="8" svg:d="M4461 15276v-894h-1421v-893" svg:viewBox="0 0 1422 1788">
          <text:p/>
        </draw:connector>
        <draw:g draw:style-name="gr1" xml:id="id79" draw:id="id7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81" draw:text-style-name="P21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3">&lt;&lt;thread&gt;&gt;</text:span></text:p>
            <text:p text:style-name="P20"><text:span text:style-name="T3">mpd_monitor.</text:span></text:p>
            <text:p text:style-name="P20"><text:span text:style-name="T3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2" draw:text-style-name="P12" draw:layer="layout" svg:width="3.235cm" svg:height="0.728cm" svg:x="14.335cm" svg:y="10.647cm">
            <text:p text:style-name="P11"><text:span text:style-name="T4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3" draw:text-style-name="P12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4" draw:text-style-name="P19" draw:layer="layout" svg:x1="14.335cm" svg:y1="10.515cm" svg:x2="13.051cm" svg:y2="9.778cm" draw:start-shape="id79" draw:end-shape="id72" draw:end-glue-point="13" svg:d="M14335 10515h-642v-737h-642" svg:viewBox="0 0 1285 738">
          <text:p/>
        </draw:connector>
        <draw:g draw:style-name="gr1" xml:id="id73" draw:id="id7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85" draw:text-style-name="P28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6" draw:text-style-name="P3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mpd_monitor = MPDMonitor()</text:span></text:p>
            <text:p text:style-name="P16"><text:span text:style-name="T3">- mpd_control = MPDControl()</text:span></text:p>
            <text:p text:style-name="P16"><text:span text:style-name="T3">- spotify_connect = SpotifyConn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14" draw:layer="layout" svg:width="3.81cm" svg:height="0.725cm" svg:x="1.217cm" svg:y="14.462cm">
          <draw:text-box>
            <text:p><text:span text:style-name="T5">&lt;&lt;consists of&gt;&gt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6-02T17:57:04.328118631</dc:date>
    <meta:editing-duration>PT15H46M44S</meta:editing-duration>
    <meta:editing-cycles>120</meta:editing-cycles>
    <meta:print-date>2026-05-31T17:56:35.806719548</meta:print-date>
    <dc:creator>Henk</dc:creator>
    <meta:printed-by>PDF files: Henk</meta:printed-by>
    <meta:document-statistic meta:object-count="568"/>
  </office:meta>
</office:document-meta>
</file>