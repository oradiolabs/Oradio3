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6.007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25.537cm" style:writing-mode="lr-tb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25.859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6.753cm" fo:padding-top="0.151cm" fo:padding-bottom="0.151cm" fo:padding-left="0.276cm" fo:padding-right="0.276cm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78cm" fo:min-width="4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6.753cm" fo:padding-top="0.151cm" fo:padding-bottom="0.151cm" fo:padding-left="0.276cm" fo:padding-right="0.276cm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53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8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82cm" fo:min-width="7.16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" style:family="graphic" style:parent-style-name="standard">
      <style:graphic-properties draw:textarea-horizontal-align="justify" draw:textarea-vertical-align="middle" draw:auto-grow-height="false" fo:min-height="0.45cm" fo:min-width="20.643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45cm" fo:min-width="20.269cm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45cm" fo:min-width="20.525cm" style:writing-mode="lr-tb" loext:decorative="false"/>
      <style:paragraph-properties style:writing-mode="lr-tb"/>
    </style:style>
    <style:style style:name="gr3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2.308cm" fo:padding-top="0.151cm" fo:padding-bottom="0.151cm" fo:padding-left="0.276cm" fo:padding-right="0.276cm" loext:decorative="false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96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2.308cm" fo:padding-top="0.151cm" fo:padding-bottom="0.151cm" fo:padding-left="0.276cm" fo:padding-right="0.276cm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1cm" fo:min-width="5.78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96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96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0" style:family="graphic" style:parent-style-name="standard">
      <style:graphic-properties draw:textarea-horizontal-align="justify" draw:textarea-vertical-align="middle" draw:auto-grow-height="false" fo:min-height="0.45cm" fo:min-width="23.089cm" style:writing-mode="lr-tb" loext:decorative="false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45cm" fo:min-width="22.952cm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0.45cm" fo:min-width="23.243cm" style:writing-mode="lr-tb" loext:decorative="false"/>
      <style:paragraph-properties style:writing-mode="lr-tb"/>
    </style:style>
    <style:style style:name="gr5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4.213cm" fo:padding-top="0.151cm" fo:padding-bottom="0.151cm" fo:padding-left="0.276cm" fo:padding-right="0.276cm" loext:decorative="false"/>
    </style:style>
    <style:style style:name="gr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6.8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213cm" fo:padding-top="0.151cm" fo:padding-bottom="0.151cm" fo:padding-left="0.276cm" fo:padding-right="0.276cm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4cm" fo:min-width="5.78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69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5.78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3" style:family="graphic" style:parent-style-name="standard">
      <style:graphic-properties draw:textarea-horizontal-align="justify" draw:textarea-vertical-align="middle" draw:auto-grow-height="false" fo:min-height="0.45cm" fo:min-width="25.053cm" style:writing-mode="lr-tb" loext:decorative="false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0.45cm" fo:min-width="24.902cm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0.45cm" fo:min-width="25.224cm" style:writing-mode="lr-tb" loext:decorative="false"/>
      <style:paragraph-properties style:writing-mode="lr-tb"/>
    </style:style>
    <style:style style:name="gr7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5.8cm" fo:padding-top="0.151cm" fo:padding-bottom="0.151cm" fo:padding-left="0.276cm" fo:padding-right="0.276cm" loext:decorative="false"/>
    </style:style>
    <style:style style:name="gr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12cm" fo:min-width="6.0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5.8cm" fo:padding-top="0.151cm" fo:padding-bottom="0.151cm" fo:padding-left="0.276cm" fo:padding-right="0.276cm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83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5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57cm" fo:min-width="6.26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0" style:family="graphic" style:parent-style-name="standard">
      <style:graphic-properties draw:textarea-horizontal-align="justify" draw:textarea-vertical-align="middle" draw:auto-grow-height="false" fo:min-height="0.45cm" fo:min-width="19.381cm" style:writing-mode="lr-tb" loext:decorative="false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45cm" fo:min-width="19.029cm" style:writing-mode="lr-tb" loext:decorative="false"/>
      <style:paragraph-properties style:writing-mode="lr-tb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middle" draw:auto-grow-height="false" fo:min-height="0.45cm" fo:min-width="19.27cm" style:writing-mode="lr-tb" loext:decorative="false"/>
      <style:paragraph-properties style:writing-mode="lr-tb"/>
    </style:style>
    <style:style style:name="gr10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838cm" fo:min-width="20.403cm" fo:padding-top="0.151cm" fo:padding-bottom="0.151cm" fo:padding-left="0.276cm" fo:padding-right="0.276cm" loext:decorative="false"/>
    </style:style>
    <style:style style:name="gr1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7.26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403cm" fo:padding-top="0.151cm" fo:padding-bottom="0.151cm" fo:padding-left="0.276cm" fo:padding-right="0.276cm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5" style:family="graphic" style:parent-style-name="standard">
      <style:graphic-properties draw:textarea-horizontal-align="justify" draw:textarea-vertical-align="middle" draw:auto-grow-height="false" fo:min-height="0.45cm" fo:min-width="19.065cm" style:writing-mode="lr-tb" loext:decorative="false"/>
      <style:paragraph-properties style:writing-mode="lr-tb"/>
    </style:style>
    <style:style style:name="gr116" style:family="graphic" style:parent-style-name="standard">
      <style:graphic-properties draw:textarea-horizontal-align="justify" draw:textarea-vertical-align="middle" draw:auto-grow-height="false" fo:min-height="0.45cm" fo:min-width="18.718cm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9" style:family="graphic" style:parent-style-name="standard">
      <style:graphic-properties draw:textarea-horizontal-align="justify" draw:textarea-vertical-align="middle" draw:auto-grow-height="false" fo:min-height="0.45cm" fo:min-width="18.956cm" style:writing-mode="lr-tb" loext:decorative="false"/>
      <style:paragraph-properties style:writing-mode="lr-tb"/>
    </style:style>
    <style:style style:name="gr12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0.085cm" fo:padding-top="0.151cm" fo:padding-bottom="0.151cm" fo:padding-left="0.276cm" fo:padding-right="0.276cm" loext:decorative="false"/>
    </style:style>
    <style:style style:name="gr1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8.53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085cm" fo:padding-top="0.151cm" fo:padding-bottom="0.151cm" fo:padding-left="0.276cm" fo:padding-right="0.276cm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0" style:family="graphic" style:parent-style-name="standard">
      <style:graphic-properties draw:textarea-horizontal-align="justify" draw:textarea-vertical-align="middle" draw:auto-grow-height="false" fo:min-height="0.45cm" fo:min-width="24.642cm" style:writing-mode="lr-tb" loext:decorative="false"/>
      <style:paragraph-properties style:writing-mode="lr-tb"/>
    </style:style>
    <style:style style:name="gr131" style:family="graphic" style:parent-style-name="standard">
      <style:graphic-properties draw:textarea-horizontal-align="justify" draw:textarea-vertical-align="middle" draw:auto-grow-height="false" fo:min-height="0.45cm" fo:min-width="24.599cm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2cm" fo:min-width="4.6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7" style:family="graphic" style:parent-style-name="standard">
      <style:graphic-properties draw:textarea-horizontal-align="justify" draw:textarea-vertical-align="middle" draw:auto-grow-height="false" fo:min-height="0.45cm" fo:min-width="24.799cm" style:writing-mode="lr-tb" loext:decorative="false"/>
      <style:paragraph-properties style:writing-mode="lr-tb"/>
    </style:style>
    <style:style style:name="gr13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398cm" fo:min-width="25.165cm" fo:padding-top="0.151cm" fo:padding-bottom="0.151cm" fo:padding-left="0.276cm" fo:padding-right="0.276cm" loext:decorative="false"/>
    </style:style>
    <style:style style:name="gr1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46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91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68cm" fo:min-width="25.165cm" fo:padding-top="0.151cm" fo:padding-bottom="0.151cm" fo:padding-left="0.276cm" fo:padding-right="0.276cm" style:writing-mode="lr-tb" loext:decorative="false"/>
      <style:paragraph-properties style:writing-mode="lr-tb"/>
    </style:style>
    <style:style style:name="gr1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69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51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23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57cm" fo:min-width="5.74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6" style:family="graphic" style:parent-style-name="standard">
      <style:graphic-properties draw:textarea-horizontal-align="justify" draw:textarea-vertical-align="middle" draw:auto-grow-height="false" fo:min-height="0.45cm" fo:min-width="22.677cm" style:writing-mode="lr-tb" loext:decorative="false"/>
      <style:paragraph-properties style:writing-mode="lr-tb"/>
    </style:style>
    <style:style style:name="gr167" style:family="graphic" style:parent-style-name="standard">
      <style:graphic-properties draw:textarea-horizontal-align="justify" draw:textarea-vertical-align="middle" draw:auto-grow-height="false" fo:min-height="0.45cm" fo:min-width="22.504cm" style:writing-mode="lr-tb" loext:decorative="false"/>
      <style:paragraph-properties style:writing-mode="lr-tb"/>
    </style:style>
    <style:style style:name="gr1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0" style:family="graphic" style:parent-style-name="standard">
      <style:graphic-properties draw:textarea-horizontal-align="justify" draw:textarea-vertical-align="middle" draw:auto-grow-height="false" fo:min-height="0.45cm" fo:min-width="22.753cm" style:writing-mode="lr-tb" loext:decorative="false"/>
      <style:paragraph-properties style:writing-mode="lr-tb"/>
    </style:style>
    <style:style style:name="gr17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3.443cm" fo:padding-top="0.151cm" fo:padding-bottom="0.151cm" fo:padding-left="0.276cm" fo:padding-right="0.276cm" loext:decorative="false"/>
    </style:style>
    <style:style style:name="gr1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3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3.443cm" fo:padding-top="0.151cm" fo:padding-bottom="0.151cm" fo:padding-left="0.276cm" fo:padding-right="0.276cm" style:writing-mode="lr-tb" loext:decorative="false"/>
      <style:paragraph-properties style:writing-mode="lr-tb"/>
    </style:style>
    <style:style style:name="gr1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57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4.36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2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3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afafa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text-align="start"/>
    </style:style>
    <style:style style:name="P22" style:family="paragraph">
      <style:paragraph-properties fo:text-align="start" style:writing-mode="lr-tb"/>
    </style:style>
    <style:style style:name="P2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ystem Services" draw:style-name="dp1" draw:master-page-name="Default">
        <draw:custom-shape draw:style-name="gr1" draw:text-style-name="P2" draw:layer="layout" svg:width="26.507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037cm" svg:height="0.7cm" svg:x="1.633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" draw:id="id2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glue-point draw:id="45" svg:x="-2.202cm" svg:y="5.141cm"/>
          <draw:custom-shape draw:style-name="gr4" draw:text-style-name="P4" draw:layer="layout" svg:width="26.125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26.125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2" draw:layer="layout" svg:width="26.359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20.367cm" svg:y="7.032cm">
          <draw:text-box>
            <text:p><text:span text:style-name="T2">&lt;&lt;uses&gt;&gt;</text:span></text:p>
          </draw:text-box>
        </draw:frame>
        <draw:custom-shape draw:style-name="gr8" draw:text-style-name="P8" draw:layer="layout" svg:width="27.305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4" draw:id="id4">
          <draw:glue-point draw:id="4" svg:x="1.153cm" svg:y="-4.294cm"/>
          <draw:glue-point draw:id="5" svg:x="3.461cm" svg:y="-5.146cm"/>
          <draw:custom-shape draw:style-name="gr9" draw:text-style-name="P10" draw:layer="layout" svg:width="4.047cm" svg:height="1.153cm" svg:x="1.78cm" svg:y="8.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system_sounds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4.047cm" svg:height="0.761cm" svg:x="1.78cm" svg:y="9.703cm">
            <text:p text:style-name="P11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3" draw:id="id3">
          <draw:glue-point draw:id="4" svg:x="-3.94cm" svg:y="-4.644cm"/>
          <draw:glue-point draw:id="5" svg:x="4.311cm" svg:y="-5.137cm"/>
          <draw:glue-point draw:id="6" svg:x="3.601cm" svg:y="-5.137cm"/>
          <draw:custom-shape draw:style-name="gr11" draw:text-style-name="P10" draw:layer="layout" svg:width="4.465cm" svg:height="1.153cm" svg:x="11.195cm" svg:y="8.56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oradio_logging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4.465cm" svg:height="0.887cm" svg:x="11.195cm" svg:y="9.72cm">
            <text:p text:style-name="P11"><text:span text:style-name="T3">+ oradio_log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3" draw:text-style-name="P13" draw:layer="layout" svg:x1="20.284cm" svg:y1="8.329cm" svg:x2="21.449cm" svg:y2="5.27cm" draw:start-shape="id1" draw:end-shape="id2" draw:end-glue-point="7" svg:d="M20284 8329v-1530h1165v-1529" svg:viewBox="0 0 1166 3060">
          <text:p/>
        </draw:connector>
        <draw:connector draw:style-name="gr14" draw:text-style-name="P13" draw:layer="layout" svg:x1="13.427cm" svg:y1="8.567cm" svg:x2="10.307cm" svg:y2="5.27cm" draw:start-shape="id3" draw:end-shape="id2" draw:end-glue-point="18" svg:d="M13427 8567v-1649h-3120v-1648" svg:viewBox="0 0 3121 3298">
          <text:p/>
        </draw:connector>
        <draw:connector draw:style-name="gr15" draw:text-style-name="P13" draw:layer="layout" svg:x1="4.269cm" svg:y1="8.686cm" svg:x2="5.111cm" svg:y2="5.27cm" draw:start-shape="id4" draw:start-glue-point="4" draw:end-shape="id2" draw:end-glue-point="17" svg:d="M4269 8686v-1777h842v-1639" svg:viewBox="0 0 843 3417">
          <text:p/>
        </draw:connector>
        <draw:custom-shape draw:style-name="gr16" draw:text-style-name="P14" draw:layer="layout" svg:width="27.305cm" svg:height="0.952cm" svg:x="1cm" svg:y="1.1cm">
          <text:p text:style-name="P1">Static view: System Service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5" draw:id="id5">
          <draw:glue-point draw:id="4" svg:x="1.153cm" svg:y="-4.294cm"/>
          <draw:glue-point draw:id="5" svg:x="3.461cm" svg:y="-5.146cm"/>
          <draw:glue-point draw:id="6" svg:x="-3.33cm" svg:y="-4.948cm"/>
          <draw:custom-shape draw:style-name="gr17" draw:text-style-name="P10" draw:layer="controls" svg:width="4.047cm" svg:height="1.153cm" svg:x="6.492cm" svg:y="8.5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error_service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2" draw:layer="controls" svg:width="4.047cm" svg:height="1.262cm" svg:x="6.492cm" svg:y="9.743cm">
            <text:p text:style-name="P11"><text:span text:style-name="T3">+ xxxx</text:span></text:p>
            <text:p text:style-name="P11"><text:span text:style-name="T3">+ xxxx</text:span></text:p>
            <text:p text:style-name="P11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9" draw:text-style-name="P13" draw:layer="controls" svg:x1="7.168cm" svg:y1="8.603cm" svg:x2="8.939cm" svg:y2="5.27cm" draw:start-shape="id5" draw:start-glue-point="6" draw:end-shape="id2" draw:end-glue-point="45" svg:d="M7168 8603v-1674h1771v-1659" svg:viewBox="0 0 1772 3334">
          <text:p/>
        </draw:connector>
        <draw:g draw:style-name="gr3" xml:id="id1" draw:id="id1">
          <draw:custom-shape draw:style-name="gr20" draw:text-style-name="P10" draw:layer="layout" svg:width="7.302cm" svg:height="1.153cm" svg:x="16.633cm" svg:y="8.32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throttled_monitor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7.302cm" svg:height="0.761cm" svg:x="16.633cm" svg:y="9.482cm">
            <text:p text:style-name="P15"><text:span text:style-name="T3">- throttled_monitor: RpiThrottlingMonit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2" draw:layer="layout" svg:width="7.302cm" svg:height="0.599cm" svg:x="16.633cm" svg:y="10.24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6" draw:id="id6">
          <draw:custom-shape draw:style-name="gr23" draw:text-style-name="P16" draw:layer="layout" svg:width="7.62cm" svg:height="1.153cm" svg:x="17.94cm" svg:y="12.17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5"><text:span text:style-name="T1">throttled_monitor.R</text:span><text:span text:style-name="T1">piThrottlingMonitor</text:span></text:p>
            <text:p text:style-name="P3"><text:span text:style-name="T1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2" draw:layer="layout" svg:width="7.62cm" svg:height="0.591cm" svg:x="17.94cm" svg:y="13.325cm">
            <text:p text:style-name="P1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2" draw:layer="layout" svg:width="7.62cm" svg:height="2.175cm" svg:x="17.94cm" svg:y="13.91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- init()</text:p>
            <text:p text:style-name="P11">+ start()</text:p>
            <text:p text:style-name="P11">+ stop()</text:p>
            <text:p text:style-name="P11">+ force_throttled()</text:p>
            <text:p text:style-name="P11"><text:span text:style-name="T3">+ clear_throttle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6" draw:text-style-name="P13" draw:layer="layout" svg:x1="21.75cm" svg:y1="12.172cm" svg:x2="20.284cm" svg:y2="10.842cm" draw:start-shape="id6" draw:end-shape="id1" svg:d="M21750 12172v-666h-1466v-664" svg:viewBox="0 0 1467 1331">
          <text:p/>
        </draw:connector>
        <draw:frame draw:style-name="gr7" draw:text-style-name="P7" draw:layer="layout" svg:width="3.085cm" svg:height="0.725cm" svg:x="20.367cm" svg:y="10.842cm">
          <draw:text-box>
            <text:p><text:span text:style-name="T2">&lt;&lt;uses&gt;&gt;</text:span></text:p>
          </draw:text-box>
        </draw:frame>
      </draw:page>
      <draw:page draw:name="Remote monitoring" draw:style-name="dp1" draw:master-page-name="Default">
        <draw:custom-shape draw:style-name="gr27" draw:text-style-name="P2" draw:layer="layout" svg:width="21.143cm" svg:height="0.7cm" svg:x="1.44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layout" svg:width="20.769cm" svg:height="0.7cm" svg:x="1.567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8" draw:id="id8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29" draw:text-style-name="P4" draw:layer="layout" svg:width="20.839cm" svg:height="1.153cm" svg:x="1.564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6" draw:layer="layout" svg:width="20.839cm" svg:height="0.679cm" svg:x="1.564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1" draw:text-style-name="P2" draw:layer="layout" svg:width="21.025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5.535cm" svg:y="6.715cm">
          <draw:text-box>
            <text:p><text:span text:style-name="T2">&lt;&lt;uses&gt;&gt;</text:span></text:p>
          </draw:text-box>
        </draw:frame>
        <draw:custom-shape draw:style-name="gr32" draw:text-style-name="P8" draw:layer="layout" svg:width="22.86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7" draw:id="id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3">
            <draw:custom-shape draw:style-name="gr33" draw:text-style-name="P10" draw:layer="layout" svg:width="6.423cm" svg:height="1.153cm" svg:x="4.219cm" svg:y="7.47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remote_monitoring.RM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2" draw:layer="layout" svg:width="6.423cm" svg:height="0.761cm" svg:x="4.219cm" svg:y="8.625cm">
              <text:p text:style-name="P15"><text:span text:style-name="T3">- rms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2" draw:layer="layout" svg:width="6.423cm" svg:height="1.387cm" svg:x="4.219cm" svg:y="9.38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queue: Queue)</text:span></text:p>
              <text:p text:style-name="P11"><text:span text:style-name="T3">+ send_message()</text:span></text:p>
              <text:p text:style-name="P11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6" draw:text-style-name="P13" draw:layer="layout" draw:line-skew="0.345cm" svg:x1="8.857cm" svg:y1="7.473cm" svg:x2="5.732cm" svg:y2="5.27cm" draw:start-shape="id7" draw:start-glue-point="14" draw:end-shape="id8" draw:end-glue-point="4" svg:d="M8857 7473v-758h-3125v-1445" svg:viewBox="0 0 3126 2204">
          <text:p/>
        </draw:connector>
        <draw:custom-shape draw:style-name="gr37" draw:text-style-name="P14" draw:layer="layout" svg:width="22.86cm" svg:height="0.952cm" svg:x="1cm" svg:y="1.1cm">
          <text:p text:style-name="P1">Static view: Remote monitor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38" draw:text-style-name="P10" draw:layer="layout" svg:width="6.237cm" svg:height="1.153cm" svg:x="13.813cm" svg:y="7.90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ifi_service.WifiService</text:span></text:p>
              <text:p text:style-name="P9"><text:span text:style-name="T1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2" draw:layer="layout" svg:width="6.237cm" svg:height="0.67cm" svg:x="13.813cm" svg:y="9.055cm">
              <text:p text:style-name="P11"><text:span text:style-name="T3">- rms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12" draw:layer="layout" svg:width="6.237cm" svg:height="2.569cm" svg:x="13.813cm" svg:y="9.72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queue: Queue)</text:span></text:p>
              <text:p text:style-name="P11"><text:span text:style-name="T3">+ get_state()</text:span></text:p>
              <text:p text:style-name="P11"><text:span text:style-name="T3">+ wifi_connect()</text:span></text:p>
              <text:p text:style-name="P11"><text:span text:style-name="T3">+ wifi_disconnect()</text:span></text:p>
              <text:p text:style-name="P11"><text:span text:style-name="T3">+ close()</text:span></text:p>
              <text:p text:style-name="P11"><text:span text:style-name="T3">- send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41" draw:text-style-name="P13" draw:layer="layout" svg:x1="13.813cm" svg:y1="10.098cm" svg:x2="10.641cm" svg:y2="8.108cm" draw:start-shape="id9" draw:end-shape="id7" draw:end-glue-point="13" svg:d="M13813 10098h-1586v-1990h-1586" svg:viewBox="0 0 3173 1991">
          <text:p/>
        </draw:connector>
        <draw:frame draw:style-name="gr7" draw:text-style-name="P7" draw:layer="layout" svg:width="3.085cm" svg:height="0.725cm" svg:x="11.16cm" svg:y="7.26cm">
          <draw:text-box>
            <text:p><text:span text:style-name="T2">&lt;&lt;uses&gt;&gt;</text:span></text:p>
          </draw:text-box>
        </draw:frame>
        <draw:g draw:style-name="gr3" xml:id="id10" draw:id="id1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3">
            <draw:custom-shape draw:style-name="gr42" draw:text-style-name="P10" draw:layer="layout" svg:width="6.423cm" svg:height="1.153cm" svg:x="2.905cm" svg:y="12.30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remote_monitoring.Heartbeat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12" draw:layer="layout" svg:width="6.423cm" svg:height="0.761cm" svg:x="2.905cm" svg:y="13.457cm">
              <text:p text:style-name="P15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12" draw:layer="layout" svg:width="6.423cm" svg:height="1.387cm" svg:x="2.905cm" svg:y="14.21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start_heartbeat()</text:span></text:p>
              <text:p text:style-name="P11"><text:span text:style-name="T3">+ stop_heartbeat()</text:span></text:p>
              <text:p text:style-name="P11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11" draw:id="id1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3">
            <draw:custom-shape draw:style-name="gr45" draw:text-style-name="P10" draw:layer="layout" svg:width="6.423cm" svg:height="1.153cm" svg:x="11.852cm" svg:y="13.20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BaseClass&gt;&gt;</text:span></text:p>
              <text:p text:style-name="P9"><text:span text:style-name="T1">Tim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" draw:text-style-name="P12" draw:layer="layout" svg:width="6.423cm" svg:height="0.761cm" svg:x="11.852cm" svg:y="14.357cm">
              <text:p text:style-name="P15"><text:span text:style-name="T3">- rms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12" draw:layer="layout" svg:width="6.423cm" svg:height="0.993cm" svg:x="11.852cm" svg:y="15.11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+ start()</text:p>
              <text:p text:style-name="P11">+ stop()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48" draw:text-style-name="P13" draw:layer="layout" svg:x1="7.543cm" svg:y1="12.305cm" svg:x2="6.005cm" svg:y2="10.773cm" draw:start-shape="id10" draw:start-glue-point="14" draw:end-shape="id7" draw:end-glue-point="8" svg:d="M7543 12305v-767h-1538v-765" svg:viewBox="0 0 1539 1533">
          <text:p/>
        </draw:connector>
        <draw:frame draw:style-name="gr7" draw:text-style-name="P7" draw:layer="layout" svg:width="3.085cm" svg:height="0.725cm" svg:x="3.222cm" svg:y="11.387cm">
          <draw:text-box>
            <text:p><text:span text:style-name="T2">&lt;&lt;uses&gt;&gt;</text:span></text:p>
          </draw:text-box>
        </draw:frame>
        <draw:connector draw:style-name="gr49" draw:text-style-name="P13" draw:layer="layout" svg:x1="11.852cm" svg:y1="14.382cm" svg:x2="9.327cm" svg:y2="15.061cm" draw:start-shape="id11" draw:start-glue-point="22" draw:end-shape="id10" draw:end-glue-point="12" svg:d="M11852 14382h-1263v679h-1262" svg:viewBox="0 0 2526 680">
          <text:p/>
        </draw:connector>
        <draw:frame draw:style-name="gr7" draw:text-style-name="P7" draw:layer="layout" svg:width="2.54cm" svg:height="0.725cm" svg:x="9.572cm" svg:y="13.61cm">
          <draw:text-box>
            <text:p><text:span text:style-name="T2">&lt;&lt;is a&gt;&gt;</text:span></text:p>
          </draw:text-box>
        </draw:frame>
      </draw:page>
      <draw:page draw:name="Web service" draw:style-name="dp1" draw:master-page-name="Default">
        <draw:custom-shape draw:style-name="gr50" draw:text-style-name="P2" draw:layer="layout" svg:width="23.589cm" svg:height="0.7cm" svg:x="1.465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23.452cm" svg:height="0.7cm" svg:x="1.602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3" draw:id="id13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52" draw:text-style-name="P4" draw:layer="layout" svg:width="23.532cm" svg:height="1.153cm" svg:x="1.598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6" draw:layer="layout" svg:width="23.532cm" svg:height="0.679cm" svg:x="1.598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4" draw:text-style-name="P2" draw:layer="layout" svg:width="23.743cm" svg:height="0.7cm" svg:x="1.3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5.535cm" svg:y="6.625cm">
          <draw:text-box>
            <text:p><text:span text:style-name="T2">&lt;&lt;uses&gt;&gt;</text:span></text:p>
          </draw:text-box>
        </draw:frame>
        <draw:custom-shape draw:style-name="gr55" draw:text-style-name="P8" draw:layer="layout" svg:width="24.76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56" draw:text-style-name="P10" draw:layer="layout" svg:width="7.324cm" svg:height="1.153cm" svg:x="2.013cm" svg:y="7.4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eb_service.Web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12" draw:layer="layout" svg:width="7.324cm" svg:height="0.949cm" svg:x="2.013cm" svg:y="8.595cm">
              <text:p text:style-name="P15"><text:span text:style-name="T3">- command_queue: Queue</text:span></text:p>
              <text:p text:style-name="P15"><text:span text:style-name="T3">- web_queue: Queue</text:span></text:p>
              <text:p text:style-name="P15"><text:span text:style-name="T3">+ uvicorn_server: UvicornServer</text:span></text:p>
              <text:p text:style-name="P15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" draw:text-style-name="P18" draw:layer="layout" svg:width="7.324cm" svg:height="2.175cm" svg:x="2.013cm" svg:y="9.5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7"><text:span text:style-name="T3">+ init(queue: Queue)</text:span></text:p>
              <text:p text:style-name="P17"><text:span text:style-name="T3">+ stop()</text:span></text:p>
              <text:p text:style-name="P17"><text:span text:style-name="T3">+ get_state()</text:span></text:p>
              <text:p text:style-name="P17"><text:span text:style-name="T3">+ start()</text:span></text:p>
              <text:p text:style-name="P17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59" draw:text-style-name="P13" draw:layer="layout" draw:line-skew="0.485cm" svg:x1="4.05cm" svg:y1="7.443cm" svg:x2="3.265cm" svg:y2="5.27cm" draw:start-shape="id12" draw:start-glue-point="5" draw:end-shape="id13" draw:end-glue-point="16" svg:d="M4050 7443v-603h-785v-1570" svg:viewBox="0 0 786 2174">
          <text:p/>
        </draw:connector>
        <draw:custom-shape draw:style-name="gr60" draw:text-style-name="P14" draw:layer="layout" svg:width="24.765cm" svg:height="0.952cm" svg:x="1cm" svg:y="1.1cm">
          <text:p text:style-name="P1">Static view: Web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61" draw:text-style-name="P10" draw:layer="layout" svg:width="6.237cm" svg:height="1.153cm" svg:x="11.13cm" svg:y="11.06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eb_server.UvicornServer</text:span></text:p>
              <text:p text:style-name="P9"><text:span text:style-name="T1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2" draw:text-style-name="P12" draw:layer="layout" svg:width="6.237cm" svg:height="0.473cm" svg:x="11.13cm" svg:y="12.2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3" draw:text-style-name="P12" draw:layer="layout" svg:width="6.237cm" svg:height="1.781cm" svg:x="11.13cm" svg:y="12.68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app:FastAPI)</text:span></text:p>
              <text:p text:style-name="P11"><text:span text:style-name="T3">+ run()</text:span></text:p>
              <text:p text:style-name="P11"><text:span text:style-name="T3">+ start()</text:span></text:p>
              <text:p text:style-name="P11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g draw:style-name="gr3">
              <draw:custom-shape draw:style-name="gr64" draw:text-style-name="P10" draw:layer="layout" svg:width="5.602cm" svg:height="1.153cm" svg:x="18.432cm" svg:y="7.594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9"><text:span text:style-name="T1">fastapi_server.api_ap</text:span></text:p>
                <text:p text:style-name="P9"><text:span text:style-name="T1">&lt;&lt;Framework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5" draw:text-style-name="P12" draw:layer="layout" svg:width="5.602cm" svg:height="0.578cm" svg:x="18.432cm" svg:y="8.747cm">
                <text:p text:style-name="P11"><text:span text:style-name="T3">+ api_app: FastAP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6" draw:text-style-name="P12" draw:layer="layout" svg:width="5.602cm" svg:height="2.175cm" svg:x="18.432cm" svg:y="9.32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1"><text:span text:style-name="T3">+ @api_app.get()</text:span></text:p>
                <text:p text:style-name="P11"><text:span text:style-name="T3">+ @api_app.put()</text:span></text:p>
                <text:p text:style-name="P11"><text:span text:style-name="T3">+ @api_app.post()</text:span></text:p>
                <text:p text:style-name="P11"><text:span text:style-name="T3">+ @api_app.api_route()</text:span></text:p>
                <text:p text:style-name="P11"><text:span text:style-name="T3">+ @api_app.middleware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7" draw:text-style-name="P7" draw:layer="layout" svg:width="3.81cm" svg:height="0.725cm" svg:x="10.525cm" svg:y="7.26cm">
          <draw:text-box>
            <text:p><text:span text:style-name="T2">&lt;&lt;consists of&gt;&gt;</text:span></text:p>
          </draw:text-box>
        </draw:frame>
        <draw:frame draw:style-name="gr7" draw:text-style-name="P7" draw:layer="layout" svg:width="3.085cm" svg:height="0.725cm" svg:x="19.187cm" svg:y="13.065cm">
          <draw:text-box>
            <text:p><text:span text:style-name="T2">&lt;&lt;uses&gt;&gt;</text:span></text:p>
          </draw:text-box>
        </draw:frame>
        <draw:connector draw:style-name="gr67" draw:text-style-name="P13" draw:layer="layout" svg:x1="14.248cm" svg:y1="11.063cm" svg:x2="9.336cm" svg:y2="8.078cm" draw:start-shape="id14" draw:start-glue-point="0" draw:end-shape="id12" draw:end-glue-point="13" svg:d="M14248 11063v-2985h-4912" svg:viewBox="0 0 4913 2986">
          <text:p/>
        </draw:connector>
        <draw:connector draw:style-name="gr68" draw:text-style-name="P13" draw:layer="layout" svg:x1="17.366cm" svg:y1="13.926cm" svg:x2="22.478cm" svg:y2="11.495cm" draw:start-shape="id14" draw:start-glue-point="12" draw:end-shape="id15" draw:end-glue-point="9" svg:d="M17366 13926h5112v-2431" svg:viewBox="0 0 5113 2432">
          <text:p/>
        </draw:connector>
        <draw:g draw:style-name="gr3" xml:id="id16" draw:id="id1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69" draw:text-style-name="P10" draw:layer="layout" svg:width="6.237cm" svg:height="1.153cm" svg:x="2.183cm" svg:y="13.50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ifi_service.WifiService</text:span></text:p>
              <text:p text:style-name="P9"><text:span text:style-name="T1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2" draw:layer="layout" svg:width="6.237cm" svg:height="0.779cm" svg:x="2.183cm" svg:y="14.66cm">
              <text:p text:style-name="P11"><text:span text:style-name="T3">- web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12" draw:layer="layout" svg:width="6.237cm" svg:height="2.569cm" svg:x="2.183cm" svg:y="15.4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queue: Queue)</text:span></text:p>
              <text:p text:style-name="P11"><text:span text:style-name="T3">+ get_state()</text:span></text:p>
              <text:p text:style-name="P11"><text:span text:style-name="T3">+ wifi_connect()</text:span></text:p>
              <text:p text:style-name="P11"><text:span text:style-name="T3">+ wifi_disconnect()</text:span></text:p>
              <text:p text:style-name="P11"><text:span text:style-name="T3">+ close()</text:span></text:p>
              <text:p text:style-name="P11"><text:span text:style-name="T3">- send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72" draw:text-style-name="P13" draw:layer="layout" svg:x1="6.687cm" svg:y1="13.508cm" svg:x2="4.05cm" svg:y2="11.719cm" draw:start-shape="id16" draw:start-glue-point="14" draw:end-shape="id12" draw:end-glue-point="8" svg:d="M6687 13508v-896h-2637v-893" svg:viewBox="0 0 2638 1790">
          <text:p/>
        </draw:connector>
        <draw:frame draw:style-name="gr7" draw:text-style-name="P7" draw:layer="layout" svg:width="3.085cm" svg:height="0.725cm" svg:x="4.265cm" svg:y="11.922cm">
          <draw:text-box>
            <text:p><text:span text:style-name="T2">&lt;&lt;uses&gt;&gt;</text:span></text:p>
          </draw:text-box>
        </draw:frame>
      </draw:page>
      <draw:page draw:name="USB" draw:style-name="dp1" draw:master-page-name="Default">
        <draw:custom-shape draw:style-name="gr73" draw:text-style-name="P2" draw:layer="layout" svg:width="25.553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" draw:layer="layout" svg:width="25.402cm" svg:height="0.7cm" svg:x="1.633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8" draw:id="id18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75" draw:text-style-name="P4" draw:layer="layout" svg:width="25.406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6" draw:layer="layout" svg:width="25.406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7" draw:text-style-name="P2" draw:layer="layout" svg:width="25.724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9.89cm" svg:y="6.715cm">
          <draw:text-box>
            <text:p><text:span text:style-name="T2">&lt;&lt;uses&gt;&gt;</text:span></text:p>
          </draw:text-box>
        </draw:frame>
        <draw:custom-shape draw:style-name="gr78" draw:text-style-name="P8" draw:layer="layout" svg:width="26.352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7" draw:id="id1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79" draw:text-style-name="P10" draw:layer="layout" svg:width="6.54cm" svg:height="1.153cm" svg:x="10.812cm" svg:y="8.0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usb_service.USB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0" draw:text-style-name="P12" draw:layer="layout" svg:width="6.54cm" svg:height="1.329cm" svg:x="10.812cm" svg:y="9.195cm">
              <text:p text:style-name="P15"><text:span text:style-name="T3">- shared_queue: Queue</text:span></text:p>
              <text:p text:style-name="P15"><text:span text:style-name="T3">- usb_observer: USBObserver</text:span></text:p>
              <text:p text:style-name="P15"><text:span text:style-name="T3">- usb_monitor: USBMoni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1" draw:text-style-name="P12" draw:layer="layout" svg:width="6.54cm" svg:height="2.569cm" svg:x="10.812cm" svg:y="10.52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queue: Queue)</text:span></text:p>
              <text:p text:style-name="P11"><text:span text:style-name="T3">+ get_state()</text:span></text:p>
              <text:p text:style-name="P11"><text:span text:style-name="T3">+ close()</text:span></text:p>
              <text:p text:style-name="P11"><text:span text:style-name="T3">- usb_inserted()</text:span></text:p>
              <text:p text:style-name="P11"><text:span text:style-name="T3">- usb_removed()</text:span></text:p>
              <text:p text:style-name="P11"><text:span text:style-name="T3">- send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82" draw:text-style-name="P13" draw:layer="layout" svg:x1="12.631cm" svg:y1="8.043cm" svg:x2="10.184cm" svg:y2="5.27cm" draw:start-shape="id17" draw:start-glue-point="5" draw:end-shape="id18" draw:end-glue-point="23" svg:d="M12631 8043v-1388h-2447v-1385" svg:viewBox="0 0 2448 2774">
          <text:p/>
        </draw:connector>
        <draw:custom-shape draw:style-name="gr83" draw:text-style-name="P14" draw:layer="layout" svg:width="26.352cm" svg:height="0.952cm" svg:x="1cm" svg:y="1.1cm">
          <text:p text:style-name="P1">Static view: USB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1" draw:id="id2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g draw:style-name="gr3">
              <draw:custom-shape draw:style-name="gr84" draw:text-style-name="P10" draw:layer="layout" svg:width="5.448cm" svg:height="1.153cm" svg:x="2.972cm" svg:y="9.559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9"><text:span text:style-name="T1">&lt;&lt;singleton&gt;&gt;</text:span></text:p>
                <text:p text:style-name="P9"><text:span text:style-name="T1">usb_service.USB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5" draw:text-style-name="P12" draw:layer="layout" svg:width="5.448cm" svg:height="0.692cm" svg:x="2.972cm" svg:y="10.712cm">
                <text:p text:style-name="P15"><text:span text:style-name="T3">- obserrver: 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6" draw:text-style-name="P12" draw:layer="layout" svg:width="5.448cm" svg:height="0.993cm" svg:x="2.972cm" svg:y="11.404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1"><text:span text:style-name="T3">+ start()</text:span></text:p>
                <text:p text:style-name="P11"><text:span text:style-name="T3">+ stop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3" xml:id="id19" draw:id="id1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87" draw:text-style-name="P10" draw:layer="layout" svg:width="5.448cm" svg:height="1.153cm" svg:x="20.05cm" svg:y="9.57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singleton&gt;&gt;</text:span></text:p>
              <text:p text:style-name="P9"><text:span text:style-name="T1">usb_service.USBMoni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12" draw:layer="layout" svg:width="5.448cm" svg:height="0.434cm" svg:x="20.05cm" svg:y="10.7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2" draw:layer="layout" svg:width="5.448cm" svg:height="0.993cm" svg:x="20.05cm" svg:y="11.15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- on_created()</text:span></text:p>
              <text:p text:style-name="P11"><text:span text:style-name="T3">- usb_delete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90" draw:text-style-name="P13" draw:layer="layout" svg:x1="23.985cm" svg:y1="12.152cm" svg:x2="23.099cm" svg:y2="14.302cm" draw:start-shape="id19" draw:start-glue-point="9" draw:end-shape="id20" draw:end-glue-point="14" svg:d="M23985 12152v1074h-886v1076" svg:viewBox="0 0 887 2151">
          <text:p/>
        </draw:connector>
        <draw:g draw:style-name="gr3" xml:id="id20" draw:id="id2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91" draw:text-style-name="P10" draw:layer="layout" svg:width="6.718cm" svg:height="1.153cm" svg:x="18.247cm" svg:y="14.30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BaseClass&gt;&gt;</text:span></text:p>
              <text:p text:style-name="P9"><text:span text:style-name="T1">PatternMatchingEventHand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12" draw:layer="layout" svg:width="6.718cm" svg:height="0.366cm" svg:x="18.247cm" svg:y="15.4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12" draw:layer="layout" svg:width="6.718cm" svg:height="0.599cm" svg:x="18.247cm" svg:y="15.8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handle_event(eve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94" draw:text-style-name="P13" draw:layer="layout" svg:x1="23.985cm" svg:y1="9.573cm" svg:x2="17.351cm" svg:y2="8.678cm" draw:start-shape="id19" draw:start-glue-point="14" draw:end-shape="id17" draw:end-glue-point="13" svg:d="M23985 9573v-895h-6634" svg:viewBox="0 0 6635 896">
          <text:p/>
        </draw:connector>
        <draw:connector draw:style-name="gr95" draw:text-style-name="P13" draw:layer="layout" svg:x1="6.907cm" svg:y1="9.56cm" svg:x2="10.813cm" svg:y2="8.678cm" draw:start-shape="id21" draw:start-glue-point="14" draw:end-shape="id17" draw:end-glue-point="6" svg:d="M6907 9560v-882h3906" svg:viewBox="0 0 3907 883">
          <text:p/>
        </draw:connector>
        <draw:g draw:style-name="gr3" xml:id="id22" draw:id="id2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96" draw:text-style-name="P20" draw:layer="layout" svg:width="6.35cm" svg:height="1.153cm" svg:x="2.27cm" svg:y="14.01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"><text:span text:style-name="T1">&lt;&lt;Library&gt;&gt;</text:span></text:p>
              <text:p text:style-name="P19"><text:span text:style-name="T1">watchdog.observers.Ob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7" draw:text-style-name="P12" draw:layer="layout" svg:width="6.35cm" svg:height="0.599cm" svg:x="2.27cm" svg:y="15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8" draw:text-style-name="P12" draw:layer="layout" svg:width="6.35cm" svg:height="0.599cm" svg:x="2.27cm" svg:y="15.7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schedul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99" draw:text-style-name="P13" draw:layer="layout" svg:x1="6.856cm" svg:y1="14.012cm" svg:x2="4.487cm" svg:y2="12.397cm" draw:start-shape="id22" draw:start-glue-point="14" draw:end-shape="id21" draw:end-glue-point="8" svg:d="M6856 14012v-808h-2369v-807" svg:viewBox="0 0 2370 1616">
          <text:p/>
        </draw:connector>
        <draw:frame draw:style-name="gr7" draw:text-style-name="P7" draw:layer="layout" svg:width="3.085cm" svg:height="0.725cm" svg:x="1.97cm" svg:y="12.747cm">
          <draw:text-box>
            <text:p><text:span text:style-name="T2">&lt;&lt;uses&gt;&gt;</text:span></text:p>
          </draw:text-box>
        </draw:frame>
        <draw:frame draw:style-name="gr7" draw:text-style-name="P7" draw:layer="layout" svg:width="2.223cm" svg:height="0.725cm" svg:x="23.859cm" svg:y="13.292cm">
          <draw:text-box>
            <text:p><text:span text:style-name="T2">&lt;&lt;is a&gt;&gt;</text:span></text:p>
          </draw:text-box>
        </draw:frame>
        <draw:frame draw:style-name="gr7" draw:text-style-name="P7" draw:layer="layout" svg:width="3.81cm" svg:height="0.725cm" svg:x="20.05cm" svg:y="7.35cm">
          <draw:text-box>
            <text:p><text:span text:style-name="T2">&lt;&lt;consists of&gt;&gt;</text:span></text:p>
          </draw:text-box>
        </draw:frame>
        <draw:frame draw:style-name="gr7" draw:text-style-name="P7" draw:layer="layout" svg:width="3.81cm" svg:height="0.725cm" svg:x="6.397cm" svg:y="7.667cm">
          <draw:text-box>
            <text:p><text:span text:style-name="T2">&lt;&lt;consists of&gt;&gt;</text:span></text:p>
          </draw:text-box>
        </draw:frame>
      </draw:page>
      <draw:page draw:name="Volume" draw:style-name="dp1" draw:master-page-name="Default">
        <draw:custom-shape draw:style-name="gr100" draw:text-style-name="P2" draw:layer="layout" svg:width="19.881cm" svg:height="0.7cm" svg:x="1.439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" draw:layer="layout" svg:width="19.529cm" svg:height="0.7cm" svg:x="1.552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4" draw:id="id24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02" draw:text-style-name="P4" draw:layer="layout" svg:width="19.595cm" svg:height="1.153cm" svg:x="1.54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6" draw:layer="layout" svg:width="19.595cm" svg:height="0.679cm" svg:x="1.54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4" draw:text-style-name="P2" draw:layer="layout" svg:width="19.77cm" svg:height="0.7cm" svg:x="1.311cm" svg:y="15.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3.54cm" svg:y="7.032cm">
          <draw:text-box>
            <text:p><text:span text:style-name="T2">&lt;&lt;uses&gt;&gt;</text:span></text:p>
          </draw:text-box>
        </draw:frame>
        <draw:custom-shape draw:style-name="gr105" draw:text-style-name="P8" draw:layer="layout" svg:width="20.955cm" svg:height="15.14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3" draw:id="id2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06" draw:text-style-name="P10" draw:layer="layout" svg:width="7.721cm" svg:height="1.153cm" svg:x="4.156cm" svg:y="8.22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volume_control.VolumeControl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7" draw:text-style-name="P12" draw:layer="layout" svg:width="7.721cm" svg:height="0.761cm" svg:x="4.156cm" svg:y="9.378cm">
              <text:p text:style-name="P15"><text:span text:style-name="T3">- command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7.721cm" svg:height="0.993cm" svg:x="4.156cm" svg:y="10.1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__init__(queue: Queue)</text:span></text:p>
              <text:p text:style-name="P11"><text:span text:style-name="T3">+ set_notify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09" draw:text-style-name="P13" draw:layer="layout" svg:x1="6.302cm" svg:y1="8.226cm" svg:x2="5.468cm" svg:y2="5.27cm" draw:start-shape="id23" draw:start-glue-point="5" draw:end-shape="id24" draw:end-glue-point="4" svg:d="M6302 8226v-1479h-834v-1477" svg:viewBox="0 0 835 2957">
          <text:p/>
        </draw:connector>
        <draw:custom-shape draw:style-name="gr110" draw:text-style-name="P14" draw:layer="layout" svg:width="20.955cm" svg:height="0.952cm" svg:x="1cm" svg:y="1.1cm">
          <text:p text:style-name="P1">Static view: Volum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5" draw:id="id2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11" draw:text-style-name="P10" draw:layer="layout" svg:width="8.572cm" svg:height="1.153cm" svg:x="10.417cm" svg:y="11.6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i2c_service.I2C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2" draw:text-style-name="P12" draw:layer="layout" svg:width="8.572cm" svg:height="0.761cm" svg:x="10.417cm" svg:y="12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3" draw:text-style-name="P12" draw:layer="layout" svg:width="8.572cm" svg:height="1.781cm" svg:x="10.417cm" svg:y="13.5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read_byte(device: int, register: int)</text:span></text:p>
              <text:p text:style-name="P11"><text:span text:style-name="T3">+ write_byte(device: int, register: int)</text:span></text:p>
              <text:p text:style-name="P11"><text:span text:style-name="T4">+ </text:span><text:span text:style-name="T5">read_block</text:span><text:span text:style-name="T4">(device: int, register: int, length: int)</text:span></text:p>
              <text:p text:style-name="P11"><text:span text:style-name="T4">+ write</text:span><text:span text:style-name="T5">_block</text:span><text:span text:style-name="T4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14" draw:text-style-name="P13" draw:layer="layout" svg:x1="16.608cm" svg:y1="11.631cm" svg:x2="11.876cm" svg:y2="8.861cm" draw:start-shape="id25" draw:start-glue-point="14" draw:end-shape="id23" draw:end-glue-point="13" svg:d="M16608 11631v-2770h-4732" svg:viewBox="0 0 4733 2771">
          <text:p/>
        </draw:connector>
        <draw:frame draw:style-name="gr7" draw:text-style-name="P7" draw:layer="layout" svg:width="2.512cm" svg:height="0.725cm" svg:x="12.747cm" svg:y="9.255cm">
          <draw:text-box>
            <text:p><text:span text:style-name="T2">&lt;&lt;has&gt;&gt;</text:span></text:p>
          </draw:text-box>
        </draw:frame>
      </draw:page>
      <draw:page draw:name="Power Supply" draw:style-name="dp1" draw:master-page-name="Default">
        <draw:custom-shape draw:style-name="gr115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2" draw:layer="layout" svg:width="19.218cm" svg:height="0.7cm" svg:x="1.549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7" draw:id="id27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17" draw:text-style-name="P4" draw:layer="layout" svg:width="19.283cm" svg:height="1.153cm" svg:x="1.546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6" draw:layer="layout" svg:width="19.283cm" svg:height="0.679cm" svg:x="1.546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9" draw:text-style-name="P2" draw:layer="layout" svg:width="19.456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5.217cm" svg:y="6.942cm">
          <draw:text-box>
            <text:p><text:span text:style-name="T2">&lt;&lt;uses&gt;&gt;</text:span></text:p>
          </draw:text-box>
        </draw:frame>
        <draw:custom-shape draw:style-name="gr120" draw:text-style-name="P8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6" draw:id="id2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21" draw:text-style-name="P10" draw:layer="layout" svg:width="8.991cm" svg:height="1.153cm" svg:x="1.756cm" svg:y="7.9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power_supply_control.PowerSupply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2" draw:text-style-name="P12" draw:layer="layout" svg:width="8.991cm" svg:height="0.604cm" svg:x="1.756cm" svg:y="9.1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12" draw:layer="layout" svg:width="8.991cm" svg:height="1.781cm" svg:x="1.756cm" svg:y="9.7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set_nom_voltage()</text:span></text:p>
              <text:p text:style-name="P11"><text:span text:style-name="T3">+ set_max_voltage()</text:span></text:p>
              <text:p text:style-name="P11"><text:span text:style-name="T3">+ set_standby_voltage()</text:span></text:p>
              <text:p text:style-name="P11"><text:span text:style-name="T3">+ read_statu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24" draw:text-style-name="P13" draw:layer="layout" svg:x1="4.255cm" svg:y1="7.989cm" svg:x2="5.403cm" svg:y2="5.27cm" draw:start-shape="id26" draw:start-glue-point="5" draw:end-shape="id27" draw:end-glue-point="4" svg:d="M4255 7989v-1361h1148v-1358" svg:viewBox="0 0 1149 2720">
          <text:p/>
        </draw:connector>
        <draw:custom-shape draw:style-name="gr125" draw:text-style-name="P14" draw:layer="layout" svg:width="20.637cm" svg:height="0.952cm" svg:x="1cm" svg:y="1.1cm">
          <text:p text:style-name="P1">Static view: Power Supply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8" draw:id="id2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26" draw:text-style-name="P10" draw:layer="layout" svg:width="8.572cm" svg:height="1.153cm" svg:x="9.977cm" svg:y="12.7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singleton&gt;&gt;</text:span></text:p>
              <text:p text:style-name="P9"><text:span text:style-name="T1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12" draw:layer="layout" svg:width="8.572cm" svg:height="0.761cm" svg:x="9.977cm" svg:y="13.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8" draw:text-style-name="P12" draw:layer="layout" svg:width="8.572cm" svg:height="1.781cm" svg:x="9.977cm" svg:y="14.6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read_byte(device: int, register: int)</text:span></text:p>
              <text:p text:style-name="P11"><text:span text:style-name="T3">+ write_byte(device: int, register: int)</text:span></text:p>
              <text:p text:style-name="P11"><text:span text:style-name="T4">+ </text:span><text:span text:style-name="T5">read_block</text:span><text:span text:style-name="T4">(device: int, register: int, length: int)</text:span></text:p>
              <text:p text:style-name="P11"><text:span text:style-name="T4">+ write</text:span><text:span text:style-name="T5">_block</text:span><text:span text:style-name="T4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29" draw:text-style-name="P13" draw:layer="layout" svg:x1="12.361cm" svg:y1="12.728cm" svg:x2="10.747cm" svg:y2="9.757cm" draw:start-shape="id28" draw:start-glue-point="5" draw:end-shape="id26" draw:end-glue-point="1" svg:d="M12361 12728v-2971h-1614" svg:viewBox="0 0 1615 2972">
          <text:p/>
        </draw:connector>
        <draw:frame draw:style-name="gr7" draw:text-style-name="P7" draw:layer="layout" svg:width="2.512cm" svg:height="0.725cm" svg:x="12.747cm" svg:y="11.16cm">
          <draw:text-box>
            <text:p><text:span text:style-name="T2">&lt;&lt;has&gt;&gt;</text:span></text:p>
          </draw:text-box>
        </draw:frame>
      </draw:page>
      <draw:page draw:name="Frontpanel service" draw:style-name="dp1" draw:master-page-name="Default">
        <draw:custom-shape draw:style-name="gr130" draw:text-style-name="P2" draw:layer="layout" svg:width="25.142cm" svg:height="0.7cm" svg:x="1.258cm" svg:y="2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2" draw:layer="layout" svg:width="25.099cm" svg:height="0.7cm" svg:x="1.301cm" svg:y="5.8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9" draw:id="id29">
          <draw:glue-point draw:id="4" svg:x="-0.787cm" svg:y="5.055cm"/>
          <draw:custom-shape draw:style-name="gr132" draw:text-style-name="P10" draw:layer="layout" svg:width="5.08cm" svg:height="1.153cm" svg:x="1.717cm" svg:y="7.75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led_control.LEDControl</text:span></text:p>
            <text:p text:style-name="P9"><text:span text:style-name="T1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12" draw:layer="layout" svg:width="5.08cm" svg:height="0.671cm" svg:x="1.717cm" svg:y="8.9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12" draw:layer="layout" svg:width="5.08cm" svg:height="2.963cm" svg:x="1.717cm" svg:y="9.5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turn_on_led()</text:span></text:p>
            <text:p text:style-name="P11"><text:span text:style-name="T3">+ turn_off_led()</text:span></text:p>
            <text:p text:style-name="P11"><text:span text:style-name="T3">+ turn_off_all_leds()</text:span></text:p>
            <text:p text:style-name="P11"><text:span text:style-name="T3">+ turn_off_all_leds()</text:span></text:p>
            <text:p text:style-name="P11"><text:span text:style-name="T3">+ get_led_state()l</text:span></text:p>
            <text:p text:style-name="P11"><text:span text:style-name="T3">+ oneshot_on_led()</text:span></text:p>
            <text:p text:style-name="P11"><text:span text:style-name="T3">+ control_blinking_led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30" draw:id="id30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1.594cm" svg:y="4.863cm"/>
          <draw:glue-point draw:id="41" svg:x="-2.071cm" svg:y="4.863cm"/>
          <draw:glue-point draw:id="42" svg:x="-1.833cm" svg:y="4.863cm"/>
          <draw:custom-shape draw:style-name="gr135" draw:text-style-name="P4" draw:layer="layout" svg:width="25.013cm" svg:height="1.153cm" svg:x="1.387cm" svg:y="3.6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6" draw:text-style-name="P6" draw:layer="layout" svg:width="25.013cm" svg:height="0.679cm" svg:x="1.387cm" svg:y="4.7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7" draw:text-style-name="P22" draw:layer="layout" svg:width="25.299cm" svg:height="0.7cm" svg:x="1.101cm" svg:y="16.047cm">
          <text:p text:style-name="P2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8" draw:text-style-name="P13" draw:layer="layout" draw:line-skew="0.418cm" svg:x1="4.257cm" svg:y1="7.759cm" svg:x2="3.794cm" svg:y2="5.47cm" draw:start-shape="id29" draw:end-shape="id30" draw:end-glue-point="16" svg:d="M4257 7759v-727h-463v-1562" svg:viewBox="0 0 464 2290">
          <text:p/>
        </draw:connector>
        <draw:custom-shape draw:style-name="gr139" draw:text-style-name="P8" draw:layer="layout" svg:width="25.717cm" svg:height="17.7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1" draw:id="id3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40" draw:text-style-name="P10" draw:layer="layout" svg:width="5.917cm" svg:height="1.153cm" svg:x="7.385cm" svg:y="7.78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touch_buttons.TouchButtons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1" draw:text-style-name="P12" draw:layer="layout" svg:width="5.917cm" svg:height="0.761cm" svg:x="7.385cm" svg:y="8.938cm">
              <text:p text:style-name="P15"><text:span text:style-name="T3">- shared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12" draw:layer="layout" svg:width="5.917cm" svg:height="0.599cm" svg:x="7.385cm" svg:y="9.69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__init__(queue: Queu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32" draw:id="id3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43" draw:text-style-name="P10" draw:layer="layout" svg:width="6.37cm" svg:height="1.153cm" svg:x="14.565cm" svg:y="7.70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backlighting.BackLighting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4" draw:text-style-name="P12" draw:layer="layout" svg:width="6.37cm" svg:height="0.761cm" svg:x="14.565cm" svg:y="8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12" draw:layer="layout" svg:width="6.37cm" svg:height="0.803cm" svg:x="14.565cm" svg:y="9.61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46" draw:text-style-name="P13" draw:layer="layout" draw:line-skew="0.405cm" svg:x1="9.03cm" svg:y1="7.786cm" svg:x2="9.509cm" svg:y2="5.47cm" draw:start-shape="id31" draw:start-glue-point="5" draw:end-shape="id30" draw:end-glue-point="18" svg:d="M9030 7786v-754h479v-1562" svg:viewBox="0 0 480 2317">
          <text:p/>
        </draw:connector>
        <draw:connector draw:style-name="gr147" draw:text-style-name="P13" draw:layer="layout" draw:line-skew="0.447cm" svg:x1="16.336cm" svg:y1="7.703cm" svg:x2="21.259cm" svg:y2="5.47cm" draw:start-shape="id32" draw:start-glue-point="5" draw:end-shape="id30" draw:end-glue-point="5" svg:d="M16336 7703v-671h4923v-1562" svg:viewBox="0 0 4924 2234">
          <text:p/>
        </draw:connector>
        <draw:frame draw:style-name="gr7" draw:text-style-name="P7" draw:layer="layout" svg:width="3.147cm" svg:height="0.725cm" svg:x="5.155cm" svg:y="6.715cm">
          <draw:text-box>
            <text:p><text:span text:style-name="T2">&lt;&lt;uses&gt;&gt;</text:span></text:p>
          </draw:text-box>
        </draw:frame>
        <draw:custom-shape draw:style-name="gr148" draw:text-style-name="P14" draw:layer="layout" svg:width="25.717cm" svg:height="1.27cm" svg:x="1cm" svg:y="1cm">
          <text:p text:style-name="P1">static view: Front-panel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6" draw:id="id3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49" draw:text-style-name="P10" draw:layer="layout" svg:width="8.572cm" svg:height="1.153cm" svg:x="17.185cm" svg:y="11.1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singleton&gt;&gt;</text:span></text:p>
              <text:p text:style-name="P9"><text:span text:style-name="T1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0" draw:text-style-name="P12" draw:layer="layout" svg:width="8.572cm" svg:height="0.578cm" svg:x="17.185cm" svg:y="12.3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1" draw:text-style-name="P12" draw:layer="layout" svg:width="8.572cm" svg:height="1.781cm" svg:x="17.185cm" svg:y="12.89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read_byte(device: int, register: int)</text:span></text:p>
              <text:p text:style-name="P11"><text:span text:style-name="T3">+ write_byte(device: int, register: int)</text:span></text:p>
              <text:p text:style-name="P11"><text:span text:style-name="T4">+ </text:span><text:span text:style-name="T5">read_block</text:span><text:span text:style-name="T4">(device: int, register: int, length: int)</text:span></text:p>
              <text:p text:style-name="P11"><text:span text:style-name="T4">+ write</text:span><text:span text:style-name="T5">_block</text:span><text:span text:style-name="T4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34" draw:id="id3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52" draw:text-style-name="P10" draw:layer="layout" svg:width="5.397cm" svg:height="1.153cm" svg:x="10.202cm" svg:y="17.1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light_sensor</text:span></text:p>
              <text:p text:style-name="P9"><text:span text:style-name="T1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3" draw:text-style-name="P12" draw:layer="layout" svg:width="5.397cm" svg:height="0.56cm" svg:x="10.202cm" svg:y="18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4" draw:text-style-name="P12" draw:layer="layout" svg:width="5.397cm" svg:height="0.591cm" svg:x="10.202cm" svg:y="18.90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33" draw:id="id3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55" draw:text-style-name="P10" draw:layer="layout" svg:width="5.397cm" svg:height="1.153cm" svg:x="16.49cm" svg:y="17.06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backlight_dac</text:span></text:p>
              <text:p text:style-name="P9"><text:span text:style-name="T1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6" draw:text-style-name="P12" draw:layer="layout" svg:width="5.397cm" svg:height="0.632cm" svg:x="16.49cm" svg:y="18.2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7" draw:text-style-name="P12" draw:layer="layout" svg:width="5.397cm" svg:height="0.667cm" svg:x="16.49cm" svg:y="18.8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35" draw:id="id3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158" draw:text-style-name="P24" draw:layer="layout" svg:width="6.203cm" svg:height="1.153cm" svg:x="7.032cm" svg:y="12.91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1">&lt;&lt;singleton&gt;&gt;</text:span></text:p>
            <text:p text:style-name="P23"><text:span text:style-name="T1">gpio_service.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9" draw:text-style-name="P25" draw:layer="layout" svg:width="6.203cm" svg:height="0.666cm" svg:x="7.032cm" svg:y="14.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12" draw:layer="layout" svg:width="6.203cm" svg:height="0.599cm" svg:x="7.032cm" svg:y="14.73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61" draw:text-style-name="P13" draw:layer="layout" svg:x1="16.791cm" svg:y1="17.064cm" svg:x2="16.336cm" svg:y2="10.419cm" draw:start-shape="id33" draw:start-glue-point="4" draw:end-shape="id32" draw:end-glue-point="8" svg:d="M16791 17064v-3324h-455v-3321" svg:viewBox="0 0 456 6646">
          <text:p/>
        </draw:connector>
        <draw:connector draw:style-name="gr162" draw:text-style-name="P13" draw:layer="layout" svg:x1="14.099cm" svg:y1="17.194cm" svg:x2="14.921cm" svg:y2="10.419cm" draw:start-shape="id34" draw:start-glue-point="14" draw:end-shape="id32" draw:end-glue-point="7" svg:d="M14099 17194v-3389h822v-3386" svg:viewBox="0 0 823 6776">
          <text:p/>
        </draw:connector>
        <draw:connector draw:style-name="gr163" draw:text-style-name="P13" draw:layer="layout" svg:x1="12.89cm" svg:y1="12.918cm" svg:x2="11.658cm" svg:y2="10.298cm" draw:start-shape="id35" draw:start-glue-point="15" draw:end-shape="id31" draw:end-glue-point="9" svg:d="M12890 12918v-1311h-1232v-1309" svg:viewBox="0 0 1233 2621">
          <text:p/>
        </draw:connector>
        <draw:connector draw:style-name="gr164" draw:text-style-name="P13" draw:layer="layout" svg:x1="7.033cm" svg:y1="14.791cm" svg:x2="4.257cm" svg:y2="12.546cm" draw:start-shape="id35" draw:start-glue-point="11" draw:end-shape="id29" svg:d="M7033 14791h-2776v-2245" svg:viewBox="0 0 2777 2246">
          <text:p/>
        </draw:connector>
        <draw:connector draw:style-name="gr165" draw:text-style-name="P13" draw:layer="layout" svg:x1="25.282cm" svg:y1="11.169cm" svg:x2="20.934cm" svg:y2="8.338cm" draw:start-shape="id36" draw:start-glue-point="15" draw:end-shape="id32" draw:end-glue-point="13" svg:d="M25282 11169v-2831h-4348" svg:viewBox="0 0 4349 2832">
          <text:p/>
        </draw:connector>
        <draw:frame draw:style-name="gr7" draw:text-style-name="P7" draw:layer="layout" svg:width="2.512cm" svg:height="0.725cm" svg:x="21.665cm" svg:y="8.62cm">
          <draw:text-box>
            <text:p><text:span text:style-name="T2">&lt;&lt;has&gt;&gt;</text:span></text:p>
          </draw:text-box>
        </draw:frame>
        <draw:frame draw:style-name="gr7" draw:text-style-name="P7" draw:layer="layout" svg:width="2.512cm" svg:height="0.725cm" svg:x="12.458cm" svg:y="10.842cm">
          <draw:text-box>
            <text:p><text:span text:style-name="T2">&lt;&lt;has&gt;&gt;</text:span></text:p>
          </draw:text-box>
        </draw:frame>
        <draw:frame draw:style-name="gr7" draw:text-style-name="P7" draw:layer="layout" svg:width="2.512cm" svg:height="0.725cm" svg:x="1.952cm" svg:y="13.382cm">
          <draw:text-box>
            <text:p><text:span text:style-name="T2">&lt;&lt;has&gt;&gt;</text:span></text:p>
          </draw:text-box>
        </draw:frame>
      </draw:page>
      <draw:page draw:name="Music Players" draw:style-name="dp1" draw:master-page-name="Default">
        <draw:custom-shape draw:style-name="gr166" draw:text-style-name="P2" draw:layer="layout" svg:width="23.177cm" svg:height="0.7cm" svg:x="1cm" svg:y="2.1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2" draw:layer="layout" svg:width="23.004cm" svg:height="0.7cm" svg:x="1.222cm" svg:y="5.5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8" draw:id="id38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custom-shape draw:style-name="gr168" draw:text-style-name="P4" draw:layer="layout" svg:width="22.63cm" svg:height="1.153cm" svg:x="1.392cm" svg:y="3.3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6" draw:layer="layout" svg:width="22.63cm" svg:height="0.679cm" svg:x="1.392cm" svg:y="4.4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70" draw:text-style-name="P2" draw:layer="layout" svg:width="23.253cm" svg:height="0.7cm" svg:x="0.924cm" svg:y="18.0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8" draw:layer="layout" svg:width="23.995cm" svg:height="17.715cm" svg:x="0.5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7" draw:id="id3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72" draw:text-style-name="P10" draw:layer="layout" svg:width="5.397cm" svg:height="1.153cm" svg:x="7.855cm" svg:y="7.8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mpd_monitor.MPDMonitor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3" draw:text-style-name="P12" draw:layer="layout" svg:width="5.397cm" svg:height="0.545cm" svg:x="7.855cm" svg:y="8.9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4" draw:text-style-name="P12" draw:layer="layout" svg:width="5.397cm" svg:height="0.993cm" svg:x="7.855cm" svg:y="9.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class: MPDService)</text:span></text:p>
              <text:p text:style-name="P11"><text:span text:style-name="T3">- liste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39" draw:id="id3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75" draw:text-style-name="P10" draw:layer="layout" svg:width="5.397cm" svg:height="1.153cm" svg:x="1.84cm" svg:y="7.6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mpd_control.MPDControl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6" draw:text-style-name="P12" draw:layer="layout" svg:width="5.397cm" svg:height="0.674cm" svg:x="1.84cm" svg:y="8.8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7" draw:text-style-name="P12" draw:layer="layout" svg:width="5.397cm" svg:height="2.569cm" svg:x="1.84cm" svg:y="9.5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class: MPDService)</text:span></text:p>
              <text:p text:style-name="P11"><text:span text:style-name="T3">+ is_web_radio()</text:span></text:p>
              <text:p text:style-name="P11"><text:span text:style-name="T3">+ next()</text:span></text:p>
              <text:p text:style-name="P11"><text:span text:style-name="T3">+ play()</text:span></text:p>
              <text:p text:style-name="P11"><text:span text:style-name="T3">+ stop()</text:span></text:p>
              <text:p text:style-name="P11"><text:span text:style-name="T3">+ pau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40" draw:id="id4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3">
            <draw:custom-shape draw:style-name="gr178" draw:text-style-name="P10" draw:layer="layout" svg:width="6.552cm" svg:height="1.153cm" svg:x="15.685cm" svg:y="7.71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spotify_connect.SpotifyConnect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9" draw:text-style-name="P12" draw:layer="layout" svg:width="6.552cm" svg:height="0.761cm" svg:x="15.685cm" svg:y="8.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0" draw:text-style-name="P12" draw:layer="layout" svg:width="6.552cm" svg:height="1.387cm" svg:x="15.685cm" svg:y="9.63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play()</text:span></text:p>
              <text:p text:style-name="P11"><text:span text:style-name="T3">+ pause()</text:span></text:p>
              <text:p text:style-name="P11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81" draw:text-style-name="P13" draw:layer="layout" svg:x1="9.355cm" svg:y1="7.843cm" svg:x2="7.937cm" svg:y2="5.126cm" draw:start-shape="id37" draw:start-glue-point="5" draw:end-shape="id38" draw:end-glue-point="40" svg:d="M9355 7843v-1338h-1418v-1379" svg:viewBox="0 0 1419 2718">
          <text:p/>
        </draw:connector>
        <draw:connector draw:style-name="gr182" draw:text-style-name="P13" draw:layer="layout" svg:x1="2.141cm" svg:y1="7.694cm" svg:x2="5.918cm" svg:y2="5.17cm" draw:start-shape="id39" draw:start-glue-point="4" draw:end-shape="id38" draw:end-glue-point="4" svg:d="M2141 7694v-1263h3777v-1261" svg:viewBox="0 0 3778 2525">
          <text:p/>
        </draw:connector>
        <draw:connector draw:style-name="gr183" draw:text-style-name="P13" draw:layer="layout" svg:x1="20.417cm" svg:y1="7.718cm" svg:x2="18.022cm" svg:y2="5.17cm" draw:start-shape="id40" draw:start-glue-point="14" draw:end-shape="id38" draw:end-glue-point="31" svg:d="M20417 7718v-1275h-2395v-1273" svg:viewBox="0 0 2396 2549">
          <text:p/>
        </draw:connector>
        <draw:custom-shape draw:style-name="gr184" draw:text-style-name="P14" draw:layer="layout" svg:width="23.995cm" svg:height="1.205cm" svg:x="0.5cm" svg:y="0.499cm">
          <text:p text:style-name="P1">Static View: Music Player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147cm" svg:height="0.725cm" svg:x="4.492cm" svg:y="6.625cm">
          <draw:text-box>
            <text:p><text:span text:style-name="T2">&lt;&lt;uses&gt;&gt;</text:span></text:p>
          </draw:text-box>
        </draw:frame>
        <draw:g draw:style-name="gr3" xml:id="id42" draw:id="id42">
          <draw:glue-point draw:id="4" svg:x="4.917cm" svg:y="-2.025cm"/>
          <draw:glue-point draw:id="5" svg:x="3.74cm" svg:y="-5.09cm"/>
          <draw:glue-point draw:id="6" svg:x="4.328cm" svg:y="-5.09cm"/>
          <draw:custom-shape draw:style-name="gr185" draw:text-style-name="P10" draw:layer="layout" svg:width="5.397cm" svg:height="1.153cm" svg:x="3.903cm" svg:y="13.74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mpd_service.MPDService</text:span></text:p>
            <text:p text:style-name="P9"><text:span text:style-name="T1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12" draw:layer="layout" svg:width="5.397cm" svg:height="0.566cm" svg:x="3.903cm" svg:y="14.899cm">
            <text:p text:style-name="P11"><text:span text:style-name="T3">- client: MPD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12" draw:layer="layout" svg:width="5.397cm" svg:height="1.387cm" svg:x="3.903cm" svg:y="15.4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init()</text:span></text:p>
            <text:p text:style-name="P11"><text:span text:style-name="T3">+ get_stats()</text:span></text:p>
            <text:p text:style-name="P11"><text:span text:style-name="T3">- 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41" draw:id="id41">
          <draw:custom-shape draw:style-name="gr188" draw:text-style-name="P10" draw:layer="layout" svg:width="4.817cm" svg:height="1.153cm" svg:x="11.423cm" svg:y="12.0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mpd.MPDClient</text:span></text:p>
            <text:p text:style-name="P9"><text:span text:style-name="T1">&lt;&lt;librar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9" draw:text-style-name="P12" draw:layer="layout" svg:width="4.817cm" svg:height="0.761cm" svg:x="11.423cm" svg:y="13.1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12" draw:layer="layout" svg:width="4.817cm" svg:height="3.357cm" svg:x="11.423cm" svg:y="13.94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init()</text:span></text:p>
            <text:p text:style-name="P11"><text:span text:style-name="T3">+ idle()</text:span></text:p>
            <text:p text:style-name="P11"><text:span text:style-name="T3">+ update()</text:span></text:p>
            <text:p text:style-name="P11"><text:span text:style-name="T3">+ next()</text:span></text:p>
            <text:p text:style-name="P11"><text:span text:style-name="T3">+ play()</text:span></text:p>
            <text:p text:style-name="P11"><text:span text:style-name="T3">+ stop()</text:span></text:p>
            <text:p text:style-name="P11"><text:span text:style-name="T3">+ pause()</text:span></text:p>
            <text:p text:style-name="P11"><text:span text:style-name="T3">+ statu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91" draw:text-style-name="P13" draw:layer="layout" svg:x1="11.423cm" svg:y1="14.665cm" svg:x2="9.3cm" svg:y2="15.299cm" draw:start-shape="id41" draw:start-glue-point="3" draw:end-shape="id42" draw:end-glue-point="1" svg:d="M11423 14665h-1062v634h-1061" svg:viewBox="0 0 2124 635">
          <text:p/>
        </draw:connector>
        <draw:frame draw:style-name="gr7" draw:text-style-name="P7" draw:layer="layout" svg:width="2.83cm" svg:height="0.725cm" svg:x="1.98cm" svg:y="12.429cm">
          <draw:text-box>
            <text:p><text:span text:style-name="T2">&lt;&lt;is A&gt;&gt;</text:span></text:p>
          </draw:text-box>
          <draw:glue-point draw:id="4" svg:x="0.512cm" svg:y="-0.606cm"/>
        </draw:frame>
        <draw:connector draw:style-name="gr192" draw:text-style-name="P13" draw:layer="layout" svg:x1="8.936cm" svg:y1="13.746cm" svg:x2="9.355cm" svg:y2="10.533cm" draw:start-shape="id42" draw:start-glue-point="6" draw:end-shape="id37" draw:end-glue-point="8" svg:d="M8936 13746v-1607h419v-1606" svg:viewBox="0 0 420 3214">
          <text:p/>
        </draw:connector>
        <draw:connector draw:style-name="gr193" draw:text-style-name="P13" draw:layer="layout" svg:x1="6.601cm" svg:y1="13.746cm" svg:x2="4.538cm" svg:y2="12.089cm" draw:start-shape="id42" draw:end-shape="id39" draw:end-glue-point="2" svg:d="M6601 13746v-829h-2063v-828" svg:viewBox="0 0 2064 1658">
          <text:p/>
        </draw:connector>
        <draw:frame draw:style-name="gr7" draw:text-style-name="P7" draw:layer="layout" svg:width="2.83cm" svg:height="0.725cm" svg:x="9.572cm" svg:y="10.752cm">
          <draw:text-box>
            <text:p><text:span text:style-name="T2">&lt;&lt;is A&gt;&gt;</text:span></text:p>
          </draw:text-box>
          <draw:glue-point draw:id="4" svg:x="0.512cm" svg:y="-0.606cm"/>
        </draw:frame>
        <draw:frame draw:style-name="gr7" draw:text-style-name="P7" draw:layer="layout" svg:width="3.147cm" svg:height="0.725cm" svg:x="20.713cm" svg:y="6.625cm">
          <draw:text-box>
            <text:p><text:span text:style-name="T2">&lt;&lt;uses&gt;&gt;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5-14T18:01:01.024463619</dc:date>
    <meta:editing-duration>PT10H28M24S</meta:editing-duration>
    <meta:editing-cycles>80</meta:editing-cycles>
    <meta:print-date>2026-04-03T16:45:26.431431754</meta:print-date>
    <dc:creator>Henk</dc:creator>
    <meta:document-statistic meta:object-count="287"/>
  </office:meta>
</office:document-meta>
</file>