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cm" fo:min-width="26.007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45cm" fo:min-width="25.537cm" style:writing-mode="lr-tb" loext:decorative="false"/>
      <style:paragraph-properties style:writing-mode="lr-tb"/>
    </style:style>
    <style:style style:name="gr3" style:family="graphic">
      <style:graphic-properties style:writing-mode="lr-tb" loext:decorative="false"/>
    </style:style>
    <style:style style:name="gr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45cm" fo:min-width="25.859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6.108cm" fo:min-width="26.753cm" fo:padding-top="0.151cm" fo:padding-bottom="0.151cm" fo:padding-left="0.276cm" fo:padding-right="0.276cm" loext:decorative="false"/>
    </style:style>
    <style:style style:name="gr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3.59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678cm" fo:min-width="4.01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6.753cm" fo:padding-top="0.151cm" fo:padding-bottom="0.151cm" fo:padding-left="0.276cm" fo:padding-right="0.276cm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53cm" fo:min-width="3.59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6.84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82cm" fo:min-width="7.16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" style:family="graphic">
      <style:graphic-properties loext:decorative="false"/>
    </style:style>
    <style:style style:name="gr2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298cm" fo:min-width="2.548cm" fo:padding-top="0.101cm" fo:padding-bottom="0.101cm" fo:padding-left="0.226cm" fo:padding-right="0.226cm" fo:wrap-option="wrap" draw:shadow="hidden" draw:shadow-offset-x="0.2cm" draw:shadow-offset-y="0.2cm" draw:shadow-color="#808080" loext:decorative="false"/>
      <style:paragraph-properties style:writing-mode="lr-tb"/>
    </style:style>
    <style:style style:name="gr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cm" fo:min-width="0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30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7.48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.45cm" fo:min-width="19.373cm" style:writing-mode="lr-tb" loext:decorative="false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45cm" fo:min-width="19.202cm" style:writing-mode="lr-tb" loext:decorative="false"/>
      <style:paragraph-properties style:writing-mode="lr-tb"/>
    </style:style>
    <style:style style:name="gr3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45cm" fo:min-width="19.445cm" style:writing-mode="lr-tb" loext:decorative="false"/>
      <style:paragraph-properties style:writing-mode="lr-tb"/>
    </style:style>
    <style:style style:name="gr3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0.403cm" fo:padding-top="0.151cm" fo:padding-bottom="0.151cm" fo:padding-left="0.276cm" fo:padding-right="0.276cm" loext:decorative="false"/>
    </style:style>
    <style:style style:name="gr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1cm" fo:min-width="5.96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0.403cm" fo:padding-top="0.151cm" fo:padding-bottom="0.151cm" fo:padding-left="0.276cm" fo:padding-right="0.276cm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1cm" fo:min-width="5.78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5.96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5.96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6" style:family="graphic" style:parent-style-name="standard" style:list-style-name="L2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7.48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1" style:family="graphic" style:parent-style-name="standard">
      <style:graphic-properties draw:textarea-horizontal-align="justify" draw:textarea-vertical-align="middle" draw:auto-grow-height="false" fo:min-height="0.45cm" fo:min-width="23.089cm" style:writing-mode="lr-tb" loext:decorative="false"/>
      <style:paragraph-properties style:writing-mode="lr-tb"/>
    </style:style>
    <style:style style:name="gr62" style:family="graphic" style:parent-style-name="standard">
      <style:graphic-properties draw:textarea-horizontal-align="justify" draw:textarea-vertical-align="middle" draw:auto-grow-height="false" fo:min-height="0.45cm" fo:min-width="22.952cm" style:writing-mode="lr-tb" loext:decorative="false"/>
      <style:paragraph-properties style:writing-mode="lr-tb"/>
    </style:style>
    <style:style style:name="gr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5" style:family="graphic" style:parent-style-name="standard">
      <style:graphic-properties draw:textarea-horizontal-align="justify" draw:textarea-vertical-align="middle" draw:auto-grow-height="false" fo:min-height="0.45cm" fo:min-width="23.243cm" style:writing-mode="lr-tb" loext:decorative="false"/>
      <style:paragraph-properties style:writing-mode="lr-tb"/>
    </style:style>
    <style:style style:name="gr66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4.213cm" fo:padding-top="0.151cm" fo:padding-bottom="0.151cm" fo:padding-left="0.276cm" fo:padding-right="0.276cm" loext:decorative="false"/>
    </style:style>
    <style:style style:name="gr6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4cm" fo:min-width="6.87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0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4.213cm" fo:padding-top="0.151cm" fo:padding-bottom="0.151cm" fo:padding-left="0.276cm" fo:padding-right="0.276cm" style:writing-mode="lr-tb" loext:decorative="false"/>
      <style:paragraph-properties style:writing-mode="lr-tb"/>
    </style:style>
    <style:style style:name="gr7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64cm" fo:min-width="5.78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7cm" fo:min-width="5.14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9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7cm" fo:min-width="5.78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3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4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9.07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8" style:family="graphic" style:parent-style-name="standard">
      <style:graphic-properties draw:textarea-horizontal-align="justify" draw:textarea-vertical-align="middle" draw:auto-grow-height="false" fo:min-height="0.45cm" fo:min-width="25.053cm" style:writing-mode="lr-tb" loext:decorative="false"/>
      <style:paragraph-properties style:writing-mode="lr-tb"/>
    </style:style>
    <style:style style:name="gr89" style:family="graphic" style:parent-style-name="standard">
      <style:graphic-properties draw:textarea-horizontal-align="justify" draw:textarea-vertical-align="middle" draw:auto-grow-height="false" fo:min-height="0.45cm" fo:min-width="24.902cm" style:writing-mode="lr-tb" loext:decorative="false"/>
      <style:paragraph-properties style:writing-mode="lr-tb"/>
    </style:style>
    <style:style style:name="gr9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2" style:family="graphic" style:parent-style-name="standard">
      <style:graphic-properties draw:textarea-horizontal-align="justify" draw:textarea-vertical-align="middle" draw:auto-grow-height="false" fo:min-height="0.45cm" fo:min-width="25.224cm" style:writing-mode="lr-tb" loext:decorative="false"/>
      <style:paragraph-properties style:writing-mode="lr-tb"/>
    </style:style>
    <style:style style:name="gr9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6.108cm" fo:min-width="25.8cm" fo:padding-top="0.151cm" fo:padding-bottom="0.151cm" fo:padding-left="0.276cm" fo:padding-right="0.276cm" loext:decorative="false"/>
    </style:style>
    <style:style style:name="gr9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66cm" fo:min-width="6.08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5.8cm" fo:padding-top="0.151cm" fo:padding-bottom="0.151cm" fo:padding-left="0.276cm" fo:padding-right="0.276cm" style:writing-mode="lr-tb" loext:decorative="false"/>
      <style:paragraph-properties style:writing-mode="lr-tb"/>
    </style:style>
    <style:style style:name="gr9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83cm" fo:min-width="4.99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25cm" fo:min-width="4.99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5" style:family="graphic" style:parent-style-name="standard" style:list-style-name="L2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57cm" fo:min-width="6.26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9cm" fo:min-width="5.8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4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5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9.07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9" style:family="graphic" style:parent-style-name="standard">
      <style:graphic-properties draw:textarea-horizontal-align="justify" draw:textarea-vertical-align="middle" draw:auto-grow-height="false" fo:min-height="0.45cm" fo:min-width="19.698cm" style:writing-mode="lr-tb" loext:decorative="false"/>
      <style:paragraph-properties style:writing-mode="lr-tb"/>
    </style:style>
    <style:style style:name="gr120" style:family="graphic" style:parent-style-name="standard">
      <style:graphic-properties draw:textarea-horizontal-align="justify" draw:textarea-vertical-align="middle" draw:auto-grow-height="false" fo:min-height="0.45cm" fo:min-width="19.585cm" style:writing-mode="lr-tb" loext:decorative="false"/>
      <style:paragraph-properties style:writing-mode="lr-tb"/>
    </style:style>
    <style:style style:name="gr1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3" style:family="graphic" style:parent-style-name="standard">
      <style:graphic-properties draw:textarea-horizontal-align="justify" draw:textarea-vertical-align="middle" draw:auto-grow-height="false" fo:min-height="0.45cm" fo:min-width="19.826cm" style:writing-mode="lr-tb" loext:decorative="false"/>
      <style:paragraph-properties style:writing-mode="lr-tb"/>
    </style:style>
    <style:style style:name="gr12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4.838cm" fo:min-width="20.403cm" fo:padding-top="0.151cm" fo:padding-bottom="0.151cm" fo:padding-left="0.276cm" fo:padding-right="0.276cm" loext:decorative="false"/>
    </style:style>
    <style:style style:name="gr1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38cm" fo:min-width="6.232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8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8.1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9.07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37" style:family="graphic" style:parent-style-name="standard">
      <style:graphic-properties draw:stroke="none" svg:stroke-color="#000000" draw:fill="none" draw:fill-color="#ffffff" draw:auto-grow-height="true" draw:auto-grow-width="false" fo:min-height="0.702cm" loext:decorative="false"/>
      <style:paragraph-properties style:writing-mode="lr-tb"/>
    </style:style>
    <style:style style:name="gr138" style:family="graphic" style:parent-style-name="standard">
      <style:graphic-properties draw:textarea-horizontal-align="justify" draw:textarea-vertical-align="middle" draw:auto-grow-height="false" fo:min-height="0.45cm" fo:min-width="19.065cm" style:writing-mode="lr-tb" loext:decorative="false"/>
      <style:paragraph-properties style:writing-mode="lr-tb"/>
    </style:style>
    <style:style style:name="gr139" style:family="graphic" style:parent-style-name="standard">
      <style:graphic-properties draw:textarea-horizontal-align="justify" draw:textarea-vertical-align="middle" draw:auto-grow-height="false" fo:min-height="0.45cm" fo:min-width="18.718cm" style:writing-mode="lr-tb" loext:decorative="false"/>
      <style:paragraph-properties style:writing-mode="lr-tb"/>
    </style:style>
    <style:style style:name="gr1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2" style:family="graphic" style:parent-style-name="standard">
      <style:graphic-properties draw:textarea-horizontal-align="justify" draw:textarea-vertical-align="middle" draw:auto-grow-height="false" fo:min-height="0.45cm" fo:min-width="18.956cm" style:writing-mode="lr-tb" loext:decorative="false"/>
      <style:paragraph-properties style:writing-mode="lr-tb"/>
    </style:style>
    <style:style style:name="gr14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6.108cm" fo:min-width="20.085cm" fo:padding-top="0.151cm" fo:padding-bottom="0.151cm" fo:padding-left="0.276cm" fo:padding-right="0.276cm" loext:decorative="false"/>
    </style:style>
    <style:style style:name="gr14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37cm" fo:min-width="5.77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0.085cm" fo:padding-top="0.151cm" fo:padding-bottom="0.151cm" fo:padding-left="0.276cm" fo:padding-right="0.276cm" style:writing-mode="lr-tb" loext:decorative="false"/>
      <style:paragraph-properties style:writing-mode="lr-tb"/>
    </style:style>
    <style:style style:name="gr149" style:family="graphic" style:parent-style-name="standard">
      <style:graphic-properties draw:stroke="none" draw:fill="none" fo:min-height="3.793cm" loext:decorative="false"/>
      <style:paragraph-properties style:writing-mode="lr-tb"/>
    </style:style>
    <style:style style:name="gr1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62cm" fo:min-width="6.19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3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76cm" fo:min-width="9.267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9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85cm" fo:min-width="6.21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85cm" fo:min-width="6.21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6" style:family="graphic" style:parent-style-name="standard">
      <style:graphic-properties draw:stroke="none" svg:stroke-color="#000000" draw:fill="none" draw:fill-color="#ffffff" draw:auto-grow-height="true" draw:auto-grow-width="false" fo:min-height="1.972cm" loext:decorative="false"/>
      <style:paragraph-properties style:writing-mode="lr-tb"/>
    </style:style>
    <style:style style:name="gr167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168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9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95cm" fo:min-width="8.537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5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8.1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0" style:family="graphic" style:parent-style-name="standard">
      <style:graphic-properties draw:textarea-horizontal-align="justify" draw:textarea-vertical-align="middle" draw:auto-grow-height="false" fo:min-height="0.45cm" fo:min-width="26.547cm" style:writing-mode="lr-tb" loext:decorative="false"/>
      <style:paragraph-properties style:writing-mode="lr-tb"/>
    </style:style>
    <style:style style:name="gr181" style:family="graphic" style:parent-style-name="standard">
      <style:graphic-properties draw:textarea-horizontal-align="justify" draw:textarea-vertical-align="middle" draw:auto-grow-height="false" fo:min-height="0.45cm" fo:min-width="26.489cm" style:writing-mode="lr-tb" loext:decorative="false"/>
      <style:paragraph-properties style:writing-mode="lr-tb"/>
    </style:style>
    <style:style style:name="gr18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2cm" fo:min-width="4.62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7" style:family="graphic" style:parent-style-name="standard">
      <style:graphic-properties draw:textarea-horizontal-align="justify" draw:textarea-vertical-align="middle" draw:auto-grow-height="false" fo:min-height="0.45cm" fo:min-width="26.704cm" style:writing-mode="lr-tb" loext:decorative="false"/>
      <style:paragraph-properties style:writing-mode="lr-tb"/>
    </style:style>
    <style:style style:name="gr188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398cm" fo:min-width="27.148cm" fo:padding-top="0.151cm" fo:padding-bottom="0.151cm" fo:padding-left="0.276cm" fo:padding-right="0.276cm" loext:decorative="false"/>
    </style:style>
    <style:style style:name="gr19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45cm" fo:min-width="5.46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5.91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968cm" fo:min-width="27.148cm" fo:padding-top="0.151cm" fo:padding-bottom="0.151cm" fo:padding-left="0.276cm" fo:padding-right="0.276cm" style:writing-mode="lr-tb" loext:decorative="false"/>
      <style:paragraph-properties style:writing-mode="lr-tb"/>
    </style:style>
    <style:style style:name="gr19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69cm" fo:min-width="7.80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51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23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24cm" fo:min-width="5.37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6" style:family="graphic" style:parent-style-name="standard">
      <style:graphic-properties draw:stroke="none" svg:stroke-color="#000000" draw:fill="none" draw:fill-color="#ffffff" draw:auto-grow-height="true" draw:auto-grow-width="false" fo:min-height="0cm" loext:decorative="false"/>
      <style:paragraph-properties style:writing-mode="lr-tb"/>
    </style:style>
    <style:style style:name="gr21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9.07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1" style:family="graphic" style:parent-style-name="standard">
      <style:graphic-properties draw:textarea-horizontal-align="justify" draw:textarea-vertical-align="middle" draw:auto-grow-height="false" fo:min-height="0.45cm" fo:min-width="22.955cm" style:writing-mode="lr-tb" loext:decorative="false"/>
      <style:paragraph-properties style:writing-mode="lr-tb"/>
    </style:style>
    <style:style style:name="gr222" style:family="graphic" style:parent-style-name="standard">
      <style:graphic-properties draw:textarea-horizontal-align="justify" draw:textarea-vertical-align="middle" draw:auto-grow-height="false" fo:min-height="0.45cm" fo:min-width="23.004cm" style:writing-mode="lr-tb" loext:decorative="false"/>
      <style:paragraph-properties style:writing-mode="lr-tb"/>
    </style:style>
    <style:style style:name="gr2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5" style:family="graphic" style:parent-style-name="standard">
      <style:graphic-properties draw:textarea-horizontal-align="justify" draw:textarea-vertical-align="middle" draw:auto-grow-height="false" fo:min-height="0.45cm" fo:min-width="22.753cm" style:writing-mode="lr-tb" loext:decorative="false"/>
      <style:paragraph-properties style:writing-mode="lr-tb"/>
    </style:style>
    <style:style style:name="gr226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413cm" fo:min-width="23.443cm" fo:padding-top="0.151cm" fo:padding-bottom="0.151cm" fo:padding-left="0.276cm" fo:padding-right="0.276cm" loext:decorative="false"/>
    </style:style>
    <style:style style:name="gr22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36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5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6.09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3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38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3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903cm" fo:min-width="23.443cm" fo:padding-top="0.151cm" fo:padding-bottom="0.151cm" fo:padding-left="0.276cm" fo:padding-right="0.276cm" style:writing-mode="lr-tb" loext:decorative="false"/>
      <style:paragraph-properties style:writing-mode="lr-tb"/>
    </style:style>
    <style:style style:name="gr2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95cm" fo:min-width="3.37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7" style:family="graphic" style:parent-style-name="standard" style:list-style-name="L2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8" style:family="graphic" style:parent-style-name="standard" style:list-style-name="L2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9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50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51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5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7.48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5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6f9d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6f9d4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fafafa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center" fo:text-indent="0cm"/>
    </style:style>
    <style:style style:name="P1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zxx" fo:country="none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zxx" fo:country="none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fo:color="#c9211e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fo:color="#c9211e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text-properties fo:color="#c9211e" loext:opacity="100%" fo:font-size="12pt" style:font-size-asian="12pt" style:font-size-complex="12pt"/>
    </style:style>
    <style:style style:name="P29" style:family="paragraph">
      <loext:graphic-properties draw:fill="none" draw:fill-color="#ffffff"/>
      <style:text-properties fo:color="#c9211e" loext:opacity="100%" fo:font-size="12pt" style:font-size-asian="12pt" style:font-size-complex="12pt"/>
    </style:style>
    <style:style style:name="P30" style:family="paragraph">
      <style:text-properties fo:font-size="12pt" style:font-size-asian="12pt" style:font-size-complex="12pt"/>
    </style:style>
    <style:style style:name="P31" style:family="paragraph">
      <loext:graphic-properties draw:fill="none"/>
      <style:text-properties fo:font-size="12pt" style:font-size-asian="12pt" style:font-size-complex="12pt"/>
    </style:style>
    <style:style style:name="P32" style:family="paragraph">
      <style:paragraph-properties fo:text-align="start"/>
    </style:style>
    <style:style style:name="P33" style:family="paragraph">
      <style:paragraph-properties fo:text-align="start" style:writing-mode="lr-tb"/>
    </style:style>
    <style:style style:name="P3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c9211e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Utilities" draw:style-name="dp1" draw:master-page-name="Default">
        <draw:custom-shape draw:style-name="gr1" draw:text-style-name="P2" draw:layer="layout" svg:width="26.507cm" svg:height="0.7cm" svg:x="1.482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6.037cm" svg:height="0.7cm" svg:x="1.633cm" svg:y="5.6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2" draw:id="id2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glue-point draw:id="45" svg:x="-2.202cm" svg:y="5.141cm"/>
          <draw:custom-shape draw:style-name="gr4" draw:text-style-name="P4" draw:layer="layout" svg:width="26.125cm" svg:height="1.153cm" svg:x="1.629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"><text:span text:style-name="T1">oradio_control.py</text:span></text:p>
            <text:p text:style-name="P3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26.125cm" svg:height="0.679cm" svg:x="1.629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"><text:span text:style-name="T1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" draw:text-style-name="P2" draw:layer="layout" svg:width="26.359cm" svg:height="0.7cm" svg:x="1.311cm" svg:y="17.1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085cm" svg:height="0.725cm" svg:x="20.367cm" svg:y="7.032cm">
          <draw:text-box>
            <text:p><text:span text:style-name="T2">&lt;&lt;uses&gt;&gt;</text:span></text:p>
          </draw:text-box>
        </draw:frame>
        <draw:custom-shape draw:style-name="gr8" draw:text-style-name="P8" draw:layer="layout" svg:width="27.305cm" svg:height="16.41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4" draw:id="id4">
          <draw:glue-point draw:id="4" svg:x="1.153cm" svg:y="-4.294cm"/>
          <draw:glue-point draw:id="5" svg:x="3.461cm" svg:y="-5.146cm"/>
          <draw:custom-shape draw:style-name="gr9" draw:text-style-name="P10" draw:layer="layout" svg:width="4.047cm" svg:height="1.153cm" svg:x="1.78cm" svg:y="8.5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9"><text:span text:style-name="T1">system_sounds.py</text:span></text:p>
            <text:p text:style-name="P9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2" draw:layer="layout" svg:width="4.047cm" svg:height="0.761cm" svg:x="1.78cm" svg:y="9.703cm">
            <text:p text:style-name="P11"><text:span text:style-name="T3">+ play_soun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 xml:id="id3" draw:id="id3">
          <draw:glue-point draw:id="4" svg:x="-3.94cm" svg:y="-4.644cm"/>
          <draw:glue-point draw:id="5" svg:x="4.311cm" svg:y="-5.137cm"/>
          <draw:glue-point draw:id="6" svg:x="3.601cm" svg:y="-5.137cm"/>
          <draw:custom-shape draw:style-name="gr11" draw:text-style-name="P10" draw:layer="layout" svg:width="4.465cm" svg:height="1.153cm" svg:x="7.917cm" svg:y="11.61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9"><text:span text:style-name="T1">oradio_logging.py</text:span></text:p>
            <text:p text:style-name="P9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2" draw:layer="layout" svg:width="4.465cm" svg:height="0.887cm" svg:x="7.917cm" svg:y="12.765cm">
            <text:p text:style-name="P11"><text:span text:style-name="T3">+ oradio_log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3" draw:text-style-name="P13" draw:layer="layout" svg:x1="23.284cm" svg:y1="7.929cm" svg:x2="21.449cm" svg:y2="5.27cm" draw:start-shape="id1" draw:end-shape="id2" draw:end-glue-point="7" svg:d="M23284 7929v-1330h-1835v-1329" svg:viewBox="0 0 1836 2660">
          <text:p/>
        </draw:connector>
        <draw:connector draw:style-name="gr14" draw:text-style-name="P13" draw:layer="layout" svg:x1="12.073cm" svg:y1="11.612cm" svg:x2="11.494cm" svg:y2="5.27cm" draw:start-shape="id3" draw:start-glue-point="5" draw:end-shape="id2" draw:end-glue-point="35" svg:d="M12073 11612v-3172h-579v-3170" svg:viewBox="0 0 580 6343">
          <text:p/>
        </draw:connector>
        <draw:connector draw:style-name="gr15" draw:text-style-name="P13" draw:layer="layout" svg:x1="4.269cm" svg:y1="8.686cm" svg:x2="5.111cm" svg:y2="5.27cm" draw:start-shape="id4" draw:start-glue-point="4" draw:end-shape="id2" draw:end-glue-point="17" svg:d="M4269 8686v-1777h842v-1639" svg:viewBox="0 0 843 3417">
          <text:p/>
        </draw:connector>
        <draw:custom-shape draw:style-name="gr16" draw:text-style-name="P14" draw:layer="layout" svg:width="27.305cm" svg:height="0.952cm" svg:x="1cm" svg:y="1.1cm">
          <text:p text:style-name="P1">Static view: Utilities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5" draw:id="id5">
          <draw:glue-point draw:id="4" svg:x="1.153cm" svg:y="-4.294cm"/>
          <draw:glue-point draw:id="5" svg:x="3.461cm" svg:y="-5.146cm"/>
          <draw:glue-point draw:id="6" svg:x="-3.33cm" svg:y="-4.948cm"/>
          <draw:custom-shape draw:style-name="gr17" draw:text-style-name="P10" draw:layer="controls" svg:width="4.047cm" svg:height="1.153cm" svg:x="6.492cm" svg:y="8.5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9"><text:span text:style-name="T1">error_service.py</text:span></text:p>
            <text:p text:style-name="P9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2" draw:layer="controls" svg:width="4.047cm" svg:height="1.262cm" svg:x="6.492cm" svg:y="9.743cm">
            <text:p text:style-name="P11"><text:span text:style-name="T3">+ xxxx</text:span></text:p>
            <text:p text:style-name="P11"><text:span text:style-name="T3">+ xxxx</text:span></text:p>
            <text:p text:style-name="P11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9" draw:text-style-name="P13" draw:layer="controls" svg:x1="7.168cm" svg:y1="8.603cm" svg:x2="8.939cm" svg:y2="5.27cm" draw:start-shape="id5" draw:start-glue-point="6" draw:end-shape="id2" draw:end-glue-point="45" svg:d="M7168 8603v-1674h1771v-1659" svg:viewBox="0 0 1772 3334">
          <text:p/>
        </draw:connector>
        <draw:g draw:style-name="gr3" xml:id="id1" draw:id="id1">
          <draw:custom-shape draw:style-name="gr20" draw:text-style-name="P10" draw:layer="layout" svg:width="7.302cm" svg:height="1.153cm" svg:x="19.633cm" svg:y="7.92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9"><text:span text:style-name="T1">throttled_monitor.py</text:span></text:p>
            <text:p text:style-name="P9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2" draw:layer="layout" svg:width="7.302cm" svg:height="0.761cm" svg:x="19.633cm" svg:y="9.082cm">
            <text:p text:style-name="P15"><text:span text:style-name="T3">- throttled_monitor: RpiThrottlingMonitor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2" draw:layer="layout" svg:width="7.302cm" svg:height="0.599cm" svg:x="19.633cm" svg:y="9.84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 xml:id="id6" draw:id="id6">
          <draw:glue-point draw:id="4" svg:x="-5.035cm" svg:y="-2.72cm"/>
          <draw:glue-point draw:id="5" svg:x="-0.912cm" svg:y="-1.099cm"/>
          <draw:glue-point draw:id="6" svg:x="-0.496cm" svg:y="-1.099cm"/>
          <draw:custom-shape draw:style-name="gr23" draw:text-style-name="P17" draw:layer="layout" svg:width="7.62cm" svg:height="1.153cm" svg:x="18.84cm" svg:y="12.17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5"><text:span text:style-name="T1">throttled_monitor.RpiThrottlingMonitor</text:span></text:p>
            <text:p text:style-name="P16"><text:span text:style-name="T1">&lt;&lt;class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2" draw:layer="layout" svg:width="7.62cm" svg:height="0.591cm" svg:x="18.84cm" svg:y="13.325cm">
            <text:p text:style-name="P1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2" draw:layer="layout" svg:width="7.62cm" svg:height="2.175cm" svg:x="18.84cm" svg:y="13.91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3">- init()</text:span></text:p>
            <text:p text:style-name="P11"><text:span text:style-name="T3">+ start()</text:span></text:p>
            <text:p text:style-name="P11"><text:span text:style-name="T3">+ stop()</text:span></text:p>
            <text:p text:style-name="P11"><text:span text:style-name="T3">+ force_throttled()</text:span></text:p>
            <text:p text:style-name="P11"><text:span text:style-name="T3">+ clear_throttle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6" draw:text-style-name="P13" draw:layer="layout" svg:x1="22.65cm" svg:y1="12.172cm" svg:x2="23.284cm" svg:y2="10.442cm" draw:start-shape="id6" draw:end-shape="id1" svg:d="M22650 12172v-866h634v-864" svg:viewBox="0 0 635 1731">
          <text:p/>
        </draw:connector>
        <draw:frame draw:style-name="gr7" draw:text-style-name="P7" draw:layer="layout" svg:width="3.085cm" svg:height="0.725cm" svg:x="20.367cm" svg:y="10.842cm">
          <draw:text-box>
            <text:p><text:span text:style-name="T2">&lt;&lt;uses&gt;&gt;</text:span></text:p>
          </draw:text-box>
        </draw:frame>
        <draw:g draw:style-name="gr27">
          <draw:polygon draw:style-name="gr28" draw:text-style-name="P19" draw:layer="layout" svg:width="5.199cm" svg:height="1.904cm" svg:x="1.832cm" svg:y="14.652cm" svg:viewBox="0 0 5200 1905" draw:points="5200,476 5200,1905 0,1905 0,0 4420,0">
            <text:p text:style-name="P18"><text:span text:style-name="T4">oradio_log:</text:span></text:p>
            <text:p text:style-name="P18"><text:span text:style-name="T4">Implementation detail</text:span></text:p>
          </draw:polygon>
          <draw:path draw:style-name="gr29" draw:text-style-name="P19" draw:layer="layout" svg:width="0.651cm" svg:height="0.398cm" svg:x="6.316cm" svg:y="14.69cm" svg:viewBox="0 0 652 399" svg:d="M0 0c217 133 435 265 652 399-217 0-435 0-652 0 0-134 0-266 0-399z">
            <text:p/>
          </draw:path>
        </draw:g>
        <draw:frame draw:style-name="gr7" draw:text-style-name="P7" draw:layer="layout" svg:width="3.085cm" svg:height="0.725cm" svg:x="8.62cm" svg:y="7.26cm">
          <draw:text-box>
            <text:p><text:span text:style-name="T2">&lt;&lt;uses&gt;&gt;</text:span></text:p>
          </draw:text-box>
        </draw:frame>
        <draw:connector draw:style-name="gr30" draw:text-style-name="P13" draw:layer="layout" svg:x1="16.239cm" svg:y1="14.435cm" svg:x2="18.84cm" svg:y2="13.066cm" draw:start-shape="id7" draw:start-glue-point="4" draw:end-shape="id6" draw:end-glue-point="4" svg:d="M16239 14435v-1369h2601" svg:viewBox="0 0 2602 1370">
          <text:p/>
        </draw:connector>
        <draw:frame draw:style-name="gr7" draw:text-style-name="P7" draw:layer="layout" svg:width="3.085cm" svg:height="0.725cm" svg:x="15.06cm" svg:y="12.112cm">
          <draw:text-box>
            <text:p><text:span text:style-name="T2">&lt;&lt;uses&gt;&gt;</text:span></text:p>
          </draw:text-box>
        </draw:frame>
        <draw:g draw:style-name="gr3" xml:id="id7" draw:id="id7">
          <draw:glue-point draw:id="4" svg:x="3.4cm" svg:y="-5.131cm"/>
          <draw:custom-shape draw:style-name="gr31" draw:text-style-name="P21" draw:layer="layout" svg:width="7.937cm" svg:height="1.153cm" svg:x="9.573cm" svg:y="14.43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0"><text:span text:style-name="T1">&lt;&lt;module&gt;&gt;</text:span></text:p>
            <text:p text:style-name="P20"><text:span text:style-name="T1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2" draw:layer="layout" svg:width="7.937cm" svg:height="0.435cm" svg:x="9.573cm" svg:y="15.5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2" draw:layer="layout" svg:width="7.937cm" svg:height="0.599cm" svg:x="9.573cm" svg:y="15.95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3">+ put_error_message(message: Error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Remote monitoring" draw:style-name="dp1" draw:master-page-name="Default">
        <draw:custom-shape draw:style-name="gr34" draw:text-style-name="P2" draw:layer="layout" svg:width="19.873cm" svg:height="0.7cm" svg:x="1.447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" draw:layer="layout" svg:width="19.702cm" svg:height="0.7cm" svg:x="1.554cm" svg:y="5.6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9" draw:id="id9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custom-shape draw:style-name="gr36" draw:text-style-name="P4" draw:layer="layout" svg:width="19.769cm" svg:height="1.153cm" svg:x="1.551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"><text:span text:style-name="T1">oradio_control.py</text:span></text:p>
            <text:p text:style-name="P3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6" draw:layer="layout" svg:width="19.769cm" svg:height="0.679cm" svg:x="1.551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"><text:span text:style-name="T1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8" draw:text-style-name="P2" draw:layer="layout" svg:width="19.945cm" svg:height="0.7cm" svg:x="1.311cm" svg:y="18.8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085cm" svg:height="0.725cm" svg:x="4.582cm" svg:y="6.715cm">
          <draw:text-box>
            <text:p><text:span text:style-name="T2">&lt;&lt;uses&gt;&gt;</text:span></text:p>
          </draw:text-box>
        </draw:frame>
        <draw:custom-shape draw:style-name="gr39" draw:text-style-name="P8" draw:layer="layout" svg:width="20.955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8" draw:id="id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3">
            <draw:custom-shape draw:style-name="gr40" draw:text-style-name="P10" draw:layer="layout" svg:width="6.423cm" svg:height="1.153cm" svg:x="2.719cm" svg:y="7.51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remote_monitoring.RMService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12" draw:layer="layout" svg:width="6.423cm" svg:height="0.76cm" svg:x="2.719cm" svg:y="8.671cm">
              <text:p text:style-name="P15"><text:span text:style-name="T3">- rms_queue: Queu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2" draw:layer="layout" svg:width="6.423cm" svg:height="0.993cm" svg:x="2.719cm" svg:y="9.43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send_message()</text:span></text:p>
              <text:p text:style-name="P11"><text:span text:style-name="T3">+ clo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43" draw:text-style-name="P13" draw:layer="layout" draw:line-skew="0.345cm" svg:x1="7.357cm" svg:y1="7.519cm" svg:x2="5.505cm" svg:y2="5.27cm" draw:start-shape="id8" draw:start-glue-point="14" draw:end-shape="id9" draw:end-glue-point="4" svg:d="M7357 7519v-781h-1852v-1468" svg:viewBox="0 0 1853 2250">
          <text:p/>
        </draw:connector>
        <draw:custom-shape draw:style-name="gr44" draw:text-style-name="P14" draw:layer="layout" svg:width="20.955cm" svg:height="0.952cm" svg:x="1cm" svg:y="1.1cm">
          <text:p text:style-name="P1">Static view: Remote monitoring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10" draw:id="id1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45" draw:text-style-name="P10" draw:layer="layout" svg:width="6.237cm" svg:height="1.153cm" svg:x="14.013cm" svg:y="7.10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wifi_service.WifiService</text:span></text:p>
              <text:p text:style-name="P9"><text:span text:style-name="T1">&lt;&lt;Server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6" draw:text-style-name="P12" draw:layer="layout" svg:width="6.237cm" svg:height="0.67cm" svg:x="14.013cm" svg:y="8.255cm">
              <text:p text:style-name="P11"><text:span text:style-name="T3">- rms_queue: Queu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7" draw:text-style-name="P12" draw:layer="layout" svg:width="6.237cm" svg:height="2.569cm" svg:x="14.013cm" svg:y="8.92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init(queue: Queue)</text:span></text:p>
              <text:p text:style-name="P11"><text:span text:style-name="T3">+ get_state()</text:span></text:p>
              <text:p text:style-name="P11"><text:span text:style-name="T3">+ wifi_connect()</text:span></text:p>
              <text:p text:style-name="P11"><text:span text:style-name="T3">+ wifi_disconnect()</text:span></text:p>
              <text:p text:style-name="P11"><text:span text:style-name="T3">+ close()</text:span></text:p>
              <text:p text:style-name="P11"><text:span text:style-name="T3">- send_messag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48" draw:text-style-name="P13" draw:layer="layout" svg:x1="14.013cm" svg:y1="9.298cm" svg:x2="9.141cm" svg:y2="8.154cm" draw:start-shape="id10" draw:end-shape="id8" draw:end-glue-point="13" svg:d="M14013 9298h-2436v-1144h-2436" svg:viewBox="0 0 4873 1145">
          <text:p/>
        </draw:connector>
        <draw:frame draw:style-name="gr7" draw:text-style-name="P7" draw:layer="layout" svg:width="3.085cm" svg:height="0.725cm" svg:x="11.16cm" svg:y="7.26cm">
          <draw:text-box>
            <text:p><text:span text:style-name="T2">&lt;&lt;uses&gt;&gt;</text:span></text:p>
          </draw:text-box>
        </draw:frame>
        <draw:g draw:style-name="gr3" xml:id="id11" draw:id="id1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3">
            <draw:custom-shape draw:style-name="gr49" draw:text-style-name="P10" draw:layer="layout" svg:width="6.423cm" svg:height="1.153cm" svg:x="2.905cm" svg:y="13.104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remote_monitoring.Heartbeat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12" draw:layer="layout" svg:width="6.423cm" svg:height="0.761cm" svg:x="2.905cm" svg:y="14.2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2" draw:layer="layout" svg:width="6.423cm" svg:height="1.387cm" svg:x="2.905cm" svg:y="15.01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start_heartbeat()</text:span></text:p>
              <text:p text:style-name="P11"><text:span text:style-name="T3">+ stop_heartbeat()</text:span></text:p>
              <text:p text:style-name="P11"><text:span text:style-name="T3">+ clo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12" draw:id="id1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3">
            <draw:custom-shape draw:style-name="gr52" draw:text-style-name="P10" draw:layer="layout" svg:width="6.423cm" svg:height="1.153cm" svg:x="11.107cm" svg:y="15.55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&lt;&lt;BaseClass&gt;&gt;</text:span></text:p>
              <text:p text:style-name="P9"><text:span text:style-name="T1">Tim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3" draw:text-style-name="P12" draw:layer="layout" svg:width="6.423cm" svg:height="0.761cm" svg:x="11.107cm" svg:y="16.708cm">
              <text:p text:style-name="P15"><text:span text:style-name="T3">- rms_queue: Queu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4" draw:text-style-name="P12" draw:layer="layout" svg:width="6.423cm" svg:height="0.993cm" svg:x="11.107cm" svg:y="17.46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start()</text:span></text:p>
              <text:p text:style-name="P11"><text:span text:style-name="T3">+ stop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55" draw:text-style-name="P13" draw:layer="layout" svg:x1="7.543cm" svg:y1="13.105cm" svg:x2="4.505cm" svg:y2="10.424cm" draw:start-shape="id11" draw:start-glue-point="14" draw:end-shape="id8" draw:end-glue-point="8" svg:d="M7543 13105v-1342h-3038v-1339" svg:viewBox="0 0 3039 2682">
          <text:p/>
        </draw:connector>
        <draw:frame draw:style-name="gr7" draw:text-style-name="P7" draw:layer="layout" svg:width="3.085cm" svg:height="0.725cm" svg:x="4.175cm" svg:y="12.34cm">
          <draw:text-box>
            <text:p><text:span text:style-name="T2">&lt;&lt;uses&gt;&gt;</text:span></text:p>
          </draw:text-box>
        </draw:frame>
        <draw:connector draw:style-name="gr56" draw:text-style-name="P13" draw:layer="layout" svg:x1="11.107cm" svg:y1="16.733cm" svg:x2="9.327cm" svg:y2="15.861cm" draw:start-shape="id12" draw:start-glue-point="22" draw:end-shape="id11" draw:end-glue-point="12" svg:d="M11107 16733h-890v-872h-890" svg:viewBox="0 0 1781 873">
          <text:p/>
        </draw:connector>
        <draw:frame draw:style-name="gr7" draw:text-style-name="P7" draw:layer="layout" svg:width="2.54cm" svg:height="0.725cm" svg:x="7.032cm" svg:y="16.557cm">
          <draw:text-box>
            <text:p><text:span text:style-name="T2">&lt;&lt;is a&gt;&gt;</text:span></text:p>
          </draw:text-box>
        </draw:frame>
        <draw:connector draw:style-name="gr57" draw:text-style-name="P13" draw:layer="layout" svg:x1="12.295cm" svg:y1="13.608cm" svg:x2="9.141cm" svg:y2="9.88cm" draw:start-shape="id13" draw:end-shape="id8" draw:end-glue-point="12" svg:d="M12295 13608h-1577v-3728h-1577" svg:viewBox="0 0 3155 3729">
          <text:p/>
        </draw:connector>
        <draw:g draw:style-name="gr3" xml:id="id13" draw:id="id13">
          <draw:custom-shape draw:style-name="gr58" draw:text-style-name="P21" draw:layer="layout" svg:width="7.937cm" svg:height="1.153cm" svg:x="12.295cm" svg:y="12.54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0"><text:span text:style-name="T1">&lt;&lt;module&gt;&gt;</text:span></text:p>
            <text:p text:style-name="P20"><text:span text:style-name="T1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12" draw:layer="layout" svg:width="7.937cm" svg:height="0.435cm" svg:x="12.295cm" svg:y="13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12" draw:layer="layout" svg:width="7.937cm" svg:height="0.599cm" svg:x="12.295cm" svg:y="14.0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3">+ put_error_message(message: Error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Web service" draw:style-name="dp1" draw:master-page-name="Default">
        <draw:custom-shape draw:style-name="gr61" draw:text-style-name="P2" draw:layer="layout" svg:width="23.589cm" svg:height="0.7cm" svg:x="1.465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" draw:layer="layout" svg:width="23.452cm" svg:height="0.7cm" svg:x="1.602cm" svg:y="5.6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15" draw:id="id15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custom-shape draw:style-name="gr63" draw:text-style-name="P4" draw:layer="layout" svg:width="23.532cm" svg:height="1.153cm" svg:x="1.598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"><text:span text:style-name="T1">oradio_control.py</text:span></text:p>
            <text:p text:style-name="P3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6" draw:layer="layout" svg:width="23.532cm" svg:height="0.679cm" svg:x="1.598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"><text:span text:style-name="T1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5" draw:text-style-name="P2" draw:layer="layout" svg:width="23.743cm" svg:height="0.7cm" svg:x="1.311cm" svg:y="18.7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085cm" svg:height="0.725cm" svg:x="5.535cm" svg:y="6.625cm">
          <draw:text-box>
            <text:p><text:span text:style-name="T2">&lt;&lt;uses&gt;&gt;</text:span></text:p>
          </draw:text-box>
        </draw:frame>
        <draw:custom-shape draw:style-name="gr66" draw:text-style-name="P8" draw:layer="layout" svg:width="24.765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14" draw:id="id1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67" draw:text-style-name="P10" draw:layer="layout" svg:width="7.324cm" svg:height="1.153cm" svg:x="2.013cm" svg:y="7.44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web_service.WebService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8" draw:text-style-name="P12" draw:layer="layout" svg:width="7.324cm" svg:height="0.949cm" svg:x="2.013cm" svg:y="8.595cm">
              <text:p text:style-name="P15"><text:span text:style-name="T3">- web_queue: Queue</text:span></text:p>
              <text:p text:style-name="P15"><text:span text:style-name="T3">- uvicorn_server: UvicornServ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9" draw:text-style-name="P23" draw:layer="layout" svg:width="7.324cm" svg:height="2.175cm" svg:x="2.013cm" svg:y="9.54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22"><text:span text:style-name="T3">+ init()</text:span></text:p>
              <text:p text:style-name="P22"><text:span text:style-name="T3">+ stop()</text:span></text:p>
              <text:p text:style-name="P22"><text:span text:style-name="T3">+ get_state()</text:span></text:p>
              <text:p text:style-name="P22"><text:span text:style-name="T3">+ start()</text:span></text:p>
              <text:p text:style-name="P22"><text:span text:style-name="T3">+ clo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70" draw:text-style-name="P13" draw:layer="layout" draw:line-skew="0.485cm" svg:x1="4.05cm" svg:y1="7.443cm" svg:x2="3.265cm" svg:y2="5.27cm" draw:start-shape="id14" draw:start-glue-point="5" draw:end-shape="id15" draw:end-glue-point="16" svg:d="M4050 7443v-603h-785v-1570" svg:viewBox="0 0 786 2174">
          <text:p/>
        </draw:connector>
        <draw:custom-shape draw:style-name="gr71" draw:text-style-name="P14" draw:layer="layout" svg:width="24.765cm" svg:height="0.952cm" svg:x="1cm" svg:y="1.1cm">
          <text:p text:style-name="P1">Static view: Web Servic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16" draw:id="id1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72" draw:text-style-name="P10" draw:layer="layout" svg:width="6.237cm" svg:height="1.153cm" svg:x="11.477cm" svg:y="8.70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web_server.UvicornServer</text:span></text:p>
              <text:p text:style-name="P9"><text:span text:style-name="T1">&lt;&lt;Server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3" draw:text-style-name="P12" draw:layer="layout" svg:width="6.237cm" svg:height="0.473cm" svg:x="11.477cm" svg:y="9.8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4" draw:text-style-name="P12" draw:layer="layout" svg:width="6.237cm" svg:height="1.781cm" svg:x="11.477cm" svg:y="10.33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init(app:FastAPI)</text:span></text:p>
              <text:p text:style-name="P11"><text:span text:style-name="T3">+ run()</text:span></text:p>
              <text:p text:style-name="P11"><text:span text:style-name="T3">+ start()</text:span></text:p>
              <text:p text:style-name="P11"><text:span text:style-name="T3">+ stop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17" draw:id="id1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g draw:style-name="gr3">
              <draw:custom-shape draw:style-name="gr75" draw:text-style-name="P10" draw:layer="layout" svg:width="5.602cm" svg:height="1.153cm" svg:x="19.232cm" svg:y="10.288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9"><text:span text:style-name="T1">fastapi_server.api_ap</text:span></text:p>
                <text:p text:style-name="P9"><text:span text:style-name="T1">&lt;&lt;Framework&gt;&gt;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6" draw:text-style-name="P12" draw:layer="layout" svg:width="5.602cm" svg:height="0.676cm" svg:x="19.232cm" svg:y="11.441cm">
                <text:p text:style-name="P11"><text:span text:style-name="T3">+ api_app: FastAPI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7" draw:text-style-name="P12" draw:layer="layout" svg:width="5.602cm" svg:height="2.175cm" svg:x="19.232cm" svg:y="12.111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11"><text:span text:style-name="T3">+ @api_app.get()</text:span></text:p>
                <text:p text:style-name="P11"><text:span text:style-name="T3">+ @api_app.put()</text:span></text:p>
                <text:p text:style-name="P11"><text:span text:style-name="T3">+ @api_app.post()</text:span></text:p>
                <text:p text:style-name="P11"><text:span text:style-name="T3">+ @api_app.api_route()</text:span></text:p>
                <text:p text:style-name="P11"><text:span text:style-name="T3">+ @api_app.middleware(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frame draw:style-name="gr7" draw:text-style-name="P7" draw:layer="layout" svg:width="3.81cm" svg:height="0.725cm" svg:x="10.525cm" svg:y="7.26cm">
          <draw:text-box>
            <text:p><text:span text:style-name="T2">&lt;&lt;consists of&gt;&gt;</text:span></text:p>
          </draw:text-box>
        </draw:frame>
        <draw:frame draw:style-name="gr7" draw:text-style-name="P7" draw:layer="layout" svg:width="3.085cm" svg:height="0.725cm" svg:x="10.297cm" svg:y="13.065cm">
          <draw:text-box>
            <text:p><text:span text:style-name="T2">&lt;&lt;uses&gt;&gt;</text:span></text:p>
          </draw:text-box>
        </draw:frame>
        <draw:connector draw:style-name="gr78" draw:text-style-name="P13" draw:layer="layout" svg:x1="14.595cm" svg:y1="8.705cm" svg:x2="9.336cm" svg:y2="8.078cm" draw:start-shape="id16" draw:start-glue-point="0" draw:end-shape="id14" draw:end-glue-point="13" svg:d="M14595 8705v-627h-5259" svg:viewBox="0 0 5260 628">
          <text:p/>
        </draw:connector>
        <draw:connector draw:style-name="gr79" draw:text-style-name="P13" draw:layer="layout" svg:x1="17.713cm" svg:y1="9.341cm" svg:x2="23.278cm" svg:y2="10.289cm" draw:start-shape="id16" draw:start-glue-point="13" draw:end-shape="id17" draw:end-glue-point="14" svg:d="M17713 9341h5565v948" svg:viewBox="0 0 5566 949">
          <text:p/>
        </draw:connector>
        <draw:g draw:style-name="gr3" xml:id="id18" draw:id="id1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80" draw:text-style-name="P10" draw:layer="layout" svg:width="6.237cm" svg:height="1.153cm" svg:x="2.183cm" svg:y="13.50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wifi_service.WifiService</text:span></text:p>
              <text:p text:style-name="P9"><text:span text:style-name="T1">&lt;&lt;Server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1" draw:text-style-name="P12" draw:layer="layout" svg:width="6.237cm" svg:height="0.779cm" svg:x="2.183cm" svg:y="14.66cm">
              <text:p text:style-name="P11"><text:span text:style-name="T3">- web_queue: Queu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2" draw:text-style-name="P12" draw:layer="layout" svg:width="6.237cm" svg:height="2.569cm" svg:x="2.183cm" svg:y="15.43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init(queue: Queue)</text:span></text:p>
              <text:p text:style-name="P11"><text:span text:style-name="T3">+ get_state()</text:span></text:p>
              <text:p text:style-name="P11"><text:span text:style-name="T3">+ wifi_connect()</text:span></text:p>
              <text:p text:style-name="P11"><text:span text:style-name="T3">+ wifi_disconnect()</text:span></text:p>
              <text:p text:style-name="P11"><text:span text:style-name="T3">+ close()</text:span></text:p>
              <text:p text:style-name="P11"><text:span text:style-name="T3">- send_messag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83" draw:text-style-name="P13" draw:layer="layout" svg:x1="6.687cm" svg:y1="13.508cm" svg:x2="4.05cm" svg:y2="11.719cm" draw:start-shape="id18" draw:start-glue-point="14" draw:end-shape="id14" draw:end-glue-point="8" svg:d="M6687 13508v-896h-2637v-893" svg:viewBox="0 0 2638 1790">
          <text:p/>
        </draw:connector>
        <draw:frame draw:style-name="gr7" draw:text-style-name="P7" draw:layer="layout" svg:width="3.085cm" svg:height="0.725cm" svg:x="4.265cm" svg:y="11.922cm">
          <draw:text-box>
            <text:p><text:span text:style-name="T2">&lt;&lt;uses&gt;&gt;</text:span></text:p>
          </draw:text-box>
        </draw:frame>
        <draw:frame draw:style-name="gr7" draw:text-style-name="P7" draw:layer="layout" svg:width="3.085cm" svg:height="0.725cm" svg:x="20.685cm" svg:y="8.62cm">
          <draw:text-box>
            <text:p><text:span text:style-name="T2">&lt;&lt;uses&gt;&gt;</text:span></text:p>
          </draw:text-box>
        </draw:frame>
        <draw:connector draw:style-name="gr84" draw:text-style-name="P13" draw:layer="layout" svg:x1="10.207cm" svg:y1="14.717cm" svg:x2="9.337cm" svg:y2="9.58cm" draw:start-shape="id19" draw:start-glue-point="4" draw:end-shape="id14" draw:end-glue-point="1" svg:d="M10207 14717v-5137h-870" svg:viewBox="0 0 871 5138">
          <text:p/>
        </draw:connector>
        <draw:g draw:style-name="gr3" xml:id="id19" draw:id="id19">
          <draw:glue-point draw:id="4" svg:x="-4cm" svg:y="-5cm"/>
          <draw:custom-shape draw:style-name="gr85" draw:text-style-name="P21" draw:layer="layout" svg:width="9.525cm" svg:height="1.153cm" svg:x="9.255cm" svg:y="14.71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0"><text:span text:style-name="T1">&lt;&lt;module&gt;&gt;</text:span></text:p>
            <text:p text:style-name="P20"><text:span text:style-name="T1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12" draw:layer="layout" svg:width="9.525cm" svg:height="0.435cm" svg:x="9.255cm" svg:y="15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12" draw:layer="layout" svg:width="9.525cm" svg:height="0.993cm" svg:x="9.255cm" svg:y="16.2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3">+ put_command_message(message: CommandMessage)</text:span></text:p>
            <text:p text:style-name="P11"><text:span text:style-name="T3">+ put_error_message(message: Error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USB" draw:style-name="dp1" draw:master-page-name="Default">
        <draw:custom-shape draw:style-name="gr88" draw:text-style-name="P2" draw:layer="layout" svg:width="25.553cm" svg:height="0.7cm" svg:x="1.482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2" draw:layer="layout" svg:width="25.402cm" svg:height="0.7cm" svg:x="1.633cm" svg:y="5.6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21" draw:id="id21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custom-shape draw:style-name="gr90" draw:text-style-name="P4" draw:layer="layout" svg:width="25.406cm" svg:height="1.153cm" svg:x="1.629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"><text:span text:style-name="T1">oradio_control.py</text:span></text:p>
            <text:p text:style-name="P3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1" draw:text-style-name="P6" draw:layer="layout" svg:width="25.406cm" svg:height="0.679cm" svg:x="1.629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"><text:span text:style-name="T1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2" draw:text-style-name="P2" draw:layer="layout" svg:width="25.724cm" svg:height="0.7cm" svg:x="1.311cm" svg:y="17.1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085cm" svg:height="0.725cm" svg:x="10.297cm" svg:y="6.715cm">
          <draw:text-box>
            <text:p><text:span text:style-name="T2">&lt;&lt;uses&gt;&gt;</text:span></text:p>
          </draw:text-box>
        </draw:frame>
        <draw:custom-shape draw:style-name="gr93" draw:text-style-name="P8" draw:layer="layout" svg:width="26.352cm" svg:height="16.41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20" draw:id="id2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94" draw:text-style-name="P10" draw:layer="layout" svg:width="6.54cm" svg:height="1.153cm" svg:x="11.412cm" svg:y="8.31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usb_service.USBService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5" draw:text-style-name="P12" draw:layer="layout" svg:width="6.54cm" svg:height="1.075cm" svg:x="11.412cm" svg:y="9.464cm">
              <text:p text:style-name="P15"><text:span text:style-name="T3">- usb_observer: USBObserver</text:span></text:p>
              <text:p text:style-name="P15"><text:span text:style-name="T3">- usb_monitor: USBMonito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6" draw:text-style-name="P12" draw:layer="layout" svg:width="6.54cm" svg:height="2.569cm" svg:x="11.412cm" svg:y="10.53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init()</text:span></text:p>
              <text:p text:style-name="P11"><text:span text:style-name="T3">+ get_state()</text:span></text:p>
              <text:p text:style-name="P11"><text:span text:style-name="T3">+ close()</text:span></text:p>
              <text:p text:style-name="P11"><text:span text:style-name="T3">- usb_inserted()</text:span></text:p>
              <text:p text:style-name="P11"><text:span text:style-name="T3">- usb_removed()</text:span></text:p>
              <text:p text:style-name="P11"><text:span text:style-name="T3">- send_messag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97" draw:text-style-name="P13" draw:layer="layout" svg:x1="13.231cm" svg:y1="8.312cm" svg:x2="10.184cm" svg:y2="5.27cm" draw:start-shape="id20" draw:start-glue-point="5" draw:end-shape="id21" draw:end-glue-point="23" svg:d="M13231 8312v-1522h-3047v-1520" svg:viewBox="0 0 3048 3043">
          <text:p/>
        </draw:connector>
        <draw:custom-shape draw:style-name="gr98" draw:text-style-name="P14" draw:layer="layout" svg:width="26.352cm" svg:height="0.952cm" svg:x="1cm" svg:y="1.1cm">
          <text:p text:style-name="P1">Static view: USB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24" draw:id="id2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g draw:style-name="gr3">
              <draw:custom-shape draw:style-name="gr99" draw:text-style-name="P10" draw:layer="layout" svg:width="5.448cm" svg:height="1.153cm" svg:x="2.172cm" svg:y="9.559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9"><text:span text:style-name="T1">&lt;&lt;singleton&gt;&gt;</text:span></text:p>
                <text:p text:style-name="P9"><text:span text:style-name="T1">usb_service.USBObserv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0" draw:text-style-name="P12" draw:layer="layout" svg:width="5.448cm" svg:height="0.692cm" svg:x="2.172cm" svg:y="10.712cm">
                <text:p text:style-name="P15"><text:span text:style-name="T3">- obserrver: Observ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1" draw:text-style-name="P12" draw:layer="layout" svg:width="5.448cm" svg:height="0.993cm" svg:x="2.172cm" svg:y="11.404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11"><text:span text:style-name="T3">+ start()</text:span></text:p>
                <text:p text:style-name="P11"><text:span text:style-name="T3">+ stop(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draw:style-name="gr3" xml:id="id22" draw:id="id2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02" draw:text-style-name="P10" draw:layer="layout" svg:width="5.448cm" svg:height="1.153cm" svg:x="19.35cm" svg:y="9.57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&lt;&lt;singleton&gt;&gt;</text:span></text:p>
              <text:p text:style-name="P9"><text:span text:style-name="T1">usb_service.USBMonito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3" draw:text-style-name="P12" draw:layer="layout" svg:width="5.448cm" svg:height="0.434cm" svg:x="19.35cm" svg:y="10.7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4" draw:text-style-name="P12" draw:layer="layout" svg:width="5.448cm" svg:height="0.993cm" svg:x="19.35cm" svg:y="11.15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- on_created()</text:span></text:p>
              <text:p text:style-name="P11"><text:span text:style-name="T3">- usb_deleted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05" draw:text-style-name="P13" draw:layer="layout" svg:x1="23.285cm" svg:y1="12.152cm" svg:x2="25.099cm" svg:y2="14.302cm" draw:start-shape="id22" draw:start-glue-point="9" draw:end-shape="id23" draw:end-glue-point="14" svg:d="M23285 12152v1074h1814v1076" svg:viewBox="0 0 1815 2151">
          <text:p/>
        </draw:connector>
        <draw:g draw:style-name="gr3" xml:id="id23" draw:id="id2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06" draw:text-style-name="P10" draw:layer="layout" svg:width="6.718cm" svg:height="1.153cm" svg:x="20.247cm" svg:y="14.30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&lt;&lt;BaseClass&gt;&gt;</text:span></text:p>
              <text:p text:style-name="P9"><text:span text:style-name="T1">PatternMatchingEventHandl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7" draw:text-style-name="P12" draw:layer="layout" svg:width="6.718cm" svg:height="0.366cm" svg:x="20.247cm" svg:y="15.4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8" draw:text-style-name="P12" draw:layer="layout" svg:width="6.718cm" svg:height="0.599cm" svg:x="20.247cm" svg:y="15.8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handle_event(eve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09" draw:text-style-name="P13" draw:layer="layout" svg:x1="23.285cm" svg:y1="9.573cm" svg:x2="17.951cm" svg:y2="8.947cm" draw:start-shape="id22" draw:start-glue-point="14" draw:end-shape="id20" draw:end-glue-point="13" svg:d="M23285 9573v-626h-5334" svg:viewBox="0 0 5335 627">
          <text:p/>
        </draw:connector>
        <draw:connector draw:style-name="gr110" draw:text-style-name="P13" draw:layer="layout" svg:x1="6.107cm" svg:y1="9.56cm" svg:x2="11.413cm" svg:y2="8.947cm" draw:start-shape="id24" draw:start-glue-point="14" draw:end-shape="id20" draw:end-glue-point="6" svg:d="M6107 9560v-613h5306" svg:viewBox="0 0 5307 614">
          <text:p/>
        </draw:connector>
        <draw:g draw:style-name="gr3" xml:id="id25" draw:id="id2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11" draw:text-style-name="P25" draw:layer="layout" svg:width="6.35cm" svg:height="1.153cm" svg:x="1.87cm" svg:y="14.01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3"><text:span text:style-name="T1">&lt;&lt;Library&gt;&gt;</text:span></text:p>
              <text:p text:style-name="P24"><text:span text:style-name="T1">watchdog.observers.Observ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2" draw:text-style-name="P12" draw:layer="layout" svg:width="6.35cm" svg:height="0.599cm" svg:x="1.87cm" svg:y="15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3" draw:text-style-name="P12" draw:layer="layout" svg:width="6.35cm" svg:height="0.599cm" svg:x="1.87cm" svg:y="15.76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schedul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14" draw:text-style-name="P13" draw:layer="layout" svg:x1="6.456cm" svg:y1="14.012cm" svg:x2="3.687cm" svg:y2="12.397cm" draw:start-shape="id25" draw:start-glue-point="14" draw:end-shape="id24" draw:end-glue-point="8" svg:d="M6456 14012v-808h-2769v-807" svg:viewBox="0 0 2770 1616">
          <text:p/>
        </draw:connector>
        <draw:frame draw:style-name="gr7" draw:text-style-name="P7" draw:layer="layout" svg:width="3.085cm" svg:height="0.725cm" svg:x="4.265cm" svg:y="12.43cm">
          <draw:text-box>
            <text:p><text:span text:style-name="T2">&lt;&lt;uses&gt;&gt;</text:span></text:p>
          </draw:text-box>
        </draw:frame>
        <draw:frame draw:style-name="gr7" draw:text-style-name="P7" draw:layer="layout" svg:width="2.223cm" svg:height="0.725cm" svg:x="22.907cm" svg:y="13.382cm">
          <draw:text-box>
            <text:p><text:span text:style-name="T2">&lt;&lt;is a&gt;&gt;</text:span></text:p>
          </draw:text-box>
        </draw:frame>
        <draw:frame draw:style-name="gr7" draw:text-style-name="P7" draw:layer="layout" svg:width="3.81cm" svg:height="0.725cm" svg:x="20.05cm" svg:y="7.895cm">
          <draw:text-box>
            <text:p><text:span text:style-name="T2">&lt;&lt;consists of&gt;&gt;</text:span></text:p>
          </draw:text-box>
        </draw:frame>
        <draw:frame draw:style-name="gr7" draw:text-style-name="P7" draw:layer="layout" svg:width="3.81cm" svg:height="0.725cm" svg:x="6.397cm" svg:y="7.667cm">
          <draw:text-box>
            <text:p><text:span text:style-name="T2">&lt;&lt;consists of&gt;&gt;</text:span></text:p>
          </draw:text-box>
        </draw:frame>
        <draw:connector draw:style-name="gr115" draw:text-style-name="P13" draw:layer="layout" draw:line-skew="-0.508cm" svg:x1="10.056cm" svg:y1="15.275cm" svg:x2="11.413cm" svg:y2="12.564cm" draw:start-shape="id26" draw:end-shape="id20" draw:end-glue-point="11" svg:d="M10056 15275h-1036v-2711h2393" svg:viewBox="0 0 2394 2712">
          <text:p/>
        </draw:connector>
        <draw:frame draw:style-name="gr7" draw:text-style-name="P7" draw:layer="layout" svg:width="2.45cm" svg:height="0.725cm" svg:x="8.62cm" svg:y="11.795cm">
          <draw:text-box>
            <text:p><text:span text:style-name="T2">&lt;&lt;uses&gt;&gt;</text:span></text:p>
          </draw:text-box>
        </draw:frame>
        <draw:g draw:style-name="gr3" xml:id="id26" draw:id="id26">
          <draw:glue-point draw:id="4" svg:x="-4cm" svg:y="-5cm"/>
          <draw:custom-shape draw:style-name="gr116" draw:text-style-name="P21" draw:layer="layout" svg:width="9.525cm" svg:height="1.153cm" svg:x="10.056cm" svg:y="14.01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0"><text:span text:style-name="T1">&lt;&lt;module&gt;&gt;</text:span></text:p>
            <text:p text:style-name="P20"><text:span text:style-name="T1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12" draw:layer="layout" svg:width="9.525cm" svg:height="0.435cm" svg:x="10.056cm" svg:y="15.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12" draw:layer="layout" svg:width="9.525cm" svg:height="0.993cm" svg:x="10.056cm" svg:y="15.5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3">+ put_command_message(message: CommandMessage)</text:span></text:p>
            <text:p text:style-name="P11"><text:span text:style-name="T3">+ put_error_message(message: Error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Volume" draw:style-name="dp1" draw:master-page-name="Default">
        <draw:custom-shape draw:style-name="gr119" draw:text-style-name="P2" draw:layer="layout" svg:width="20.198cm" svg:height="0.7cm" svg:x="1.439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2" draw:layer="layout" svg:width="20.085cm" svg:height="0.7cm" svg:x="1.552cm" svg:y="5.6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28" draw:id="id28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custom-shape draw:style-name="gr121" draw:text-style-name="P4" draw:layer="layout" svg:width="20.088cm" svg:height="1.153cm" svg:x="1.549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"><text:span text:style-name="T1">oradio_control.py</text:span></text:p>
            <text:p text:style-name="P3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2" draw:text-style-name="P6" draw:layer="layout" svg:width="20.088cm" svg:height="0.679cm" svg:x="1.549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"><text:span text:style-name="T1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23" draw:text-style-name="P2" draw:layer="layout" svg:width="20.326cm" svg:height="0.7cm" svg:x="1.311cm" svg:y="15.8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085cm" svg:height="0.725cm" svg:x="2.995cm" svg:y="6.942cm">
          <draw:text-box>
            <text:p><text:span text:style-name="T2">&lt;&lt;uses&gt;&gt;</text:span></text:p>
          </draw:text-box>
        </draw:frame>
        <draw:custom-shape draw:style-name="gr124" draw:text-style-name="P8" draw:layer="layout" svg:width="20.955cm" svg:height="15.14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27" draw:id="id2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25" draw:text-style-name="P10" draw:layer="layout" svg:width="6.686cm" svg:height="1.153cm" svg:x="3.956cm" svg:y="8.12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volume_control.VolumeControl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6" draw:text-style-name="P12" draw:layer="layout" svg:width="6.686cm" svg:height="1.047cm" svg:x="3.956cm" svg:y="9.275cm">
              <text:p text:style-name="P15"><text:span text:style-name="T3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7" draw:text-style-name="P27" draw:layer="layout" svg:width="6.686cm" svg:height="1.387cm" svg:x="3.956cm" svg:y="10.32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26"><text:span text:style-name="T5">+ set_notify()</text:span></text:p>
              <text:p text:style-name="P26"><text:span text:style-name="T5">+ start()</text:span></text:p>
              <text:p text:style-name="P26"><text:span text:style-name="T5">+ stop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28" draw:text-style-name="P13" draw:layer="layout" svg:x1="5.815cm" svg:y1="8.123cm" svg:x2="5.567cm" svg:y2="5.27cm" draw:start-shape="id27" draw:start-glue-point="5" draw:end-shape="id28" draw:end-glue-point="4" svg:d="M5815 8123v-1428h-248v-1425" svg:viewBox="0 0 249 2854">
          <text:p/>
        </draw:connector>
        <draw:custom-shape draw:style-name="gr44" draw:text-style-name="P14" draw:layer="layout" svg:width="20.955cm" svg:height="0.952cm" svg:x="1cm" svg:y="1.1cm">
          <text:p text:style-name="P1">Static view: Volum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29" draw:id="id2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29" draw:text-style-name="P10" draw:layer="layout" svg:width="8.572cm" svg:height="1.153cm" svg:x="13.065cm" svg:y="9.99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i2c_service.I2CService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0" draw:text-style-name="P12" draw:layer="layout" svg:width="8.572cm" svg:height="0.761cm" svg:x="13.065cm" svg:y="11.1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1" draw:text-style-name="P12" draw:layer="layout" svg:width="8.572cm" svg:height="1.781cm" svg:x="13.065cm" svg:y="11.906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read_byte(device: int, register: int)</text:span></text:p>
              <text:p text:style-name="P11"><text:span text:style-name="T3">+ write_byte(device: int, register: int)</text:span></text:p>
              <text:p text:style-name="P11"><text:span text:style-name="T6">+ </text:span><text:span text:style-name="T7">read_block</text:span><text:span text:style-name="T6">(device: int, register: int, length: int)</text:span></text:p>
              <text:p text:style-name="P11"><text:span text:style-name="T6">+ write</text:span><text:span text:style-name="T7">_block</text:span><text:span text:style-name="T6">(device: int, register: int, length: i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32" draw:text-style-name="P13" draw:layer="layout" svg:x1="19.256cm" svg:y1="9.993cm" svg:x2="10.641cm" svg:y2="8.758cm" draw:start-shape="id29" draw:start-glue-point="14" draw:end-shape="id27" draw:end-glue-point="13" svg:d="M19256 9993v-1235h-8615" svg:viewBox="0 0 8616 1236">
          <text:p/>
        </draw:connector>
        <draw:frame draw:style-name="gr7" draw:text-style-name="P7" draw:layer="layout" svg:width="2.512cm" svg:height="0.725cm" svg:x="15.287cm" svg:y="8.937cm">
          <draw:text-box>
            <text:p><text:span text:style-name="T2">&lt;&lt;has&gt;&gt;</text:span></text:p>
          </draw:text-box>
        </draw:frame>
        <draw:g draw:style-name="gr3" xml:id="id30" draw:id="id30">
          <draw:custom-shape draw:style-name="gr133" draw:text-style-name="P21" draw:layer="layout" svg:width="9.525cm" svg:height="1.153cm" svg:x="2.687cm" svg:y="12.61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0"><text:span text:style-name="T1">&lt;&lt;module&gt;&gt;</text:span></text:p>
            <text:p text:style-name="P20"><text:span text:style-name="T1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12" draw:layer="layout" svg:width="9.525cm" svg:height="0.435cm" svg:x="2.687cm" svg:y="13.765cm">
            <text:p text:style-name="P11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5" draw:text-style-name="P12" draw:layer="layout" svg:width="9.525cm" svg:height="0.993cm" svg:x="2.687cm" svg:y="14.13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3">+ put_command_message(message: CommandMessage)</text:span></text:p>
            <text:p text:style-name="P11"><text:span text:style-name="T3">+ put_error_message(message: Error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" draw:text-style-name="P7" draw:layer="layout" svg:width="3.085cm" svg:height="0.725cm" svg:x="1.635cm" svg:y="11.16cm">
          <draw:text-box>
            <text:p><text:span text:style-name="T2">&lt;&lt;uses&gt;&gt;</text:span></text:p>
          </draw:text-box>
        </draw:frame>
        <draw:connector draw:style-name="gr136" draw:text-style-name="P13" draw:layer="layout" draw:line-skew="-0.524cm" svg:x1="2.687cm" svg:y1="13.87cm" svg:x2="3.957cm" svg:y2="11.165cm" draw:start-shape="id30" draw:end-shape="id27" draw:end-glue-point="11" svg:d="M2687 13870h-1052v-2705h2322" svg:viewBox="0 0 2323 2706">
          <text:p/>
        </draw:connector>
        <draw:frame draw:style-name="gr137" draw:text-style-name="P29" draw:layer="layout" svg:width="7.937cm" svg:height="1.673cm" svg:x="6.397cm" svg:y="6.397cm">
          <draw:text-box>
            <text:p text:style-name="P28"><text:span text:style-name="T8">Waarom start(), stop(), set_notify(). Staat altijd op notify. Dus notify default aan. Gaat nooit gestopt worden</text:span></text:p>
          </draw:text-box>
        </draw:frame>
      </draw:page>
      <draw:page draw:name="Error" draw:style-name="dp1" draw:master-page-name="Default">
        <draw:custom-shape draw:style-name="gr138" draw:text-style-name="P2" draw:layer="layout" svg:width="19.565cm" svg:height="0.7cm" svg:x="1.437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2" draw:layer="layout" svg:width="19.218cm" svg:height="0.7cm" svg:x="1.549cm" svg:y="5.6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32" draw:id="id32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custom-shape draw:style-name="gr140" draw:text-style-name="P4" draw:layer="layout" svg:width="19.283cm" svg:height="1.153cm" svg:x="1.546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"><text:span text:style-name="T1">oradio_control.py</text:span></text:p>
            <text:p text:style-name="P3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1" draw:text-style-name="P6" draw:layer="layout" svg:width="19.283cm" svg:height="0.679cm" svg:x="1.546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"><text:span text:style-name="T1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42" draw:text-style-name="P2" draw:layer="layout" svg:width="19.456cm" svg:height="0.7cm" svg:x="1.311cm" svg:y="17.1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085cm" svg:height="0.725cm" svg:x="5.217cm" svg:y="6.942cm">
          <draw:text-box>
            <text:p><text:span text:style-name="T2">&lt;&lt;uses&gt;&gt;</text:span></text:p>
          </draw:text-box>
        </draw:frame>
        <draw:custom-shape draw:style-name="gr143" draw:text-style-name="P8" draw:layer="layout" svg:width="20.637cm" svg:height="16.41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31" draw:id="id3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44" draw:text-style-name="P10" draw:layer="layout" svg:width="6.229cm" svg:height="1.153cm" svg:x="1.756cm" svg:y="8.61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error_service.py.ErrorService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5" draw:text-style-name="P12" draw:layer="layout" svg:width="6.229cm" svg:height="0.746cm" svg:x="1.756cm" svg:y="9.7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6" draw:text-style-name="P12" draw:layer="layout" svg:width="6.229cm" svg:height="0.993cm" svg:x="1.756cm" svg:y="10.5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- init()</text:span></text:p>
              <text:p text:style-name="P11"><text:span text:style-name="T3">- error_handler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47" draw:text-style-name="P13" draw:layer="layout" svg:x1="3.488cm" svg:y1="8.612cm" svg:x2="5.403cm" svg:y2="5.27cm" draw:start-shape="id31" draw:start-glue-point="5" draw:end-shape="id32" draw:end-glue-point="4" svg:d="M3488 8612v-1672h1915v-1670" svg:viewBox="0 0 1916 3343">
          <text:p/>
        </draw:connector>
        <draw:custom-shape draw:style-name="gr148" draw:text-style-name="P14" draw:layer="layout" svg:width="20.637cm" svg:height="0.952cm" svg:x="1cm" svg:y="1.1cm">
          <text:p text:style-name="P1">Static view: Err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9" draw:text-style-name="P31" draw:layer="layout" svg:width="6.35cm" svg:height="4.043cm" svg:x="13.065cm" svg:y="8.069cm">
          <draw:text-box>
            <text:p text:style-name="P30"><text:span text:style-name="T2">from messaging import (</text:span></text:p>
            <text:p text:style-name="P30"><text:span text:style-name="T2"><text:s text:c="4"/>ErrorMessage,</text:span></text:p>
            <text:p text:style-name="P30"><text:span text:style-name="T2"><text:s text:c="4"/>get_error_message,</text:span></text:p>
            <text:p text:style-name="P30"><text:span text:style-name="T2"><text:s text:c="4"/>put_error_message,</text:span></text:p>
            <text:p text:style-name="P30"><text:span text:style-name="T2"><text:s text:c="4"/>CommandMessage,</text:span></text:p>
            <text:p text:style-name="P30"><text:span text:style-name="T2"><text:s text:c="4"/>get_command_message,</text:span></text:p>
            <text:p text:style-name="P30"><text:span text:style-name="T2"><text:s text:c="4"/>put_command_message,</text:span></text:p>
            <text:p text:style-name="P30"><text:span text:style-name="T2">)</text:span></text:p>
          </draw:text-box>
        </draw:frame>
        <draw:g draw:style-name="gr3" xml:id="id33" draw:id="id33">
          <draw:glue-point draw:id="4" svg:x="-4cm" svg:y="-5cm"/>
          <draw:custom-shape draw:style-name="gr150" draw:text-style-name="P21" draw:layer="layout" svg:width="6.649cm" svg:height="1.153cm" svg:x="6.491cm" svg:y="12.86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0"><text:span text:style-name="T1">&lt;&lt;module&gt;&gt;</text:span></text:p>
            <text:p text:style-name="P20"><text:span text:style-name="T1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1" draw:text-style-name="P12" draw:layer="layout" svg:width="6.649cm" svg:height="0.771cm" svg:x="6.491cm" svg:y="14.014cm">
            <text:p text:style-name="P11">+ ErrorMessag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2" draw:text-style-name="P12" draw:layer="layout" svg:width="6.649cm" svg:height="0.599cm" svg:x="6.491cm" svg:y="14.67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3">+ get_error_message(): Error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53" draw:text-style-name="P13" draw:layer="layout" svg:x1="9.815cm" svg:y1="12.861cm" svg:x2="7.984cm" svg:y2="10.959cm" draw:start-shape="id33" draw:end-shape="id31" draw:end-glue-point="12" svg:d="M9815 12861v-1902h-1831" svg:viewBox="0 0 1832 1903">
          <text:p/>
        </draw:connector>
        <draw:frame draw:style-name="gr7" draw:text-style-name="P7" draw:layer="layout" svg:width="3.085cm" svg:height="0.725cm" svg:x="6.487cm" svg:y="12.022cm">
          <draw:text-box>
            <text:p><text:span text:style-name="T2">&lt;&lt;uses&gt;&gt;</text:span></text:p>
          </draw:text-box>
        </draw:frame>
      </draw:page>
      <draw:page draw:name="Messaging" draw:style-name="dp1" draw:master-page-name="Default">
        <draw:custom-shape draw:style-name="gr138" draw:text-style-name="P2" draw:layer="layout" svg:width="19.565cm" svg:height="0.7cm" svg:x="1.437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2" draw:layer="layout" svg:width="19.218cm" svg:height="0.7cm" svg:x="1.549cm" svg:y="5.6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35" draw:id="id35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custom-shape draw:style-name="gr154" draw:text-style-name="P4" draw:layer="layout" svg:width="19.283cm" svg:height="1.153cm" svg:x="1.546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"><text:span text:style-name="T1">oradio_control.py</text:span></text:p>
            <text:p text:style-name="P3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5" draw:text-style-name="P6" draw:layer="layout" svg:width="19.283cm" svg:height="0.679cm" svg:x="1.546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"><text:span text:style-name="T1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42" draw:text-style-name="P2" draw:layer="layout" svg:width="19.456cm" svg:height="0.7cm" svg:x="1.311cm" svg:y="17.1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085cm" svg:height="0.725cm" svg:x="5.217cm" svg:y="6.942cm">
          <draw:text-box>
            <text:p><text:span text:style-name="T2">&lt;&lt;uses&gt;&gt;</text:span></text:p>
          </draw:text-box>
        </draw:frame>
        <draw:custom-shape draw:style-name="gr143" draw:text-style-name="P8" draw:layer="layout" svg:width="20.637cm" svg:height="16.41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34" draw:id="id3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56" draw:text-style-name="P10" draw:layer="layout" svg:width="9.721cm" svg:height="1.153cm" svg:x="1.756cm" svg:y="7.78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messaging</text:span></text:p>
              <text:p text:style-name="P9"><text:span text:style-name="T1">&lt;&lt;module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7" draw:text-style-name="P12" draw:layer="layout" svg:width="9.721cm" svg:height="0.985cm" svg:x="1.756cm" svg:y="8.94cm">
              <text:p text:style-name="P11"><text:span text:style-name="T3">- command_queue: Queue</text:span></text:p>
              <text:p text:style-name="P11"><text:span text:style-name="T3">- error_queue: Queu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8" draw:text-style-name="P12" draw:layer="layout" svg:width="9.721cm" svg:height="1.781cm" svg:x="1.756cm" svg:y="9.85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put_command_message(message: CommandMessage)</text:span></text:p>
              <text:p text:style-name="P11"><text:span text:style-name="T3">+ get_command_message()</text:span></text:p>
              <text:p text:style-name="P11"><text:span text:style-name="T3">+ put_error_message(message: ErrorMessage)</text:span></text:p>
              <text:p text:style-name="P11"><text:span text:style-name="T3">+ get_error_messag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59" draw:text-style-name="P13" draw:layer="layout" svg:x1="4.458cm" svg:y1="7.788cm" svg:x2="5.403cm" svg:y2="5.27cm" draw:start-shape="id34" draw:start-glue-point="5" draw:end-shape="id35" draw:end-glue-point="4" svg:d="M4458 7788v-1260h945v-1258" svg:viewBox="0 0 946 2519">
          <text:p/>
        </draw:connector>
        <draw:custom-shape draw:style-name="gr148" draw:text-style-name="P14" draw:layer="layout" svg:width="20.637cm" svg:height="0.952cm" svg:x="1cm" svg:y="1.1cm">
          <text:p text:style-name="P1">Static view: Messaging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36" draw:id="id3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60" draw:text-style-name="P10" draw:layer="layout" svg:width="6.667cm" svg:height="1.153cm" svg:x="13.383cm" svg:y="9.819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messaging.CommandMessage</text:span></text:p>
              <text:p text:style-name="P9"><text:span text:style-name="T1">&lt;&lt;data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1" draw:text-style-name="P12" draw:layer="layout" svg:width="6.667cm" svg:height="0.994cm" svg:x="13.383cm" svg:y="10.972cm">
              <text:p text:style-name="P11">+ source: String</text:p>
              <text:p text:style-name="P11">+ message: String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2" draw:text-style-name="P12" draw:layer="layout" svg:width="6.667cm" svg:height="0.599cm" svg:x="13.383cm" svg:y="11.966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/>+ is_valid()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37" draw:id="id3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63" draw:text-style-name="P10" draw:layer="layout" svg:width="6.667cm" svg:height="1.153cm" svg:x="13.383cm" svg:y="13.17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messaging.ErrorMessage</text:span></text:p>
              <text:p text:style-name="P9"><text:span text:style-name="T1">&lt;&lt;data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4" draw:text-style-name="P12" draw:layer="layout" svg:width="6.667cm" svg:height="0.994cm" svg:x="13.383cm" svg:y="14.329cm">
              <text:p text:style-name="P11">+ source: String</text:p>
              <text:p text:style-name="P11">+ message: String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5" draw:text-style-name="P12" draw:layer="layout" svg:width="6.667cm" svg:height="0.599cm" svg:x="13.383cm" svg:y="15.323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/>+ is_valid()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166" draw:text-style-name="P7" draw:layer="layout" svg:width="5.398cm" svg:height="2.222cm" svg:x="22.907cm" svg:y="9.255cm">
          <draw:text-box>
            <text:p text:style-name="P30"><text:span text:style-name="T2">Commandmessage:</text:span></text:p>
            <text:p text:style-name="P30"><text:span text:style-name="T2">+ source: string</text:span></text:p>
            <text:p text:style-name="P30"><text:span text:style-name="T2">+ command: string</text:span></text:p>
            <text:p text:style-name="P30"><text:span text:style-name="T2">+ data: Optional[List[Any]]</text:span></text:p>
          </draw:text-box>
        </draw:frame>
        <draw:frame draw:style-name="gr167" draw:text-style-name="P7" draw:layer="layout" svg:width="6.35cm" svg:height="3.095cm" svg:x="22.272cm" svg:y="11.557cm">
          <draw:text-box>
            <text:p text:style-name="P30"><text:span text:style-name="T2">Errormessage:</text:span></text:p>
            <text:p text:style-name="P30"><text:span text:style-name="T2">+ source: string</text:span></text:p>
            <text:p text:style-name="P30"><text:span text:style-name="T2">+ message: string</text:span></text:p>
            <text:p text:style-name="P30"><text:span text:style-name="T2">+ data: Optional[List[Any]]</text:span></text:p>
            <text:p text:style-name="P30"><text:span text:style-name="T2">Message: Error | Exception | ...</text:span></text:p>
          </draw:text-box>
        </draw:frame>
        <draw:connector draw:style-name="gr168" draw:text-style-name="P13" draw:layer="layout" svg:x1="13.384cm" svg:y1="12.021cm" svg:x2="11.476cm" svg:y2="11.091cm" draw:start-shape="id36" draw:start-glue-point="11" draw:end-shape="id34" draw:end-glue-point="12" svg:d="M13384 12021h-955v-930h-953" svg:viewBox="0 0 1909 931">
          <text:p/>
        </draw:connector>
        <draw:connector draw:style-name="gr169" draw:text-style-name="P13" draw:layer="layout" svg:x1="13.383cm" svg:y1="13.785cm" svg:x2="10.937cm" svg:y2="11.635cm" draw:start-shape="id37" draw:start-glue-point="21" draw:end-shape="id34" draw:end-glue-point="10" svg:d="M13383 13785h-2446v-2150" svg:viewBox="0 0 2447 2151">
          <text:p/>
        </draw:connector>
      </draw:page>
      <draw:page draw:name="Power Supply" draw:style-name="dp1" draw:master-page-name="Default">
        <draw:custom-shape draw:style-name="gr138" draw:text-style-name="P2" draw:layer="layout" svg:width="19.565cm" svg:height="0.7cm" svg:x="1.437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2" draw:layer="layout" svg:width="19.218cm" svg:height="0.7cm" svg:x="1.549cm" svg:y="5.6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39" draw:id="id39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custom-shape draw:style-name="gr170" draw:text-style-name="P4" draw:layer="layout" svg:width="19.283cm" svg:height="1.153cm" svg:x="1.546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"><text:span text:style-name="T1">oradio_control.py</text:span></text:p>
            <text:p text:style-name="P3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1" draw:text-style-name="P6" draw:layer="layout" svg:width="19.283cm" svg:height="0.679cm" svg:x="1.546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"><text:span text:style-name="T1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42" draw:text-style-name="P2" draw:layer="layout" svg:width="19.456cm" svg:height="0.7cm" svg:x="1.311cm" svg:y="17.1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085cm" svg:height="0.725cm" svg:x="5.217cm" svg:y="6.942cm">
          <draw:text-box>
            <text:p><text:span text:style-name="T2">&lt;&lt;uses&gt;&gt;</text:span></text:p>
          </draw:text-box>
        </draw:frame>
        <draw:custom-shape draw:style-name="gr143" draw:text-style-name="P8" draw:layer="layout" svg:width="20.637cm" svg:height="16.41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38" draw:id="id3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72" draw:text-style-name="P10" draw:layer="layout" svg:width="8.991cm" svg:height="1.153cm" svg:x="1.756cm" svg:y="7.98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power_supply_control.PowerSupplyService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3" draw:text-style-name="P12" draw:layer="layout" svg:width="8.991cm" svg:height="0.604cm" svg:x="1.756cm" svg:y="9.1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4" draw:text-style-name="P12" draw:layer="layout" svg:width="8.991cm" svg:height="1.781cm" svg:x="1.756cm" svg:y="9.74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set_nom_voltage()</text:span></text:p>
              <text:p text:style-name="P11"><text:span text:style-name="T3">+ set_max_voltage()</text:span></text:p>
              <text:p text:style-name="P11"><text:span text:style-name="T3">+ set_standby_voltage()</text:span></text:p>
              <text:p text:style-name="P11"><text:span text:style-name="T3">+ read_status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75" draw:text-style-name="P13" draw:layer="layout" svg:x1="4.255cm" svg:y1="7.989cm" svg:x2="5.403cm" svg:y2="5.27cm" draw:start-shape="id38" draw:start-glue-point="5" draw:end-shape="id39" draw:end-glue-point="4" svg:d="M4255 7989v-1361h1148v-1358" svg:viewBox="0 0 1149 2720">
          <text:p/>
        </draw:connector>
        <draw:custom-shape draw:style-name="gr148" draw:text-style-name="P14" draw:layer="layout" svg:width="20.637cm" svg:height="0.952cm" svg:x="1cm" svg:y="1.1cm">
          <text:p text:style-name="P1">Static view: Power Supply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40" draw:id="id4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76" draw:text-style-name="P10" draw:layer="layout" svg:width="8.572cm" svg:height="1.153cm" svg:x="9.977cm" svg:y="12.72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&lt;&lt;singleton&gt;&gt;</text:span></text:p>
              <text:p text:style-name="P9"><text:span text:style-name="T1">i2c_service.I2C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7" draw:text-style-name="P12" draw:layer="layout" svg:width="8.572cm" svg:height="0.761cm" svg:x="9.977cm" svg:y="13.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8" draw:text-style-name="P12" draw:layer="layout" svg:width="8.572cm" svg:height="1.781cm" svg:x="9.977cm" svg:y="14.64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read_byte(device: int, register: int)</text:span></text:p>
              <text:p text:style-name="P11"><text:span text:style-name="T3">+ write_byte(device: int, register: int)</text:span></text:p>
              <text:p text:style-name="P11"><text:span text:style-name="T6">+ </text:span><text:span text:style-name="T7">read_block</text:span><text:span text:style-name="T6">(device: int, register: int, length: int)</text:span></text:p>
              <text:p text:style-name="P11"><text:span text:style-name="T6">+ write</text:span><text:span text:style-name="T7">_block</text:span><text:span text:style-name="T6">(device: int, register: int, length: i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79" draw:text-style-name="P13" draw:layer="layout" svg:x1="12.361cm" svg:y1="12.728cm" svg:x2="10.747cm" svg:y2="9.757cm" draw:start-shape="id40" draw:start-glue-point="5" draw:end-shape="id38" draw:end-glue-point="1" svg:d="M12361 12728v-2971h-1614" svg:viewBox="0 0 1615 2972">
          <text:p/>
        </draw:connector>
        <draw:frame draw:style-name="gr7" draw:text-style-name="P7" draw:layer="layout" svg:width="2.512cm" svg:height="0.725cm" svg:x="12.747cm" svg:y="11.16cm">
          <draw:text-box>
            <text:p><text:span text:style-name="T2">&lt;&lt;has&gt;&gt;</text:span></text:p>
          </draw:text-box>
        </draw:frame>
      </draw:page>
      <draw:page draw:name="Frontpanel service" draw:style-name="dp1" draw:master-page-name="Default">
        <draw:custom-shape draw:style-name="gr180" draw:text-style-name="P2" draw:layer="layout" svg:width="27.047cm" svg:height="0.7cm" svg:x="1.258cm" svg:y="2.5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2" draw:layer="layout" svg:width="26.989cm" svg:height="0.7cm" svg:x="1.316cm" svg:y="5.8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41" draw:id="id41">
          <draw:glue-point draw:id="4" svg:x="-0.787cm" svg:y="5.055cm"/>
          <draw:custom-shape draw:style-name="gr182" draw:text-style-name="P10" draw:layer="layout" svg:width="5.08cm" svg:height="1.153cm" svg:x="1.717cm" svg:y="7.75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9"><text:span text:style-name="T1">led_control.LEDControl</text:span></text:p>
            <text:p text:style-name="P9"><text:span text:style-name="T1">&lt;&lt;class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3" draw:text-style-name="P12" draw:layer="layout" svg:width="5.08cm" svg:height="0.671cm" svg:x="1.717cm" svg:y="8.9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4" draw:text-style-name="P12" draw:layer="layout" svg:width="5.08cm" svg:height="2.963cm" svg:x="1.717cm" svg:y="9.58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3">+ turn_on_led()</text:span></text:p>
            <text:p text:style-name="P11"><text:span text:style-name="T3">+ turn_off_led()</text:span></text:p>
            <text:p text:style-name="P11"><text:span text:style-name="T3">+ turn_off_all_leds()</text:span></text:p>
            <text:p text:style-name="P11"><text:span text:style-name="T3">+ turn_off_all_leds()</text:span></text:p>
            <text:p text:style-name="P11"><text:span text:style-name="T3">+ get_led_state()l</text:span></text:p>
            <text:p text:style-name="P11"><text:span text:style-name="T3">+ oneshot_on_led()</text:span></text:p>
            <text:p text:style-name="P11"><text:span text:style-name="T3">+ control_blinking_led( 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 xml:id="id42" draw:id="id42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1.594cm" svg:y="4.863cm"/>
          <draw:glue-point draw:id="41" svg:x="-2.071cm" svg:y="4.863cm"/>
          <draw:glue-point draw:id="42" svg:x="-1.833cm" svg:y="4.863cm"/>
          <draw:custom-shape draw:style-name="gr185" draw:text-style-name="P4" draw:layer="layout" svg:width="26.896cm" svg:height="1.153cm" svg:x="1.409cm" svg:y="3.6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"><text:span text:style-name="T1">oradio_control.py</text:span></text:p>
            <text:p text:style-name="P3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6" draw:text-style-name="P6" draw:layer="layout" svg:width="26.896cm" svg:height="0.679cm" svg:x="1.409cm" svg:y="4.7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"><text:span text:style-name="T1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87" draw:text-style-name="P33" draw:layer="layout" svg:width="27.204cm" svg:height="0.7cm" svg:x="1.101cm" svg:y="16.147cm">
          <text:p text:style-name="P32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8" draw:text-style-name="P13" draw:layer="layout" draw:line-skew="0.418cm" svg:x1="4.257cm" svg:y1="7.759cm" svg:x2="4.758cm" svg:y2="5.47cm" draw:start-shape="id41" draw:end-shape="id42" draw:end-glue-point="16" svg:d="M4257 7759v-727h501v-1562" svg:viewBox="0 0 502 2290">
          <text:p/>
        </draw:connector>
        <draw:custom-shape draw:style-name="gr189" draw:text-style-name="P8" draw:layer="layout" svg:width="27.7cm" svg:height="17.7cm" svg:x="1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43" draw:id="id4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90" draw:text-style-name="P10" draw:layer="layout" svg:width="5.917cm" svg:height="1.153cm" svg:x="7.385cm" svg:y="7.834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touch_buttons.TouchButtons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1" draw:text-style-name="P12" draw:layer="layout" svg:width="5.917cm" svg:height="0.754cm" svg:x="7.385cm" svg:y="8.987cm">
              <text:p text:style-name="P15"><text:span text:style-name="T3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2" draw:text-style-name="P12" draw:layer="layout" svg:width="5.917cm" svg:height="0.599cm" svg:x="7.385cm" svg:y="9.74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init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44" draw:id="id4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3.665cm" svg:y="5.097cm"/>
          <draw:g draw:style-name="gr3">
            <draw:custom-shape draw:style-name="gr193" draw:text-style-name="P10" draw:layer="layout" svg:width="6.37cm" svg:height="1.153cm" svg:x="18.565cm" svg:y="7.70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backlighting.BackLighting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12" draw:layer="layout" svg:width="6.37cm" svg:height="0.761cm" svg:x="18.565cm" svg:y="8.8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12" draw:layer="layout" svg:width="6.37cm" svg:height="0.803cm" svg:x="18.565cm" svg:y="9.616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96" draw:text-style-name="P13" draw:layer="layout" draw:line-skew="0.405cm" svg:x1="9.03cm" svg:y1="7.835cm" svg:x2="10.473cm" svg:y2="5.47cm" draw:start-shape="id43" draw:start-glue-point="5" draw:end-shape="id42" draw:end-glue-point="18" svg:d="M9030 7835v-779h1443v-1586" svg:viewBox="0 0 1444 2366">
          <text:p/>
        </draw:connector>
        <draw:connector draw:style-name="gr197" draw:text-style-name="P13" draw:layer="layout" draw:line-skew="0.447cm" svg:x1="20.336cm" svg:y1="7.703cm" svg:x2="22.777cm" svg:y2="5.47cm" draw:start-shape="id44" draw:start-glue-point="5" draw:end-shape="id42" draw:end-glue-point="5" svg:d="M20336 7703v-671h2441v-1562" svg:viewBox="0 0 2442 2234">
          <text:p/>
        </draw:connector>
        <draw:frame draw:style-name="gr7" draw:text-style-name="P7" draw:layer="layout" svg:width="3.147cm" svg:height="0.725cm" svg:x="5.155cm" svg:y="6.715cm">
          <draw:text-box>
            <text:p><text:span text:style-name="T2">&lt;&lt;uses&gt;&gt;</text:span></text:p>
          </draw:text-box>
        </draw:frame>
        <draw:custom-shape draw:style-name="gr198" draw:text-style-name="P14" draw:layer="layout" svg:width="27.7cm" svg:height="1.27cm" svg:x="1cm" svg:y="1cm">
          <text:p text:style-name="P1">static view: Front-panel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48" draw:id="id4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99" draw:text-style-name="P10" draw:layer="layout" svg:width="8.255cm" svg:height="1.153cm" svg:x="20.015cm" svg:y="11.1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&lt;&lt;singleton&gt;&gt;</text:span></text:p>
              <text:p text:style-name="P9"><text:span text:style-name="T1">i2c_service.I2C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0" draw:text-style-name="P12" draw:layer="layout" svg:width="8.255cm" svg:height="0.578cm" svg:x="20.015cm" svg:y="12.3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12" draw:layer="layout" svg:width="8.255cm" svg:height="1.781cm" svg:x="20.015cm" svg:y="12.89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read_byte(device: int, register: int)</text:span></text:p>
              <text:p text:style-name="P11"><text:span text:style-name="T3">+ write_byte(device: int, register: int)</text:span></text:p>
              <text:p text:style-name="P11"><text:span text:style-name="T6">+ </text:span><text:span text:style-name="T7">read_block</text:span><text:span text:style-name="T6">(device: int, register: int, length: int)</text:span></text:p>
              <text:p text:style-name="P11"><text:span text:style-name="T6">+ write</text:span><text:span text:style-name="T7">_block</text:span><text:span text:style-name="T6">(device: int, register: int, length: i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46" draw:id="id4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202" draw:text-style-name="P10" draw:layer="layout" svg:width="5.397cm" svg:height="1.153cm" svg:x="12.802cm" svg:y="17.19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light_sensor</text:span></text:p>
              <text:p text:style-name="P9"><text:span text:style-name="T1">&lt;&lt;device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3" draw:text-style-name="P12" draw:layer="layout" svg:width="5.397cm" svg:height="0.56cm" svg:x="12.802cm" svg:y="18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4" draw:text-style-name="P12" draw:layer="layout" svg:width="5.397cm" svg:height="0.591cm" svg:x="12.802cm" svg:y="18.906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45" draw:id="id4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205" draw:text-style-name="P10" draw:layer="layout" svg:width="5.397cm" svg:height="1.153cm" svg:x="18.69cm" svg:y="17.06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backlight_dac</text:span></text:p>
              <text:p text:style-name="P9"><text:span text:style-name="T1">&lt;&lt;device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6" draw:text-style-name="P12" draw:layer="layout" svg:width="5.397cm" svg:height="0.632cm" svg:x="18.69cm" svg:y="18.2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7" draw:text-style-name="P12" draw:layer="layout" svg:width="5.397cm" svg:height="0.667cm" svg:x="18.69cm" svg:y="18.84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47" draw:id="id4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208" draw:text-style-name="P21" draw:layer="layout" svg:width="5.828cm" svg:height="1.153cm" svg:x="1.749cm" svg:y="13.94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0"><text:span text:style-name="T1">&lt;&lt;singleton&gt;&gt;</text:span></text:p>
            <text:p text:style-name="P20"><text:span text:style-name="T1">gpio_service.GPIO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9" draw:text-style-name="P34" draw:layer="layout" svg:width="5.828cm" svg:height="0.433cm" svg:x="1.749cm" svg:y="15.0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0" draw:text-style-name="P12" draw:layer="layout" svg:width="5.828cm" svg:height="0.39cm" svg:x="1.749cm" svg:y="15.53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11" draw:text-style-name="P13" draw:layer="layout" svg:x1="18.991cm" svg:y1="17.064cm" svg:x2="19.416cm" svg:y2="10.419cm" draw:start-shape="id45" draw:start-glue-point="4" draw:end-shape="id44" draw:end-glue-point="23" svg:d="M18991 17064v-3324h425v-3321" svg:viewBox="0 0 426 6646">
          <text:p/>
        </draw:connector>
        <draw:connector draw:style-name="gr212" draw:text-style-name="P13" draw:layer="layout" svg:x1="17.899cm" svg:y1="17.194cm" svg:x2="18.566cm" svg:y2="9.875cm" draw:start-shape="id46" draw:start-glue-point="15" draw:end-shape="id44" draw:end-glue-point="11" svg:d="M17899 17194v-7319h667" svg:viewBox="0 0 668 7320">
          <text:p/>
        </draw:connector>
        <draw:connector draw:style-name="gr213" draw:text-style-name="P13" draw:layer="layout" draw:line-skew="1.003cm" svg:x1="5.958cm" svg:y1="13.947cm" svg:x2="7.715cm" svg:y2="10.34cm" draw:start-shape="id47" draw:start-glue-point="14" draw:end-shape="id43" draw:end-glue-point="7" svg:d="M5958 13947v-802h1757v-2805" svg:viewBox="0 0 1758 3608">
          <text:p/>
        </draw:connector>
        <draw:connector draw:style-name="gr214" draw:text-style-name="P13" draw:layer="layout" svg:x1="2.075cm" svg:y1="13.947cm" svg:x2="4.257cm" svg:y2="12.546cm" draw:start-shape="id47" draw:start-glue-point="4" draw:end-shape="id41" svg:d="M2075 13947v-702h2182v-699" svg:viewBox="0 0 2183 1402">
          <text:p/>
        </draw:connector>
        <draw:connector draw:style-name="gr215" draw:text-style-name="P13" draw:layer="layout" svg:x1="27.812cm" svg:y1="11.161cm" svg:x2="24.934cm" svg:y2="8.338cm" draw:start-shape="id48" draw:start-glue-point="15" draw:end-shape="id44" draw:end-glue-point="13" svg:d="M27812 11161v-2823h-2878" svg:viewBox="0 0 2879 2824">
          <text:p/>
        </draw:connector>
        <draw:frame draw:style-name="gr7" draw:text-style-name="P7" draw:layer="layout" svg:width="2.512cm" svg:height="0.725cm" svg:x="25.13cm" svg:y="8.53cm">
          <draw:text-box>
            <text:p><text:span text:style-name="T2">&lt;&lt;has&gt;&gt;</text:span></text:p>
          </draw:text-box>
        </draw:frame>
        <draw:frame draw:style-name="gr216" draw:text-style-name="P7" draw:layer="layout" svg:width="2.512cm" svg:height="0.725cm" svg:x="5.762cm" svg:y="12.457cm">
          <draw:text-box>
            <text:p><text:span text:style-name="T2">&lt;&lt;has&gt;&gt;</text:span></text:p>
          </draw:text-box>
        </draw:frame>
        <draw:frame draw:style-name="gr7" draw:text-style-name="P7" draw:layer="layout" svg:width="2.512cm" svg:height="0.725cm" svg:x="1.935cm" svg:y="12.547cm">
          <draw:text-box>
            <text:p><text:span text:style-name="T2">&lt;&lt;has&gt;&gt;</text:span></text:p>
          </draw:text-box>
        </draw:frame>
        <draw:connector draw:style-name="gr217" draw:text-style-name="P13" draw:layer="layout" svg:x1="12.764cm" svg:y1="12.771cm" svg:x2="10.343cm" svg:y2="10.34cm" draw:start-shape="id49" draw:start-glue-point="0" draw:end-shape="id43" draw:end-glue-point="2" svg:d="M12764 12771v-1216h-2421v-1215" svg:viewBox="0 0 2422 2432">
          <text:p/>
        </draw:connector>
        <draw:frame draw:style-name="gr7" draw:text-style-name="P7" draw:layer="layout" svg:width="2.512cm" svg:height="0.725cm" svg:x="10.853cm" svg:y="10.77cm">
          <draw:text-box>
            <text:p><text:span text:style-name="T2">&lt;&lt;uses&gt;&gt;</text:span></text:p>
          </draw:text-box>
          <draw:glue-point draw:id="4" svg:x="2.472cm" svg:y="-4.993cm"/>
        </draw:frame>
        <draw:g draw:style-name="gr3" xml:id="id49" draw:id="id49">
          <draw:glue-point draw:id="4" svg:x="-4cm" svg:y="-5cm"/>
          <draw:custom-shape draw:style-name="gr218" draw:text-style-name="P21" draw:layer="layout" svg:width="9.525cm" svg:height="1.153cm" svg:x="8.002cm" svg:y="12.77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0"><text:span text:style-name="T1">&lt;&lt;module&gt;&gt;</text:span></text:p>
            <text:p text:style-name="P20"><text:span text:style-name="T1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9" draw:text-style-name="P12" draw:layer="layout" svg:width="9.525cm" svg:height="0.435cm" svg:x="8.002cm" svg:y="13.9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0" draw:text-style-name="P12" draw:layer="layout" svg:width="9.525cm" svg:height="0.993cm" svg:x="8.002cm" svg:y="14.29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3">+ put_command_message(message: CommandMessage)</text:span></text:p>
            <text:p text:style-name="P11"><text:span text:style-name="T3">+ put_error_message(message: Error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Music Players" draw:style-name="dp1" draw:master-page-name="Default">
        <draw:custom-shape draw:style-name="gr221" draw:text-style-name="P2" draw:layer="layout" svg:width="23.455cm" svg:height="0.7cm" svg:x="3.222cm" svg:y="2.7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2" draw:layer="layout" svg:width="23.504cm" svg:height="0.7cm" svg:x="3.222cm" svg:y="6.1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51" draw:id="id51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custom-shape draw:style-name="gr223" draw:text-style-name="P4" draw:layer="layout" svg:width="23.3cm" svg:height="1.153cm" svg:x="3.222cm" svg:y="3.7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"><text:span text:style-name="T1">oradio_control.py</text:span></text:p>
            <text:p text:style-name="P3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4" draw:text-style-name="P6" draw:layer="layout" svg:width="23.3cm" svg:height="0.679cm" svg:x="3.222cm" svg:y="4.8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"><text:span text:style-name="T1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25" draw:text-style-name="P2" draw:layer="layout" svg:width="23.253cm" svg:height="0.7cm" svg:x="3.424cm" svg:y="18.98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6" draw:text-style-name="P8" draw:layer="layout" svg:width="23.995cm" svg:height="17.715cm" svg:x="3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50" draw:id="id5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1.958cm" svg:y="0.382cm"/>
          <draw:glue-point draw:id="24" svg:x="1.369cm" svg:y="0.382cm"/>
          <draw:glue-point draw:id="25" svg:x="2.545cm" svg:y="0.382cm"/>
          <draw:g draw:style-name="gr3">
            <draw:custom-shape draw:style-name="gr227" draw:text-style-name="P10" draw:layer="layout" svg:width="5.397cm" svg:height="1.153cm" svg:x="10.355cm" svg:y="7.94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mpd_monitor.MPDMonitor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8" draw:text-style-name="P12" draw:layer="layout" svg:width="5.397cm" svg:height="0.545cm" svg:x="10.355cm" svg:y="9.095cm">
              <text:p text:style-name="P1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9" draw:text-style-name="P12" draw:layer="layout" svg:width="5.397cm" svg:height="0.993cm" svg:x="10.355cm" svg:y="9.6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init(class: MPDService)</text:span></text:p>
              <text:p text:style-name="P11"><text:span text:style-name="T3">- listen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52" draw:id="id5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230" draw:text-style-name="P10" draw:layer="layout" svg:width="5.397cm" svg:height="1.153cm" svg:x="3.44cm" svg:y="7.99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mpd_control.MPDControl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1" draw:text-style-name="P12" draw:layer="layout" svg:width="5.397cm" svg:height="0.674cm" svg:x="3.44cm" svg:y="9.146cm">
              <text:p text:style-name="P1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2" draw:text-style-name="P12" draw:layer="layout" svg:width="5.397cm" svg:height="2.569cm" svg:x="3.44cm" svg:y="9.8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init(class: MPDService)</text:span></text:p>
              <text:p text:style-name="P11"><text:span text:style-name="T3">+ is_web_radio()</text:span></text:p>
              <text:p text:style-name="P11"><text:span text:style-name="T3">+ next()</text:span></text:p>
              <text:p text:style-name="P11"><text:span text:style-name="T3">+ play()</text:span></text:p>
              <text:p text:style-name="P11"><text:span text:style-name="T3">+ stop()</text:span></text:p>
              <text:p text:style-name="P11"><text:span text:style-name="T3">+ pau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53" draw:id="id5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0.009cm" svg:y="-4.346cm"/>
          <draw:glue-point draw:id="24" svg:x="3.714cm" svg:y="-5.101cm"/>
          <draw:g draw:style-name="gr3">
            <draw:custom-shape draw:style-name="gr233" draw:text-style-name="P10" draw:layer="layout" svg:width="6.552cm" svg:height="1.153cm" svg:x="20.085cm" svg:y="7.91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spotify_connect.SpotifyConnect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4" draw:text-style-name="P12" draw:layer="layout" svg:width="6.552cm" svg:height="0.761cm" svg:x="20.085cm" svg:y="9.0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5" draw:text-style-name="P12" draw:layer="layout" svg:width="6.552cm" svg:height="1.387cm" svg:x="20.085cm" svg:y="9.83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3">+ play()</text:span></text:p>
              <text:p text:style-name="P11"><text:span text:style-name="T3">+ pause()</text:span></text:p>
              <text:p text:style-name="P11"><text:span text:style-name="T3">+ get_stat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36" draw:text-style-name="P13" draw:layer="layout" draw:line-skew="0.495cm" svg:x1="11.855cm" svg:y1="7.943cm" svg:x2="10.488cm" svg:y2="5.57cm" draw:start-shape="id50" draw:start-glue-point="5" draw:end-shape="id51" draw:end-glue-point="18" svg:d="M11855 7943v-693h-1367v-1680" svg:viewBox="0 0 1368 2374">
          <text:p/>
        </draw:connector>
        <draw:connector draw:style-name="gr237" draw:text-style-name="P13" draw:layer="layout" draw:line-skew="0.469cm" svg:x1="3.741cm" svg:y1="7.994cm" svg:x2="4.773cm" svg:y2="5.57cm" draw:start-shape="id52" draw:start-glue-point="4" draw:end-shape="id51" draw:end-glue-point="16" svg:d="M3741 7994v-744h1032v-1680" svg:viewBox="0 0 1033 2425">
          <text:p/>
        </draw:connector>
        <draw:connector draw:style-name="gr238" draw:text-style-name="P13" draw:layer="layout" draw:line-skew="0.189cm" svg:x1="24.817cm" svg:y1="7.918cm" svg:x2="21.733cm" svg:y2="5.57cm" draw:start-shape="id53" draw:start-glue-point="14" draw:end-shape="id51" draw:end-glue-point="5" svg:d="M24817 7918v-986h-3084v-1362" svg:viewBox="0 0 3085 2349">
          <text:p/>
        </draw:connector>
        <draw:custom-shape draw:style-name="gr239" draw:text-style-name="P14" draw:layer="layout" svg:width="23.995cm" svg:height="1.205cm" svg:x="3cm" svg:y="1.099cm">
          <text:p text:style-name="P1">Static View: Music Player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2.54cm" svg:height="0.725cm" svg:x="4.81cm" svg:y="7.26cm">
          <draw:text-box>
            <text:p><text:span text:style-name="T2">&lt;&lt;uses&gt;&gt;</text:span></text:p>
          </draw:text-box>
        </draw:frame>
        <draw:g draw:style-name="gr3" xml:id="id55" draw:id="id55">
          <draw:glue-point draw:id="4" svg:x="4.917cm" svg:y="-2.025cm"/>
          <draw:glue-point draw:id="5" svg:x="3.74cm" svg:y="-5.09cm"/>
          <draw:glue-point draw:id="6" svg:x="4.328cm" svg:y="-5.09cm"/>
          <draw:glue-point draw:id="7" svg:x="-5.013cm" svg:y="-2.679cm"/>
          <draw:custom-shape draw:style-name="gr240" draw:text-style-name="P10" draw:layer="layout" svg:width="5.397cm" svg:height="1.153cm" svg:x="9.603cm" svg:y="15.448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9"><text:span text:style-name="T1">mpd_service.MPDService</text:span></text:p>
            <text:p text:style-name="P9"><text:span text:style-name="T1">&lt;&lt;class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1" draw:text-style-name="P12" draw:layer="layout" svg:width="5.397cm" svg:height="0.669cm" svg:x="9.603cm" svg:y="16.601cm">
            <text:p text:style-name="P11"><text:span text:style-name="T3">- client: MPDCli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2" draw:text-style-name="P12" draw:layer="layout" svg:width="5.397cm" svg:height="1.387cm" svg:x="9.603cm" svg:y="17.2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3">+ init()</text:span></text:p>
            <text:p text:style-name="P11"><text:span text:style-name="T3">+ get_stats()</text:span></text:p>
            <text:p text:style-name="P11"><text:span text:style-name="T3">- 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 xml:id="id54" draw:id="id54">
          <draw:custom-shape draw:style-name="gr243" draw:text-style-name="P10" draw:layer="layout" svg:width="3.829cm" svg:height="1.153cm" svg:x="18.443cm" svg:y="13.77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9"><text:span text:style-name="T1">mpd.MPDClient</text:span></text:p>
            <text:p text:style-name="P9"><text:span text:style-name="T1">&lt;&lt;library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4" draw:text-style-name="P12" draw:layer="layout" svg:width="3.829cm" svg:height="0.504cm" svg:x="18.443cm" svg:y="14.9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5" draw:text-style-name="P12" draw:layer="layout" svg:width="3.829cm" svg:height="3.357cm" svg:x="18.443cm" svg:y="15.43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3">+ init()</text:span></text:p>
            <text:p text:style-name="P11"><text:span text:style-name="T3">+ idle()</text:span></text:p>
            <text:p text:style-name="P11"><text:span text:style-name="T3">+ update()</text:span></text:p>
            <text:p text:style-name="P11"><text:span text:style-name="T3">+ next()</text:span></text:p>
            <text:p text:style-name="P11"><text:span text:style-name="T3">+ play()</text:span></text:p>
            <text:p text:style-name="P11"><text:span text:style-name="T3">+ stop()</text:span></text:p>
            <text:p text:style-name="P11"><text:span text:style-name="T3">+ pause()</text:span></text:p>
            <text:p text:style-name="P11"><text:span text:style-name="T3">+ status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46" draw:text-style-name="P13" draw:layer="layout" svg:x1="18.443cm" svg:y1="16.283cm" svg:x2="15cm" svg:y2="17.052cm" draw:start-shape="id54" draw:start-glue-point="3" draw:end-shape="id55" draw:end-glue-point="1" svg:d="M18443 16283h-1722v769h-1721" svg:viewBox="0 0 3444 770">
          <text:p/>
        </draw:connector>
        <draw:frame draw:style-name="gr7" draw:text-style-name="P7" draw:layer="layout" svg:width="2.83cm" svg:height="0.725cm" svg:x="6.08cm" svg:y="17.102cm">
          <draw:text-box>
            <text:p><text:span text:style-name="T2">&lt;&lt;is A&gt;&gt;</text:span></text:p>
          </draw:text-box>
          <draw:glue-point draw:id="4" svg:x="0.512cm" svg:y="-0.606cm"/>
        </draw:frame>
        <draw:connector draw:style-name="gr247" draw:text-style-name="P13" draw:layer="layout" svg:x1="14.636cm" svg:y1="15.448cm" svg:x2="14.252cm" svg:y2="10.633cm" draw:start-shape="id55" draw:start-glue-point="6" draw:end-shape="id50" draw:end-glue-point="9" svg:d="M14636 15448v-2408h-384v-2407" svg:viewBox="0 0 385 4816">
          <text:p/>
        </draw:connector>
        <draw:connector draw:style-name="gr248" draw:text-style-name="P13" draw:layer="layout" svg:x1="9.603cm" svg:y1="17.052cm" svg:x2="3.741cm" svg:y2="12.389cm" draw:start-shape="id55" draw:start-glue-point="3" draw:end-shape="id52" draw:end-glue-point="7" svg:d="M9603 17052h-5862v-4663" svg:viewBox="0 0 5863 4664">
          <text:p/>
        </draw:connector>
        <draw:frame draw:style-name="gr7" draw:text-style-name="P7" draw:layer="layout" svg:width="2.222cm" svg:height="0.725cm" svg:x="12.33cm" svg:y="11.16cm">
          <draw:text-box>
            <text:p><text:span text:style-name="T2">&lt;&lt;is A&gt;&gt;</text:span></text:p>
          </draw:text-box>
          <draw:glue-point draw:id="4" svg:x="0.512cm" svg:y="-0.606cm"/>
        </draw:frame>
        <draw:frame draw:style-name="gr7" draw:text-style-name="P7" draw:layer="layout" svg:width="3.147cm" svg:height="0.725cm" svg:x="21.665cm" svg:y="7.26cm">
          <draw:text-box>
            <text:p><text:span text:style-name="T2">&lt;&lt;uses&gt;&gt;</text:span></text:p>
          </draw:text-box>
        </draw:frame>
        <draw:connector draw:style-name="gr249" draw:text-style-name="P13" draw:layer="layout" svg:x1="9.506cm" svg:y1="12.847cm" svg:x2="8.836cm" svg:y2="8.629cm" draw:start-shape="id56" draw:end-shape="id52" draw:end-glue-point="13" svg:d="M9506 12847v-4218h-670" svg:viewBox="0 0 671 4219">
          <text:p/>
        </draw:connector>
        <draw:connector draw:style-name="gr250" draw:text-style-name="P13" draw:layer="layout" svg:x1="10.641cm" svg:y1="12.847cm" svg:x2="11.855cm" svg:y2="10.633cm" draw:start-shape="id56" draw:start-glue-point="8" draw:end-shape="id50" draw:end-glue-point="8" svg:d="M10641 12847v-1108h1214v-1106" svg:viewBox="0 0 1215 2215">
          <text:p/>
        </draw:connector>
        <draw:connector draw:style-name="gr251" draw:text-style-name="P13" draw:layer="layout" svg:x1="6.408cm" svg:y1="14.851cm" svg:x2="9.603cm" svg:y2="16.193cm" draw:start-shape="id56" draw:start-glue-point="7" draw:end-shape="id55" draw:end-glue-point="7" svg:d="M6408 14851v1342h3195" svg:viewBox="0 0 3196 1343">
          <text:p/>
        </draw:connector>
        <draw:frame draw:style-name="gr7" draw:text-style-name="P7" draw:layer="layout" svg:width="2.54cm" svg:height="0.725cm" svg:x="9.572cm" svg:y="11.16cm">
          <draw:text-box>
            <text:p><text:span text:style-name="T2">&lt;&lt;uses&gt;&gt;</text:span></text:p>
          </draw:text-box>
        </draw:frame>
        <draw:g draw:style-name="gr3" xml:id="id56" draw:id="id56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custom-shape draw:style-name="gr252" draw:text-style-name="P21" draw:layer="layout" svg:width="7.937cm" svg:height="1.153cm" svg:x="5.538cm" svg:y="12.84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0"><text:span text:style-name="T1">&lt;&lt;module&gt;&gt;</text:span></text:p>
            <text:p text:style-name="P20"><text:span text:style-name="T1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3" draw:text-style-name="P12" draw:layer="layout" svg:width="7.937cm" svg:height="0.435cm" svg:x="5.538cm" svg:y="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4" draw:text-style-name="P12" draw:layer="layout" svg:width="7.937cm" svg:height="0.599cm" svg:x="5.538cm" svg:y="14.3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3">+ put_error_message(message: Error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55" draw:text-style-name="P13" draw:layer="layout" draw:line-skew="0.095cm" svg:x1="13.475cm" svg:y1="13.908cm" svg:x2="20.085cm" svg:y2="9.567cm" draw:start-shape="id56" draw:start-glue-point="1" draw:end-shape="id53" draw:end-glue-point="3" svg:d="M13475 13908h3400v-4341h3210" svg:viewBox="0 0 6611 4342">
          <text:p/>
        </draw:connector>
        <draw:frame draw:style-name="gr7" draw:text-style-name="P7" draw:layer="layout" svg:width="3.81cm" svg:height="0.725cm" svg:x="14.97cm" svg:y="17.42cm">
          <draw:text-box>
            <text:p><text:span text:style-name="T2">&lt;&lt;consists of&gt;&gt;</text:span></text:p>
          </draw:text-box>
        </draw:frame>
        <draw:frame draw:style-name="gr7" draw:text-style-name="P7" draw:layer="layout" svg:width="2.54cm" svg:height="0.725cm" svg:x="17.192cm" svg:y="8.847cm">
          <draw:text-box>
            <text:p><text:span text:style-name="T2">&lt;&lt;uses&gt;&gt;</text:span></text:p>
          </draw:text-box>
        </draw:frame>
        <draw:frame draw:style-name="gr7" draw:text-style-name="P7" draw:layer="layout" svg:width="2.54cm" svg:height="0.725cm" svg:x="7.35cm" svg:y="15.515cm">
          <draw:text-box>
            <text:p><text:span text:style-name="T2">&lt;&lt;uses&gt;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Navigation" svg:viewBox="0 0 786 1228" svg:d="M151 1228l-76-25-75-25 318-952 76-226 75 226 317 952-76 25-75 25-162-486v462h-80-79v-464z"/>
    <draw:marker draw:name="Square_20_45" draw:display-name="Square 45" svg:viewBox="0 0 1131 1131" svg:d="M0 564l564 567 567-567-567-564z"/>
    <draw:marker draw:name="Square_20_45_20_unfilled" draw:display-name="Square 45 unfilled" svg:viewBox="0 0 3000 3000" svg:d="M1500 3000l-1500-1500 1500-1500 1500 1500zM1500 2715l-1215-1215 1215-1215 1215 1215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03T16:23:47.322558208</meta:creation-date>
    <meta:generator>LibreOffice/25.8.5.2$Windows_X86_64 LibreOffice_project/9c8b85f387cc00a89945a79c9e6239f32e450ac2</meta:generator>
    <dc:date>2026-05-20T18:24:48.333843700</dc:date>
    <meta:editing-duration>PT12H20M21S</meta:editing-duration>
    <meta:editing-cycles>90</meta:editing-cycles>
    <meta:print-date>2026-04-03T16:45:26.431431754</meta:print-date>
    <meta:document-statistic meta:object-count="390"/>
  </office:meta>
</office:document-meta>
</file>