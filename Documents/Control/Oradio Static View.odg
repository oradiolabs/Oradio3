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26.007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25.537cm" style:writing-mode="lr-tb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25.859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6.753cm" fo:padding-top="0.151cm" fo:padding-bottom="0.151cm" fo:padding-left="0.276cm" fo:padding-right="0.276cm" loext:decorative="false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96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5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4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6.753cm" fo:padding-top="0.151cm" fo:padding-bottom="0.151cm" fo:padding-left="0.276cm" fo:padding-right="0.276cm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53cm" fo:min-width="3.5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00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4cm" fo:min-width="5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45cm" fo:min-width="25.053cm" style:writing-mode="lr-tb" loext:decorative="false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45cm" fo:min-width="24.902cm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45cm" fo:min-width="25.224cm" style:writing-mode="lr-tb" loext:decorative="false"/>
      <style:paragraph-properties style:writing-mode="lr-tb"/>
    </style:style>
    <style:style style:name="gr4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5.8cm" fo:padding-top="0.151cm" fo:padding-bottom="0.151cm" fo:padding-left="0.276cm" fo:padding-right="0.276cm" loext:decorative="false"/>
    </style:style>
    <style:style style:name="gr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4.67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5.8cm" fo:padding-top="0.151cm" fo:padding-bottom="0.151cm" fo:padding-left="0.276cm" fo:padding-right="0.276cm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57cm" fo:min-width="4.99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5cm" fo:min-width="4.99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57cm" fo:min-width="6.26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7.26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5cm" fo:min-width="10.12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9" style:family="graphic" style:parent-style-name="standard">
      <style:graphic-properties draw:textarea-horizontal-align="justify" draw:textarea-vertical-align="middle" draw:auto-grow-height="false" fo:min-height="0.45cm" fo:min-width="24.642cm" style:writing-mode="lr-tb" loext:decorative="false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fo:min-height="0.45cm" fo:min-width="24.599cm" style:writing-mode="lr-tb" loext:decorative="false"/>
      <style:paragraph-properties style:writing-mode="lr-tb"/>
    </style:style>
    <style:style style:name="gr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2cm" fo:min-width="4.6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6" style:family="graphic" style:parent-style-name="standard">
      <style:graphic-properties draw:textarea-horizontal-align="justify" draw:textarea-vertical-align="middle" draw:auto-grow-height="false" fo:min-height="0.45cm" fo:min-width="24.799cm" style:writing-mode="lr-tb" loext:decorative="false"/>
      <style:paragraph-properties style:writing-mode="lr-tb"/>
    </style:style>
    <style:style style:name="gr8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398cm" fo:min-width="25.165cm" fo:padding-top="0.151cm" fo:padding-bottom="0.151cm" fo:padding-left="0.276cm" fo:padding-right="0.276cm" loext:decorative="false"/>
    </style:style>
    <style:style style:name="gr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46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5.91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68cm" fo:min-width="25.165cm" fo:padding-top="0.151cm" fo:padding-bottom="0.151cm" fo:padding-left="0.276cm" fo:padding-right="0.276cm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69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51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23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57cm" fo:min-width="5.74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5" style:family="graphic" style:parent-style-name="standard">
      <style:graphic-properties draw:textarea-horizontal-align="justify" draw:textarea-vertical-align="middle" draw:auto-grow-height="false" fo:min-height="0.45cm" fo:min-width="22.677cm" style:writing-mode="lr-tb" loext:decorative="false"/>
      <style:paragraph-properties style:writing-mode="lr-tb"/>
    </style:style>
    <style:style style:name="gr116" style:family="graphic" style:parent-style-name="standard">
      <style:graphic-properties draw:textarea-horizontal-align="justify" draw:textarea-vertical-align="middle" draw:auto-grow-height="false" fo:min-height="0.45cm" fo:min-width="22.504cm" style:writing-mode="lr-tb" loext:decorative="false"/>
      <style:paragraph-properties style:writing-mode="lr-tb"/>
    </style:style>
    <style:style style:name="gr1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9" style:family="graphic" style:parent-style-name="standard">
      <style:graphic-properties draw:textarea-horizontal-align="justify" draw:textarea-vertical-align="middle" draw:auto-grow-height="false" fo:min-height="0.45cm" fo:min-width="22.753cm" style:writing-mode="lr-tb" loext:decorative="false"/>
      <style:paragraph-properties style:writing-mode="lr-tb"/>
    </style:style>
    <style:style style:name="gr12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3.285cm" fo:min-width="23.443cm" fo:padding-top="0.151cm" fo:padding-bottom="0.151cm" fo:padding-left="0.276cm" fo:padding-right="0.276cm" loext:decorative="false"/>
    </style:style>
    <style:style style:name="gr1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65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09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03cm" fo:min-width="23.443cm" fo:padding-top="0.151cm" fo:padding-bottom="0.151cm" fo:padding-left="0.276cm" fo:padding-right="0.276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style:paragraph-properties fo:margin-left="0cm" fo:margin-right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style:letter-kerning="true" style:font-name-asian="Liberation Mono" style:font-size-asian="10pt" style:font-style-asian="normal" style:font-name-complex="Liberation Mono" style:font-size-complex="10pt" style:font-style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start"/>
    </style:style>
    <style:style style:name="P19" style:family="paragraph">
      <style:paragraph-properties fo:text-align="start" style:writing-mode="lr-tb"/>
    </style:style>
    <style:style style:name="P20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tilities" draw:style-name="dp1" draw:master-page-name="Default">
        <draw:custom-shape draw:style-name="gr1" draw:text-style-name="P2" draw:layer="layout" svg:width="26.507cm" svg:height="0.7cm" svg:x="1.482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037cm" svg:height="0.7cm" svg:x="1.633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" draw:id="id2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4" draw:text-style-name="P4" draw:layer="layout" svg:width="26.125cm" svg:height="1.153cm" svg:x="1.629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26.125cm" svg:height="0.679cm" svg:x="1.629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2" draw:layer="layout" svg:width="26.359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5.535cm" svg:y="6.625cm">
          <draw:text-box>
            <text:p><text:span text:style-name="T2">&lt;&lt;creates&gt;&gt;</text:span></text:p>
          </draw:text-box>
        </draw:frame>
        <draw:custom-shape draw:style-name="gr8" draw:text-style-name="P8" draw:layer="layout" svg:width="27.305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3" draw:id="id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3">
            <draw:custom-shape draw:style-name="gr9" draw:text-style-name="P10" draw:layer="layout" svg:width="6.423cm" svg:height="1.153cm" svg:x="16.737cm" svg:y="11.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remote_monitoring.RM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1" draw:layer="layout" svg:width="6.423cm" svg:height="0.761cm" svg:x="16.737cm" svg:y="12.3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11" draw:layer="layout" svg:width="6.423cm" svg:height="0.803cm" svg:x="16.737cm" svg:y="13.11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1" draw:id="id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2" draw:text-style-name="P10" draw:layer="layout" svg:width="5.602cm" svg:height="1.153cm" svg:x="1.856cm" svg:y="7.82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web_service.Web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1" draw:layer="layout" svg:width="5.602cm" svg:height="0.761cm" svg:x="1.856cm" svg:y="8.978cm">
              <text:p text:style-name="P12"><text:span text:style-name="T3">- shared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11" draw:layer="layout" svg:width="5.602cm" svg:height="2.175cm" svg:x="1.856cm" svg:y="9.73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3"><text:span text:style-name="T3">+ __init__(queue: Queue)</text:span></text:p>
              <text:p text:style-name="P13"><text:span text:style-name="T3">+ stop()</text:span></text:p>
              <text:p text:style-name="P13"><text:span text:style-name="T3">+ get_state()</text:span></text:p>
              <text:p text:style-name="P13"><text:span text:style-name="T3">+ start()</text:span></text:p>
              <text:p text:style-name="P13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5" draw:id="id5">
          <draw:glue-point draw:id="4" svg:x="1.153cm" svg:y="-4.294cm"/>
          <draw:glue-point draw:id="5" svg:x="3.461cm" svg:y="-5.146cm"/>
          <draw:custom-shape draw:style-name="gr15" draw:text-style-name="P10" draw:layer="layout" svg:width="4.047cm" svg:height="1.153cm" svg:x="21.82cm" svg:y="8.03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system_sounds.py</text:span></text:p>
            <text:p text:style-name="P9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1" draw:layer="layout" svg:width="4.047cm" svg:height="0.761cm" svg:x="21.82cm" svg:y="9.185cm">
            <text:p text:style-name="P13"><text:span text:style-name="T3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4" draw:id="id4">
          <draw:glue-point draw:id="4" svg:x="-3.94cm" svg:y="-4.644cm"/>
          <draw:custom-shape draw:style-name="gr17" draw:text-style-name="P10" draw:layer="layout" svg:width="4.465cm" svg:height="1.153cm" svg:x="14.55cm" svg:y="7.97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oradio_logging.py</text:span></text:p>
            <text:p text:style-name="P9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layout" svg:width="4.465cm" svg:height="0.761cm" svg:x="14.55cm" svg:y="9.129cm">
            <text:p text:style-name="P13"><text:span text:style-name="T3">+ oradio_log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9" draw:text-style-name="P14" draw:layer="layout" draw:line-skew="0.485cm" svg:x1="3.414cm" svg:y1="7.826cm" svg:x2="4.592cm" svg:y2="5.27cm" draw:start-shape="id1" draw:start-glue-point="5" draw:end-shape="id2" draw:end-glue-point="16" svg:d="M3414 7826v-794h1178v-1762" svg:viewBox="0 0 1179 2557">
          <text:p/>
        </draw:connector>
        <draw:connector draw:style-name="gr20" draw:text-style-name="P14" draw:layer="layout" svg:x1="21.375cm" svg:y1="11.201cm" svg:x2="20.446cm" svg:y2="5.27cm" draw:start-shape="id3" draw:start-glue-point="14" draw:end-shape="id2" draw:end-glue-point="29" svg:d="M21375 11201v-2967h-929v-2964" svg:viewBox="0 0 930 5932">
          <text:p/>
        </draw:connector>
        <draw:connector draw:style-name="gr21" draw:text-style-name="P14" draw:layer="layout" svg:x1="16.782cm" svg:y1="7.976cm" svg:x2="19.33cm" svg:y2="5.27cm" draw:start-shape="id4" draw:end-shape="id2" draw:end-glue-point="30" svg:d="M16782 7976v-1354h2548v-1352" svg:viewBox="0 0 2549 2707">
          <text:p/>
        </draw:connector>
        <draw:connector draw:style-name="gr22" draw:text-style-name="P14" draw:layer="layout" svg:x1="24.309cm" svg:y1="8.168cm" svg:x2="24.874cm" svg:y2="5.27cm" draw:start-shape="id5" draw:start-glue-point="4" draw:end-shape="id2" draw:end-glue-point="39" svg:d="M24309 8168v-1518h565v-1380" svg:viewBox="0 0 566 2899">
          <text:p/>
        </draw:connector>
        <draw:custom-shape draw:style-name="gr23" draw:text-style-name="P15" draw:layer="layout" svg:width="27.305cm" svg:height="0.952cm" svg:x="1cm" svg:y="1.1cm">
          <text:p text:style-name="P1">Static view: Utilities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6" draw:id="id6">
          <draw:glue-point draw:id="4" svg:x="1.153cm" svg:y="-4.294cm"/>
          <draw:glue-point draw:id="5" svg:x="3.461cm" svg:y="-5.146cm"/>
          <draw:custom-shape draw:style-name="gr24" draw:text-style-name="P10" draw:layer="controls" svg:width="4.047cm" svg:height="1.153cm" svg:x="23.842cm" svg:y="11.18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error_service.py</text:span></text:p>
            <text:p text:style-name="P9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1" draw:layer="controls" svg:width="4.047cm" svg:height="1.262cm" svg:x="23.842cm" svg:y="12.338cm">
            <text:p text:style-name="P13"><text:span text:style-name="T3">+ xxxx</text:span></text:p>
            <text:p text:style-name="P13"><text:span text:style-name="T3">+ xxxx</text:span></text:p>
            <text:p text:style-name="P13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6" draw:text-style-name="P14" draw:layer="controls" svg:x1="27.265cm" svg:y1="11.185cm" svg:x2="26.716cm" svg:y2="5.27cm" draw:start-shape="id6" draw:start-glue-point="5" draw:end-shape="id2" draw:end-glue-point="44" svg:d="M27265 11185v-2958h-549v-2957" svg:viewBox="0 0 550 5916">
          <text:p/>
        </draw:connector>
      </draw:page>
      <draw:page draw:name="Web interface" draw:style-name="dp1" draw:master-page-name="Default">
        <draw:custom-shape draw:style-name="gr1" draw:text-style-name="P2" draw:layer="layout" svg:width="26.507cm" svg:height="0.7cm" svg:x="1.482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037cm" svg:height="0.7cm" svg:x="1.633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8" draw:id="id8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27" draw:text-style-name="P4" draw:layer="layout" svg:width="26.125cm" svg:height="1.153cm" svg:x="1.629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6" draw:layer="layout" svg:width="26.125cm" svg:height="0.679cm" svg:x="1.629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2" draw:layer="layout" svg:width="26.359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5.535cm" svg:y="6.625cm">
          <draw:text-box>
            <text:p><text:span text:style-name="T2">&lt;&lt;creates&gt;&gt;</text:span></text:p>
          </draw:text-box>
        </draw:frame>
        <draw:custom-shape draw:style-name="gr8" draw:text-style-name="P8" draw:layer="layout" svg:width="27.305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7" draw:id="id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29" draw:text-style-name="P10" draw:layer="layout" svg:width="8.459cm" svg:height="1.153cm" svg:x="1.113cm" svg:y="7.66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web_service.Web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1" draw:layer="layout" svg:width="8.459cm" svg:height="0.761cm" svg:x="1.113cm" svg:y="8.82cm">
              <text:p text:style-name="P12"><text:span text:style-name="T3">- shared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17" draw:layer="layout" svg:width="8.459cm" svg:height="3.751cm" svg:x="1.113cm" svg:y="9.58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6"><text:span text:style-name="T3">- config: ServiceConfig</text:span></text:p>
              <text:p text:style-name="P16"><text:span text:style-name="T3">- active_server: ServerType</text:span></text:p>
              <text:p text:style-name="P16"><text:span text:style-name="T3">- unicorn_server: UnicornServer <text:s/></text:span></text:p>
              <text:p text:style-name="P16"><text:span text:style-name="T3">- uvicorn_thread: UvicornServerThread</text:span></text:p>
              <text:p text:style-name="P13"><text:span text:style-name="T3">+ __init__(queue: Queue)</text:span></text:p>
              <text:p text:style-name="P13"><text:span text:style-name="T3">+ stop()</text:span></text:p>
              <text:p text:style-name="P13"><text:span text:style-name="T3">+ get_state()</text:span></text:p>
              <text:p text:style-name="P13"><text:span text:style-name="T3">+ start()</text:span></text:p>
              <text:p text:style-name="P13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2" draw:text-style-name="P14" draw:layer="layout" draw:line-skew="0.485cm" svg:x1="3.465cm" svg:y1="7.668cm" svg:x2="4.592cm" svg:y2="5.27cm" draw:start-shape="id7" draw:start-glue-point="5" draw:end-shape="id8" draw:end-glue-point="16" svg:d="M3465 7668v-715h1127v-1683" svg:viewBox="0 0 1128 2399">
          <text:p/>
        </draw:connector>
        <draw:custom-shape draw:style-name="gr23" draw:text-style-name="P15" draw:layer="layout" svg:width="27.305cm" svg:height="0.952cm" svg:x="1cm" svg:y="1.1cm">
          <text:p text:style-name="P1">Static view: Utilities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33" draw:text-style-name="P10" draw:layer="layout" svg:width="5.602cm" svg:height="1.153cm" svg:x="13.065cm" svg:y="8.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server::UvicornServer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11" draw:layer="layout" svg:width="5.602cm" svg:height="0.473cm" svg:x="13.065cm" svg:y="9.653cm">
              <text:p text:style-name="P12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1" draw:layer="layout" svg:width="5.602cm" svg:height="2.963cm" svg:x="13.065cm" svg:y="10.12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6"><text:span text:style-name="T3">class UnicornServer { </text:span><text:span text:style-name="T3"><text:s text:c="3"/>- process: </text:span><text:span text:style-name="T3">ProcessHandle <text:s text:c="3"/>- </text:span><text:span text:style-name="T3">workers: int <text:s text:c="3"/>- </text:span><text:span text:style-name="T3">bind_addr: String <text:s text:c="3"/>+ </text:span><text:span text:style-name="T3">UnicornServer(config</text:span><text:span text:style-name="T3">: ServiceConfig) <text:s text:c="3"/>+ </text:span><text:span text:style-name="T3">start(): void <text:s text:c="3"/>+ </text:span><text:span text:style-name="T3">stop(): void <text:s text:c="3"/>+ </text:span><text:span text:style-name="T3">restart(): void <text:s text:c="3"/>+ </text:span><text:span text:style-name="T3">status(): </text:span><text:span text:style-name="T3">ServerStatus <text:s/>}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  <draw:page draw:name="USB" draw:style-name="dp1" draw:master-page-name="Default">
        <draw:custom-shape draw:style-name="gr36" draw:text-style-name="P2" draw:layer="layout" svg:width="25.553cm" svg:height="0.7cm" svg:x="1.482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" draw:layer="layout" svg:width="25.402cm" svg:height="0.7cm" svg:x="1.633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0" draw:id="id10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38" draw:text-style-name="P4" draw:layer="layout" svg:width="25.406cm" svg:height="1.153cm" svg:x="1.629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6" draw:layer="layout" svg:width="25.406cm" svg:height="0.679cm" svg:x="1.629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0" draw:text-style-name="P2" draw:layer="layout" svg:width="25.724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9.89cm" svg:y="6.715cm">
          <draw:text-box>
            <text:p><text:span text:style-name="T2">&lt;&lt;creates&gt;&gt;</text:span></text:p>
          </draw:text-box>
        </draw:frame>
        <draw:custom-shape draw:style-name="gr41" draw:text-style-name="P8" draw:layer="layout" svg:width="26.352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9" draw:id="id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42" draw:text-style-name="P10" draw:layer="layout" svg:width="5.13cm" svg:height="1.153cm" svg:x="8.112cm" svg:y="7.80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u</text:span><text:span text:style-name="T1">s</text:span><text:span text:style-name="T1">b</text:span><text:span text:style-name="T1">_</text:span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text:span text:style-name="T1">.</text:span><text:span text:style-name="T1">U</text:span><text:span text:style-name="T1">S</text:span><text:span text:style-name="T1">B</text:span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/text:p>
              <text:p text:style-name="P9"><text:span text:style-name="T1">&lt;</text:span><text:span text:style-name="T1">&lt;</text:span><text:span text:style-name="T1">c</text:span><text:span text:style-name="T1">l</text:span><text:span text:style-name="T1">a</text:span><text:span text:style-name="T1">s</text:span><text:span text:style-name="T1">s</text:span><text:span text:style-name="T1">&gt;</text:span><text:span text:style-name="T1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" draw:text-style-name="P11" draw:layer="layout" svg:width="5.13cm" svg:height="0.761cm" svg:x="8.112cm" svg:y="8.961cm">
              <text:p text:style-name="P12"><text:span text:style-name="T3">- shared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11" draw:layer="layout" svg:width="5.13cm" svg:height="1.387cm" svg:x="8.112cm" svg:y="9.72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3"><text:span text:style-name="T3">+ __init__(queue: Queue)</text:span></text:p>
              <text:p text:style-name="P13"><text:span text:style-name="T3">+ get_state()</text:span></text:p>
              <text:p text:style-name="P13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45" draw:text-style-name="P14" draw:layer="layout" svg:x1="9.539cm" svg:y1="7.809cm" svg:x2="10.184cm" svg:y2="5.27cm" draw:start-shape="id9" draw:start-glue-point="5" draw:end-shape="id10" draw:end-glue-point="23" svg:d="M9539 7809v-1271h645v-1268" svg:viewBox="0 0 646 2540">
          <text:p/>
        </draw:connector>
        <draw:custom-shape draw:style-name="gr46" draw:text-style-name="P15" draw:layer="layout" svg:width="26.352cm" svg:height="0.952cm" svg:x="1cm" svg:y="1.1cm">
          <text:p text:style-name="P1">Static view: Utilities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3" draw:id="id1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47" draw:text-style-name="P10" draw:layer="layout" svg:width="5.448cm" svg:height="1.153cm" svg:x="3.172cm" svg:y="13.70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&lt;&lt;singleton&gt;</text:span><text:span text:style-name="T1">&gt;</text:span></text:p>
              <text:p text:style-name="P9"><text:span text:style-name="T1">usb_service.</text:span><text:span text:style-name="T1">USBObserve</text:span><text:span text:style-name="T1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" draw:text-style-name="P11" draw:layer="layout" svg:width="5.448cm" svg:height="0.366cm" svg:x="3.172cm" svg:y="14.855cm">
              <text:p text:style-name="P12"><text:span text:style-name="T3">-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11" draw:layer="layout" svg:width="5.448cm" svg:height="0.666cm" svg:x="3.172cm" svg:y="15.22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11" draw:id="id1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50" draw:text-style-name="P10" draw:layer="layout" svg:width="5.448cm" svg:height="1.153cm" svg:x="10.255cm" svg:y="13.47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&lt;&lt;singleton&gt;&gt;</text:span></text:p>
              <text:p text:style-name="P9"><text:span text:style-name="T1">usb_service.USBMoni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1" draw:layer="layout" svg:width="5.448cm" svg:height="0.434cm" svg:x="10.255cm" svg:y="14.6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11" draw:layer="layout" svg:width="5.448cm" svg:height="0.79cm" svg:x="10.255cm" svg:y="15.06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53" draw:text-style-name="P14" draw:layer="layout" svg:x1="15.702cm" svg:y1="15.308cm" svg:x2="19.048cm" svg:y2="16.143cm" draw:start-shape="id11" draw:start-glue-point="12" draw:end-shape="id12" draw:end-glue-point="11" svg:d="M15702 15308h1673v835h1673" svg:viewBox="0 0 3347 836">
          <text:p/>
        </draw:connector>
        <draw:g draw:style-name="gr3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54" draw:text-style-name="P10" draw:layer="layout" svg:width="6.718cm" svg:height="1.153cm" svg:x="19.047cm" svg:y="14.50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&lt;&lt;class&gt;&gt;</text:span></text:p>
              <text:p text:style-name="P9"><text:span text:style-name="T1">PatternMatchingEventHandl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11" draw:layer="layout" svg:width="6.718cm" svg:height="0.366cm" svg:x="19.047cm" svg:y="15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11" draw:layer="layout" svg:width="6.718cm" svg:height="0.667cm" svg:x="19.047cm" svg:y="16.0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57" draw:text-style-name="P14" draw:layer="layout" svg:x1="14.19cm" svg:y1="13.475cm" svg:x2="11.817cm" svg:y2="11.109cm" draw:start-shape="id11" draw:start-glue-point="14" draw:end-shape="id9" draw:end-glue-point="9" svg:d="M14190 13475v-1184h-2373v-1182" svg:viewBox="0 0 2374 2367">
          <text:p/>
        </draw:connector>
        <draw:connector draw:style-name="gr58" draw:text-style-name="P14" draw:layer="layout" svg:x1="8.318cm" svg:y1="13.702cm" svg:x2="9.539cm" svg:y2="11.109cm" draw:start-shape="id13" draw:start-glue-point="15" draw:end-shape="id9" draw:end-glue-point="8" svg:d="M8318 13702v-1297h1221v-1296" svg:viewBox="0 0 1222 2594">
          <text:p/>
        </draw:connector>
      </draw:page>
      <draw:page draw:name="Volume" draw:style-name="dp1" draw:master-page-name="Default">
        <draw:custom-shape draw:style-name="gr1" draw:text-style-name="P2" draw:layer="layout" svg:width="26.507cm" svg:height="0.7cm" svg:x="1.482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037cm" svg:height="0.7cm" svg:x="1.633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5" draw:id="id15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59" draw:text-style-name="P4" draw:layer="layout" svg:width="26.125cm" svg:height="1.153cm" svg:x="1.629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6" draw:layer="layout" svg:width="26.125cm" svg:height="0.679cm" svg:x="1.629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2" draw:layer="layout" svg:width="26.359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5.535cm" svg:y="6.625cm">
          <draw:text-box>
            <text:p><text:span text:style-name="T2">&lt;&lt;creates&gt;&gt;</text:span></text:p>
          </draw:text-box>
        </draw:frame>
        <draw:custom-shape draw:style-name="gr8" draw:text-style-name="P8" draw:layer="layout" svg:width="27.305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4" draw:id="id1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61" draw:text-style-name="P10" draw:layer="layout" svg:width="7.721cm" svg:height="1.153cm" svg:x="3.756cm" svg:y="8.22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volume_control.VolumeControl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2" draw:text-style-name="P11" draw:layer="layout" svg:width="7.721cm" svg:height="0.761cm" svg:x="3.756cm" svg:y="9.378cm">
              <text:p text:style-name="P12"><text:span text:style-name="T3">- command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3" draw:text-style-name="P11" draw:layer="layout" svg:width="7.721cm" svg:height="0.993cm" svg:x="3.756cm" svg:y="10.13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3"><text:span text:style-name="T3">+ __init__(queue: Queue)</text:span></text:p>
              <text:p text:style-name="P13"><text:span text:style-name="T3">+ set_notify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64" draw:text-style-name="P14" draw:layer="layout" draw:line-skew="0.485cm" svg:x1="5.902cm" svg:y1="8.226cm" svg:x2="4.592cm" svg:y2="5.27cm" draw:start-shape="id14" draw:start-glue-point="5" draw:end-shape="id15" draw:end-glue-point="16" svg:d="M5902 8226v-994h-1310v-1962" svg:viewBox="0 0 1311 2957">
          <text:p/>
        </draw:connector>
        <draw:custom-shape draw:style-name="gr23" draw:text-style-name="P15" draw:layer="layout" svg:width="27.305cm" svg:height="0.952cm" svg:x="1cm" svg:y="1.1cm">
          <text:p text:style-name="P1">Static view: Volum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6" draw:id="id1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65" draw:text-style-name="P10" draw:layer="layout" svg:width="8.572cm" svg:height="1.153cm" svg:x="10.417cm" svg:y="12.7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i2c_service.I2C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6" draw:text-style-name="P11" draw:layer="layout" svg:width="8.572cm" svg:height="0.761cm" svg:x="10.417cm" svg:y="13.883cm">
              <text:p text:style-name="P12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7" draw:text-style-name="P11" draw:layer="layout" svg:width="8.572cm" svg:height="1.781cm" svg:x="10.417cm" svg:y="14.6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3"><text:span text:style-name="T3">+ read_byte(device: int, register: int)</text:span></text:p>
              <text:p text:style-name="P13"><text:span text:style-name="T3">+ write_byte(device: int, register: int)</text:span></text:p>
              <text:p text:style-name="P13"><text:span text:style-name="T4">+ </text:span><text:span text:style-name="T5">read_block</text:span><text:span text:style-name="T4">(</text:span><text:span text:style-name="T4">device: int, register: int, length: int)</text:span></text:p>
              <text:p text:style-name="P13"><text:span text:style-name="T4">+ write</text:span><text:span text:style-name="T5">_block</text:span><text:span text:style-name="T4">(</text:span><text:span text:style-name="T4">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68" draw:text-style-name="P14" draw:layer="layout" svg:x1="16.608cm" svg:y1="12.731cm" svg:x2="11.476cm" svg:y2="8.861cm" draw:start-shape="id16" draw:start-glue-point="14" draw:end-shape="id14" draw:end-glue-point="13" svg:d="M16608 12731v-3870h-5132" svg:viewBox="0 0 5133 3871">
          <text:p/>
        </draw:connector>
      </draw:page>
      <draw:page draw:name="Power Supply" draw:style-name="dp1" draw:master-page-name="Default">
        <draw:custom-shape draw:style-name="gr1" draw:text-style-name="P2" draw:layer="layout" svg:width="26.507cm" svg:height="0.7cm" svg:x="1.482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037cm" svg:height="0.7cm" svg:x="1.633cm" svg:y="5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8" draw:id="id18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69" draw:text-style-name="P4" draw:layer="layout" svg:width="26.125cm" svg:height="1.153cm" svg:x="1.629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6" draw:layer="layout" svg:width="26.125cm" svg:height="0.679cm" svg:x="1.629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2" draw:layer="layout" svg:width="26.359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085cm" svg:height="0.725cm" svg:x="6.805cm" svg:y="6.397cm">
          <draw:text-box>
            <text:p><text:span text:style-name="T2">&lt;&lt;creates&gt;&gt;</text:span></text:p>
          </draw:text-box>
        </draw:frame>
        <draw:custom-shape draw:style-name="gr8" draw:text-style-name="P8" draw:layer="layout" svg:width="27.305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7" draw:id="id1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71" draw:text-style-name="P10" draw:layer="layout" svg:width="10.579cm" svg:height="1.153cm" svg:x="3.756cm" svg:y="7.9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power_supply_control.PowerSupplyService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2" draw:text-style-name="P11" draw:layer="layout" svg:width="10.579cm" svg:height="0.604cm" svg:x="3.756cm" svg:y="9.141cm">
              <text:p text:style-name="P12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11" draw:layer="layout" svg:width="10.579cm" svg:height="1.781cm" svg:x="3.756cm" svg:y="9.74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3"><text:span text:style-name="T3">+ </text:span><text:span text:style-name="T3">set_nom_voltag</text:span><text:span text:style-name="T3">e()</text:span></text:p>
              <text:p text:style-name="P13"><text:span text:style-name="T3">+ </text:span><text:span text:style-name="T3">set_max_voltag</text:span><text:span text:style-name="T3">e()</text:span></text:p>
              <text:p text:style-name="P13"><text:span text:style-name="T3">+ </text:span><text:span text:style-name="T3">set_standby_volt</text:span><text:span text:style-name="T3">age()</text:span></text:p>
              <text:p text:style-name="P13"><text:span text:style-name="T3">+ read_statu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74" draw:text-style-name="P14" draw:layer="layout" draw:line-skew="0.485cm" svg:x1="6.697cm" svg:y1="7.989cm" svg:x2="4.592cm" svg:y2="5.27cm" draw:start-shape="id17" draw:start-glue-point="5" draw:end-shape="id18" draw:end-glue-point="16" svg:d="M6697 7989v-876h-2105v-1843" svg:viewBox="0 0 2106 2720">
          <text:p/>
        </draw:connector>
        <draw:custom-shape draw:style-name="gr23" draw:text-style-name="P15" draw:layer="layout" svg:width="27.305cm" svg:height="0.952cm" svg:x="1cm" svg:y="1.1cm">
          <text:p text:style-name="P1">Static view: Power Supply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9" draw:id="id1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75" draw:text-style-name="P10" draw:layer="layout" svg:width="8.572cm" svg:height="1.153cm" svg:x="16.24cm" svg:y="12.11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&lt;&lt;singleton&gt;&gt;</text:span></text:p>
              <text:p text:style-name="P9"><text:span text:style-name="T1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6" draw:text-style-name="P11" draw:layer="layout" svg:width="8.572cm" svg:height="0.761cm" svg:x="16.24cm" svg:y="13.2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7" draw:text-style-name="P11" draw:layer="layout" svg:width="8.572cm" svg:height="1.781cm" svg:x="16.24cm" svg:y="14.02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3"><text:span text:style-name="T3">+</text:span><text:span text:style-name="T3"> </text:span><text:span text:style-name="T3">r</text:span><text:span text:style-name="T3">e</text:span><text:span text:style-name="T3">a</text:span><text:span text:style-name="T3">d</text:span><text:span text:style-name="T3">_</text:span><text:span text:style-name="T3">b</text:span><text:span text:style-name="T3">y</text:span><text:span text:style-name="T3">t</text:span><text:span text:style-name="T3">e</text:span><text:span text:style-name="T3">(</text:span><text:span text:style-name="T3">d</text:span><text:span text:style-name="T3">e</text:span><text:span text:style-name="T3">v</text:span><text:span text:style-name="T3">i</text:span><text:span text:style-name="T3">c</text:span><text:span text:style-name="T3">e</text:span><text:span text:style-name="T3">:</text:span><text:span text:style-name="T3"> </text:span><text:span text:style-name="T3">i</text:span><text:span text:style-name="T3">n</text:span><text:span text:style-name="T3">t</text:span><text:span text:style-name="T3">,</text:span><text:span text:style-name="T3"> </text:span><text:span text:style-name="T3">r</text:span><text:span text:style-name="T3">e</text:span><text:span text:style-name="T3">g</text:span><text:span text:style-name="T3">i</text:span><text:span text:style-name="T3">s</text:span><text:span text:style-name="T3">t</text:span><text:span text:style-name="T3">e</text:span><text:span text:style-name="T3">r</text:span><text:span text:style-name="T3">:</text:span><text:span text:style-name="T3"> </text:span><text:span text:style-name="T3">i</text:span><text:span text:style-name="T3">n</text:span><text:span text:style-name="T3">t</text:span><text:span text:style-name="T3">)</text:span></text:p>
              <text:p text:style-name="P13"><text:span text:style-name="T3">+</text:span><text:span text:style-name="T3"> </text:span><text:span text:style-name="T3">w</text:span><text:span text:style-name="T3">r</text:span><text:span text:style-name="T3">i</text:span><text:span text:style-name="T3">t</text:span><text:span text:style-name="T3">e</text:span><text:span text:style-name="T3">_</text:span><text:span text:style-name="T3">b</text:span><text:span text:style-name="T3">y</text:span><text:span text:style-name="T3">t</text:span><text:span text:style-name="T3">e</text:span><text:span text:style-name="T3">(</text:span><text:span text:style-name="T3">d</text:span><text:span text:style-name="T3">e</text:span><text:span text:style-name="T3">v</text:span><text:span text:style-name="T3">i</text:span><text:span text:style-name="T3">c</text:span><text:span text:style-name="T3">e</text:span><text:span text:style-name="T3">:</text:span><text:span text:style-name="T3"> </text:span><text:span text:style-name="T3">i</text:span><text:span text:style-name="T3">n</text:span><text:span text:style-name="T3">t</text:span><text:span text:style-name="T3">,</text:span><text:span text:style-name="T3"> </text:span><text:span text:style-name="T3">r</text:span><text:span text:style-name="T3">e</text:span><text:span text:style-name="T3">g</text:span><text:span text:style-name="T3">i</text:span><text:span text:style-name="T3">s</text:span><text:span text:style-name="T3">t</text:span><text:span text:style-name="T3">e</text:span><text:span text:style-name="T3">r</text:span><text:span text:style-name="T3">:</text:span><text:span text:style-name="T3"> </text:span><text:span text:style-name="T3">i</text:span><text:span text:style-name="T3">n</text:span><text:span text:style-name="T3">t</text:span><text:span text:style-name="T3">)</text:span></text:p>
              <text:p text:style-name="P13"><text:span text:style-name="T4">+</text:span><text:span text:style-name="T4"> </text:span><text:span text:style-name="T5">r</text:span><text:span text:style-name="T5">e</text:span><text:span text:style-name="T5">a</text:span><text:span text:style-name="T5">d</text:span><text:span text:style-name="T5">_</text:span><text:span text:style-name="T5">b</text:span><text:span text:style-name="T5">l</text:span><text:span text:style-name="T5">o</text:span><text:span text:style-name="T5">c</text:span><text:span text:style-name="T5">k</text:span><text:span text:style-name="T4">(</text:span><text:span text:style-name="T4">d</text:span><text:span text:style-name="T4">e</text:span><text:span text:style-name="T4">v</text:span><text:span text:style-name="T4">i</text:span><text:span text:style-name="T4">c</text:span><text:span text:style-name="T4">e</text:span><text:span text:style-name="T4">:</text:span><text:span text:style-name="T4"> </text:span><text:span text:style-name="T4">i</text:span><text:span text:style-name="T4">n</text:span><text:span text:style-name="T4">t</text:span><text:span text:style-name="T4">,</text:span><text:span text:style-name="T4"> </text:span><text:span text:style-name="T4">r</text:span><text:span text:style-name="T4">e</text:span><text:span text:style-name="T4">g</text:span><text:span text:style-name="T4">i</text:span><text:span text:style-name="T4">s</text:span><text:span text:style-name="T4">t</text:span><text:span text:style-name="T4">e</text:span><text:span text:style-name="T4">r</text:span><text:span text:style-name="T4">:</text:span><text:span text:style-name="T4"> </text:span><text:span text:style-name="T4">i</text:span><text:span text:style-name="T4">n</text:span><text:span text:style-name="T4">t</text:span><text:span text:style-name="T4">,</text:span><text:span text:style-name="T4"> </text:span><text:span text:style-name="T4">l</text:span><text:span text:style-name="T4">e</text:span><text:span text:style-name="T4">n</text:span><text:span text:style-name="T4">g</text:span><text:span text:style-name="T4">t</text:span><text:span text:style-name="T4">h</text:span><text:span text:style-name="T4">:</text:span><text:span text:style-name="T4"> </text:span><text:span text:style-name="T4">i</text:span><text:span text:style-name="T4">n</text:span><text:span text:style-name="T4">t</text:span><text:span text:style-name="T4">)</text:span></text:p>
              <text:p text:style-name="P13"><text:span text:style-name="T4">+</text:span><text:span text:style-name="T4"> </text:span><text:span text:style-name="T4">w</text:span><text:span text:style-name="T4">r</text:span><text:span text:style-name="T4">i</text:span><text:span text:style-name="T4">t</text:span><text:span text:style-name="T4">e</text:span><text:span text:style-name="T5">_</text:span><text:span text:style-name="T5">b</text:span><text:span text:style-name="T5">l</text:span><text:span text:style-name="T5">o</text:span><text:span text:style-name="T5">c</text:span><text:span text:style-name="T5">k</text:span><text:span text:style-name="T4">(</text:span><text:span text:style-name="T4">d</text:span><text:span text:style-name="T4">e</text:span><text:span text:style-name="T4">v</text:span><text:span text:style-name="T4">i</text:span><text:span text:style-name="T4">c</text:span><text:span text:style-name="T4">e</text:span><text:span text:style-name="T4">:</text:span><text:span text:style-name="T4"> </text:span><text:span text:style-name="T4">i</text:span><text:span text:style-name="T4">n</text:span><text:span text:style-name="T4">t</text:span><text:span text:style-name="T4">,</text:span><text:span text:style-name="T4"> </text:span><text:span text:style-name="T4">r</text:span><text:span text:style-name="T4">e</text:span><text:span text:style-name="T4">g</text:span><text:span text:style-name="T4">i</text:span><text:span text:style-name="T4">s</text:span><text:span text:style-name="T4">t</text:span><text:span text:style-name="T4">e</text:span><text:span text:style-name="T4">r</text:span><text:span text:style-name="T4">:</text:span><text:span text:style-name="T4"> </text:span><text:span text:style-name="T4">i</text:span><text:span text:style-name="T4">n</text:span><text:span text:style-name="T4">t</text:span><text:span text:style-name="T4">,</text:span><text:span text:style-name="T4"> </text:span><text:span text:style-name="T4">l</text:span><text:span text:style-name="T4">e</text:span><text:span text:style-name="T4">n</text:span><text:span text:style-name="T4">g</text:span><text:span text:style-name="T4">t</text:span><text:span text:style-name="T4">h</text:span><text:span text:style-name="T4">:</text:span><text:span text:style-name="T4"> </text:span><text:span text:style-name="T4">i</text:span><text:span text:style-name="T4">n</text:span><text:span text:style-name="T4">t</text:span><text:span text:style-name="T4">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78" draw:text-style-name="P14" draw:layer="layout" svg:x1="18.624cm" svg:y1="12.113cm" svg:x2="14.335cm" svg:y2="9.757cm" draw:start-shape="id19" draw:start-glue-point="5" draw:end-shape="id17" draw:end-glue-point="1" svg:d="M18624 12113v-2356h-4289" svg:viewBox="0 0 4290 2357">
          <text:p/>
        </draw:connector>
      </draw:page>
      <draw:page draw:name="Frontpanel_interface" draw:style-name="dp1" draw:master-page-name="Default">
        <draw:custom-shape draw:style-name="gr79" draw:text-style-name="P2" draw:layer="layout" svg:width="25.142cm" svg:height="0.7cm" svg:x="1.258cm" svg:y="2.5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" draw:layer="layout" svg:width="25.099cm" svg:height="0.7cm" svg:x="1.301cm" svg:y="5.8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0" draw:id="id20">
          <draw:glue-point draw:id="4" svg:x="-0.787cm" svg:y="5.055cm"/>
          <draw:custom-shape draw:style-name="gr81" draw:text-style-name="P10" draw:layer="layout" svg:width="5.08cm" svg:height="1.153cm" svg:x="1.717cm" svg:y="7.75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led_control.LEDControl</text:span></text:p>
            <text:p text:style-name="P9"><text:span text:style-name="T1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1" draw:layer="layout" svg:width="5.08cm" svg:height="0.671cm" svg:x="1.717cm" svg:y="8.9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1" draw:layer="layout" svg:width="5.08cm" svg:height="2.963cm" svg:x="1.717cm" svg:y="9.5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3"><text:span text:style-name="T3">+ turn_on_led()</text:span></text:p>
            <text:p text:style-name="P13"><text:span text:style-name="T3">+ turn_off_led()</text:span></text:p>
            <text:p text:style-name="P13"><text:span text:style-name="T3">+ turn_off_all_leds()</text:span></text:p>
            <text:p text:style-name="P13"><text:span text:style-name="T3">+ turn_off_all_leds()</text:span></text:p>
            <text:p text:style-name="P13"><text:span text:style-name="T3">+ get_led_state()l</text:span></text:p>
            <text:p text:style-name="P13"><text:span text:style-name="T3">+ oneshot_on_led()</text:span></text:p>
            <text:p text:style-name="P13"><text:span text:style-name="T3">+ control_blinking_led(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21" draw:id="id2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1.594cm" svg:y="4.863cm"/>
          <draw:glue-point draw:id="41" svg:x="-2.071cm" svg:y="4.863cm"/>
          <draw:glue-point draw:id="42" svg:x="-1.833cm" svg:y="4.863cm"/>
          <draw:custom-shape draw:style-name="gr84" draw:text-style-name="P4" draw:layer="layout" svg:width="25.013cm" svg:height="1.153cm" svg:x="1.387cm" svg:y="3.6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6" draw:layer="layout" svg:width="25.013cm" svg:height="0.679cm" svg:x="1.387cm" svg:y="4.7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6" draw:text-style-name="P19" draw:layer="layout" svg:width="25.299cm" svg:height="0.7cm" svg:x="1.101cm" svg:y="16.047cm">
          <text:p text:style-name="P18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7" draw:text-style-name="P14" draw:layer="layout" draw:line-skew="0.418cm" svg:x1="4.257cm" svg:y1="7.759cm" svg:x2="3.794cm" svg:y2="5.47cm" draw:start-shape="id20" draw:end-shape="id21" draw:end-glue-point="16" svg:d="M4257 7759v-727h-463v-1562" svg:viewBox="0 0 464 2290">
          <text:p/>
        </draw:connector>
        <draw:custom-shape draw:style-name="gr88" draw:text-style-name="P8" draw:layer="layout" svg:width="25.717cm" svg:height="17.7cm" svg:x="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2" draw:id="id2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89" draw:text-style-name="P10" draw:layer="layout" svg:width="5.917cm" svg:height="1.153cm" svg:x="7.385cm" svg:y="7.78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touch_buttons.TouchButtons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0" draw:text-style-name="P11" draw:layer="layout" svg:width="5.917cm" svg:height="0.761cm" svg:x="7.385cm" svg:y="8.938cm">
              <text:p text:style-name="P12"><text:span text:style-name="T3">- shared_queue: 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11" draw:layer="layout" svg:width="5.917cm" svg:height="0.599cm" svg:x="7.385cm" svg:y="9.69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3"><text:span text:style-name="T3">+ __init__(queue: Queu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23" draw:id="id2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92" draw:text-style-name="P10" draw:layer="layout" svg:width="6.37cm" svg:height="1.153cm" svg:x="14.565cm" svg:y="7.70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backlighting.BackLighting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3" draw:text-style-name="P11" draw:layer="layout" svg:width="6.37cm" svg:height="0.761cm" svg:x="14.565cm" svg:y="8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4" draw:text-style-name="P11" draw:layer="layout" svg:width="6.37cm" svg:height="0.803cm" svg:x="14.565cm" svg:y="9.61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95" draw:text-style-name="P14" draw:layer="layout" draw:line-skew="0.405cm" svg:x1="9.03cm" svg:y1="7.786cm" svg:x2="9.509cm" svg:y2="5.47cm" draw:start-shape="id22" draw:start-glue-point="5" draw:end-shape="id21" draw:end-glue-point="18" svg:d="M9030 7786v-754h479v-1562" svg:viewBox="0 0 480 2317">
          <text:p/>
        </draw:connector>
        <draw:connector draw:style-name="gr96" draw:text-style-name="P14" draw:layer="layout" draw:line-skew="0.447cm" svg:x1="16.336cm" svg:y1="7.703cm" svg:x2="21.259cm" svg:y2="5.47cm" draw:start-shape="id23" draw:start-glue-point="5" draw:end-shape="id21" draw:end-glue-point="5" svg:d="M16336 7703v-671h4923v-1562" svg:viewBox="0 0 4924 2234">
          <text:p/>
        </draw:connector>
        <draw:frame draw:style-name="gr7" draw:text-style-name="P7" draw:layer="layout" svg:width="3.147cm" svg:height="0.725cm" svg:x="5.155cm" svg:y="6.715cm">
          <draw:text-box>
            <text:p><text:span text:style-name="T2">&lt;&lt;creates&gt;&gt;</text:span></text:p>
          </draw:text-box>
        </draw:frame>
        <draw:custom-shape draw:style-name="gr97" draw:text-style-name="P15" draw:layer="layout" svg:width="25.717cm" svg:height="1.27cm" svg:x="1cm" svg:y="1cm">
          <text:p text:style-name="P1">static view: Front-panel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7" draw:id="id2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98" draw:text-style-name="P10" draw:layer="layout" svg:width="8.572cm" svg:height="1.153cm" svg:x="17.185cm" svg:y="11.16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&lt;&lt;singleton&gt;&gt;</text:span></text:p>
              <text:p text:style-name="P9"><text:span text:style-name="T1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9" draw:text-style-name="P11" draw:layer="layout" svg:width="8.572cm" svg:height="0.578cm" svg:x="17.185cm" svg:y="12.3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0" draw:text-style-name="P11" draw:layer="layout" svg:width="8.572cm" svg:height="1.781cm" svg:x="17.185cm" svg:y="12.89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3"><text:span text:style-name="T3">+ read_byte(device: int, register: int)</text:span></text:p>
              <text:p text:style-name="P13"><text:span text:style-name="T3">+ write_byte(device: int, register: int)</text:span></text:p>
              <text:p text:style-name="P13"><text:span text:style-name="T4">+ </text:span><text:span text:style-name="T5">read_block</text:span><text:span text:style-name="T4">(</text:span><text:span text:style-name="T4">device: int, register: int, length: int)</text:span></text:p>
              <text:p text:style-name="P13"><text:span text:style-name="T4">+ write</text:span><text:span text:style-name="T5">_block</text:span><text:span text:style-name="T4">(</text:span><text:span text:style-name="T4">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25" draw:id="id2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01" draw:text-style-name="P10" draw:layer="layout" svg:width="5.397cm" svg:height="1.153cm" svg:x="10.202cm" svg:y="17.1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l</text:span><text:span text:style-name="T1">i</text:span><text:span text:style-name="T1">g</text:span><text:span text:style-name="T1">h</text:span><text:span text:style-name="T1">t</text:span><text:span text:style-name="T1">_</text:span><text:span text:style-name="T1">s</text:span><text:span text:style-name="T1">e</text:span><text:span text:style-name="T1">n</text:span><text:span text:style-name="T1">s</text:span><text:span text:style-name="T1">o</text:span><text:span text:style-name="T1">r</text:span></text:p>
              <text:p text:style-name="P9"><text:span text:style-name="T1">&lt;</text:span><text:span text:style-name="T1">&lt;</text:span><text:span text:style-name="T1">d</text:span><text:span text:style-name="T1">e</text:span><text:span text:style-name="T1">v</text:span><text:span text:style-name="T1">i</text:span><text:span text:style-name="T1">c</text:span><text:span text:style-name="T1">e</text:span><text:span text:style-name="T1">&gt;</text:span><text:span text:style-name="T1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2" draw:text-style-name="P11" draw:layer="layout" svg:width="5.397cm" svg:height="0.56cm" svg:x="10.202cm" svg:y="18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3" draw:text-style-name="P11" draw:layer="layout" svg:width="5.397cm" svg:height="0.591cm" svg:x="10.202cm" svg:y="18.90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24" draw:id="id2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04" draw:text-style-name="P10" draw:layer="layout" svg:width="5.397cm" svg:height="1.153cm" svg:x="16.49cm" svg:y="17.06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backlight_dac</text:span></text:p>
              <text:p text:style-name="P9"><text:span text:style-name="T1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11" draw:layer="layout" svg:width="5.397cm" svg:height="0.632cm" svg:x="16.49cm" svg:y="18.2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6" draw:text-style-name="P11" draw:layer="layout" svg:width="5.397cm" svg:height="0.667cm" svg:x="16.49cm" svg:y="18.84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26" draw:id="id2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107" draw:text-style-name="P21" draw:layer="layout" svg:width="6.203cm" svg:height="1.153cm" svg:x="7.032cm" svg:y="12.91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0"><text:span text:style-name="T1">&lt;&lt;singleton&gt;&gt;</text:span></text:p>
            <text:p text:style-name="P20"><text:span text:style-name="T1">gpio_service.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23" draw:layer="layout" svg:width="6.203cm" svg:height="0.666cm" svg:x="7.032cm" svg:y="14.07cm">
            <text:p text:style-name="P2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11" draw:layer="layout" svg:width="6.203cm" svg:height="0.599cm" svg:x="7.032cm" svg:y="14.73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2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10" draw:text-style-name="P14" draw:layer="layout" svg:x1="16.791cm" svg:y1="17.064cm" svg:x2="16.336cm" svg:y2="10.419cm" draw:start-shape="id24" draw:start-glue-point="4" draw:end-shape="id23" draw:end-glue-point="8" svg:d="M16791 17064v-3324h-455v-3321" svg:viewBox="0 0 456 6646">
          <text:p/>
        </draw:connector>
        <draw:connector draw:style-name="gr111" draw:text-style-name="P14" draw:layer="layout" svg:x1="14.099cm" svg:y1="17.194cm" svg:x2="14.921cm" svg:y2="10.419cm" draw:start-shape="id25" draw:start-glue-point="14" draw:end-shape="id23" draw:end-glue-point="7" svg:d="M14099 17194v-3389h822v-3386" svg:viewBox="0 0 823 6776">
          <text:p/>
        </draw:connector>
        <draw:connector draw:style-name="gr112" draw:text-style-name="P14" draw:layer="layout" svg:x1="12.89cm" svg:y1="12.918cm" svg:x2="11.658cm" svg:y2="10.298cm" draw:start-shape="id26" draw:start-glue-point="15" draw:end-shape="id22" draw:end-glue-point="9" svg:d="M12890 12918v-1311h-1232v-1309" svg:viewBox="0 0 1233 2621">
          <text:p/>
        </draw:connector>
        <draw:connector draw:style-name="gr113" draw:text-style-name="P14" draw:layer="layout" svg:x1="7.033cm" svg:y1="14.791cm" svg:x2="4.257cm" svg:y2="12.546cm" draw:start-shape="id26" draw:start-glue-point="11" draw:end-shape="id20" svg:d="M7033 14791h-2776v-2245" svg:viewBox="0 0 2777 2246">
          <text:p/>
        </draw:connector>
        <draw:connector draw:style-name="gr114" draw:text-style-name="P14" draw:layer="layout" svg:x1="25.282cm" svg:y1="11.169cm" svg:x2="20.934cm" svg:y2="8.338cm" draw:start-shape="id27" draw:start-glue-point="15" draw:end-shape="id23" draw:end-glue-point="13" svg:d="M25282 11169v-2831h-4348" svg:viewBox="0 0 4349 2832">
          <text:p/>
        </draw:connector>
      </draw:page>
      <draw:page draw:name="music_players" draw:style-name="dp1" draw:master-page-name="Default">
        <draw:custom-shape draw:style-name="gr115" draw:text-style-name="P2" draw:layer="layout" svg:width="23.177cm" svg:height="0.7cm" svg:x="1cm" svg:y="2.1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2" draw:layer="layout" svg:width="23.004cm" svg:height="0.7cm" svg:x="1.222cm" svg:y="5.5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9" draw:id="id29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custom-shape draw:style-name="gr117" draw:text-style-name="P4" draw:layer="layout" svg:width="22.63cm" svg:height="1.153cm" svg:x="1.392cm" svg:y="3.3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6" draw:layer="layout" svg:width="22.63cm" svg:height="0.679cm" svg:x="1.392cm" svg:y="4.4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9" draw:text-style-name="P2" draw:layer="layout" svg:width="23.253cm" svg:height="0.7cm" svg:x="0.854cm" svg:y="13.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8" draw:layer="layout" svg:width="23.995cm" svg:height="13.587cm" svg:x="0.5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28" draw:id="id2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21" draw:text-style-name="P10" draw:layer="layout" svg:width="5.397cm" svg:height="1.153cm" svg:x="8.755cm" svg:y="8.51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mpd_monitor.MPDMonitor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2" draw:text-style-name="P11" draw:layer="layout" svg:width="5.397cm" svg:height="0.865cm" svg:x="8.755cm" svg:y="9.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3" draw:text-style-name="P11" draw:layer="layout" svg:width="5.397cm" svg:height="0.912cm" svg:x="8.755cm" svg:y="10.53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30" draw:id="id3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3">
            <draw:custom-shape draw:style-name="gr124" draw:text-style-name="P10" draw:layer="layout" svg:width="5.397cm" svg:height="1.153cm" svg:x="2.64cm" svg:y="8.42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mpd_control.MPDControl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11" draw:layer="layout" svg:width="5.397cm" svg:height="0.761cm" svg:x="2.64cm" svg:y="9.5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6" draw:text-style-name="P11" draw:layer="layout" svg:width="5.397cm" svg:height="2.569cm" svg:x="2.64cm" svg:y="10.33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3"><text:span text:style-name="T3">+ update-database()</text:span></text:p>
              <text:p text:style-name="P13"><text:span text:style-name="T3">+ is_web_radio()</text:span></text:p>
              <text:p text:style-name="P13"><text:span text:style-name="T3">+ next()</text:span></text:p>
              <text:p text:style-name="P13"><text:span text:style-name="T3">+ play()</text:span></text:p>
              <text:p text:style-name="P13"><text:span text:style-name="T3">+ stop()</text:span></text:p>
              <text:p text:style-name="P13"><text:span text:style-name="T3">+ pau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3" xml:id="id31" draw:id="id3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0.009cm" svg:y="-4.346cm"/>
          <draw:glue-point draw:id="24" svg:x="3.714cm" svg:y="-5.101cm"/>
          <draw:g draw:style-name="gr3">
            <draw:custom-shape draw:style-name="gr127" draw:text-style-name="P10" draw:layer="layout" svg:width="6.552cm" svg:height="1.153cm" svg:x="15.285cm" svg:y="8.61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1">spotify_connect.SpotifyConnect</text:span></text:p>
              <text:p text:style-name="P9"><text:span text:style-name="T1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8" draw:text-style-name="P11" draw:layer="layout" svg:width="6.552cm" svg:height="0.761cm" svg:x="15.285cm" svg:y="9.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9" draw:text-style-name="P11" draw:layer="layout" svg:width="6.552cm" svg:height="1.387cm" svg:x="15.285cm" svg:y="10.53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3"><text:span text:style-name="T3">+ play()</text:span></text:p>
              <text:p text:style-name="P13"><text:span text:style-name="T3">+ pause()</text:span></text:p>
              <text:p text:style-name="P13"><text:span text:style-name="T3">+ get_stat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30" draw:text-style-name="P14" draw:layer="layout" svg:x1="10.255cm" svg:y1="8.518cm" svg:x2="7.937cm" svg:y2="5.126cm" draw:start-shape="id28" draw:start-glue-point="5" draw:end-shape="id29" draw:end-glue-point="40" svg:d="M10255 8518v-1675h-2318v-1717" svg:viewBox="0 0 2319 3393">
          <text:p/>
        </draw:connector>
        <draw:connector draw:style-name="gr131" draw:text-style-name="P14" draw:layer="layout" svg:x1="2.941cm" svg:y1="8.426cm" svg:x2="5.918cm" svg:y2="5.17cm" draw:start-shape="id30" draw:start-glue-point="4" draw:end-shape="id29" draw:end-glue-point="4" svg:d="M2941 8426v-1629h2977v-1627" svg:viewBox="0 0 2978 3257">
          <text:p/>
        </draw:connector>
        <draw:connector draw:style-name="gr132" draw:text-style-name="P14" draw:layer="layout" svg:x1="20.017cm" svg:y1="8.618cm" svg:x2="18.022cm" svg:y2="5.17cm" draw:start-shape="id31" draw:start-glue-point="14" draw:end-shape="id29" draw:end-glue-point="31" svg:d="M20017 8618v-1725h-1995v-1723" svg:viewBox="0 0 1996 3449">
          <text:p/>
        </draw:connector>
        <draw:custom-shape draw:style-name="gr133" draw:text-style-name="P15" draw:layer="layout" svg:width="23.995cm" svg:height="1.205cm" svg:x="0.5cm" svg:y="0.499cm">
          <text:p text:style-name="P1">Static View: Music Player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147cm" svg:height="0.725cm" svg:x="5.79cm" svg:y="7.032cm">
          <draw:text-box>
            <text:p><text:span text:style-name="T2">&lt;&lt;creates&gt;&gt;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omponent" svg:viewBox="0 0 338 419" svg:d="M1 86c1-2 2-3 4-4 1-1 2-1 4-1h55v-72c0-2 0-3 1-4 1-2 2-3 4-4 1-1 2-1 4-1h256c2 0 3 0 5 1 1 1 2 2 3 4 1 1 1 2 1 4v400c0 2 0 3-1 5-1 1-2 2-3 3-2 1-3 1-5 1h-252c-1 1-3 1-4 1-2 0-3 0-4-1-2-1-3-2-4-3-1-2-1-3-1-5v-1-70h-55c-2 0-3 0-4-1-2-1-3-2-4-3-1-2-1-3-1-5v-80c0-2 0-3 1-4 1-2 2-3 4-4 1-1 2-1 4-1h55v-63h-51c-1 1-3 1-4 1-2 0-3 0-4-1-2-1-3-2-4-3-1-2-1-3-1-5v-1-79c0-2 0-3 1-4zM137 81c2 0 3 0 5 1 1 1 2 2 3 4 1 1 1 2 1 4v79 1c0 2 0 3-1 5-1 1-2 2-3 3-2 1-3 1-5 1-1 0-3 0-4-1h-51v63h55c2 0 3 0 5 1 1 1 2 2 3 4 1 1 1 2 1 4v80c0 2 0 3-1 5-1 1-2 2-3 3-2 1-3 1-5 1h-55v61h238v-382h-238v63zM18 99v61h55 55v-61zM128 321v-62h-110v62h55z"/>
    <draw:marker draw:name="Navigation" svg:viewBox="0 0 786 1228" svg:d="M151 1228l-76-25-75-25 318-952 76-226 75 226 317 952-76 25-75 25-162-486v462h-80-79v-464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5-09T18:32:07.090582959</dc:date>
    <meta:editing-duration>PT8H31M25S</meta:editing-duration>
    <meta:editing-cycles>72</meta:editing-cycles>
    <meta:print-date>2026-04-03T16:45:26.431431754</meta:print-date>
    <dc:creator>Henk</dc:creator>
    <meta:document-statistic meta:object-count="205"/>
  </office:meta>
</office:document-meta>
</file>