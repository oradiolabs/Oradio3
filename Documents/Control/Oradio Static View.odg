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6.753cm" fo:padding-top="0.151cm" fo:padding-bottom="0.151cm" fo:padding-left="0.276cm" fo:padding-right="0.276cm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7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3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>
      <style:graphic-properties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45cm" fo:min-width="19.373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45cm" fo:min-width="19.202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9.445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0.403cm" fo:padding-top="0.151cm" fo:padding-bottom="0.151cm" fo:padding-left="0.276cm" fo:padding-right="0.276cm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1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403cm" fo:padding-top="0.151cm" fo:padding-bottom="0.151cm" fo:padding-left="0.276cm" fo:padding-right="0.276cm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1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8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9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45cm" fo:min-width="19.698cm" style:writing-mode="lr-tb" loext:decorative="false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0.45cm" fo:min-width="19.585cm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12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838cm" fo:min-width="20.403cm" fo:padding-top="0.151cm" fo:padding-bottom="0.151cm" fo:padding-left="0.276cm" fo:padding-right="0.276cm" loext:decorative="false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38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8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14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149" style:family="graphic" style:parent-style-name="standard">
      <style:graphic-properties draw:stroke="none" draw:fill="none" fo:min-height="3.793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6.1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6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0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181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7.148cm" fo:padding-top="0.151cm" fo:padding-bottom="0.151cm" fo:padding-left="0.276cm" fo:padding-right="0.276cm" loext:decorative="false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4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0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23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7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71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29" style:family="paragraph">
      <loext:graphic-properties draw:fill="none"/>
      <style:text-properties fo:font-size="12pt" style:font-size-asian="12pt" style:font-size-complex="12pt"/>
    </style:style>
    <style:style style:name="P30" style:family="paragraph">
      <style:paragraph-properties fo:text-align="start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color="#c9211e" loext:opacity="100%"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0.367cm" svg:y="7.03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" draw:id="id4">
          <draw:glue-point draw:id="4" svg:x="1.153cm" svg:y="-4.294cm"/>
          <draw:glue-point draw:id="5" svg:x="3.461cm" svg:y="-5.146cm"/>
          <draw:custom-shape draw:style-name="gr9" draw:text-style-name="P10" draw:layer="layout" svg:width="4.047cm" svg:height="1.153cm" svg:x="1.78cm" svg:y="8.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system_sounds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4.047cm" svg:height="0.761cm" svg:x="1.78cm" svg:y="9.703cm">
            <text:p text:style-name="P11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-3.94cm" svg:y="-4.644cm"/>
          <draw:glue-point draw:id="5" svg:x="4.311cm" svg:y="-5.137cm"/>
          <draw:glue-point draw:id="6" svg:x="3.601cm" svg:y="-5.137cm"/>
          <draw:custom-shape draw:style-name="gr11" draw:text-style-name="P10" draw:layer="layout" svg:width="4.465cm" svg:height="1.153cm" svg:x="7.917cm" svg:y="11.6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logging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4.465cm" svg:height="0.887cm" svg:x="7.917cm" svg:y="12.765cm">
            <text:p text:style-name="P11"><text:span text:style-name="T3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13" draw:layer="layout" svg:x1="23.284cm" svg:y1="7.929cm" svg:x2="21.449cm" svg:y2="5.27cm" draw:start-shape="id1" draw:end-shape="id2" draw:end-glue-point="7" svg:d="M23284 7929v-1330h-1835v-1329" svg:viewBox="0 0 1836 2660">
          <text:p/>
        </draw:connector>
        <draw:connector draw:style-name="gr14" draw:text-style-name="P13" draw:layer="layout" svg:x1="12.073cm" svg:y1="11.612cm" svg:x2="11.494cm" svg:y2="5.27cm" draw:start-shape="id3" draw:start-glue-point="5" draw:end-shape="id2" draw:end-glue-point="35" svg:d="M12073 11612v-3172h-579v-3170" svg:viewBox="0 0 580 6343">
          <text:p/>
        </draw:connector>
        <draw:connector draw:style-name="gr15" draw:text-style-name="P13" draw:layer="layout" svg:x1="4.269cm" svg:y1="8.686cm" svg:x2="5.111cm" svg:y2="5.27cm" draw:start-shape="id4" draw:start-glue-point="4" draw:end-shape="id2" draw:end-glue-point="17" svg:d="M4269 8686v-1777h842v-1639" svg:viewBox="0 0 843 3417">
          <text:p/>
        </draw:connector>
        <draw:custom-shape draw:style-name="gr16" draw:text-style-name="P14" draw:layer="layout" svg:width="27.305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" draw:id="id5">
          <draw:glue-point draw:id="4" svg:x="1.153cm" svg:y="-4.294cm"/>
          <draw:glue-point draw:id="5" svg:x="3.461cm" svg:y="-5.146cm"/>
          <draw:glue-point draw:id="6" svg:x="-3.33cm" svg:y="-4.948cm"/>
          <draw:custom-shape draw:style-name="gr17" draw:text-style-name="P10" draw:layer="controls" svg:width="4.047cm" svg:height="1.153cm" svg:x="6.492cm" svg:y="8.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error_service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controls" svg:width="4.047cm" svg:height="1.262cm" svg:x="6.492cm" svg:y="9.743cm">
            <text:p text:style-name="P11"><text:span text:style-name="T3">+ xxxx</text:span></text:p>
            <text:p text:style-name="P11"><text:span text:style-name="T3">+ xxxx</text:span></text:p>
            <text:p text:style-name="P1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3" draw:layer="controls" svg:x1="7.168cm" svg:y1="8.603cm" svg:x2="8.939cm" svg:y2="5.27cm" draw:start-shape="id5" draw:start-glue-point="6" draw:end-shape="id2" draw:end-glue-point="45" svg:d="M7168 8603v-1674h1771v-1659" svg:viewBox="0 0 1772 3334">
          <text:p/>
        </draw:connector>
        <draw:g draw:style-name="gr3" xml:id="id1" draw:id="id1">
          <draw:custom-shape draw:style-name="gr20" draw:text-style-name="P10" draw:layer="layout" svg:width="7.302cm" svg:height="1.153cm" svg:x="19.633cm" svg:y="7.92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throttled_monitor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7.302cm" svg:height="0.761cm" svg:x="19.633cm" svg:y="9.082cm">
            <text:p text:style-name="P15"><text:span text:style-name="T3">-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7.302cm" svg:height="0.599cm" svg:x="19.633cm" svg:y="9.8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6" draw:id="id6">
          <draw:glue-point draw:id="4" svg:x="-5.035cm" svg:y="-2.72cm"/>
          <draw:glue-point draw:id="5" svg:x="-0.912cm" svg:y="-1.099cm"/>
          <draw:glue-point draw:id="6" svg:x="-0.496cm" svg:y="-1.099cm"/>
          <draw:custom-shape draw:style-name="gr23" draw:text-style-name="P17" draw:layer="layout" svg:width="7.62cm" svg:height="1.153cm" svg:x="18.84cm" svg:y="12.1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1">throttled_monitor.RpiThrottlingMonitor</text:span></text:p>
            <text:p text:style-name="P16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7.62cm" svg:height="0.591cm" svg:x="18.84cm" svg:y="13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7.62cm" svg:height="2.175cm" svg:x="18.84cm" svg:y="13.9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- init()</text:span></text:p>
            <text:p text:style-name="P11"><text:span text:style-name="T3">+ start()</text:span></text:p>
            <text:p text:style-name="P11"><text:span text:style-name="T3">+ stop()</text:span></text:p>
            <text:p text:style-name="P11"><text:span text:style-name="T3">+ force_throttled()</text:span></text:p>
            <text:p text:style-name="P11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13" draw:layer="layout" svg:x1="22.65cm" svg:y1="12.172cm" svg:x2="23.284cm" svg:y2="10.442cm" draw:start-shape="id6" draw:end-shape="id1" svg:d="M22650 12172v-866h634v-864" svg:viewBox="0 0 635 1731">
          <text:p/>
        </draw:connector>
        <draw:frame draw:style-name="gr7" draw:text-style-name="P7" draw:layer="layout" svg:width="3.085cm" svg:height="0.725cm" svg:x="20.367cm" svg:y="10.84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g draw:style-name="gr27">
          <draw:polygon draw:style-name="gr28" draw:text-style-name="P19" draw:layer="layout" svg:width="5.199cm" svg:height="1.904cm" svg:x="1.832cm" svg:y="14.652cm" svg:viewBox="0 0 5200 1905" draw:points="5200,476 5200,1905 0,1905 0,0 4420,0">
            <text:p text:style-name="P18"><text:span text:style-name="T4">o</text:span><text:span text:style-name="T4">r</text:span><text:span text:style-name="T4">a</text:span><text:span text:style-name="T4">d</text:span><text:span text:style-name="T4">i</text:span><text:span text:style-name="T4">o</text:span><text:span text:style-name="T4">_</text:span><text:span text:style-name="T4">l</text:span><text:span text:style-name="T4">o</text:span><text:span text:style-name="T4">g</text:span><text:span text:style-name="T4">:</text:span></text:p>
            <text:p text:style-name="P18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e</text:span><text:span text:style-name="T4">t</text:span><text:span text:style-name="T4">a</text:span><text:span text:style-name="T4">i</text:span><text:span text:style-name="T4">l</text:span></text:p>
          </draw:polygon>
          <draw:path draw:style-name="gr29" draw:text-style-name="P19" draw:layer="layout" svg:width="0.651cm" svg:height="0.398cm" svg:x="6.316cm" svg:y="14.69cm" svg:viewBox="0 0 652 399" svg:d="M0 0c217 133 435 265 652 399-217 0-435 0-652 0 0-134 0-266 0-399z">
            <text:p/>
          </draw:path>
        </draw:g>
        <draw:frame draw:style-name="gr7" draw:text-style-name="P7" draw:layer="layout" svg:width="3.085cm" svg:height="0.725cm" svg:x="8.62cm" svg:y="7.26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onnector draw:style-name="gr30" draw:text-style-name="P13" draw:layer="layout" svg:x1="16.239cm" svg:y1="14.435cm" svg:x2="18.84cm" svg:y2="13.066cm" draw:start-shape="id7" draw:start-glue-point="4" draw:end-shape="id6" draw:end-glue-point="4" svg:d="M16239 14435v-1369h2601" svg:viewBox="0 0 2602 1370">
          <text:p/>
        </draw:connector>
        <draw:frame draw:style-name="gr7" draw:text-style-name="P7" draw:layer="layout" svg:width="3.085cm" svg:height="0.725cm" svg:x="15.06cm" svg:y="12.11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g draw:style-name="gr3" xml:id="id7" draw:id="id7">
          <draw:glue-point draw:id="4" svg:x="3.4cm" svg:y="-5.131cm"/>
          <draw:custom-shape draw:style-name="gr31" draw:text-style-name="P21" draw:layer="layout" svg:width="7.937cm" svg:height="1.153cm" svg:x="9.573cm" svg:y="14.4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2" draw:layer="layout" svg:width="7.937cm" svg:height="0.435cm" svg:x="9.573cm" svg:y="15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7.937cm" svg:height="0.599cm" svg:x="9.573cm" svg:y="15.9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Remote monitoring" draw:style-name="dp1" draw:master-page-name="Default">
        <draw:custom-shape draw:style-name="gr34" draw:text-style-name="P2" draw:layer="layout" svg:width="19.873cm" svg:height="0.7cm" svg:x="1.44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19.702cm" svg:height="0.7cm" svg:x="1.554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9" draw:id="id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36" draw:text-style-name="P4" draw:layer="layout" svg:width="19.769cm" svg:height="1.153cm" svg:x="1.551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19.769cm" svg:height="0.679cm" svg:x="1.551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8" draw:text-style-name="P2" draw:layer="layout" svg:width="19.945cm" svg:height="0.7cm" svg:x="1.3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4.582cm" svg:y="6.715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39" draw:text-style-name="P8" draw:layer="layout" svg:width="20.95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40" draw:text-style-name="P10" draw:layer="layout" svg:width="6.423cm" svg:height="1.153cm" svg:x="2.719cm" svg:y="7.5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RM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2" draw:layer="layout" svg:width="6.423cm" svg:height="0.76cm" svg:x="2.719cm" svg:y="8.671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2" draw:layer="layout" svg:width="6.423cm" svg:height="0.993cm" svg:x="2.719cm" svg:y="9.4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end_message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3" draw:text-style-name="P13" draw:layer="layout" draw:line-skew="0.345cm" svg:x1="7.357cm" svg:y1="7.519cm" svg:x2="5.505cm" svg:y2="5.27cm" draw:start-shape="id8" draw:start-glue-point="14" draw:end-shape="id9" draw:end-glue-point="4" svg:d="M7357 7519v-781h-1852v-1468" svg:viewBox="0 0 1853 2250">
          <text:p/>
        </draw:connector>
        <draw:custom-shape draw:style-name="gr44" draw:text-style-name="P14" draw:layer="layout" svg:width="20.955cm" svg:height="0.952cm" svg:x="1cm" svg:y="1.1cm">
          <text:p text:style-name="P1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45" draw:text-style-name="P10" draw:layer="layout" svg:width="6.237cm" svg:height="1.153cm" svg:x="14.013cm" svg:y="7.1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2" draw:layer="layout" svg:width="6.237cm" svg:height="0.67cm" svg:x="14.013cm" svg:y="8.255cm">
              <text:p text:style-name="P11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2" draw:layer="layout" svg:width="6.237cm" svg:height="2.569cm" svg:x="14.013cm" svg:y="8.92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8" draw:text-style-name="P13" draw:layer="layout" svg:x1="14.013cm" svg:y1="9.298cm" svg:x2="9.141cm" svg:y2="8.154cm" draw:start-shape="id10" draw:end-shape="id8" draw:end-glue-point="13" svg:d="M14013 9298h-2436v-1144h-2436" svg:viewBox="0 0 4873 1145">
          <text:p/>
        </draw:connector>
        <draw:frame draw:style-name="gr7" draw:text-style-name="P7" draw:layer="layout" svg:width="3.085cm" svg:height="0.725cm" svg:x="11.16cm" svg:y="7.26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g draw:style-name="gr3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49" draw:text-style-name="P10" draw:layer="layout" svg:width="6.423cm" svg:height="1.153cm" svg:x="2.905cm" svg:y="13.1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Heartbea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2" draw:layer="layout" svg:width="6.423cm" svg:height="0.761cm" svg:x="2.905cm" svg:y="14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2" draw:layer="layout" svg:width="6.423cm" svg:height="1.387cm" svg:x="2.905cm" svg:y="15.01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tart_heartbeat()</text:span></text:p>
              <text:p text:style-name="P11"><text:span text:style-name="T3">+ stop_heartbeat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52" draw:text-style-name="P10" draw:layer="layout" svg:width="6.423cm" svg:height="1.153cm" svg:x="11.107cm" svg:y="15.5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12" draw:layer="layout" svg:width="6.423cm" svg:height="0.761cm" svg:x="11.107cm" svg:y="16.708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12" draw:layer="layout" svg:width="6.423cm" svg:height="0.993cm" svg:x="11.107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5" draw:text-style-name="P13" draw:layer="layout" svg:x1="7.543cm" svg:y1="13.105cm" svg:x2="4.505cm" svg:y2="10.424cm" draw:start-shape="id11" draw:start-glue-point="14" draw:end-shape="id8" draw:end-glue-point="8" svg:d="M7543 13105v-1342h-3038v-1339" svg:viewBox="0 0 3039 2682">
          <text:p/>
        </draw:connector>
        <draw:frame draw:style-name="gr7" draw:text-style-name="P7" draw:layer="layout" svg:width="3.085cm" svg:height="0.725cm" svg:x="4.175cm" svg:y="12.34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onnector draw:style-name="gr56" draw:text-style-name="P13" draw:layer="layout" svg:x1="11.107cm" svg:y1="16.733cm" svg:x2="9.327cm" svg:y2="15.861cm" draw:start-shape="id12" draw:start-glue-point="22" draw:end-shape="id11" draw:end-glue-point="12" svg:d="M11107 16733h-890v-872h-890" svg:viewBox="0 0 1781 873">
          <text:p/>
        </draw:connector>
        <draw:frame draw:style-name="gr7" draw:text-style-name="P7" draw:layer="layout" svg:width="2.54cm" svg:height="0.725cm" svg:x="7.032cm" svg:y="16.557cm">
          <draw:text-box>
            <text:p><text:span text:style-name="T2">&lt;</text:span><text:span text:style-name="T2">&lt;</text:span><text:span text:style-name="T2">i</text:span><text:span text:style-name="T2">s</text:span><text:span text:style-name="T2"> </text:span><text:span text:style-name="T2">a</text:span><text:span text:style-name="T2">&gt;</text:span><text:span text:style-name="T2">&gt;</text:span></text:p>
          </draw:text-box>
        </draw:frame>
        <draw:connector draw:style-name="gr57" draw:text-style-name="P13" draw:layer="layout" svg:x1="12.295cm" svg:y1="13.608cm" svg:x2="9.141cm" svg:y2="9.88cm" draw:start-shape="id13" draw:end-shape="id8" draw:end-glue-point="12" svg:d="M12295 13608h-1577v-3728h-1577" svg:viewBox="0 0 3155 3729">
          <text:p/>
        </draw:connector>
        <draw:g draw:style-name="gr3" xml:id="id13" draw:id="id13">
          <draw:custom-shape draw:style-name="gr58" draw:text-style-name="P21" draw:layer="layout" svg:width="7.937cm" svg:height="1.153cm" svg:x="12.295cm" svg:y="12.54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2" draw:layer="layout" svg:width="7.937cm" svg:height="0.435cm" svg:x="12.295cm" svg:y="1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layout" svg:width="7.937cm" svg:height="0.599cm" svg:x="12.295cm" svg:y="14.0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Web service" draw:style-name="dp1" draw:master-page-name="Default">
        <draw:custom-shape draw:style-name="gr61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" draw:layer="layout" svg:width="23.452cm" svg:height="0.7cm" svg:x="1.60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5" draw:id="id1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63" draw:text-style-name="P4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5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66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7" draw:text-style-name="P10" draw:layer="layout" svg:width="7.324cm" svg:height="1.153cm" svg:x="2.013cm" svg:y="7.4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2" draw:layer="layout" svg:width="7.324cm" svg:height="0.949cm" svg:x="2.013cm" svg:y="8.595cm">
              <text:p text:style-name="P15"><text:span text:style-name="T3">- web_queue: Queue</text:span></text:p>
              <text:p text:style-name="P15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23" draw:layer="layout" svg:width="7.32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2"><text:span text:style-name="T3">+ init()</text:span></text:p>
              <text:p text:style-name="P22"><text:span text:style-name="T3">+ stop()</text:span></text:p>
              <text:p text:style-name="P22"><text:span text:style-name="T3">+ get_state()</text:span></text:p>
              <text:p text:style-name="P22"><text:span text:style-name="T3">+ start()</text:span></text:p>
              <text:p text:style-name="P22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0" draw:text-style-name="P13" draw:layer="layout" draw:line-skew="0.485cm" svg:x1="4.05cm" svg:y1="7.443cm" svg:x2="3.265cm" svg:y2="5.27cm" draw:start-shape="id14" draw:start-glue-point="5" draw:end-shape="id15" draw:end-glue-point="16" svg:d="M4050 7443v-603h-785v-1570" svg:viewBox="0 0 786 2174">
          <text:p/>
        </draw:connector>
        <draw:custom-shape draw:style-name="gr71" draw:text-style-name="P14" draw:layer="layout" svg:width="24.765cm" svg:height="0.952cm" svg:x="1cm" svg:y="1.1cm">
          <text:p text:style-name="P1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72" draw:text-style-name="P10" draw:layer="layout" svg:width="6.237cm" svg:height="1.153cm" svg:x="11.477cm" svg:y="8.7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er.UvicornServer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6.237cm" svg:height="0.473cm" svg:x="11.477cm" svg:y="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2" draw:layer="layout" svg:width="6.237cm" svg:height="1.781cm" svg:x="11.477cm" svg:y="10.3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app:FastAPI)</text:span></text:p>
              <text:p text:style-name="P11"><text:span text:style-name="T3">+ run()</text:span></text:p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75" draw:text-style-name="P10" draw:layer="layout" svg:width="5.602cm" svg:height="1.153cm" svg:x="19.232cm" svg:y="10.288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fastapi_server.api_ap</text:span></text:p>
                <text:p text:style-name="P9"><text:span text:style-name="T1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12" draw:layer="layout" svg:width="5.602cm" svg:height="0.676cm" svg:x="19.232cm" svg:y="11.441cm">
                <text:p text:style-name="P11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7" draw:text-style-name="P12" draw:layer="layout" svg:width="5.602cm" svg:height="2.175cm" svg:x="19.232cm" svg:y="12.11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@api_app.get()</text:span></text:p>
                <text:p text:style-name="P11"><text:span text:style-name="T3">+ @api_app.put()</text:span></text:p>
                <text:p text:style-name="P11"><text:span text:style-name="T3">+ @api_app.post()</text:span></text:p>
                <text:p text:style-name="P11"><text:span text:style-name="T3">+ @api_app.api_route()</text:span></text:p>
                <text:p text:style-name="P11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7" draw:text-style-name="P7" draw:layer="layout" svg:width="3.81cm" svg:height="0.725cm" svg:x="10.525cm" svg:y="7.26cm">
          <draw:text-box>
            <text:p><text:span text:style-name="T2">&lt;</text:span><text:span text:style-name="T2">&lt;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s</text:span><text:span text:style-name="T2"> </text:span><text:span text:style-name="T2">o</text:span><text:span text:style-name="T2">f</text:span><text:span text:style-name="T2">&gt;</text:span><text:span text:style-name="T2">&gt;</text:span></text:p>
          </draw:text-box>
        </draw:frame>
        <draw:frame draw:style-name="gr7" draw:text-style-name="P7" draw:layer="layout" svg:width="3.085cm" svg:height="0.725cm" svg:x="10.297cm" svg:y="13.065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onnector draw:style-name="gr78" draw:text-style-name="P13" draw:layer="layout" svg:x1="14.595cm" svg:y1="8.705cm" svg:x2="9.336cm" svg:y2="8.078cm" draw:start-shape="id16" draw:start-glue-point="0" draw:end-shape="id14" draw:end-glue-point="13" svg:d="M14595 8705v-627h-5259" svg:viewBox="0 0 5260 628">
          <text:p/>
        </draw:connector>
        <draw:connector draw:style-name="gr79" draw:text-style-name="P13" draw:layer="layout" svg:x1="17.713cm" svg:y1="9.341cm" svg:x2="23.278cm" svg:y2="10.289cm" draw:start-shape="id16" draw:start-glue-point="13" draw:end-shape="id17" draw:end-glue-point="14" svg:d="M17713 9341h5565v948" svg:viewBox="0 0 5566 949">
          <text:p/>
        </draw:connector>
        <draw:g draw:style-name="gr3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80" draw:text-style-name="P10" draw:layer="layout" svg:width="6.237cm" svg:height="1.153cm" svg:x="2.183cm" svg:y="13.5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2" draw:layer="layout" svg:width="6.237cm" svg:height="0.779cm" svg:x="2.183cm" svg:y="14.66cm">
              <text:p text:style-name="P11"><text:span text:style-name="T3">- web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12" draw:layer="layout" svg:width="6.237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3" draw:text-style-name="P13" draw:layer="layout" svg:x1="6.687cm" svg:y1="13.508cm" svg:x2="4.05cm" svg:y2="11.719cm" draw:start-shape="id18" draw:start-glue-point="14" draw:end-shape="id14" draw:end-glue-point="8" svg:d="M6687 13508v-896h-2637v-893" svg:viewBox="0 0 2638 1790">
          <text:p/>
        </draw:connector>
        <draw:frame draw:style-name="gr7" draw:text-style-name="P7" draw:layer="layout" svg:width="3.085cm" svg:height="0.725cm" svg:x="4.265cm" svg:y="11.92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frame draw:style-name="gr7" draw:text-style-name="P7" draw:layer="layout" svg:width="3.085cm" svg:height="0.725cm" svg:x="20.685cm" svg:y="8.6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onnector draw:style-name="gr84" draw:text-style-name="P13" draw:layer="layout" svg:x1="10.207cm" svg:y1="14.717cm" svg:x2="9.337cm" svg:y2="9.58cm" draw:start-shape="id19" draw:start-glue-point="4" draw:end-shape="id14" draw:end-glue-point="1" svg:d="M10207 14717v-5137h-870" svg:viewBox="0 0 871 5138">
          <text:p/>
        </draw:connector>
        <draw:g draw:style-name="gr3" xml:id="id19" draw:id="id19">
          <draw:glue-point draw:id="4" svg:x="-4cm" svg:y="-5cm"/>
          <draw:custom-shape draw:style-name="gr85" draw:text-style-name="P21" draw:layer="layout" svg:width="9.525cm" svg:height="1.153cm" svg:x="9.255cm" svg:y="14.7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2" draw:layer="layout" svg:width="9.525cm" svg:height="0.435cm" svg:x="9.255cm" svg:y="15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2" draw:layer="layout" svg:width="9.525cm" svg:height="0.993cm" svg:x="9.255cm" svg:y="16.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USB" draw:style-name="dp1" draw:master-page-name="Default">
        <draw:custom-shape draw:style-name="gr88" draw:text-style-name="P2" draw:layer="layout" svg:width="25.55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" draw:layer="layout" svg:width="25.402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1" draw:id="id2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90" draw:text-style-name="P4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6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2" draw:layer="layout" svg:width="25.724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10.297cm" svg:y="6.715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93" draw:text-style-name="P8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94" draw:text-style-name="P10" draw:layer="layout" svg:width="6.54cm" svg:height="1.153cm" svg:x="11.412cm" svg:y="8.3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usb_service.US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2" draw:layer="layout" svg:width="6.54cm" svg:height="1.075cm" svg:x="11.412cm" svg:y="9.464cm">
              <text:p text:style-name="P15"><text:span text:style-name="T3">- usb_observer: USBObserver</text:span></text:p>
              <text:p text:style-name="P15"><text:span text:style-name="T3">- usb_monitor: 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12" draw:layer="layout" svg:width="6.54cm" svg:height="2.569cm" svg:x="11.412cm" svg:y="10.5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)</text:span></text:p>
              <text:p text:style-name="P11"><text:span text:style-name="T3">+ get_state()</text:span></text:p>
              <text:p text:style-name="P11"><text:span text:style-name="T3">+ close()</text:span></text:p>
              <text:p text:style-name="P11"><text:span text:style-name="T3">- usb_inserted()</text:span></text:p>
              <text:p text:style-name="P11"><text:span text:style-name="T3">- usb_removed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7" draw:text-style-name="P13" draw:layer="layout" svg:x1="13.231cm" svg:y1="8.312cm" svg:x2="10.184cm" svg:y2="5.27cm" draw:start-shape="id20" draw:start-glue-point="5" draw:end-shape="id21" draw:end-glue-point="23" svg:d="M13231 8312v-1522h-3047v-1520" svg:viewBox="0 0 3048 3043">
          <text:p/>
        </draw:connector>
        <draw:custom-shape draw:style-name="gr98" draw:text-style-name="P14" draw:layer="layout" svg:width="26.352cm" svg:height="0.952cm" svg:x="1cm" svg:y="1.1cm">
          <text:p text:style-name="P1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99" draw:text-style-name="P10" draw:layer="layout" svg:width="5.448cm" svg:height="1.153cm" svg:x="2.172cm" svg:y="9.5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&lt;&lt;singleton&gt;&gt;</text:span></text:p>
                <text:p text:style-name="P9"><text:span text:style-name="T1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0" draw:text-style-name="P12" draw:layer="layout" svg:width="5.448cm" svg:height="0.692cm" svg:x="2.172cm" svg:y="10.712cm">
                <text:p text:style-name="P15"><text:span text:style-name="T3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12" draw:layer="layout" svg:width="5.448cm" svg:height="0.993cm" svg:x="2.172cm" svg:y="11.4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start()</text:span></text:p>
                <text:p text:style-name="P11"><text:span text:style-name="T3">+ stop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3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2" draw:text-style-name="P10" draw:layer="layout" svg:width="5.448cm" svg:height="1.153cm" svg:x="19.35cm" svg:y="9.5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2" draw:layer="layout" svg:width="5.448cm" svg:height="0.434cm" svg:x="19.35cm" svg:y="10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12" draw:layer="layout" svg:width="5.448cm" svg:height="0.993cm" svg:x="19.35cm" svg:y="11.15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- on_created()</text:span></text:p>
              <text:p text:style-name="P11"><text:span text:style-name="T3">- usb_delete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5" draw:text-style-name="P13" draw:layer="layout" svg:x1="23.285cm" svg:y1="12.152cm" svg:x2="25.099cm" svg:y2="14.302cm" draw:start-shape="id22" draw:start-glue-point="9" draw:end-shape="id23" draw:end-glue-point="14" svg:d="M23285 12152v1074h1814v1076" svg:viewBox="0 0 1815 2151">
          <text:p/>
        </draw:connector>
        <draw:g draw:style-name="gr3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6" draw:text-style-name="P10" draw:layer="layout" svg:width="6.718cm" svg:height="1.153cm" svg:x="20.247cm" svg:y="14.3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2" draw:layer="layout" svg:width="6.718cm" svg:height="0.366cm" svg:x="20.247cm" svg:y="15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6.718cm" svg:height="0.599cm" svg:x="20.247cm" svg:y="15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handle_event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9" draw:text-style-name="P13" draw:layer="layout" svg:x1="23.285cm" svg:y1="9.573cm" svg:x2="17.951cm" svg:y2="8.947cm" draw:start-shape="id22" draw:start-glue-point="14" draw:end-shape="id20" draw:end-glue-point="13" svg:d="M23285 9573v-626h-5334" svg:viewBox="0 0 5335 627">
          <text:p/>
        </draw:connector>
        <draw:connector draw:style-name="gr110" draw:text-style-name="P13" draw:layer="layout" svg:x1="6.107cm" svg:y1="9.56cm" svg:x2="11.413cm" svg:y2="8.947cm" draw:start-shape="id24" draw:start-glue-point="14" draw:end-shape="id20" draw:end-glue-point="6" svg:d="M6107 9560v-613h5306" svg:viewBox="0 0 5307 614">
          <text:p/>
        </draw:connector>
        <draw:g draw:style-name="gr3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11" draw:text-style-name="P25" draw:layer="layout" svg:width="6.35cm" svg:height="1.153cm" svg:x="1.87cm" svg:y="14.0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&lt;&lt;Library&gt;&gt;</text:span></text:p>
              <text:p text:style-name="P24"><text:span text:style-name="T1">watchdog.observers.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2" draw:layer="layout" svg:width="6.35cm" svg:height="0.599cm" svg:x="1.87cm" svg:y="15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2" draw:layer="layout" svg:width="6.35cm" svg:height="0.599cm" svg:x="1.87cm" svg:y="15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chedul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4" draw:text-style-name="P13" draw:layer="layout" svg:x1="6.456cm" svg:y1="14.012cm" svg:x2="3.687cm" svg:y2="12.397cm" draw:start-shape="id25" draw:start-glue-point="14" draw:end-shape="id24" draw:end-glue-point="8" svg:d="M6456 14012v-808h-2769v-807" svg:viewBox="0 0 2770 1616">
          <text:p/>
        </draw:connector>
        <draw:frame draw:style-name="gr7" draw:text-style-name="P7" draw:layer="layout" svg:width="3.085cm" svg:height="0.725cm" svg:x="4.265cm" svg:y="12.43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frame draw:style-name="gr7" draw:text-style-name="P7" draw:layer="layout" svg:width="2.223cm" svg:height="0.725cm" svg:x="22.907cm" svg:y="13.382cm">
          <draw:text-box>
            <text:p><text:span text:style-name="T2">&lt;</text:span><text:span text:style-name="T2">&lt;</text:span><text:span text:style-name="T2">i</text:span><text:span text:style-name="T2">s</text:span><text:span text:style-name="T2"> </text:span><text:span text:style-name="T2">a</text:span><text:span text:style-name="T2">&gt;</text:span><text:span text:style-name="T2">&gt;</text:span></text:p>
          </draw:text-box>
        </draw:frame>
        <draw:frame draw:style-name="gr7" draw:text-style-name="P7" draw:layer="layout" svg:width="3.81cm" svg:height="0.725cm" svg:x="20.05cm" svg:y="7.895cm">
          <draw:text-box>
            <text:p><text:span text:style-name="T2">&lt;</text:span><text:span text:style-name="T2">&lt;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s</text:span><text:span text:style-name="T2"> </text:span><text:span text:style-name="T2">o</text:span><text:span text:style-name="T2">f</text:span><text:span text:style-name="T2">&gt;</text:span><text:span text:style-name="T2">&gt;</text:span></text:p>
          </draw:text-box>
        </draw:frame>
        <draw:frame draw:style-name="gr7" draw:text-style-name="P7" draw:layer="layout" svg:width="3.81cm" svg:height="0.725cm" svg:x="6.397cm" svg:y="7.667cm">
          <draw:text-box>
            <text:p><text:span text:style-name="T2">&lt;</text:span><text:span text:style-name="T2">&lt;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s</text:span><text:span text:style-name="T2"> </text:span><text:span text:style-name="T2">o</text:span><text:span text:style-name="T2">f</text:span><text:span text:style-name="T2">&gt;</text:span><text:span text:style-name="T2">&gt;</text:span></text:p>
          </draw:text-box>
        </draw:frame>
        <draw:connector draw:style-name="gr115" draw:text-style-name="P13" draw:layer="layout" draw:line-skew="-0.508cm" svg:x1="10.056cm" svg:y1="15.275cm" svg:x2="11.413cm" svg:y2="12.564cm" draw:start-shape="id26" draw:end-shape="id20" draw:end-glue-point="11" svg:d="M10056 15275h-1036v-2711h2393" svg:viewBox="0 0 2394 2712">
          <text:p/>
        </draw:connector>
        <draw:frame draw:style-name="gr7" draw:text-style-name="P7" draw:layer="layout" svg:width="2.45cm" svg:height="0.725cm" svg:x="8.62cm" svg:y="11.795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g draw:style-name="gr3" xml:id="id26" draw:id="id26">
          <draw:glue-point draw:id="4" svg:x="-4cm" svg:y="-5cm"/>
          <draw:custom-shape draw:style-name="gr116" draw:text-style-name="P21" draw:layer="layout" svg:width="9.525cm" svg:height="1.153cm" svg:x="10.056cm" svg:y="14.0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2" draw:layer="layout" svg:width="9.525cm" svg:height="0.435cm" svg:x="10.056cm" svg:y="15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9.525cm" svg:height="0.993cm" svg:x="10.056cm" svg:y="15.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olume" draw:style-name="dp1" draw:master-page-name="Default">
        <draw:custom-shape draw:style-name="gr119" draw:text-style-name="P2" draw:layer="layout" svg:width="20.198cm" svg:height="0.7cm" svg:x="1.43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" draw:layer="layout" svg:width="20.085cm" svg:height="0.7cm" svg:x="1.55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8" draw:id="id2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21" draw:text-style-name="P4" draw:layer="layout" svg:width="20.088cm" svg:height="1.153cm" svg:x="1.54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6" draw:layer="layout" svg:width="20.088cm" svg:height="0.679cm" svg:x="1.54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3" draw:text-style-name="P2" draw:layer="layout" svg:width="20.326cm" svg:height="0.7cm" svg:x="1.311cm" svg:y="15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.995cm" svg:y="6.94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124" draw:text-style-name="P8" draw:layer="layout" svg:width="20.955cm" svg:height="15.14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7" draw:id="id2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5" draw:text-style-name="P10" draw:layer="layout" svg:width="6.686cm" svg:height="1.153cm" svg:x="3.956cm" svg:y="8.1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volume_control.Volume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12" draw:layer="layout" svg:width="6.686cm" svg:height="1.047cm" svg:x="3.956cm" svg:y="9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27" draw:layer="layout" svg:width="6.686cm" svg:height="1.387cm" svg:x="3.956cm" svg:y="10.3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6"><text:span text:style-name="T5">+ set_notify()</text:span></text:p>
              <text:p text:style-name="P26"><text:span text:style-name="T5">+ start()</text:span></text:p>
              <text:p text:style-name="P26"><text:span text:style-name="T5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28" draw:text-style-name="P13" draw:layer="layout" svg:x1="5.815cm" svg:y1="8.123cm" svg:x2="5.567cm" svg:y2="5.27cm" draw:start-shape="id27" draw:start-glue-point="5" draw:end-shape="id28" draw:end-glue-point="4" svg:d="M5815 8123v-1428h-248v-1425" svg:viewBox="0 0 249 2854">
          <text:p/>
        </draw:connector>
        <draw:custom-shape draw:style-name="gr44" draw:text-style-name="P14" draw:layer="layout" svg:width="20.955cm" svg:height="0.952cm" svg:x="1cm" svg:y="1.1cm">
          <text:p text:style-name="P1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9" draw:text-style-name="P10" draw:layer="layout" svg:width="8.572cm" svg:height="1.153cm" svg:x="13.065cm" svg:y="9.99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i2c_service.I2C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12" draw:layer="layout" svg:width="8.572cm" svg:height="0.761cm" svg:x="13.065cm" svg:y="11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12" draw:layer="layout" svg:width="8.572cm" svg:height="1.781cm" svg:x="13.065cm" svg:y="11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6">+ </text:span><text:span text:style-name="T7">read_block</text:span><text:span text:style-name="T6">(device: int, register: int, length: int)</text:span></text:p>
              <text:p text:style-name="P11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32" draw:text-style-name="P13" draw:layer="layout" svg:x1="19.256cm" svg:y1="9.993cm" svg:x2="10.641cm" svg:y2="8.758cm" draw:start-shape="id29" draw:start-glue-point="14" draw:end-shape="id27" draw:end-glue-point="13" svg:d="M19256 9993v-1235h-8615" svg:viewBox="0 0 8616 1236">
          <text:p/>
        </draw:connector>
        <draw:frame draw:style-name="gr7" draw:text-style-name="P7" draw:layer="layout" svg:width="2.512cm" svg:height="0.725cm" svg:x="15.287cm" svg:y="8.937cm">
          <draw:text-box>
            <text:p><text:span text:style-name="T2">&lt;</text:span><text:span text:style-name="T2">&lt;</text:span><text:span text:style-name="T2">h</text:span><text:span text:style-name="T2">a</text:span><text:span text:style-name="T2">s</text:span><text:span text:style-name="T2">&gt;</text:span><text:span text:style-name="T2">&gt;</text:span></text:p>
          </draw:text-box>
        </draw:frame>
        <draw:g draw:style-name="gr3" xml:id="id30" draw:id="id30">
          <draw:custom-shape draw:style-name="gr133" draw:text-style-name="P21" draw:layer="layout" svg:width="9.525cm" svg:height="1.153cm" svg:x="2.687cm" svg:y="12.6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2" draw:layer="layout" svg:width="9.525cm" svg:height="0.435cm" svg:x="2.687cm" svg:y="13.7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2" draw:layer="layout" svg:width="9.525cm" svg:height="0.993cm" svg:x="2.687cm" svg:y="14.1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7" draw:layer="layout" svg:width="3.085cm" svg:height="0.725cm" svg:x="1.635cm" svg:y="11.16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onnector draw:style-name="gr136" draw:text-style-name="P13" draw:layer="layout" draw:line-skew="-0.524cm" svg:x1="2.687cm" svg:y1="13.87cm" svg:x2="3.957cm" svg:y2="11.165cm" draw:start-shape="id30" draw:end-shape="id27" draw:end-glue-point="11" svg:d="M2687 13870h-1052v-2705h2322" svg:viewBox="0 0 2323 2706">
          <text:p/>
        </draw:connector>
        <draw:frame draw:style-name="gr137" draw:text-style-name="P28" draw:layer="layout" svg:width="7.937cm" svg:height="1.673cm" svg:x="6.397cm" svg:y="6.397cm">
          <draw:text-box>
            <text:p><text:span text:style-name="T8">W</text:span><text:span text:style-name="T8">a</text:span><text:span text:style-name="T8">a</text:span><text:span text:style-name="T8">r</text:span><text:span text:style-name="T8">o</text:span><text:span text:style-name="T8">m</text:span><text:span text:style-name="T8"> </text:span><text:span text:style-name="T8">s</text:span><text:span text:style-name="T8">t</text:span><text:span text:style-name="T8">a</text:span><text:span text:style-name="T8">r</text:span><text:span text:style-name="T8">t</text:span><text:span text:style-name="T8">(</text:span><text:span text:style-name="T8">)</text:span><text:span text:style-name="T8">,</text:span><text:span text:style-name="T8"> </text:span><text:span text:style-name="T8">s</text:span><text:span text:style-name="T8">t</text:span><text:span text:style-name="T8">o</text:span><text:span text:style-name="T8">p</text:span><text:span text:style-name="T8">(</text:span><text:span text:style-name="T8">)</text:span><text:span text:style-name="T8">,</text:span><text:span text:style-name="T8"> </text:span><text:span text:style-name="T8">s</text:span><text:span text:style-name="T8">e</text:span><text:span text:style-name="T8">t</text:span><text:span text:style-name="T8">_</text:span><text:span text:style-name="T8">n</text:span><text:span text:style-name="T8">o</text:span><text:span text:style-name="T8">t</text:span><text:span text:style-name="T8">i</text:span><text:span text:style-name="T8">f</text:span><text:span text:style-name="T8">y</text:span><text:span text:style-name="T8">(</text:span><text:span text:style-name="T8">)</text:span><text:span text:style-name="T8">.</text:span><text:span text:style-name="T8"> </text:span><text:span text:style-name="T8">S</text:span><text:span text:style-name="T8">t</text:span><text:span text:style-name="T8">a</text:span><text:span text:style-name="T8">a</text:span><text:span text:style-name="T8">t</text:span><text:span text:style-name="T8"> </text:span><text:span text:style-name="T8">a</text:span><text:span text:style-name="T8">l</text:span><text:span text:style-name="T8">t</text:span><text:span text:style-name="T8">i</text:span><text:span text:style-name="T8">j</text:span><text:span text:style-name="T8">d</text:span><text:span text:style-name="T8"> </text:span><text:span text:style-name="T8">o</text:span><text:span text:style-name="T8">p</text:span><text:span text:style-name="T8"> </text:span><text:span text:style-name="T8">n</text:span><text:span text:style-name="T8">o</text:span><text:span text:style-name="T8">t</text:span><text:span text:style-name="T8">i</text:span><text:span text:style-name="T8">f</text:span><text:span text:style-name="T8">y</text:span><text:span text:style-name="T8">.</text:span><text:span text:style-name="T8"> </text:span><text:span text:style-name="T8">D</text:span><text:span text:style-name="T8">u</text:span><text:span text:style-name="T8">s</text:span><text:span text:style-name="T8"> </text:span><text:span text:style-name="T8">n</text:span><text:span text:style-name="T8">o</text:span><text:span text:style-name="T8">t</text:span><text:span text:style-name="T8">i</text:span><text:span text:style-name="T8">f</text:span><text:span text:style-name="T8">y</text:span><text:span text:style-name="T8"> </text:span><text:span text:style-name="T8">d</text:span><text:span text:style-name="T8">e</text:span><text:span text:style-name="T8">f</text:span><text:span text:style-name="T8">a</text:span><text:span text:style-name="T8">u</text:span><text:span text:style-name="T8">l</text:span><text:span text:style-name="T8">t</text:span><text:span text:style-name="T8"> </text:span><text:span text:style-name="T8">a</text:span><text:span text:style-name="T8">a</text:span><text:span text:style-name="T8">n</text:span><text:span text:style-name="T8">.</text:span><text:span text:style-name="T8"> </text:span><text:span text:style-name="T8">G</text:span><text:span text:style-name="T8">a</text:span><text:span text:style-name="T8">a</text:span><text:span text:style-name="T8">t</text:span><text:span text:style-name="T8"> </text:span><text:span text:style-name="T8">n</text:span><text:span text:style-name="T8">o</text:span><text:span text:style-name="T8">o</text:span><text:span text:style-name="T8">i</text:span><text:span text:style-name="T8">t</text:span><text:span text:style-name="T8"> </text:span><text:span text:style-name="T8">g</text:span><text:span text:style-name="T8">e</text:span><text:span text:style-name="T8">s</text:span><text:span text:style-name="T8">t</text:span><text:span text:style-name="T8">o</text:span><text:span text:style-name="T8">p</text:span><text:span text:style-name="T8">t</text:span><text:span text:style-name="T8"> </text:span><text:span text:style-name="T8">w</text:span><text:span text:style-name="T8">o</text:span><text:span text:style-name="T8">r</text:span><text:span text:style-name="T8">d</text:span><text:span text:style-name="T8">e</text:span><text:span text:style-name="T8">n</text:span></text:p>
          </draw:text-box>
        </draw:frame>
      </draw:page>
      <draw:page draw:name="Error" draw:style-name="dp1" draw:master-page-name="Default">
        <draw:custom-shape draw:style-name="gr13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2" draw:id="id3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40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14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4" draw:text-style-name="P10" draw:layer="layout" svg:width="6.229cm" svg:height="1.153cm" svg:x="1.756cm" svg:y="8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error_service.py.Error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2" draw:layer="layout" svg:width="6.229cm" svg:height="0.746cm" svg:x="1.756cm" svg:y="9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12" draw:layer="layout" svg:width="6.229cm" svg:height="0.993cm" svg:x="1.756cm" svg:y="10.5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- init()</text:span></text:p>
              <text:p text:style-name="P11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47" draw:text-style-name="P13" draw:layer="layout" svg:x1="3.488cm" svg:y1="8.612cm" svg:x2="5.403cm" svg:y2="5.27cm" draw:start-shape="id31" draw:start-glue-point="5" draw:end-shape="id32" draw:end-glue-point="4" svg:d="M3488 8612v-1672h1915v-1670" svg:viewBox="0 0 1916 3343">
          <text:p/>
        </draw:connector>
        <draw:custom-shape draw:style-name="gr148" draw:text-style-name="P14" draw:layer="layout" svg:width="20.637cm" svg:height="0.952cm" svg:x="1cm" svg:y="1.1cm">
          <text:p text:style-name="P1">Static view: Err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29" draw:layer="layout" svg:width="6.35cm" svg:height="4.043cm" svg:x="13.065cm" svg:y="8.069cm">
          <draw:text-box>
            <text:p><text:span text:style-name="T2">f</text:span><text:span text:style-name="T2">r</text:span><text:span text:style-name="T2">o</text:span><text:span text:style-name="T2">m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i</text:span><text:span text:style-name="T2">n</text:span><text:span text:style-name="T2">g</text:span><text:span text:style-name="T2"> </text:span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 </text:span><text:span text:style-name="T2">(</text:span></text:p>
            <text:p><text:span text:style-name="T2"><text:s/></text:span><text:span text:style-name="T2"><text:s/></text:span><text:span text:style-name="T2"><text:s/></text:span><text:span text:style-name="T2"><text:s/></text:span><text:span text:style-name="T2">E</text:span><text:span text:style-name="T2">r</text:span><text:span text:style-name="T2">r</text:span><text:span text:style-name="T2">o</text:span><text:span text:style-name="T2">r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</text:span></text:p>
            <text:p><text:span text:style-name="T2"><text:s/></text:span><text:span text:style-name="T2"><text:s/></text:span><text:span text:style-name="T2"><text:s/></text:span><text:span text:style-name="T2"><text:s/></text:span><text:span text:style-name="T2">g</text:span><text:span text:style-name="T2">e</text:span><text:span text:style-name="T2">t</text:span><text:span text:style-name="T2">_</text:span><text:span text:style-name="T2">e</text:span><text:span text:style-name="T2">r</text:span><text:span text:style-name="T2">r</text:span><text:span text:style-name="T2">o</text:span><text:span text:style-name="T2">r</text:span><text:span text:style-name="T2">_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</text:span></text:p>
            <text:p><text:span text:style-name="T2"><text:s/></text:span><text:span text:style-name="T2"><text:s/></text:span><text:span text:style-name="T2"><text:s/></text:span><text:span text:style-name="T2"><text:s/></text:span><text:span text:style-name="T2">p</text:span><text:span text:style-name="T2">u</text:span><text:span text:style-name="T2">t</text:span><text:span text:style-name="T2">_</text:span><text:span text:style-name="T2">e</text:span><text:span text:style-name="T2">r</text:span><text:span text:style-name="T2">r</text:span><text:span text:style-name="T2">o</text:span><text:span text:style-name="T2">r</text:span><text:span text:style-name="T2">_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</text:span></text:p>
            <text:p><text:span text:style-name="T2"><text:s/></text:span><text:span text:style-name="T2"><text:s/></text:span><text:span text:style-name="T2"><text:s/></text:span><text:span text:style-name="T2"><text:s/>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</text:span></text:p>
            <text:p><text:span text:style-name="T2"><text:s/></text:span><text:span text:style-name="T2"><text:s/></text:span><text:span text:style-name="T2"><text:s/></text:span><text:span text:style-name="T2"><text:s/></text:span><text:span text:style-name="T2">g</text:span><text:span text:style-name="T2">e</text:span><text:span text:style-name="T2">t</text:span><text:span text:style-name="T2">_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_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</text:span></text:p>
            <text:p><text:span text:style-name="T2"><text:s/></text:span><text:span text:style-name="T2"><text:s/></text:span><text:span text:style-name="T2"><text:s/></text:span><text:span text:style-name="T2"><text:s/></text:span><text:span text:style-name="T2">p</text:span><text:span text:style-name="T2">u</text:span><text:span text:style-name="T2">t</text:span><text:span text:style-name="T2">_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_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</text:span></text:p>
            <text:p><text:span text:style-name="T2">)</text:span></text:p>
          </draw:text-box>
        </draw:frame>
        <draw:g draw:style-name="gr3" xml:id="id33" draw:id="id33">
          <draw:glue-point draw:id="4" svg:x="-4cm" svg:y="-5cm"/>
          <draw:custom-shape draw:style-name="gr150" draw:text-style-name="P21" draw:layer="layout" svg:width="6.649cm" svg:height="1.153cm" svg:x="6.491cm" svg:y="12.86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12" draw:layer="layout" svg:width="6.649cm" svg:height="0.771cm" svg:x="6.491cm" svg:y="14.014cm">
            <text:p text:style-name="P11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" draw:layer="layout" svg:width="6.649cm" svg:height="0.599cm" svg:x="6.491cm" svg:y="14.67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get_error_message():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3" draw:text-style-name="P13" draw:layer="layout" svg:x1="9.815cm" svg:y1="12.861cm" svg:x2="7.984cm" svg:y2="10.959cm" draw:start-shape="id33" draw:end-shape="id31" draw:end-glue-point="12" svg:d="M9815 12861v-1902h-1831" svg:viewBox="0 0 1832 1903">
          <text:p/>
        </draw:connector>
        <draw:frame draw:style-name="gr7" draw:text-style-name="P7" draw:layer="layout" svg:width="3.085cm" svg:height="0.725cm" svg:x="6.487cm" svg:y="12.02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</draw:page>
      <draw:page draw:name="Messaging" draw:style-name="dp1" draw:master-page-name="Default">
        <draw:custom-shape draw:style-name="gr13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5" draw:id="id3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54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14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6" draw:text-style-name="P10" draw:layer="layout" svg:width="9.721cm" svg:height="1.153cm" svg:x="1.756cm" svg:y="7.7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</text:span></text:p>
              <text:p text:style-name="P9"><text:span text:style-name="T1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12" draw:layer="layout" svg:width="9.721cm" svg:height="0.985cm" svg:x="1.756cm" svg:y="8.94cm">
              <text:p text:style-name="P11"><text:span text:style-name="T3">- command_queue: Queue</text:span></text:p>
              <text:p text:style-name="P11"><text:span text:style-name="T3">- error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2" draw:layer="layout" svg:width="9.721cm" svg:height="1.781cm" svg:x="1.756cm" svg:y="9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put_command_message(message: CommandMessage)</text:span></text:p>
              <text:p text:style-name="P11"><text:span text:style-name="T3">+ get_command_message()</text:span></text:p>
              <text:p text:style-name="P11"><text:span text:style-name="T3">+ put_error_message(message: ErrorMessage)</text:span></text:p>
              <text:p text:style-name="P11"><text:span text:style-name="T3">+ get_error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9" draw:text-style-name="P13" draw:layer="layout" svg:x1="4.458cm" svg:y1="7.788cm" svg:x2="5.403cm" svg:y2="5.27cm" draw:start-shape="id34" draw:start-glue-point="5" draw:end-shape="id35" draw:end-glue-point="4" svg:d="M4458 7788v-1260h945v-1258" svg:viewBox="0 0 946 2519">
          <text:p/>
        </draw:connector>
        <draw:custom-shape draw:style-name="gr148" draw:text-style-name="P14" draw:layer="layout" svg:width="20.637cm" svg:height="0.952cm" svg:x="1cm" svg:y="1.1cm">
          <text:p text:style-name="P1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0" draw:text-style-name="P10" draw:layer="layout" svg:width="6.667cm" svg:height="1.153cm" svg:x="13.383cm" svg:y="9.81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.CommandMessage</text:span></text:p>
              <text:p text:style-name="P9"><text:span text:style-name="T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12" draw:layer="layout" svg:width="6.667cm" svg:height="0.994cm" svg:x="13.383cm" svg:y="10.972cm">
              <text:p text:style-name="P11"><text:span text:style-name="T3">+ source: String</text:span></text:p>
              <text:p text:style-name="P11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12" draw:layer="layout" svg:width="6.667cm" svg:height="0.599cm" svg:x="13.383cm" svg:y="11.96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7" draw:id="id3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3" draw:text-style-name="P10" draw:layer="layout" svg:width="6.667cm" svg:height="1.153cm" svg:x="13.383cm" svg:y="13.1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.ErrorMessage</text:span></text:p>
              <text:p text:style-name="P9"><text:span text:style-name="T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2" draw:layer="layout" svg:width="6.667cm" svg:height="0.994cm" svg:x="13.383cm" svg:y="14.329cm">
              <text:p text:style-name="P11"><text:span text:style-name="T3">+ source: String</text:span></text:p>
              <text:p text:style-name="P11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6.667cm" svg:height="0.599cm" svg:x="13.383cm" svg:y="15.32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66" draw:text-style-name="P7" draw:layer="layout" svg:width="5.398cm" svg:height="2.222cm" svg:x="22.907cm" svg:y="9.255cm">
          <draw:text-box>
            <text:p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:</text:span></text:p>
            <text:p><text:span text:style-name="T2">+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:</text:span><text:span text:style-name="T2">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/text:p>
            <text:p><text:span text:style-name="T2">+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:</text:span><text:span text:style-name="T2">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/text:p>
            <text:p><text:span text:style-name="T2">+</text:span><text:span text:style-name="T2"> </text:span><text:span text:style-name="T2">d</text:span><text:span text:style-name="T2">a</text:span><text:span text:style-name="T2">t</text:span><text:span text:style-name="T2">a</text:span><text:span text:style-name="T2">: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[</text:span><text:span text:style-name="T2">L</text:span><text:span text:style-name="T2">i</text:span><text:span text:style-name="T2">s</text:span><text:span text:style-name="T2">t</text:span><text:span text:style-name="T2">[</text:span><text:span text:style-name="T2">A</text:span><text:span text:style-name="T2">n</text:span><text:span text:style-name="T2">y</text:span><text:span text:style-name="T2">]</text:span><text:span text:style-name="T2">]</text:span></text:p>
          </draw:text-box>
        </draw:frame>
        <draw:frame draw:style-name="gr167" draw:text-style-name="P7" draw:layer="layout" svg:width="6.35cm" svg:height="3.095cm" svg:x="22.272cm" svg:y="11.557cm">
          <draw:text-box>
            <text:p><text:span text:style-name="T2">E</text:span><text:span text:style-name="T2">r</text:span><text:span text:style-name="T2">r</text:span><text:span text:style-name="T2">o</text:span><text:span text:style-name="T2">r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:</text:span></text:p>
            <text:p><text:span text:style-name="T2">+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:</text:span><text:span text:style-name="T2">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/text:p>
            <text:p><text:span text:style-name="T2">+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:</text:span><text:span text:style-name="T2">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/text:p>
            <text:p><text:span text:style-name="T2">+</text:span><text:span text:style-name="T2"> </text:span><text:span text:style-name="T2">d</text:span><text:span text:style-name="T2">a</text:span><text:span text:style-name="T2">t</text:span><text:span text:style-name="T2">a</text:span><text:span text:style-name="T2">: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[</text:span><text:span text:style-name="T2">L</text:span><text:span text:style-name="T2">i</text:span><text:span text:style-name="T2">s</text:span><text:span text:style-name="T2">t</text:span><text:span text:style-name="T2">[</text:span><text:span text:style-name="T2">A</text:span><text:span text:style-name="T2">n</text:span><text:span text:style-name="T2">y</text:span><text:span text:style-name="T2">]</text:span><text:span text:style-name="T2">]</text:span></text:p>
            <text:p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: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 </text:span><text:span text:style-name="T2">|</text:span><text:span text:style-name="T2"> </text:span><text:span text:style-name="T2">E</text:span><text:span text:style-name="T2">x</text:span><text:span text:style-name="T2">c</text:span><text:span text:style-name="T2">e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|</text:span><text:span text:style-name="T2"> </text:span><text:span text:style-name="T2">.</text:span><text:span text:style-name="T2">.</text:span><text:span text:style-name="T2">.</text:span></text:p>
          </draw:text-box>
        </draw:frame>
        <draw:connector draw:style-name="gr168" draw:text-style-name="P13" draw:layer="layout" svg:x1="13.384cm" svg:y1="12.021cm" svg:x2="11.476cm" svg:y2="11.091cm" draw:start-shape="id36" draw:start-glue-point="11" draw:end-shape="id34" draw:end-glue-point="12" svg:d="M13384 12021h-955v-930h-953" svg:viewBox="0 0 1909 931">
          <text:p/>
        </draw:connector>
        <draw:connector draw:style-name="gr169" draw:text-style-name="P13" draw:layer="layout" svg:x1="13.383cm" svg:y1="13.785cm" svg:x2="10.937cm" svg:y2="11.635cm" draw:start-shape="id37" draw:start-glue-point="21" draw:end-shape="id34" draw:end-glue-point="10" svg:d="M13383 13785h-2446v-2150" svg:viewBox="0 0 2447 2151">
          <text:p/>
        </draw:connector>
      </draw:page>
      <draw:page draw:name="Power Supply" draw:style-name="dp1" draw:master-page-name="Default">
        <draw:custom-shape draw:style-name="gr13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9" draw:id="id3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70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14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72" draw:text-style-name="P10" draw:layer="layout" svg:width="8.991cm" svg:height="1.153cm" svg:x="1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power_supply_control.PowerSupply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8.991cm" svg:height="0.604cm" svg:x="1.756cm" svg:y="9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2" draw:layer="layout" svg:width="8.991cm" svg:height="1.781cm" svg:x="1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et_nom_voltage()</text:span></text:p>
              <text:p text:style-name="P11"><text:span text:style-name="T3">+ set_max_voltage()</text:span></text:p>
              <text:p text:style-name="P11"><text:span text:style-name="T3">+ set_standby_voltage()</text:span></text:p>
              <text:p text:style-name="P11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5" draw:text-style-name="P13" draw:layer="layout" svg:x1="4.255cm" svg:y1="7.989cm" svg:x2="5.403cm" svg:y2="5.27cm" draw:start-shape="id38" draw:start-glue-point="5" draw:end-shape="id39" draw:end-glue-point="4" svg:d="M4255 7989v-1361h1148v-1358" svg:viewBox="0 0 1149 2720">
          <text:p/>
        </draw:connector>
        <draw:custom-shape draw:style-name="gr148" draw:text-style-name="P14" draw:layer="layout" svg:width="20.637cm" svg:height="0.952cm" svg:x="1cm" svg:y="1.1cm">
          <text:p text:style-name="P1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76" draw:text-style-name="P10" draw:layer="layout" svg:width="8.572cm" svg:height="1.153cm" svg:x="9.977cm" svg:y="12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2" draw:layer="layout" svg:width="8.572cm" svg:height="0.761cm" svg:x="9.977cm" svg:y="13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12" draw:layer="layout" svg:width="8.572cm" svg:height="1.781cm" svg:x="9.977cm" svg:y="14.6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6">+ </text:span><text:span text:style-name="T7">read_block</text:span><text:span text:style-name="T6">(device: int, register: int, length: int)</text:span></text:p>
              <text:p text:style-name="P11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9" draw:text-style-name="P13" draw:layer="layout" svg:x1="12.361cm" svg:y1="12.728cm" svg:x2="10.747cm" svg:y2="9.757cm" draw:start-shape="id40" draw:start-glue-point="5" draw:end-shape="id38" draw:end-glue-point="1" svg:d="M12361 12728v-2971h-1614" svg:viewBox="0 0 1615 2972">
          <text:p/>
        </draw:connector>
        <draw:frame draw:style-name="gr7" draw:text-style-name="P7" draw:layer="layout" svg:width="2.512cm" svg:height="0.725cm" svg:x="12.747cm" svg:y="11.16cm">
          <draw:text-box>
            <text:p><text:span text:style-name="T2">&lt;</text:span><text:span text:style-name="T2">&lt;</text:span><text:span text:style-name="T2">h</text:span><text:span text:style-name="T2">a</text:span><text:span text:style-name="T2">s</text:span><text:span text:style-name="T2">&gt;</text:span><text:span text:style-name="T2">&gt;</text:span></text:p>
          </draw:text-box>
        </draw:frame>
      </draw:page>
      <draw:page draw:name="Frontpanel service" draw:style-name="dp1" draw:master-page-name="Default">
        <draw:custom-shape draw:style-name="gr180" draw:text-style-name="P2" draw:layer="layout" svg:width="27.047cm" svg:height="0.7cm" svg:x="1.258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26.989cm" svg:height="0.7cm" svg:x="1.316cm" svg:y="5.8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1" draw:id="id41">
          <draw:glue-point draw:id="4" svg:x="-0.787cm" svg:y="5.055cm"/>
          <draw:glue-point draw:id="5" svg:x="-5.063cm" svg:y="-3.065cm"/>
          <draw:custom-shape draw:style-name="gr182" draw:text-style-name="P10" draw:layer="layout" svg:width="4.363cm" svg:height="1.627cm" svg:x="4.917cm" svg:y="7.2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led_control.</text:span></text:p>
            <text:p text:style-name="P9"><text:span text:style-name="T1">LEDControl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2" draw:layer="layout" svg:width="4.363cm" svg:height="0.671cm" svg:x="4.917cm" svg:y="8.912cm">
            <text:p text:style-name="P11">- stop_evt: Event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2" draw:layer="layout" svg:width="4.363cm" svg:height="2.963cm" svg:x="4.9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turn_on_led()</text:span></text:p>
            <text:p text:style-name="P11"><text:span text:style-name="T3">+ turn_off_led()</text:span></text:p>
            <text:p text:style-name="P11"><text:span text:style-name="T3">+ turn_off_all_leds()</text:span></text:p>
            <text:p text:style-name="P11"><text:span text:style-name="T3">+ turn_off_all_leds()</text:span></text:p>
            <text:p text:style-name="P11"><text:span text:style-name="T3">+ get_led_state()l</text:span></text:p>
            <text:p text:style-name="P11"><text:span text:style-name="T3">+ oneshot_on_led()</text:span></text:p>
            <text:p text:style-name="P11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2" draw:id="id4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185" draw:text-style-name="P4" draw:layer="layout" svg:width="26.896cm" svg:height="1.153cm" svg:x="1.409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6" draw:layer="layout" svg:width="26.896cm" svg:height="0.679cm" svg:x="1.409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7" draw:text-style-name="P31" draw:layer="layout" svg:width="27.204cm" svg:height="0.7cm" svg:x="1.101cm" svg:y="16.147cm">
          <text:p text:style-name="P30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8" draw:text-style-name="P13" draw:layer="layout" draw:line-skew="0.338cm" svg:x1="7.098cm" svg:y1="7.285cm" svg:x2="4.758cm" svg:y2="5.47cm" draw:start-shape="id41" draw:end-shape="id42" draw:end-glue-point="16" svg:d="M7098 7285v-570h-2340v-1245" svg:viewBox="0 0 2341 1816">
          <text:p/>
        </draw:connector>
        <draw:custom-shape draw:style-name="gr189" draw:text-style-name="P8" draw:layer="layout" svg:width="27.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90" draw:text-style-name="P10" draw:layer="layout" svg:width="3.81cm" svg:height="1.627cm" svg:x="9.885cm" svg:y="7.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touch_buttons.</text:span></text:p>
              <text:p text:style-name="P9"><text:span text:style-name="T1">TouchButtons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12" draw:layer="layout" svg:width="3.81cm" svg:height="0.754cm" svg:x="9.885cm" svg:y="8.987cm">
              <text:p text:style-name="P11"><text:span text:style-name="T3">- stop_evt: Event()</text:span></text:p>
              <text:p text:style-name="P11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12" draw:layer="layout" svg:width="3.81cm" svg:height="0.599cm" svg:x="9.885cm" svg:y="9.7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3">
            <draw:custom-shape draw:style-name="gr193" draw:text-style-name="P10" draw:layer="layout" svg:width="5.465cm" svg:height="1.627cm" svg:x="14.55cm" svg:y="7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ing.</text:span></text:p>
              <text:p text:style-name="P9"><text:span text:style-name="T1">BackLighting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2" draw:layer="layout" svg:width="5.465cm" svg:height="1.06cm" svg:x="14.55cm" svg:y="9.047cm">
              <text:p text:style-name="P11">- thread: backlighting_manager</text:p>
              <text:p text:style-name="P11">- runnning: Event(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12" draw:layer="layout" svg:width="5.465cm" svg:height="0.635cm" svg:x="14.55cm" svg:y="10.1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6" draw:text-style-name="P13" draw:layer="layout" draw:line-skew="0.405cm" svg:x1="10.945cm" svg:y1="7.361cm" svg:x2="10.473cm" svg:y2="5.47cm" draw:start-shape="id43" draw:start-glue-point="5" draw:end-shape="id42" draw:end-glue-point="18" svg:d="M10945 7361v-542h-472v-1349" svg:viewBox="0 0 473 1892">
          <text:p/>
        </draw:connector>
        <draw:connector draw:style-name="gr197" draw:text-style-name="P13" draw:layer="layout" svg:x1="19.711cm" svg:y1="7.421cm" svg:x2="18.869cm" svg:y2="5.47cm" draw:start-shape="id44" draw:start-glue-point="15" draw:end-shape="id42" draw:end-glue-point="25" svg:d="M19711 7421v-977h-842v-974" svg:viewBox="0 0 843 1952">
          <text:p/>
        </draw:connector>
        <draw:frame draw:style-name="gr7" draw:text-style-name="P7" draw:layer="layout" svg:width="2.512cm" svg:height="0.725cm" svg:x="3.515cm" svg:y="6.625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custom-shape draw:style-name="gr198" draw:text-style-name="P14" draw:layer="layout" svg:width="27.7cm" svg:height="1.27cm" svg:x="1cm" svg:y="1cm">
          <text:p text:style-name="P1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8" draw:id="id4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99" draw:text-style-name="P10" draw:layer="layout" svg:width="8.255cm" svg:height="1.153cm" svg:x="19.615cm" svg:y="12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12" draw:layer="layout" svg:width="8.255cm" svg:height="0.578cm" svg:x="19.615cm" svg:y="13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12" draw:layer="layout" svg:width="8.255cm" svg:height="1.781cm" svg:x="19.615cm" svg:y="13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6">+ </text:span><text:span text:style-name="T7">read_block</text:span><text:span text:style-name="T6">(device: int, register: int, length: int)</text:span></text:p>
              <text:p text:style-name="P11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02" draw:text-style-name="P10" draw:layer="layout" svg:width="5.397cm" svg:height="1.153cm" svg:x="12.8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light_sensor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2" draw:layer="layout" svg:width="5.397cm" svg:height="0.56cm" svg:x="12.8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2" draw:layer="layout" svg:width="5.397cm" svg:height="0.591cm" svg:x="12.8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5" draw:id="id4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05" draw:text-style-name="P10" draw:layer="layout" svg:width="5.397cm" svg:height="1.153cm" svg:x="18.6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_dac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5.397cm" svg:height="0.632cm" svg:x="18.6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5.397cm" svg:height="0.667cm" svg:x="18.6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08" draw:text-style-name="P21" draw:layer="layout" svg:width="3.175cm" svg:height="1.627cm" svg:x="5.127cm" svg:y="13.5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singleton&gt;&gt;</text:span></text:p>
            <text:p text:style-name="P20"><text:span text:style-name="T1">gpio_service.</text:span></text:p>
            <text:p text:style-name="P20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32" draw:layer="layout" svg:width="3.175cm" svg:height="0.433cm" svg:x="5.127cm" svg:y="15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12" draw:layer="layout" svg:width="3.175cm" svg:height="0.39cm" svg:x="5.127cm" svg:y="15.6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1" draw:text-style-name="P13" draw:layer="layout" draw:line-skew="-2.199cm" svg:x1="18.991cm" svg:y1="17.064cm" svg:x2="19.711cm" svg:y2="10.742cm" draw:start-shape="id45" draw:start-glue-point="4" draw:end-shape="id44" draw:end-glue-point="10" svg:d="M18991 17064v-5361h720v-961" svg:viewBox="0 0 721 6323">
          <text:p/>
        </draw:connector>
        <draw:connector draw:style-name="gr212" draw:text-style-name="P13" draw:layer="layout" draw:line-skew="-2.581cm" svg:x1="17.899cm" svg:y1="17.194cm" svg:x2="18.496cm" svg:y2="10.742cm" draw:start-shape="id46" draw:start-glue-point="15" draw:end-shape="id44" draw:end-glue-point="9" svg:d="M17899 17194v-5808h597v-644" svg:viewBox="0 0 598 6453">
          <text:p/>
        </draw:connector>
        <draw:connector draw:style-name="gr213" draw:text-style-name="P13" draw:layer="layout" draw:line-skew="1.003cm" svg:x1="7.419cm" svg:y1="13.583cm" svg:x2="10.098cm" svg:y2="10.34cm" draw:start-shape="id47" draw:start-glue-point="14" draw:end-shape="id43" draw:end-glue-point="7" svg:d="M7419 13583v-620h2679v-2623" svg:viewBox="0 0 2680 3244">
          <text:p/>
        </draw:connector>
        <draw:connector draw:style-name="gr214" draw:text-style-name="P13" draw:layer="layout" svg:x1="5.304cm" svg:y1="13.583cm" svg:x2="7.098cm" svg:y2="12.546cm" draw:start-shape="id47" draw:start-glue-point="4" draw:end-shape="id41" draw:end-glue-point="2" svg:d="M5304 13583v-520h1794v-517" svg:viewBox="0 0 1795 1038">
          <text:p/>
        </draw:connector>
        <draw:connector draw:style-name="gr215" draw:text-style-name="P13" draw:layer="layout" svg:x1="21.91cm" svg:y1="12.161cm" svg:x2="20.014cm" svg:y2="10.198cm" draw:start-shape="id48" draw:start-glue-point="5" draw:end-shape="id44" draw:end-glue-point="12" svg:d="M21910 12161v-1963h-1896" svg:viewBox="0 0 1897 1964">
          <text:p/>
        </draw:connector>
        <draw:frame draw:style-name="gr7" draw:text-style-name="P7" draw:layer="layout" svg:width="2.512cm" svg:height="0.725cm" svg:x="19.732cm" svg:y="10.525cm">
          <draw:text-box>
            <text:p><text:span text:style-name="T2">&lt;</text:span><text:span text:style-name="T2">&lt;</text:span><text:span text:style-name="T2">h</text:span><text:span text:style-name="T2">a</text:span><text:span text:style-name="T2">s</text:span><text:span text:style-name="T2">&gt;</text:span><text:span text:style-name="T2">&gt;</text:span></text:p>
          </draw:text-box>
        </draw:frame>
        <draw:frame draw:style-name="gr7" draw:text-style-name="P7" draw:layer="layout" svg:width="2.512cm" svg:height="0.725cm" svg:x="10.207cm" svg:y="10.752cm">
          <draw:text-box>
            <text:p><text:span text:style-name="T2">&lt;</text:span><text:span text:style-name="T2">&lt;</text:span><text:span text:style-name="T2">h</text:span><text:span text:style-name="T2">a</text:span><text:span text:style-name="T2">s</text:span><text:span text:style-name="T2">&gt;</text:span><text:span text:style-name="T2">&gt;</text:span></text:p>
          </draw:text-box>
        </draw:frame>
        <draw:frame draw:style-name="gr7" draw:text-style-name="P7" draw:layer="layout" svg:width="2.512cm" svg:height="0.725cm" svg:x="3.24cm" svg:y="12.747cm">
          <draw:text-box>
            <text:p><text:span text:style-name="T2">&lt;</text:span><text:span text:style-name="T2">&lt;</text:span><text:span text:style-name="T2">h</text:span><text:span text:style-name="T2">a</text:span><text:span text:style-name="T2">s</text:span><text:span text:style-name="T2">&gt;</text:span><text:span text:style-name="T2">&gt;</text:span></text:p>
          </draw:text-box>
        </draw:frame>
        <draw:connector draw:style-name="gr216" draw:text-style-name="P13" draw:layer="layout" svg:x1="14cm" svg:y1="12.618cm" svg:x2="12.636cm" svg:y2="10.34cm" draw:start-shape="id49" draw:end-shape="id43" draw:end-glue-point="9" svg:d="M14000 12618v-1140h-1364v-1138" svg:viewBox="0 0 1365 2279">
          <text:p/>
        </draw:connector>
        <draw:frame draw:style-name="gr7" draw:text-style-name="P7" draw:layer="layout" svg:width="2.512cm" svg:height="0.725cm" svg:x="11.823cm" svg:y="11.477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  <draw:glue-point draw:id="4" svg:x="2.472cm" svg:y="-4.993cm"/>
        </draw:frame>
        <draw:g draw:style-name="gr3" xml:id="id49" draw:id="id49">
          <draw:glue-point draw:id="4" svg:x="-4cm" svg:y="-5cm"/>
          <draw:glue-point draw:id="5" svg:x="-3.351cm" svg:y="-5.095cm"/>
          <draw:custom-shape draw:style-name="gr217" draw:text-style-name="P21" draw:layer="layout" svg:width="6.95cm" svg:height="1.153cm" svg:x="10.525cm" svg:y="12.61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8" draw:text-style-name="P12" draw:layer="layout" svg:width="6.95cm" svg:height="0.435cm" svg:x="10.525cm" svg:y="13.7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12" draw:layer="layout" svg:width="6.95cm" svg:height="1.781cm" svg:x="10.525cm" svg:y="14.1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</text:span></text:p>
            <text:p text:style-name="P11"><text:span text:style-name="T3"><text:s text:c="15"/></text:span><text:span text:style-name="T3">message: CommandMessage)</text:span></text:p>
            <text:p text:style-name="P11"><text:span text:style-name="T3">+ put_error_message(</text:span></text:p>
            <text:p text:style-name="P11"><text:span text:style-name="T3"><text:s text:c="15"/></text:span><text:span text:style-name="T3">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0" draw:text-style-name="P28" draw:layer="layout" svg:width="6.35cm" svg:height="2.147cm" svg:x="1.635cm" svg:y="17.51cm">
          <draw:text-box>
            <text:p text:style-name="P33"><text:span text:style-name="T8">W</text:span><text:span text:style-name="T8">a</text:span><text:span text:style-name="T8">a</text:span><text:span text:style-name="T8">r</text:span><text:span text:style-name="T8">o</text:span><text:span text:style-name="T8">m</text:span><text:span text:style-name="T8"> </text:span><text:span text:style-name="T8">b</text:span><text:span text:style-name="T8">a</text:span><text:span text:style-name="T8">c</text:span><text:span text:style-name="T8">k</text:span><text:span text:style-name="T8">l</text:span><text:span text:style-name="T8">i</text:span><text:span text:style-name="T8">g</text:span><text:span text:style-name="T8">h</text:span><text:span text:style-name="T8">t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 </text:span><text:span text:style-name="T8">m</text:span><text:span text:style-name="T8">e</text:span><text:span text:style-name="T8">t</text:span><text:span text:style-name="T8"> </text:span><text:span text:style-name="T8">s</text:span><text:span text:style-name="T8">t</text:span><text:span text:style-name="T8">o</text:span><text:span text:style-name="T8">p</text:span><text:span text:style-name="T8"> </text:span><text:span text:style-name="T8">e</text:span><text:span text:style-name="T8">n</text:span><text:span text:style-name="T8"> </text:span><text:span text:style-name="T8">o</text:span><text:span text:style-name="T8">f</text:span><text:span text:style-name="T8">f</text:span><text:span text:style-name="T8">.</text:span><text:span text:style-name="T8"> </text:span><text:span text:style-name="T8">S</text:span><text:span text:style-name="T8">t</text:span><text:span text:style-name="T8">a</text:span><text:span text:style-name="T8">a</text:span><text:span text:style-name="T8">t</text:span><text:span text:style-name="T8"> </text:span><text:span text:style-name="T8">e</text:span><text:span text:style-name="T8">i</text:span><text:span text:style-name="T8">g</text:span><text:span text:style-name="T8">e</text:span><text:span text:style-name="T8">n</text:span><text:span text:style-name="T8">l</text:span><text:span text:style-name="T8">i</text:span><text:span text:style-name="T8">j</text:span><text:span text:style-name="T8">k</text:span><text:span text:style-name="T8"> </text:span><text:span text:style-name="T8">a</text:span><text:span text:style-name="T8">l</text:span><text:span text:style-name="T8">t</text:span><text:span text:style-name="T8">i</text:span><text:span text:style-name="T8">j</text:span><text:span text:style-name="T8">d</text:span><text:span text:style-name="T8"> </text:span><text:span text:style-name="T8">a</text:span><text:span text:style-name="T8">a</text:span><text:span text:style-name="T8">n</text:span><text:span text:style-name="T8">!</text:span><text:span text:style-name="T8"> </text:span><text:span text:style-name="T8">W</text:span><text:span text:style-name="T8">o</text:span><text:span text:style-name="T8">r</text:span><text:span text:style-name="T8">d</text:span><text:span text:style-name="T8">t</text:span><text:span text:style-name="T8"> </text:span><text:span text:style-name="T8">o</text:span><text:span text:style-name="T8">o</text:span><text:span text:style-name="T8">k</text:span><text:span text:style-name="T8"> </text:span><text:span text:style-name="T8">i</text:span><text:span text:style-name="T8">n</text:span><text:span text:style-name="T8"> </text:span><text:span text:style-name="T8">d</text:span><text:span text:style-name="T8">e</text:span><text:span text:style-name="T8"> </text:span><text:span text:style-name="T8">m</text:span><text:span text:style-name="T8">o</text:span><text:span text:style-name="T8">d</text:span><text:span text:style-name="T8">u</text:span><text:span text:style-name="T8">l</text:span><text:span text:style-name="T8">e</text:span><text:span text:style-name="T8"> </text:span><text:span text:style-name="T8">g</text:span><text:span text:style-name="T8">e</text:span><text:span text:style-name="T8">s</text:span><text:span text:style-name="T8">t</text:span><text:span text:style-name="T8">a</text:span><text:span text:style-name="T8">r</text:span><text:span text:style-name="T8">t</text:span><text:span text:style-name="T8">!</text:span></text:p>
          </draw:text-box>
        </draw:frame>
        <draw:g draw:style-name="gr3" xml:id="id50" draw:id="id5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21" draw:text-style-name="P10" draw:layer="layout" svg:width="4.965cm" svg:height="1.627cm" svg:x="23.322cm" svg:y="7.0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thread&gt;&gt;</text:span></text:p>
              <text:p text:style-name="P9"><text:span text:style-name="T1">backlighting.</text:span></text:p>
              <text:p text:style-name="P9"><text:span text:style-name="T1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2" draw:text-style-name="P12" draw:layer="layout" svg:width="4.965cm" svg:height="0.754cm" svg:x="23.322cm" svg:y="8.694cm">
              <text:p text:style-name="P11">+ running: Event(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2" draw:layer="layout" svg:width="4.965cm" svg:height="0.599cm" svg:x="23.322cm" svg:y="9.4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4" draw:text-style-name="P13" draw:layer="layout" svg:x1="23.323cm" svg:y1="7.703cm" svg:x2="20.014cm" svg:y2="8.056cm" draw:start-shape="id50" draw:start-glue-point="6" draw:end-shape="id44" draw:end-glue-point="13" svg:d="M23323 7703h-1655v353h-1654" svg:viewBox="0 0 3310 354">
          <text:p/>
        </draw:connector>
        <draw:connector draw:style-name="gr225" draw:text-style-name="P13" draw:layer="layout" svg:x1="25.577cm" svg:y1="12.161cm" svg:x2="26.907cm" svg:y2="10.047cm" draw:start-shape="id48" draw:start-glue-point="14" draw:end-shape="id50" draw:end-glue-point="9" svg:d="M25577 12161v-1058h1330v-1056" svg:viewBox="0 0 1331 2115">
          <text:p/>
        </draw:connector>
        <draw:frame draw:style-name="gr7" draw:text-style-name="P7" draw:layer="layout" svg:width="2.512cm" svg:height="0.725cm" svg:x="23.542cm" svg:y="10.117cm">
          <draw:text-box>
            <text:p><text:span text:style-name="T2">&lt;</text:span><text:span text:style-name="T2">&lt;</text:span><text:span text:style-name="T2">u</text:span><text:span text:style-name="T2">s</text:span><text:span text:style-name="T2">e</text:span><text:span text:style-name="T2">s</text:span><text:span text:style-name="T2">&gt;</text:span><text:span text:style-name="T2">&gt;</text:span></text:p>
          </draw:text-box>
        </draw:frame>
        <draw:frame draw:style-name="gr7" draw:text-style-name="P7" draw:layer="layout" svg:width="3.81cm" svg:height="0.725cm" svg:x="20.05cm" svg:y="6.942cm">
          <draw:text-box>
            <text:p><text:span text:style-name="T2">&lt;</text:span><text:span text:style-name="T2">&lt;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s</text:span><text:span text:style-name="T2"> </text:span><text:span text:style-name="T2">o</text:span><text:span text:style-name="T2">f</text:span><text:span text:style-name="T2">&gt;</text:span><text:span text:style-name="T2">&gt;</text:span></text:p>
          </draw:text-box>
        </draw:frame>
        <draw:g draw:style-name="gr3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26" draw:text-style-name="P21" draw:layer="layout" svg:width="3.492cm" svg:height="1.627cm" svg:x="1.2cm" svg:y="9.8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thread&gt;&gt;</text:span></text:p>
            <text:p text:style-name="P20"><text:span text:style-name="T1">led_control.</text:span></text:p>
            <text:p text:style-name="P20"><text:span text:style-name="T1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7" draw:text-style-name="P12" draw:layer="layout" svg:width="3.492cm" svg:height="0.517cm" svg:x="1.2cm" svg:y="11.513cm">
            <text:p text:style-name="P11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8" draw:text-style-name="P12" draw:layer="layout" svg:width="3.492cm" svg:height="0.465cm" svg:x="1.2cm" svg:y="12.0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9" draw:text-style-name="P13" draw:layer="layout" svg:x1="2.171cm" svg:y1="9.887cm" svg:x2="4.917cm" svg:y2="8.303cm" draw:start-shape="id51" draw:start-glue-point="5" draw:end-shape="id41" draw:end-glue-point="5" svg:d="M2171 9887v-1584h2746" svg:viewBox="0 0 2747 1585">
          <text:p/>
        </draw:connector>
        <draw:frame draw:style-name="gr7" draw:text-style-name="P7" draw:layer="layout" svg:width="3.81cm" svg:height="0.725cm" svg:x="1.082cm" svg:y="7.667cm">
          <draw:text-box>
            <text:p><text:span text:style-name="T2">&lt;</text:span><text:span text:style-name="T2">&lt;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s</text:span><text:span text:style-name="T2"> </text:span><text:span text:style-name="T2">o</text:span><text:span text:style-name="T2">f</text:span><text:span text:style-name="T2">&gt;</text:span><text:span text:style-name="T2">&gt;</text:span></text:p>
          </draw:text-box>
        </draw:frame>
      </draw:page>
      <draw:page draw:name="Music Players" draw:style-name="dp1" draw:master-page-name="Default">
        <draw:custom-shape draw:style-name="gr230" draw:text-style-name="P2" draw:layer="layout" svg:width="25.039cm" svg:height="0.7cm" svg:x="1.635cm" svg:y="2.7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2" draw:layer="layout" svg:width="25.091cm" svg:height="0.7cm" svg:x="1.635cm" svg:y="6.1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3" draw:id="id53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32" draw:text-style-name="P4" draw:layer="layout" svg:width="24.873cm" svg:height="1.153cm" svg:x="1.635cm" svg:y="3.7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6" draw:layer="layout" svg:width="24.873cm" svg:height="0.679cm" svg:x="1.635cm" svg:y="4.8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4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3">
            <draw:custom-shape draw:style-name="gr236" draw:text-style-name="P10" draw:layer="layout" svg:width="5.397cm" svg:height="1.153cm" svg:x="10.255cm" svg:y="8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monitor.MPDMonito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5.397cm" svg:height="0.545cm" svg:x="10.255cm" svg:y="9.295cm">
              <text:p text:style-name="P11">- running: Even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2" draw:layer="layout" svg:width="5.397cm" svg:height="0.993cm" svg:x="10.255cm" svg:y="9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39" draw:text-style-name="P10" draw:layer="layout" svg:width="5.397cm" svg:height="1.153cm" svg:x="2.54cm" svg:y="7.7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control.MPD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5.397cm" svg:height="0.674cm" svg:x="2.54cm" svg:y="8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12" draw:layer="layout" svg:width="5.397cm" svg:height="2.569cm" svg:x="2.54cm" svg:y="9.6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+ is_web_radio()</text:span></text:p>
              <text:p text:style-name="P11"><text:span text:style-name="T3">+ next()</text:span></text:p>
              <text:p text:style-name="P11"><text:span text:style-name="T3">+ play()</text:span></text:p>
              <text:p text:style-name="P11"><text:span text:style-name="T3">+ stop()</text:span></text:p>
              <text:p text:style-name="P11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242" draw:text-style-name="P10" draw:layer="layout" svg:width="6.552cm" svg:height="1.153cm" svg:x="20.085cm" svg:y="10.1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potify_connect.SpotifyConnec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12" draw:layer="layout" svg:width="6.552cm" svg:height="0.761cm" svg:x="20.085cm" svg:y="11.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4" draw:text-style-name="P12" draw:layer="layout" svg:width="6.552cm" svg:height="1.387cm" svg:x="20.085cm" svg:y="12.0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play()</text:span></text:p>
              <text:p text:style-name="P11"><text:span text:style-name="T3">+ pause()</text:span></text:p>
              <text:p text:style-name="P11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5" draw:text-style-name="P13" draw:layer="layout" draw:line-skew="0.495cm" svg:x1="11.755cm" svg:y1="8.143cm" svg:x2="9.687cm" svg:y2="5.57cm" draw:start-shape="id52" draw:start-glue-point="5" draw:end-shape="id53" draw:end-glue-point="18" svg:d="M11755 8143v-793h-2068v-1780" svg:viewBox="0 0 2069 2574">
          <text:p/>
        </draw:connector>
        <draw:connector draw:style-name="gr246" draw:text-style-name="P13" draw:layer="layout" draw:line-skew="0.469cm" svg:x1="2.841cm" svg:y1="7.794cm" svg:x2="3.972cm" svg:y2="5.57cm" draw:start-shape="id54" draw:start-glue-point="4" draw:end-shape="id53" draw:end-glue-point="16" svg:d="M2841 7794v-644h1131v-1580" svg:viewBox="0 0 1132 2225">
          <text:p/>
        </draw:connector>
        <draw:connector draw:style-name="gr247" draw:text-style-name="P13" draw:layer="layout" svg:x1="24.817cm" svg:y1="10.118cm" svg:x2="24.811cm" svg:y2="5.57cm" draw:start-shape="id55" draw:start-glue-point="14" draw:end-shape="id53" draw:end-glue-point="42" svg:d="M24817 10118v-2275h-6v-2273" svg:viewBox="0 0 7 4549">
          <text:p/>
        </draw:connector>
        <draw:custom-shape draw:style-name="gr248" draw:text-style-name="P14" draw:layer="layout" svg:width="25.995cm" svg:height="1.205cm" svg:x="1cm" svg:y="1.099cm">
          <text:p text:style-name="P1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54cm" svg:height="0.725cm" svg:x="4.81cm" svg:y="7.26cm">
          <draw:text-box>
            <text:p><text:span text:style-name="T2">&lt;&lt;uses&gt;&gt;</text:span></text:p>
          </draw:text-box>
        </draw:frame>
        <draw:g draw:style-name="gr3" xml:id="id57" draw:id="id57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249" draw:text-style-name="P10" draw:layer="layout" svg:width="5.397cm" svg:height="1.153cm" svg:x="9.603cm" svg:y="15.4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_service.MPDService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12" draw:layer="layout" svg:width="5.397cm" svg:height="0.669cm" svg:x="9.603cm" svg:y="16.601cm">
            <text:p text:style-name="P11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12" draw:layer="layout" svg:width="5.397cm" svg:height="1.387cm" svg:x="9.603cm" svg:y="17.2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get_stats()</text:span></text:p>
            <text:p text:style-name="P11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56" draw:id="id56">
          <draw:custom-shape draw:style-name="gr252" draw:text-style-name="P10" draw:layer="layout" svg:width="3.829cm" svg:height="1.153cm" svg:x="18.443cm" svg:y="13.7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.MPDClient</text:span></text:p>
            <text:p text:style-name="P9"><text:span text:style-name="T1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2" draw:layer="layout" svg:width="3.829cm" svg:height="0.504cm" svg:x="18.443cm" svg:y="14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4" draw:text-style-name="P12" draw:layer="layout" svg:width="3.829cm" svg:height="3.357cm" svg:x="18.443cm" svg:y="15.4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idle()</text:span></text:p>
            <text:p text:style-name="P11"><text:span text:style-name="T3">+ update()</text:span></text:p>
            <text:p text:style-name="P11"><text:span text:style-name="T3">+ next()</text:span></text:p>
            <text:p text:style-name="P11"><text:span text:style-name="T3">+ play()</text:span></text:p>
            <text:p text:style-name="P11"><text:span text:style-name="T3">+ stop()</text:span></text:p>
            <text:p text:style-name="P11"><text:span text:style-name="T3">+ pause()</text:span></text:p>
            <text:p text:style-name="P11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5" draw:text-style-name="P13" draw:layer="layout" svg:x1="18.443cm" svg:y1="16.283cm" svg:x2="15cm" svg:y2="17.052cm" draw:start-shape="id56" draw:start-glue-point="3" draw:end-shape="id57" draw:end-glue-point="1" svg:d="M18443 16283h-1722v769h-1721" svg:viewBox="0 0 3444 770">
          <text:p/>
        </draw:connector>
        <draw:frame draw:style-name="gr7" draw:text-style-name="P7" draw:layer="layout" svg:width="2.83cm" svg:height="0.725cm" svg:x="6.08cm" svg:y="17.102cm">
          <draw:text-box>
            <text:p><text:span text:style-name="T2">&lt;&lt;is A&gt;&gt;</text:span></text:p>
          </draw:text-box>
          <draw:glue-point draw:id="4" svg:x="0.512cm" svg:y="-0.606cm"/>
        </draw:frame>
        <draw:connector draw:style-name="gr256" draw:text-style-name="P13" draw:layer="layout" svg:x1="14.636cm" svg:y1="15.448cm" svg:x2="14.152cm" svg:y2="10.833cm" draw:start-shape="id57" draw:start-glue-point="6" draw:end-shape="id52" draw:end-glue-point="9" svg:d="M14636 15448v-2308h-484v-2307" svg:viewBox="0 0 485 4616">
          <text:p/>
        </draw:connector>
        <draw:connector draw:style-name="gr257" draw:text-style-name="P13" draw:layer="layout" svg:x1="9.603cm" svg:y1="17.052cm" svg:x2="6.437cm" svg:y2="12.189cm" draw:start-shape="id57" draw:start-glue-point="3" draw:end-shape="id54" draw:end-glue-point="9" svg:d="M9603 17052h-3166v-4863" svg:viewBox="0 0 3167 4864">
          <text:p/>
        </draw:connector>
        <draw:frame draw:style-name="gr7" draw:text-style-name="P7" draw:layer="layout" svg:width="2.222cm" svg:height="0.725cm" svg:x="12.33cm" svg:y="11.16cm">
          <draw:text-box>
            <text:p><text:span text:style-name="T2">&lt;&lt;is A&gt;&gt;</text:span></text:p>
          </draw:text-box>
          <draw:glue-point draw:id="4" svg:x="0.512cm" svg:y="-0.606cm"/>
        </draw:frame>
        <draw:frame draw:style-name="gr7" draw:text-style-name="P7" draw:layer="layout" svg:width="3.147cm" svg:height="0.725cm" svg:x="21.665cm" svg:y="7.26cm">
          <draw:text-box>
            <text:p><text:span text:style-name="T2">&lt;&lt;uses&gt;&gt;</text:span></text:p>
          </draw:text-box>
        </draw:frame>
        <draw:connector draw:style-name="gr258" draw:text-style-name="P13" draw:layer="layout" svg:x1="8.869cm" svg:y1="12.347cm" svg:x2="7.936cm" svg:y2="8.429cm" draw:start-shape="id58" draw:start-glue-point="4" draw:end-shape="id54" draw:end-glue-point="13" svg:d="M8869 12347v-3918h-933" svg:viewBox="0 0 934 3919">
          <text:p/>
        </draw:connector>
        <draw:connector draw:style-name="gr259" draw:text-style-name="P13" draw:layer="layout" svg:x1="11.628cm" svg:y1="12.347cm" svg:x2="11.755cm" svg:y2="10.833cm" draw:start-shape="id58" draw:start-glue-point="8" draw:end-shape="id52" draw:end-glue-point="8" svg:d="M11628 12347v-758h127v-756" svg:viewBox="0 0 128 1515">
          <text:p/>
        </draw:connector>
        <draw:connector draw:style-name="gr260" draw:text-style-name="P13" draw:layer="layout" svg:x1="8.869cm" svg:y1="14.724cm" svg:x2="9.603cm" svg:y2="16.193cm" draw:start-shape="id58" draw:start-glue-point="7" draw:end-shape="id57" draw:end-glue-point="7" svg:d="M8869 14724v1469h734" svg:viewBox="0 0 735 1470">
          <text:p/>
        </draw:connector>
        <draw:frame draw:style-name="gr7" draw:text-style-name="P7" draw:layer="layout" svg:width="2.54cm" svg:height="0.725cm" svg:x="7.985cm" svg:y="7.577cm">
          <draw:text-box>
            <text:p><text:span text:style-name="T2">&lt;&lt;uses&gt;&gt;</text:span></text:p>
          </draw:text-box>
        </draw:frame>
        <draw:g draw:style-name="gr3" xml:id="id58" draw:id="id58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61" draw:text-style-name="P21" draw:layer="layout" svg:width="5.173cm" svg:height="1.153cm" svg:x="8.302cm" svg:y="12.34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12" draw:layer="layout" svg:width="5.173cm" svg:height="0.435cm" svg:x="8.302cm" svg:y="1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12" draw:layer="layout" svg:width="5.173cm" svg:height="0.993cm" svg:x="8.302cm" svg:y="13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error_message(</text:span></text:p>
            <text:p text:style-name="P11"><text:span text:style-name="T3">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4" draw:text-style-name="P13" draw:layer="layout" draw:line-skew="0.095cm" svg:x1="13.475cm" svg:y1="13.605cm" svg:x2="20.085cm" svg:y2="11.767cm" draw:start-shape="id58" draw:start-glue-point="1" draw:end-shape="id55" draw:end-glue-point="3" svg:d="M13475 13605h3400v-1838h3210" svg:viewBox="0 0 6611 1839">
          <text:p/>
        </draw:connector>
        <draw:frame draw:style-name="gr7" draw:text-style-name="P7" draw:layer="layout" svg:width="3.81cm" svg:height="0.725cm" svg:x="14.97cm" svg:y="17.42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2.54cm" svg:height="0.725cm" svg:x="16.875cm" svg:y="12.975cm">
          <draw:text-box>
            <text:p><text:span text:style-name="T2">&lt;&lt;uses&gt;&gt;</text:span></text:p>
          </draw:text-box>
        </draw:frame>
        <draw:frame draw:style-name="gr7" draw:text-style-name="P7" draw:layer="layout" svg:width="2.54cm" svg:height="0.725cm" svg:x="7.35cm" svg:y="15.515cm">
          <draw:text-box>
            <text:p><text:span text:style-name="T2">&lt;&lt;uses&gt;&gt;</text:span></text:p>
          </draw:text-box>
        </draw:frame>
        <draw:g draw:style-name="gr3" xml:id="id59" draw:id="id5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65" draw:text-style-name="P21" draw:layer="layout" svg:width="4.538cm" svg:height="1.627cm" svg:x="1.443cm" svg:y="13.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</text:span><text:span text:style-name="T1">&lt;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&gt;</text:span><text:span text:style-name="T1">&gt;</text:span></text:p>
            <text:p text:style-name="P20"><text:span text:style-name="T1">m</text:span><text:span text:style-name="T1">p</text:span><text:span text:style-name="T1">d</text:span><text:span text:style-name="T1">_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.</text:span></text:p>
            <text:p text:style-name="P20"><text:span text:style-name="T1">r</text:span><text:span text:style-name="T1">e</text:span><text:span text:style-name="T1">m</text:span><text:span text:style-name="T1">o</text:span><text:span text:style-name="T1">v</text:span><text:span text:style-name="T1">e</text:span><text:span text:style-name="T1">_</text:span><text:span text:style-name="T1">s</text:span><text:span text:style-name="T1">o</text:span><text:span text:style-name="T1">n</text:span><text:span text:style-name="T1">g</text:span><text:span text:style-name="T1">_</text:span><text:span text:style-name="T1">w</text:span><text:span text:style-name="T1">_</text:span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12" draw:layer="layout" svg:width="4.538cm" svg:height="0.435cm" svg:x="1.443cm" svg:y="15.2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7" draw:text-style-name="P12" draw:layer="layout" svg:width="4.538cm" svg:height="0.993cm" svg:x="1.443cm" svg:y="15.6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8" draw:text-style-name="P13" draw:layer="layout" svg:x1="4.361cm" svg:y1="13.65cm" svg:x2="4.04cm" svg:y2="12.189cm" draw:start-shape="id59" draw:start-glue-point="8" draw:end-shape="id54" draw:end-glue-point="8" svg:d="M4361 13650v-731h-321v-730" svg:viewBox="0 0 322 1462">
          <text:p/>
        </draw:connector>
        <draw:g draw:style-name="gr3" xml:id="id60" draw:id="id60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69" draw:text-style-name="P21" draw:layer="layout" svg:width="4.538cm" svg:height="1.627cm" svg:x="17.292cm" svg:y="7.0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thread&gt;&gt;</text:span></text:p>
            <text:p text:style-name="P20"><text:span text:style-name="T1">mpd_monitor.</text:span></text:p>
            <text:p text:style-name="P20"><text:span text:style-name="T1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0" draw:text-style-name="P12" draw:layer="layout" svg:width="4.538cm" svg:height="0.728cm" svg:x="17.292cm" svg:y="8.662cm">
            <text:p text:style-name="P11">+ running: Ev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1" draw:text-style-name="P12" draw:layer="layout" svg:width="4.538cm" svg:height="0.635cm" svg:x="17.292cm" svg:y="9.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2" draw:text-style-name="P13" draw:layer="layout" svg:x1="17.292cm" svg:y1="8.53cm" svg:x2="15.651cm" svg:y2="8.778cm" draw:start-shape="id60" draw:end-shape="id52" draw:end-glue-point="13" svg:d="M17292 8530h-820v248h-821" svg:viewBox="0 0 1642 2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22T18:04:55.001423214</dc:date>
    <meta:editing-duration>PT12H47M41S</meta:editing-duration>
    <meta:editing-cycles>93</meta:editing-cycles>
    <meta:print-date>2026-04-03T16:45:26.431431754</meta:print-date>
    <dc:creator>Henk</dc:creator>
    <meta:document-statistic meta:object-count="416"/>
  </office:meta>
</office:document-meta>
</file>