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6.54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6.59cm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4.6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16.9cm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35cm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398cm" fo:min-width="27.705cm" fo:padding-top="0.151cm" fo:padding-bottom="0.151cm" fo:padding-left="0.276cm" fo:padding-right="0.276cm" loext:decorative="false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82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3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77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67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427cm" fo:min-width="5.909cm" style:writing-mode="lr-tb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5.6cm" fo:min-width="0cm" loext:decorative="false"/>
    </style:style>
    <style:style style:name="gr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5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5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5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5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5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radio_control" draw:style-name="dp1" draw:master-page-name="Default">
        <draw:custom-shape draw:style-name="gr1" draw:text-style-name="P2" draw:layer="layout" svg:width="27.04cm" svg:height="0.7cm" svg:x="1.9cm" svg:y="1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7.09cm" svg:height="0.7cm" svg:x="1.85cm" svg:y="5.0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4" draw:text-style-name="P4" draw:layer="layout" svg:width="5.08cm" svg:height="1.153cm" svg:x="1.317cm" svg:y="7.25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1">led_control.LEDCon</text:span><text:span text:style-name="T1">trol</text:span></text:p>
            <text:p text:style-name="P3"><text:span text:style-name="T1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.08cm" svg:height="0.671cm" svg:x="1.317cm" svg:y="8.4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5.08cm" svg:height="2.963cm" svg:x="1.317cm" svg:y="9.0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2">+ turn_on_led()</text:span></text:p>
            <text:p text:style-name="P6"><text:span text:style-name="T2">+ turn_off_led()</text:span></text:p>
            <text:p text:style-name="P6"><text:span text:style-name="T2">+ turn_off_all_leds()</text:span></text:p>
            <text:p text:style-name="P6"><text:span text:style-name="T2">+ turn_off_all_leds()</text:span></text:p>
            <text:p text:style-name="P6"><text:span text:style-name="T2">+ get_led_state()l</text:span></text:p>
            <text:p text:style-name="P6"><text:span text:style-name="T2">+ oneshot_on_led()</text:span></text:p>
            <text:p text:style-name="P6"><text:span text:style-name="T2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1" draw:id="id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custom-shape draw:style-name="gr7" draw:text-style-name="P8" draw:layer="layout" svg:width="26.65cm" svg:height="1.153cm" svg:x="2.05cm" svg:y="2.6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7"><text:span text:style-name="T1">oradio_control.py</text:span></text:p>
            <text:p text:style-name="P7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26.65cm" svg:height="0.679cm" svg:x="2.05cm" svg:y="3.7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9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2" draw:layer="layout" svg:width="17.4cm" svg:height="0.7cm" svg:x="1.85cm" svg:y="26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svg:x1="1.601cm" svg:y1="7.343cm" svg:x2="5.276cm" svg:y2="4.47cm" draw:end-shape="id1" draw:end-glue-point="16" svg:d="M1601 7343v-1173h3675v-1700" svg:viewBox="0 0 3676 2874">
          <text:p/>
        </draw:connector>
        <draw:frame draw:style-name="gr11" draw:text-style-name="P12" draw:layer="layout" svg:width="3.147cm" svg:height="0.725cm" svg:x="2.27cm" svg:y="6.307cm">
          <draw:text-box>
            <text:p><text:span text:style-name="T3">&lt;</text:span><text:span text:style-name="T3">&lt;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s</text:span><text:span text:style-name="T3">&gt;</text:span><text:span text:style-name="T3">&gt;</text:span></text:p>
          </draw:text-box>
        </draw:frame>
        <draw:custom-shape draw:style-name="gr12" draw:text-style-name="P13" draw:layer="layout" svg:width="28.257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3" draw:text-style-name="P4" draw:layer="layout" svg:width="5.917cm" svg:height="1.153cm" svg:x="1.12cm" svg:y="13.2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touch_bu</text:span><text:span text:style-name="T1">ttons.Tou</text:span><text:span text:style-name="T1">chButton</text:span><text:span text:style-name="T1">s</text:span></text:p>
              <text:p text:style-name="P3"><text:span text:style-name="T1">&lt;&lt;class&gt;</text:span><text:span text:style-name="T1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5" draw:layer="layout" svg:width="5.917cm" svg:height="0.761cm" svg:x="1.12cm" svg:y="14.358cm">
              <text:p text:style-name="P14"><text:span text:style-name="T2">- shared_queue: </text:span><text:span text:style-name="T2">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5.917cm" svg:height="0.599cm" svg:x="1.12cm" svg:y="15.1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6">+ __init__(queue: Queue)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6" draw:text-style-name="P4" draw:layer="layout" svg:width="5.282cm" svg:height="1.153cm" svg:x="2.378cm" svg:y="16.37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backlighting.B</text:span><text:span text:style-name="T1">ackLighting</text:span></text:p>
              <text:p text:style-name="P3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5" draw:layer="layout" svg:width="5.282cm" svg:height="0.761cm" svg:x="2.378cm" svg:y="17.5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5" draw:layer="layout" svg:width="5.282cm" svg:height="0.803cm" svg:x="2.378cm" svg:y="18.28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9" draw:text-style-name="P4" draw:layer="layout" svg:width="5.397cm" svg:height="1.153cm" svg:x="15.47cm" svg:y="7.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mpd_monitor.MP</text:span><text:span text:style-name="T1">DMonitor</text:span></text:p>
              <text:p text:style-name="P3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5" draw:layer="layout" svg:width="5.397cm" svg:height="0.761cm" svg:x="15.47cm" svg:y="8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5" draw:layer="layout" svg:width="5.397cm" svg:height="0.803cm" svg:x="15.47cm" svg:y="9.4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2" draw:text-style-name="P4" draw:layer="layout" svg:width="5.397cm" svg:height="1.153cm" svg:x="14.97cm" svg:y="10.8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mpd_control.</text:span><text:span text:style-name="T1">MPDControl</text:span></text:p>
              <text:p text:style-name="P3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5" draw:layer="layout" svg:width="5.397cm" svg:height="0.761cm" svg:x="14.97cm" svg:y="11.995cm">
              <text:p text:style-name="P14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5" draw:layer="layout" svg:width="5.397cm" svg:height="2.569cm" svg:x="14.97cm" svg:y="12.75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6"><text:span text:style-name="T2">+ update-</text:span><text:span text:style-name="T2">database()</text:span></text:p>
              <text:p text:style-name="P6"><text:span text:style-name="T2">+ is_web_radio()</text:span></text:p>
              <text:p text:style-name="P6"><text:span text:style-name="T2">+ next()</text:span></text:p>
              <text:p text:style-name="P6"><text:span text:style-name="T2">+ play()</text:span></text:p>
              <text:p text:style-name="P6"><text:span text:style-name="T2">+ stop()</text:span></text:p>
              <text:p text:style-name="P6"><text:span text:style-name="T2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382cm" svg:y="-4.998cm"/>
          <draw:g draw:style-name="gr3">
            <draw:custom-shape draw:style-name="gr25" draw:text-style-name="P4" draw:layer="layout" svg:width="8.775cm" svg:height="1.153cm" svg:x="8.152cm" svg:y="16.2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power_supply</text:span><text:span text:style-name="T1">_control.Powe</text:span><text:span text:style-name="T1">rSupplyServic</text:span><text:span text:style-name="T1">e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5" draw:layer="layout" svg:width="8.775cm" svg:height="0.761cm" svg:x="8.152cm" svg:y="17.3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5" draw:layer="layout" svg:width="8.775cm" svg:height="1.781cm" svg:x="8.152cm" svg:y="18.1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6">+ set_nom_voltage()</text:p>
              <text:p text:style-name="P6">+ set_max_voltage()</text:p>
              <text:p text:style-name="P6">+ set_standby_voltage()</text:p>
              <text:p text:style-name="P6">+ read_status()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28" draw:text-style-name="P4" draw:layer="layout" svg:width="6.552cm" svg:height="1.153cm" svg:x="21.955cm" svg:y="12.25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remote_monitoring.RMService</text:span></text:p>
              <text:p text:style-name="P3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6.552cm" svg:height="0.761cm" svg:x="21.955cm" svg:y="13.4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5" draw:layer="layout" svg:width="6.552cm" svg:height="0.803cm" svg:x="21.955cm" svg:y="14.16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3">
            <draw:custom-shape draw:style-name="gr31" draw:text-style-name="P4" draw:layer="layout" svg:width="6.552cm" svg:height="1.153cm" svg:x="17.602cm" svg:y="16.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spotify_conne</text:span><text:span text:style-name="T1">ct.SpotifyCon</text:span><text:span text:style-name="T1">nect</text:span></text:p>
              <text:p text:style-name="P3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5" draw:layer="layout" svg:width="6.552cm" svg:height="0.761cm" svg:x="17.602cm" svg:y="17.5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5" draw:layer="layout" svg:width="6.552cm" svg:height="0.803cm" svg:x="17.602cm" svg:y="18.2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34" draw:text-style-name="P4" draw:layer="layout" svg:width="5.233cm" svg:height="1.153cm" svg:x="8.867cm" svg:y="7.30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usb_service.U</text:span><text:span text:style-name="T1">SBService</text:span></text:p>
              <text:p text:style-name="P3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5" draw:layer="layout" svg:width="5.233cm" svg:height="0.761cm" svg:x="8.867cm" svg:y="8.461cm">
              <text:p text:style-name="P14"><text:span text:style-name="T2">- shared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5" draw:layer="layout" svg:width="5.233cm" svg:height="1.387cm" svg:x="8.867cm" svg:y="9.22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6"><text:span text:style-name="T2">+ __init__(queue: Queue)</text:span></text:p>
              <text:p text:style-name="P6">+ get_state()</text:p>
              <text:p text:style-name="P6">+ close()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37" draw:text-style-name="P4" draw:layer="layout" svg:width="5.715cm" svg:height="1.153cm" svg:x="8.172cm" svg:y="11.59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web_service.WebService</text:span></text:p>
              <text:p text:style-name="P3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5" draw:layer="layout" svg:width="5.715cm" svg:height="0.761cm" svg:x="8.172cm" svg:y="12.751cm">
              <text:p text:style-name="P14"><text:span text:style-name="T2">- shared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5" draw:layer="layout" svg:width="5.715cm" svg:height="2.175cm" svg:x="8.172cm" svg:y="13.51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6"><text:span text:style-name="T2">+ __init__(queue: Queue)</text:span></text:p>
              <text:p text:style-name="P6"><text:span text:style-name="T2">+ stop()</text:span></text:p>
              <text:p text:style-name="P6"><text:span text:style-name="T2">+ get_state()</text:span></text:p>
              <text:p text:style-name="P6"><text:span text:style-name="T2">+ start()</text:span></text:p>
              <text:p text:style-name="P6"><text:span text:style-name="T2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>
          <draw:custom-shape draw:style-name="gr40" draw:text-style-name="P4" draw:layer="layout" svg:width="4.128cm" svg:height="1.153cm" svg:x="24.177cm" svg:y="7.5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1">system_sounds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5" draw:layer="layout" svg:width="4.128cm" svg:height="0.761cm" svg:x="24.177cm" svg:y="8.685cm">
            <text:p text:style-name="P6"><text:span text:style-name="T2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custom-shape draw:style-name="gr42" draw:text-style-name="P4" draw:layer="layout" svg:width="5.917cm" svg:height="1.153cm" svg:x="12.545cm" svg:y="24.4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1">oradio_logging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" draw:layer="layout" svg:width="5.917cm" svg:height="0.761cm" svg:x="12.545cm" svg:y="25.639cm">
            <text:p text:style-name="P6"><text:span text:style-name="T2">+ oradio_log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custom-shape draw:style-name="gr44" draw:text-style-name="P2" draw:layer="layout" svg:width="6.409cm" svg:height="0.677cm" svg:x="32.24cm" svg:y="9.65cm">
            <text:p text:style-name="P1">Python lay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" draw:layer="layout" svg:width="0.379cm" svg:height="5.85cm" svg:x="31.899cm" svg:y="9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6" draw:text-style-name="P8" draw:layer="layout" svg:width="4.25cm" svg:height="1.153cm" svg:x="33.199cm" svg:y="11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7"><text:span text:style-name="T1">«thread»</text:span></text:p>
            <text:p text:style-name="P7"><text:span text:style-name="T1">Threa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0" draw:layer="layout" svg:width="4.25cm" svg:height="1.387cm" svg:x="33.199cm" svg:y="12.61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9"><text:span text:style-name="T2">Threading.Thread</text:span></text:p>
            <text:p text:style-name="P9"><text:span text:style-name="T2">Threading.Timer</text:span></text:p>
            <text:p text:style-name="P9"><text:span text:style-name="T2">Threading.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8" draw:text-style-name="P11" draw:layer="layout" draw:line-skew="-2.103cm" svg:x1="6.708cm" svg:y1="13.206cm" svg:x2="6.36cm" svg:y2="4.47cm" draw:start-shape="id2" draw:start-glue-point="15" draw:end-shape="id1" draw:end-glue-point="21" svg:d="M6708 13206v-6472h-348v-2264" svg:viewBox="0 0 349 8737">
          <text:p/>
        </draw:connector>
        <draw:connector draw:style-name="gr49" draw:text-style-name="P11" draw:layer="layout" svg:x1="10.322cm" svg:y1="7.309cm" svg:x2="11.024cm" svg:y2="4.47cm" draw:start-shape="id3" draw:start-glue-point="5" draw:end-shape="id1" draw:end-glue-point="23" svg:d="M10322 7309v-1421h702v-1418" svg:viewBox="0 0 703 2840">
          <text:p text:style-name="P15"/>
        </draw:connector>
        <draw:connector draw:style-name="gr50" draw:text-style-name="P11" draw:layer="layout" svg:x1="7.367cm" svg:y1="16.376cm" svg:x2="7.38cm" svg:y2="4.47cm" draw:start-shape="id4" draw:start-glue-point="15" draw:end-shape="id1" draw:end-glue-point="4" svg:d="M7367 16376v-5954h13v-5952" svg:viewBox="0 0 14 11907">
          <text:p/>
        </draw:connector>
        <draw:connector draw:style-name="gr51" draw:text-style-name="P11" draw:layer="layout" svg:x1="8.491cm" svg:y1="11.599cm" svg:x2="8.266cm" svg:y2="4.419cm" draw:start-shape="id5" draw:start-glue-point="4" svg:d="M8491 11599v-3854h-225v-3326" svg:viewBox="0 0 226 7181">
          <text:p/>
        </draw:connector>
        <draw:connector draw:style-name="gr52" draw:text-style-name="P11" draw:layer="layout" draw:line-skew="-3.957cm" svg:x1="14.489cm" svg:y1="16.241cm" svg:x2="12.114cm" svg:y2="4.47cm" draw:start-shape="id6" draw:start-glue-point="14" draw:end-shape="id1" draw:end-glue-point="35" svg:d="M14489 16241v-9844h-2375v-1927" svg:viewBox="0 0 2376 11772">
          <text:p/>
        </draw:connector>
        <draw:connector draw:style-name="gr53" draw:text-style-name="P11" draw:layer="layout" draw:line-skew="0.725cm" svg:x1="16.97cm" svg:y1="7.551cm" svg:x2="20.864cm" svg:y2="4.47cm" draw:start-shape="id7" draw:start-glue-point="5" draw:end-shape="id1" draw:end-glue-point="28" svg:d="M16970 7551v-817h3894v-2264" svg:viewBox="0 0 3895 3082">
          <text:p text:style-name="P15"/>
        </draw:connector>
        <draw:connector draw:style-name="gr54" draw:text-style-name="P11" draw:layer="layout" draw:line-skew="-1.814cm" svg:x1="15.21cm" svg:y1="10.83cm" svg:x2="19.351cm" svg:y2="4.47cm" draw:end-shape="id1" draw:end-glue-point="25" svg:d="M15210 10830v-4731h4141v-1629" svg:viewBox="0 0 4142 6361">
          <text:p/>
        </draw:connector>
        <draw:connector draw:style-name="gr55" draw:text-style-name="P11" draw:layer="layout" draw:line-skew="0.12cm" svg:x1="20.873cm" svg:y1="16.558cm" svg:x2="21.635cm" svg:y2="4.47cm" draw:start-shape="id8" draw:start-glue-point="23" draw:end-shape="id1" draw:end-glue-point="31" svg:d="M20873 16558v-6014h762v-6074" svg:viewBox="0 0 763 12089">
          <text:p/>
        </draw:connector>
        <draw:connector draw:style-name="gr56" draw:text-style-name="P11" draw:layer="layout" svg:x1="22.321cm" svg:y1="12.254cm" svg:x2="25.128cm" svg:y2="4.47cm" draw:start-shape="id9" draw:start-glue-point="4" draw:end-shape="id1" draw:end-glue-point="33" svg:d="M22321 12254v-3893h2807v-3891" svg:viewBox="0 0 2808 778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4-30T18:03:15.142871334</dc:date>
    <meta:editing-duration>PT6H36M42S</meta:editing-duration>
    <meta:editing-cycles>59</meta:editing-cycles>
    <meta:print-date>2026-04-03T16:45:26.431431754</meta:print-date>
    <dc:creator>Henk</dc:creator>
    <meta:document-statistic meta:object-count="79"/>
  </office:meta>
</office:document-meta>
</file>