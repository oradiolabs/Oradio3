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5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8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3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2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>
      <style:graphic-properties draw:textarea-horizontal-align="justify" draw:textarea-vertical-align="middle" draw:auto-grow-height="false" fo:min-height="0.45cm" fo:min-width="19.381cm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45cm" fo:min-width="19.029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45cm" fo:min-width="19.27cm" style:writing-mode="lr-tb" loext:decorative="false"/>
      <style:paragraph-properties style:writing-mode="lr-tb"/>
    </style:style>
    <style:style style:name="gr9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7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5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>
      <style:graphic-properties draw:textarea-horizontal-align="justify" draw:textarea-vertical-align="middle" draw:auto-grow-height="false" fo:min-height="0.45cm" fo:min-width="24.642cm" style:writing-mode="lr-tb" loext:decorative="false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0.45cm" fo:min-width="24.599cm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0.45cm" fo:min-width="24.799cm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5.165cm" fo:padding-top="0.151cm" fo:padding-bottom="0.151cm" fo:padding-left="0.276cm" fo:padding-right="0.276cm" loext:decorative="false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57cm" fo:min-width="5.74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6" style:family="graphic" style:parent-style-name="standard">
      <style:graphic-properties draw:textarea-horizontal-align="justify" draw:textarea-vertical-align="middle" draw:auto-grow-height="false" fo:min-height="0.45cm" fo:min-width="22.677cm" style:writing-mode="lr-tb" loext:decorative="false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45cm" fo:min-width="22.504cm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45cm" fo:min-width="22.753cm" style:writing-mode="lr-tb" loext:decorative="false"/>
      <style:paragraph-properties style:writing-mode="lr-tb"/>
    </style:style>
    <style:style style:name="gr1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3.443cm" fo:padding-top="0.151cm" fo:padding-bottom="0.151cm" fo:padding-left="0.276cm" fo:padding-right="0.276cm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3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7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3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1.32cm" svg:y="6.715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9" draw:text-style-name="P10" draw:layer="layout" svg:width="6.423cm" svg:height="1.153cm" svg:x="16.737cm" svg:y="11.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6.423cm" svg:height="0.761cm" svg:x="16.737cm" svg:y="12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1" draw:layer="layout" svg:width="6.423cm" svg:height="0.803cm" svg:x="16.737cm" svg:y="13.11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" draw:id="id4">
          <draw:glue-point draw:id="4" svg:x="1.153cm" svg:y="-4.294cm"/>
          <draw:glue-point draw:id="5" svg:x="3.461cm" svg:y="-5.146cm"/>
          <draw:custom-shape draw:style-name="gr12" draw:text-style-name="P10" draw:layer="layout" svg:width="4.047cm" svg:height="1.153cm" svg:x="21.82cm" svg:y="8.0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4.047cm" svg:height="0.761cm" svg:x="21.82cm" svg:y="9.185cm">
            <text:p text:style-name="P12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.94cm" svg:y="-4.644cm"/>
          <draw:custom-shape draw:style-name="gr14" draw:text-style-name="P10" draw:layer="layout" svg:width="4.465cm" svg:height="1.153cm" svg:x="14.55cm" svg:y="7.9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4.465cm" svg:height="0.761cm" svg:x="14.55cm" svg:y="9.129cm">
            <text:p text:style-name="P12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13" draw:layer="layout" svg:x1="21.375cm" svg:y1="11.201cm" svg:x2="20.446cm" svg:y2="5.27cm" draw:start-shape="id1" draw:start-glue-point="14" draw:end-shape="id2" draw:end-glue-point="29" svg:d="M21375 11201v-2967h-929v-2964" svg:viewBox="0 0 930 5932">
          <text:p/>
        </draw:connector>
        <draw:connector draw:style-name="gr17" draw:text-style-name="P13" draw:layer="layout" svg:x1="16.782cm" svg:y1="7.976cm" svg:x2="19.33cm" svg:y2="5.27cm" draw:start-shape="id3" draw:end-shape="id2" draw:end-glue-point="30" svg:d="M16782 7976v-1354h2548v-1352" svg:viewBox="0 0 2549 2707">
          <text:p/>
        </draw:connector>
        <draw:connector draw:style-name="gr18" draw:text-style-name="P13" draw:layer="layout" svg:x1="24.309cm" svg:y1="8.168cm" svg:x2="24.874cm" svg:y2="5.27cm" draw:start-shape="id4" draw:start-glue-point="4" draw:end-shape="id2" draw:end-glue-point="39" svg:d="M24309 8168v-1518h565v-1380" svg:viewBox="0 0 566 2899">
          <text:p/>
        </draw:connector>
        <draw:custom-shape draw:style-name="gr19" draw:text-style-name="P14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" draw:id="id5">
          <draw:glue-point draw:id="4" svg:x="1.153cm" svg:y="-4.294cm"/>
          <draw:glue-point draw:id="5" svg:x="3.461cm" svg:y="-5.146cm"/>
          <draw:custom-shape draw:style-name="gr20" draw:text-style-name="P10" draw:layer="controls" svg:width="4.047cm" svg:height="1.153cm" svg:x="23.842cm" svg:y="11.1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controls" svg:width="4.047cm" svg:height="1.262cm" svg:x="23.842cm" svg:y="12.338cm">
            <text:p text:style-name="P12"><text:span text:style-name="T3">+ xxxx</text:span></text:p>
            <text:p text:style-name="P12"><text:span text:style-name="T3">+ xxxx</text:span></text:p>
            <text:p text:style-name="P1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3" draw:layer="controls" svg:x1="27.265cm" svg:y1="11.185cm" svg:x2="26.716cm" svg:y2="5.27cm" draw:start-shape="id5" draw:start-glue-point="5" draw:end-shape="id2" draw:end-glue-point="44" svg:d="M27265 11185v-2958h-549v-2957" svg:viewBox="0 0 550 5916">
          <text:p/>
        </draw:connector>
      </draw:page>
      <draw:page draw:name="Remote monitoring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7" draw:id="id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3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715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25" draw:text-style-name="P10" draw:layer="layout" svg:width="6.423cm" svg:height="1.153cm" svg:x="5.419cm" svg:y="7.4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_</text:span><text:span text:style-name="T1">m</text:span><text:span text:style-name="T1">o</text:span><text:span text:style-name="T1">n</text:span><text:span text:style-name="T1">i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.</text:span><text:span text:style-name="T1">R</text:span><text:span text:style-name="T1">M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  <text:p text:style-name="P9"><text:span text:style-name="T1">&lt;</text:span><text:span text:style-name="T1">&lt;</text:span><text:span text:style-name="T1">c</text:span><text:span text:style-name="T1">l</text:span><text:span text:style-name="T1">a</text:span><text:span text:style-name="T1">s</text:span><text:span text:style-name="T1">s</text:span><text:span text:style-name="T1">&gt;</text:span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1" draw:layer="layout" svg:width="6.423cm" svg:height="0.761cm" svg:x="5.419cm" svg:y="8.625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1" draw:layer="layout" svg:width="6.423cm" svg:height="1.387cm" svg:x="5.419cm" svg:y="9.38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queue: Queue)</text:span></text:p>
              <text:p text:style-name="P12"><text:span text:style-name="T3">+ send_message()</text:span></text:p>
              <text:p text:style-name="P1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8" draw:text-style-name="P13" draw:layer="layout" draw:line-skew="0.345cm" svg:x1="10.057cm" svg:y1="7.473cm" svg:x2="6.854cm" svg:y2="5.27cm" draw:start-shape="id6" draw:start-glue-point="14" draw:end-shape="id7" draw:end-glue-point="4" svg:d="M10057 7473v-758h-3203v-1445" svg:viewBox="0 0 3204 2204">
          <text:p/>
        </draw:connector>
        <draw:custom-shape draw:style-name="gr19" draw:text-style-name="P14" draw:layer="layout" svg:width="27.305cm" svg:height="0.952cm" svg:x="1cm" svg:y="1.1cm">
          <text:p text:style-name="P1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9" draw:text-style-name="P10" draw:layer="layout" svg:width="6.237cm" svg:height="1.153cm" svg:x="19.732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</text:span><text:span text:style-name="T1">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1" draw:layer="layout" svg:width="6.237cm" svg:height="0.584cm" svg:x="19.732cm" svg:y="10.408cm">
              <text:p text:style-name="P12">- rms_queue: Queu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1" draw:layer="layout" svg:width="6.237cm" svg:height="2.569cm" svg:x="19.732cm" svg:y="10.9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</text:span><text:span text:style-name="T3"> </text:span><text:span text:style-name="T3">i</text:span><text:span text:style-name="T3">n</text:span><text:span text:style-name="T3">i</text:span><text:span text:style-name="T3">t</text:span><text:span text:style-name="T3">(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)</text:span></text:p>
              <text:p text:style-name="P12"><text:span text:style-name="T3">+</text:span><text:span text:style-name="T3"> </text:span><text:span text:style-name="T3">g</text:span><text:span text:style-name="T3">e</text:span><text:span text:style-name="T3">t</text:span><text:span text:style-name="T3">_</text:span><text:span text:style-name="T3">s</text:span><text:span text:style-name="T3">t</text:span><text:span text:style-name="T3">a</text:span><text:span text:style-name="T3">t</text:span><text:span text:style-name="T3">e</text:span><text:span text:style-name="T3">(</text:span><text:span text:style-name="T3">)</text:span></text:p>
              <text:p text:style-name="P12"><text:span text:style-name="T3">+</text:span><text:span text:style-name="T3"> </text:span><text:span text:style-name="T3">w</text:span><text:span text:style-name="T3">i</text:span><text:span text:style-name="T3">f</text:span><text:span text:style-name="T3">i</text:span><text:span text:style-name="T3">_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(</text:span><text:span text:style-name="T3">)</text:span></text:p>
              <text:p text:style-name="P12"><text:span text:style-name="T3">+</text:span><text:span text:style-name="T3"> </text:span><text:span text:style-name="T3">w</text:span><text:span text:style-name="T3">i</text:span><text:span text:style-name="T3">f</text:span><text:span text:style-name="T3">i</text:span><text:span text:style-name="T3">_</text:span><text:span text:style-name="T3">d</text:span><text:span text:style-name="T3">i</text:span><text:span text:style-name="T3">s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(</text:span><text:span text:style-name="T3">)</text:span></text:p>
              <text:p text:style-name="P12"><text:span text:style-name="T3">+</text:span><text:span text:style-name="T3"> </text:span><text:span text:style-name="T3">c</text:span><text:span text:style-name="T3">l</text:span><text:span text:style-name="T3">o</text:span><text:span text:style-name="T3">s</text:span><text:span text:style-name="T3">e</text:span><text:span text:style-name="T3">(</text:span><text:span text:style-name="T3">)</text:span></text:p>
              <text:p text:style-name="P12"><text:span text:style-name="T3">-</text:span><text:span text:style-name="T3"> </text:span><text:span text:style-name="T3">s</text:span><text:span text:style-name="T3">e</text:span><text:span text:style-name="T3">n</text:span><text:span text:style-name="T3">d</text:span><text:span text:style-name="T3">_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(</text:span><text:span text:style-name="T3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2" draw:text-style-name="P13" draw:layer="layout" svg:x1="24.236cm" svg:y1="9.256cm" svg:x2="11.841cm" svg:y2="8.108cm" draw:start-shape="id8" draw:start-glue-point="14" draw:end-shape="id6" draw:end-glue-point="13" svg:d="M24236 9256v-1148h-12395" svg:viewBox="0 0 12396 1149">
          <text:p/>
        </draw:connector>
        <draw:frame draw:style-name="gr7" draw:text-style-name="P7" draw:layer="layout" svg:width="3.085cm" svg:height="0.725cm" svg:x="12.52cm" svg:y="9.16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g draw:style-name="gr3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33" draw:text-style-name="P10" draw:layer="layout" svg:width="6.423cm" svg:height="1.153cm" svg:x="2.905cm" svg:y="12.3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</text:span><text:span text:style-name="T1">oring.Heartbe</text:span><text:span text:style-name="T1">a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1" draw:layer="layout" svg:width="6.423cm" svg:height="0.761cm" svg:x="2.905cm" svg:y="13.457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1" draw:layer="layout" svg:width="6.423cm" svg:height="1.387cm" svg:x="2.905cm" svg:y="14.2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queue: Queue)</text:span></text:p>
              <text:p text:style-name="P12"><text:span text:style-name="T3">+ send_message()</text:span></text:p>
              <text:p text:style-name="P1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" draw:text-style-name="P13" draw:layer="layout" svg:x1="5.777cm" svg:y1="10.773cm" svg:x2="7.543cm" svg:y2="12.305cm" draw:start-shape="id6" draw:start-glue-point="7" draw:end-shape="id9" draw:end-glue-point="14" svg:d="M5777 10773v765h1766v767" svg:viewBox="0 0 1767 1533">
          <text:p/>
        </draw:connector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37" draw:text-style-name="P10" draw:layer="layout" svg:width="6.423cm" svg:height="1.153cm" svg:x="10.452cm" svg:y="12.3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</text:span><text:span text:style-name="T1">&gt;&gt;</text:span></text:p>
              <text:p text:style-name="P9"><text:span text:style-name="T1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1" draw:layer="layout" svg:width="6.423cm" svg:height="0.761cm" svg:x="10.452cm" svg:y="13.457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1" draw:layer="layout" svg:width="6.423cm" svg:height="1.387cm" svg:x="10.452cm" svg:y="14.2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Web service" draw:style-name="dp1" draw:master-page-name="Default">
        <draw:custom-shape draw:style-name="gr40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1" draw:id="id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42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uses&gt;&gt;</text:span></text:p>
          </draw:text-box>
        </draw:frame>
        <draw:custom-shape draw:style-name="gr45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6" draw:text-style-name="P10" draw:layer="layout" svg:width="7.324cm" svg:height="1.153cm" svg:x="2.013cm" svg:y="7.4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1" draw:layer="layout" svg:width="7.324cm" svg:height="0.949cm" svg:x="2.013cm" svg:y="8.595cm">
              <text:p text:style-name="P15"><text:span text:style-name="T3">- command_queue: Queue</text:span></text:p>
              <text:p text:style-name="P15"><text:span text:style-name="T3">- web_queue: Queue</text:span></text:p>
              <text:p text:style-name="P15"><text:span text:style-name="T3">+ uvicorn_server: UvicornServer</text:span></text:p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7" draw:layer="layout" svg:width="7.32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6"><text:span text:style-name="T3">+ init(queue: Queue)</text:span></text:p>
              <text:p text:style-name="P16"><text:span text:style-name="T3">+ stop()</text:span></text:p>
              <text:p text:style-name="P16"><text:span text:style-name="T3">+ get_state()</text:span></text:p>
              <text:p text:style-name="P16"><text:span text:style-name="T3">+ start()</text:span></text:p>
              <text:p text:style-name="P16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9" draw:text-style-name="P13" draw:layer="layout" draw:line-skew="0.485cm" svg:x1="4.05cm" svg:y1="7.443cm" svg:x2="3.265cm" svg:y2="5.27cm" draw:start-shape="id10" draw:start-glue-point="5" draw:end-shape="id11" draw:end-glue-point="16" svg:d="M4050 7443v-603h-785v-1570" svg:viewBox="0 0 786 2174">
          <text:p/>
        </draw:connector>
        <draw:custom-shape draw:style-name="gr50" draw:text-style-name="P14" draw:layer="layout" svg:width="24.765cm" svg:height="0.952cm" svg:x="1cm" svg:y="1.1cm">
          <text:p text:style-name="P1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51" draw:text-style-name="P10" draw:layer="layout" svg:width="6.237cm" svg:height="1.153cm" svg:x="11.13cm" svg:y="11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1" draw:layer="layout" svg:width="6.237cm" svg:height="0.473cm" svg:x="11.13cm" svg:y="12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1" draw:layer="layout" svg:width="6.237cm" svg:height="1.781cm" svg:x="11.13cm" svg:y="12.6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app:FastAPI)</text:span></text:p>
              <text:p text:style-name="P12"><text:span text:style-name="T3">+ run()</text:span></text:p>
              <text:p text:style-name="P12"><text:span text:style-name="T3">+ start()</text:span></text:p>
              <text:p text:style-name="P12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54" draw:text-style-name="P10" draw:layer="layout" svg:width="5.602cm" svg:height="1.153cm" svg:x="18.432cm" svg:y="7.594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11" draw:layer="layout" svg:width="5.602cm" svg:height="0.578cm" svg:x="18.432cm" svg:y="8.747cm">
                <text:p text:style-name="P12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11" draw:layer="layout" svg:width="5.602cm" svg:height="2.175cm" svg:x="18.432cm" svg:y="9.3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2"><text:span text:style-name="T3">+ @api_app.get()</text:span></text:p>
                <text:p text:style-name="P12"><text:span text:style-name="T3">+ @api_app.put()</text:span></text:p>
                <text:p text:style-name="P12"><text:span text:style-name="T3">+ @api_app.post()</text:span></text:p>
                <text:p text:style-name="P12"><text:span text:style-name="T3">+ @api_app.api_route()</text:span></text:p>
                <text:p text:style-name="P12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207cm" svg:y="7.577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085cm" svg:height="0.725cm" svg:x="19.187cm" svg:y="13.065cm">
          <draw:text-box>
            <text:p><text:span text:style-name="T2">&lt;&lt;uses&gt;&gt;</text:span></text:p>
          </draw:text-box>
        </draw:frame>
        <draw:connector draw:style-name="gr57" draw:text-style-name="P13" draw:layer="layout" svg:x1="14.248cm" svg:y1="11.063cm" svg:x2="9.336cm" svg:y2="8.078cm" draw:start-shape="id12" draw:start-glue-point="0" draw:end-shape="id10" draw:end-glue-point="13" svg:d="M14248 11063v-2985h-4912" svg:viewBox="0 0 4913 2986">
          <text:p/>
        </draw:connector>
        <draw:connector draw:style-name="gr58" draw:text-style-name="P13" draw:layer="layout" svg:x1="17.366cm" svg:y1="13.926cm" svg:x2="22.478cm" svg:y2="11.495cm" draw:start-shape="id12" draw:start-glue-point="12" draw:end-shape="id13" draw:end-glue-point="9" svg:d="M17366 13926h5112v-2431" svg:viewBox="0 0 5113 2432">
          <text:p/>
        </draw:connector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59" draw:text-style-name="P10" draw:layer="layout" svg:width="6.237cm" svg:height="1.153cm" svg:x="2.183cm" svg:y="13.5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</text:span><text:span text:style-name="T1">i</text:span><text:span text:style-name="T1">f</text:span><text:span text:style-name="T1">i</text:span><text:span text:style-name="T1">_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.</text:span><text:span text:style-name="T1">W</text:span><text:span text:style-name="T1">i</text:span><text:span text:style-name="T1">f</text:span><text:span text:style-name="T1">i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  <text:p text:style-name="P9"><text:span text:style-name="T1">&lt;</text:span><text:span text:style-name="T1">&lt;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&gt;</text:span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1" draw:layer="layout" svg:width="6.237cm" svg:height="0.779cm" svg:x="2.183cm" svg:y="14.66cm">
              <text:p text:style-name="P12">- web_queue: Queu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1" draw:layer="layout" svg:width="6.237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queue: Queue)</text:span></text:p>
              <text:p text:style-name="P12"><text:span text:style-name="T3">+ get_state()</text:span></text:p>
              <text:p text:style-name="P12"><text:span text:style-name="T3">+ wifi_connect()</text:span></text:p>
              <text:p text:style-name="P12"><text:span text:style-name="T3">+ wifi_disconnect()</text:span></text:p>
              <text:p text:style-name="P12"><text:span text:style-name="T3">+ close()</text:span></text:p>
              <text:p text:style-name="P12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2" draw:text-style-name="P13" draw:layer="layout" svg:x1="6.687cm" svg:y1="13.508cm" svg:x2="4.05cm" svg:y2="11.719cm" draw:start-shape="id14" draw:start-glue-point="14" draw:end-shape="id10" draw:end-glue-point="8" svg:d="M6687 13508v-896h-2637v-893" svg:viewBox="0 0 2638 1790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&lt;uses&gt;&gt;</text:span></text:p>
          </draw:text-box>
        </draw:frame>
      </draw:page>
      <draw:page draw:name="USB" draw:style-name="dp1" draw:master-page-name="Default">
        <draw:custom-shape draw:style-name="gr63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6" draw:id="id1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5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7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9.89cm" svg:y="6.715cm">
          <draw:text-box>
            <text:p><text:span text:style-name="T2">&lt;&lt;uses&gt;&gt;</text:span></text:p>
          </draw:text-box>
        </draw:frame>
        <draw:custom-shape draw:style-name="gr68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9" draw:text-style-name="P10" draw:layer="layout" svg:width="6.54cm" svg:height="1.153cm" svg:x="10.812cm" svg:y="8.0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1" draw:layer="layout" svg:width="6.54cm" svg:height="1.329cm" svg:x="10.812cm" svg:y="9.195cm">
              <text:p text:style-name="P15"><text:span text:style-name="T3">- shared_queue: Queue</text:span></text:p>
              <text:p text:style-name="P15"><text:span text:style-name="T3">- usb_observer: USBObserver</text:span></text:p>
              <text:p text:style-name="P15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1" draw:layer="layout" svg:width="6.54cm" svg:height="2.569cm" svg:x="10.812cm" svg:y="10.5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queue: Queue)</text:span></text:p>
              <text:p text:style-name="P12"><text:span text:style-name="T3">+ get_state()</text:span></text:p>
              <text:p text:style-name="P12"><text:span text:style-name="T3">+ close()</text:span></text:p>
              <text:p text:style-name="P12"><text:span text:style-name="T3">- usb_inserted()</text:span></text:p>
              <text:p text:style-name="P12"><text:span text:style-name="T3">- usb_removed()</text:span></text:p>
              <text:p text:style-name="P12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3" draw:layer="layout" svg:x1="12.631cm" svg:y1="8.043cm" svg:x2="10.184cm" svg:y2="5.27cm" draw:start-shape="id15" draw:start-glue-point="5" draw:end-shape="id16" draw:end-glue-point="23" svg:d="M12631 8043v-1388h-2447v-1385" svg:viewBox="0 0 2448 2774">
          <text:p/>
        </draw:connector>
        <draw:custom-shape draw:style-name="gr73" draw:text-style-name="P14" draw:layer="layout" svg:width="26.352cm" svg:height="0.952cm" svg:x="1cm" svg:y="1.1cm">
          <text:p text:style-name="P1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74" draw:text-style-name="P10" draw:layer="layout" svg:width="5.448cm" svg:height="1.153cm" svg:x="2.9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&lt;&lt;singleton&gt;&gt;</text:span></text:p>
                <text:p text:style-name="P9"><text:span text:style-name="T1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5" draw:text-style-name="P11" draw:layer="layout" svg:width="5.448cm" svg:height="0.692cm" svg:x="2.972cm" svg:y="10.712cm">
                <text:p text:style-name="P15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1" draw:layer="layout" svg:width="5.448cm" svg:height="0.993cm" svg:x="2.9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2">+ start()</text:p>
                <text:p text:style-name="P12">+ stop()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3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7" draw:text-style-name="P10" draw:layer="layout" svg:width="5.448cm" svg:height="1.153cm" svg:x="20.0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1" draw:layer="layout" svg:width="5.448cm" svg:height="0.434cm" svg:x="20.0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1" draw:layer="layout" svg:width="5.448cm" svg:height="0.993cm" svg:x="20.0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- on_created()</text:p>
              <text:p text:style-name="P12">- usb_deleted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0" draw:text-style-name="P13" draw:layer="layout" svg:x1="23.985cm" svg:y1="12.152cm" svg:x2="23.099cm" svg:y2="14.302cm" draw:start-shape="id17" draw:start-glue-point="9" draw:end-shape="id18" draw:end-glue-point="14" svg:d="M23985 12152v1074h-886v1076" svg:viewBox="0 0 887 2151">
          <text:p/>
        </draw:connector>
        <draw:g draw:style-name="gr3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1" draw:text-style-name="P10" draw:layer="layout" svg:width="6.718cm" svg:height="1.153cm" svg:x="18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1" draw:layer="layout" svg:width="6.718cm" svg:height="0.366cm" svg:x="18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1" draw:layer="layout" svg:width="6.718cm" svg:height="0.599cm" svg:x="18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+ handle_event(event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4" draw:text-style-name="P13" draw:layer="layout" svg:x1="23.985cm" svg:y1="9.573cm" svg:x2="17.351cm" svg:y2="8.678cm" draw:start-shape="id17" draw:start-glue-point="14" draw:end-shape="id15" draw:end-glue-point="13" svg:d="M23985 9573v-895h-6634" svg:viewBox="0 0 6635 896">
          <text:p/>
        </draw:connector>
        <draw:connector draw:style-name="gr85" draw:text-style-name="P13" draw:layer="layout" svg:x1="6.907cm" svg:y1="9.56cm" svg:x2="10.813cm" svg:y2="8.678cm" draw:start-shape="id19" draw:start-glue-point="14" draw:end-shape="id15" draw:end-glue-point="6" svg:d="M6907 9560v-882h3906" svg:viewBox="0 0 3907 883">
          <text:p/>
        </draw:connector>
        <draw:g draw:style-name="gr3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6" draw:text-style-name="P19" draw:layer="layout" svg:width="6.35cm" svg:height="1.153cm" svg:x="2.2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&lt;&lt;Library&gt;&gt;</text:span></text:p>
              <text:p text:style-name="P18"><text:span text:style-name="T1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1" draw:layer="layout" svg:width="6.35cm" svg:height="0.599cm" svg:x="2.27cm" svg:y="15.165cm"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1" draw:layer="layout" svg:width="6.35cm" svg:height="0.599cm" svg:x="2.2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+ schedule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9" draw:text-style-name="P13" draw:layer="layout" svg:x1="6.856cm" svg:y1="14.012cm" svg:x2="4.487cm" svg:y2="12.397cm" draw:start-shape="id20" draw:start-glue-point="14" draw:end-shape="id19" draw:end-glue-point="8" svg:d="M6856 14012v-808h-2369v-807" svg:viewBox="0 0 2370 1616">
          <text:p/>
        </draw:connector>
        <draw:frame draw:style-name="gr7" draw:text-style-name="P7" draw:layer="layout" svg:width="3.085cm" svg:height="0.725cm" svg:x="1.97cm" svg:y="12.747cm">
          <draw:text-box>
            <text:p><text:span text:style-name="T2">&lt;&lt;uses&gt;&gt;</text:span></text:p>
          </draw:text-box>
        </draw:frame>
        <draw:frame draw:style-name="gr7" draw:text-style-name="P7" draw:layer="layout" svg:width="2.223cm" svg:height="0.725cm" svg:x="23.859cm" svg:y="13.292cm">
          <draw:text-box>
            <text:p><text:span text:style-name="T2">&lt;&lt;is A&gt;&gt;</text:span></text:p>
          </draw:text-box>
        </draw:frame>
        <draw:frame draw:style-name="gr7" draw:text-style-name="P7" draw:layer="layout" svg:width="3.81cm" svg:height="0.725cm" svg:x="20.05cm" svg:y="7.35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81cm" svg:height="0.725cm" svg:x="6.397cm" svg:y="7.667cm">
          <draw:text-box>
            <text:p><text:span text:style-name="T2">&lt;&lt;consists of&gt;&gt;</text:span></text:p>
          </draw:text-box>
        </draw:frame>
      </draw:page>
      <draw:page draw:name="Volume" draw:style-name="dp1" draw:master-page-name="Default">
        <draw:custom-shape draw:style-name="gr90" draw:text-style-name="P2" draw:layer="layout" svg:width="19.881cm" svg:height="0.7cm" svg:x="1.43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9.529cm" svg:height="0.7cm" svg:x="1.55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2" draw:id="id2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2" draw:text-style-name="P4" draw:layer="layout" svg:width="19.595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6" draw:layer="layout" svg:width="19.595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4" draw:text-style-name="P2" draw:layer="layout" svg:width="19.77cm" svg:height="0.7cm" svg:x="1.311cm" svg:y="15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3.54cm" svg:y="7.032cm">
          <draw:text-box>
            <text:p><text:span text:style-name="T2">&lt;&lt;uses&gt;&gt;</text:span></text:p>
          </draw:text-box>
        </draw:frame>
        <draw:custom-shape draw:style-name="gr95" draw:text-style-name="P8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6" draw:text-style-name="P10" draw:layer="layout" svg:width="7.721cm" svg:height="1.153cm" svg:x="4.156cm" svg:y="8.2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1" draw:layer="layout" svg:width="7.721cm" svg:height="0.761cm" svg:x="4.156cm" svg:y="9.378cm">
              <text:p text:style-name="P15"><text:span text:style-name="T3">- comman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1" draw:layer="layout" svg:width="7.721cm" svg:height="0.993cm" svg:x="4.156cm" svg:y="10.1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__init__(queue: Queue)</text:span></text:p>
              <text:p text:style-name="P12"><text:span text:style-name="T3">+ set_notify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9" draw:text-style-name="P13" draw:layer="layout" svg:x1="6.302cm" svg:y1="8.226cm" svg:x2="5.468cm" svg:y2="5.27cm" draw:start-shape="id21" draw:start-glue-point="5" draw:end-shape="id22" draw:end-glue-point="4" svg:d="M6302 8226v-1479h-834v-1477" svg:viewBox="0 0 835 2957">
          <text:p/>
        </draw:connector>
        <draw:custom-shape draw:style-name="gr100" draw:text-style-name="P14" draw:layer="layout" svg:width="20.95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1" draw:text-style-name="P10" draw:layer="layout" svg:width="8.572cm" svg:height="1.153cm" svg:x="10.417cm" svg:y="11.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1" draw:layer="layout" svg:width="8.572cm" svg:height="0.761cm" svg:x="10.417cm" svg:y="12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1" draw:layer="layout" svg:width="8.572cm" svg:height="1.781cm" svg:x="10.417cm" svg:y="13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read_byte(device: int, register: int)</text:span></text:p>
              <text:p text:style-name="P12"><text:span text:style-name="T3">+ write_byte(device: int, register: int)</text:span></text:p>
              <text:p text:style-name="P12"><text:span text:style-name="T4">+ </text:span><text:span text:style-name="T5">read_block</text:span><text:span text:style-name="T4">(device: int, register: int, length: int)</text:span></text:p>
              <text:p text:style-name="P12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4" draw:text-style-name="P13" draw:layer="layout" svg:x1="16.608cm" svg:y1="11.631cm" svg:x2="11.876cm" svg:y2="8.861cm" draw:start-shape="id23" draw:start-glue-point="14" draw:end-shape="id21" draw:end-glue-point="13" svg:d="M16608 11631v-2770h-4732" svg:viewBox="0 0 4733 2771">
          <text:p/>
        </draw:connector>
        <draw:frame draw:style-name="gr7" draw:text-style-name="P7" draw:layer="layout" svg:width="2.512cm" svg:height="0.725cm" svg:x="12.747cm" svg:y="9.255cm">
          <draw:text-box>
            <text:p><text:span text:style-name="T2">&lt;&lt;has&gt;&gt;</text:span></text:p>
          </draw:text-box>
        </draw:frame>
      </draw:page>
      <draw:page draw:name="Power Supply" draw:style-name="dp1" draw:master-page-name="Default">
        <draw:custom-shape draw:style-name="gr105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5" draw:id="id2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07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9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10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1" draw:text-style-name="P10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1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1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set_nom_voltage()</text:span></text:p>
              <text:p text:style-name="P12"><text:span text:style-name="T3">+ set_max_voltage()</text:span></text:p>
              <text:p text:style-name="P12"><text:span text:style-name="T3">+ set_standby_voltage()</text:span></text:p>
              <text:p text:style-name="P12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4" draw:text-style-name="P13" draw:layer="layout" svg:x1="4.255cm" svg:y1="7.989cm" svg:x2="5.403cm" svg:y2="5.27cm" draw:start-shape="id24" draw:start-glue-point="5" draw:end-shape="id25" draw:end-glue-point="4" svg:d="M4255 7989v-1361h1148v-1358" svg:viewBox="0 0 1149 2720">
          <text:p/>
        </draw:connector>
        <draw:custom-shape draw:style-name="gr115" draw:text-style-name="P14" draw:layer="layout" svg:width="20.637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6" draw:text-style-name="P10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1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1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read_byte(device: int, register: int)</text:span></text:p>
              <text:p text:style-name="P12"><text:span text:style-name="T3">+ write_byte(device: int, register: int)</text:span></text:p>
              <text:p text:style-name="P12"><text:span text:style-name="T4">+ </text:span><text:span text:style-name="T5">read_block</text:span><text:span text:style-name="T4">(device: int, register: int, length: int)</text:span></text:p>
              <text:p text:style-name="P12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9" draw:text-style-name="P13" draw:layer="layout" svg:x1="12.361cm" svg:y1="12.728cm" svg:x2="10.747cm" svg:y2="9.757cm" draw:start-shape="id26" draw:start-glue-point="5" draw:end-shape="id24" draw:end-glue-point="1" svg:d="M12361 12728v-2971h-1614" svg:viewBox="0 0 1615 2972">
          <text:p/>
        </draw:connector>
        <draw:frame draw:style-name="gr7" draw:text-style-name="P7" draw:layer="layout" svg:width="2.512cm" svg:height="0.725cm" svg:x="12.747cm" svg:y="11.16cm">
          <draw:text-box>
            <text:p><text:span text:style-name="T2">&lt;&lt;has&gt;&gt;</text:span></text:p>
          </draw:text-box>
        </draw:frame>
      </draw:page>
      <draw:page draw:name="Frontpanel service" draw:style-name="dp1" draw:master-page-name="Default">
        <draw:custom-shape draw:style-name="gr120" draw:text-style-name="P2" draw:layer="layout" svg:width="25.142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" draw:layer="layout" svg:width="25.099cm" svg:height="0.7cm" svg:x="1.301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0.787cm" svg:y="5.055cm"/>
          <draw:custom-shape draw:style-name="gr122" draw:text-style-name="P10" draw:layer="layout" svg:width="5.08cm" svg:height="1.153cm" svg:x="1.717cm" svg:y="7.7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1" draw:layer="layout" svg:width="5.08cm" svg:height="0.671cm" svg:x="1.717cm" svg:y="8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1" draw:layer="layout" svg:width="5.08cm" svg:height="2.963cm" svg:x="1.7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3">+ turn_on_led()</text:span></text:p>
            <text:p text:style-name="P12"><text:span text:style-name="T3">+ turn_off_led()</text:span></text:p>
            <text:p text:style-name="P12"><text:span text:style-name="T3">+ turn_off_all_leds()</text:span></text:p>
            <text:p text:style-name="P12"><text:span text:style-name="T3">+ turn_off_all_leds()</text:span></text:p>
            <text:p text:style-name="P12"><text:span text:style-name="T3">+ get_led_state()l</text:span></text:p>
            <text:p text:style-name="P12"><text:span text:style-name="T3">+ oneshot_on_led()</text:span></text:p>
            <text:p text:style-name="P12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8" draw:id="id2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125" draw:text-style-name="P4" draw:layer="layout" svg:width="25.013cm" svg:height="1.153cm" svg:x="1.387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" draw:layer="layout" svg:width="25.013cm" svg:height="0.679cm" svg:x="1.387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7" draw:text-style-name="P21" draw:layer="layout" svg:width="25.299cm" svg:height="0.7cm" svg:x="1.101cm" svg:y="16.047cm">
          <text:p text:style-name="P20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8" draw:text-style-name="P13" draw:layer="layout" draw:line-skew="0.418cm" svg:x1="4.257cm" svg:y1="7.759cm" svg:x2="3.794cm" svg:y2="5.47cm" draw:start-shape="id27" draw:end-shape="id28" draw:end-glue-point="16" svg:d="M4257 7759v-727h-463v-1562" svg:viewBox="0 0 464 2290">
          <text:p/>
        </draw:connector>
        <draw:custom-shape draw:style-name="gr129" draw:text-style-name="P8" draw:layer="layout" svg:width="25.71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0" draw:text-style-name="P10" draw:layer="layout" svg:width="5.917cm" svg:height="1.153cm" svg:x="7.385cm" svg:y="7.7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11" draw:layer="layout" svg:width="5.917cm" svg:height="0.761cm" svg:x="7.385cm" svg:y="8.938cm">
              <text:p text:style-name="P15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11" draw:layer="layout" svg:width="5.917cm" svg:height="0.599cm" svg:x="7.385cm" svg:y="9.6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__init__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3" draw:text-style-name="P10" draw:layer="layout" svg:width="6.37cm" svg:height="1.153cm" svg:x="14.565cm" svg:y="7.7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11" draw:layer="layout" svg:width="6.37cm" svg:height="0.761cm" svg:x="14.565cm" svg:y="8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11" draw:layer="layout" svg:width="6.37cm" svg:height="0.803cm" svg:x="14.565cm" svg:y="9.61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6" draw:text-style-name="P13" draw:layer="layout" draw:line-skew="0.405cm" svg:x1="9.03cm" svg:y1="7.786cm" svg:x2="9.509cm" svg:y2="5.47cm" draw:start-shape="id29" draw:start-glue-point="5" draw:end-shape="id28" draw:end-glue-point="18" svg:d="M9030 7786v-754h479v-1562" svg:viewBox="0 0 480 2317">
          <text:p/>
        </draw:connector>
        <draw:connector draw:style-name="gr137" draw:text-style-name="P13" draw:layer="layout" draw:line-skew="0.447cm" svg:x1="16.336cm" svg:y1="7.703cm" svg:x2="21.259cm" svg:y2="5.47cm" draw:start-shape="id30" draw:start-glue-point="5" draw:end-shape="id28" draw:end-glue-point="5" svg:d="M16336 7703v-671h4923v-1562" svg:viewBox="0 0 4924 2234">
          <text:p/>
        </draw:connector>
        <draw:frame draw:style-name="gr7" draw:text-style-name="P7" draw:layer="layout" svg:width="3.147cm" svg:height="0.725cm" svg:x="5.155cm" svg:y="6.715cm">
          <draw:text-box>
            <text:p><text:span text:style-name="T2">&lt;&lt;uses&gt;&gt;</text:span></text:p>
          </draw:text-box>
        </draw:frame>
        <draw:custom-shape draw:style-name="gr138" draw:text-style-name="P14" draw:layer="layout" svg:width="25.71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9" draw:text-style-name="P10" draw:layer="layout" svg:width="8.572cm" svg:height="1.153cm" svg:x="17.185cm" svg:y="11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11" draw:layer="layout" svg:width="8.572cm" svg:height="0.578cm" svg:x="17.185cm" svg:y="12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1" draw:layer="layout" svg:width="8.572cm" svg:height="1.781cm" svg:x="17.185cm" svg:y="12.8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read_byte(device: int, register: int)</text:span></text:p>
              <text:p text:style-name="P12"><text:span text:style-name="T3">+ write_byte(device: int, register: int)</text:span></text:p>
              <text:p text:style-name="P12"><text:span text:style-name="T4">+ </text:span><text:span text:style-name="T5">read_block</text:span><text:span text:style-name="T4">(device: int, register: int, length: int)</text:span></text:p>
              <text:p text:style-name="P12"><text:span text:style-name="T4">+ write</text:span><text:span text:style-name="T5">_block</text:span><text:span text:style-name="T4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2" draw:text-style-name="P10" draw:layer="layout" svg:width="5.397cm" svg:height="1.153cm" svg:x="10.2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ight_sensor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11" draw:layer="layout" svg:width="5.397cm" svg:height="0.56cm" svg:x="10.2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1" draw:layer="layout" svg:width="5.397cm" svg:height="0.591cm" svg:x="10.2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5" draw:text-style-name="P10" draw:layer="layout" svg:width="5.397cm" svg:height="1.153cm" svg:x="16.4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1" draw:layer="layout" svg:width="5.397cm" svg:height="0.632cm" svg:x="16.4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11" draw:layer="layout" svg:width="5.397cm" svg:height="0.667cm" svg:x="16.4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48" draw:text-style-name="P23" draw:layer="layout" svg:width="6.203cm" svg:height="1.153cm" svg:x="7.032cm" svg:y="12.9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1">&lt;&lt;singleton&gt;&gt;</text:span></text:p>
            <text:p text:style-name="P22"><text:span text:style-name="T1">gpio_service.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24" draw:layer="layout" svg:width="6.203cm" svg:height="0.666cm" svg:x="7.032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1" draw:layer="layout" svg:width="6.203cm" svg:height="0.599cm" svg:x="7.032cm" svg:y="14.7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1" draw:text-style-name="P13" draw:layer="layout" svg:x1="16.791cm" svg:y1="17.064cm" svg:x2="16.336cm" svg:y2="10.419cm" draw:start-shape="id31" draw:start-glue-point="4" draw:end-shape="id30" draw:end-glue-point="8" svg:d="M16791 17064v-3324h-455v-3321" svg:viewBox="0 0 456 6646">
          <text:p/>
        </draw:connector>
        <draw:connector draw:style-name="gr152" draw:text-style-name="P13" draw:layer="layout" svg:x1="14.099cm" svg:y1="17.194cm" svg:x2="14.921cm" svg:y2="10.419cm" draw:start-shape="id32" draw:start-glue-point="14" draw:end-shape="id30" draw:end-glue-point="7" svg:d="M14099 17194v-3389h822v-3386" svg:viewBox="0 0 823 6776">
          <text:p/>
        </draw:connector>
        <draw:connector draw:style-name="gr153" draw:text-style-name="P13" draw:layer="layout" svg:x1="12.89cm" svg:y1="12.918cm" svg:x2="11.658cm" svg:y2="10.298cm" draw:start-shape="id33" draw:start-glue-point="15" draw:end-shape="id29" draw:end-glue-point="9" svg:d="M12890 12918v-1311h-1232v-1309" svg:viewBox="0 0 1233 2621">
          <text:p/>
        </draw:connector>
        <draw:connector draw:style-name="gr154" draw:text-style-name="P13" draw:layer="layout" svg:x1="7.033cm" svg:y1="14.791cm" svg:x2="4.257cm" svg:y2="12.546cm" draw:start-shape="id33" draw:start-glue-point="11" draw:end-shape="id27" svg:d="M7033 14791h-2776v-2245" svg:viewBox="0 0 2777 2246">
          <text:p/>
        </draw:connector>
        <draw:connector draw:style-name="gr155" draw:text-style-name="P13" draw:layer="layout" svg:x1="25.282cm" svg:y1="11.169cm" svg:x2="20.934cm" svg:y2="8.338cm" draw:start-shape="id34" draw:start-glue-point="15" draw:end-shape="id30" draw:end-glue-point="13" svg:d="M25282 11169v-2831h-4348" svg:viewBox="0 0 4349 2832">
          <text:p/>
        </draw:connector>
        <draw:frame draw:style-name="gr7" draw:text-style-name="P7" draw:layer="layout" svg:width="2.512cm" svg:height="0.725cm" svg:x="21.665cm" svg:y="8.62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2.458cm" svg:y="10.842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.952cm" svg:y="13.382cm">
          <draw:text-box>
            <text:p><text:span text:style-name="T2">&lt;&lt;has&gt;&gt;</text:span></text:p>
          </draw:text-box>
        </draw:frame>
      </draw:page>
      <draw:page draw:name="music_players" draw:style-name="dp1" draw:master-page-name="Default">
        <draw:custom-shape draw:style-name="gr156" draw:text-style-name="P2" draw:layer="layout" svg:width="23.177cm" svg:height="0.7cm" svg:x="1cm" svg:y="2.1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" draw:layer="layout" svg:width="23.004cm" svg:height="0.7cm" svg:x="1.222cm" svg:y="5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6" draw:id="id3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custom-shape draw:style-name="gr158" draw:text-style-name="P4" draw:layer="layout" svg:width="22.63cm" svg:height="1.153cm" svg:x="1.392cm" svg:y="3.3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6" draw:layer="layout" svg:width="22.63cm" svg:height="0.679cm" svg:x="1.392cm" svg:y="4.4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0" draw:text-style-name="P2" draw:layer="layout" svg:width="23.253cm" svg:height="0.7cm" svg:x="0.924cm" svg:y="18.0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8" draw:layer="layout" svg:width="23.995cm" svg:height="17.715cm" svg:x="0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2" draw:text-style-name="P10" draw:layer="layout" svg:width="5.397cm" svg:height="1.153cm" svg:x="7.855cm" svg:y="7.8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1" draw:layer="layout" svg:width="5.397cm" svg:height="0.545cm" svg:x="7.855cm" svg:y="8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1" draw:layer="layout" svg:width="5.397cm" svg:height="0.993cm" svg:x="7.855cm" svg:y="9.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class: MPDService)</text:span></text:p>
              <text:p text:style-name="P12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5" draw:text-style-name="P10" draw:layer="layout" svg:width="5.397cm" svg:height="1.153cm" svg:x="1.84cm" svg:y="7.6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1" draw:layer="layout" svg:width="5.397cm" svg:height="0.674cm" svg:x="1.84cm" svg:y="8.8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1" draw:layer="layout" svg:width="5.397cm" svg:height="2.569cm" svg:x="1.84cm" svg:y="9.5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init(class: MPDService)</text:span></text:p>
              <text:p text:style-name="P12"><text:span text:style-name="T3">+ is_web_radio()</text:span></text:p>
              <text:p text:style-name="P12"><text:span text:style-name="T3">+ next()</text:span></text:p>
              <text:p text:style-name="P12"><text:span text:style-name="T3">+ play()</text:span></text:p>
              <text:p text:style-name="P12"><text:span text:style-name="T3">+ stop()</text:span></text:p>
              <text:p text:style-name="P12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168" draw:text-style-name="P10" draw:layer="layout" svg:width="6.552cm" svg:height="1.153cm" svg:x="15.685cm" svg:y="7.7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1" draw:layer="layout" svg:width="6.552cm" svg:height="0.761cm" svg:x="15.685cm" svg:y="8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1" draw:layer="layout" svg:width="6.552cm" svg:height="1.387cm" svg:x="15.685cm" svg:y="9.6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3">+ play()</text:span></text:p>
              <text:p text:style-name="P12"><text:span text:style-name="T3">+ pause()</text:span></text:p>
              <text:p text:style-name="P12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1" draw:text-style-name="P13" draw:layer="layout" svg:x1="9.355cm" svg:y1="7.843cm" svg:x2="7.937cm" svg:y2="5.126cm" draw:start-shape="id35" draw:start-glue-point="5" draw:end-shape="id36" draw:end-glue-point="40" svg:d="M9355 7843v-1338h-1418v-1379" svg:viewBox="0 0 1419 2718">
          <text:p/>
        </draw:connector>
        <draw:connector draw:style-name="gr172" draw:text-style-name="P13" draw:layer="layout" svg:x1="2.141cm" svg:y1="7.694cm" svg:x2="5.918cm" svg:y2="5.17cm" draw:start-shape="id37" draw:start-glue-point="4" draw:end-shape="id36" draw:end-glue-point="4" svg:d="M2141 7694v-1263h3777v-1261" svg:viewBox="0 0 3778 2525">
          <text:p/>
        </draw:connector>
        <draw:connector draw:style-name="gr173" draw:text-style-name="P13" draw:layer="layout" svg:x1="20.417cm" svg:y1="7.718cm" svg:x2="18.022cm" svg:y2="5.17cm" draw:start-shape="id38" draw:start-glue-point="14" draw:end-shape="id36" draw:end-glue-point="31" svg:d="M20417 7718v-1275h-2395v-1273" svg:viewBox="0 0 2396 2549">
          <text:p/>
        </draw:connector>
        <draw:custom-shape draw:style-name="gr174" draw:text-style-name="P14" draw:layer="layout" svg:width="23.995cm" svg:height="1.205cm" svg:x="0.5cm" svg:y="0.4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147cm" svg:height="0.725cm" svg:x="4.492cm" svg:y="6.625cm">
          <draw:text-box>
            <text:p><text:span text:style-name="T2">&lt;&lt;uses&gt;&gt;</text:span></text:p>
          </draw:text-box>
        </draw:frame>
        <draw:g draw:style-name="gr3" xml:id="id40" draw:id="id40">
          <draw:glue-point draw:id="4" svg:x="4.917cm" svg:y="-2.025cm"/>
          <draw:glue-point draw:id="5" svg:x="3.74cm" svg:y="-5.09cm"/>
          <draw:glue-point draw:id="6" svg:x="4.328cm" svg:y="-5.09cm"/>
          <draw:custom-shape draw:style-name="gr175" draw:text-style-name="P10" draw:layer="layout" svg:width="5.397cm" svg:height="1.153cm" svg:x="3.903cm" svg:y="13.74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_service.MPDService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1" draw:layer="layout" svg:width="5.397cm" svg:height="0.566cm" svg:x="3.903cm" svg:y="14.899cm">
            <text:p text:style-name="P12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1" draw:layer="layout" svg:width="5.397cm" svg:height="1.387cm" svg:x="3.903cm" svg:y="15.4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3">+ init()</text:span></text:p>
            <text:p text:style-name="P12"><text:span text:style-name="T3">+ get_stats()</text:span></text:p>
            <text:p text:style-name="P12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9" draw:id="id39">
          <draw:custom-shape draw:style-name="gr178" draw:text-style-name="P10" draw:layer="layout" svg:width="4.817cm" svg:height="1.153cm" svg:x="11.423cm" svg:y="12.0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.MPDClient</text:span></text:p>
            <text:p text:style-name="P9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1" draw:layer="layout" svg:width="4.817cm" svg:height="0.761cm" svg:x="11.423cm" svg:y="13.1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1" draw:layer="layout" svg:width="4.817cm" svg:height="3.357cm" svg:x="11.423cm" svg:y="13.94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3">+ init()</text:span></text:p>
            <text:p text:style-name="P12"><text:span text:style-name="T3">+ idle()</text:span></text:p>
            <text:p text:style-name="P12"><text:span text:style-name="T3">+ update()</text:span></text:p>
            <text:p text:style-name="P12"><text:span text:style-name="T3">+ next()</text:span></text:p>
            <text:p text:style-name="P12"><text:span text:style-name="T3">+ play()</text:span></text:p>
            <text:p text:style-name="P12"><text:span text:style-name="T3">+ stop()</text:span></text:p>
            <text:p text:style-name="P12"><text:span text:style-name="T3">+ pause()</text:span></text:p>
            <text:p text:style-name="P12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1" draw:text-style-name="P13" draw:layer="layout" svg:x1="11.423cm" svg:y1="14.665cm" svg:x2="9.3cm" svg:y2="15.299cm" draw:start-shape="id39" draw:start-glue-point="3" draw:end-shape="id40" draw:end-glue-point="1" svg:d="M11423 14665h-1062v634h-1061" svg:viewBox="0 0 2124 635">
          <text:p/>
        </draw:connector>
        <draw:frame draw:style-name="gr7" draw:text-style-name="P7" draw:layer="layout" svg:width="2.83cm" svg:height="0.725cm" svg:x="1.98cm" svg:y="12.429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182" draw:text-style-name="P13" draw:layer="layout" svg:x1="8.936cm" svg:y1="13.746cm" svg:x2="9.355cm" svg:y2="10.533cm" draw:start-shape="id40" draw:start-glue-point="6" draw:end-shape="id35" draw:end-glue-point="8" svg:d="M8936 13746v-1607h419v-1606" svg:viewBox="0 0 420 3214">
          <text:p/>
        </draw:connector>
        <draw:connector draw:style-name="gr183" draw:text-style-name="P13" draw:layer="layout" svg:x1="6.601cm" svg:y1="13.746cm" svg:x2="4.538cm" svg:y2="12.089cm" draw:start-shape="id40" draw:end-shape="id37" draw:end-glue-point="2" svg:d="M6601 13746v-829h-2063v-828" svg:viewBox="0 0 2064 1658">
          <text:p/>
        </draw:connector>
        <draw:frame draw:style-name="gr7" draw:text-style-name="P7" draw:layer="layout" svg:width="2.83cm" svg:height="0.725cm" svg:x="9.572cm" svg:y="10.752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7" draw:text-style-name="P7" draw:layer="layout" svg:width="3.147cm" svg:height="0.725cm" svg:x="20.713cm" svg:y="6.625cm">
          <draw:text-box>
            <text:p><text:span text:style-name="T2">&lt;&lt;us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13T18:01:14.976479573</dc:date>
    <meta:editing-duration>PT9H17M46S</meta:editing-duration>
    <meta:editing-cycles>78</meta:editing-cycles>
    <meta:print-date>2026-04-03T16:45:26.431431754</meta:print-date>
    <dc:creator>Henk</dc:creator>
    <meta:document-statistic meta:object-count="279"/>
  </office:meta>
</office:document-meta>
</file>