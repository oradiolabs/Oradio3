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5cm" fo:min-width="26.54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45cm" fo:min-width="26.59cm" style:writing-mode="lr-tb" loext:decorative="false"/>
      <style:paragraph-properties style:writing-mode="lr-tb"/>
    </style:style>
    <style:style style:name="gr3" style:family="graphic">
      <style:graphic-properties style:writing-mode="lr-tb" loext:decorative="false"/>
    </style:style>
    <style:style style:name="gr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62cm" fo:min-width="4.62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45cm" fo:min-width="26.883cm" style:writing-mode="lr-tb" loext:decorative="false"/>
      <style:paragraph-properties style:writing-mode="lr-tb"/>
    </style:style>
    <style:style style:name="gr10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12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9.198cm" fo:min-width="27.705cm" fo:padding-top="0.151cm" fo:padding-bottom="0.151cm" fo:padding-left="0.276cm" fo:padding-right="0.276cm" loext:decorative="false"/>
    </style:style>
    <style:style style:name="gr1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5.46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4.82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8.32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6.09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6.09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4.779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5.26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3.67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4.10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4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5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6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7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8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9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0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1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2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3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4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f6f9d4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f6f9d4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 draw:fill-color="#ffffff"/>
      <style:text-properties fo:font-size="12pt" style:font-size-asian="12pt" style:font-size-complex="12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Oradio_control" draw:style-name="dp1" draw:master-page-name="Default">
        <draw:custom-shape draw:style-name="gr1" draw:text-style-name="P2" draw:layer="layout" svg:width="27.04cm" svg:height="0.7cm" svg:x="1.9cm" svg:y="1.2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7.09cm" svg:height="0.7cm" svg:x="1.85cm" svg:y="4.7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>
          <draw:custom-shape draw:style-name="gr4" draw:text-style-name="P4" draw:layer="layout" svg:width="5.08cm" svg:height="1.153cm" svg:x="1.317cm" svg:y="6.959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3"><text:span text:style-name="T1">led_control.LEDControl</text:span></text:p>
            <text:p text:style-name="P3"><text:span text:style-name="T1">&lt;&lt;class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5.08cm" svg:height="0.671cm" svg:x="1.317cm" svg:y="8.1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5" draw:layer="layout" svg:width="5.08cm" svg:height="2.963cm" svg:x="1.317cm" svg:y="8.78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6"><text:span text:style-name="T2">+ turn_on_led()</text:span></text:p>
            <text:p text:style-name="P6"><text:span text:style-name="T2">+ turn_off_led()</text:span></text:p>
            <text:p text:style-name="P6"><text:span text:style-name="T2">+ turn_off_all_leds()</text:span></text:p>
            <text:p text:style-name="P6"><text:span text:style-name="T2">+ turn_off_all_leds()</text:span></text:p>
            <text:p text:style-name="P6"><text:span text:style-name="T2">+ get_led_state()l</text:span></text:p>
            <text:p text:style-name="P6"><text:span text:style-name="T2">+ oneshot_on_led()</text:span></text:p>
            <text:p text:style-name="P6"><text:span text:style-name="T2">+ control_blinking_led( 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3" xml:id="id1" draw:id="id1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custom-shape draw:style-name="gr7" draw:text-style-name="P8" draw:layer="layout" svg:width="26.65cm" svg:height="1.153cm" svg:x="2.05cm" svg:y="2.33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7"><text:span text:style-name="T1">oradio_control.py</text:span></text:p>
            <text:p text:style-name="P7"><text:span text:style-name="T1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0" draw:layer="layout" svg:width="26.65cm" svg:height="0.679cm" svg:x="2.05cm" svg:y="3.49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9"><text:span text:style-name="T1">+ execute(): 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9" draw:text-style-name="P2" draw:layer="layout" svg:width="27.383cm" svg:height="0.7cm" svg:x="1.317cm" svg:y="19.6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1" draw:layer="layout" svg:x1="1.601cm" svg:y1="7.043cm" svg:x2="5.276cm" svg:y2="4.17cm" draw:end-shape="id1" draw:end-glue-point="16" svg:d="M1601 7043v-1173h3675v-1700" svg:viewBox="0 0 3676 2874">
          <text:p/>
        </draw:connector>
        <draw:frame draw:style-name="gr11" draw:text-style-name="P12" draw:layer="layout" svg:width="3.147cm" svg:height="0.725cm" svg:x="2.27cm" svg:y="6.007cm">
          <draw:text-box>
            <text:p><text:span text:style-name="T3">&lt;&lt;creates&gt;&gt;</text:span></text:p>
          </draw:text-box>
        </draw:frame>
        <draw:custom-shape draw:style-name="gr12" draw:text-style-name="P13" draw:layer="layout" svg:width="28.257cm" svg:height="19.5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2" draw:id="id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13" draw:text-style-name="P4" draw:layer="layout" svg:width="5.917cm" svg:height="1.153cm" svg:x="1.12cm" svg:y="12.405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3"><text:span text:style-name="T1">touch_buttons.TouchButtons</text:span></text:p>
              <text:p text:style-name="P3"><text:span text:style-name="T1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" draw:text-style-name="P5" draw:layer="layout" svg:width="5.917cm" svg:height="0.761cm" svg:x="1.12cm" svg:y="13.558cm">
              <text:p text:style-name="P14"><text:span text:style-name="T2">- shared_queue: Queu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5" draw:layer="layout" svg:width="5.917cm" svg:height="0.599cm" svg:x="1.12cm" svg:y="14.319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6"><text:span text:style-name="T2">+ __init__(queue: Queue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3" xml:id="id4" draw:id="id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16" draw:text-style-name="P4" draw:layer="layout" svg:width="5.282cm" svg:height="1.153cm" svg:x="2.378cm" svg:y="15.475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3"><text:span text:style-name="T1">backlighting.BackLighting</text:span></text:p>
              <text:p text:style-name="P3"><text:span text:style-name="T1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5" draw:layer="layout" svg:width="5.282cm" svg:height="0.761cm" svg:x="2.378cm" svg:y="16.62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" draw:text-style-name="P5" draw:layer="layout" svg:width="5.282cm" svg:height="0.803cm" svg:x="2.378cm" svg:y="17.389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3" xml:id="id7" draw:id="id7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19" draw:text-style-name="P4" draw:layer="layout" svg:width="5.397cm" svg:height="1.153cm" svg:x="15.67cm" svg:y="6.95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3"><text:span text:style-name="T1">mpd_monitor.MPDMonitor</text:span></text:p>
              <text:p text:style-name="P3"><text:span text:style-name="T1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" draw:text-style-name="P5" draw:layer="layout" svg:width="5.397cm" svg:height="0.761cm" svg:x="15.67cm" svg:y="8.1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" draw:text-style-name="P5" draw:layer="layout" svg:width="5.397cm" svg:height="0.803cm" svg:x="15.67cm" svg:y="8.86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22" draw:text-style-name="P4" draw:layer="layout" svg:width="5.397cm" svg:height="1.153cm" svg:x="14.97cm" svg:y="10.34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3"><text:span text:style-name="T1">mpd_control.MPDControl</text:span></text:p>
              <text:p text:style-name="P3"><text:span text:style-name="T1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5" draw:layer="layout" svg:width="5.397cm" svg:height="0.761cm" svg:x="14.97cm" svg:y="11.4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5" draw:layer="layout" svg:width="5.397cm" svg:height="2.569cm" svg:x="14.97cm" svg:y="12.256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6"><text:span text:style-name="T2">+ update-database()</text:span></text:p>
              <text:p text:style-name="P6"><text:span text:style-name="T2">+ is_web_radio()</text:span></text:p>
              <text:p text:style-name="P6"><text:span text:style-name="T2">+ next()</text:span></text:p>
              <text:p text:style-name="P6"><text:span text:style-name="T2">+ play()</text:span></text:p>
              <text:p text:style-name="P6"><text:span text:style-name="T2">+ stop()</text:span></text:p>
              <text:p text:style-name="P6"><text:span text:style-name="T2">+ paus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3" xml:id="id6" draw:id="id6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1.382cm" svg:y="-4.998cm"/>
          <draw:g draw:style-name="gr3">
            <draw:custom-shape draw:style-name="gr25" draw:text-style-name="P4" draw:layer="layout" svg:width="8.775cm" svg:height="1.153cm" svg:x="8.152cm" svg:y="15.54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3"><text:span text:style-name="T1">power_supply_control.PowerSupplyService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" draw:text-style-name="P5" draw:layer="layout" svg:width="8.775cm" svg:height="0.761cm" svg:x="8.152cm" svg:y="16.69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7" draw:text-style-name="P5" draw:layer="layout" svg:width="8.775cm" svg:height="1.781cm" svg:x="8.152cm" svg:y="17.45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6"><text:span text:style-name="T2">+ set_nom_voltage()</text:span></text:p>
              <text:p text:style-name="P6"><text:span text:style-name="T2">+ set_max_voltage()</text:span></text:p>
              <text:p text:style-name="P6"><text:span text:style-name="T2">+ set_standby_voltage()</text:span></text:p>
              <text:p text:style-name="P6"><text:span text:style-name="T2">+ read_status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3" xml:id="id9" draw:id="id9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2.753cm" svg:y="5.097cm"/>
          <draw:g draw:style-name="gr3">
            <draw:custom-shape draw:style-name="gr28" draw:text-style-name="P4" draw:layer="layout" svg:width="6.552cm" svg:height="1.153cm" svg:x="21.555cm" svg:y="12.653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3"><text:span text:style-name="T1">remote_monitoring.RMService</text:span></text:p>
              <text:p text:style-name="P3"><text:span text:style-name="T1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5" draw:layer="layout" svg:width="6.552cm" svg:height="0.761cm" svg:x="21.555cm" svg:y="13.8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" draw:text-style-name="P5" draw:layer="layout" svg:width="6.552cm" svg:height="0.803cm" svg:x="21.555cm" svg:y="14.567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3" xml:id="id8" draw:id="id8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0.009cm" svg:y="-4.346cm"/>
          <draw:glue-point draw:id="24" svg:x="3.714cm" svg:y="-5.101cm"/>
          <draw:g draw:style-name="gr3">
            <draw:custom-shape draw:style-name="gr31" draw:text-style-name="P4" draw:layer="layout" svg:width="6.552cm" svg:height="1.153cm" svg:x="17.602cm" svg:y="15.98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3"><text:span text:style-name="T1">spotify_connect.SpotifyConnect</text:span></text:p>
              <text:p text:style-name="P3"><text:span text:style-name="T1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5" draw:layer="layout" svg:width="6.552cm" svg:height="0.761cm" svg:x="17.602cm" svg:y="17.1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5" draw:layer="layout" svg:width="6.552cm" svg:height="1.387cm" svg:x="17.602cm" svg:y="17.89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6">+ play()</text:p>
              <text:p text:style-name="P6">+ pause()</text:p>
              <text:p text:style-name="P6">+ get_state()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3" xml:id="id3" draw:id="id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34" draw:text-style-name="P4" draw:layer="layout" svg:width="5.233cm" svg:height="1.153cm" svg:x="8.867cm" svg:y="6.708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3"><text:span text:style-name="T1">usb_service.USBService</text:span></text:p>
              <text:p text:style-name="P3"><text:span text:style-name="T1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5" draw:layer="layout" svg:width="5.233cm" svg:height="0.761cm" svg:x="8.867cm" svg:y="7.861cm">
              <text:p text:style-name="P14"><text:span text:style-name="T2">- shared_queue: Queu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5" draw:layer="layout" svg:width="5.233cm" svg:height="1.387cm" svg:x="8.867cm" svg:y="8.622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6"><text:span text:style-name="T2">+ __init__(queue: Queue)</text:span></text:p>
              <text:p text:style-name="P6"><text:span text:style-name="T2">+ get_state()</text:span></text:p>
              <text:p text:style-name="P6"><text:span text:style-name="T2">+ clos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3" xml:id="id5" draw:id="id5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37" draw:text-style-name="P4" draw:layer="layout" svg:width="5.715cm" svg:height="1.153cm" svg:x="8.172cm" svg:y="10.798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3"><text:span text:style-name="T1">web_service.WebService</text:span></text:p>
              <text:p text:style-name="P3"><text:span text:style-name="T1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8" draw:text-style-name="P5" draw:layer="layout" svg:width="5.715cm" svg:height="0.761cm" svg:x="8.172cm" svg:y="11.951cm">
              <text:p text:style-name="P14"><text:span text:style-name="T2">- shared_queue: Queu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9" draw:text-style-name="P5" draw:layer="layout" svg:width="5.715cm" svg:height="2.175cm" svg:x="8.172cm" svg:y="12.712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6"><text:span text:style-name="T2">+ __init__(queue: Queue)</text:span></text:p>
              <text:p text:style-name="P6"><text:span text:style-name="T2">+ stop()</text:span></text:p>
              <text:p text:style-name="P6"><text:span text:style-name="T2">+ get_state()</text:span></text:p>
              <text:p text:style-name="P6"><text:span text:style-name="T2">+ start()</text:span></text:p>
              <text:p text:style-name="P6"><text:span text:style-name="T2">+ clos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3" xml:id="id11" draw:id="id11">
          <draw:glue-point draw:id="4" svg:x="1.153cm" svg:y="-4.294cm"/>
          <draw:glue-point draw:id="5" svg:x="3.461cm" svg:y="-5.146cm"/>
          <draw:custom-shape draw:style-name="gr40" draw:text-style-name="P4" draw:layer="layout" svg:width="4.128cm" svg:height="1.153cm" svg:x="24.177cm" svg:y="6.93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3"><text:span text:style-name="T1">system_sounds.py</text:span></text:p>
            <text:p text:style-name="P3"><text:span text:style-name="T1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5" draw:layer="layout" svg:width="4.128cm" svg:height="0.761cm" svg:x="24.177cm" svg:y="8.085cm">
            <text:p text:style-name="P6"><text:span text:style-name="T2">+ play_sound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3" xml:id="id10" draw:id="id10">
          <draw:glue-point draw:id="4" svg:x="-3.94cm" svg:y="-4.644cm"/>
          <draw:custom-shape draw:style-name="gr42" draw:text-style-name="P4" draw:layer="layout" svg:width="4.555cm" svg:height="1.153cm" svg:x="23.06cm" svg:y="9.857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3"><text:span text:style-name="T1">oradio_logging.py</text:span></text:p>
            <text:p text:style-name="P3"><text:span text:style-name="T1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5" draw:layer="layout" svg:width="4.555cm" svg:height="0.761cm" svg:x="23.06cm" svg:y="11.01cm">
            <text:p text:style-name="P6"><text:span text:style-name="T2">+ oradio_log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44" draw:text-style-name="P11" draw:layer="layout" draw:line-skew="-2.103cm" svg:x1="6.708cm" svg:y1="12.406cm" svg:x2="6.36cm" svg:y2="4.17cm" draw:start-shape="id2" draw:start-glue-point="15" draw:end-shape="id1" draw:end-glue-point="21" svg:d="M6708 12406v-6222h-348v-2014" svg:viewBox="0 0 349 8237">
          <text:p/>
        </draw:connector>
        <draw:connector draw:style-name="gr45" draw:text-style-name="P11" draw:layer="layout" svg:x1="10.322cm" svg:y1="6.709cm" svg:x2="11.024cm" svg:y2="4.17cm" draw:start-shape="id3" draw:start-glue-point="5" draw:end-shape="id1" draw:end-glue-point="23" svg:d="M10322 6709v-1271h702v-1268" svg:viewBox="0 0 703 2540">
          <text:p/>
        </draw:connector>
        <draw:connector draw:style-name="gr46" draw:text-style-name="P11" draw:layer="layout" svg:x1="7.367cm" svg:y1="15.476cm" svg:x2="7.38cm" svg:y2="4.17cm" draw:start-shape="id4" draw:start-glue-point="15" draw:end-shape="id1" draw:end-glue-point="4" svg:d="M7367 15476v-5654h13v-5652" svg:viewBox="0 0 14 11307">
          <text:p/>
        </draw:connector>
        <draw:connector draw:style-name="gr47" draw:text-style-name="P11" draw:layer="layout" svg:x1="8.491cm" svg:y1="10.799cm" svg:x2="8.266cm" svg:y2="4.119cm" draw:start-shape="id5" draw:start-glue-point="4" svg:d="M8491 10799v-3604h-225v-3076" svg:viewBox="0 0 226 6681">
          <text:p/>
        </draw:connector>
        <draw:connector draw:style-name="gr48" draw:text-style-name="P11" draw:layer="layout" draw:line-skew="-3.957cm" svg:x1="14.489cm" svg:y1="15.541cm" svg:x2="12.114cm" svg:y2="4.17cm" draw:start-shape="id6" draw:start-glue-point="14" draw:end-shape="id1" draw:end-glue-point="35" svg:d="M14489 15541v-9644h-2375v-1727" svg:viewBox="0 0 2376 11372">
          <text:p/>
        </draw:connector>
        <draw:connector draw:style-name="gr49" draw:text-style-name="P11" draw:layer="layout" draw:line-skew="0.725cm" svg:x1="17.17cm" svg:y1="6.951cm" svg:x2="20.864cm" svg:y2="4.17cm" draw:start-shape="id7" draw:start-glue-point="5" draw:end-shape="id1" draw:end-glue-point="28" svg:d="M17170 6951v-667h3694v-2114" svg:viewBox="0 0 3695 2782">
          <text:p/>
        </draw:connector>
        <draw:connector draw:style-name="gr50" draw:text-style-name="P11" draw:layer="layout" draw:line-skew="-1.814cm" svg:x1="15.21cm" svg:y1="10.53cm" svg:x2="19.351cm" svg:y2="4.17cm" draw:end-shape="id1" draw:end-glue-point="25" svg:d="M15210 10530v-4731h4141v-1629" svg:viewBox="0 0 4142 6361">
          <text:p/>
        </draw:connector>
        <draw:connector draw:style-name="gr51" draw:text-style-name="P11" draw:layer="layout" draw:line-skew="0.12cm" svg:x1="20.873cm" svg:y1="16.196cm" svg:x2="21.635cm" svg:y2="4.17cm" draw:start-shape="id8" draw:start-glue-point="23" draw:end-shape="id1" draw:end-glue-point="31" svg:d="M20873 16196v-6002h762v-6024" svg:viewBox="0 0 763 12027">
          <text:p/>
        </draw:connector>
        <draw:connector draw:style-name="gr52" draw:text-style-name="P11" draw:layer="layout" svg:x1="21.921cm" svg:y1="12.654cm" svg:x2="22.269cm" svg:y2="4.17cm" draw:start-shape="id9" draw:start-glue-point="4" draw:end-shape="id1" draw:end-glue-point="7" svg:d="M21921 12654v-4243h348v-4241" svg:viewBox="0 0 349 8485">
          <text:p/>
        </draw:connector>
        <draw:connector draw:style-name="gr53" draw:text-style-name="P11" draw:layer="layout" svg:x1="23.543cm" svg:y1="9.926cm" svg:x2="23.223cm" svg:y2="4.17cm" draw:start-shape="id10" draw:start-glue-point="4" draw:end-shape="id1" draw:end-glue-point="5" svg:d="M23543 9926v-2913h-320v-2843" svg:viewBox="0 0 321 5757">
          <text:p/>
        </draw:connector>
        <draw:connector draw:style-name="gr54" draw:text-style-name="P11" draw:layer="layout" svg:x1="26.716cm" svg:y1="7.068cm" svg:x2="25.763cm" svg:y2="4.17cm" draw:start-shape="id11" draw:start-glue-point="4" draw:end-shape="id1" draw:end-glue-point="39" svg:d="M26716 7068v-1518h-953v-1380" svg:viewBox="0 0 954 2899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Navigation" svg:viewBox="0 0 786 1228" svg:d="M151 1228l-76-25-75-25 318-952 76-226 75 226 317 952-76 25-75 25-162-486v462h-80-79v-464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3T16:23:47.322558208</meta:creation-date>
    <meta:generator>LibreOffice/24.2.7.2$Linux_X86_64 LibreOffice_project/420$Build-2</meta:generator>
    <dc:date>2026-05-01T17:40:28.456699496</dc:date>
    <meta:editing-duration>PT7H25M8S</meta:editing-duration>
    <meta:editing-cycles>61</meta:editing-cycles>
    <meta:print-date>2026-04-03T16:45:26.431431754</meta:print-date>
    <dc:creator>Henk</dc:creator>
    <meta:document-statistic meta:object-count="75"/>
  </office:meta>
</office:document-meta>
</file>