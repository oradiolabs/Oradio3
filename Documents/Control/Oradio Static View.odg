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4.298cm" fo:min-width="12.88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69cm" fo:min-width="12.783cm" fo:padding-top="0.151cm" fo:padding-bottom="0.151cm" fo:padding-left="0.276cm" fo:padding-right="0.276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45cm" fo:min-width="16.541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45cm" fo:min-width="16.239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45cm" fo:min-width="16.446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4.203cm" fo:min-width="18.18cm" fo:padding-top="0.151cm" fo:padding-bottom="0.151cm" fo:padding-left="0.276cm" fo:padding-right="0.276cm" loext:decorative="false"/>
    </style:style>
    <style:style style:name="gr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3.59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18.18cm" fo:padding-top="0.151cm" fo:padding-bottom="0.151cm" fo:padding-left="0.276cm" fo:padding-right="0.276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868cm" fo:min-width="4.0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0.45cm" fo:min-width="21.589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45cm" fo:min-width="21.197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45cm" fo:min-width="21.465cm" style:writing-mode="lr-tb" loext:decorative="false"/>
      <style:paragraph-properties style:writing-mode="lr-tb"/>
    </style:style>
    <style:style style:name="gr2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2.943cm" fo:padding-top="0.151cm" fo:padding-bottom="0.151cm" fo:padding-left="0.276cm" fo:padding-right="0.276cm" loext:decorative="false"/>
    </style:style>
    <style:style style:name="gr25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2.943cm" fo:padding-top="0.151cm" fo:padding-bottom="0.151cm" fo:padding-left="0.276cm" fo:padding-right="0.276cm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8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82cm" fo:min-width="7.16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828cm" fo:min-width="5.18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199cm" fo:min-width="6.116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9.366cm" fo:min-width="9.70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9.608cm" fo:padding-top="0.151cm" fo:padding-bottom="0.151cm" fo:padding-left="0.276cm" fo:padding-right="0.276cm" style:writing-mode="lr-tb" loext:decorative="false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45cm" fo:min-width="26.007cm" style:writing-mode="lr-tb" loext:decorative="false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45cm" fo:min-width="25.537cm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0.45cm" fo:min-width="25.859cm" style:writing-mode="lr-tb" loext:decorative="false"/>
      <style:paragraph-properties style:writing-mode="lr-tb"/>
    </style:style>
    <style:style style:name="gr4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6.753cm" fo:padding-top="0.151cm" fo:padding-bottom="0.151cm" fo:padding-left="0.276cm" fo:padding-right="0.276cm" loext:decorative="false"/>
    </style:style>
    <style:style style:name="gr4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6.753cm" fo:padding-top="0.151cm" fo:padding-bottom="0.151cm" fo:padding-left="0.276cm" fo:padding-right="0.276cm" style:writing-mode="lr-tb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10.35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551cm" fo:min-width="4.311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551cm" fo:min-width="4.309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433cm" fo:min-width="4.312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613cm" fo:min-width="4.312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465cm" fo:min-width="4.309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433cm" fo:min-width="4.309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498cm" fo:min-width="4.309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548cm" fo:min-width="4.312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363cm" fo:min-width="4.312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551cm" fo:min-width="4.312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551cm" fo:min-width="4.309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551cm" fo:min-width="4.309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551cm" fo:min-width="4.312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551cm" fo:min-width="4.309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551cm" fo:min-width="4.312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551cm" fo:min-width="4.309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551cm" fo:min-width="4.312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551cm" fo:min-width="4.309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551cm" fo:min-width="4.311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5.456cm" fo:min-width="7.48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7.386cm" fo:padding-top="0.151cm" fo:padding-bottom="0.151cm" fo:padding-left="0.276cm" fo:padding-right="0.276cm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648cm" fo:min-width="6.533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648cm" fo:min-width="6.533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648cm" fo:min-width="6.533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648cm" fo:min-width="6.533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648cm" fo:min-width="6.533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2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3" style:family="graphic" style:parent-style-name="standard">
      <style:graphic-properties draw:textarea-horizontal-align="justify" draw:textarea-vertical-align="middle" draw:auto-grow-height="false" fo:min-height="0.45cm" fo:min-width="19.373cm" style:writing-mode="lr-tb" loext:decorative="false"/>
      <style:paragraph-properties style:writing-mode="lr-tb"/>
    </style:style>
    <style:style style:name="gr84" style:family="graphic" style:parent-style-name="standard">
      <style:graphic-properties draw:textarea-horizontal-align="justify" draw:textarea-vertical-align="middle" draw:auto-grow-height="false" fo:min-height="0.45cm" fo:min-width="19.202cm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7" style:family="graphic" style:parent-style-name="standard">
      <style:graphic-properties draw:textarea-horizontal-align="justify" draw:textarea-vertical-align="middle" draw:auto-grow-height="false" fo:min-height="0.45cm" fo:min-width="19.445cm" style:writing-mode="lr-tb" loext:decorative="false"/>
      <style:paragraph-properties style:writing-mode="lr-tb"/>
    </style:style>
    <style:style style:name="gr8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0.403cm" fo:padding-top="0.151cm" fo:padding-bottom="0.151cm" fo:padding-left="0.276cm" fo:padding-right="0.276cm" loext:decorative="false"/>
    </style:style>
    <style:style style:name="gr8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1cm" fo:min-width="5.96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0.403cm" fo:padding-top="0.151cm" fo:padding-bottom="0.151cm" fo:padding-left="0.276cm" fo:padding-right="0.276cm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1cm" fo:min-width="3.99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3.99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3.72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5" style:family="graphic" style:parent-style-name="standard" style:list-style-name="L1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6" style:family="graphic" style:parent-style-name="standard">
      <style:graphic-properties draw:textarea-horizontal-align="justify" draw:textarea-vertical-align="middle" draw:auto-grow-height="false" fo:min-height="0.45cm" fo:min-width="23.089cm" style:writing-mode="lr-tb" loext:decorative="false"/>
      <style:paragraph-properties style:writing-mode="lr-tb"/>
    </style:style>
    <style:style style:name="gr107" style:family="graphic" style:parent-style-name="standard">
      <style:graphic-properties draw:textarea-horizontal-align="justify" draw:textarea-vertical-align="middle" draw:auto-grow-height="false" fo:min-height="0.45cm" fo:min-width="22.952cm" style:writing-mode="lr-tb" loext:decorative="false"/>
      <style:paragraph-properties style:writing-mode="lr-tb"/>
    </style:style>
    <style:style style:name="gr10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0" style:family="graphic" style:parent-style-name="standard">
      <style:graphic-properties draw:textarea-horizontal-align="justify" draw:textarea-vertical-align="middle" draw:auto-grow-height="false" fo:min-height="0.45cm" fo:min-width="23.243cm" style:writing-mode="lr-tb" loext:decorative="false"/>
      <style:paragraph-properties style:writing-mode="lr-tb"/>
    </style:style>
    <style:style style:name="gr11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4.213cm" fo:padding-top="0.151cm" fo:padding-bottom="0.151cm" fo:padding-left="0.276cm" fo:padding-right="0.276cm" loext:decorative="false"/>
    </style:style>
    <style:style style:name="gr1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4cm" fo:min-width="5.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4.213cm" fo:padding-top="0.151cm" fo:padding-bottom="0.151cm" fo:padding-left="0.276cm" fo:padding-right="0.276cm" style:writing-mode="lr-tb" loext:decorative="false"/>
      <style:paragraph-properties style:writing-mode="lr-tb"/>
    </style:style>
    <style:style style:name="gr1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64cm" fo:min-width="4.3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7cm" fo:min-width="5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4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cm" fo:min-width="4.39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8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4cm" fo:min-width="5.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4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64cm" fo:min-width="4.3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7cm" fo:min-width="5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2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cm" fo:min-width="4.39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6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7" style:family="graphic" style:parent-style-name="standard">
      <style:graphic-properties draw:textarea-horizontal-align="justify" draw:textarea-vertical-align="middle" draw:auto-grow-height="false" fo:min-height="0.45cm" fo:min-width="25.053cm" style:writing-mode="lr-tb" loext:decorative="false"/>
      <style:paragraph-properties style:writing-mode="lr-tb"/>
    </style:style>
    <style:style style:name="gr148" style:family="graphic" style:parent-style-name="standard">
      <style:graphic-properties draw:textarea-horizontal-align="justify" draw:textarea-vertical-align="middle" draw:auto-grow-height="false" fo:min-height="0.45cm" fo:min-width="24.902cm" style:writing-mode="lr-tb" loext:decorative="false"/>
      <style:paragraph-properties style:writing-mode="lr-tb"/>
    </style:style>
    <style:style style:name="gr14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1" style:family="graphic" style:parent-style-name="standard">
      <style:graphic-properties draw:textarea-horizontal-align="justify" draw:textarea-vertical-align="middle" draw:auto-grow-height="false" fo:min-height="0.45cm" fo:min-width="25.224cm" style:writing-mode="lr-tb" loext:decorative="false"/>
      <style:paragraph-properties style:writing-mode="lr-tb"/>
    </style:style>
    <style:style style:name="gr15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5.8cm" fo:padding-top="0.151cm" fo:padding-bottom="0.151cm" fo:padding-left="0.276cm" fo:padding-right="0.276cm" loext:decorative="false"/>
    </style:style>
    <style:style style:name="gr15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66cm" fo:min-width="6.08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6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5.8cm" fo:padding-top="0.151cm" fo:padding-bottom="0.151cm" fo:padding-left="0.276cm" fo:padding-right="0.276cm" style:writing-mode="lr-tb" loext:decorative="false"/>
      <style:paragraph-properties style:writing-mode="lr-tb"/>
    </style:style>
    <style:style style:name="gr15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83cm" fo:min-width="4.99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5cm" fo:min-width="4.99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4" style:family="graphic" style:parent-style-name="standard" style:list-style-name="L1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57cm" fo:min-width="6.26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cm" fo:min-width="5.8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3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4" style:family="graphic" style:parent-style-name="standard">
      <style:graphic-properties draw:textarea-horizontal-align="justify" draw:textarea-vertical-align="middle" draw:auto-grow-height="false" fo:min-height="0.45cm" fo:min-width="19.698cm" style:writing-mode="lr-tb" loext:decorative="false"/>
      <style:paragraph-properties style:writing-mode="lr-tb"/>
    </style:style>
    <style:style style:name="gr175" style:family="graphic" style:parent-style-name="standard">
      <style:graphic-properties draw:textarea-horizontal-align="justify" draw:textarea-vertical-align="middle" draw:auto-grow-height="false" fo:min-height="0.45cm" fo:min-width="19.585cm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8" style:family="graphic" style:parent-style-name="standard">
      <style:graphic-properties draw:textarea-horizontal-align="justify" draw:textarea-vertical-align="middle" draw:auto-grow-height="false" fo:min-height="0.45cm" fo:min-width="19.826cm" style:writing-mode="lr-tb" loext:decorative="false"/>
      <style:paragraph-properties style:writing-mode="lr-tb"/>
    </style:style>
    <style:style style:name="gr17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4.838cm" fo:min-width="20.403cm" fo:padding-top="0.151cm" fo:padding-bottom="0.151cm" fo:padding-left="0.276cm" fo:padding-right="0.276cm" loext:decorative="false"/>
    </style:style>
    <style:style style:name="gr18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38cm" fo:min-width="6.23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3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1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8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89" style:family="graphic" style:parent-style-name="standard">
      <style:graphic-properties draw:textarea-horizontal-align="justify" draw:textarea-vertical-align="middle" draw:auto-grow-height="false" fo:min-height="0.45cm" fo:min-width="19.065cm" style:writing-mode="lr-tb" loext:decorative="false"/>
      <style:paragraph-properties style:writing-mode="lr-tb"/>
    </style:style>
    <style:style style:name="gr190" style:family="graphic" style:parent-style-name="standard">
      <style:graphic-properties draw:textarea-horizontal-align="justify" draw:textarea-vertical-align="middle" draw:auto-grow-height="false" fo:min-height="0.45cm" fo:min-width="18.718cm" style:writing-mode="lr-tb" loext:decorative="false"/>
      <style:paragraph-properties style:writing-mode="lr-tb"/>
    </style:style>
    <style:style style:name="gr19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3" style:family="graphic" style:parent-style-name="standard">
      <style:graphic-properties draw:textarea-horizontal-align="justify" draw:textarea-vertical-align="middle" draw:auto-grow-height="false" fo:min-height="0.45cm" fo:min-width="18.956cm" style:writing-mode="lr-tb" loext:decorative="false"/>
      <style:paragraph-properties style:writing-mode="lr-tb"/>
    </style:style>
    <style:style style:name="gr19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0.085cm" fo:padding-top="0.151cm" fo:padding-bottom="0.151cm" fo:padding-left="0.276cm" fo:padding-right="0.276cm" loext:decorative="false"/>
    </style:style>
    <style:style style:name="gr19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37cm" fo:min-width="5.77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8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0.085cm" fo:padding-top="0.151cm" fo:padding-bottom="0.151cm" fo:padding-left="0.276cm" fo:padding-right="0.276cm" style:writing-mode="lr-tb" loext:decorative="false"/>
      <style:paragraph-properties style:writing-mode="lr-tb"/>
    </style:style>
    <style:style style:name="gr20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62cm" fo:min-width="5.26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3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308cm" fo:min-width="5.7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8" style:family="graphic" style:parent-style-name="standard">
      <style:graphic-properties draw:textarea-horizontal-align="justify" draw:textarea-vertical-align="middle" draw:auto-grow-height="false" fo:min-height="0.45cm" fo:min-width="26.321cm" style:writing-mode="lr-tb" loext:decorative="false"/>
      <style:paragraph-properties style:writing-mode="lr-tb"/>
    </style:style>
    <style:style style:name="gr209" style:family="graphic" style:parent-style-name="standard">
      <style:graphic-properties draw:textarea-horizontal-align="justify" draw:textarea-vertical-align="middle" draw:auto-grow-height="false" fo:min-height="0.45cm" fo:min-width="25.846cm" style:writing-mode="lr-tb" loext:decorative="false"/>
      <style:paragraph-properties style:writing-mode="lr-tb"/>
    </style:style>
    <style:style style:name="gr2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2" style:family="graphic" style:parent-style-name="standard">
      <style:graphic-properties draw:textarea-horizontal-align="justify" draw:textarea-vertical-align="middle" draw:auto-grow-height="false" fo:min-height="0.45cm" fo:min-width="26.172cm" style:writing-mode="lr-tb" loext:decorative="false"/>
      <style:paragraph-properties style:writing-mode="lr-tb"/>
    </style:style>
    <style:style style:name="gr21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7.148cm" fo:padding-top="0.151cm" fo:padding-bottom="0.151cm" fo:padding-left="0.276cm" fo:padding-right="0.276cm" loext:decorative="false"/>
    </style:style>
    <style:style style:name="gr2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76cm" fo:min-width="9.26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7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7.148cm" fo:padding-top="0.151cm" fo:padding-bottom="0.151cm" fo:padding-left="0.276cm" fo:padding-right="0.276cm" style:writing-mode="lr-tb" loext:decorative="false"/>
      <style:paragraph-properties style:writing-mode="lr-tb"/>
    </style:style>
    <style:style style:name="gr2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245cm" fo:min-width="6.21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85cm" fo:min-width="6.21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699cm" fo:min-width="10.97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85cm" fo:min-width="6.21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2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3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4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5cm" fo:min-width="8.53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0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1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5" style:family="graphic" style:parent-style-name="standard">
      <style:graphic-properties draw:textarea-horizontal-align="justify" draw:textarea-vertical-align="middle" draw:auto-grow-height="false" fo:min-height="0.45cm" fo:min-width="26.547cm" style:writing-mode="lr-tb" loext:decorative="false"/>
      <style:paragraph-properties style:writing-mode="lr-tb"/>
    </style:style>
    <style:style style:name="gr246" style:family="graphic" style:parent-style-name="standard">
      <style:graphic-properties draw:textarea-horizontal-align="justify" draw:textarea-vertical-align="middle" draw:auto-grow-height="false" fo:min-height="0.45cm" fo:min-width="26.489cm" style:writing-mode="lr-tb" loext:decorative="false"/>
      <style:paragraph-properties style:writing-mode="lr-tb"/>
    </style:style>
    <style:style style:name="gr24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2cm" fo:min-width="3.9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2" style:family="graphic" style:parent-style-name="standard">
      <style:graphic-properties draw:textarea-horizontal-align="justify" draw:textarea-vertical-align="middle" draw:auto-grow-height="false" fo:min-height="0.45cm" fo:min-width="26.704cm" style:writing-mode="lr-tb" loext:decorative="false"/>
      <style:paragraph-properties style:writing-mode="lr-tb"/>
    </style:style>
    <style:style style:name="gr253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398cm" fo:min-width="27.148cm" fo:padding-top="0.151cm" fo:padding-bottom="0.151cm" fo:padding-left="0.276cm" fo:padding-right="0.276cm" loext:decorative="false"/>
    </style:style>
    <style:style style:name="gr25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45cm" fo:min-width="3.35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51cm" fo:min-width="5.0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1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2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68cm" fo:min-width="27.148cm" fo:padding-top="0.151cm" fo:padding-bottom="0.151cm" fo:padding-left="0.276cm" fo:padding-right="0.276cm" style:writing-mode="lr-tb" loext:decorative="false"/>
      <style:paragraph-properties style:writing-mode="lr-tb"/>
    </style:style>
    <style:style style:name="gr26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69cm" fo:min-width="7.80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51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23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4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1" style:family="graphic" style:parent-style-name="standard">
      <style:graphic-properties draw:stroke="none" svg:stroke-color="#000000" draw:fill="none" draw:fill-color="#ffffff" draw:auto-grow-height="true" draw:auto-grow-width="false" fo:min-height="1.897cm" loext:decorative="false"/>
      <style:paragraph-properties style:writing-mode="lr-tb"/>
    </style:style>
    <style:style style:name="gr28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45cm" fo:min-width="4.5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6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08cm" fo:min-width="3.03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91" style:family="graphic" style:parent-style-name="standard">
      <style:graphic-properties draw:textarea-horizontal-align="justify" draw:textarea-vertical-align="middle" draw:auto-grow-height="false" fo:min-height="0.45cm" fo:min-width="24.539cm" style:writing-mode="lr-tb" loext:decorative="false"/>
      <style:paragraph-properties style:writing-mode="lr-tb"/>
    </style:style>
    <style:style style:name="gr292" style:family="graphic" style:parent-style-name="standard">
      <style:graphic-properties draw:textarea-horizontal-align="justify" draw:textarea-vertical-align="middle" draw:auto-grow-height="false" fo:min-height="0.45cm" fo:min-width="24.591cm" style:writing-mode="lr-tb" loext:decorative="false"/>
      <style:paragraph-properties style:writing-mode="lr-tb"/>
    </style:style>
    <style:style style:name="gr29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5" style:family="graphic" style:parent-style-name="standard">
      <style:graphic-properties draw:textarea-horizontal-align="justify" draw:textarea-vertical-align="middle" draw:auto-grow-height="false" fo:min-height="0.45cm" fo:min-width="24.324cm" style:writing-mode="lr-tb" loext:decorative="false"/>
      <style:paragraph-properties style:writing-mode="lr-tb"/>
    </style:style>
    <style:style style:name="gr29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413cm" fo:min-width="25.443cm" fo:padding-top="0.151cm" fo:padding-bottom="0.151cm" fo:padding-left="0.276cm" fo:padding-right="0.276cm" loext:decorative="false"/>
    </style:style>
    <style:style style:name="gr29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36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5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09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6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7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8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03cm" fo:min-width="25.443cm" fo:padding-top="0.151cm" fo:padding-bottom="0.151cm" fo:padding-left="0.276cm" fo:padding-right="0.276cm" style:writing-mode="lr-tb" loext:decorative="false"/>
      <style:paragraph-properties style:writing-mode="lr-tb"/>
    </style:style>
    <style:style style:name="gr3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95cm" fo:min-width="3.37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7" style:family="graphic" style:parent-style-name="standard" style:list-style-name="L1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8" style:family="graphic" style:parent-style-name="standard" style:list-style-name="L1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4.08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19cm" fo:min-width="4.08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  <style:text-properties fo:font-size="12pt"/>
    </style:style>
    <style:style style:name="P6" style:family="paragraph">
      <loext:graphic-properties draw:fill="none"/>
      <style:paragraph-properties fo:text-align="center"/>
      <style:text-properties fo:font-size="12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6f9d4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/>
      <style:paragraph-properties fo:text-align="center" style:writing-mode="lr-tb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afafa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text-align="start"/>
      <style:text-properties fo:font-size="12pt"/>
    </style:style>
    <style:style style:name="P29" style:family="paragraph">
      <loext:graphic-properties draw:fill="none"/>
      <style:paragraph-properties fo:text-align="start" style:writing-mode="lr-tb"/>
      <style:text-properties fo:font-size="12pt"/>
    </style:style>
    <style:style style:name="P3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text-align="start"/>
      <style:text-properties fo:font-size="12pt" style:font-size-asian="12pt" style:font-size-complex="12pt"/>
    </style:style>
    <style:style style:name="P3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none" draw:fill-color="#ffffff"/>
      <style:text-properties fo:color="#c9211e" loext:opacity="100%" fo:font-size="12pt" style:font-size-asian="12pt" style:font-size-complex="12pt"/>
    </style:style>
    <style:style style:name="P43" style:family="paragraph">
      <style:text-properties fo:font-size="12pt" style:font-size-asian="12pt" style:font-size-complex="12pt"/>
    </style:style>
    <style:style style:name="P44" style:family="paragraph">
      <style:paragraph-properties fo:text-align="start"/>
    </style:style>
    <style:style style:name="P45" style:family="paragraph">
      <style:paragraph-properties fo:text-align="start" style:writing-mode="lr-tb"/>
    </style:style>
    <style:style style:name="P4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c9211e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Utilities" draw:style-name="dp1" draw:master-page-name="Default">
        <draw:g draw:style-name="gr1">
          <draw:custom-shape draw:style-name="gr2" draw:text-style-name="P2" draw:layer="layout" svg:width="3.175cm" svg:height="0.679cm" svg:x="3.135cm" svg:y="7.244cm">
            <draw:glue-point draw:id="4" svg:x="0.5cm" svg:y="0cm" draw:align="top-left"/>
            <text:p text:style-name="P1"><text:span text:style-name="T1">&lt;&lt;Module&gt;&gt; <text:s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3.335cm" svg:height="4.507cm" svg:x="3.135cm" svg:y="7.923cm">
            <draw:glue-point draw:id="4" svg:x="0.501cm" svg:y="-0.003cm" draw:align="bottom-left" draw:escape-direction="down"/>
            <draw:glue-point draw:id="5" svg:x="-0.501cm" svg:y="-0.003cm" draw:align="bottom-right" draw:escape-direction="down"/>
            <draw:glue-point draw:id="6" svg:x="0cm" svg:y="-0.252cm" draw:align="bottom-left" draw:escape-direction="left"/>
            <draw:glue-point draw:id="7" svg:x="0cm" svg:y="-0.252cm" draw:align="bottom-right" draw:escape-direction="right"/>
            <draw:glue-point draw:id="8" svg:x="0cm" svg:y="0.23cm" draw:align="top-left" draw:escape-direction="left"/>
            <draw:glue-point draw:id="9" svg:x="0cm" svg:y="0.23cm" draw:align="top-right" draw:escape-direction="up"/>
            <draw:glue-point draw:id="10" svg:x="-0.501cm" svg:y="0cm" draw:align="top-right" draw:escape-direction="up"/>
            <text:p text:style-name="P3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draw:layer="layout" svg:width="13.335cm" svg:height="1.271cm" svg:x="3.135cm" svg:y="12.429cm">
            <text:p text:style-name="P5">Every modules/classes can use these utilities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8" draw:layer="layout" svg:width="17.041cm" svg:height="0.7cm" svg:x="1.421cm" svg:y="2.35cm">
          <text:p text:style-name="P7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6.739cm" svg:height="0.7cm" svg:x="1.518cm" svg:y="5.65cm">
          <text:p text:style-name="P7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2" draw:id="id2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glue-point draw:id="45" svg:x="-2.202cm" svg:y="5.141cm"/>
          <draw:glue-point draw:id="46" svg:x="-2.202cm" svg:y="5.141cm"/>
          <draw:custom-shape draw:style-name="gr7" draw:text-style-name="P10" draw:layer="layout" svg:width="16.796cm" svg:height="1.153cm" svg:x="1.515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9"><text:span text:style-name="T2">oradio_control.py</text:span></text:p>
            <text:p text:style-name="P9"><text:span text:style-name="T2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16.796cm" svg:height="0.679cm" svg:x="1.515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3"><text:span text:style-name="T2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8" draw:layer="layout" svg:width="16.946cm" svg:height="0.7cm" svg:x="1.516cm" svg:y="15.287cm">
          <text:p text:style-name="P7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18.732cm" svg:height="14.505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1" draw:id="id1">
          <draw:glue-point draw:id="4" svg:x="1.153cm" svg:y="-4.294cm"/>
          <draw:glue-point draw:id="5" svg:x="3.461cm" svg:y="-5.146cm"/>
          <draw:custom-shape draw:style-name="gr11" draw:text-style-name="P14" draw:layer="layout" svg:width="4.047cm" svg:height="1.153cm" svg:x="10.583cm" svg:y="8.8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3"><text:span text:style-name="T2">system_sounds.py</text:span></text:p>
            <text:p text:style-name="P13"><text:span text:style-name="T2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6" draw:layer="layout" svg:width="4.047cm" svg:height="0.761cm" svg:x="10.583cm" svg:y="9.973cm">
            <text:p text:style-name="P15"><text:span text:style-name="T3">+ play_soun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3" draw:text-style-name="P17" draw:layer="layout" svg:x1="13.072cm" svg:y1="8.956cm" svg:x2="14.859cm" svg:y2="5.27cm" draw:start-shape="id1" draw:start-glue-point="4" draw:end-shape="id2" draw:end-glue-point="5" svg:d="M13072 8956v-1912h1787v-1774" svg:viewBox="0 0 1788 3687">
          <text:p/>
        </draw:connector>
        <draw:custom-shape draw:style-name="gr14" draw:text-style-name="P18" draw:layer="layout" svg:width="18.732cm" svg:height="0.952cm" svg:x="1cm" svg:y="1.1cm">
          <text:p text:style-name="P7">Static view: Utilitie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3.085cm" svg:height="0.725cm" svg:x="7.67cm" svg:y="7.032cm">
          <draw:text-box>
            <text:p><text:span text:style-name="T4">&lt;&lt;uses&gt;&gt;</text:span></text:p>
          </draw:text-box>
        </draw:frame>
        <draw:g draw:style-name="gr1" xml:id="id3" draw:id="id3">
          <draw:glue-point draw:id="4" svg:x="-3.94cm" svg:y="-4.644cm"/>
          <draw:glue-point draw:id="5" svg:x="4.311cm" svg:y="-5.137cm"/>
          <draw:glue-point draw:id="6" svg:x="3.601cm" svg:y="-5.137cm"/>
          <draw:custom-shape draw:style-name="gr16" draw:text-style-name="P14" draw:layer="layout" svg:width="4.465cm" svg:height="1.153cm" svg:x="4.375cm" svg:y="8.81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3"><text:span text:style-name="T2">oradio_logging.py</text:span></text:p>
            <text:p text:style-name="P13"><text:span text:style-name="T2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6" draw:layer="layout" svg:width="4.465cm" svg:height="2.077cm" svg:x="4.375cm" svg:y="9.97cm">
            <text:p text:style-name="P15"><text:span text:style-name="T3">+ oradio_log.debug()</text:span></text:p>
            <text:p text:style-name="P15"><text:span text:style-name="T3">+ oradio_log.warning()</text:span></text:p>
            <text:p text:style-name="P15"><text:span text:style-name="T3">+ oradio_log.info()</text:span></text:p>
            <text:p text:style-name="P15"><text:span text:style-name="T3">+ oradio_log.error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8" draw:text-style-name="P17" draw:layer="layout" draw:line-skew="-0.563cm" svg:x1="6.607cm" svg:y1="8.817cm" svg:x2="4.875cm" svg:y2="5.27cm" draw:start-shape="id3" draw:end-shape="id2" draw:end-glue-point="4" svg:d="M6607 8817v-2337h-1732v-1210" svg:viewBox="0 0 1733 3548">
          <text:p/>
        </draw:connector>
      </draw:page>
      <draw:page draw:name="Throttle" draw:style-name="dp1" draw:master-page-name="Default">
        <draw:custom-shape draw:style-name="gr19" draw:text-style-name="P8" draw:layer="layout" svg:width="22.089cm" svg:height="0.7cm" svg:x="1.453cm" svg:y="2.35cm">
          <text:p text:style-name="P7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8" draw:layer="layout" svg:width="21.697cm" svg:height="0.7cm" svg:x="1.579cm" svg:y="5.65cm">
          <text:p text:style-name="P7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5" draw:id="id5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glue-point draw:id="45" svg:x="-2.202cm" svg:y="5.141cm"/>
          <draw:glue-point draw:id="46" svg:x="-2.202cm" svg:y="5.141cm"/>
          <draw:custom-shape draw:style-name="gr21" draw:text-style-name="P10" draw:layer="layout" svg:width="21.77cm" svg:height="1.153cm" svg:x="1.576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9"><text:span text:style-name="T2">oradio_control.py</text:span></text:p>
            <text:p text:style-name="P9"><text:span text:style-name="T2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1" draw:layer="layout" svg:width="21.77cm" svg:height="0.679cm" svg:x="1.576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3"><text:span text:style-name="T2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3" draw:text-style-name="P8" draw:layer="layout" svg:width="21.965cm" svg:height="0.7cm" svg:x="1.311cm" svg:y="17.1cm">
          <text:p text:style-name="P7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3.085cm" svg:height="0.725cm" svg:x="7.44cm" svg:y="7.032cm">
          <draw:text-box>
            <text:p><text:span text:style-name="T4">&lt;&lt;uses&gt;&gt;</text:span></text:p>
          </draw:text-box>
        </draw:frame>
        <draw:custom-shape draw:style-name="gr24" draw:text-style-name="P12" draw:layer="layout" svg:width="23.495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17" draw:layer="layout" svg:x1="5.921cm" svg:y1="7.802cm" svg:x2="5.93cm" svg:y2="5.27cm" draw:start-shape="id4" draw:end-shape="id5" draw:end-glue-point="4" svg:d="M5921 7802v-1267h9v-1265" svg:viewBox="0 0 10 2533">
          <text:p/>
        </draw:connector>
        <draw:custom-shape draw:style-name="gr26" draw:text-style-name="P18" draw:layer="layout" svg:width="23.495cm" svg:height="0.952cm" svg:x="1cm" svg:y="1.1cm">
          <text:p text:style-name="P7">Static view: Throttl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4" draw:id="id4">
          <draw:custom-shape draw:style-name="gr27" draw:text-style-name="P14" draw:layer="layout" svg:width="7.302cm" svg:height="1.153cm" svg:x="2.27cm" svg:y="7.80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3"><text:span text:style-name="T2">throttled_monitor.py</text:span></text:p>
            <text:p text:style-name="P13"><text:span text:style-name="T2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6" draw:layer="layout" svg:width="7.302cm" svg:height="0.761cm" svg:x="2.27cm" svg:y="8.955cm">
            <text:p text:style-name="P20"><text:span text:style-name="T3">- throttled_monitor: RpiThrottlingMonitor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6" draw:layer="layout" svg:width="7.302cm" svg:height="0.599cm" svg:x="2.27cm" svg:y="9.71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6" draw:id="id6">
          <draw:glue-point draw:id="4" svg:x="-5.035cm" svg:y="-2.72cm"/>
          <draw:glue-point draw:id="5" svg:x="-0.912cm" svg:y="-1.099cm"/>
          <draw:glue-point draw:id="6" svg:x="-0.496cm" svg:y="-1.099cm"/>
          <draw:glue-point draw:id="7" svg:x="5.035cm" svg:y="-4.011cm"/>
          <draw:custom-shape draw:style-name="gr30" draw:text-style-name="P22" draw:layer="layout" svg:width="7.62cm" svg:height="1.153cm" svg:x="4.58cm" svg:y="12.32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3"><text:span text:style-name="T2">throttled_monitor.RpiThrottlingMonitor</text:span></text:p>
            <text:p text:style-name="P21"><text:span text:style-name="T2">&lt;&lt;singleton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6" draw:layer="layout" svg:width="7.62cm" svg:height="0.591cm" svg:x="4.58cm" svg:y="13.474cm">
            <text:p text:style-name="P15">- stop_event: Event(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6" draw:layer="layout" svg:width="7.62cm" svg:height="2.569cm" svg:x="4.58cm" svg:y="14.06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5"><text:span text:style-name="T3">- init()</text:span></text:p>
            <text:p text:style-name="P15"><text:span text:style-name="T3">+ start()</text:span></text:p>
            <text:p text:style-name="P15"><text:span text:style-name="T3">+ stop()</text:span></text:p>
            <text:p text:style-name="P15"><text:span text:style-name="T3">+ run()</text:span></text:p>
            <text:p text:style-name="P15"><text:span text:style-name="T3">+ force_throttled()</text:span></text:p>
            <text:p text:style-name="P15"><text:span text:style-name="T3">+ clear_throttle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3" draw:text-style-name="P17" draw:layer="layout" svg:x1="8.39cm" svg:y1="12.321cm" svg:x2="5.921cm" svg:y2="10.315cm" draw:start-shape="id6" draw:end-shape="id4" svg:d="M8390 12321v-1004h-2469v-1002" svg:viewBox="0 0 2470 2007">
          <text:p/>
        </draw:connector>
        <draw:frame draw:style-name="gr15" draw:text-style-name="P19" draw:layer="layout" svg:width="3.085cm" svg:height="0.725cm" svg:x="6.17cm" svg:y="10.525cm">
          <draw:text-box>
            <text:p><text:span text:style-name="T4">&lt;&lt;uses&gt;&gt;</text:span></text:p>
          </draw:text-box>
        </draw:frame>
        <draw:g draw:style-name="gr1" xml:id="id7" draw:id="id7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g draw:style-name="gr1">
            <draw:g draw:style-name="gr1">
              <draw:g draw:style-name="gr1">
                <draw:custom-shape draw:style-name="gr34" draw:text-style-name="P24" draw:layer="layout" svg:width="5.64cm" svg:height="1.153cm" svg:x="15.997cm" svg:y="13.501cm">
                  <draw:glue-point draw:id="4" svg:x="-4.442cm" svg:y="-5cm"/>
                  <draw:glue-point draw:id="5" svg:x="-2.22cm" svg:y="-5cm"/>
                  <draw:glue-point draw:id="6" svg:x="2.223cm" svg:y="-5cm"/>
                  <draw:glue-point draw:id="7" svg:x="4.446cm" svg:y="-5cm"/>
                  <draw:glue-point draw:id="8" svg:x="0.001cm" svg:y="0.634cm" draw:align="top-left"/>
                  <draw:glue-point draw:id="9" svg:x="-0.001cm" svg:y="0.634cm" draw:align="top-right"/>
                  <text:p text:style-name="P23"><text:span text:style-name="T2">&lt;&lt;thread&gt;&gt;</text:span></text:p>
                  <text:p text:style-name="P23"><text:span text:style-name="T2">rpi-throttling-monitor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16" draw:layer="layout" svg:width="5.64cm" svg:height="1.037cm" svg:x="15.997cm" svg:y="14.654cm">
                  <text:p text:style-name="P15">+ stop_event: Event()</text:p>
                  <text:p text:style-name="P15">- vcgencmd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16" draw:layer="layout" svg:width="5.64cm" svg:height="0.599cm" svg:x="15.997cm" svg:y="15.637cm">
                  <draw:glue-point draw:id="4" svg:x="4.446cm" svg:y="5.295cm"/>
                  <draw:glue-point draw:id="5" svg:x="2.223cm" svg:y="5.295cm"/>
                  <draw:glue-point draw:id="6" svg:x="-2.22cm" svg:y="5.295cm"/>
                  <draw:glue-point draw:id="7" svg:x="-4.442cm" svg:y="5.295cm"/>
                  <draw:glue-point draw:id="8" svg:x="0.001cm" svg:y="-0.544cm" draw:align="bottom-left"/>
                  <draw:glue-point draw:id="9" svg:x="-0.001cm" svg:y="-0.544cm" draw:align="bottom-right"/>
                  <text:p text:style-name="P15">- get_throttle_value()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37" draw:text-style-name="P17" draw:layer="layout" svg:x1="15.997cm" svg:y1="14.868cm" svg:x2="12.2cm" svg:y2="14.477cm" draw:start-shape="id7" draw:end-shape="id6" draw:end-glue-point="1" svg:d="M15997 14868h-1898v-391h-1899" svg:viewBox="0 0 3798 392">
          <text:p/>
        </draw:connector>
        <draw:frame draw:style-name="gr15" draw:text-style-name="P19" draw:layer="layout" svg:width="3.81cm" svg:height="0.725cm" svg:x="12.43cm" svg:y="13.292cm">
          <draw:text-box>
            <text:p><text:span text:style-name="T4">&lt;&lt;consists of&gt;&gt;</text:span></text:p>
          </draw:text-box>
        </draw:frame>
        <draw:custom-shape draw:style-name="gr38" draw:text-style-name="P26" xml:id="id8" draw:id="id8" draw:layer="layout" svg:width="6.667cm" svg:height="1.5cm" svg:x="15.288cm" svg:y="11.565cm">
          <text:p text:style-name="P25"><text:span text:style-name="T5">The rpi-throttling-monitor thread check the throttle state </text:span><text:span text:style-name="T5">in a loop 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39" draw:text-style-name="P27" draw:layer="layout" draw:type="line" svg:x1="12.2cm" svg:y1="12.748cm" svg:x2="15.288cm" svg:y2="12.315cm" draw:start-shape="id6" draw:start-glue-point="7" draw:end-shape="id8" draw:end-glue-point="5" svg:d="M12200 12748l3088-433" svg:viewBox="0 0 3089 434">
          <text:p/>
        </draw:connector>
      </draw:page>
      <draw:page draw:name="Messages" draw:style-name="dp1" draw:master-page-name="Default">
        <draw:g draw:style-name="gr1" xml:id="id10" draw:id="id10">
          <draw:g draw:style-name="gr1">
            <draw:custom-shape draw:style-name="gr40" draw:text-style-name="P2" draw:layer="layout" svg:width="5.127cm" svg:height="0.679cm" svg:x="17.34cm" svg:y="6.938cm">
              <draw:glue-point draw:id="4" svg:x="0.5cm" svg:y="0cm" draw:align="top-left"/>
              <text:p text:style-name="P1"><text:span text:style-name="T1">&lt;&lt;Module&gt;&gt; <text:s/>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4" draw:layer="layout" svg:width="10.16cm" svg:height="9.575cm" svg:x="17.34cm" svg:y="7.617cm">
              <draw:glue-point draw:id="4" svg:x="0.501cm" svg:y="-0.003cm" draw:align="bottom-left" draw:escape-direction="down"/>
              <draw:glue-point draw:id="5" svg:x="-0.501cm" svg:y="-0.003cm" draw:align="bottom-right" draw:escape-direction="down"/>
              <draw:glue-point draw:id="6" svg:x="0cm" svg:y="-0.252cm" draw:align="bottom-left" draw:escape-direction="left"/>
              <draw:glue-point draw:id="7" svg:x="0cm" svg:y="-0.252cm" draw:align="bottom-right" draw:escape-direction="right"/>
              <draw:glue-point draw:id="8" svg:x="0cm" svg:y="0.23cm" draw:align="top-left" draw:escape-direction="left"/>
              <draw:glue-point draw:id="9" svg:x="0cm" svg:y="0.23cm" draw:align="top-right" draw:escape-direction="up"/>
              <draw:glue-point draw:id="10" svg:x="-0.501cm" svg:y="0cm" draw:align="top-right" draw:escape-direction="up"/>
              <text:p text:style-name="P3"><text:span text:style-name="T2">All module/classes can publish an error messag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42" draw:text-style-name="P29" draw:layer="layout" svg:width="10.16cm" svg:height="0.952cm" svg:x="17.34cm" svg:y="17.21cm">
            <text:p text:style-name="P28"><text:span text:style-name="T6">- publish_error_message()</text:span></text:p>
            <draw:enhanced-geometry svg:viewBox="0 0 21600 21600" draw:type="rectangle" draw:enhanced-path="M 0 0 L 21600 0 21600 21600 0 21600 0 0 Z N"/>
          </draw:custom-shape>
        </draw:g>
        <draw:custom-shape draw:style-name="gr43" draw:text-style-name="P8" draw:layer="layout" svg:width="26.507cm" svg:height="0.7cm" svg:x="1.482cm" svg:y="2.35cm">
          <text:p text:style-name="P7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8" draw:layer="layout" svg:width="26.037cm" svg:height="0.7cm" svg:x="1.633cm" svg:y="5.65cm">
          <text:p text:style-name="P7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glue-point draw:id="45" svg:x="-2.202cm" svg:y="5.141cm"/>
          <draw:custom-shape draw:style-name="gr45" draw:text-style-name="P10" draw:layer="layout" svg:width="26.125cm" svg:height="1.153cm" svg:x="1.629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9"><text:span text:style-name="T2">oradio_control.py</text:span></text:p>
            <text:p text:style-name="P9"><text:span text:style-name="T2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1" draw:layer="layout" svg:width="26.125cm" svg:height="0.679cm" svg:x="1.629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3"><text:span text:style-name="T2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7" draw:text-style-name="P8" draw:layer="layout" svg:width="26.359cm" svg:height="0.7cm" svg:x="1.311cm" svg:y="19cm">
          <text:p text:style-name="P7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27.305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8" draw:layer="layout" svg:width="27.305cm" svg:height="0.952cm" svg:x="1cm" svg:y="1.1cm">
          <text:p text:style-name="P7">Static view: Message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9" draw:layer="layout" svg:width="3.085cm" svg:height="0.725cm" svg:x="11.25cm" svg:y="11.387cm">
          <draw:text-box>
            <text:p><text:span text:style-name="T4">&lt;&lt;uses&gt;&gt;</text:span></text:p>
          </draw:text-box>
          <draw:glue-point draw:id="4" svg:x="4.998cm" svg:y="-4.993cm"/>
          <draw:glue-point draw:id="5" svg:x="4.998cm" svg:y="-4.993cm"/>
          <draw:glue-point draw:id="6" svg:x="4.998cm" svg:y="-4.993cm"/>
        </draw:frame>
        <draw:g draw:style-name="gr1" xml:id="id9" draw:id="id9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51" draw:text-style-name="P24" draw:layer="layout" svg:width="10.807cm" svg:height="1.153cm" svg:x="5.445cm" svg:y="15.31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3"><text:span text:style-name="T2">&lt;&lt;module&gt;&gt;</text:span></text:p>
            <text:p text:style-name="P23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16" draw:layer="layout" svg:width="10.807cm" svg:height="0.435cm" svg:x="5.445cm" svg:y="16.4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6" draw:layer="layout" svg:width="10.807cm" svg:height="0.993cm" svg:x="5.445cm" svg:y="16.83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5"><text:span text:style-name="T3">+ publish_command_message(message: CommandMessage)</text:span></text:p>
            <text:p text:style-name="P15"><text:span text:style-name="T3">+ publish_error_message(message: Error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custom-shape draw:style-name="gr54" draw:text-style-name="P31" draw:layer="layout" svg:width="4.763cm" svg:height="0.753cm" svg:x="17.657cm" svg:y="15.369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30"><text:span text:style-name="T7">power_supply_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31" draw:layer="layout" svg:width="4.761cm" svg:height="0.753cm" svg:x="17.657cm" svg:y="14.634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30"><text:span text:style-name="T7">remote_monitoring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31" draw:layer="layout" svg:width="4.764cm" svg:height="0.635cm" svg:x="17.657cm" svg:y="9.02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30"><text:span text:style-name="T7">mpd_control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31" draw:layer="layout" svg:width="4.764cm" svg:height="0.815cm" svg:x="17.657cm" svg:y="9.645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30"><text:span text:style-name="T7">spotify_connect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31" draw:layer="layout" svg:width="4.761cm" svg:height="0.667cm" svg:x="22.421cm" svg:y="10.407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30"><text:span text:style-name="T7">touch_buttons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31" draw:layer="layout" svg:width="4.761cm" svg:height="0.635cm" svg:x="22.421cm" svg:y="9.037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30"><text:span text:style-name="T7">mpd_monitor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31" draw:layer="layout" svg:width="4.761cm" svg:height="0.7cm" svg:x="22.421cm" svg:y="13.199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30"><text:span text:style-name="T7">web_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1" draw:layer="layout" svg:width="4.764cm" svg:height="0.75cm" svg:x="17.657cm" svg:y="10.407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30"><text:span text:style-name="T7">usb_service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31" draw:layer="layout" svg:width="4.764cm" svg:height="0.565cm" svg:x="17.657cm" svg:y="11.112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30"><text:span text:style-name="T7">led_control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31" draw:layer="layout" svg:width="4.764cm" svg:height="0.753cm" svg:x="17.657cm" svg:y="11.677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30"><text:span text:style-name="T7">oradio_control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31" draw:layer="layout" svg:width="4.761cm" svg:height="0.753cm" svg:x="22.421cm" svg:y="11.042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30"><text:span text:style-name="T7">oradio_control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31" draw:layer="layout" svg:width="4.761cm" svg:height="0.753cm" svg:x="22.421cm" svg:y="11.676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30"><text:span text:style-name="T7">backlighting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31" draw:layer="layout" svg:width="4.764cm" svg:height="0.753cm" svg:x="17.657cm" svg:y="12.412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30"><text:span text:style-name="T7">fastapi_server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31" draw:layer="layout" svg:width="4.761cm" svg:height="0.753cm" svg:x="22.421cm" svg:y="12.411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30"><text:span text:style-name="T7">gpio_service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31" draw:layer="layout" svg:width="4.764cm" svg:height="0.753cm" svg:x="17.657cm" svg:y="13.146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30"><text:span text:style-name="T7">i2c_service</text:span></text:p>
            <draw:enhanced-geometry svg:viewBox="0 0 21600 21600" draw:type="rectangle" draw:enhanced-path="M 0 0 L 21600 0 21600 21600 0 21600 0 0 Z N"/>
          </draw:custom-shape>
          <draw:custom-shape draw:style-name="gr69" draw:text-style-name="P31" draw:layer="layout" svg:width="4.761cm" svg:height="0.753cm" svg:x="22.421cm" svg:y="9.672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30"><text:span text:style-name="T7">mpd_service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31" draw:layer="layout" svg:width="4.764cm" svg:height="0.753cm" svg:x="17.657cm" svg:y="13.899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30"><text:span text:style-name="T7">oradio_utils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31" draw:layer="layout" svg:width="4.761cm" svg:height="0.753cm" svg:x="22.421cm" svg:y="13.899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30"><text:span text:style-name="T7">system_sound</text:span></text:p>
            <draw:enhanced-geometry svg:viewBox="0 0 21600 21600" draw:type="rectangle" draw:enhanced-path="M 0 0 L 21600 0 21600 21600 0 21600 0 0 Z N"/>
          </draw:custom-shape>
          <draw:custom-shape draw:style-name="gr72" draw:text-style-name="P31" draw:layer="layout" svg:width="4.763cm" svg:height="0.753cm" svg:x="22.387cm" svg:y="14.622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30"><text:span text:style-name="T7">throttled_monitor</text:span></text:p>
            <draw:enhanced-geometry svg:viewBox="0 0 21600 21600" draw:type="rectangle" draw:enhanced-path="M 0 0 L 21600 0 21600 21600 0 21600 0 0 Z N"/>
          </draw:custom-shape>
        </draw:g>
        <draw:g draw:style-name="gr1" xml:id="id11" draw:id="id11">
          <draw:g draw:style-name="gr1">
            <draw:glue-point draw:id="4" svg:x="0.501cm" svg:y="-0.003cm" draw:align="bottom-left"/>
            <draw:glue-point draw:id="5" svg:x="-0.501cm" svg:y="-0.003cm" draw:align="bottom-right"/>
            <draw:glue-point draw:id="6" svg:x="0cm" svg:y="-0.253cm" draw:align="bottom-right"/>
            <draw:glue-point draw:id="7" svg:x="0cm" svg:y="-0.253cm" draw:align="bottom-left"/>
            <draw:glue-point draw:id="8" svg:x="0cm" svg:y="0.751cm" draw:align="top-left"/>
            <draw:glue-point draw:id="9" svg:x="0cm" svg:y="0.751cm" draw:align="top-right"/>
            <draw:glue-point draw:id="10" svg:x="0.501cm" svg:y="0cm" draw:align="top-left"/>
            <draw:glue-point draw:id="11" svg:x="-0.501cm" svg:y="0.501cm" draw:align="top-right" draw:escape-direction="up"/>
            <draw:g draw:style-name="gr1">
              <draw:custom-shape draw:style-name="gr73" draw:text-style-name="P32" draw:layer="layout" svg:width="3.425cm" svg:height="0.679cm" svg:x="1.952cm" svg:y="7.356cm">
                <draw:glue-point draw:id="4" svg:x="0.5cm" svg:y="0cm" draw:align="top-left"/>
                <text:p text:style-name="P9"><text:span text:style-name="T2"><text:s text:c="2"/></text:span><text:span text:style-name="T2">&lt;&lt;class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4" draw:text-style-name="P4" draw:layer="layout" svg:width="7.938cm" svg:height="5.665cm" svg:x="1.952cm" svg:y="8.035cm">
                <draw:glue-point draw:id="4" svg:x="0.501cm" svg:y="-0.003cm" draw:align="bottom-left" draw:escape-direction="down"/>
                <draw:glue-point draw:id="5" svg:x="-0.501cm" svg:y="-0.003cm" draw:align="bottom-right" draw:escape-direction="down"/>
                <draw:glue-point draw:id="6" svg:x="0cm" svg:y="-0.252cm" draw:align="bottom-left" draw:escape-direction="left"/>
                <draw:glue-point draw:id="7" svg:x="0cm" svg:y="-0.252cm" draw:align="bottom-right" draw:escape-direction="right"/>
                <draw:glue-point draw:id="8" svg:x="0cm" svg:y="0.23cm" draw:align="top-left" draw:escape-direction="left"/>
                <draw:glue-point draw:id="9" svg:x="0cm" svg:y="0.23cm" draw:align="top-right" draw:escape-direction="up"/>
                <draw:glue-point draw:id="10" svg:x="-0.501cm" svg:y="0cm" draw:align="top-right" draw:escape-direction="up"/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75" draw:text-style-name="P34" draw:layer="layout" svg:width="7.938cm" svg:height="0.952cm" svg:x="1.952cm" svg:y="13.7cm">
            <text:p text:style-name="P33"><text:span text:style-name="T4">- publish_command_message()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76" draw:text-style-name="P36" draw:layer="layout" svg:width="6.985cm" svg:height="0.85cm" svg:x="2.487cm" svg:y="8.82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35"><text:span text:style-name="T7">volume_control.VolumeControl</text:span></text:p>
            <draw:enhanced-geometry svg:viewBox="0 0 21600 21600" draw:type="rectangle" draw:enhanced-path="M 0 0 L 21600 0 21600 21600 0 21600 0 0 Z N"/>
          </draw:custom-shape>
          <draw:custom-shape draw:style-name="gr77" draw:text-style-name="P36" draw:layer="layout" svg:width="6.985cm" svg:height="0.85cm" svg:x="2.487cm" svg:y="9.69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35"><text:span text:style-name="T7">spotify_connect.SpotifyConnect</text:span></text:p>
            <draw:enhanced-geometry svg:viewBox="0 0 21600 21600" draw:type="rectangle" draw:enhanced-path="M 0 0 L 21600 0 21600 21600 0 21600 0 0 Z N"/>
          </draw:custom-shape>
          <draw:custom-shape draw:style-name="gr78" draw:text-style-name="P36" draw:layer="layout" svg:width="6.985cm" svg:height="0.85cm" svg:x="2.487cm" svg:y="10.56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35"><text:span text:style-name="T7">web_service.WebService</text:span></text:p>
            <draw:enhanced-geometry svg:viewBox="0 0 21600 21600" draw:type="rectangle" draw:enhanced-path="M 0 0 L 21600 0 21600 21600 0 21600 0 0 Z N"/>
          </draw:custom-shape>
          <draw:custom-shape draw:style-name="gr79" draw:text-style-name="P36" draw:layer="layout" svg:width="6.985cm" svg:height="0.85cm" svg:x="2.487cm" svg:y="11.427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35"><text:span text:style-name="T7">usb_service.USBService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36" draw:layer="layout" svg:width="6.985cm" svg:height="0.85cm" svg:x="2.487cm" svg:y="12.215cm">
            <draw:glue-point draw:id="4" svg:x="3.333cm" svg:y="-5cm"/>
            <draw:glue-point draw:id="5" svg:x="-3.333cm" svg:y="-5cm"/>
            <draw:glue-point draw:id="6" svg:x="-3.333cm" svg:y="5cm"/>
            <draw:glue-point draw:id="7" svg:x="3.33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35"><text:span text:style-name="T7">touch_buttons.TouchButtons</text:span></text:p>
            <draw:enhanced-geometry svg:viewBox="0 0 21600 21600" draw:type="rectangle" draw:enhanced-path="M 0 0 L 21600 0 21600 21600 0 21600 0 0 Z N"/>
          </draw:custom-shape>
        </draw:g>
        <draw:connector draw:style-name="gr81" draw:text-style-name="P17" draw:layer="layout" svg:x1="14.015cm" svg:y1="15.311cm" svg:x2="17.34cm" svg:y2="12.55cm" draw:start-shape="id9" draw:start-glue-point="7" draw:end-shape="id10" svg:d="M14015 15311v-2761h3325" svg:viewBox="0 0 3326 2762">
          <text:p/>
        </draw:connector>
        <draw:connector draw:style-name="gr82" draw:text-style-name="P17" draw:layer="layout" svg:x1="10.848cm" svg:y1="15.311cm" svg:x2="9.89cm" svg:y2="11.004cm" draw:start-shape="id9" draw:start-glue-point="0" draw:end-shape="id11" svg:d="M10848 15311v-4307h-958" svg:viewBox="0 0 959 4308">
          <text:p/>
        </draw:connector>
      </draw:page>
      <draw:page draw:name="Remote monitoring" draw:style-name="dp1" draw:master-page-name="Default">
        <draw:custom-shape draw:style-name="gr83" draw:text-style-name="P8" draw:layer="layout" svg:width="19.873cm" svg:height="0.7cm" svg:x="1.447cm" svg:y="2.35cm">
          <text:p text:style-name="P7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8" draw:layer="layout" svg:width="19.702cm" svg:height="0.7cm" svg:x="1.554cm" svg:y="5.65cm">
          <text:p text:style-name="P7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13" draw:id="id13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85" draw:text-style-name="P10" draw:layer="layout" svg:width="19.769cm" svg:height="1.153cm" svg:x="1.551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9"><text:span text:style-name="T2">oradio_control.py</text:span></text:p>
            <text:p text:style-name="P9"><text:span text:style-name="T2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11" draw:layer="layout" svg:width="19.769cm" svg:height="0.679cm" svg:x="1.551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3"><text:span text:style-name="T2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7" draw:text-style-name="P8" draw:layer="layout" svg:width="19.945cm" svg:height="0.7cm" svg:x="1.311cm" svg:y="18.8cm">
          <text:p text:style-name="P7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3.085cm" svg:height="0.725cm" svg:x="4.582cm" svg:y="6.715cm">
          <draw:text-box>
            <text:p><text:span text:style-name="T4">&lt;&lt;uses&gt;&gt;</text:span></text:p>
          </draw:text-box>
        </draw:frame>
        <draw:custom-shape draw:style-name="gr88" draw:text-style-name="P12" draw:layer="layout" svg:width="20.955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12" draw:id="id1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1">
            <draw:custom-shape draw:style-name="gr89" draw:text-style-name="P14" draw:layer="layout" svg:width="6.423cm" svg:height="1.153cm" svg:x="2.719cm" svg:y="7.51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2">remote_monitoring.RMService</text:span></text:p>
              <text:p text:style-name="P13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0" draw:text-style-name="P16" draw:layer="layout" svg:width="6.423cm" svg:height="0.76cm" svg:x="2.719cm" svg:y="8.671cm">
              <text:p text:style-name="P20"><text:span text:style-name="T3">- rms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1" draw:text-style-name="P16" draw:layer="layout" svg:width="6.423cm" svg:height="0.993cm" svg:x="2.719cm" svg:y="9.43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3">+ send_message()</text:span></text:p>
              <text:p text:style-name="P15"><text:span text:style-name="T3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92" draw:text-style-name="P17" draw:layer="layout" draw:line-skew="0.345cm" svg:x1="7.357cm" svg:y1="7.519cm" svg:x2="5.505cm" svg:y2="5.27cm" draw:start-shape="id12" draw:start-glue-point="14" draw:end-shape="id13" draw:end-glue-point="4" svg:d="M7357 7519v-781h-1852v-1468" svg:viewBox="0 0 1853 2250">
          <text:p/>
        </draw:connector>
        <draw:custom-shape draw:style-name="gr93" draw:text-style-name="P18" draw:layer="layout" svg:width="20.955cm" svg:height="0.952cm" svg:x="1cm" svg:y="1.1cm">
          <text:p text:style-name="P7">Static view: Remote monitoring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14" draw:id="id1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94" draw:text-style-name="P14" draw:layer="layout" svg:width="4.449cm" svg:height="1.627cm" svg:x="14.913cm" svg:y="6.62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2">wifi_service.</text:span></text:p>
              <text:p text:style-name="P13"><text:span text:style-name="T2">WifiService</text:span></text:p>
              <text:p text:style-name="P13"><text:span text:style-name="T2">&lt;&lt;Server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5" draw:text-style-name="P16" draw:layer="layout" svg:width="4.449cm" svg:height="0.67cm" svg:x="14.913cm" svg:y="8.255cm">
              <text:p text:style-name="P15"><text:span text:style-name="T3">- rms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6" draw:text-style-name="P16" draw:layer="layout" svg:width="4.449cm" svg:height="2.569cm" svg:x="14.913cm" svg:y="8.92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3">+ init(queue: Queue)</text:span></text:p>
              <text:p text:style-name="P15"><text:span text:style-name="T3">+ get_state()</text:span></text:p>
              <text:p text:style-name="P15"><text:span text:style-name="T3">+ wifi_connect()</text:span></text:p>
              <text:p text:style-name="P15"><text:span text:style-name="T3">+ wifi_disconnect()</text:span></text:p>
              <text:p text:style-name="P15"><text:span text:style-name="T3">+ close()</text:span></text:p>
              <text:p text:style-name="P15"><text:span text:style-name="T3">- send_messag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97" draw:text-style-name="P17" draw:layer="layout" svg:x1="14.913cm" svg:y1="9.061cm" svg:x2="9.141cm" svg:y2="8.154cm" draw:start-shape="id14" draw:end-shape="id12" draw:end-glue-point="13" svg:d="M14913 9061h-2886v-907h-2886" svg:viewBox="0 0 5773 908">
          <text:p/>
        </draw:connector>
        <draw:frame draw:style-name="gr15" draw:text-style-name="P19" draw:layer="layout" svg:width="3.085cm" svg:height="0.725cm" svg:x="11.16cm" svg:y="7.26cm">
          <draw:text-box>
            <text:p><text:span text:style-name="T4">&lt;&lt;uses&gt;&gt;</text:span></text:p>
          </draw:text-box>
        </draw:frame>
        <draw:g draw:style-name="gr1" xml:id="id15" draw:id="id1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1">
            <draw:custom-shape draw:style-name="gr98" draw:text-style-name="P14" draw:layer="layout" svg:width="4.445cm" svg:height="1.627cm" svg:x="1.952cm" svg:y="13.18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2">remote_monitoring.</text:span></text:p>
              <text:p text:style-name="P13"><text:span text:style-name="T2">Heartbeat</text:span></text:p>
              <text:p text:style-name="P13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9" draw:text-style-name="P16" draw:layer="layout" svg:width="4.445cm" svg:height="0.761cm" svg:x="1.952cm" svg:y="14.8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0" draw:text-style-name="P16" draw:layer="layout" svg:width="4.445cm" svg:height="1.387cm" svg:x="1.952cm" svg:y="15.57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3">+ start_heartbeat()</text:span></text:p>
              <text:p text:style-name="P15"><text:span text:style-name="T3">+ stop_heartbeat()</text:span></text:p>
              <text:p text:style-name="P15"><text:span text:style-name="T3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16" draw:id="id1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1">
            <draw:custom-shape draw:style-name="gr101" draw:text-style-name="P14" draw:layer="layout" svg:width="4.18cm" svg:height="1.153cm" svg:x="11.107cm" svg:y="13.25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2">&lt;&lt;BaseClass&gt;&gt;</text:span></text:p>
              <text:p text:style-name="P13"><text:span text:style-name="T2">Tim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2" draw:text-style-name="P16" draw:layer="layout" svg:width="4.18cm" svg:height="0.761cm" svg:x="11.107cm" svg:y="14.408cm">
              <text:p text:style-name="P20"><text:span text:style-name="T3">- rms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3" draw:text-style-name="P16" draw:layer="layout" svg:width="4.18cm" svg:height="0.993cm" svg:x="11.107cm" svg:y="15.16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3">+ start()</text:span></text:p>
              <text:p text:style-name="P15"><text:span text:style-name="T3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04" draw:text-style-name="P17" draw:layer="layout" svg:x1="5.162cm" svg:y1="13.183cm" svg:x2="4.505cm" svg:y2="10.424cm" draw:start-shape="id15" draw:start-glue-point="14" draw:end-shape="id12" draw:end-glue-point="8" svg:d="M5162 13183v-1381h-657v-1378" svg:viewBox="0 0 658 2760">
          <text:p/>
        </draw:connector>
        <draw:frame draw:style-name="gr15" draw:text-style-name="P19" draw:layer="layout" svg:width="3.085cm" svg:height="0.725cm" svg:x="4.9cm" svg:y="11.16cm">
          <draw:text-box>
            <text:p><text:span text:style-name="T4">&lt;&lt;uses&gt;&gt;</text:span></text:p>
          </draw:text-box>
        </draw:frame>
        <draw:connector draw:style-name="gr105" draw:text-style-name="P17" draw:layer="layout" svg:x1="11.107cm" svg:y1="14.433cm" svg:x2="6.396cm" svg:y2="16.413cm" draw:start-shape="id16" draw:start-glue-point="22" draw:end-shape="id15" draw:end-glue-point="12" svg:d="M11107 14433h-2355v1980h-2356" svg:viewBox="0 0 4712 1981">
          <text:p/>
        </draw:connector>
        <draw:frame draw:style-name="gr15" draw:text-style-name="P19" draw:layer="layout" svg:width="2.54cm" svg:height="0.725cm" svg:x="8.302cm" svg:y="13.382cm">
          <draw:text-box>
            <text:p><text:span text:style-name="T4">&lt;&lt;is a&gt;&gt;</text:span></text:p>
          </draw:text-box>
        </draw:frame>
      </draw:page>
      <draw:page draw:name="Web service" draw:style-name="dp1" draw:master-page-name="Default">
        <draw:custom-shape draw:style-name="gr106" draw:text-style-name="P8" draw:layer="layout" svg:width="23.589cm" svg:height="0.7cm" svg:x="1.465cm" svg:y="2.35cm">
          <text:p text:style-name="P7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8" draw:layer="layout" svg:width="23.452cm" svg:height="0.7cm" svg:x="1.602cm" svg:y="5.65cm">
          <text:p text:style-name="P7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18" draw:id="id18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108" draw:text-style-name="P10" draw:layer="layout" svg:width="23.532cm" svg:height="1.153cm" svg:x="1.598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9"><text:span text:style-name="T2">oradio_control.py</text:span></text:p>
            <text:p text:style-name="P9"><text:span text:style-name="T2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11" draw:layer="layout" svg:width="23.532cm" svg:height="0.679cm" svg:x="1.598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3"><text:span text:style-name="T2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0" draw:text-style-name="P8" draw:layer="layout" svg:width="23.743cm" svg:height="0.7cm" svg:x="1.311cm" svg:y="18.7cm">
          <text:p text:style-name="P7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3.085cm" svg:height="0.725cm" svg:x="5.535cm" svg:y="6.625cm">
          <draw:text-box>
            <text:p><text:span text:style-name="T4">&lt;&lt;uses&gt;&gt;</text:span></text:p>
          </draw:text-box>
        </draw:frame>
        <draw:custom-shape draw:style-name="gr111" draw:text-style-name="P12" draw:layer="layout" svg:width="24.765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17" draw:id="id1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12" draw:text-style-name="P14" draw:layer="layout" svg:width="5.654cm" svg:height="1.627cm" svg:x="2.013cm" svg:y="6.96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2">web_service.</text:span></text:p>
              <text:p text:style-name="P13"><text:span text:style-name="T2">WebService</text:span></text:p>
              <text:p text:style-name="P13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3" draw:text-style-name="P16" draw:layer="layout" svg:width="5.654cm" svg:height="0.949cm" svg:x="2.013cm" svg:y="8.595cm">
              <text:p text:style-name="P20"><text:span text:style-name="T3">- web_queue: Queue</text:span></text:p>
              <text:p text:style-name="P20"><text:span text:style-name="T3">- uvicorn_server: UvicornSer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4" draw:text-style-name="P38" draw:layer="layout" svg:width="5.654cm" svg:height="2.175cm" svg:x="2.013cm" svg:y="9.5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37"><text:span text:style-name="T3">+ init()</text:span></text:p>
              <text:p text:style-name="P37"><text:span text:style-name="T3">+ stop()</text:span></text:p>
              <text:p text:style-name="P37"><text:span text:style-name="T3">+ get_state()</text:span></text:p>
              <text:p text:style-name="P37"><text:span text:style-name="T3">+ start()</text:span></text:p>
              <text:p text:style-name="P37"><text:span text:style-name="T3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15" draw:text-style-name="P17" draw:layer="layout" draw:line-skew="0.485cm" svg:x1="3.585cm" svg:y1="6.969cm" svg:x2="3.265cm" svg:y2="5.27cm" draw:start-shape="id17" draw:start-glue-point="5" draw:end-shape="id18" draw:end-glue-point="16" svg:d="M3585 6969v-366h-320v-1333" svg:viewBox="0 0 321 1700">
          <text:p/>
        </draw:connector>
        <draw:custom-shape draw:style-name="gr116" draw:text-style-name="P18" draw:layer="layout" svg:width="24.765cm" svg:height="0.952cm" svg:x="1cm" svg:y="1.1cm">
          <text:p text:style-name="P7">Static view: Web Servic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19" draw:id="id1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17" draw:text-style-name="P14" draw:layer="layout" svg:width="4.763cm" svg:height="1.627cm" svg:x="12.747cm" svg:y="9.18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2">web_server.</text:span></text:p>
              <text:p text:style-name="P13"><text:span text:style-name="T2">UvicornServer</text:span></text:p>
              <text:p text:style-name="P13"><text:span text:style-name="T2">&lt;&lt;Server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8" draw:text-style-name="P16" draw:layer="layout" svg:width="4.763cm" svg:height="0.473cm" svg:x="12.747cm" svg:y="10.8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9" draw:text-style-name="P16" draw:layer="layout" svg:width="4.763cm" svg:height="1.781cm" svg:x="12.747cm" svg:y="11.28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3">+ init(app:FastAPI)</text:span></text:p>
              <text:p text:style-name="P15"><text:span text:style-name="T3">+ run()</text:span></text:p>
              <text:p text:style-name="P15"><text:span text:style-name="T3">+ start()</text:span></text:p>
              <text:p text:style-name="P15"><text:span text:style-name="T3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20" draw:id="id2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g draw:style-name="gr1">
              <draw:custom-shape draw:style-name="gr120" draw:text-style-name="P14" draw:layer="layout" svg:width="5.602cm" svg:height="1.627cm" svg:x="19.232cm" svg:y="9.814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13"><text:span text:style-name="T2">fastapi_server.</text:span></text:p>
                <text:p text:style-name="P13"><text:span text:style-name="T2">api_ap</text:span></text:p>
                <text:p text:style-name="P13"><text:span text:style-name="T2">&lt;&lt;Framework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1" draw:text-style-name="P16" draw:layer="layout" svg:width="5.602cm" svg:height="0.676cm" svg:x="19.232cm" svg:y="11.441cm">
                <text:p text:style-name="P15"><text:span text:style-name="T3">+ api_app: FastAPI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2" draw:text-style-name="P16" draw:layer="layout" svg:width="5.602cm" svg:height="2.175cm" svg:x="19.232cm" svg:y="12.111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15"><text:span text:style-name="T3">+ @api_app.get()</text:span></text:p>
                <text:p text:style-name="P15"><text:span text:style-name="T3">+ @api_app.put()</text:span></text:p>
                <text:p text:style-name="P15"><text:span text:style-name="T3">+ @api_app.post()</text:span></text:p>
                <text:p text:style-name="P15"><text:span text:style-name="T3">+ @api_app.api_route()</text:span></text:p>
                <text:p text:style-name="P15"><text:span text:style-name="T3">+ @api_app.middleware(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frame draw:style-name="gr15" draw:text-style-name="P19" draw:layer="layout" svg:width="3.81cm" svg:height="0.725cm" svg:x="9.255cm" svg:y="7.985cm">
          <draw:text-box>
            <text:p><text:span text:style-name="T4">&lt;&lt;consists of&gt;&gt;</text:span></text:p>
          </draw:text-box>
        </draw:frame>
        <draw:connector draw:style-name="gr123" draw:text-style-name="P17" draw:layer="layout" svg:x1="15.128cm" svg:y1="9.184cm" svg:x2="7.666cm" svg:y2="7.604cm" draw:start-shape="id19" draw:start-glue-point="0" draw:end-shape="id17" draw:end-glue-point="13" svg:d="M15128 9184v-1580h-7462" svg:viewBox="0 0 7463 1581">
          <text:p/>
        </draw:connector>
        <draw:connector draw:style-name="gr124" draw:text-style-name="P17" draw:layer="layout" svg:x1="17.509cm" svg:y1="9.82cm" svg:x2="23.278cm" svg:y2="9.815cm" draw:start-shape="id19" draw:start-glue-point="13" draw:end-shape="id20" draw:end-glue-point="14" svg:d="M17509 9820h862v-534h4907v529" svg:viewBox="0 0 5770 535">
          <text:p/>
        </draw:connector>
        <draw:g draw:style-name="gr1" xml:id="id21" draw:id="id2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25" draw:text-style-name="P14" draw:layer="layout" svg:width="4.849cm" svg:height="1.627cm" svg:x="2.183cm" svg:y="13.03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2">wifi_service.</text:span></text:p>
              <text:p text:style-name="P13"><text:span text:style-name="T2">WifiService</text:span></text:p>
              <text:p text:style-name="P13"><text:span text:style-name="T2">&lt;&lt;Server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6" draw:text-style-name="P16" draw:layer="layout" svg:width="4.849cm" svg:height="0.779cm" svg:x="2.183cm" svg:y="14.66cm">
              <text:p text:style-name="P15"><text:span text:style-name="T3">- web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7" draw:text-style-name="P16" draw:layer="layout" svg:width="4.849cm" svg:height="2.569cm" svg:x="2.183cm" svg:y="15.43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3">+ init(queue: Queue)</text:span></text:p>
              <text:p text:style-name="P15"><text:span text:style-name="T3">+ get_state()</text:span></text:p>
              <text:p text:style-name="P15"><text:span text:style-name="T3">+ wifi_connect()</text:span></text:p>
              <text:p text:style-name="P15"><text:span text:style-name="T3">+ wifi_disconnect()</text:span></text:p>
              <text:p text:style-name="P15"><text:span text:style-name="T3">+ close()</text:span></text:p>
              <text:p text:style-name="P15"><text:span text:style-name="T3">- send_messag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28" draw:text-style-name="P17" draw:layer="layout" svg:x1="5.684cm" svg:y1="13.034cm" svg:x2="3.585cm" svg:y2="11.719cm" draw:start-shape="id21" draw:start-glue-point="14" draw:end-shape="id17" draw:end-glue-point="8" svg:d="M5684 13034v-659h-2099v-656" svg:viewBox="0 0 2100 1316">
          <text:p/>
        </draw:connector>
        <draw:frame draw:style-name="gr15" draw:text-style-name="P19" draw:layer="layout" svg:width="3.085cm" svg:height="0.725cm" svg:x="4.265cm" svg:y="11.922cm">
          <draw:text-box>
            <text:p><text:span text:style-name="T4">&lt;&lt;uses&gt;&gt;</text:span></text:p>
          </draw:text-box>
        </draw:frame>
        <draw:frame draw:style-name="gr15" draw:text-style-name="P19" draw:layer="layout" svg:width="3.085cm" svg:height="0.725cm" svg:x="20.685cm" svg:y="8.62cm">
          <draw:text-box>
            <text:p><text:span text:style-name="T4">&lt;&lt;uses&gt;&gt;</text:span></text:p>
          </draw:text-box>
        </draw:frame>
      </draw:page>
      <draw:page draw:name="WiFi" draw:style-name="dp1" draw:master-page-name="Default">
        <draw:custom-shape draw:style-name="gr106" draw:text-style-name="P8" draw:layer="layout" svg:width="23.589cm" svg:height="0.7cm" svg:x="1.465cm" svg:y="2.35cm">
          <text:p text:style-name="P7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8" draw:layer="layout" svg:width="23.452cm" svg:height="0.7cm" svg:x="1.602cm" svg:y="5.65cm">
          <text:p text:style-name="P7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23" draw:id="id23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129" draw:text-style-name="P10" draw:layer="layout" svg:width="23.532cm" svg:height="1.153cm" svg:x="1.598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9"><text:span text:style-name="T2">oradio_control.py</text:span></text:p>
            <text:p text:style-name="P9"><text:span text:style-name="T2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11" draw:layer="layout" svg:width="23.532cm" svg:height="0.679cm" svg:x="1.598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3"><text:span text:style-name="T2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0" draw:text-style-name="P8" draw:layer="layout" svg:width="23.743cm" svg:height="0.7cm" svg:x="1.311cm" svg:y="18.7cm">
          <text:p text:style-name="P7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3.085cm" svg:height="0.725cm" svg:x="5.535cm" svg:y="6.625cm">
          <draw:text-box>
            <text:p><text:span text:style-name="T4">&lt;&lt;uses&gt;&gt;</text:span></text:p>
          </draw:text-box>
        </draw:frame>
        <draw:custom-shape draw:style-name="gr111" draw:text-style-name="P12" draw:layer="layout" svg:width="24.765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22" draw:id="id2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31" draw:text-style-name="P14" draw:layer="layout" svg:width="5.654cm" svg:height="1.627cm" svg:x="2.013cm" svg:y="6.96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2">web_service.</text:span></text:p>
              <text:p text:style-name="P13"><text:span text:style-name="T2">WebService</text:span></text:p>
              <text:p text:style-name="P13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2" draw:text-style-name="P16" draw:layer="layout" svg:width="5.654cm" svg:height="0.949cm" svg:x="2.013cm" svg:y="8.595cm">
              <text:p text:style-name="P20"><text:span text:style-name="T3">- web_queue: Queue</text:span></text:p>
              <text:p text:style-name="P20"><text:span text:style-name="T3">- uvicorn_server: UvicornSer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3" draw:text-style-name="P38" draw:layer="layout" svg:width="5.654cm" svg:height="2.175cm" svg:x="2.013cm" svg:y="9.5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37"><text:span text:style-name="T3">+ init()</text:span></text:p>
              <text:p text:style-name="P37"><text:span text:style-name="T3">+ stop()</text:span></text:p>
              <text:p text:style-name="P37"><text:span text:style-name="T3">+ get_state()</text:span></text:p>
              <text:p text:style-name="P37"><text:span text:style-name="T3">+ start()</text:span></text:p>
              <text:p text:style-name="P37"><text:span text:style-name="T3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34" draw:text-style-name="P17" draw:layer="layout" draw:line-skew="0.485cm" svg:x1="3.585cm" svg:y1="6.969cm" svg:x2="3.265cm" svg:y2="5.27cm" draw:start-shape="id22" draw:start-glue-point="5" draw:end-shape="id23" draw:end-glue-point="16" svg:d="M3585 6969v-366h-320v-1333" svg:viewBox="0 0 321 1700">
          <text:p/>
        </draw:connector>
        <draw:custom-shape draw:style-name="gr116" draw:text-style-name="P18" draw:layer="layout" svg:width="24.765cm" svg:height="0.952cm" svg:x="1cm" svg:y="1.1cm">
          <text:p text:style-name="P7">Static view: WiFi Servic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24" draw:id="id2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35" draw:text-style-name="P14" draw:layer="layout" svg:width="4.763cm" svg:height="1.627cm" svg:x="12.747cm" svg:y="9.18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2">web_server.</text:span></text:p>
              <text:p text:style-name="P13"><text:span text:style-name="T2">UvicornServer</text:span></text:p>
              <text:p text:style-name="P13"><text:span text:style-name="T2">&lt;&lt;Server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6" draw:text-style-name="P16" draw:layer="layout" svg:width="4.763cm" svg:height="0.473cm" svg:x="12.747cm" svg:y="10.8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7" draw:text-style-name="P16" draw:layer="layout" svg:width="4.763cm" svg:height="1.781cm" svg:x="12.747cm" svg:y="11.28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3">+ init(app:FastAPI)</text:span></text:p>
              <text:p text:style-name="P15"><text:span text:style-name="T3">+ run()</text:span></text:p>
              <text:p text:style-name="P15"><text:span text:style-name="T3">+ start()</text:span></text:p>
              <text:p text:style-name="P15"><text:span text:style-name="T3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25" draw:id="id2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g draw:style-name="gr1">
              <draw:custom-shape draw:style-name="gr138" draw:text-style-name="P14" draw:layer="layout" svg:width="5.602cm" svg:height="1.627cm" svg:x="19.232cm" svg:y="9.814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13"><text:span text:style-name="T2">fastapi_server.</text:span></text:p>
                <text:p text:style-name="P13"><text:span text:style-name="T2">api_ap</text:span></text:p>
                <text:p text:style-name="P13"><text:span text:style-name="T2">&lt;&lt;Framework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9" draw:text-style-name="P16" draw:layer="layout" svg:width="5.602cm" svg:height="0.676cm" svg:x="19.232cm" svg:y="11.441cm">
                <text:p text:style-name="P15"><text:span text:style-name="T3">+ api_app: FastAPI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40" draw:text-style-name="P16" draw:layer="layout" svg:width="5.602cm" svg:height="2.175cm" svg:x="19.232cm" svg:y="12.111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15"><text:span text:style-name="T3">+ @api_app.get()</text:span></text:p>
                <text:p text:style-name="P15"><text:span text:style-name="T3">+ @api_app.put()</text:span></text:p>
                <text:p text:style-name="P15"><text:span text:style-name="T3">+ @api_app.post()</text:span></text:p>
                <text:p text:style-name="P15"><text:span text:style-name="T3">+ @api_app.api_route()</text:span></text:p>
                <text:p text:style-name="P15"><text:span text:style-name="T3">+ @api_app.middleware(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frame draw:style-name="gr15" draw:text-style-name="P19" draw:layer="layout" svg:width="3.81cm" svg:height="0.725cm" svg:x="10.525cm" svg:y="7.26cm">
          <draw:text-box>
            <text:p><text:span text:style-name="T4">&lt;&lt;consists of&gt;&gt;</text:span></text:p>
          </draw:text-box>
        </draw:frame>
        <draw:connector draw:style-name="gr141" draw:text-style-name="P17" draw:layer="layout" svg:x1="15.128cm" svg:y1="9.184cm" svg:x2="7.666cm" svg:y2="7.604cm" draw:start-shape="id24" draw:start-glue-point="0" draw:end-shape="id22" draw:end-glue-point="13" svg:d="M15128 9184v-1580h-7462" svg:viewBox="0 0 7463 1581">
          <text:p/>
        </draw:connector>
        <draw:connector draw:style-name="gr142" draw:text-style-name="P17" draw:layer="layout" svg:x1="17.509cm" svg:y1="9.82cm" svg:x2="23.278cm" svg:y2="9.815cm" draw:start-shape="id24" draw:start-glue-point="13" draw:end-shape="id25" draw:end-glue-point="14" svg:d="M17509 9820h862v-534h4907v529" svg:viewBox="0 0 5770 535">
          <text:p/>
        </draw:connector>
        <draw:g draw:style-name="gr1" xml:id="id26" draw:id="id2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43" draw:text-style-name="P14" draw:layer="layout" svg:width="4.849cm" svg:height="1.627cm" svg:x="2.183cm" svg:y="13.03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2">wifi_service.</text:span></text:p>
              <text:p text:style-name="P13"><text:span text:style-name="T2">WifiService</text:span></text:p>
              <text:p text:style-name="P13"><text:span text:style-name="T2">&lt;&lt;Server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4" draw:text-style-name="P16" draw:layer="layout" svg:width="4.849cm" svg:height="0.779cm" svg:x="2.183cm" svg:y="14.66cm">
              <text:p text:style-name="P15"><text:span text:style-name="T3">- web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5" draw:text-style-name="P16" draw:layer="layout" svg:width="4.849cm" svg:height="2.569cm" svg:x="2.183cm" svg:y="15.43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3">+ init(queue: Queue)</text:span></text:p>
              <text:p text:style-name="P15"><text:span text:style-name="T3">+ get_state()</text:span></text:p>
              <text:p text:style-name="P15"><text:span text:style-name="T3">+ wifi_connect()</text:span></text:p>
              <text:p text:style-name="P15"><text:span text:style-name="T3">+ wifi_disconnect()</text:span></text:p>
              <text:p text:style-name="P15"><text:span text:style-name="T3">+ close()</text:span></text:p>
              <text:p text:style-name="P15"><text:span text:style-name="T3">- send_messag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46" draw:text-style-name="P17" draw:layer="layout" svg:x1="5.684cm" svg:y1="13.034cm" svg:x2="3.585cm" svg:y2="11.719cm" draw:start-shape="id26" draw:start-glue-point="14" draw:end-shape="id22" draw:end-glue-point="8" svg:d="M5684 13034v-659h-2099v-656" svg:viewBox="0 0 2100 1316">
          <text:p/>
        </draw:connector>
        <draw:frame draw:style-name="gr15" draw:text-style-name="P19" draw:layer="layout" svg:width="3.085cm" svg:height="0.725cm" svg:x="4.265cm" svg:y="11.922cm">
          <draw:text-box>
            <text:p><text:span text:style-name="T4">&lt;&lt;uses&gt;&gt;</text:span></text:p>
          </draw:text-box>
        </draw:frame>
        <draw:frame draw:style-name="gr15" draw:text-style-name="P19" draw:layer="layout" svg:width="3.085cm" svg:height="0.725cm" svg:x="20.685cm" svg:y="8.62cm">
          <draw:text-box>
            <text:p><text:span text:style-name="T4">&lt;&lt;uses&gt;&gt;</text:span></text:p>
          </draw:text-box>
        </draw:frame>
      </draw:page>
      <draw:page draw:name="USB" draw:style-name="dp1" draw:master-page-name="Default">
        <draw:custom-shape draw:style-name="gr147" draw:text-style-name="P8" draw:layer="layout" svg:width="25.553cm" svg:height="0.7cm" svg:x="1.482cm" svg:y="2.35cm">
          <text:p text:style-name="P7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8" draw:layer="layout" svg:width="25.402cm" svg:height="0.7cm" svg:x="1.633cm" svg:y="5.65cm">
          <text:p text:style-name="P7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28" draw:id="id28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149" draw:text-style-name="P10" draw:layer="layout" svg:width="25.406cm" svg:height="1.153cm" svg:x="1.629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9"><text:span text:style-name="T2">oradio_control.py</text:span></text:p>
            <text:p text:style-name="P9"><text:span text:style-name="T2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11" draw:layer="layout" svg:width="25.406cm" svg:height="0.679cm" svg:x="1.629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3"><text:span text:style-name="T2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51" draw:text-style-name="P8" draw:layer="layout" svg:width="25.724cm" svg:height="0.7cm" svg:x="1.311cm" svg:y="17.1cm">
          <text:p text:style-name="P7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3.085cm" svg:height="0.725cm" svg:x="10.297cm" svg:y="6.715cm">
          <draw:text-box>
            <text:p><text:span text:style-name="T4">&lt;&lt;uses&gt;&gt;</text:span></text:p>
          </draw:text-box>
        </draw:frame>
        <draw:custom-shape draw:style-name="gr152" draw:text-style-name="P12" draw:layer="layout" svg:width="26.352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27" draw:id="id2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53" draw:text-style-name="P14" draw:layer="layout" svg:width="6.54cm" svg:height="1.153cm" svg:x="11.412cm" svg:y="8.31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2">usb_service.USBService</text:span></text:p>
              <text:p text:style-name="P13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4" draw:text-style-name="P16" draw:layer="layout" svg:width="6.54cm" svg:height="1.075cm" svg:x="11.412cm" svg:y="9.464cm">
              <text:p text:style-name="P20"><text:span text:style-name="T3">- usb_observer: USBObserver</text:span></text:p>
              <text:p text:style-name="P20"><text:span text:style-name="T3">- usb_monitor: USBMonit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5" draw:text-style-name="P16" draw:layer="layout" svg:width="6.54cm" svg:height="2.569cm" svg:x="11.412cm" svg:y="10.53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3">+ init()</text:span></text:p>
              <text:p text:style-name="P15"><text:span text:style-name="T3">+ get_state()</text:span></text:p>
              <text:p text:style-name="P15"><text:span text:style-name="T3">+ close()</text:span></text:p>
              <text:p text:style-name="P15"><text:span text:style-name="T3">- usb_inserted()</text:span></text:p>
              <text:p text:style-name="P15"><text:span text:style-name="T3">- usb_removed()</text:span></text:p>
              <text:p text:style-name="P15"><text:span text:style-name="T3">- send_messag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56" draw:text-style-name="P17" draw:layer="layout" svg:x1="13.231cm" svg:y1="8.312cm" svg:x2="10.184cm" svg:y2="5.27cm" draw:start-shape="id27" draw:start-glue-point="5" draw:end-shape="id28" draw:end-glue-point="23" svg:d="M13231 8312v-1522h-3047v-1520" svg:viewBox="0 0 3048 3043">
          <text:p/>
        </draw:connector>
        <draw:custom-shape draw:style-name="gr157" draw:text-style-name="P18" draw:layer="layout" svg:width="26.352cm" svg:height="0.952cm" svg:x="1cm" svg:y="1.1cm">
          <text:p text:style-name="P7">Static view: USB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31" draw:id="id3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g draw:style-name="gr1">
              <draw:custom-shape draw:style-name="gr158" draw:text-style-name="P14" draw:layer="layout" svg:width="5.448cm" svg:height="1.153cm" svg:x="2.172cm" svg:y="9.559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13"><text:span text:style-name="T2">&lt;&lt;singleton&gt;&gt;</text:span></text:p>
                <text:p text:style-name="P13"><text:span text:style-name="T2">usb_service.USBObserv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9" draw:text-style-name="P16" draw:layer="layout" svg:width="5.448cm" svg:height="0.692cm" svg:x="2.172cm" svg:y="10.712cm">
                <text:p text:style-name="P20"><text:span text:style-name="T3">- obserrver: Observ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0" draw:text-style-name="P16" draw:layer="layout" svg:width="5.448cm" svg:height="0.993cm" svg:x="2.172cm" svg:y="11.404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15"><text:span text:style-name="T3">+ start()</text:span></text:p>
                <text:p text:style-name="P15"><text:span text:style-name="T3">+ stop(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draw:style-name="gr1" xml:id="id29" draw:id="id2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61" draw:text-style-name="P14" draw:layer="layout" svg:width="5.448cm" svg:height="1.153cm" svg:x="19.35cm" svg:y="9.57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2">&lt;&lt;singleton&gt;&gt;</text:span></text:p>
              <text:p text:style-name="P13"><text:span text:style-name="T2">usb_service.USBMonit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2" draw:text-style-name="P16" draw:layer="layout" svg:width="5.448cm" svg:height="0.434cm" svg:x="19.35cm" svg:y="10.7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3" draw:text-style-name="P16" draw:layer="layout" svg:width="5.448cm" svg:height="0.993cm" svg:x="19.35cm" svg:y="11.15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3">- on_created()</text:span></text:p>
              <text:p text:style-name="P15"><text:span text:style-name="T3">- usb_deleted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64" draw:text-style-name="P17" draw:layer="layout" svg:x1="23.285cm" svg:y1="12.152cm" svg:x2="25.099cm" svg:y2="14.302cm" draw:start-shape="id29" draw:start-glue-point="9" draw:end-shape="id30" draw:end-glue-point="14" svg:d="M23285 12152v1074h1814v1076" svg:viewBox="0 0 1815 2151">
          <text:p/>
        </draw:connector>
        <draw:g draw:style-name="gr1" xml:id="id30" draw:id="id3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65" draw:text-style-name="P14" draw:layer="layout" svg:width="6.718cm" svg:height="1.153cm" svg:x="20.247cm" svg:y="14.30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2">&lt;&lt;BaseClass&gt;&gt;</text:span></text:p>
              <text:p text:style-name="P13"><text:span text:style-name="T2">PatternMatchingEventHandl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6" draw:text-style-name="P16" draw:layer="layout" svg:width="6.718cm" svg:height="0.366cm" svg:x="20.247cm" svg:y="15.4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7" draw:text-style-name="P16" draw:layer="layout" svg:width="6.718cm" svg:height="0.599cm" svg:x="20.247cm" svg:y="15.8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3">+ handle_event(eve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68" draw:text-style-name="P17" draw:layer="layout" svg:x1="23.285cm" svg:y1="9.573cm" svg:x2="17.951cm" svg:y2="8.947cm" draw:start-shape="id29" draw:start-glue-point="14" draw:end-shape="id27" draw:end-glue-point="13" svg:d="M23285 9573v-626h-5334" svg:viewBox="0 0 5335 627">
          <text:p/>
        </draw:connector>
        <draw:connector draw:style-name="gr169" draw:text-style-name="P17" draw:layer="layout" svg:x1="6.107cm" svg:y1="9.56cm" svg:x2="11.413cm" svg:y2="8.947cm" draw:start-shape="id31" draw:start-glue-point="14" draw:end-shape="id27" draw:end-glue-point="6" svg:d="M6107 9560v-613h5306" svg:viewBox="0 0 5307 614">
          <text:p/>
        </draw:connector>
        <draw:g draw:style-name="gr1" xml:id="id32" draw:id="id3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70" draw:text-style-name="P32" draw:layer="layout" svg:width="6.35cm" svg:height="1.153cm" svg:x="1.87cm" svg:y="14.01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2">&lt;&lt;Library&gt;&gt;</text:span></text:p>
              <text:p text:style-name="P39"><text:span text:style-name="T2">watchdog.observers.Obser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1" draw:text-style-name="P16" draw:layer="layout" svg:width="6.35cm" svg:height="0.599cm" svg:x="1.87cm" svg:y="15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2" draw:text-style-name="P16" draw:layer="layout" svg:width="6.35cm" svg:height="0.599cm" svg:x="1.87cm" svg:y="15.76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3">+ schedul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73" draw:text-style-name="P17" draw:layer="layout" svg:x1="6.456cm" svg:y1="14.012cm" svg:x2="3.687cm" svg:y2="12.397cm" draw:start-shape="id32" draw:start-glue-point="14" draw:end-shape="id31" draw:end-glue-point="8" svg:d="M6456 14012v-808h-2769v-807" svg:viewBox="0 0 2770 1616">
          <text:p/>
        </draw:connector>
        <draw:frame draw:style-name="gr15" draw:text-style-name="P19" draw:layer="layout" svg:width="3.085cm" svg:height="0.725cm" svg:x="4.265cm" svg:y="12.43cm">
          <draw:text-box>
            <text:p><text:span text:style-name="T4">&lt;&lt;uses&gt;&gt;</text:span></text:p>
          </draw:text-box>
        </draw:frame>
        <draw:frame draw:style-name="gr15" draw:text-style-name="P19" draw:layer="layout" svg:width="2.223cm" svg:height="0.725cm" svg:x="22.907cm" svg:y="13.382cm">
          <draw:text-box>
            <text:p><text:span text:style-name="T4">&lt;&lt;is a&gt;&gt;</text:span></text:p>
          </draw:text-box>
        </draw:frame>
        <draw:frame draw:style-name="gr15" draw:text-style-name="P19" draw:layer="layout" svg:width="3.81cm" svg:height="0.725cm" svg:x="20.05cm" svg:y="7.895cm">
          <draw:text-box>
            <text:p><text:span text:style-name="T4">&lt;&lt;consists of&gt;&gt;</text:span></text:p>
          </draw:text-box>
        </draw:frame>
        <draw:frame draw:style-name="gr15" draw:text-style-name="P19" draw:layer="layout" svg:width="3.81cm" svg:height="0.725cm" svg:x="6.397cm" svg:y="7.667cm">
          <draw:text-box>
            <text:p><text:span text:style-name="T4">&lt;&lt;consists of&gt;&gt;</text:span></text:p>
          </draw:text-box>
        </draw:frame>
      </draw:page>
      <draw:page draw:name="Volume" draw:style-name="dp1" draw:master-page-name="Default">
        <draw:custom-shape draw:style-name="gr174" draw:text-style-name="P8" draw:layer="layout" svg:width="20.198cm" svg:height="0.7cm" svg:x="1.439cm" svg:y="2.35cm">
          <text:p text:style-name="P7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8" draw:layer="layout" svg:width="20.085cm" svg:height="0.7cm" svg:x="1.552cm" svg:y="5.65cm">
          <text:p text:style-name="P7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34" draw:id="id34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176" draw:text-style-name="P10" draw:layer="layout" svg:width="20.088cm" svg:height="1.153cm" svg:x="1.549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9"><text:span text:style-name="T2">oradio_control.py</text:span></text:p>
            <text:p text:style-name="P9"><text:span text:style-name="T2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7" draw:text-style-name="P11" draw:layer="layout" svg:width="20.088cm" svg:height="0.679cm" svg:x="1.549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3"><text:span text:style-name="T2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78" draw:text-style-name="P8" draw:layer="layout" svg:width="20.326cm" svg:height="0.7cm" svg:x="1.311cm" svg:y="15.8cm">
          <text:p text:style-name="P7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3.085cm" svg:height="0.725cm" svg:x="2.995cm" svg:y="6.942cm">
          <draw:text-box>
            <text:p><text:span text:style-name="T4">&lt;&lt;uses&gt;&gt;</text:span></text:p>
          </draw:text-box>
        </draw:frame>
        <draw:custom-shape draw:style-name="gr179" draw:text-style-name="P12" draw:layer="layout" svg:width="20.955cm" svg:height="15.14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33" draw:id="id3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80" draw:text-style-name="P14" draw:layer="layout" svg:width="6.686cm" svg:height="1.153cm" svg:x="3.956cm" svg:y="8.12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2">volume_control.VolumeControl</text:span></text:p>
              <text:p text:style-name="P13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1" draw:text-style-name="P16" draw:layer="layout" svg:width="6.686cm" svg:height="1.047cm" svg:x="3.956cm" svg:y="9.2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2" draw:text-style-name="P41" draw:layer="layout" svg:width="6.686cm" svg:height="1.387cm" svg:x="3.956cm" svg:y="10.32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40"><text:span text:style-name="T8">+ set_notify()</text:span></text:p>
              <text:p text:style-name="P40"><text:span text:style-name="T8">+ start()</text:span></text:p>
              <text:p text:style-name="P40"><text:span text:style-name="T8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83" draw:text-style-name="P17" draw:layer="layout" svg:x1="5.815cm" svg:y1="8.123cm" svg:x2="5.567cm" svg:y2="5.27cm" draw:start-shape="id33" draw:start-glue-point="5" draw:end-shape="id34" draw:end-glue-point="4" svg:d="M5815 8123v-1428h-248v-1425" svg:viewBox="0 0 249 2854">
          <text:p/>
        </draw:connector>
        <draw:custom-shape draw:style-name="gr93" draw:text-style-name="P18" draw:layer="layout" svg:width="20.955cm" svg:height="0.952cm" svg:x="1cm" svg:y="1.1cm">
          <text:p text:style-name="P7">Static view: Volum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35" draw:id="id3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84" draw:text-style-name="P14" draw:layer="layout" svg:width="8.572cm" svg:height="1.153cm" svg:x="13.065cm" svg:y="9.99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2">i2c_service.I2CService</text:span></text:p>
              <text:p text:style-name="P13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5" draw:text-style-name="P16" draw:layer="layout" svg:width="8.572cm" svg:height="0.761cm" svg:x="13.065cm" svg:y="11.1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6" draw:text-style-name="P16" draw:layer="layout" svg:width="8.572cm" svg:height="1.781cm" svg:x="13.065cm" svg:y="11.90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3">+ read_byte(device: int, register: int)</text:span></text:p>
              <text:p text:style-name="P15"><text:span text:style-name="T3">+ write_byte(device: int, register: int)</text:span></text:p>
              <text:p text:style-name="P15"><text:span text:style-name="T9">+ </text:span><text:span text:style-name="T10">read_block</text:span><text:span text:style-name="T9">(device: int, register: int, length: int)</text:span></text:p>
              <text:p text:style-name="P15"><text:span text:style-name="T9">+ write</text:span><text:span text:style-name="T10">_block</text:span><text:span text:style-name="T9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87" draw:text-style-name="P17" draw:layer="layout" svg:x1="19.256cm" svg:y1="9.993cm" svg:x2="10.641cm" svg:y2="8.758cm" draw:start-shape="id35" draw:start-glue-point="14" draw:end-shape="id33" draw:end-glue-point="13" svg:d="M19256 9993v-1235h-8615" svg:viewBox="0 0 8616 1236">
          <text:p/>
        </draw:connector>
        <draw:frame draw:style-name="gr15" draw:text-style-name="P19" draw:layer="layout" svg:width="2.512cm" svg:height="0.725cm" svg:x="15.287cm" svg:y="8.937cm">
          <draw:text-box>
            <text:p><text:span text:style-name="T4">&lt;&lt;has&gt;&gt;</text:span></text:p>
          </draw:text-box>
        </draw:frame>
        <draw:frame draw:style-name="gr188" draw:text-style-name="P42" draw:layer="layout" svg:width="7.937cm" svg:height="1.673cm" svg:x="6.397cm" svg:y="6.397cm">
          <draw:text-box>
            <text:p><text:span text:style-name="T11">Waarom start(), stop(), </text:span><text:span text:style-name="T11">set_notify(). Staat altijd </text:span><text:span text:style-name="T11">op notify. Dus notify </text:span><text:span text:style-name="T11">default aan. Gaat nooit </text:span><text:span text:style-name="T11">gestopt worden</text:span></text:p>
          </draw:text-box>
        </draw:frame>
      </draw:page>
      <draw:page draw:name="Error" draw:style-name="dp1" draw:master-page-name="Default">
        <draw:custom-shape draw:style-name="gr189" draw:text-style-name="P8" draw:layer="layout" svg:width="19.565cm" svg:height="0.7cm" svg:x="1.437cm" svg:y="2.35cm">
          <text:p text:style-name="P7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8" draw:layer="layout" svg:width="19.218cm" svg:height="0.7cm" svg:x="1.549cm" svg:y="5.65cm">
          <text:p text:style-name="P7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37" draw:id="id37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191" draw:text-style-name="P10" draw:layer="layout" svg:width="19.283cm" svg:height="1.153cm" svg:x="1.546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9"><text:span text:style-name="T2">oradio_control.py</text:span></text:p>
            <text:p text:style-name="P9"><text:span text:style-name="T2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11" draw:layer="layout" svg:width="19.283cm" svg:height="0.679cm" svg:x="1.546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3"><text:span text:style-name="T2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93" draw:text-style-name="P8" draw:layer="layout" svg:width="19.456cm" svg:height="0.7cm" svg:x="1.311cm" svg:y="17.1cm">
          <text:p text:style-name="P7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3.085cm" svg:height="0.725cm" svg:x="5.217cm" svg:y="6.942cm">
          <draw:text-box>
            <text:p><text:span text:style-name="T4">&lt;&lt;uses&gt;&gt;</text:span></text:p>
          </draw:text-box>
        </draw:frame>
        <draw:custom-shape draw:style-name="gr194" draw:text-style-name="P12" draw:layer="layout" svg:width="20.637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36" draw:id="id3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95" draw:text-style-name="P14" draw:layer="layout" svg:width="6.229cm" svg:height="1.153cm" svg:x="1.756cm" svg:y="8.61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2">error_service.py.ErrorService</text:span></text:p>
              <text:p text:style-name="P13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6" draw:text-style-name="P16" draw:layer="layout" svg:width="6.229cm" svg:height="0.746cm" svg:x="1.756cm" svg:y="9.764cm">
              <text:p text:style-name="P15">- error_queue:subscriber_errors()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7" draw:text-style-name="P16" draw:layer="layout" svg:width="6.229cm" svg:height="0.993cm" svg:x="1.756cm" svg:y="10.5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3">- init()</text:span></text:p>
              <text:p text:style-name="P15"><text:span text:style-name="T3">- error_handler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98" draw:text-style-name="P17" draw:layer="layout" svg:x1="3.488cm" svg:y1="8.612cm" svg:x2="5.403cm" svg:y2="5.27cm" draw:start-shape="id36" draw:start-glue-point="5" draw:end-shape="id37" draw:end-glue-point="4" svg:d="M3488 8612v-1672h1915v-1670" svg:viewBox="0 0 1916 3343">
          <text:p/>
        </draw:connector>
        <draw:custom-shape draw:style-name="gr199" draw:text-style-name="P18" draw:layer="layout" svg:width="20.637cm" svg:height="0.952cm" svg:x="1cm" svg:y="1.1cm">
          <text:p text:style-name="P7">Static view: Erro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38" draw:id="id38">
          <draw:glue-point draw:id="4" svg:x="-4cm" svg:y="-5cm"/>
          <draw:custom-shape draw:style-name="gr200" draw:text-style-name="P24" draw:layer="layout" svg:width="5.715cm" svg:height="1.153cm" svg:x="7.032cm" svg:y="13.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3"><text:span text:style-name="T2">&lt;&lt;module&gt;&gt;</text:span></text:p>
            <text:p text:style-name="P23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1" draw:text-style-name="P16" draw:layer="layout" svg:width="5.715cm" svg:height="0.771cm" svg:x="7.032cm" svg:y="14.853cm">
            <text:p text:style-name="P15"><text:span text:style-name="T3">+ Error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16" draw:layer="layout" svg:width="5.715cm" svg:height="0.599cm" svg:x="7.032cm" svg:y="15.5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5"><text:span text:style-name="T3">+ safe_get( error_queue: Queu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03" draw:text-style-name="P17" draw:layer="layout" svg:x1="9.889cm" svg:y1="13.7cm" svg:x2="11.881cm" svg:y2="11.292cm" draw:start-shape="id38" draw:end-shape="id39" draw:end-glue-point="5" svg:d="M9889 13700v-1204h1992v-1204" svg:viewBox="0 0 1993 2409">
          <text:p/>
        </draw:connector>
        <draw:frame draw:style-name="gr15" draw:text-style-name="P19" draw:layer="layout" svg:width="3.085cm" svg:height="0.725cm" svg:x="7.032cm" svg:y="12.657cm">
          <draw:text-box>
            <text:p><text:span text:style-name="T4">&lt;&lt;uses&gt;&gt;</text:span></text:p>
          </draw:text-box>
        </draw:frame>
        <draw:g draw:style-name="gr1" xml:id="id39" draw:id="id39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204" draw:text-style-name="P24" draw:layer="layout" svg:width="6.163cm" svg:height="1.153cm" svg:x="10.712cm" svg:y="8.5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3"><text:span text:style-name="T2">&lt;&lt;thread&gt;&gt;</text:span></text:p>
            <text:p text:style-name="P23"><text:span text:style-name="T2">error_service.error_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5" draw:text-style-name="P16" draw:layer="layout" svg:width="6.163cm" svg:height="0.517cm" svg:x="10.712cm" svg:y="9.6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6" draw:text-style-name="P16" draw:layer="layout" svg:width="6.163cm" svg:height="1.18cm" svg:x="10.712cm" svg:y="10.11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07" draw:text-style-name="P17" draw:layer="layout" svg:x1="10.712cm" svg:y1="9.905cm" svg:x2="7.984cm" svg:y2="9.247cm" draw:start-shape="id39" draw:end-shape="id36" draw:end-glue-point="13" svg:d="M10712 9905h-1364v-658h-1364" svg:viewBox="0 0 2729 659">
          <text:p/>
        </draw:connector>
      </draw:page>
      <draw:page draw:name="Messaging" draw:style-name="dp1" draw:master-page-name="Default">
        <draw:custom-shape draw:style-name="gr208" draw:text-style-name="P8" draw:layer="layout" svg:width="26.821cm" svg:height="0.7cm" svg:x="1.484cm" svg:y="2.35cm">
          <text:p text:style-name="P7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8" draw:layer="layout" svg:width="26.346cm" svg:height="0.7cm" svg:x="1.637cm" svg:y="5.65cm">
          <text:p text:style-name="P7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41" draw:id="id41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210" draw:text-style-name="P10" draw:layer="layout" svg:width="26.435cm" svg:height="1.153cm" svg:x="1.633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9"><text:span text:style-name="T2">oradio_control.py</text:span></text:p>
            <text:p text:style-name="P9"><text:span text:style-name="T2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1" draw:text-style-name="P11" draw:layer="layout" svg:width="26.435cm" svg:height="0.679cm" svg:x="1.633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3"><text:span text:style-name="T2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12" draw:text-style-name="P8" draw:layer="layout" svg:width="26.672cm" svg:height="0.7cm" svg:x="1.311cm" svg:y="18.5cm">
          <text:p text:style-name="P7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3.085cm" svg:height="0.725cm" svg:x="5.217cm" svg:y="6.942cm">
          <draw:text-box>
            <text:p><text:span text:style-name="T4">&lt;&lt;uses&gt;&gt;</text:span></text:p>
          </draw:text-box>
        </draw:frame>
        <draw:custom-shape draw:style-name="gr213" draw:text-style-name="P12" draw:layer="layout" svg:width="27.7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40" draw:id="id4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214" draw:text-style-name="P14" draw:layer="layout" svg:width="9.721cm" svg:height="1.153cm" svg:x="1.756cm" svg:y="7.78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2">messaging</text:span></text:p>
              <text:p text:style-name="P13"><text:span text:style-name="T2">&lt;&lt;modul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5" draw:text-style-name="P16" draw:layer="layout" svg:width="9.721cm" svg:height="0.985cm" svg:x="1.756cm" svg:y="8.94cm">
              <text:p text:style-name="P15"><text:span text:style-name="T3">- CommandMessage()</text:span></text:p>
              <text:p text:style-name="P15"><text:span text:style-name="T3">- ErrorMessag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6" draw:text-style-name="P16" draw:layer="layout" svg:width="9.721cm" svg:height="2.963cm" svg:x="1.756cm" svg:y="9.85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3">+ subscribe_commands() -&gt; Queue</text:span></text:p>
              <text:p text:style-name="P15"><text:span text:style-name="T3">+ subscribe_errors() -&gt; Queue</text:span></text:p>
              <text:p text:style-name="P15"><text:span text:style-name="T3">+ unsubscribe_commands(queue: Queue)</text:span></text:p>
              <text:p text:style-name="P15"><text:span text:style-name="T3">+ unsubscribe_errors(queue: Queue)</text:span></text:p>
              <text:p text:style-name="P15"><text:span text:style-name="T3">+ publish_command(message: CommandMessage)</text:span></text:p>
              <text:p text:style-name="P15"><text:span text:style-name="T3">+ publish_error(message: ErrorMessage)</text:span></text:p>
              <text:p text:style-name="P15"><text:span text:style-name="T3">+ safe_get(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17" draw:text-style-name="P17" draw:layer="layout" svg:x1="4.458cm" svg:y1="7.789cm" svg:x2="6.92cm" svg:y2="5.27cm" draw:start-shape="id40" draw:start-glue-point="5" draw:end-shape="id41" draw:end-glue-point="4" svg:d="M4458 7789v-1261h2462v-1258" svg:viewBox="0 0 2463 2520">
          <text:p/>
        </draw:connector>
        <draw:custom-shape draw:style-name="gr218" draw:text-style-name="P18" draw:layer="layout" svg:width="27.7cm" svg:height="0.952cm" svg:x="1cm" svg:y="1.1cm">
          <text:p text:style-name="P7">Static view: Messaging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45" draw:id="id4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219" draw:text-style-name="P14" draw:layer="layout" svg:width="6.667cm" svg:height="1.153cm" svg:x="18.068cm" svg:y="14.50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2">messaging.CommandMessage</text:span></text:p>
              <text:p text:style-name="P13"><text:span text:style-name="T2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0" draw:text-style-name="P16" draw:layer="layout" svg:width="6.667cm" svg:height="1.454cm" svg:x="18.068cm" svg:y="15.657cm">
              <text:p text:style-name="P15"><text:span text:style-name="T3">+ source: String</text:span></text:p>
              <text:p text:style-name="P15"><text:span text:style-name="T3">+ message: String</text:span></text:p>
              <text:p text:style-name="P15"><text:span text:style-name="T3">+ data: Any</text:span></text:p>
              <text:p text:style-name="P15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1" draw:text-style-name="P16" draw:layer="layout" svg:width="6.667cm" svg:height="0.599cm" svg:x="18.068cm" svg:y="17.11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3"><text:s/></text:span><text:span text:style-name="T3">+ is_valid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44" draw:id="id4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222" draw:text-style-name="P14" draw:layer="layout" svg:width="6.667cm" svg:height="1.153cm" svg:x="10.208cm" svg:y="14.65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2">messaging.ErrorMessage</text:span></text:p>
              <text:p text:style-name="P13"><text:span text:style-name="T2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3" draw:text-style-name="P16" draw:layer="layout" svg:width="6.667cm" svg:height="0.994cm" svg:x="10.208cm" svg:y="15.805cm">
              <text:p text:style-name="P15"><text:span text:style-name="T3">+ source: String</text:span></text:p>
              <text:p text:style-name="P15"><text:span text:style-name="T3">+ message: Str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4" draw:text-style-name="P16" draw:layer="layout" svg:width="6.667cm" svg:height="0.599cm" svg:x="10.208cm" svg:y="16.79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3"><text:s/></text:span><text:span text:style-name="T3">+ is_valid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42" draw:id="id4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225" draw:text-style-name="P14" draw:layer="layout" svg:width="11.43cm" svg:height="1.153cm" svg:x="15.922cm" svg:y="7.71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2">messaging.PubSubManager</text:span></text:p>
              <text:p text:style-name="P13"><text:span text:style-name="T2">&lt;&lt;singleton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6" draw:text-style-name="P16" draw:layer="layout" svg:width="11.43cm" svg:height="0.908cm" svg:x="15.922cm" svg:y="8.865cm">
              <text:p text:style-name="P15"><text:span text:style-name="T3">- Topic.COMMAND: []</text:span></text:p>
              <text:p text:style-name="P15"><text:span text:style-name="T3">- Topic.ERROR: []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7" draw:text-style-name="P16" draw:layer="layout" svg:width="11.43cm" svg:height="1.387cm" svg:x="15.922cm" svg:y="9.77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3">+ subscribe(topic: Topic) -&gt; Queue</text:span></text:p>
              <text:p text:style-name="P15"><text:span text:style-name="T3">+ unsubscripe(topic: Topic, queue:Queu)</text:span></text:p>
              <text:p text:style-name="P15"><text:span text:style-name="T3">+ publish(topic: Topic, message: CommandMessage | ErrorMessage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43" draw:id="id4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228" draw:text-style-name="P14" draw:layer="layout" svg:width="6.667cm" svg:height="1.153cm" svg:x="1.952cm" svg:y="14.76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2">messaging.Topic</text:span></text:p>
              <text:p text:style-name="P13"><text:span text:style-name="T2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9" draw:text-style-name="P16" draw:layer="layout" svg:width="6.667cm" svg:height="0.994cm" svg:x="1.952cm" svg:y="15.917cm">
              <text:p text:style-name="P15"><text:span text:style-name="T3">+ COMMAND = "COMMAND"</text:span></text:p>
              <text:p text:style-name="P15"><text:span text:style-name="T3">+ ERROR = "ERROR"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0" draw:text-style-name="P16" draw:layer="layout" svg:width="6.667cm" svg:height="0.599cm" svg:x="1.952cm" svg:y="16.91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31" draw:text-style-name="P17" draw:layer="layout" svg:x1="15.923cm" svg:y1="10.616cm" svg:x2="11.476cm" svg:y2="8.423cm" draw:start-shape="id42" draw:start-glue-point="11" draw:end-shape="id40" draw:end-glue-point="13" svg:d="M15923 10616h-2224v-2193h-2223" svg:viewBox="0 0 4448 2194">
          <text:p/>
        </draw:connector>
        <draw:frame draw:style-name="gr15" draw:text-style-name="P19" draw:layer="layout" svg:width="2.54cm" svg:height="0.725cm" svg:x="12.112cm" svg:y="7.667cm">
          <draw:text-box>
            <text:p text:style-name="P43"><text:span text:style-name="T4">&lt;&lt;has&gt;&gt;</text:span></text:p>
          </draw:text-box>
        </draw:frame>
        <draw:connector draw:style-name="gr232" draw:text-style-name="P17" draw:layer="layout" svg:x1="3.805cm" svg:y1="14.765cm" svg:x2="4.458cm" svg:y2="12.817cm" draw:start-shape="id43" draw:start-glue-point="5" draw:end-shape="id40" draw:end-glue-point="8" svg:d="M3805 14765v-975h653v-973" svg:viewBox="0 0 654 1949">
          <text:p/>
        </draw:connector>
        <draw:connector draw:style-name="gr233" draw:text-style-name="P17" draw:layer="layout" svg:x1="12.061cm" svg:y1="14.653cm" svg:x2="8.776cm" svg:y2="12.817cm" draw:start-shape="id44" draw:start-glue-point="5" draw:end-shape="id40" draw:end-glue-point="9" svg:d="M12061 14653v-919h-3285v-917" svg:viewBox="0 0 3286 1837">
          <text:p/>
        </draw:connector>
        <draw:connector draw:style-name="gr234" draw:text-style-name="P17" draw:layer="layout" svg:x1="19.921cm" svg:y1="14.505cm" svg:x2="11.476cm" svg:y2="12.273cm" draw:start-shape="id45" draw:start-glue-point="5" draw:end-shape="id40" draw:end-glue-point="12" svg:d="M19921 14505v-2232h-8445" svg:viewBox="0 0 8446 2233">
          <text:p/>
        </draw:connector>
        <draw:frame draw:style-name="gr15" draw:text-style-name="P19" draw:layer="layout" svg:width="2.54cm" svg:height="0.725cm" svg:x="5.762cm" svg:y="13.292cm">
          <draw:text-box>
            <text:p text:style-name="P43"><text:span text:style-name="T4">&lt;&lt;uses&gt;&gt;</text:span></text:p>
          </draw:text-box>
        </draw:frame>
      </draw:page>
      <draw:page draw:name="Power Supply" draw:style-name="dp1" draw:master-page-name="Default">
        <draw:custom-shape draw:style-name="gr189" draw:text-style-name="P8" draw:layer="layout" svg:width="19.565cm" svg:height="0.7cm" svg:x="1.437cm" svg:y="2.35cm">
          <text:p text:style-name="P7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8" draw:layer="layout" svg:width="19.218cm" svg:height="0.7cm" svg:x="1.549cm" svg:y="5.65cm">
          <text:p text:style-name="P7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47" draw:id="id47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235" draw:text-style-name="P10" draw:layer="layout" svg:width="19.283cm" svg:height="1.153cm" svg:x="1.546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9"><text:span text:style-name="T2">oradio_control.py</text:span></text:p>
            <text:p text:style-name="P9"><text:span text:style-name="T2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6" draw:text-style-name="P11" draw:layer="layout" svg:width="19.283cm" svg:height="0.679cm" svg:x="1.546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3"><text:span text:style-name="T2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93" draw:text-style-name="P8" draw:layer="layout" svg:width="19.456cm" svg:height="0.7cm" svg:x="1.311cm" svg:y="17.1cm">
          <text:p text:style-name="P7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3.085cm" svg:height="0.725cm" svg:x="5.217cm" svg:y="6.942cm">
          <draw:text-box>
            <text:p><text:span text:style-name="T4">&lt;&lt;uses&gt;&gt;</text:span></text:p>
          </draw:text-box>
        </draw:frame>
        <draw:custom-shape draw:style-name="gr194" draw:text-style-name="P12" draw:layer="layout" svg:width="20.637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46" draw:id="id4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237" draw:text-style-name="P14" draw:layer="layout" svg:width="8.991cm" svg:height="1.153cm" svg:x="1.756cm" svg:y="7.98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2">power_supply_control.PowerSupplyService</text:span></text:p>
              <text:p text:style-name="P13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8" draw:text-style-name="P16" draw:layer="layout" svg:width="8.991cm" svg:height="0.604cm" svg:x="1.756cm" svg:y="9.1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6" draw:layer="layout" svg:width="8.991cm" svg:height="1.781cm" svg:x="1.756cm" svg:y="9.74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3">+ set_nom_voltage()</text:span></text:p>
              <text:p text:style-name="P15"><text:span text:style-name="T3">+ set_max_voltage()</text:span></text:p>
              <text:p text:style-name="P15"><text:span text:style-name="T3">+ set_standby_voltage()</text:span></text:p>
              <text:p text:style-name="P15"><text:span text:style-name="T3">+ read_status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40" draw:text-style-name="P17" draw:layer="layout" svg:x1="4.255cm" svg:y1="7.989cm" svg:x2="5.403cm" svg:y2="5.27cm" draw:start-shape="id46" draw:start-glue-point="5" draw:end-shape="id47" draw:end-glue-point="4" svg:d="M4255 7989v-1361h1148v-1358" svg:viewBox="0 0 1149 2720">
          <text:p/>
        </draw:connector>
        <draw:custom-shape draw:style-name="gr199" draw:text-style-name="P18" draw:layer="layout" svg:width="20.637cm" svg:height="0.952cm" svg:x="1cm" svg:y="1.1cm">
          <text:p text:style-name="P7">Static view: Power Supply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48" draw:id="id4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241" draw:text-style-name="P14" draw:layer="layout" svg:width="8.572cm" svg:height="1.153cm" svg:x="9.977cm" svg:y="12.72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2">&lt;&lt;singleton&gt;&gt;</text:span></text:p>
              <text:p text:style-name="P13"><text:span text:style-name="T2">i2c_service.I2C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2" draw:text-style-name="P16" draw:layer="layout" svg:width="8.572cm" svg:height="0.761cm" svg:x="9.977cm" svg:y="13.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3" draw:text-style-name="P16" draw:layer="layout" svg:width="8.572cm" svg:height="1.781cm" svg:x="9.977cm" svg:y="14.6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3">+ read_byte(device: int, register: int)</text:span></text:p>
              <text:p text:style-name="P15"><text:span text:style-name="T3">+ write_byte(device: int, register: int)</text:span></text:p>
              <text:p text:style-name="P15"><text:span text:style-name="T9">+ </text:span><text:span text:style-name="T10">read_block</text:span><text:span text:style-name="T9">(device: int, register: int, length: int)</text:span></text:p>
              <text:p text:style-name="P15"><text:span text:style-name="T9">+ write</text:span><text:span text:style-name="T10">_block</text:span><text:span text:style-name="T9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44" draw:text-style-name="P17" draw:layer="layout" svg:x1="12.361cm" svg:y1="12.728cm" svg:x2="10.747cm" svg:y2="9.757cm" draw:start-shape="id48" draw:start-glue-point="5" draw:end-shape="id46" draw:end-glue-point="1" svg:d="M12361 12728v-2971h-1614" svg:viewBox="0 0 1615 2972">
          <text:p/>
        </draw:connector>
        <draw:frame draw:style-name="gr15" draw:text-style-name="P19" draw:layer="layout" svg:width="2.512cm" svg:height="0.725cm" svg:x="12.747cm" svg:y="11.16cm">
          <draw:text-box>
            <text:p><text:span text:style-name="T4">&lt;&lt;has&gt;&gt;</text:span></text:p>
          </draw:text-box>
        </draw:frame>
      </draw:page>
      <draw:page draw:name="Frontpanel service" draw:style-name="dp1" draw:master-page-name="Default">
        <draw:custom-shape draw:style-name="gr245" draw:text-style-name="P8" draw:layer="layout" svg:width="27.047cm" svg:height="0.7cm" svg:x="1.258cm" svg:y="2.55cm">
          <text:p text:style-name="P7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8" draw:layer="layout" svg:width="26.989cm" svg:height="0.7cm" svg:x="1.316cm" svg:y="5.85cm">
          <text:p text:style-name="P7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49" draw:id="id49">
          <draw:glue-point draw:id="4" svg:x="-0.787cm" svg:y="5.055cm"/>
          <draw:glue-point draw:id="5" svg:x="-5.063cm" svg:y="-3.065cm"/>
          <draw:custom-shape draw:style-name="gr247" draw:text-style-name="P14" draw:layer="layout" svg:width="4.363cm" svg:height="1.627cm" svg:x="4.917cm" svg:y="7.28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3"><text:span text:style-name="T2">led_control.</text:span></text:p>
            <text:p text:style-name="P13"><text:span text:style-name="T2">LEDControl</text:span></text:p>
            <text:p text:style-name="P13"><text:span text:style-name="T2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8" draw:text-style-name="P16" draw:layer="layout" svg:width="4.363cm" svg:height="0.671cm" svg:x="4.917cm" svg:y="8.912cm">
            <text:p text:style-name="P15"><text:span text:style-name="T3">- stop_evt: Ev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9" draw:text-style-name="P16" draw:layer="layout" svg:width="4.363cm" svg:height="2.963cm" svg:x="4.917cm" svg:y="9.58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5"><text:span text:style-name="T3">+ turn_on_led()</text:span></text:p>
            <text:p text:style-name="P15"><text:span text:style-name="T3">+ turn_off_led()</text:span></text:p>
            <text:p text:style-name="P15"><text:span text:style-name="T3">+ turn_off_all_leds()</text:span></text:p>
            <text:p text:style-name="P15"><text:span text:style-name="T3">+ turn_off_all_leds()</text:span></text:p>
            <text:p text:style-name="P15"><text:span text:style-name="T3">+ get_led_state()l</text:span></text:p>
            <text:p text:style-name="P15"><text:span text:style-name="T3">+ oneshot_on_led()</text:span></text:p>
            <text:p text:style-name="P15"><text:span text:style-name="T3">+ control_blinking_led( 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50" draw:id="id50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1.594cm" svg:y="4.863cm"/>
          <draw:glue-point draw:id="41" svg:x="-2.071cm" svg:y="4.863cm"/>
          <draw:glue-point draw:id="42" svg:x="-1.833cm" svg:y="4.863cm"/>
          <draw:custom-shape draw:style-name="gr250" draw:text-style-name="P10" draw:layer="layout" svg:width="26.896cm" svg:height="1.153cm" svg:x="1.409cm" svg:y="3.6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9"><text:span text:style-name="T2">oradio_control.py</text:span></text:p>
            <text:p text:style-name="P9"><text:span text:style-name="T2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1" draw:text-style-name="P11" draw:layer="layout" svg:width="26.896cm" svg:height="0.679cm" svg:x="1.409cm" svg:y="4.7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3"><text:span text:style-name="T2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52" draw:text-style-name="P45" draw:layer="layout" svg:width="27.204cm" svg:height="0.7cm" svg:x="1.101cm" svg:y="16.147cm">
          <text:p text:style-name="P44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3" draw:text-style-name="P17" draw:layer="layout" draw:line-skew="0.338cm" svg:x1="7.098cm" svg:y1="7.285cm" svg:x2="4.758cm" svg:y2="5.47cm" draw:start-shape="id49" draw:end-shape="id50" draw:end-glue-point="16" svg:d="M7098 7285v-570h-2340v-1245" svg:viewBox="0 0 2341 1816">
          <text:p/>
        </draw:connector>
        <draw:custom-shape draw:style-name="gr254" draw:text-style-name="P12" draw:layer="layout" svg:width="27.7cm" svg:height="17.7cm" svg:x="1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51" draw:id="id5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255" draw:text-style-name="P14" draw:layer="layout" svg:width="3.81cm" svg:height="1.627cm" svg:x="9.885cm" svg:y="7.3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2">touch_buttons.</text:span></text:p>
              <text:p text:style-name="P13"><text:span text:style-name="T2">TouchButtons</text:span></text:p>
              <text:p text:style-name="P13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6" draw:text-style-name="P16" draw:layer="layout" svg:width="3.81cm" svg:height="0.754cm" svg:x="9.885cm" svg:y="8.987cm">
              <text:p text:style-name="P15"><text:span text:style-name="T3">- stop_evt: Event()</text:span></text:p>
              <text:p text:style-name="P15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7" draw:text-style-name="P16" draw:layer="layout" svg:width="3.81cm" svg:height="0.599cm" svg:x="9.885cm" svg:y="9.7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3">+ ini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52" draw:id="id5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3.665cm" svg:y="5.097cm"/>
          <draw:g draw:style-name="gr1">
            <draw:custom-shape draw:style-name="gr258" draw:text-style-name="P14" draw:layer="layout" svg:width="5.465cm" svg:height="1.627cm" svg:x="14.55cm" svg:y="7.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2">backlighting.</text:span></text:p>
              <text:p text:style-name="P13"><text:span text:style-name="T2">BackLighting</text:span></text:p>
              <text:p text:style-name="P13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9" draw:text-style-name="P16" draw:layer="layout" svg:width="5.465cm" svg:height="1.06cm" svg:x="14.55cm" svg:y="9.047cm">
              <text:p text:style-name="P15"><text:span text:style-name="T3">- thread: backlighting_manager</text:span></text:p>
              <text:p text:style-name="P15"><text:span text:style-name="T3">- runnning: Even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0" draw:text-style-name="P16" draw:layer="layout" svg:width="5.465cm" svg:height="0.635cm" svg:x="14.55cm" svg:y="10.107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61" draw:text-style-name="P17" draw:layer="layout" draw:line-skew="0.405cm" svg:x1="10.945cm" svg:y1="7.361cm" svg:x2="10.473cm" svg:y2="5.47cm" draw:start-shape="id51" draw:start-glue-point="5" draw:end-shape="id50" draw:end-glue-point="18" svg:d="M10945 7361v-542h-472v-1349" svg:viewBox="0 0 473 1892">
          <text:p/>
        </draw:connector>
        <draw:connector draw:style-name="gr262" draw:text-style-name="P17" draw:layer="layout" svg:x1="19.711cm" svg:y1="7.421cm" svg:x2="18.869cm" svg:y2="5.47cm" draw:start-shape="id52" draw:start-glue-point="15" draw:end-shape="id50" draw:end-glue-point="25" svg:d="M19711 7421v-977h-842v-974" svg:viewBox="0 0 843 1952">
          <text:p/>
        </draw:connector>
        <draw:frame draw:style-name="gr15" draw:text-style-name="P19" draw:layer="layout" svg:width="2.512cm" svg:height="0.725cm" svg:x="3.515cm" svg:y="6.625cm">
          <draw:text-box>
            <text:p><text:span text:style-name="T4">&lt;&lt;uses&gt;&gt;</text:span></text:p>
          </draw:text-box>
        </draw:frame>
        <draw:custom-shape draw:style-name="gr263" draw:text-style-name="P18" draw:layer="layout" svg:width="27.7cm" svg:height="1.27cm" svg:x="1cm" svg:y="1cm">
          <text:p text:style-name="P7">static view: Front-panel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56" draw:id="id5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264" draw:text-style-name="P14" draw:layer="layout" svg:width="8.255cm" svg:height="1.153cm" svg:x="19.615cm" svg:y="12.1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2">&lt;&lt;singleton&gt;&gt;</text:span></text:p>
              <text:p text:style-name="P13"><text:span text:style-name="T2">i2c_service.I2C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5" draw:text-style-name="P16" draw:layer="layout" svg:width="8.255cm" svg:height="0.578cm" svg:x="19.615cm" svg:y="13.3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6" draw:text-style-name="P16" draw:layer="layout" svg:width="8.255cm" svg:height="1.781cm" svg:x="19.615cm" svg:y="13.89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3">+ read_byte(device: int, register: int)</text:span></text:p>
              <text:p text:style-name="P15"><text:span text:style-name="T3">+ write_byte(device: int, register: int)</text:span></text:p>
              <text:p text:style-name="P15"><text:span text:style-name="T9">+ </text:span><text:span text:style-name="T10">read_block</text:span><text:span text:style-name="T9">(device: int, register: int, length: int)</text:span></text:p>
              <text:p text:style-name="P15"><text:span text:style-name="T9">+ write</text:span><text:span text:style-name="T10">_block</text:span><text:span text:style-name="T9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54" draw:id="id5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267" draw:text-style-name="P14" draw:layer="layout" svg:width="5.397cm" svg:height="1.153cm" svg:x="12.802cm" svg:y="17.19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2">light_sensor</text:span></text:p>
              <text:p text:style-name="P13"><text:span text:style-name="T2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8" draw:text-style-name="P16" draw:layer="layout" svg:width="5.397cm" svg:height="0.56cm" svg:x="12.802cm" svg:y="18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9" draw:text-style-name="P16" draw:layer="layout" svg:width="5.397cm" svg:height="0.591cm" svg:x="12.802cm" svg:y="18.90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53" draw:id="id5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270" draw:text-style-name="P14" draw:layer="layout" svg:width="5.397cm" svg:height="1.153cm" svg:x="18.69cm" svg:y="17.06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2">backlight_dac</text:span></text:p>
              <text:p text:style-name="P13"><text:span text:style-name="T2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1" draw:text-style-name="P16" draw:layer="layout" svg:width="5.397cm" svg:height="0.632cm" svg:x="18.69cm" svg:y="18.2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2" draw:text-style-name="P16" draw:layer="layout" svg:width="5.397cm" svg:height="0.667cm" svg:x="18.69cm" svg:y="18.84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55" draw:id="id5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273" draw:text-style-name="P24" draw:layer="layout" svg:width="3.175cm" svg:height="1.627cm" svg:x="5.127cm" svg:y="13.58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3"><text:span text:style-name="T2">&lt;&lt;singleton&gt;&gt;</text:span></text:p>
            <text:p text:style-name="P23"><text:span text:style-name="T2">gpio_service.</text:span></text:p>
            <text:p text:style-name="P23"><text:span text:style-name="T2">GPIO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4" draw:text-style-name="P46" draw:layer="layout" svg:width="3.175cm" svg:height="0.433cm" svg:x="5.127cm" svg:y="15.2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5" draw:text-style-name="P16" draw:layer="layout" svg:width="3.175cm" svg:height="0.39cm" svg:x="5.127cm" svg:y="15.64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76" draw:text-style-name="P17" draw:layer="layout" draw:line-skew="-2.199cm" svg:x1="18.991cm" svg:y1="17.064cm" svg:x2="19.711cm" svg:y2="10.742cm" draw:start-shape="id53" draw:start-glue-point="4" draw:end-shape="id52" draw:end-glue-point="10" svg:d="M18991 17064v-5361h720v-961" svg:viewBox="0 0 721 6323">
          <text:p/>
        </draw:connector>
        <draw:connector draw:style-name="gr277" draw:text-style-name="P17" draw:layer="layout" draw:line-skew="-2.581cm" svg:x1="17.899cm" svg:y1="17.194cm" svg:x2="18.496cm" svg:y2="10.742cm" draw:start-shape="id54" draw:start-glue-point="15" draw:end-shape="id52" draw:end-glue-point="9" svg:d="M17899 17194v-5808h597v-644" svg:viewBox="0 0 598 6453">
          <text:p/>
        </draw:connector>
        <draw:connector draw:style-name="gr278" draw:text-style-name="P17" draw:layer="layout" draw:line-skew="1.003cm" svg:x1="7.419cm" svg:y1="13.583cm" svg:x2="10.098cm" svg:y2="10.34cm" draw:start-shape="id55" draw:start-glue-point="14" draw:end-shape="id51" draw:end-glue-point="7" svg:d="M7419 13583v-620h2679v-2623" svg:viewBox="0 0 2680 3244">
          <text:p/>
        </draw:connector>
        <draw:connector draw:style-name="gr279" draw:text-style-name="P17" draw:layer="layout" svg:x1="5.304cm" svg:y1="13.583cm" svg:x2="7.098cm" svg:y2="12.546cm" draw:start-shape="id55" draw:start-glue-point="4" draw:end-shape="id49" draw:end-glue-point="2" svg:d="M5304 13583v-520h1794v-517" svg:viewBox="0 0 1795 1038">
          <text:p/>
        </draw:connector>
        <draw:connector draw:style-name="gr280" draw:text-style-name="P17" draw:layer="layout" svg:x1="21.91cm" svg:y1="12.161cm" svg:x2="20.014cm" svg:y2="10.198cm" draw:start-shape="id56" draw:start-glue-point="5" draw:end-shape="id52" draw:end-glue-point="12" svg:d="M21910 12161v-1963h-1896" svg:viewBox="0 0 1897 1964">
          <text:p/>
        </draw:connector>
        <draw:frame draw:style-name="gr15" draw:text-style-name="P19" draw:layer="layout" svg:width="2.512cm" svg:height="0.725cm" svg:x="19.732cm" svg:y="10.525cm">
          <draw:text-box>
            <text:p><text:span text:style-name="T4">&lt;&lt;has&gt;&gt;</text:span></text:p>
          </draw:text-box>
        </draw:frame>
        <draw:frame draw:style-name="gr15" draw:text-style-name="P19" draw:layer="layout" svg:width="2.512cm" svg:height="0.725cm" svg:x="10.207cm" svg:y="10.752cm">
          <draw:text-box>
            <text:p><text:span text:style-name="T4">&lt;&lt;has&gt;&gt;</text:span></text:p>
          </draw:text-box>
        </draw:frame>
        <draw:frame draw:style-name="gr15" draw:text-style-name="P19" draw:layer="layout" svg:width="2.512cm" svg:height="0.725cm" svg:x="3.24cm" svg:y="12.747cm">
          <draw:text-box>
            <text:p><text:span text:style-name="T4">&lt;&lt;has&gt;&gt;</text:span></text:p>
          </draw:text-box>
        </draw:frame>
        <draw:frame draw:style-name="gr281" draw:text-style-name="P42" draw:layer="layout" svg:width="6.35cm" svg:height="2.147cm" svg:x="1.635cm" svg:y="17.51cm">
          <draw:text-box>
            <text:p><text:span text:style-name="T11">Waarom backlighting </text:span><text:span text:style-name="T11">thread met stop en off. </text:span><text:span text:style-name="T11">Staat eigenlijk altijd </text:span><text:span text:style-name="T11">aan! Wordt ook in de </text:span><text:span text:style-name="T11">module gestart!</text:span></text:p>
          </draw:text-box>
        </draw:frame>
        <draw:g draw:style-name="gr1" xml:id="id57" draw:id="id5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282" draw:text-style-name="P14" draw:layer="layout" svg:width="4.965cm" svg:height="1.627cm" svg:x="23.322cm" svg:y="7.06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2">&lt;&lt;thread&gt;&gt;</text:span></text:p>
              <text:p text:style-name="P13"><text:span text:style-name="T2">backlighting.</text:span></text:p>
              <text:p text:style-name="P13"><text:span text:style-name="T2">backlighting_manag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3" draw:text-style-name="P16" draw:layer="layout" svg:width="4.965cm" svg:height="0.754cm" svg:x="23.322cm" svg:y="8.694cm">
              <text:p text:style-name="P15"><text:span text:style-name="T3">+ running: Even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4" draw:text-style-name="P16" draw:layer="layout" svg:width="4.965cm" svg:height="0.599cm" svg:x="23.322cm" svg:y="9.44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85" draw:text-style-name="P17" draw:layer="layout" svg:x1="23.323cm" svg:y1="7.703cm" svg:x2="20.014cm" svg:y2="8.056cm" draw:start-shape="id57" draw:start-glue-point="6" draw:end-shape="id52" draw:end-glue-point="13" svg:d="M23323 7703h-1655v353h-1654" svg:viewBox="0 0 3310 354">
          <text:p/>
        </draw:connector>
        <draw:connector draw:style-name="gr286" draw:text-style-name="P17" draw:layer="layout" svg:x1="25.577cm" svg:y1="12.161cm" svg:x2="26.907cm" svg:y2="10.047cm" draw:start-shape="id56" draw:start-glue-point="14" draw:end-shape="id57" draw:end-glue-point="9" svg:d="M25577 12161v-1058h1330v-1056" svg:viewBox="0 0 1331 2115">
          <text:p/>
        </draw:connector>
        <draw:frame draw:style-name="gr15" draw:text-style-name="P19" draw:layer="layout" svg:width="2.512cm" svg:height="0.725cm" svg:x="23.542cm" svg:y="10.117cm">
          <draw:text-box>
            <text:p><text:span text:style-name="T4">&lt;&lt;uses&gt;&gt;</text:span></text:p>
          </draw:text-box>
        </draw:frame>
        <draw:frame draw:style-name="gr15" draw:text-style-name="P19" draw:layer="layout" svg:width="3.81cm" svg:height="0.725cm" svg:x="20.05cm" svg:y="6.942cm">
          <draw:text-box>
            <text:p><text:span text:style-name="T4">&lt;&lt;consists of&gt;&gt;</text:span></text:p>
          </draw:text-box>
        </draw:frame>
        <draw:g draw:style-name="gr1" xml:id="id58" draw:id="id5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287" draw:text-style-name="P24" draw:layer="layout" svg:width="3.492cm" svg:height="1.627cm" svg:x="1.2cm" svg:y="9.88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3"><text:span text:style-name="T2">&lt;&lt;thread&gt;&gt;</text:span></text:p>
            <text:p text:style-name="P23"><text:span text:style-name="T2">led_control.</text:span></text:p>
            <text:p text:style-name="P23"><text:span text:style-name="T2">blin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8" draw:text-style-name="P16" draw:layer="layout" svg:width="3.492cm" svg:height="0.517cm" svg:x="1.2cm" svg:y="11.513cm">
            <text:p text:style-name="P15"><text:span text:style-name="T3">+ stop_evt: Ev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9" draw:text-style-name="P16" draw:layer="layout" svg:width="3.492cm" svg:height="0.465cm" svg:x="1.2cm" svg:y="12.0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90" draw:text-style-name="P17" draw:layer="layout" svg:x1="2.171cm" svg:y1="9.887cm" svg:x2="4.917cm" svg:y2="8.303cm" draw:start-shape="id58" draw:start-glue-point="5" draw:end-shape="id49" draw:end-glue-point="5" svg:d="M2171 9887v-1584h2746" svg:viewBox="0 0 2747 1585">
          <text:p/>
        </draw:connector>
        <draw:frame draw:style-name="gr15" draw:text-style-name="P19" draw:layer="layout" svg:width="3.81cm" svg:height="0.725cm" svg:x="1.082cm" svg:y="7.667cm">
          <draw:text-box>
            <text:p><text:span text:style-name="T4">&lt;&lt;consists of&gt;&gt;</text:span></text:p>
          </draw:text-box>
        </draw:frame>
      </draw:page>
      <draw:page draw:name="Music Players" draw:style-name="dp1" draw:master-page-name="Default">
        <draw:custom-shape draw:style-name="gr291" draw:text-style-name="P8" draw:layer="layout" svg:width="25.039cm" svg:height="0.7cm" svg:x="1.635cm" svg:y="2.75cm">
          <text:p text:style-name="P7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2" draw:text-style-name="P8" draw:layer="layout" svg:width="25.091cm" svg:height="0.7cm" svg:x="1.635cm" svg:y="6.15cm">
          <text:p text:style-name="P7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60" draw:id="id60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293" draw:text-style-name="P10" draw:layer="layout" svg:width="24.873cm" svg:height="1.153cm" svg:x="1.635cm" svg:y="3.7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9"><text:span text:style-name="T2">oradio_control.py</text:span></text:p>
            <text:p text:style-name="P9"><text:span text:style-name="T2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4" draw:text-style-name="P11" draw:layer="layout" svg:width="24.873cm" svg:height="0.679cm" svg:x="1.635cm" svg:y="4.8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3"><text:span text:style-name="T2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95" draw:text-style-name="P8" draw:layer="layout" svg:width="24.824cm" svg:height="0.7cm" svg:x="1.85cm" svg:y="18.98cm">
          <text:p text:style-name="P7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12" draw:layer="layout" svg:width="25.995cm" svg:height="17.715cm" svg:x="1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59" draw:id="id5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1.958cm" svg:y="0.382cm"/>
          <draw:glue-point draw:id="24" svg:x="1.369cm" svg:y="0.382cm"/>
          <draw:glue-point draw:id="25" svg:x="2.545cm" svg:y="0.382cm"/>
          <draw:g draw:style-name="gr1">
            <draw:custom-shape draw:style-name="gr297" draw:text-style-name="P14" draw:layer="layout" svg:width="5.397cm" svg:height="1.153cm" svg:x="10.255cm" svg:y="8.1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2">mpd_monitor.MPDMonitor</text:span></text:p>
              <text:p text:style-name="P13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8" draw:text-style-name="P16" draw:layer="layout" svg:width="5.397cm" svg:height="0.545cm" svg:x="10.255cm" svg:y="9.295cm">
              <text:p text:style-name="P15"><text:span text:style-name="T3">- running: Ev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9" draw:text-style-name="P16" draw:layer="layout" svg:width="5.397cm" svg:height="0.993cm" svg:x="10.255cm" svg:y="9.8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3">+ init(class: MPDService)</text:span></text:p>
              <text:p text:style-name="P15"><text:span text:style-name="T3">- listen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61" draw:id="id6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300" draw:text-style-name="P14" draw:layer="layout" svg:width="5.397cm" svg:height="1.153cm" svg:x="2.54cm" svg:y="7.79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2">mpd_control.MPDControl</text:span></text:p>
              <text:p text:style-name="P13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1" draw:text-style-name="P16" draw:layer="layout" svg:width="5.397cm" svg:height="0.674cm" svg:x="2.54cm" svg:y="8.9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2" draw:text-style-name="P16" draw:layer="layout" svg:width="5.397cm" svg:height="2.569cm" svg:x="2.54cm" svg:y="9.6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3">+ init(class: MPDService)</text:span></text:p>
              <text:p text:style-name="P15"><text:span text:style-name="T3">+ is_web_radio()</text:span></text:p>
              <text:p text:style-name="P15"><text:span text:style-name="T3">+ next()</text:span></text:p>
              <text:p text:style-name="P15"><text:span text:style-name="T3">+ play()</text:span></text:p>
              <text:p text:style-name="P15"><text:span text:style-name="T3">+ stop()</text:span></text:p>
              <text:p text:style-name="P15"><text:span text:style-name="T3">+ pau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62" draw:id="id6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0.009cm" svg:y="-4.346cm"/>
          <draw:glue-point draw:id="24" svg:x="3.714cm" svg:y="-5.101cm"/>
          <draw:g draw:style-name="gr1">
            <draw:custom-shape draw:style-name="gr303" draw:text-style-name="P14" draw:layer="layout" svg:width="6.552cm" svg:height="1.153cm" svg:x="20.165cm" svg:y="9.8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2">spotify_connect.SpotifyConnect</text:span></text:p>
              <text:p text:style-name="P13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4" draw:text-style-name="P16" draw:layer="layout" svg:width="6.552cm" svg:height="0.761cm" svg:x="20.165cm" svg:y="11.0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5" draw:text-style-name="P16" draw:layer="layout" svg:width="6.552cm" svg:height="1.387cm" svg:x="20.165cm" svg:y="11.80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3">+ play()</text:span></text:p>
              <text:p text:style-name="P15"><text:span text:style-name="T3">+ pause()</text:span></text:p>
              <text:p text:style-name="P15"><text:span text:style-name="T3">+ get_stat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306" draw:text-style-name="P17" draw:layer="layout" draw:line-skew="0.495cm" svg:x1="11.755cm" svg:y1="8.143cm" svg:x2="9.687cm" svg:y2="5.57cm" draw:start-shape="id59" draw:start-glue-point="5" draw:end-shape="id60" draw:end-glue-point="18" svg:d="M11755 8143v-793h-2068v-1780" svg:viewBox="0 0 2069 2574">
          <text:p/>
        </draw:connector>
        <draw:connector draw:style-name="gr307" draw:text-style-name="P17" draw:layer="layout" draw:line-skew="0.469cm" svg:x1="2.841cm" svg:y1="7.794cm" svg:x2="3.972cm" svg:y2="5.57cm" draw:start-shape="id61" draw:start-glue-point="4" draw:end-shape="id60" draw:end-glue-point="16" svg:d="M2841 7794v-644h1131v-1580" svg:viewBox="0 0 1132 2225">
          <text:p/>
        </draw:connector>
        <draw:connector draw:style-name="gr308" draw:text-style-name="P17" draw:layer="layout" svg:x1="24.897cm" svg:y1="9.891cm" svg:x2="24.811cm" svg:y2="5.57cm" draw:start-shape="id62" draw:start-glue-point="14" draw:end-shape="id60" draw:end-glue-point="42" svg:d="M24897 9891v-2162h-86v-2159" svg:viewBox="0 0 87 4322">
          <text:p/>
        </draw:connector>
        <draw:custom-shape draw:style-name="gr309" draw:text-style-name="P18" draw:layer="layout" svg:width="25.995cm" svg:height="1.205cm" svg:x="1cm" svg:y="1.099cm">
          <text:p text:style-name="P7">Static View: Music Player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2.54cm" svg:height="0.725cm" svg:x="4.81cm" svg:y="7.26cm">
          <draw:text-box>
            <text:p><text:span text:style-name="T4">&lt;&lt;uses&gt;&gt;</text:span></text:p>
          </draw:text-box>
        </draw:frame>
        <draw:g draw:style-name="gr1" xml:id="id64" draw:id="id64">
          <draw:glue-point draw:id="4" svg:x="4.917cm" svg:y="-2.025cm"/>
          <draw:glue-point draw:id="5" svg:x="3.74cm" svg:y="-5.09cm"/>
          <draw:glue-point draw:id="6" svg:x="4.328cm" svg:y="-5.09cm"/>
          <draw:glue-point draw:id="7" svg:x="-5.013cm" svg:y="-2.679cm"/>
          <draw:custom-shape draw:style-name="gr310" draw:text-style-name="P14" draw:layer="layout" svg:width="5.397cm" svg:height="1.153cm" svg:x="9.603cm" svg:y="15.44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3"><text:span text:style-name="T2">mpd_service.MPDService</text:span></text:p>
            <text:p text:style-name="P13"><text:span text:style-name="T2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1" draw:text-style-name="P16" draw:layer="layout" svg:width="5.397cm" svg:height="0.669cm" svg:x="9.603cm" svg:y="16.601cm">
            <text:p text:style-name="P15"><text:span text:style-name="T3">- client: MPDCli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2" draw:text-style-name="P16" draw:layer="layout" svg:width="5.397cm" svg:height="1.387cm" svg:x="9.603cm" svg:y="17.2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5"><text:span text:style-name="T3">+ init()</text:span></text:p>
            <text:p text:style-name="P15"><text:span text:style-name="T3">+ get_stats()</text:span></text:p>
            <text:p text:style-name="P15"><text:span text:style-name="T3">- 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63" draw:id="id63">
          <draw:custom-shape draw:style-name="gr313" draw:text-style-name="P14" draw:layer="layout" svg:width="3.829cm" svg:height="1.153cm" svg:x="18.443cm" svg:y="13.77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3"><text:span text:style-name="T2">mpd.MPDClient</text:span></text:p>
            <text:p text:style-name="P13"><text:span text:style-name="T2">&lt;&lt;library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4" draw:text-style-name="P16" draw:layer="layout" svg:width="3.829cm" svg:height="0.504cm" svg:x="18.443cm" svg:y="14.9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5" draw:text-style-name="P16" draw:layer="layout" svg:width="3.829cm" svg:height="3.357cm" svg:x="18.443cm" svg:y="15.43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5"><text:span text:style-name="T3">+ init()</text:span></text:p>
            <text:p text:style-name="P15"><text:span text:style-name="T3">+ idle()</text:span></text:p>
            <text:p text:style-name="P15"><text:span text:style-name="T3">+ update()</text:span></text:p>
            <text:p text:style-name="P15"><text:span text:style-name="T3">+ next()</text:span></text:p>
            <text:p text:style-name="P15"><text:span text:style-name="T3">+ play()</text:span></text:p>
            <text:p text:style-name="P15"><text:span text:style-name="T3">+ stop()</text:span></text:p>
            <text:p text:style-name="P15"><text:span text:style-name="T3">+ pause()</text:span></text:p>
            <text:p text:style-name="P15"><text:span text:style-name="T3">+ status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16" draw:text-style-name="P17" draw:layer="layout" svg:x1="18.443cm" svg:y1="16.283cm" svg:x2="15cm" svg:y2="17.052cm" draw:start-shape="id63" draw:start-glue-point="3" draw:end-shape="id64" draw:end-glue-point="1" svg:d="M18443 16283h-1722v769h-1721" svg:viewBox="0 0 3444 770">
          <text:p/>
        </draw:connector>
        <draw:frame draw:style-name="gr15" draw:text-style-name="P19" draw:layer="layout" svg:width="2.83cm" svg:height="0.725cm" svg:x="6.08cm" svg:y="17.102cm">
          <draw:text-box>
            <text:p><text:span text:style-name="T4">&lt;&lt;is A&gt;&gt;</text:span></text:p>
          </draw:text-box>
          <draw:glue-point draw:id="4" svg:x="0.512cm" svg:y="-0.606cm"/>
        </draw:frame>
        <draw:connector draw:style-name="gr317" draw:text-style-name="P17" draw:layer="layout" svg:x1="14.636cm" svg:y1="15.448cm" svg:x2="14.152cm" svg:y2="10.833cm" draw:start-shape="id64" draw:start-glue-point="6" draw:end-shape="id59" draw:end-glue-point="9" svg:d="M14636 15448v-2308h-484v-2307" svg:viewBox="0 0 485 4616">
          <text:p/>
        </draw:connector>
        <draw:connector draw:style-name="gr318" draw:text-style-name="P17" draw:layer="layout" svg:x1="9.603cm" svg:y1="17.052cm" svg:x2="6.437cm" svg:y2="12.189cm" draw:start-shape="id64" draw:start-glue-point="3" draw:end-shape="id61" draw:end-glue-point="9" svg:d="M9603 17052h-3166v-4863" svg:viewBox="0 0 3167 4864">
          <text:p/>
        </draw:connector>
        <draw:frame draw:style-name="gr15" draw:text-style-name="P19" draw:layer="layout" svg:width="2.222cm" svg:height="0.725cm" svg:x="12.33cm" svg:y="11.16cm">
          <draw:text-box>
            <text:p><text:span text:style-name="T4">&lt;&lt;is A&gt;&gt;</text:span></text:p>
          </draw:text-box>
          <draw:glue-point draw:id="4" svg:x="0.512cm" svg:y="-0.606cm"/>
        </draw:frame>
        <draw:frame draw:style-name="gr15" draw:text-style-name="P19" draw:layer="layout" svg:width="3.147cm" svg:height="0.725cm" svg:x="21.665cm" svg:y="7.26cm">
          <draw:text-box>
            <text:p><text:span text:style-name="T4">&lt;&lt;uses&gt;&gt;</text:span></text:p>
          </draw:text-box>
        </draw:frame>
        <draw:frame draw:style-name="gr15" draw:text-style-name="P19" draw:layer="layout" svg:width="2.54cm" svg:height="0.725cm" svg:x="7.985cm" svg:y="7.577cm">
          <draw:text-box>
            <text:p><text:span text:style-name="T4">&lt;&lt;uses&gt;&gt;</text:span></text:p>
          </draw:text-box>
        </draw:frame>
        <draw:frame draw:style-name="gr15" draw:text-style-name="P19" draw:layer="layout" svg:width="3.81cm" svg:height="0.725cm" svg:x="14.97cm" svg:y="17.42cm">
          <draw:text-box>
            <text:p><text:span text:style-name="T4">&lt;&lt;consists of&gt;&gt;</text:span></text:p>
          </draw:text-box>
        </draw:frame>
        <draw:g draw:style-name="gr1" xml:id="id65" draw:id="id65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319" draw:text-style-name="P24" draw:layer="layout" svg:width="4.538cm" svg:height="1.627cm" svg:x="1.443cm" svg:y="13.6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3"><text:span text:style-name="T2">&lt;&lt;thread&gt;&gt;</text:span></text:p>
            <text:p text:style-name="P23"><text:span text:style-name="T2">mpd_control.</text:span></text:p>
            <text:p text:style-name="P23"><text:span text:style-name="T2">remove_song_w_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0" draw:text-style-name="P16" draw:layer="layout" svg:width="4.538cm" svg:height="0.435cm" svg:x="1.443cm" svg:y="15.2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1" draw:text-style-name="P16" draw:layer="layout" svg:width="4.538cm" svg:height="0.993cm" svg:x="1.443cm" svg:y="15.64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22" draw:text-style-name="P17" draw:layer="layout" svg:x1="4.361cm" svg:y1="13.65cm" svg:x2="4.04cm" svg:y2="12.189cm" draw:start-shape="id65" draw:start-glue-point="8" draw:end-shape="id61" draw:end-glue-point="8" svg:d="M4361 13650v-731h-321v-730" svg:viewBox="0 0 322 1462">
          <text:p/>
        </draw:connector>
        <draw:g draw:style-name="gr1" xml:id="id66" draw:id="id66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323" draw:text-style-name="P24" draw:layer="layout" svg:width="4.538cm" svg:height="1.627cm" svg:x="17.292cm" svg:y="7.03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3"><text:span text:style-name="T2">&lt;&lt;thread&gt;&gt;</text:span></text:p>
            <text:p text:style-name="P23"><text:span text:style-name="T2">mpd_monitor.</text:span></text:p>
            <text:p text:style-name="P23"><text:span text:style-name="T2">list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4" draw:text-style-name="P16" draw:layer="layout" svg:width="4.538cm" svg:height="0.728cm" svg:x="17.292cm" svg:y="8.662cm">
            <text:p text:style-name="P15"><text:span text:style-name="T3">+ running: Ev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5" draw:text-style-name="P16" draw:layer="layout" svg:width="4.538cm" svg:height="0.635cm" svg:x="17.292cm" svg:y="9.3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26" draw:text-style-name="P17" draw:layer="layout" svg:x1="17.292cm" svg:y1="8.53cm" svg:x2="15.651cm" svg:y2="8.778cm" draw:start-shape="id66" draw:end-shape="id59" draw:end-glue-point="13" svg:d="M17292 8530h-820v248h-821" svg:viewBox="0 0 1642 24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Navigation" svg:viewBox="0 0 786 1228" svg:d="M151 1228l-76-25-75-25 318-952 76-226 75 226 317 952-76 25-75 25-162-486v462h-80-79v-464z"/>
    <draw:marker draw:name="Square_20_45" draw:display-name="Square 45" svg:viewBox="0 0 1131 1131" svg:d="M0 564l564 567 567-567-567-564z"/>
    <draw:marker draw:name="Square_20_45_20_unfilled" draw:display-name="Square 45 unfilled" svg:viewBox="0 0 3000 3000" svg:d="M1500 3000l-1500-1500 1500-1500 1500 1500zM1500 2715l-1215-1215 1215-1215 1215 1215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3T16:23:47.322558208</meta:creation-date>
    <meta:generator>LibreOffice/24.2.7.2$Linux_X86_64 LibreOffice_project/420$Build-2</meta:generator>
    <dc:date>2026-05-29T18:03:41.486203012</dc:date>
    <meta:editing-duration>PT14H45M53S</meta:editing-duration>
    <meta:editing-cycles>104</meta:editing-cycles>
    <meta:print-date>2026-05-29T18:03:34.284272161</meta:print-date>
    <dc:creator>Henk</dc:creator>
    <meta:printed-by>PDF files: Henk</meta:printed-by>
    <meta:document-statistic meta:object-count="492"/>
  </office:meta>
</office:document-meta>
</file>